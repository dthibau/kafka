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7000002F216B6367B.png" manifest:media-type="image/png"/>
  <manifest:file-entry manifest:full-path="Pictures/1000000100000AD1000004AEF47DE572.png" manifest:media-type="image/png"/>
  <manifest:file-entry manifest:full-path="Pictures/100000000000075A0000060065113F76.png" manifest:media-type="image/png"/>
  <manifest:file-entry manifest:full-path="Pictures/10000000000001280000006ED2B48C3F.jpg" manifest:media-type="image/jpeg"/>
  <manifest:file-entry manifest:full-path="Pictures/10000000000003DE000001B0B0EE38E8.png" manifest:media-type="image/png"/>
  <manifest:file-entry manifest:full-path="Pictures/10000000000002B4000000BD7CDAC576.png" manifest:media-type="image/png"/>
  <manifest:file-entry manifest:full-path="Pictures/10000000000001A00000010B99E34F5B.png" manifest:media-type="image/png"/>
  <manifest:file-entry manifest:full-path="Pictures/100000010000039F00000302DD05C76F.png" manifest:media-type="image/png"/>
  <manifest:file-entry manifest:full-path="Pictures/1000000000000335000000FBCA7FBDB1.png" manifest:media-type="image/png"/>
  <manifest:file-entry manifest:full-path="Pictures/10000001000002C60000024EE140356B.png" manifest:media-type="image/png"/>
  <manifest:file-entry manifest:full-path="Pictures/1000000100000468000004E0069CD733.png" manifest:media-type="image/png"/>
  <manifest:file-entry manifest:full-path="Pictures/10000001000007100000027A070F0685.png" manifest:media-type="image/png"/>
  <manifest:file-entry manifest:full-path="Pictures/10000001000002C6000001F5A5AA6B72.png" manifest:media-type="image/png"/>
  <manifest:file-entry manifest:full-path="Pictures/10000001000002C6000001F577A322C2.png" manifest:media-type="image/png"/>
  <manifest:file-entry manifest:full-path="Pictures/1000000000000500000002D00D415DCF.png" manifest:media-type="image/png"/>
  <manifest:file-entry manifest:full-path="Pictures/10000000000004380000050B61909730.png" manifest:media-type="image/png"/>
  <manifest:file-entry manifest:full-path="Pictures/1000000100000118000000DAD03F238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roman"/>
    <style:font-face style:name="FreeSans1" svg:font-family="FreeSans" style:font-pitch="variable"/>
    <style:font-face style:name="FreeSans2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roman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modern" style:font-pitch="fixed"/>
    <style:font-face style:name="Lucida Sans Unicode2" svg:font-family="'Lucida Sans Unicode'" style:font-family-generic="swiss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true" presentation:display-page-number="true" presentation:display-date-time="true"/>
    </style:style>
    <style:style style:name="dp8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gr4" style:family="graphic" style:parent-style-name="Style_20_de_20_dessin_20_par_20_défaut_5f_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879cm" fo:min-width="15.25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Style_20_de_20_dessin_20_par_20_défau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yle_20_de_20_dessin_20_par_20_défau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21.58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9cm" fo:min-width="16.07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9.738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879cm" fo:min-width="15.25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4.04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3.587cm" loext:decorative="false"/>
      <style:paragraph-properties style:writing-mode="lr-tb"/>
    </style:style>
    <style:style style:name="gr14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15.454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2.066cm" loext:decorative="false"/>
      <style:paragraph-properties style:writing-mode="lr-tb"/>
    </style:style>
    <style:style style:name="gr22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1.254cm" loext:decorative="false"/>
      <style:paragraph-properties style:writing-mode="lr-tb"/>
    </style:style>
    <style:style style:name="pr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21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3.92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Standard-notes">
      <style:graphic-properties draw:stroke="none" draw:fill="none" draw:fill-color="#ffffff" fo:min-height="11.26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3.575cm" loext:decorative="false"/>
      <style:paragraph-properties style:writing-mode="lr-tb"/>
    </style:style>
    <style:style style:name="pr6" style:family="presentation" style:parent-style-name="Standard-outline1">
      <style:graphic-properties fo:min-height="11.93cm" loext:decorative="false"/>
      <style:paragraph-properties style:writing-mode="lr-tb"/>
    </style:style>
    <style:style style:name="pr7" style:family="presentation" style:parent-style-name="Vide-title" style:list-style-name="L15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Vide-subtitle" style:list-style-name="L15">
      <style:graphic-properties draw:stroke="none" svg:stroke-width="0cm" draw:fill="none" draw:fill-color="#ffffff" draw:textarea-vertical-align="top" draw:auto-grow-height="true" draw:fit-to-size="false" style:shrink-to-fit="false" fo:min-height="12.18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V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Vide-outline1">
      <style:graphic-properties draw:stroke="none" svg:stroke-width="0cm" draw:fill="none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Vide-outline1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14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5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7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8" style:family="presentation" style:parent-style-name="Vide-outline1" style:list-style-name="L17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19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20" style:family="presentation" style:parent-style-name="Vide_5f_-title" style:list-style-name="L15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21" style:family="presentation" style:parent-style-name="Vide_5f_-subtitle" style:list-style-name="L15">
      <style:graphic-properties draw:stroke="none" svg:stroke-width="0cm" draw:fill="none" draw:fill-color="#ffffff" draw:textarea-vertical-align="top" draw:auto-grow-height="true" draw:fit-to-size="false" style:shrink-to-fit="false" fo:min-height="12.18cm" fo:padding-top="0cm" fo:padding-bottom="0cm" fo:padding-left="0cm" fo:padding-right="0cm" fo:wrap-option="wrap" loext:decorative="false"/>
      <style:paragraph-properties style:writing-mode="lr-tb"/>
    </style:style>
    <style:style style:name="pr22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23" style:family="presentation" style:parent-style-name="Vide_5f_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Vide_5f_-outline1">
      <style:graphic-properties draw:stroke="none" svg:stroke-width="0cm" draw:fill="none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25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26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27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28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29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1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2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3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4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5" style:family="presentation" style:parent-style-name="Vide_5f__5f__5f_-title" style:list-style-name="L15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36" style:family="presentation" style:parent-style-name="Vide_5f__5f__5f_-subtitle" style:list-style-name="L15">
      <style:graphic-properties draw:stroke="none" svg:stroke-width="0cm" draw:fill="none" draw:fill-color="#ffffff" draw:textarea-vertical-align="top" draw:auto-grow-height="true" draw:fit-to-size="false" style:shrink-to-fit="false" fo:min-height="12.18cm" fo:padding-top="0cm" fo:padding-bottom="0cm" fo:padding-left="0cm" fo:padding-right="0cm" fo:wrap-option="wrap" loext:decorative="false"/>
      <style:paragraph-properties style:writing-mode="lr-tb"/>
    </style:style>
    <style:style style:name="pr37" style:family="presentation" style:parent-style-name="Vide_5f_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8" style:family="presentation" style:parent-style-name="Standard-title">
      <style:graphic-properties fo:min-height="3.575cm" loext:decorative="false"/>
      <style:paragraph-properties style:writing-mode="lr-tb"/>
    </style:style>
    <style:style style:name="pr39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0" style:family="presentation" style:parent-style-name="Vide-outline1" style:list-style-name="L17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41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2" style:family="presentation" style:parent-style-name="Standard-outline1" style:list-style-name="L1">
      <style:graphic-properties draw:auto-grow-height="true" draw:fit-to-size="false" style:shrink-to-fit="false" fo:min-height="14.322cm" loext:decorative="false"/>
      <style:paragraph-properties style:writing-mode="lr-tb"/>
    </style:style>
    <style:style style:name="pr43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4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5" style:family="presentation" style:parent-style-name="Standard-outline1">
      <style:graphic-properties draw:auto-grow-height="true" draw:fit-to-size="false" style:shrink-to-fit="false" fo:min-height="13.54cm" loext:decorative="false"/>
      <style:paragraph-properties style:writing-mode="lr-tb"/>
    </style:style>
    <style:style style:name="pr46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7" style:family="presentation" style:parent-style-name="Vide_5f__5f__5f_-title" style:list-style-name="L15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48" style:family="presentation" style:parent-style-name="Vide_5f__5f__5f_-subtitle" style:list-style-name="L15">
      <style:graphic-properties draw:stroke="none" svg:stroke-width="0cm" draw:fill="none" draw:fill-color="#ffffff" draw:textarea-vertical-align="top" draw:auto-grow-height="true" draw:fit-to-size="false" style:shrink-to-fit="false" fo:min-height="12.18cm" fo:padding-top="0cm" fo:padding-bottom="0cm" fo:padding-left="0cm" fo:padding-right="0cm" fo:wrap-option="wrap" loext:decorative="false"/>
      <style:paragraph-properties style:writing-mode="lr-tb"/>
    </style:style>
    <style:style style:name="pr49" style:family="presentation" style:parent-style-name="Vide_5f_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0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1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2" style:family="presentation" style:parent-style-name="Vide-outline1" style:list-style-name="L17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53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4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5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6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7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8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9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0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1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2" style:family="presentation" style:parent-style-name="Vide-outline1" style:list-style-name="L17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63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4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5" style:family="presentation" style:parent-style-name="Vide_5f__5f_-title" style:list-style-name="L15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66" style:family="presentation" style:parent-style-name="Vide_5f__5f_-subtitle" style:list-style-name="L15">
      <style:graphic-properties draw:stroke="none" svg:stroke-width="0cm" draw:fill="none" draw:fill-color="#ffffff" draw:textarea-vertical-align="top" draw:auto-grow-height="true" draw:fit-to-size="false" style:shrink-to-fit="false" fo:min-height="12.18cm" fo:padding-top="0cm" fo:padding-bottom="0cm" fo:padding-left="0cm" fo:padding-right="0cm" fo:wrap-option="wrap" loext:decorative="false"/>
      <style:paragraph-properties style:writing-mode="lr-tb"/>
    </style:style>
    <style:style style:name="pr67" style:family="presentation" style:parent-style-name="Vide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8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9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0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1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2" style:family="presentation" style:parent-style-name="Vide_5f_-title" style:list-style-name="L15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73" style:family="presentation" style:parent-style-name="Vide_5f_-subtitle" style:list-style-name="L15">
      <style:graphic-properties draw:stroke="none" svg:stroke-width="0cm" draw:fill="none" draw:fill-color="#ffffff" draw:textarea-vertical-align="top" draw:auto-grow-height="true" draw:fit-to-size="false" style:shrink-to-fit="false" fo:min-height="12.18cm" fo:padding-top="0cm" fo:padding-bottom="0cm" fo:padding-left="0cm" fo:padding-right="0cm" fo:wrap-option="wrap" loext:decorative="false"/>
      <style:paragraph-properties style:writing-mode="lr-tb"/>
    </style:style>
    <style:style style:name="pr74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5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6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7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8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9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0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1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2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3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4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5" style:family="presentation" style:parent-style-name="Vide_5f__5f_-title" style:list-style-name="L15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86" style:family="presentation" style:parent-style-name="Vide_5f__5f_-subtitle" style:list-style-name="L15">
      <style:graphic-properties draw:stroke="none" svg:stroke-width="0cm" draw:fill="none" draw:fill-color="#ffffff" draw:textarea-vertical-align="top" draw:auto-grow-height="true" draw:fit-to-size="false" style:shrink-to-fit="false" fo:min-height="12.18cm" fo:padding-top="0cm" fo:padding-bottom="0cm" fo:padding-left="0cm" fo:padding-right="0cm" fo:wrap-option="wrap" loext:decorative="false"/>
      <style:paragraph-properties style:writing-mode="lr-tb"/>
    </style:style>
    <style:style style:name="pr87" style:family="presentation" style:parent-style-name="Vide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8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9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0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1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2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3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4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5" style:family="presentation" style:parent-style-name="Vide_5f__5f__5f_-title" style:list-style-name="L15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96" style:family="presentation" style:parent-style-name="Vide_5f__5f__5f_-subtitle" style:list-style-name="L15">
      <style:graphic-properties draw:stroke="none" svg:stroke-width="0cm" draw:fill="none" draw:fill-color="#ffffff" draw:textarea-vertical-align="top" draw:auto-grow-height="true" draw:fit-to-size="false" style:shrink-to-fit="false" fo:min-height="12.18cm" fo:padding-top="0cm" fo:padding-bottom="0cm" fo:padding-left="0cm" fo:padding-right="0cm" fo:wrap-option="wrap" loext:decorative="false"/>
      <style:paragraph-properties style:writing-mode="lr-tb"/>
    </style:style>
    <style:style style:name="pr97" style:family="presentation" style:parent-style-name="Vide_5f_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8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9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0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1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2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3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4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5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6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7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8" style:family="presentation" style:parent-style-name="Vide-notes">
      <style:graphic-properties draw:fill-color="#ffffff" fo:min-height="13.364cm" loext:decorative="false"/>
      <style:paragraph-properties style:writing-mode="lr-tb"/>
    </style:style>
    <style:style style:name="pr109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10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11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12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13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14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15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16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17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18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19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20" style:family="presentation" style:parent-style-name="Vide_5f__5f_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121" style:family="presentation" style:parent-style-name="Vide_5f__5f_-outline1">
      <style:graphic-properties draw:stroke="none" svg:stroke-width="0cm" draw:fill="none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122" style:family="presentation" style:parent-style-name="Vide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23" style:family="presentation" style:parent-style-name="Vide_5f__5f__5f__5f_-title" style:list-style-name="L15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124" style:family="presentation" style:parent-style-name="Vide_5f__5f__5f__5f_-subtitle" style:list-style-name="L15">
      <style:graphic-properties draw:stroke="none" svg:stroke-width="0cm" draw:fill="none" draw:fill-color="#ffffff" draw:textarea-vertical-align="top" draw:auto-grow-height="true" draw:fit-to-size="false" style:shrink-to-fit="false" fo:min-height="12.18cm" fo:padding-top="0cm" fo:padding-bottom="0cm" fo:padding-left="0cm" fo:padding-right="0cm" fo:wrap-option="wrap" loext:decorative="false"/>
      <style:paragraph-properties style:writing-mode="lr-tb"/>
    </style:style>
    <style:style style:name="pr125" style:family="presentation" style:parent-style-name="Vide_5f__5f_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26" style:family="presentation" style:parent-style-name="Vide_5f__5f__5f_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127" style:family="presentation" style:parent-style-name="Vide_5f__5f__5f_-outline1">
      <style:graphic-properties draw:stroke="none" svg:stroke-width="0cm" draw:fill="none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128" style:family="presentation" style:parent-style-name="Vide_5f_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29" style:family="presentation" style:parent-style-name="Vide_5f_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30" style:family="presentation" style:parent-style-name="Vide_5f_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31" style:family="presentation" style:parent-style-name="Vide_5f_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32" style:family="presentation" style:parent-style-name="Vide_5f_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33" style:family="presentation" style:parent-style-name="Vide_5f__5f__5f__5f_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134" style:family="presentation" style:parent-style-name="Vide_5f__5f__5f__5f_-outline1">
      <style:graphic-properties draw:stroke="none" svg:stroke-width="0cm" draw:fill="none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135" style:family="presentation" style:parent-style-name="Vide_5f__5f_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36" style:family="presentation" style:parent-style-name="Vide_5f__5f_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37" style:family="presentation" style:parent-style-name="Vide_5f__5f_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38" style:family="presentation" style:parent-style-name="Vide_5f_-title" style:list-style-name="L15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139" style:family="presentation" style:parent-style-name="Vide_5f_-subtitle" style:list-style-name="L15">
      <style:graphic-properties draw:stroke="none" svg:stroke-width="0cm" draw:fill="none" draw:fill-color="#ffffff" draw:textarea-vertical-align="top" draw:auto-grow-height="true" draw:fit-to-size="false" style:shrink-to-fit="false" fo:min-height="12.18cm" fo:padding-top="0cm" fo:padding-bottom="0cm" fo:padding-left="0cm" fo:padding-right="0cm" fo:wrap-option="wrap" loext:decorative="false"/>
      <style:paragraph-properties style:writing-mode="lr-tb"/>
    </style:style>
    <style:style style:name="pr140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41" style:family="presentation" style:parent-style-name="Vide_5f_-outline1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142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43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44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45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46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47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48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49" style:family="presentation" style:parent-style-name="Vide_5f__5f_-title" style:list-style-name="L15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150" style:family="presentation" style:parent-style-name="Vide_5f__5f_-subtitle" style:list-style-name="L15">
      <style:graphic-properties draw:stroke="none" svg:stroke-width="0cm" draw:fill="none" draw:fill-color="#ffffff" draw:textarea-vertical-align="top" draw:auto-grow-height="true" draw:fit-to-size="false" style:shrink-to-fit="false" fo:min-height="12.18cm" fo:padding-top="0cm" fo:padding-bottom="0cm" fo:padding-left="0cm" fo:padding-right="0cm" fo:wrap-option="wrap" loext:decorative="false"/>
      <style:paragraph-properties style:writing-mode="lr-tb"/>
    </style:style>
    <style:style style:name="pr151" style:family="presentation" style:parent-style-name="Vide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52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53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54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55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56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57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58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59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60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61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62" style:family="presentation" style:parent-style-name="Vide_5f__5f__5f__5f_-title" style:list-style-name="L15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163" style:family="presentation" style:parent-style-name="Vide_5f__5f__5f__5f_-subtitle" style:list-style-name="L15">
      <style:graphic-properties draw:stroke="none" svg:stroke-width="0cm" draw:fill="none" draw:fill-color="#ffffff" draw:textarea-vertical-align="top" draw:auto-grow-height="true" draw:fit-to-size="false" style:shrink-to-fit="false" fo:min-height="12.18cm" fo:padding-top="0cm" fo:padding-bottom="0cm" fo:padding-left="0cm" fo:padding-right="0cm" fo:wrap-option="wrap" loext:decorative="false"/>
      <style:paragraph-properties style:writing-mode="lr-tb"/>
    </style:style>
    <style:style style:name="pr164" style:family="presentation" style:parent-style-name="Vide_5f__5f_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65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66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67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68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69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70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71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72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73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74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75" style:family="presentation" style:parent-style-name="V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76" style:family="presentation" style:parent-style-name="Vide_5f__5f__5f_-title" style:list-style-name="L15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177" style:family="presentation" style:parent-style-name="Vide_5f__5f__5f_-subtitle" style:list-style-name="L15">
      <style:graphic-properties draw:stroke="none" svg:stroke-width="0cm" draw:fill="none" draw:fill-color="#ffffff" draw:textarea-vertical-align="top" draw:auto-grow-height="true" draw:fit-to-size="false" style:shrink-to-fit="false" fo:min-height="12.18cm" fo:padding-top="0cm" fo:padding-bottom="0cm" fo:padding-left="0cm" fo:padding-right="0cm" fo:wrap-option="wrap" loext:decorative="false"/>
      <style:paragraph-properties style:writing-mode="lr-tb"/>
    </style:style>
    <style:style style:name="pr178" style:family="presentation" style:parent-style-name="Vide_5f__5f_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79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80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81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82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83" style:family="presentation" style:parent-style-name="Vide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line-height="95%" fo:text-indent="0cm" style:line-break="stric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40pt" style:font-size-asian="40pt" style:font-size-complex="40pt"/>
    </style:style>
    <style:style style:name="P5" style:family="paragraph">
      <style:paragraph-properties fo:margin-left="0.952cm" fo:margin-right="0cm" fo:line-height="95%" fo:text-indent="-0.864cm" style:line-break="strict"/>
    </style:style>
    <style:style style:name="P6" style:family="paragraph">
      <loext:graphic-properties draw:fill="none" draw:fill-color="#ffffff"/>
      <style:paragraph-properties style:font-independent-line-spacing="true"/>
    </style:style>
    <style:style style:name="P7" style:family="paragraph">
      <loext:graphic-properties draw:fill="solid" draw:fill-color="#ffffff"/>
      <style:paragraph-properties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style:paragraph-properties fo:margin-left="2.063cm" fo:margin-right="0cm" fo:margin-top="0cm" fo:margin-bottom="0.401cm" fo:text-indent="-0.793cm" loext:tab-stop-distance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96%" fo:text-align="center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96%" fo:text-align="center" fo:text-indent="0cm" style:punctuation-wrap="simple" loext:tab-stop-distance="0cm" style:font-independent-line-spacing="true">
        <style:tab-stops>
          <style:tab-stop style:position="0cm"/>
        </style:tab-stops>
      </style:paragraph-properties>
      <style:text-properties fo:font-size="44pt"/>
    </style:style>
    <style:style style:name="P13" style:family="paragraph">
      <style:paragraph-properties fo:margin-left="0.952cm" fo:margin-right="0cm" fo:margin-top="0cm" fo:margin-bottom="0cm" fo:line-height="95%" fo:text-align="center" fo:text-indent="-0.864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0.952cm" fo:margin-right="0cm" fo:margin-top="0cm" fo:margin-bottom="0cm" fo:line-height="95%" fo:text-align="center" fo:text-indent="-0.864cm" style:punctuation-wrap="simple" loext:tab-stop-distance="0cm" style:font-independent-line-spacing="true">
        <style:tab-stops>
          <style:tab-stop style:position="0cm"/>
        </style:tab-stops>
      </style:paragraph-properties>
      <style:text-properties fo:font-size="32pt"/>
    </style:style>
    <style:style style:name="P15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8" style:family="paragraph">
      <style:paragraph-properties fo:margin-left="0.952cm" fo:margin-right="0cm" fo:margin-top="0cm" fo:margin-bottom="0.502cm" fo:line-height="96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502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hyphenate="false"/>
    </style:style>
    <style:style style:name="P20" style:family="paragraph">
      <style:paragraph-properties fo:margin-left="0.952cm" fo:margin-right="0cm" fo:margin-top="0cm" fo:margin-bottom="0.502cm" fo:line-height="96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2" style:family="paragraph">
      <style:paragraph-properties fo:margin-left="0cm" fo:margin-right="0cm" fo:margin-top="0cm" fo:margin-bottom="0cm" fo:line-height="95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95%" fo:text-align="start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.952cm" fo:margin-right="0cm" fo:margin-top="0cm" fo:margin-bottom="0.502cm" fo:line-height="96%" fo:text-align="start" fo:text-indent="-0.952cm" style:punctuation-wrap="simple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.952cm" fo:margin-right="0cm" fo:line-height="95%" fo:text-indent="-0.864cm" loext:tab-stop-distance="0cm">
        <style:tab-stops>
          <style:tab-stop style:position="0cm"/>
        </style:tab-stops>
      </style:paragraph-properties>
    </style:style>
    <style:style style:name="P27" style:family="paragraph">
      <style:paragraph-properties fo:margin-left="0.952cm" fo:margin-right="0cm" fo:margin-top="0cm" fo:margin-bottom="0.502cm" fo:line-height="96%" fo:text-align="start" fo:text-indent="-0.952cm" style:punctuation-wrap="simple" loext:tab-stop-distance="0cm">
        <style:tab-stops>
          <style:tab-stop style:position="0cm"/>
        </style:tab-stops>
      </style:paragraph-properties>
      <style:text-properties fo:font-size="18pt" fo:font-style="italic" style:font-style-asian="italic" style:font-style-complex="italic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95%" fo:text-align="start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style="italic" style:font-style-asian="italic" style:font-style-complex="italic" fo:hyphenate="false"/>
    </style:style>
    <style:style style:name="P29" style:family="paragraph">
      <style:paragraph-properties fo:margin-left="0.952cm" fo:margin-right="0cm" fo:margin-top="0cm" fo:margin-bottom="0.2cm" fo:line-height="10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.2cm" fo:line-height="100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P31" style:family="paragraph">
      <style:paragraph-properties fo:margin-left="0.952cm" fo:margin-right="0cm" fo:margin-top="0cm" fo:margin-bottom="0.502cm" fo:text-indent="-0.952cm" loext:tab-stop-distance="0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.502cm" fo:line-height="96%" fo:text-align="start" fo:text-indent="0cm" loext:tab-stop-distance="0cm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text-properties fo:font-style="italic" style:font-style-asian="italic" style:font-style-complex="italic"/>
    </style:style>
    <style:style style:name="P34" style:family="paragraph">
      <loext:graphic-properties draw:fill-color="#ffffff"/>
      <style:text-properties fo:font-size="12pt"/>
    </style:style>
    <style:style style:name="P35" style:family="paragraph">
      <style:paragraph-properties fo:margin-left="0.952cm" fo:margin-right="0cm" fo:margin-top="0cm" fo:margin-bottom="0.1cm" fo:line-height="100%" fo:text-indent="-0.952cm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6" style:family="paragraph">
      <style:paragraph-properties fo:margin-left="0.952cm" fo:margin-right="0cm" fo:margin-top="0cm" fo:margin-bottom="0.1cm" fo:line-height="100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7" style:family="paragraph">
      <style:paragraph-properties fo:margin-top="0cm" fo:margin-bottom="0.1cm" fo:line-height="100%" style:font-independent-line-spacing="false"/>
      <style:text-properties style:font-name="Courier new" fo:font-size="15pt" style:font-size-asian="15pt" style:font-size-complex="15pt"/>
    </style:style>
    <style:style style:name="P38" style:family="paragraph">
      <style:paragraph-properties fo:margin-top="0cm" fo:margin-bottom="0.1cm" fo:line-height="100%"/>
    </style:style>
    <style:style style:name="P39" style:family="paragraph">
      <style:paragraph-properties fo:margin-top="0cm" fo:margin-bottom="0.1cm" fo:line-height="100%" style:font-independent-line-spacing="false"/>
      <style:text-properties style:font-name="Courier new"/>
    </style:style>
    <style:style style:name="P40" style:family="paragraph">
      <style:paragraph-properties fo:margin-top="0cm" fo:margin-bottom="0.1cm" fo:line-height="100%"/>
      <style:text-properties style:font-name="Courier New"/>
    </style:style>
    <style:style style:name="P41" style:family="paragraph">
      <loext:graphic-properties draw:fill="none" draw:fill-color="#ffffff"/>
      <style:text-properties fo:color="#ce181e" loext:opacity="100%" fo:font-style="italic" fo:font-weight="bold" style:font-style-asian="italic" style:font-weight-asian="bold" style:font-style-complex="italic" style:font-weight-complex="bold"/>
    </style:style>
    <style:style style:name="P42" style:family="paragraph">
      <style:paragraph-properties fo:margin-left="0cm" fo:margin-right="0cm" fo:margin-top="0cm" fo:margin-bottom="0.502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P43" style:family="paragraph">
      <style:paragraph-properties fo:margin-left="0cm" fo:margin-right="0cm" fo:margin-top="0.176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left="0.952cm" fo:margin-right="0cm" fo:line-height="95%" fo:text-align="center" fo:text-indent="-0.864cm" loext:tab-stop-distance="0cm">
        <style:tab-stops>
          <style:tab-stop style:position="0cm"/>
        </style:tab-stops>
      </style:paragraph-properties>
    </style:style>
    <style:style style:name="P45" style:family="paragraph">
      <style:paragraph-properties fo:margin-top="0cm" fo:margin-bottom="0.2cm" fo:line-height="100%" style:text-autospace="none"/>
    </style:style>
    <style:style style:name="P46" style:family="paragraph">
      <style:paragraph-properties fo:margin-top="0cm" fo:margin-bottom="0.2cm" fo:line-height="100%"/>
      <style:text-properties style:font-name="Courier New"/>
    </style:style>
    <style:style style:name="P47" style:family="paragraph">
      <style:paragraph-properties fo:margin-top="0cm" fo:margin-bottom="0.1cm" fo:line-height="100%" style:text-autospace="none"/>
    </style:style>
    <style:style style:name="P48" style:family="paragraph">
      <style:paragraph-properties fo:margin-top="0cm" fo:margin-bottom="0.1cm" fo:line-height="100%"/>
      <style:text-properties fo:color="#000000" loext:opacity="100%"/>
    </style:style>
    <style:style style:name="P49" style:family="paragraph">
      <style:paragraph-properties fo:margin-left="0.952cm" fo:margin-right="0cm" fo:margin-top="0cm" fo:margin-bottom="0.1cm" fo:line-height="10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top="0cm" fo:margin-bottom="0cm" fo:line-height="100%"/>
    </style:style>
    <style:style style:name="P51" style:family="paragraph">
      <style:paragraph-properties fo:margin-top="0.176cm" fo:margin-bottom="0cm" loext:tab-stop-distance="0cm">
        <style:tab-stops>
          <style:tab-stop style:position="0cm"/>
        </style:tab-stops>
      </style:paragraph-properties>
    </style:style>
    <style:style style:name="P52" style:family="paragraph">
      <style:paragraph-properties fo:margin-left="0.952cm" fo:margin-right="0cm" fo:margin-top="0cm" fo:margin-bottom="0cm" fo:line-height="10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952cm" fo:margin-right="0cm" fo:margin-top="0cm" fo:margin-bottom="0.1cm" fo:line-height="10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.952cm" fo:margin-right="0cm" fo:margin-top="0cm" fo:margin-bottom="0.1cm" fo:line-height="100%" fo:text-indent="-0.952cm" loext:tab-stop-distance="0cm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cm" fo:margin-bottom="0cm" fo:line-height="96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line-height="96%" fo:text-align="center" style:punctuation-wrap="simple" loext:tab-stop-distance="0cm">
        <style:tab-stops>
          <style:tab-stop style:position="0cm"/>
        </style:tab-stops>
      </style:paragraph-properties>
    </style:style>
    <style:style style:name="P57" style:family="paragraph">
      <loext:graphic-properties draw:fill="none"/>
      <style:paragraph-properties fo:text-align="start" style:font-independent-line-spacing="true"/>
      <style:text-properties style:font-name="Courier New" fo:font-size="32pt"/>
    </style:style>
    <style:style style:name="P58" style:family="paragraph">
      <loext:graphic-properties draw:fill="none"/>
      <style:paragraph-properties fo:text-align="center"/>
    </style:style>
    <style:style style:name="P59" style:family="paragraph">
      <loext:graphic-properties draw:fill="none"/>
      <style:paragraph-properties fo:margin-top="0cm" fo:margin-bottom="0.1cm" fo:line-height="100%" fo:text-align="start" style:font-independent-line-spacing="true"/>
      <style:text-properties fo:font-size="32pt"/>
    </style:style>
    <style:style style:name="P60" style:family="paragraph">
      <style:paragraph-properties fo:margin-left="0.952cm" fo:margin-right="0cm" fo:margin-top="0cm" fo:margin-bottom="0cm" fo:line-height="10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style:paragraph-properties fo:margin-left="0.952cm" fo:margin-right="0cm" fo:margin-top="0cm" fo:margin-bottom="0.502cm" fo:line-height="10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62" style:family="paragraph">
      <loext:graphic-properties draw:fill="none"/>
      <style:paragraph-properties fo:line-height="100%" fo:text-align="start" style:font-independent-line-spacing="true"/>
      <style:text-properties fo:font-size="32pt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language="fr" fo:country="FR"/>
    </style:style>
    <style:style style:name="T3" style:family="text">
      <style:text-properties fo:color="#000099" loext:opacity="100%"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000099" loext:opacity="100%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8pt" fo:letter-spacing="normal" fo:language="fr" fo:country="FR" fo:font-style="normal" style:text-underline-style="none" fo:font-weight="normal" fo:background-color="transparent" style:font-size-asian="48pt" style:font-style-asian="normal" style:font-weight-asian="normal" style:font-name-complex="Lucida Sans Unicode2" style:font-size-complex="4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11" style:family="text">
      <style:text-properties fo:font-variant="normal" fo:text-transform="none" fo:color="#0d1f63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name-complex="Lucida Sans Unicode2" style:font-size-complex="44pt" style:font-style-complex="normal" style:font-weight-complex="normal"/>
    </style:style>
    <style:style style:name="T13" style:family="text">
      <style:text-properties fo:font-variant="normal" fo:text-transform="none" fo:color="#000099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normal" fo:background-color="transparent" style:font-size-asian="32pt" style:font-style-asian="italic" style:font-weight-asian="normal" style:font-name-complex="Lucida Sans Unicode2" style:font-size-complex="32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Lucida Sans Unicode2" style:font-size-complex="2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30% 58%" style:font-name="Tahoma" fo:font-size="26pt" fo:letter-spacing="normal" fo:language="fr" fo:country="FR" fo:font-style="normal" style:text-underline-style="none" fo:font-weight="normal" fo:background-color="transparent" style:font-size-asian="26pt" style:font-style-asian="normal" style:font-weight-asian="normal" style:font-name-complex="Lucida Sans Unicode2" style:font-size-complex="2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fr" fo:country="FR" fo:font-style="normal" style:text-underline-style="none" fo:font-weight="normal" fo:background-color="transparent" style:font-name-asian="Lucida Sans Unicode1" style:font-size-asian="20pt" style:font-style-asian="normal" style:font-weight-asian="normal" style:font-name-complex="Lucida Sans Unicode2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fr" fo:country="FR" fo:font-style="italic" style:text-underline-style="none" fo:font-weight="normal" fo:background-color="transparent" style:font-name-asian="Lucida Sans Unicode1" style:font-size-asian="20pt" style:font-style-asian="italic" style:font-weight-asian="normal" style:font-name-complex="Lucida Sans Unicode2" style:font-size-complex="20pt" style:font-style-complex="italic" style:font-weight-complex="normal"/>
    </style:style>
    <style:style style:name="T19" style:family="text">
      <style:text-properties fo:color="#000099" loext:opacity="100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fo:color="#000099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6pt" fo:letter-spacing="normal" fo:language="fr" fo:country="FR" fo:font-style="normal" style:text-underline-style="none" fo:font-weight="normal" fo:background-color="transparent" style:font-size-asian="26pt" style:font-style-asian="normal" style:font-weight-asian="normal" style:font-name-complex="Lucida Sans Unicode2" style:font-size-complex="26pt" style:font-style-complex="normal" style:font-weight-complex="normal"/>
    </style:style>
    <style:style style:name="T22" style:family="text">
      <style:text-properties fo:color="#0d1f63" loext:opacity="100%" style:font-name="Tahoma" fo:language="fr" fo:country="FR" fo:font-weight="bold" style:font-weight-asian="bold" style:font-name-complex="Lucida Sans Unicode2" style:font-weight-complex="bold"/>
    </style:style>
    <style:style style:name="T23" style:family="text">
      <style:text-properties fo:font-variant="normal" fo:text-transform="none" fo:color="#000099" loext:opacity="100%" style:text-line-through-style="none" style:text-line-through-type="none" style:text-position="30% 58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25" style:family="text">
      <style:text-properties fo:color="#000000" loext:opacity="100%" style:font-name="Times New Roman" fo:font-size="10.5pt" fo:language="fr" fo:country="FR" fo:font-style="italic" style:font-name-asian="Lucida Sans Unicode1" style:font-size-asian="12pt" style:font-style-asian="italic" style:font-name-complex="Lucida Sans Unicode2" style:font-size-complex="12pt" style:font-style-complex="italic"/>
    </style:style>
    <style:style style:name="T26" style:family="text">
      <style:text-properties fo:font-variant="normal" fo:text-transform="none" fo:color="#0d1f63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27" style:family="text">
      <style:text-properties fo:font-variant="normal" fo:text-transform="none" fo:color="#182f7c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fr" fo:country="FR" fo:font-style="italic" style:text-underline-style="none" fo:font-weight="normal" fo:background-color="transparent" style:font-size-asian="24pt" style:font-style-asian="italic" style:font-weight-asian="normal" style:font-name-complex="Lucida Sans Unicode2" style:font-size-complex="24pt" style:font-style-complex="italic" style:font-weight-complex="normal"/>
    </style:style>
    <style:style style:name="T30" style:family="text">
      <style:text-properties fo:font-variant="normal" fo:text-transform="none" fo:color="#0d1f63" loext:opacity="100%" style:text-line-through-style="none" style:text-line-through-type="none" style:text-position="0% 100%" style:font-name="Tahoma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name-complex="Lucida Sans Unicode2" style:font-size-complex="28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name-complex="Lucida Sans Unicode2" style:font-size-complex="18pt" style:font-style-complex="normal" style:font-weight-complex="normal"/>
    </style:style>
    <style:style style:name="T32" style:family="text">
      <style:text-properties fo:font-variant="normal" fo:text-transform="none" fo:color="#182f7c" loext:opacity="100%" style:text-line-through-style="none" style:text-line-through-type="none" style:text-position="0% 100%" style:font-name="Tahoma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name-complex="Lucida Sans Unicode2" style:font-size-complex="28pt" style:font-style-complex="normal" style:font-weight-complex="bold"/>
    </style:style>
    <style:style style:name="T33" style:family="text">
      <style:text-properties fo:font-variant="normal" fo:text-transform="none" fo:color="#000099" loext:opacity="100%" style:text-line-through-style="none" style:text-line-through-type="none" style:text-position="0% 100%" style:font-name="Tahoma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name-complex="Lucida Sans Unicode2" style:font-size-complex="28pt" style:font-style-complex="normal" style:font-weight-complex="bold"/>
    </style:style>
    <style:style style:name="T34" style:family="text">
      <style:text-properties fo:font-variant="normal" fo:text-transform="none" fo:color="#182f7c" loext:opacity="100%" style:text-line-through-style="none" style:text-line-through-type="none" style:text-position="0% 100%" style:font-name="Tahoma" fo:font-size="28pt" fo:letter-spacing="normal" fo:language="fr" fo:country="FR" fo:font-style="italic" style:text-underline-style="none" fo:font-weight="bold" fo:background-color="transparent" style:font-size-asian="28pt" style:font-style-asian="italic" style:font-weight-asian="bold" style:font-name-complex="Lucida Sans Unicode2" style:font-size-complex="28pt" style:font-style-complex="italic" style:font-weight-complex="bold"/>
    </style:style>
    <style:style style:name="T35" style:family="text">
      <style:text-properties fo:color="#182f7c" loext:opacity="100%" fo:font-size="28pt" fo:language="fr" fo:country="FR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6" style:family="text">
      <style:text-properties fo:font-variant="normal" fo:text-transform="none" fo:color="#182f7c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super 58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38" style:family="text">
      <style:text-properties fo:font-size="21pt" fo:font-style="italic" style:font-size-asian="21pt" style:font-style-asian="italic" style:font-size-complex="21pt" style:font-style-complex="italic"/>
    </style:style>
    <style:style style:name="T39" style:family="text">
      <style:text-properties fo:color="#000000" loext:opacity="100%" style:text-outline="false" style:text-line-through-style="none" style:text-line-through-type="none" style:text-position="0% 100%" style:font-name="Tahoma" fo:font-size="32pt" fo:font-style="normal" fo:text-shadow="none" style:text-underline-style="none" fo:font-weight="normal" style:font-name-asian="Lucida Sans Unicode2" style:font-size-asian="32pt" style:font-style-asian="normal" style:font-weight-asian="normal" style:font-name-complex="Lucida Sans Unicode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99" loext:opacity="100%" style:text-outline="false" style:text-line-through-style="none" style:text-line-through-type="none" style:text-position="0% 100%" style:font-name="Tahoma" fo:font-size="32pt" fo:font-style="italic" fo:text-shadow="none" style:text-underline-style="none" fo:font-weight="bold" style:font-name-asian="Lucida Sans Unicode2" style:font-size-asian="32pt" style:font-style-asian="italic" style:font-weight-asian="bold" style:font-name-complex="Lucida Sans Unicode2" style:font-size-complex="32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0d1f63" loext:opacity="100%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color="#0d1f63" loext:opacity="100%" fo:font-weight="bold" style:font-weight-asian="bold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Tahoma" fo:font-size="28pt" fo:font-style="normal" fo:text-shadow="none" style:text-underline-style="none" fo:font-weight="normal" style:font-name-asian="Lucida Sans Unicode2" style:font-size-asian="28pt" style:font-style-asian="normal" style:font-weight-asian="normal" style:font-name-complex="Lucida Sans Unicode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182f7c" loext:opacity="100%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ize="40pt" style:font-size-asian="40pt" style:font-size-complex="40pt"/>
    </style:style>
    <style:style style:name="T48" style:family="text">
      <style:text-properties fo:color="#000000" loext:opacity="100%" style:font-name="Courier new" fo:font-size="15pt" style:font-name-asian="Lucida Sans Unicode2" style:font-size-asian="15pt" style:font-name-complex="Lucida Sans Unicode2" style:font-size-complex="15pt"/>
    </style:style>
    <style:style style:name="T49" style:family="text">
      <style:text-properties fo:color="#000099" loext:opacity="100%" style:font-name="Courier new" fo:font-size="15pt" fo:font-weight="bold" style:font-name-asian="Lucida Sans Unicode2" style:font-size-asian="15pt" style:font-weight-asian="bold" style:font-name-complex="Lucida Sans Unicode2" style:font-size-complex="15pt" style:font-weight-complex="bold"/>
    </style:style>
    <style:style style:name="T50" style:family="text">
      <style:text-properties fo:color="#2a6099" loext:opacity="100%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color="#000000" loext:opacity="100%" style:font-name="Courier new" fo:font-size="14pt" style:font-name-asian="Lucida Sans Unicode2" style:font-size-asian="14pt" style:font-name-complex="Lucida Sans Unicode2" style:font-size-complex="14pt"/>
    </style:style>
    <style:style style:name="T53" style:family="text">
      <style:text-properties fo:color="#127622" loext:opacity="100%" style:font-name="Courier new" fo:font-size="14pt" fo:font-weight="bold" style:font-name-asian="Lucida Sans Unicode2" style:font-size-asian="14pt" style:font-weight-asian="bold" style:font-name-complex="Lucida Sans Unicode2" style:font-size-complex="14pt" style:font-weight-complex="bold"/>
    </style:style>
    <style:style style:name="T54" style:family="text">
      <style:text-properties fo:color="#000099" loext:opacity="100%" style:font-name="Courier new" fo:font-size="14pt" fo:font-weight="bold" style:font-name-asian="Lucida Sans Unicode2" style:font-size-asian="14pt" style:font-weight-asian="bold" style:font-name-complex="Lucida Sans Unicode2" style:font-size-complex="14pt" style:font-weight-complex="bold"/>
    </style:style>
    <style:style style:name="T55" style:family="text">
      <style:text-properties fo:color="#000099" loext:opacity="100%" style:font-name="Courier new" fo:font-size="14pt" fo:font-weight="bold" style:font-size-asian="14pt" style:font-weight-asian="bold" style:font-size-complex="14pt" style:font-weight-complex="bold"/>
    </style:style>
    <style:style style:name="T56" style:family="text">
      <style:text-properties style:font-name="Courier new" fo:font-size="14pt" style:font-size-asian="14pt" style:font-size-complex="14pt"/>
    </style:style>
    <style:style style:name="T57" style:family="text">
      <style:text-properties fo:font-variant="normal" fo:text-transform="none" fo:color="#000099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normal" fo:background-color="transparent" style:font-size-asian="32pt" style:font-style-asian="italic" style:font-weight-asian="normal" style:font-name-complex="Lucida Sans Unicode2" style:font-size-complex="32pt" style:font-style-complex="italic" style:font-weight-complex="normal"/>
    </style:style>
    <style:style style:name="T58" style:family="text">
      <style:text-properties style:font-name="Courier New"/>
    </style:style>
    <style:style style:name="T59" style:family="text">
      <style:text-properties fo:color="#1e6a39" loext:opacity="100%" style:font-name="Courier New" fo:font-weight="bold" style:font-weight-asian="bold" style:font-weight-complex="bold"/>
    </style:style>
    <style:style style:name="T60" style:family="text">
      <style:text-properties fo:color="#000099" loext:opacity="100%" style:font-name="Courier New" fo:font-weight="bold" style:font-weight-asian="bold" style:font-weight-complex="bold"/>
    </style:style>
    <style:style style:name="T61" style:family="text">
      <style:text-properties fo:color="#000099" loext:opacity="100%" style:font-name="Courier New"/>
    </style:style>
    <style:style style:name="T62" style:family="text">
      <style:text-properties fo:color="#0d1f63" loext:opacity="100%" style:text-outline="false" style:text-line-through-style="none" style:text-line-through-type="none" style:text-position="0% 100%" style:font-name="Tahoma" fo:font-size="28pt" fo:font-style="italic" fo:text-shadow="none" style:text-underline-style="none" fo:font-weight="bold" style:font-name-asian="Lucida Sans Unicode2" style:font-size-asian="28pt" style:font-style-asian="italic" style:font-weight-asian="bold" style:font-name-complex="Lucida Sans Unicode2" style:font-size-complex="28pt" style:font-style-complex="italic" style:font-weight-complex="bold" style:text-emphasize="none" style:font-relief="none" style:text-overline-style="none" style:text-overline-color="font-color"/>
    </style:style>
    <style:style style:name="T63" style:family="text">
      <style:text-properties fo:color="#0d1f63" loext:opacity="100%" style:text-position="super 58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4" style:family="text">
      <style:text-properties fo:font-size="20pt" fo:font-style="italic" style:font-size-asian="20pt" style:font-style-asian="italic" style:font-size-complex="20pt" style:font-style-complex="italic"/>
    </style:style>
    <style:style style:name="T65" style:family="text">
      <style:text-properties fo:color="#ce181e" loext:opacity="100%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color="#000000" loext:opacity="100%" style:font-name="Tahoma" fo:language="fr" fo:country="FR" style:font-name-complex="Lucida Sans Unicode2"/>
    </style:style>
    <style:style style:name="T67" style:family="text">
      <style:text-properties fo:font-variant="normal" fo:text-transform="none" fo:color="#0d1f63" loext:opacity="100%" style:text-line-through-style="none" style:text-line-through-type="none" style:text-position="0% 100%" style:font-name="Tahoma" fo:font-size="24pt" fo:letter-spacing="normal" fo:language="fr" fo:country="FR" fo:font-style="italic" style:text-underline-style="none" fo:font-weight="bold" fo:background-color="transparent" style:font-size-asian="24pt" style:font-style-asian="italic" style:font-weight-asian="bold" style:font-name-complex="Lucida Sans Unicode2" style:font-size-complex="24pt" style:font-style-complex="italic" style:font-weight-complex="bold"/>
    </style:style>
    <style:style style:name="T68" style:family="text">
      <style:text-properties fo:font-variant="normal" fo:text-transform="none" fo:color="#000099" loext:opacity="100%" style:text-line-through-style="none" style:text-line-through-type="none" style:text-position="0% 100%" style:font-name="Tahoma" fo:font-size="22pt" fo:letter-spacing="normal" fo:language="fr" fo:country="FR" fo:font-style="italic" style:text-underline-style="none" fo:font-weight="bold" fo:background-color="transparent" style:font-size-asian="22pt" style:font-style-asian="italic" style:font-weight-asian="bold" style:font-name-complex="Lucida Sans Unicode2" style:font-size-complex="22pt" style:font-style-complex="italic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4pt" fo:letter-spacing="normal" fo:language="fr" fo:country="FR" fo:font-style="italic" style:text-underline-style="none" fo:font-weight="normal" fo:background-color="transparent" style:font-size-asian="44pt" style:font-style-asian="italic" style:font-weight-asian="normal" style:font-name-complex="Lucida Sans Unicode2" style:font-size-complex="44pt" style:font-style-complex="italic" style:font-weight-complex="normal"/>
    </style:style>
    <style:style style:name="T70" style:family="text">
      <style:text-properties fo:font-variant="normal" fo:text-transform="none" fo:color="#002060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71" style:family="text">
      <style:text-properties fo:font-variant="normal" fo:text-transform="none" style:text-line-through-style="none" style:text-line-through-type="none" style:text-position="0% 100%" style:font-name="Tahoma" fo:font-size="32pt" fo:letter-spacing="normal" fo:language="fr" fo:country="FR" fo:font-style="normal" style:text-underline-style="none" fo:background-color="transparent" style:font-size-asian="32pt" style:font-style-asian="normal" style:font-name-complex="Lucida Sans Unicode2" style:font-size-complex="32pt" style:font-style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italic" style:text-underline-style="none" fo:font-weight="normal" fo:background-color="transparent" style:font-size-asian="24pt" style:font-style-asian="italic" style:font-weight-asian="normal" style:font-name-complex="Lucida Sans Unicode2" style:font-size-complex="24pt" style:font-style-complex="italic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T75" style:family="text">
      <style:text-properties fo:font-variant="normal" fo:text-transform="none" fo:color="#000099" loext:opacity="100%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name-complex="Lucida Sans Unicode2" style:font-size-complex="24pt" style:font-style-complex="italic" style:font-weight-complex="bold"/>
    </style:style>
    <style:style style:name="T76" style:family="text">
      <style:text-properties fo:font-variant="normal" fo:text-transform="none" fo:color="#000099" loext:opacity="100%" style:text-line-through-style="none" style:text-line-through-type="none" style:text-position="0% 100%" style:font-name="Calibri" fo:font-size="24pt" fo:letter-spacing="normal" fo:language="fr" fo:country="FR" fo:font-style="italic" style:text-underline-style="none" fo:font-weight="bold" fo:background-color="transparent" style:font-size-asian="24pt" style:font-style-asian="italic" style:font-weight-asian="bold" style:font-name-complex="Lucida Sans Unicode2" style:font-size-complex="24pt" style:font-style-complex="italic" style:font-weight-complex="bold"/>
    </style:style>
    <style:style style:name="T77" style:family="text">
      <style:text-properties fo:font-size="24pt" fo:language="fr" fo:country="FR" style:font-size-asian="24pt" style:font-size-complex="24pt"/>
    </style:style>
    <style:style style:name="T78" style:family="text">
      <style:text-properties fo:font-size="24pt" fo:language="fr" fo:country="FR" fo:font-style="italic" style:font-size-asian="24pt" style:font-style-asian="italic" style:font-size-complex="24pt" style:font-style-complex="italic"/>
    </style:style>
    <style:style style:name="T79" style:family="text">
      <style:text-properties fo:color="#006d6f" loext:opacity="100%" style:font-name="Courier New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80" style:family="text">
      <style:text-properties fo:color="#071136" loext:opacity="100%" style:font-name="Courier New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81" style:family="text">
      <style:text-properties style:font-name="Courier New" fo:font-size="10pt" style:font-name-asian="Monospace" style:font-size-asian="10pt" style:font-name-complex="Monospace" style:font-size-complex="10pt"/>
    </style:style>
    <style:style style:name="T82" style:family="text">
      <style:text-properties fo:color="#000000" loext:opacity="100%" style:font-name="Courier New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83" style:family="text">
      <style:text-properties fo:color="#000000" loext:opacity="100%" style:text-outline="false" style:text-line-through-style="none" style:text-line-through-type="none" style:text-position="0% 100%" style:font-name="Courier New" fo:font-size="12pt" fo:font-style="normal" fo:text-shadow="none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0000" loext:opacity="100%" style:font-name="Courier New" fo:font-size="12pt" style:font-name-asian="Monospace" style:font-size-asian="12pt" style:font-name-complex="Monospace" style:font-size-complex="12pt"/>
    </style:style>
    <style:style style:name="T85" style:family="text">
      <style:text-properties fo:color="#000000" loext:opacity="100%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86" style:family="text">
      <style:text-properties fo:color="#000000" loext:opacity="100%" style:font-name="Monospace" fo:font-size="13pt" fo:font-weight="normal" style:font-name-asian="Monospace" style:font-size-asian="13pt" style:font-weight-asian="normal" style:font-name-complex="Monospace" style:font-size-complex="13pt" style:font-weight-complex="normal"/>
    </style:style>
    <style:style style:name="T87" style:family="text">
      <style:text-properties fo:color="#000000" loext:opacity="100%" style:font-name="Monospace" fo:font-size="13pt" style:font-name-asian="Monospace" style:font-size-asian="13pt" style:font-name-complex="Monospace" style:font-size-complex="13pt"/>
    </style:style>
    <style:style style:name="T88" style:family="text"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T89" style:family="text">
      <style:text-properties fo:color="#006c3b" loext:opacity="100%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90" style:family="text">
      <style:text-properties fo:color="#000000" loext:opacity="100%" style:text-outline="false" style:text-line-through-style="none" style:text-line-through-type="none" style:text-position="0% 100%" style:font-name="Monospace" fo:font-size="13pt" fo:font-style="normal" fo:text-shadow="none" style:text-underline-style="none" fo:font-weight="bold" style:font-name-asian="Monospace" style:font-size-asian="13pt" style:font-style-asian="normal" style:font-weight-asian="bold" style:font-name-complex="Monospace" style:font-size-complex="13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style:font-name="Courier New" fo:font-size="26pt" style:font-size-asian="26pt" style:font-size-complex="26pt"/>
    </style:style>
    <style:style style:name="T92" style:family="text">
      <style:text-properties style:font-name="Courier New" fo:font-size="28pt" style:font-size-asian="28pt" style:font-size-complex="28pt"/>
    </style:style>
    <style:style style:name="T93" style:family="text">
      <style:text-properties fo:color="#127622" loext:opacity="100%" style:font-name="Courier New" fo:font-size="28pt" fo:font-weight="bold" style:font-size-asian="28pt" style:font-weight-asian="bold" style:font-size-complex="28pt" style:font-weight-complex="bold"/>
    </style:style>
    <style:style style:name="T94" style:family="text">
      <style:text-properties fo:color="#000099" loext:opacity="100%" style:font-name="Courier New" fo:font-size="28pt" fo:font-weight="bold" style:font-size-asian="28pt" style:font-weight-asian="bold" style:font-size-complex="28pt" style:font-weight-complex="bold"/>
    </style:style>
    <style:style style:name="T95" style:family="text">
      <style:text-properties style:font-name="Courier New" fo:font-size="20pt" style:font-size-asian="20pt" style:font-size-complex="20pt"/>
    </style:style>
    <style:style style:name="T96" style:family="text">
      <style:text-properties fo:color="#127622" loext:opacity="100%" style:font-name="Courier New" fo:font-size="20pt" fo:font-weight="bold" style:font-size-asian="20pt" style:font-weight-asian="bold" style:font-size-complex="20pt" style:font-weight-complex="bold"/>
    </style:style>
    <style:style style:name="T97" style:family="text">
      <style:text-properties style:font-name="Courier New" fo:font-size="22pt" style:font-size-asian="22pt" style:font-size-complex="22pt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Lucida Sans Unicode2" style:font-size-complex="26pt" style:font-style-complex="normal" style:font-weight-complex="normal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Lucida Sans Unicode2" style:font-size-complex="18pt" style:font-style-complex="normal" style:font-weight-complex="normal"/>
    </style:style>
    <style:style style:name="T101" style:family="text">
      <style:text-properties fo:font-variant="normal" fo:text-transform="none" fo:color="#000099" loext:opacity="100%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Lucida Sans Unicode2" style:font-size-complex="18pt" style:font-style-complex="normal" style:font-weight-complex="bold"/>
    </style:style>
    <style:style style:name="T10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103" style:family="text">
      <style:text-properties fo:color="#000099" loext:opacity="100%" fo:language="fr" fo:country="FR" fo:font-style="italic" fo:font-weight="bold" style:font-style-asian="italic" style:font-weight-asian="bold" style:font-style-complex="italic" style:font-weight-complex="bold"/>
    </style:style>
    <style:style style:name="T104" style:family="text">
      <style:text-properties fo:language="fr" fo:country="FR" fo:font-style="italic" style:font-style-asian="italic" style:font-style-complex="italic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name-complex="Lucida Sans Unicode2" style:font-size-complex="36pt" style:font-style-complex="normal" style:font-weight-complex="normal"/>
    </style:style>
    <style:style style:name="T106" style:family="text">
      <style:text-properties fo:font-variant="normal" fo:text-transform="none" fo:color="#000099" loext:opacity="100%" style:text-line-through-style="none" style:text-line-through-type="none" style:text-position="0% 100%" style:font-name="Tahoma" fo:font-size="36pt" fo:letter-spacing="normal" fo:language="fr" fo:country="FR" fo:font-style="italic" style:text-underline-style="none" fo:font-weight="bold" fo:background-color="transparent" style:font-size-asian="36pt" style:font-style-asian="italic" style:font-weight-asian="bold" style:font-name-complex="Lucida Sans Unicode2" style:font-size-complex="36pt" style:font-style-complex="italic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name-complex="Lucida Sans Unicode2" style:font-size-complex="20pt" style:font-style-complex="normal" style:font-weight-complex="normal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name-complex="Lucida Sans Unicode2" style:font-size-complex="16pt" style:font-style-complex="normal" style:font-weight-complex="normal"/>
    </style:style>
    <style:style style:name="T109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33pt" fo:letter-spacing="normal" fo:language="fr" fo:country="FR" fo:font-style="normal" style:text-underline-style="none" fo:font-weight="normal" fo:background-color="transparent" style:font-size-asian="33pt" style:font-style-asian="normal" style:font-weight-asian="normal" style:font-name-complex="Lucida Sans Unicode2" style:font-size-complex="33pt" style:font-style-complex="normal" style:font-weight-complex="normal"/>
    </style:style>
    <style:style style:name="T110" style:family="text">
      <style:text-properties fo:font-variant="normal" fo:text-transform="none" fo:color="#002060" loext:opacity="100%" style:text-line-through-style="none" style:text-line-through-type="none" style:text-position="0% 100%" style:font-name="Calibri" fo:font-size="24pt" fo:letter-spacing="normal" fo:language="fr" fo:country="FR" fo:font-style="italic" style:text-underline-style="none" fo:font-weight="bold" fo:background-color="transparent" style:font-size-asian="24pt" style:font-style-asian="italic" style:font-weight-asian="bold" style:font-name-complex="Lucida Sans Unicode2" style:font-size-complex="24pt" style:font-style-complex="italic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3pt" fo:letter-spacing="normal" fo:language="fr" fo:country="FR" fo:font-style="normal" style:text-underline-style="none" fo:font-weight="normal" fo:background-color="transparent" style:font-size-asian="33pt" style:font-style-asian="normal" style:font-weight-asian="normal" style:font-name-complex="Lucida Sans Unicode2" style:font-size-complex="33pt" style:font-style-complex="normal" style:font-weight-complex="normal"/>
    </style:style>
    <style:style style:name="T112" style:family="text">
      <style:text-properties fo:font-variant="normal" fo:text-transform="none" fo:color="#002060" loext:opacity="100%" style:text-line-through-style="none" style:text-line-through-type="none" style:text-position="0% 100%" style:font-name="Calibri" fo:font-size="24pt" fo:letter-spacing="normal" fo:language="fr" fo:country="FR" fo:font-style="italic" style:text-underline-style="none" fo:font-weight="bold" fo:background-color="transparent" style:font-size-asian="24pt" style:font-style-asian="normal" style:font-weight-asian="bold" style:font-name-complex="Lucida Sans Unicode2" style:font-size-complex="24pt" style:font-style-complex="normal" style:font-weight-complex="bold"/>
    </style:style>
    <style:style style:name="T113" style:family="text">
      <style:text-properties fo:color="#002060" loext:opacity="100%" fo:font-size="24pt" fo:language="fr" fo:country="FR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2pt" fo:letter-spacing="normal" fo:language="fr" fo:country="FR" fo:font-style="normal" style:text-underline-style="none" fo:font-weight="normal" fo:background-color="transparent" style:font-size-asian="42pt" style:font-style-asian="normal" style:font-weight-asian="normal" style:font-name-complex="Lucida Sans Unicode2" style:font-size-complex="42pt" style:font-style-complex="normal" style:font-weight-complex="normal"/>
    </style:style>
    <style:style style:name="T116" style:family="text">
      <style:text-properties fo:font-variant="normal" fo:text-transform="none" fo:color="#127622" loext:opacity="100%" style:text-line-through-style="none" style:text-line-through-type="none" style:text-position="0% 100%" style:font-name="Courier New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name-complex="Lucida Sans Unicode2" style:font-size-complex="16pt" style:font-style-complex="normal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language="fr" fo:country="FR" fo:font-style="italic" style:text-underline-style="none" fo:font-weight="normal" fo:background-color="transparent" style:font-size-asian="28pt" style:font-style-asian="italic" style:font-weight-asian="normal" style:font-name-complex="Lucida Sans Unicode2" style:font-size-complex="28pt" style:font-style-complex="italic" style:font-weight-complex="normal"/>
    </style:style>
    <style:style style:name="T118" style:family="text">
      <style:text-properties fo:font-variant="normal" fo:text-transform="none" fo:color="#000099" loext:opacity="100%" style:text-line-through-style="none" style:text-line-through-type="none" style:text-position="0% 100%" style:font-name="Tahoma" fo:font-size="26pt" fo:letter-spacing="normal" fo:language="fr" fo:country="FR" fo:font-style="italic" style:text-underline-style="none" fo:font-weight="bold" fo:background-color="transparent" style:font-size-asian="26pt" style:font-style-asian="italic" style:font-weight-asian="bold" style:font-name-complex="Lucida Sans Unicode2" style:font-size-complex="26pt" style:font-style-complex="italic" style:font-weight-complex="bold"/>
    </style:style>
    <style:style style:name="T119" style:family="text">
      <style:text-properties fo:color="#000099" loext:opacity="100%" style:font-name="Tahoma" fo:font-size="26pt" fo:language="fr" fo:country="FR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0" style:family="text">
      <style:text-properties fo:font-variant="normal" fo:text-transform="none" fo:color="#002060" loext:opacity="100%" style:text-line-through-style="none" style:text-line-through-type="none" style:text-position="0% 100%" style:font-name="Tahoma" fo:font-size="33pt" fo:letter-spacing="normal" fo:language="fr" fo:country="FR" fo:font-style="italic" style:text-underline-style="none" fo:font-weight="bold" fo:background-color="transparent" style:font-size-asian="33pt" style:font-style-asian="italic" style:font-weight-asian="bold" style:font-name-complex="Lucida Sans Unicode2" style:font-size-complex="33pt" style:font-style-complex="italic" style:font-weight-complex="bold"/>
    </style:style>
    <style:style style:name="T121" style:family="text">
      <style:text-properties fo:color="#002060" loext:opacity="100%" fo:font-size="33pt" fo:language="fr" fo:country="FR" fo:font-style="italic" fo:font-weight="bold" style:font-size-asian="33pt" style:font-style-asian="italic" style:font-weight-asian="bold" style:font-size-complex="33pt" style:font-style-complex="italic" style:font-weight-complex="bold"/>
    </style:style>
    <style:style style:name="T122" style:family="text">
      <style:text-properties fo:font-variant="normal" fo:text-transform="none" fo:color="#00b050" loext:opacity="100%" style:text-line-through-style="none" style:text-line-through-type="none" style:text-position="0% 100%" style:font-name="Courier New" fo:font-size="13pt" fo:letter-spacing="normal" fo:language="fr" fo:country="FR" fo:font-style="normal" style:text-underline-style="none" fo:font-weight="bold" fo:background-color="transparent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3pt" fo:letter-spacing="normal" fo:language="fr" fo:country="FR" fo:font-style="normal" style:text-underline-style="none" fo:font-weight="normal" fo:background-color="transparent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124" style:family="text">
      <style:text-properties fo:font-variant="normal" fo:text-transform="none" fo:color="#00b050" loext:opacity="100%" style:text-line-through-style="none" style:text-line-through-type="none" style:text-position="0% 100%" style:font-name="Courier New" fo:font-size="15pt" fo:letter-spacing="normal" fo:language="fr" fo:country="FR" fo:font-style="normal" style:text-underline-style="none" fo:font-weight="bold" fo:background-color="transparent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12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5pt" fo:letter-spacing="normal" fo:language="fr" fo:country="FR" fo:font-style="normal" style:text-underline-style="none" fo:font-weight="normal" fo:background-color="transparent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126" style:family="text">
      <style:text-properties fo:color="#00b050" loext:opacity="100%" style:font-name="Courier New" fo:font-size="13pt" fo:language="fr" fo:country="FR" fo:font-weight="bold" style:font-size-asian="13pt" style:font-weight-asian="bold" style:font-name-complex="Courier New" style:font-size-complex="13pt" style:font-weight-complex="bold"/>
    </style:style>
    <style:style style:name="T127" style:family="text">
      <style:text-properties style:font-name="Courier New" fo:font-size="13pt" fo:language="fr" fo:country="FR" style:font-size-asian="13pt" style:font-name-complex="Courier New" style:font-size-complex="13pt"/>
    </style:style>
    <style:style style:name="T128" style:family="text">
      <style:text-properties fo:font-variant="normal" fo:text-transform="none" fo:color="#ce181e" loext:opacity="100%" style:text-line-through-style="none" style:text-line-through-type="none" style:text-position="0% 100%" style:font-name="Times New Roman" fo:font-size="24pt" fo:letter-spacing="normal" fo:language="fr" fo:country="FR" fo:font-style="italic" style:text-underline-style="none" fo:font-weight="bold" fo:background-color="transparent" style:font-name-asian="Lucida Sans Unicode1" style:font-size-asian="24pt" style:font-style-asian="italic" style:font-weight-asian="bold" style:font-name-complex="Lucida Sans Unicode2" style:font-size-complex="24pt" style:font-style-complex="italic" style:font-weight-complex="bold"/>
    </style:style>
    <style:style style:name="T129" style:family="text">
      <style:text-properties fo:font-variant="normal" fo:text-transform="none" fo:color="#000099" loext:opacity="100%" style:text-line-through-style="none" style:text-line-through-type="none" style:text-position="super 58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130" style:family="text">
      <style:text-properties style:font-name="Tahoma" fo:font-size="44pt" style:font-size-asian="44pt" style:font-size-complex="44pt"/>
    </style:style>
    <style:style style:name="T13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name-complex="Lucida Sans Unicode2" style:font-size-complex="18pt" style:font-style-complex="normal" style:font-weight-complex="normal"/>
    </style:style>
    <style:style style:name="T132" style:family="text">
      <style:text-properties fo:font-variant="normal" fo:text-transform="none" fo:color="#127622" loext:opacity="100%" style:text-line-through-style="none" style:text-line-through-type="none" style:text-position="0% 100%" style:font-name="Courier New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name-complex="Lucida Sans Unicode2" style:font-size-complex="18pt" style:font-style-complex="normal" style:font-weight-complex="bold"/>
    </style:style>
    <style:style style:name="T133" style:family="text">
      <style:text-properties fo:font-variant="normal" fo:text-transform="none" fo:color="#000099" loext:opacity="100%" style:text-line-through-style="none" style:text-line-through-type="none" style:text-position="0% 100%" style:font-name="Courier New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name-complex="Lucida Sans Unicode2" style:font-size-complex="18pt" style:font-style-complex="normal" style:font-weight-complex="bold"/>
    </style:style>
    <style:style style:name="T13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5pt" fo:letter-spacing="normal" fo:language="fr" fo:country="FR" fo:font-style="normal" style:text-underline-style="none" fo:font-weight="normal" fo:background-color="transparent" style:font-size-asian="15pt" style:font-style-asian="normal" style:font-weight-asian="normal" style:font-name-complex="Lucida Sans Unicode2" style:font-size-complex="15pt" style:font-style-complex="normal" style:font-weight-complex="normal"/>
    </style:style>
    <style:style style:name="T135" style:family="text">
      <style:text-properties fo:font-variant="normal" fo:text-transform="none" fo:color="#127622" loext:opacity="100%" style:text-line-through-style="none" style:text-line-through-type="none" style:text-position="0% 100%" style:font-name="Courier New" fo:font-size="15pt" fo:letter-spacing="normal" fo:language="fr" fo:country="FR" fo:font-style="normal" style:text-underline-style="none" fo:font-weight="bold" fo:background-color="transparent" style:font-size-asian="15pt" style:font-style-asian="normal" style:font-weight-asian="bold" style:font-name-complex="Lucida Sans Unicode2" style:font-size-complex="15pt" style:font-style-complex="normal" style:font-weight-complex="bold"/>
    </style:style>
    <style:style style:name="T1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ucida Sans Unicode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0099" loext:opacity="100%" style:font-name="Tahoma" fo:font-size="32pt" fo:language="fr" fo:country="F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8" style:family="text">
      <style:text-properties fo:font-variant="normal" fo:text-transform="none" fo:color="#000099" loext:opacity="100%" style:text-line-through-style="none" style:text-line-through-type="none" style:text-position="0% 100%" style:font-name="Courier New" fo:font-size="15pt" fo:letter-spacing="normal" fo:language="fr" fo:country="FR" fo:font-style="normal" style:text-underline-style="none" fo:font-weight="bold" fo:background-color="transparent" style:font-size-asian="15pt" style:font-style-asian="normal" style:font-weight-asian="bold" style:font-name-complex="Lucida Sans Unicode2" style:font-size-complex="15pt" style:font-style-complex="normal" style:font-weight-complex="bold"/>
    </style:style>
    <style:style style:name="T139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3pt" fo:letter-spacing="normal" fo:language="fr" fo:country="FR" fo:font-style="normal" style:text-underline-style="none" fo:font-weight="normal" fo:background-color="transparent" style:font-size-asian="13pt" style:font-style-asian="normal" style:font-weight-asian="normal" style:font-name-complex="Lucida Sans Unicode2" style:font-size-complex="13pt" style:font-style-complex="normal" style:font-weight-complex="normal"/>
    </style:style>
    <style:style style:name="T141" style:family="text">
      <style:text-properties fo:color="#127622" loext:opacity="100%" style:font-name="Courier New" fo:font-size="13pt" fo:language="fr" fo:country="FR" fo:font-weight="bold" style:font-size-asian="13pt" style:font-weight-asian="bold" style:font-size-complex="13pt" style:font-weight-complex="bold"/>
    </style:style>
    <style:style style:name="T142" style:family="text">
      <style:text-properties fo:font-variant="normal" fo:text-transform="none" fo:color="#127622" loext:opacity="100%" style:text-line-through-style="none" style:text-line-through-type="none" style:text-position="0% 100%" style:font-name="Courier New" fo:font-size="13pt" fo:letter-spacing="normal" fo:language="fr" fo:country="FR" fo:font-style="normal" style:text-underline-style="none" fo:font-weight="bold" fo:background-color="transparent" style:font-size-asian="13pt" style:font-style-asian="normal" style:font-weight-asian="bold" style:font-name-complex="Lucida Sans Unicode2" style:font-size-complex="13pt" style:font-style-complex="normal" style:font-weight-complex="bold"/>
    </style:style>
    <style:style style:name="T143" style:family="text">
      <style:text-properties fo:font-variant="normal" fo:text-transform="none" fo:color="#127622" loext:opacity="100%" style:text-line-through-style="none" style:text-line-through-type="none" style:text-position="0% 100%" style:font-name="Courier New" fo:font-size="20pt" fo:letter-spacing="normal" fo:language="fr" fo:country="FR" fo:font-style="normal" style:text-underline-style="none" fo:font-weight="bold" fo:background-color="transparent" style:font-size-asian="20pt" style:font-style-asian="normal" style:font-weight-asian="bold" style:font-name-complex="Lucida Sans Unicode2" style:font-size-complex="20pt" style:font-style-complex="normal" style:font-weight-complex="bold"/>
    </style:style>
    <style:style style:name="T14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145" style:family="text">
      <style:text-properties fo:font-variant="normal" fo:text-transform="none" fo:color="#127622" loext:opacity="100%" style:text-line-through-style="none" style:text-line-through-type="none" style:text-position="0% 100%" style:font-name="Courier New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T146" style:family="text">
      <style:text-properties style:font-name="Tahoma" fo:font-size="44pt" fo:language="fr" fo:country="FR" style:font-size-asian="44pt" style:font-size-complex="44pt"/>
    </style:style>
    <style:style style:name="T147" style:family="text">
      <style:text-properties style:font-name="Courier New" fo:font-size="22pt" fo:language="fr" fo:country="FR" style:font-size-asian="22pt" style:font-size-complex="22pt"/>
    </style:style>
    <style:style style:name="T14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2pt" fo:letter-spacing="normal" fo:language="fr" fo:country="FR" fo:font-style="normal" style:text-underline-style="none" fo:font-weight="normal" fo:background-color="transparent" style:font-size-asian="22pt" style:font-style-asian="normal" style:font-weight-asian="normal" style:font-name-complex="Lucida Sans Unicode2" style:font-size-complex="22pt" style:font-style-complex="normal" style:font-weight-complex="normal"/>
    </style:style>
    <style:style style:name="T149" style:family="text">
      <style:text-properties fo:color="#000099" loext:opacity="100%" style:font-name="Courier New" fo:font-size="22pt" fo:language="fr" fo:country="FR" fo:font-weight="bold" style:font-size-asian="22pt" style:font-weight-asian="bold" style:font-size-complex="22pt" style:font-weight-complex="bold"/>
    </style:style>
    <style:style style:name="T150" style:family="text">
      <style:text-properties fo:font-variant="normal" fo:text-transform="none" fo:color="#127622" loext:opacity="100%" style:text-line-through-style="none" style:text-line-through-type="none" style:text-position="0% 100%" style:font-name="Courier New" fo:font-size="22pt" fo:letter-spacing="normal" fo:language="fr" fo:country="FR" fo:font-style="normal" style:text-underline-style="none" fo:font-weight="bold" fo:background-color="transparent" style:font-size-asian="22pt" style:font-style-asian="normal" style:font-weight-asian="bold" style:font-name-complex="Lucida Sans Unicode2" style:font-size-complex="22pt" style:font-style-complex="normal" style:font-weight-complex="bold"/>
    </style:style>
    <style:style style:name="T151" style:family="text">
      <style:text-properties fo:font-variant="normal" fo:text-transform="none" fo:color="#3465a4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152" style:family="text">
      <style:text-properties fo:font-variant="normal" fo:text-transform="none" fo:color="#0070c0" loext:opacity="100%" style:text-line-through-style="none" style:text-line-through-type="none" style:text-position="0% 100%" style:font-name="Courier New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Courier New" style:font-size-complex="32pt" style:font-style-complex="normal" style:font-weight-complex="bold"/>
    </style:style>
    <style:style style:name="T153" style:family="text">
      <style:text-properties fo:font-variant="normal" fo:text-transform="none" fo:color="#0070c0" loext:opacity="100%" style:text-line-through-style="none" style:text-line-through-type="none" style:text-position="0% 100%" style:font-name="Courier New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Courier New" style:font-size-complex="32pt" style:font-style-complex="normal" style:font-weight-complex="bold"/>
    </style:style>
    <style:style style:name="T15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1pt" fo:letter-spacing="normal" fo:language="en" fo:country="US" fo:font-style="normal" style:text-underline-style="none" fo:font-weight="normal" fo:background-color="transparent" style:font-size-asian="31pt" style:font-style-asian="normal" style:font-weight-asian="normal" style:font-name-complex="Lucida Sans Unicode2" style:font-size-complex="31pt" style:font-style-complex="normal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Lucida Sans Unicode2" style:font-size-complex="30pt" style:font-style-complex="normal" style:font-weight-complex="normal"/>
    </style:style>
    <style:style style:name="T156" style:family="text">
      <style:text-properties fo:font-variant="normal" fo:text-transform="none" fo:color="#127622" loext:opacity="100%" style:text-line-through-style="none" style:text-line-through-type="none" style:text-position="0% 100%" style:font-name="Courier New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name-complex="Lucida Sans Unicode2" style:font-size-complex="24pt" style:font-style-complex="normal" style:font-weight-complex="bold"/>
    </style:style>
    <style:style style:name="T15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Lucida Sans Unicode2" style:font-size-complex="28pt" style:font-style-complex="normal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1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weight="normal" fo:background-color="transparent" style:font-size-asian="32pt" style:font-weight-asian="normal" style:font-name-complex="Lucida Sans Unicode2" style:font-size-complex="32pt" style:font-weight-complex="normal"/>
    </style:style>
    <style:style style:name="T16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1pt" fo:letter-spacing="normal" fo:language="fr" fo:country="FR" fo:font-weight="normal" fo:background-color="transparent" style:font-size-asian="21pt" style:font-weight-asian="normal" style:font-name-complex="Lucida Sans Unicode2" style:font-size-complex="21pt" style:font-weight-complex="normal"/>
    </style:style>
    <style:style style:name="T161" style:family="text">
      <style:text-properties fo:font-variant="normal" fo:text-transform="none" fo:color="#000099" loext:opacity="100%" style:text-line-through-style="none" style:text-line-through-type="none" style:text-position="0% 100%" style:font-name="Courier New" fo:font-size="21pt" fo:letter-spacing="normal" fo:language="fr" fo:country="FR" fo:font-weight="bold" fo:background-color="transparent" style:font-size-asian="21pt" style:font-weight-asian="bold" style:font-name-complex="Lucida Sans Unicode2" style:font-size-complex="21pt" style:font-weight-complex="bold"/>
    </style:style>
    <style:style style:name="T16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32pt" fo:letter-spacing="normal" fo:language="fr" fo:country="FR" fo:font-weight="normal" fo:background-color="transparent" style:font-size-asian="32pt" style:font-weight-asian="normal" style:font-name-complex="Lucida Sans Unicode2" style:font-size-complex="32pt" style:font-weight-complex="normal"/>
    </style:style>
    <style:style style:name="T16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1pt" fo:letter-spacing="normal" fo:language="fr" fo:country="FR" fo:font-style="normal" style:text-underline-style="none" fo:font-weight="normal" fo:background-color="transparent" style:font-size-asian="21pt" style:font-style-asian="normal" style:font-weight-asian="normal" style:font-name-complex="Lucida Sans Unicode2" style:font-size-complex="21pt" style:font-style-complex="normal" style:font-weight-complex="normal"/>
    </style:style>
    <style:style style:name="T164" style:family="text">
      <style:text-properties fo:font-variant="normal" fo:text-transform="none" fo:color="#127622" loext:opacity="100%" style:text-line-through-style="none" style:text-line-through-type="none" style:text-position="0% 100%" style:font-name="Courier New" fo:font-size="21pt" fo:letter-spacing="normal" fo:language="fr" fo:country="FR" fo:font-style="normal" style:text-underline-style="none" fo:font-weight="bold" fo:background-color="transparent" style:font-size-asian="21pt" style:font-style-asian="normal" style:font-weight-asian="bold" style:font-name-complex="Lucida Sans Unicode2" style:font-size-complex="21pt" style:font-style-complex="normal" style:font-weight-complex="bold"/>
    </style:style>
    <style:style style:name="T165" style:family="text">
      <style:text-properties fo:font-variant="normal" fo:text-transform="none" fo:color="#000099" loext:opacity="100%" style:text-line-through-style="none" style:text-line-through-type="none" style:text-position="0% 100%" style:font-name="Tahoma" fo:font-size="32pt" fo:letter-spacing="normal" fo:language="fr" fo:country="FR" fo:font-weight="bold" fo:background-color="transparent" style:font-size-asian="32pt" style:font-weight-asian="bold" style:font-name-complex="Lucida Sans Unicode2" style:font-size-complex="32pt" style:font-weight-complex="bold"/>
    </style:style>
    <style:style style:name="T166" style:family="text">
      <style:text-properties fo:font-variant="normal" fo:text-transform="none" fo:color="#000099" loext:opacity="100%" style:text-line-through-style="none" style:text-line-through-type="none" style:text-position="0% 100%" style:font-name="Tahoma" fo:font-size="32pt" fo:letter-spacing="normal" fo:language="fr" fo:country="FR" fo:font-style="italic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16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language="fr" fo:country="FR" fo:font-weight="normal" fo:background-color="transparent" style:font-size-asian="20pt" style:font-weight-asian="normal" style:font-name-complex="Lucida Sans Unicode2" style:font-size-complex="20pt" style:font-weight-complex="normal"/>
    </style:style>
    <style:style style:name="T168" style:family="text">
      <style:text-properties fo:font-variant="normal" fo:text-transform="none" style:text-line-through-style="none" style:text-line-through-type="none" style:text-position="0% 100%" style:font-name="Tahoma" fo:font-size="32pt" fo:letter-spacing="normal" fo:language="fr" fo:country="FR" fo:background-color="transparent" style:font-size-asian="32pt" style:font-name-complex="Lucida Sans Unicode2" style:font-size-complex="32pt"/>
    </style:style>
    <style:style style:name="T169" style:family="text">
      <style:text-properties fo:font-variant="normal" fo:text-transform="none" style:text-line-through-style="none" style:text-line-through-type="none" style:text-position="0% 100%" style:font-name="Tahoma" fo:font-size="32pt" fo:letter-spacing="normal" fo:language="fr" fo:country="FR" style:text-underline-style="solid" style:text-underline-width="auto" style:text-underline-color="font-color" fo:background-color="transparent" style:font-size-asian="32pt" style:font-name-complex="Lucida Sans Unicode2" style:font-size-complex="32pt"/>
    </style:style>
    <style:style style:name="T1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Lucida Sans Unicode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0099" loext:opacity="100%" style:text-line-through-style="none" style:text-line-through-type="none" style:text-position="0% 100%" style:font-name="Courier New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name-complex="Lucida Sans Unicode2" style:font-size-complex="24pt" style:font-style-complex="normal" style:font-weight-complex="bold"/>
    </style:style>
    <style:style style:name="T172" style:family="text">
      <style:text-properties fo:color="#127622" loext:opacity="100%" style:font-name="Courier New" fo:font-size="24pt" fo:language="fr" fo:country="FR" fo:font-weight="bold" style:font-size-asian="24pt" style:font-weight-asian="bold" style:font-size-complex="24pt" style:font-weight-complex="bold"/>
    </style:style>
    <style:style style:name="T173" style:family="text">
      <style:text-properties fo:font-variant="normal" fo:text-transform="none" fo:color="#000099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ucida Sans Unicode2" style:font-size-complex="32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Tahoma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ucida Sans Unicode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min-label-width="0.952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1.27cm" text:min-label-width="0.952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952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206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ce181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7.832cm" svg:height="2.911cm" svg:x="11.2cm" svg:y="10.489cm">
          <draw:image xlink:href="Pictures/10000000000001280000006ED2B48C3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0">
        <office:forms form:automatic-focus="false" form:apply-design-mode="false"/>
        <draw:frame presentation:style-name="pr2" draw:text-style-name="P4" draw:layer="layout" svg:width="23.658cm" svg:height="3.217cm" svg:x="3.034cm" svg:y="2.552cm" presentation:class="title" presentation:user-transformed="true">
          <draw:text-box>
            <text:list text:style-name="L2">
              <text:list-header>
                <text:p text:style-name="P3"><text:span text:style-name="T1">Kafka Streams &amp; ksqlDB </text:span></text:p>
              </text:list-header>
            </text:list>
          </draw:text-box>
        </draw:frame>
        <draw:frame presentation:style-name="pr3" draw:text-style-name="P6" draw:layer="layout" svg:width="23.658cm" svg:height="3.927cm" svg:x="3.034cm" svg:y="10.304cm" presentation:class="subtitle" presentation:user-transformed="true">
          <draw:text-box>
            <text:list text:style-name="L2">
              <text:list-header>
                <text:p text:style-name="P5"><text:span text:style-name="T2">David THIBAU – 2024</text:span></text:p>
                <text:p text:style-name="P5"><text:span text:style-name="T2"/></text:p>
                <text:p text:style-name="P5"><text:span text:style-name="T2">david.thibau@gmail.com</text:span></text:p>
              </text:list-header>
            </text:list>
          </draw:text-box>
        </draw:frame>
        <presentation:notes draw:style-name="dp2">
          <draw:custom-shape draw:style-name="gr3" draw:text-style-name="P7" draw:layer="layout" svg:width="14.535cm" svg:height="10.279cm" svg:x="3.232cm" svg:y="2.853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5" draw:layer="layout" svg:width="23.499cm" svg:height="3.575cm" svg:x="3.033cm" svg:y="2.367cm" presentation:class="title">
          <draw:text-box>
            <text:p>Agenda</text:p>
          </draw:text-box>
        </draw:frame>
        <draw:frame presentation:style-name="pr6" draw:layer="layout" svg:width="11.467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">Rappels Kafka</text:span></text:p>
              </text:list-item>
            </text:list>
            <text:list text:style-name="L3">
              <text:list-item>
                <text:list>
                  <text:list-item>
                    <text:p>Kafka, ses cas d’usage</text:p>
                  </text:list-item>
                  <text:list-item>
                    <text:p>Concepts</text:p>
                  </text:list-item>
                  <text:list-item>
                    <text:p>Kafka APIs<text:line-break/></text:p>
                  </text:list-item>
                </text:list>
              </text:list-item>
            </text:list>
            <text:list text:style-name="L1">
              <text:list-item>
                <text:p text:style-name="P9"><text:span text:style-name="T3">KafkaStream</text:span></text:p>
              </text:list-item>
            </text:list>
            <text:list text:style-name="L3">
              <text:list-item>
                <text:p text:style-name="P10"><text:span text:style-name="T4">Concepts</text:span></text:p>
              </text:list-item>
              <text:list-item>
                <text:p text:style-name="P10"><text:span text:style-name="T4">Démarrage</text:span></text:p>
              </text:list-item>
              <text:list-item>
                <text:p text:style-name="P10"><text:span text:style-name="T4">Configuration</text:span></text:p>
              </text:list-item>
              <text:list-item>
                <text:p text:style-name="P10"><text:span text:style-name="T4">Opérateurs stateless</text:span></text:p>
              </text:list-item>
              <text:list-item>
                <text:p text:style-name="P10"><text:span text:style-name="T4">Opérateurs Stateful</text:span></text:p>
              </text:list-item>
              <text:list-item>
                <text:p text:style-name="P10"><text:span text:style-name="T4">Requêtes interactives</text:span></text:p>
              </text:list-item>
            </text:list>
            <text:list text:style-name="L1">
              <text:list-item>
                <text:p text:style-name="P10"><text:span text:style-name="T4"/></text:p>
              </text:list-item>
              <text:list-item>
                <text:p text:style-name="P10"><text:span text:style-name="T4"/></text:p>
              </text:list-item>
              <text:list-item>
                <text:p text:style-name="P9"><text:span text:style-name="T5"/></text:p>
              </text:list-item>
              <text:list-item>
                <text:p text:style-name="P10"><text:span text:style-name="T4"/></text:p>
              </text:list-item>
              <text:list-item>
                <text:p><text:span text:style-name="T5"/></text:p>
              </text:list-item>
              <text:list-item>
                <text:p/>
              </text:list-item>
            </text:list>
          </draw:text-box>
        </draw:frame>
        <draw:frame presentation:style-name="pr6" draw:layer="layout" svg:width="11.467cm" svg:height="12.18cm" svg:x="15.074cm" svg:y="6.383cm" presentation:class="outline" presentation:user-transformed="true">
          <draw:text-box>
            <text:list text:style-name="L1">
              <text:list-item>
                <text:p><text:span text:style-name="T6">kSqlDB</text:span></text:p>
              </text:list-item>
            </text:list>
            <text:list text:style-name="L3">
              <text:list-item>
                <text:list>
                  <text:list-item>
                    <text:p><text:span text:style-name="T7">Démarrage</text:span></text:p>
                  </text:list-item>
                  <text:list-item>
                    <text:p><text:span text:style-name="T7">SQL</text:span></text:p>
                  </text:list-item>
                  <text:list-item>
                    <text:p><text:span text:style-name="T7">Statements</text:span></text:p>
                  </text:list-item>
                  <text:list-item>
                    <text:p><text:span text:style-name="T7">Fonctions</text:span></text:p>
                  </text:list-item>
                </text:list>
              </text:list-item>
            </text:list>
            <text:list text:style-name="L1">
              <text:list-item>
                <text:p><text:span text:style-name="T8"/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4">
          <draw:page-thumbnail draw:style-name="gr2" draw:layer="layout" svg:width="15.597cm" svg:height="10.985cm" svg:x="2.623cm" svg:y="2.258cm" draw:page-number="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Introduction à Kafka" draw:style-name="dp5" draw:master-page-name="Vide">
        <office:forms form:automatic-focus="false" form:apply-design-mode="false"/>
        <draw:frame draw:name="Titre 3" presentation:style-name="pr7" draw:text-style-name="P12" draw:layer="layout" svg:width="23.499cm" svg:height="3.506cm" svg:x="3.033cm" svg:y="2.401cm" presentation:class="title" presentation:user-transformed="true">
          <draw:text-box>
            <text:p text:style-name="P11"><text:span text:style-name="T9">Rappels Kafka</text:span></text:p>
          </draw:text-box>
        </draw:frame>
        <draw:frame draw:name="Sous-titre 1" presentation:style-name="pr8" draw:text-style-name="P14" draw:layer="layout" svg:width="23.499cm" svg:height="12.18cm" svg:x="3.033cm" svg:y="6.283cm" presentation:class="subtitle" presentation:user-transformed="true">
          <draw:text-box>
            <text:p text:style-name="P13"><text:span text:style-name="T10"/></text:p>
            <text:p text:style-name="P13"><text:span text:style-name="T10"/></text:p>
            <text:p text:style-name="P13"><text:span text:style-name="T11">Kafka et ses cas d’usage</text:span></text:p>
            <text:p text:style-name="P13"><text:span text:style-name="T10">Concepts</text:span></text:p>
            <text:p text:style-name="P13"><text:span text:style-name="T10">Kafka APIs</text:span></text:p>
            <text:p text:style-name="P13"><text:span text:style-name="T10"/></text:p>
          </draw:text-box>
        </draw:frame>
        <presentation:notes draw:style-name="dp6">
          <draw:custom-shape draw:name="Forme libre 2" draw:style-name="gr4" draw:text-style-name="P15" draw:layer="layout" svg:width="15.751cm" svg:height="11.138cm" svg:x="2.624cm" svg:y="2.227cm">
            <text:p/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frame draw:name="Espace réservé des notes 4" presentation:style-name="pr9" draw:text-style-name="P16" draw:layer="layout" svg:width="14.367cm" svg:height="11.259cm" svg:x="3.249cm" svg:y="14.129cm" presentation:class="notes" presentation:placeholder="true" presentation:user-transformed="true">
            <draw:text-box/>
          </draw:frame>
        </presentation:notes>
      </draw:page>
      <draw:page draw:name="page5" draw:style-name="dp5" draw:master-page-name="Vide">
        <office:forms form:automatic-focus="false" form:apply-design-mode="false"/>
        <draw:frame draw:name="Titre 9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Projet Kafka</text:span></text:p>
          </draw:text-box>
        </draw:frame>
        <draw:frame draw:name="Espace réservé du texte 6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 projet Kafka initié par LinkedIn est désormais un projet </text:span><text:span text:style-name="T13">Apache</text:span><text:span text:style-name="T10"> sous licence OpenSource</text:span></text:p>
            <text:p text:style-name="P18"><text:span text:style-name="T10">La société </text:span><text:span text:style-name="T13">Confluent</text:span><text:span text:style-name="T10"> Créé en 2014 par </text:span><text:span text:style-name="T14">Jay Kreps, Neha Narkhede</text:span><text:span text:style-name="T10">, et </text:span><text:span text:style-name="T14">Jun Rao</text:span><text:span text:style-name="T10"> est le</text:span><text:span text:style-name="T14"> m</text:span><text:span text:style-name="T10">ainteneur principal d’Apache Kafka</text:span></text:p>
            <text:p text:style-name="P18"><text:span text:style-name="T10">Elle fournit également </text:span><text:span text:style-name="T14">Confluent</text:span><text:span text:style-name="T10"> :</text:span></text:p>
            <text:list text:style-name="L5">
              <text:list-item>
                <text:list>
                  <text:list-item>
                    <text:p text:style-name="P19"><text:span text:style-name="T10">Des distributions commerciales de Kafka</text:span></text:p>
                  </text:list-item>
                  <text:list-item>
                    <text:p text:style-name="P19"><text:span text:style-name="T10">Des services Cloud</text:span></text:p>
                  </text:list-item>
                  <text:list-item>
                    <text:p text:style-name="P19"><text:span text:style-name="T10">Des librairies ou produits connexes : Clients dans d’autres langages que Java, Sérialiseurs, SchemaRegistry</text:span></text:p>
                  </text:list-item>
                  <text:list-item>
                    <text:p text:style-name="P19"><text:span text:style-name="T10">De la documentation </text:span></text:p>
                  </text:list-item>
                </text:list>
              </text:list-item>
            </text:list>
            <text:p text:style-name="P20"><text:span text:style-name="T10"/></text:p>
          </draw:text-box>
        </draw:frame>
        <presentation:notes draw:style-name="dp6">
          <draw:page-thumbnail draw:name="Espace réservé de l'image des diapositives 3" draw:style-name="gr2" draw:layer="layout" svg:width="15.535cm" svg:height="10.984cm" svg:x="2.655cm" svg:y="2.258cm" draw:page-number="5" presentation:class="page"/>
          <draw:frame draw:name="Espace réservé des notes 11" presentation:style-name="pr12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Fonctionnalités" draw:style-name="dp5" draw:master-page-name="Vide">
        <office:forms form:automatic-focus="false" form:apply-design-mode="false"/>
        <draw:frame draw:name="Titre 6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Fonctionnalités</text:span></text:p>
          </draw:text-box>
        </draw:frame>
        <draw:frame draw:name="Espace réservé du texte 5" presentation:style-name="pr13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5">Kafka a trois capacités clés:</text:span></text:p>
            <text:list text:style-name="L5">
              <text:list-item>
                <text:list>
                  <text:list-item>
                    <text:list>
                      <text:list-item>
                        <text:p><text:span text:style-name="T15">Publier et s’abonner à des flux de messages</text:span><text:span text:style-name="T16">1</text:span><text:span text:style-name="T15"> avec certaines garanties de fiabilité.</text:span></text:p>
                      </text:list-item>
                      <text:list-item>
                        <text:p><text:span text:style-name="T15">Stocker les flux de messages de manière durable et tolérante aux pannes.</text:span></text:p>
                      </text:list-item>
                      <text:list-item>
                        <text:p><text:span text:style-name="T15">Traiter, transformer les flux de messages au fur et à mesure qu'ils se produisen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ZoneTexte 2" draw:style-name="gr5" draw:text-style-name="P23" draw:layer="layout" svg:width="20.963cm" svg:height="1.861cm" svg:x="1.539cm" svg:y="18.388cm">
          <text:p text:style-name="P22"><text:span text:style-name="T17">1. Dans la suite des slides on utilise de façon non-différenciés les termes</text:span></text:p>
          <text:p text:style-name="P22"><text:span text:style-name="T18">message</text:span><text:span text:style-name="T17">, </text:span><text:span text:style-name="T18">événement</text:span><text:span text:style-name="T17">, </text:span><text:span text:style-name="T18">enregist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page-thumbnail draw:name="Espace réservé de l'image des diapositives 5" draw:style-name="gr2" draw:layer="layout" svg:width="15.597cm" svg:height="10.984cm" svg:x="2.623cm" svg:y="2.258cm" draw:page-number="6" presentation:class="page"/>
          <draw:frame draw:name="Espace réservé des notes 7" presentation:style-name="pr14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Confluent" draw:style-name="dp5" draw:master-page-name="Vide">
        <office:forms form:automatic-focus="false" form:apply-design-mode="false"/>
        <draw:frame draw:name="Titre 8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Garanties Kafka</text:span></text:p>
          </draw:text-box>
        </draw:frame>
        <draw:frame draw:name="Espace réservé du texte 7" presentation:style-name="pr11" draw:text-style-name="P21" draw:layer="layout" svg:width="23.499cm" svg:height="12.18cm" svg:x="3.033cm" svg:y="6.283cm" presentation:class="outline" presentation:user-transformed="true">
          <draw:text-box>
            <text:list text:style-name="L4">
              <text:list-item>
                <text:p>En fonction de sa configuration Kafka peut garantir 3 niveaux de livraison de messages malgré des défaillances :</text:p>
                <text:list>
                  <text:list-item>
                    <text:p><text:span text:style-name="T19">At Most Once</text:span> : Chaque message est délivré au plus une fois. Pas de doublons mais des pertes de messages. Débit le plus élevé</text:p>
                  </text:list-item>
                  <text:list-item>
                    <text:p><text:span text:style-name="T19">At</text:span> <text:span text:style-name="T19">Least</text:span> <text:span text:style-name="T19">Once</text:span> : Chaque message est délivré au moins une fois. Pas de perte mais des doublons (sans incidence si le traitement est idempotent).</text:p>
                  </text:list-item>
                  <text:list-item>
                    <text:p><text:span text:style-name="T19">Exactly</text:span> <text:span text:style-name="T19">Once</text:span> : Chaque message est délivré une et une seule fois. Le traitement consiste à produire un message Kafka vers un topic.</text:p>
                  </text:list-item>
                </text:list>
              </text:list-item>
            </text:list>
          </draw:text-box>
        </draw:frame>
        <presentation:notes draw:style-name="dp6">
          <draw:page-thumbnail draw:name="Espace réservé de l'image des diapositives 7" draw:style-name="gr2" draw:layer="layout" svg:width="15.535cm" svg:height="10.984cm" svg:x="2.655cm" svg:y="2.258cm" draw:page-number="7" presentation:class="page"/>
          <draw:frame draw:name="Espace réservé des notes 9" presentation:style-name="pr15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8" draw:style-name="dp5" draw:master-page-name="Vide">
        <office:forms form:automatic-focus="false" form:apply-design-mode="false"/>
        <draw:frame draw:name="Titre 1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Cas d’usages</text:span></text:p>
          </draw:text-box>
        </draw:frame>
        <draw:frame draw:name="Espace réservé du texte 1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s principaux cas d’usage sont <text:s/>:</text:span></text:p>
            <text:list text:style-name="L7">
              <text:list-item>
                <text:list>
                  <text:list-item>
                    <text:p><text:span text:style-name="T20">Message Broker</text:span><text:span text:style-name="T10"> permettant de découpler le cycle de vie des producteurs et des consommateurs de messages :</text:span><text:span text:style-name="T10"><text:line-break/></text:span><text:span text:style-name="T21">=&gt; Support de communication entre micro-services, ESB</text:span></text:p>
                  </text:list-item>
                  <text:list-item>
                    <text:p><text:span text:style-name="T20">Buffering d’évènements</text:span><text:span text:style-name="T10"> : Permet de bufferiser les évènements avant des traitements batch ou temps-réels :</text:span><text:span text:style-name="T10"><text:line-break/></text:span><text:span text:style-name="T10">Ex : Ingestion massive d’événements dans pile ELK</text:span></text:p>
                  </text:list-item>
                  <text:list-item>
                    <text:p><text:span text:style-name="T10">Backbone pour des </text:span><text:span text:style-name="T20">architectures Event-Driven</text:span></text:p>
                  </text:list-item>
                </text:list>
              </text:list-item>
            </text:list>
            <text:p text:style-name="P18"><text:span text:style-name="T10"/></text:p>
          </draw:text-box>
        </draw:frame>
        <presentation:notes draw:style-name="dp6">
          <draw:page-thumbnail draw:name="Espace réservé de l'image des diapositives 1" draw:style-name="gr2" draw:layer="layout" svg:width="15.535cm" svg:height="10.984cm" svg:x="2.655cm" svg:y="2.258cm" draw:page-number="8" presentation:class="page"/>
          <draw:frame draw:name="Espace réservé des notes 1" presentation:style-name="pr16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Architecture Event-driven" draw:style-name="dp5" draw:master-page-name="Vide">
        <office:forms form:automatic-focus="false" form:apply-design-mode="false"/>
        <draw:frame draw:name="Titre 18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Architecture Event-driven</text:span></text:p>
          </draw:text-box>
        </draw:frame>
        <draw:frame draw:name="Espace réservé du texte 16" presentation:style-name="pr11" draw:text-style-name="P21" draw:layer="layout" svg:width="23.499cm" svg:height="12.18cm" svg:x="3.033cm" svg:y="6.386cm" presentation:class="outline" presentation:user-transformed="true">
          <draw:text-box>
            <text:p text:style-name="P18"><text:span text:style-name="T10">Les architectures </text:span><text:span text:style-name="T14">event-driven</text:span><text:span text:style-name="T10"> sont une alternative intéressante dans un contexte micro-services.</text:span></text:p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15">Produit généralement des architectures plus souples et plus réactives.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0">Chaque micro-service consomme en continu des événements :</text:span></text:p>
            <text:list text:continue-numbering="true" text:style-name="L8">
              <text:list-item>
                <text:list>
                  <text:list-item>
                    <text:list>
                      <text:list-item>
                        <text:p text:style-name="P19"><text:span text:style-name="T15">Lit un ou plusieurs topics Kafka en entrée</text:span></text:p>
                      </text:list-item>
                      <text:list-item>
                        <text:p text:style-name="P19"><text:span text:style-name="T15">Effectue un traitement</text:span></text:p>
                      </text:list-item>
                      <text:list-item>
                        <text:p text:style-name="P19"><text:span text:style-name="T15">Écrit vers un ou plusieurs topics de sortie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0"/></text:p>
            <text:p text:style-name="P20"><text:span text:style-name="T10">L’API Kafka Stream facilite ce type d’architecture <text:s/></text:span></text:p>
          </draw:text-box>
        </draw:frame>
        <presentation:notes draw:style-name="dp6">
          <draw:page-thumbnail draw:name="Espace réservé de l'image des diapositives 16" draw:style-name="gr2" draw:layer="layout" svg:width="15.535cm" svg:height="10.984cm" svg:x="2.655cm" svg:y="2.258cm" draw:page-number="9" presentation:class="page"/>
          <draw:frame draw:name="Espace réservé des notes 19" presentation:style-name="pr17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Event-driven architecture" draw:style-name="dp5" draw:master-page-name="Vide">
        <office:forms form:automatic-focus="false" form:apply-design-mode="false"/>
        <draw:frame draw:name="Titre 19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Event-driven architecture</text:span></text:p>
          </draw:text-box>
        </draw:frame>
        <draw:frame draw:name="Espace réservé du texte 17" presentation:style-name="pr18" draw:text-style-name="P24" draw:layer="layout" svg:width="23.499cm" svg:height="12.18cm" svg:x="3.033cm" svg:y="6.283cm" presentation:class="outline" presentation:placeholder="true" presentation:user-transformed="true">
          <draw:text-box/>
        </draw:frame>
        <draw:frame draw:name="Image 7" draw:style-name="gr6" draw:text-style-name="P25" draw:layer="layout" svg:width="26.193cm" svg:height="11.429cm" svg:x="1.308cm" svg:y="7.968cm">
          <draw:image xlink:href="Pictures/10000000000003DE000001B0B0EE38E8.png" xlink:type="simple" xlink:show="embed" xlink:actuate="onLoad" draw:mime-type="image/png">
            <text:p/>
          </draw:image>
        </draw:frame>
        <presentation:notes draw:style-name="dp6">
          <draw:page-thumbnail draw:name="Espace réservé de l'image des diapositives 17" draw:style-name="gr2" draw:layer="layout" svg:width="15.597cm" svg:height="10.984cm" svg:x="2.623cm" svg:y="2.258cm" draw:page-number="10" presentation:class="page"/>
          <draw:frame draw:name="Espace réservé des notes 20" presentation:style-name="pr19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1" draw:style-name="dp5" draw:master-page-name="Vide_5f_">
        <office:forms form:automatic-focus="false" form:apply-design-mode="false"/>
        <draw:frame draw:name="Titre 2" presentation:style-name="pr20" draw:text-style-name="P12" draw:layer="layout" svg:width="23.499cm" svg:height="3.506cm" svg:x="3.033cm" svg:y="2.401cm" presentation:class="title" presentation:user-transformed="true">
          <draw:text-box>
            <text:p text:style-name="P11"><text:span text:style-name="T9">Rappels Kafka</text:span></text:p>
          </draw:text-box>
        </draw:frame>
        <draw:frame draw:name="Sous-titre 3" presentation:style-name="pr21" draw:text-style-name="P14" draw:layer="layout" svg:width="23.499cm" svg:height="12.18cm" svg:x="3.033cm" svg:y="6.283cm" presentation:class="subtitle" presentation:user-transformed="true">
          <draw:text-box>
            <text:p text:style-name="P13"><text:span text:style-name="T10"/></text:p>
            <text:p text:style-name="P13"><text:span text:style-name="T10"/></text:p>
            <text:p text:style-name="P26"><text:span text:style-name="T2">Kafka et ses cas d’usage</text:span></text:p>
            <text:p text:style-name="P26"><text:span text:style-name="T22">Concepts</text:span></text:p>
            <text:p text:style-name="P13"><text:span text:style-name="T10">Kafka APIs</text:span></text:p>
            <text:p text:style-name="P13"><text:span text:style-name="T10"/></text:p>
          </draw:text-box>
        </draw:frame>
        <presentation:notes draw:style-name="dp6">
          <draw:custom-shape draw:name="Forme libre 1" draw:style-name="gr4" draw:text-style-name="P15" draw:layer="layout" svg:width="15.751cm" svg:height="11.138cm" svg:x="2.624cm" svg:y="2.227cm">
            <text:p/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frame draw:name="Espace réservé des notes 5" presentation:style-name="pr22" draw:text-style-name="P16" draw:layer="layout" svg:width="14.367cm" svg:height="11.259cm" svg:x="3.249cm" svg:y="14.129cm" presentation:class="notes" presentation:placeholder="true" presentation:user-transformed="true">
            <draw:text-box/>
          </draw:frame>
        </presentation:notes>
      </draw:page>
      <draw:page draw:name="Cluster (2)" draw:style-name="dp5" draw:master-page-name="Vide_5f_">
        <office:forms form:automatic-focus="false" form:apply-design-mode="false"/>
        <draw:frame draw:name="Titre 40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Cluster</text:span></text:p>
          </draw:text-box>
        </draw:frame>
        <draw:frame draw:name="Espace réservé du texte 34" presentation:style-name="pr24" draw:text-style-name="P21" draw:layer="layout" svg:width="23.499cm" svg:height="12.18cm" svg:x="3.033cm" svg:y="6.352cm" presentation:class="outline" presentation:user-transformed="true">
          <draw:text-box>
            <text:p text:style-name="P18"><text:span text:style-name="T10">Kafka est exécuté comme un cluster d'un ou plusieurs </text:span><text:span text:style-name="T20">serveurs</text:span><text:span text:style-name="T10"> pouvant s'étendre sur plusieurs centres de données.</text:span></text:p>
            <text:list text:style-name="L5">
              <text:list-item>
                <text:list>
                  <text:list-item>
                    <text:p text:style-name="P19"><text:span text:style-name="T15">Certains de ces serveurs </text:span><text:span text:style-name="T10">appelés les </text:span><text:span text:style-name="T20">brokers </text:span><text:span text:style-name="T10">forment la couche de stockage.</text:span></text:p>
                  </text:list-item>
                  <text:list-item>
                    <text:p text:style-name="P19"><text:span text:style-name="T10">Un serveur est désigné </text:span><text:span text:style-name="T20">contrôleur</text:span><text:span text:style-name="T23">1</text:span><text:span text:style-name="T10">. </text:span><text:span text:style-name="T10"><text:line-break/></text:span><text:span text:style-name="T10">Son rôle est de prendre des décisions concernant le cluster.</text:span></text:p>
                  </text:list-item>
                </text:list>
              </text:list-item>
            </text:list>
            <text:p text:style-name="P20"><text:span text:style-name="T10"/></text:p>
            <text:p text:style-name="P20"><text:span text:style-name="T24"/></text:p>
          </draw:text-box>
        </draw:frame>
        <draw:custom-shape draw:name="ZoneTexte 5" draw:style-name="gr7" draw:text-style-name="P28" draw:layer="layout" svg:width="19.87cm" svg:height="0.677cm" svg:x="1.769cm" svg:y="19.361cm">
          <text:p text:style-name="P27"><text:span text:style-name="T25">1. Avant la version 3.x, un cluster Kafka nécessitait également un ensemble Zookeeper qui jouait le rôle de <text:s/>contrôl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page-thumbnail draw:name="Espace réservé de l'image des diapositives 36" draw:style-name="gr2" draw:layer="layout" svg:width="15.535cm" svg:height="10.984cm" svg:x="2.655cm" svg:y="2.258cm" draw:page-number="12" presentation:class="page"/>
          <draw:frame draw:name="Espace réservé des notes 6" presentation:style-name="pr25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Concepts de base" draw:style-name="dp5" draw:master-page-name="Vide">
        <office:forms form:automatic-focus="false" form:apply-design-mode="false"/>
        <draw:frame draw:name="Titre 23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Topics et records</text:span></text:p>
          </draw:text-box>
        </draw:frame>
        <draw:frame draw:name="Espace réservé du texte 20" presentation:style-name="pr11" draw:text-style-name="P21" draw:layer="layout" svg:width="23.499cm" svg:height="12.18cm" svg:x="3.033cm" svg:y="6.42cm" presentation:class="outline" presentation:user-transformed="true">
          <draw:text-box>
            <text:p text:style-name="P18"><text:span text:style-name="T10">Le cluster Kafka </text:span><text:span text:style-name="T10"><text:line-break/></text:span><text:span text:style-name="T10">stocke des flux d'enregistrements : les </text:span><text:span text:style-name="T26">records</text:span><text:span text:style-name="T10"> </text:span><text:span text:style-name="T10"><text:line-break/></text:span><text:span text:style-name="T10">dans des rubriques : les </text:span><text:span text:style-name="T26">topics</text:span><text:span text:style-name="T10"> .</text:span></text:p>
            <text:p text:style-name="P18"><text:span text:style-name="T10"/></text:p>
            <text:p text:style-name="P18"><text:span text:style-name="T10">Chaque enregistrement se compose d'une clé éventuelle, d’entêtes éventuelles, d'une valeur et d'un horodatage.</text:span></text:p>
            <text:p text:style-name="P18"><text:span text:style-name="T10"/></text:p>
          </draw:text-box>
        </draw:frame>
        <presentation:notes draw:style-name="dp6">
          <draw:page-thumbnail draw:name="Espace réservé de l'image des diapositives 20" draw:style-name="gr2" draw:layer="layout" svg:width="15.535cm" svg:height="10.984cm" svg:x="2.655cm" svg:y="2.258cm" draw:page-number="13" presentation:class="page"/>
          <draw:frame draw:name="Espace réservé des notes 24" presentation:style-name="pr26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Topic" draw:style-name="dp5" draw:master-page-name="Vide">
        <office:forms form:automatic-focus="false" form:apply-design-mode="false"/>
        <draw:frame draw:name="Titre 27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Partitionnement des topics</text:span></text:p>
          </draw:text-box>
        </draw:frame>
        <draw:frame draw:name="Espace réservé du texte 24" presentation:style-name="pr11" draw:text-style-name="P21" draw:layer="layout" svg:width="23.499cm" svg:height="5.916cm" svg:x="3.033cm" svg:y="6.349cm" presentation:class="outline" presentation:user-transformed="true">
          <draw:text-box>
            <text:p text:style-name="P18"><text:span text:style-name="T10">Les </text:span><text:span text:style-name="T14">topics</text:span><text:span text:style-name="T10"> de Kafka peuvent avoir Zéro, Un ou de multiples abonnés</text:span></text:p>
            <text:p text:style-name="P18"><text:span text:style-name="T10">Ils peuvent être </text:span><text:span text:style-name="T27">partitionnés.</text:span></text:p>
            <text:p text:style-name="P29"><text:span text:style-name="T10"/></text:p>
          </draw:text-box>
        </draw:frame>
        <draw:frame draw:name="Image 11" draw:style-name="gr6" draw:text-style-name="P25" draw:layer="layout" svg:width="12.814cm" svg:height="8.223cm" svg:x="7.253cm" svg:y="11.785cm">
          <draw:image xlink:href="Pictures/10000000000001A00000010B99E34F5B.png" xlink:type="simple" xlink:show="embed" xlink:actuate="onLoad" draw:mime-type="image/png">
            <text:p/>
          </draw:image>
        </draw:frame>
        <presentation:notes draw:style-name="dp6">
          <draw:page-thumbnail draw:name="Espace réservé de l'image des diapositives 24" draw:style-name="gr2" draw:layer="layout" svg:width="15.535cm" svg:height="10.984cm" svg:x="2.655cm" svg:y="2.258cm" draw:page-number="14" presentation:class="page"/>
          <draw:frame draw:name="Espace réservé des notes 28" presentation:style-name="pr27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Apport des partitions" draw:style-name="dp5" draw:master-page-name="Vide">
        <office:forms form:automatic-focus="false" form:apply-design-mode="false"/>
        <draw:frame draw:name="Titre 28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Apport des partitions</text:span></text:p>
          </draw:text-box>
        </draw:frame>
        <draw:frame draw:name="Espace réservé du texte 25" presentation:style-name="pr13" draw:text-style-name="P21" draw:layer="layout" svg:width="23.499cm" svg:height="7.24cm" svg:x="3.033cm" svg:y="6.283cm" presentation:class="outline" presentation:user-transformed="true">
          <draw:text-box>
            <text:list text:style-name="L9">
              <text:list-item>
                <text:p text:style-name="P30"><text:span text:style-name="T28">Les partitions autorisent le parallélisme et augmentent la capacité de stockage en utilisant les capacités disque de chaque nœud.</text:span></text:p>
              </text:list-item>
              <text:list-item>
                <text:p text:style-name="P30"><text:span text:style-name="T28">L’ordre des messages n’est garanti qu’à l’intérieur d’une partition</text:span></text:p>
              </text:list-item>
              <text:list-item>
                <text:p text:style-name="P30"><text:span text:style-name="T28">Le nombre de partition est fixé à la création du </text:span><text:span text:style-name="T29">topic</text:span></text:p>
              </text:list-item>
            </text:list>
          </draw:text-box>
        </draw:frame>
        <draw:frame draw:name="Image 12" draw:style-name="gr6" draw:text-style-name="P25" draw:layer="layout" svg:width="18.309cm" svg:height="5cm" svg:x="5.628cm" svg:y="14.418cm">
          <draw:image xlink:href="Pictures/10000000000002B4000000BD7CDAC576.png" xlink:type="simple" xlink:show="embed" xlink:actuate="onLoad" draw:mime-type="image/png">
            <text:p/>
          </draw:image>
        </draw:frame>
        <presentation:notes draw:style-name="dp6">
          <draw:page-thumbnail draw:name="Espace réservé de l'image des diapositives 25" draw:style-name="gr2" draw:layer="layout" svg:width="15.535cm" svg:height="10.984cm" svg:x="2.655cm" svg:y="2.258cm" draw:page-number="15" presentation:class="page"/>
          <draw:frame draw:name="Espace réservé des notes 29" presentation:style-name="pr28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Réplication" draw:style-name="dp5" draw:master-page-name="Vide">
        <office:forms form:automatic-focus="false" form:apply-design-mode="false"/>
        <draw:frame draw:name="Titre 29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Réplication</text:span></text:p>
          </draw:text-box>
        </draw:frame>
        <draw:frame draw:name="Espace réservé du texte 26" presentation:style-name="pr13" draw:text-style-name="P21" draw:layer="layout" svg:width="23.499cm" svg:height="3.444cm" svg:x="3.033cm" svg:y="6.283cm" presentation:class="outline" presentation:user-transformed="true">
          <draw:text-box>
            <text:p text:style-name="P18"><text:span text:style-name="T15">Les partitions peuvent être </text:span><text:span text:style-name="T30">répliquées</text:span></text:p>
            <text:list text:style-name="L5">
              <text:list-item>
                <text:list>
                  <text:list-item>
                    <text:p text:style-name="P19"><text:span text:style-name="T31">La réplication permet la tolérance aux pannes et la durabilité des données</text:span></text:p>
                  </text:list-item>
                </text:list>
              </text:list-item>
            </text:list>
          </draw:text-box>
        </draw:frame>
        <draw:frame draw:name="Image 14" draw:style-name="gr6" draw:text-style-name="P25" draw:layer="layout" svg:width="21.722cm" svg:height="6.64cm" svg:x="3.989cm" svg:y="12.087cm">
          <draw:image xlink:href="Pictures/1000000000000335000000FBCA7FBDB1.png" xlink:type="simple" xlink:show="embed" xlink:actuate="onLoad" draw:mime-type="image/png">
            <text:p/>
          </draw:image>
        </draw:frame>
        <presentation:notes draw:style-name="dp6">
          <draw:page-thumbnail draw:name="Espace réservé de l'image des diapositives 26" draw:style-name="gr2" draw:layer="layout" svg:width="15.535cm" svg:height="10.984cm" svg:x="2.655cm" svg:y="2.258cm" draw:page-number="16" presentation:class="page"/>
          <draw:frame draw:name="Espace réservé des notes 30" presentation:style-name="pr29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Distribution des partitions" draw:style-name="dp5" draw:master-page-name="Vide">
        <office:forms form:automatic-focus="false" form:apply-design-mode="false"/>
        <draw:frame draw:name="Titre 30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Distribution des partitions</text:span></text:p>
          </draw:text-box>
        </draw:frame>
        <draw:frame draw:name="Espace réservé du texte 27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s partitions sont réparties sur les instances du cluster.</text:span></text:p>
            <text:p text:style-name="P18"><text:span text:style-name="T10">Les répliques sont distribuées sur des instances différentes</text:span></text:p>
            <text:p text:style-name="P18"><text:span text:style-name="T10">Pour chaque partition répliquée, une des instances agit comme </text:span><text:span text:style-name="T11">maître (leader)</text:span><text:span text:style-name="T10">. Les autres comme </text:span><text:span text:style-name="T11">suiveurs (follower)</text:span></text:p>
            <text:list text:style-name="L5">
              <text:list-item>
                <text:list>
                  <text:list-item>
                    <text:p text:style-name="P19"><text:span text:style-name="T10">Le maître coordonne les lectures et les écritures sur la partition</text:span></text:p>
                  </text:list-item>
                  <text:list-item>
                    <text:p text:style-name="P19"><text:span text:style-name="T10">Les suiveurs répliquent passivement le maître</text:span></text:p>
                  </text:list-item>
                  <text:list-item>
                    <text:p text:style-name="P19"><text:span text:style-name="T10">Si le maître défaille, un processus d’élection choisit un autre maître parmi les répliques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name="Espace réservé de l'image des diapositives 27" draw:style-name="gr2" draw:layer="layout" svg:width="15.535cm" svg:height="10.984cm" svg:x="2.655cm" svg:y="2.258cm" draw:page-number="17" presentation:class="page"/>
          <draw:frame draw:name="Espace réservé des notes 31" presentation:style-name="pr30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rtition et offset" draw:style-name="dp5" draw:master-page-name="Vide">
        <office:forms form:automatic-focus="false" form:apply-design-mode="false"/>
        <draw:frame draw:name="Titre 31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Partition et offset</text:span></text:p>
          </draw:text-box>
        </draw:frame>
        <draw:frame draw:name="Espace réservé du texte 28" presentation:style-name="pr13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5">Chaque partition est une séquence </text:span><text:span text:style-name="T32">ordonnée</text:span><text:span text:style-name="T33"> </text:span><text:span text:style-name="T32">et immuable</text:span><text:span text:style-name="T15"> d'enregistrements.</text:span></text:p>
            <text:p text:style-name="P18"><text:span text:style-name="T15">Un numéro d’identification séquentiel nommé </text:span><text:span text:style-name="T34">offset</text:span><text:span text:style-name="T15"> est attribué à chaque enregistrement.</text:span></text:p>
            <text:p text:style-name="P31"><text:span text:style-name="T15">Le cluster Kafka conserve durablement tous les enregistrements publiés, qu'ils aient ou non été consommés. </text:span></text:p>
            <text:p text:style-name="P31"><text:span text:style-name="T15">Les vieux messages sont supprimés en utilisant une </text:span><text:span text:style-name="T34">période</text:span><text:span text:style-name="T15"> </text:span><text:span text:style-name="T34">de</text:span><text:span text:style-name="T15"> </text:span><text:span text:style-name="T34">rétention</text:span><text:span text:style-name="T15"> configurable ainsi qu’une une stratégie d’archivage (</text:span><text:span text:style-name="T35">delete</text:span><text:span text:style-name="T15"> ou </text:span><text:span text:style-name="T35">compact</text:span><text:span text:style-name="T15">).</text:span></text:p>
          </draw:text-box>
        </draw:frame>
        <presentation:notes draw:style-name="dp6">
          <draw:page-thumbnail draw:name="Espace réservé de l'image des diapositives 28" draw:style-name="gr2" draw:layer="layout" svg:width="15.597cm" svg:height="10.984cm" svg:x="2.623cm" svg:y="2.258cm" draw:page-number="18" presentation:class="page"/>
          <draw:frame draw:name="Espace réservé des notes 32" presentation:style-name="pr31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Routing des messages" draw:style-name="dp5" draw:master-page-name="Vide">
        <office:forms form:automatic-focus="false" form:apply-design-mode="false"/>
        <draw:frame draw:name="Titre 33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Routing des messages</text:span></text:p>
          </draw:text-box>
        </draw:frame>
        <draw:frame draw:name="Espace réservé du texte 29" presentation:style-name="pr13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s producteurs sont responsables du choix de la partition en fonction de l'enregistrement</text:span></text:p>
            <text:p text:style-name="P18"><text:span text:style-name="T10">Cela peut être fait</text:span></text:p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15">via une stratégie Round-Robin assurant un équilibrage de charge</text:span></text:p>
                      </text:list-item>
                      <text:list-item>
                        <text:p text:style-name="P19"><text:span text:style-name="T15">En fonction des données de l’enregistrement. Typiquement, la clé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6">
          <draw:page-thumbnail draw:name="Espace réservé de l'image des diapositives 30" draw:style-name="gr2" draw:layer="layout" svg:width="15.535cm" svg:height="10.984cm" svg:x="2.655cm" svg:y="2.258cm" draw:page-number="19" presentation:class="page"/>
          <draw:frame draw:name="Espace réservé des notes 34" presentation:style-name="pr32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Groupe de consommateurs" draw:style-name="dp5" draw:master-page-name="Vide">
        <office:forms form:automatic-focus="false" form:apply-design-mode="false"/>
        <draw:frame draw:name="Titre 34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Groupe de consommateurs</text:span></text:p>
          </draw:text-box>
        </draw:frame>
        <draw:frame draw:name="Espace réservé du texte 30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s consommateurs sont taggés avec un nom de </text:span><text:span text:style-name="T11">groupe</text:span></text:p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15">Chaque enregistrement d’un topic est remis à une instance de consommateur au sein de chaque groupe.</text:span></text:p>
                      </text:list-item>
                      <text:list-item>
                        <text:p text:style-name="P19"><text:span text:style-name="T15">Les instances de consommateurs peuvent se trouver dans des threads, processus <text:s/>ou machines distincts.</text:span></text:p>
                      </text:list-item>
                    </text:list>
                  </text:list-item>
                </text:list>
              </text:list-item>
            </text:list>
            <text:p text:style-name="P32"><text:span text:style-name="T10">=&gt; Scalabilité et Tolérance aux fautes</text:span></text:p>
          </draw:text-box>
        </draw:frame>
        <presentation:notes draw:style-name="dp6">
          <draw:page-thumbnail draw:name="Espace réservé de l'image des diapositives 31" draw:style-name="gr2" draw:layer="layout" svg:width="15.535cm" svg:height="10.984cm" svg:x="2.655cm" svg:y="2.258cm" draw:page-number="20" presentation:class="page"/>
          <draw:frame draw:name="Espace réservé des notes 35" presentation:style-name="pr33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Offset consommateur" draw:style-name="dp5" draw:master-page-name="Vide">
        <office:forms form:automatic-focus="false" form:apply-design-mode="false"/>
        <draw:frame draw:name="Titre 35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Offset consommateur</text:span></text:p>
          </draw:text-box>
        </draw:frame>
        <draw:frame draw:name="Espace réservé du texte 31" presentation:style-name="pr11" draw:text-style-name="P21" draw:layer="layout" svg:width="23.499cm" svg:height="12.18cm" svg:x="3.033cm" svg:y="6.446cm" presentation:class="outline" presentation:user-transformed="true">
          <draw:text-box>
            <text:p text:style-name="P18"><text:span text:style-name="T10">La seule métadonnée conservée pour un groupe de consommateurs par Kafka est son </text:span><text:span text:style-name="T36">offset</text:span><text:span text:style-name="T10"> du journal</text:span><text:span text:style-name="T37">1</text:span><text:span text:style-name="T10">.</text:span></text:p>
            <text:p text:style-name="P18"><text:span text:style-name="T10">Cet offset est contrôlé par le consommateur:</text:span></text:p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15">Le consommateur signale à Kafka son avancée dans sa lecture des enregistrements. </text:span><text:span text:style-name="T15"><text:line-break/></text:span><text:span text:style-name="T15">Plusieurs techniques sont possibles et ont des incidences sur les garanties de livraison. (Auto-commit, commit manuel, transactions)</text:span></text:p>
                      </text:list-item>
                      <text:list-item>
                        <text:p text:style-name="P19"><text:span text:style-name="T15">Mais, il peut consommer dans l'ordre qu'il souhaite.</text:span><text:span text:style-name="T15"><text:line-break/></text:span><text:span text:style-name="T15">Par exemple, retraiter les données les plus anciennes ou repartir d’un offset particulier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33" draw:layer="layout" svg:width="22.088cm" svg:height="1.096cm" svg:x="1.336cm" svg:y="19.429cm">
          <draw:text-box>
            <text:p><text:span text:style-name="T38">1. Information stockée dans un topic interne nommé __consumer_offsets</text:span></text:p>
          </draw:text-box>
        </draw:frame>
        <presentation:notes draw:style-name="dp6">
          <draw:page-thumbnail draw:name="Espace réservé de l'image des diapositives 32" draw:style-name="gr2" draw:layer="layout" svg:width="15.535cm" svg:height="10.984cm" svg:x="2.655cm" svg:y="2.258cm" draw:page-number="21" presentation:class="page"/>
          <draw:frame draw:name="Espace réservé des notes 36" presentation:style-name="pr34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22" draw:style-name="dp5" draw:master-page-name="Vide_5f__5f__5f_">
        <office:forms form:automatic-focus="false" form:apply-design-mode="false"/>
        <draw:frame draw:name="Titre 7" presentation:style-name="pr35" draw:text-style-name="P12" draw:layer="layout" svg:width="23.499cm" svg:height="3.506cm" svg:x="3.033cm" svg:y="2.401cm" presentation:class="title" presentation:user-transformed="true">
          <draw:text-box>
            <text:p text:style-name="P11"><text:span text:style-name="T9">Rappels Kafka</text:span></text:p>
          </draw:text-box>
        </draw:frame>
        <draw:frame draw:name="Sous-titre 4" presentation:style-name="pr36" draw:text-style-name="P14" draw:layer="layout" svg:width="23.499cm" svg:height="12.18cm" svg:x="3.033cm" svg:y="6.283cm" presentation:class="subtitle" presentation:user-transformed="true">
          <draw:text-box>
            <text:p text:style-name="P13"><text:span text:style-name="T10"/></text:p>
            <text:p text:style-name="P13"><text:span text:style-name="T10"/></text:p>
            <text:p text:style-name="P26"><text:span text:style-name="T2">Kafka et ses cas d’usage</text:span></text:p>
            <text:p text:style-name="P26"><text:span text:style-name="T2">Concepts</text:span></text:p>
            <text:p text:style-name="P26"><text:span text:style-name="T22">Kafka APIs</text:span></text:p>
            <text:p text:style-name="P13"><text:span text:style-name="T10"/></text:p>
          </draw:text-box>
        </draw:frame>
        <presentation:notes draw:style-name="dp6">
          <draw:custom-shape draw:name="Forme libre 4" draw:style-name="gr4" draw:text-style-name="P15" draw:layer="layout" svg:width="15.751cm" svg:height="11.138cm" svg:x="2.624cm" svg:y="2.227cm">
            <text:p/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frame draw:name="Espace réservé des notes 10" presentation:style-name="pr37" draw:text-style-name="P16" draw:layer="layout" svg:width="14.367cm" svg:height="11.259cm" svg:x="3.249cm" svg:y="14.12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38" draw:layer="layout" svg:width="23.499cm" svg:height="3.575cm" svg:x="3.033cm" svg:y="2.367cm" presentation:class="title">
          <draw:text-box>
            <text:p>Applications client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a communication entre les clients et les brokers Kafka s’effectue via un protocole TCP simple, performant et indépendant du langage. </text:p>
                <text:list>
                  <text:list-item>
                    <text:p>Ce protocole est versionné et maintient une compatibilité ascendante avec les versions plus anciennes. </text:p>
                  </text:list-item>
                </text:list>
              </text:list-item>
              <text:list-item>
                <text:p text:style-name="P9"><text:span text:style-name="T39">Les clients sont configurés avec la propriété </text:span><text:span text:style-name="T40">bootstrap-servers</text:span><text:span text:style-name="T39"> qui liste un sous-ensemble des Ips du cluster.</text:span></text:p>
              </text:list-item>
              <text:list-item>
                <text:p text:style-name="P9"><text:span text:style-name="T39">Après qu’un client accède à une de ses Ips, il découvrent l’intégralité des brokers du cluster</text:span></text:p>
              </text:list-item>
              <text:list-item>
                <text:p text:style-name="P9"><text:span text:style-name="T39">Apache fournit les librairies clientes Java, Confluent les fournit dans d’autres langages</text:span><text:span text:style-name="T39"><text:line-break/></text:span><text:span text:style-name="T39"/></text:p>
              </text:list-item>
            </text:list>
          </draw:text-box>
        </draw:frame>
        <presentation:notes draw:style-name="dp7">
          <draw:page-thumbnail draw:style-name="gr2" draw:layer="layout" svg:width="15.597cm" svg:height="10.985cm" svg:x="2.623cm" svg:y="2.258cm" draw:page-number="23" presentation:class="page"/>
          <draw:frame presentation:style-name="pr1" draw:text-style-name="P3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APIs" draw:style-name="dp5" draw:master-page-name="Vide_5f_">
        <office:forms form:automatic-focus="false" form:apply-design-mode="false"/>
        <draw:frame draw:name="Titre 5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APIs</text:span></text:p>
          </draw:text-box>
        </draw:frame>
        <draw:frame draw:name="Espace réservé du texte 4" presentation:style-name="pr24" draw:text-style-name="P21" draw:layer="layout" svg:width="23.499cm" svg:height="12.18cm" svg:x="3.033cm" svg:y="6.558cm" presentation:class="outline" presentation:user-transformed="true">
          <draw:text-box>
            <text:p text:style-name="P18"><text:span text:style-name="T10">5 principales APIs sont disponibles  :</text:span></text:p>
            <text:list text:style-name="L5">
              <text:list-item>
                <text:list>
                  <text:list-item>
                    <text:p text:style-name="P19"><text:span text:style-name="T10">L'API </text:span><text:span text:style-name="T27">Producer</text:span><text:span text:style-name="T10"> permet de publier un flux </text:span></text:p>
                  </text:list-item>
                  <text:list-item>
                    <text:p text:style-name="P19"><text:span text:style-name="T10">L'API </text:span><text:span text:style-name="T27">Consumer</text:span><text:span text:style-name="T10"> permet à une application de s'abonner à un ou plusieurs topics.</text:span></text:p>
                  </text:list-item>
                  <text:list-item>
                    <text:p text:style-name="P19"><text:span text:style-name="T10">L'API </text:span><text:span text:style-name="T27">Streams</text:span><text:span text:style-name="T10"> permet à une application d'agir comme un processeur de flux, consommant un ou plusieurs topic d'entrée et produisant un flux de sortie vers un ou plusieurs topics.</text:span></text:p>
                  </text:list-item>
                  <text:list-item>
                    <text:p text:style-name="P19"><text:span text:style-name="T10">L'API </text:span><text:span text:style-name="T27">Connector</text:span><text:span text:style-name="T10"> permet de créer et d'exécuter des producteurs ou des consommateurs à partir de système tierces (BD, fichiers, STDOUT, …)</text:span></text:p>
                  </text:list-item>
                  <text:list-item>
                    <text:p text:style-name="P19"><text:span text:style-name="T10">L’API </text:span><text:span text:style-name="T27">Admin</text:span><text:span text:style-name="T10"> permet de gérer les topics et le cluster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name="Espace réservé de l'image des diapositives 2" draw:style-name="gr2" draw:layer="layout" svg:width="15.535cm" svg:height="10.984cm" svg:x="2.655cm" svg:y="2.258cm" draw:page-number="24" presentation:class="page"/>
          <draw:frame draw:name="Espace réservé des notes 8" presentation:style-name="pr39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25" draw:style-name="dp8" draw:master-page-name="Standard" presentation:presentation-page-layout-name="AL1T1">
        <draw:frame presentation:style-name="pr38" draw:layer="layout" svg:width="23.499cm" svg:height="3.577cm" svg:x="3.033cm" svg:y="2.366cm" presentation:class="title">
          <draw:text-box>
            <text:p>Étapes lors de l’envoi d’un message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’envoi de message est constitué de plusieurs étapes :</text:p>
                <text:list>
                  <text:list-item>
                    <text:p>Création d’un objet <text:span text:style-name="T41">ProductRecord</text:span> encapsulant le topic et optionnellement une clé et une partition</text:p>
                  </text:list-item>
                  <text:list-item>
                    <text:p>L’objet est <text:span text:style-name="T42">sérialisé</text:span> pour préparer sa transmission sur le réseau</text:p>
                  </text:list-item>
                  <text:list-item>
                    <text:p>Les données sont ensuite fournies à un <text:span text:style-name="T42">partitionneur</text:span> qui détermine la partition de destination, (à partir de la partition indiquée, de la clé du message ou en Round-robin)</text:p>
                  </text:list-item>
                  <text:list-item>
                    <text:p>Une fois la partition sélectionnée, le message est ajouté à un <text:span text:style-name="T42">lot de messages</text:span> destiné à la même partition. Une thread séparée envoie le lot de messages.</text:p>
                  </text:list-item>
                  <text:list-item>
                    <text:p>Lorsque le broker reçoit le message, il renvoie une réponse sous le forme d’un objet <text:span text:style-name="T41">RecordMetadata</text:span> encapsulant le <text:span text:style-name="T43">topic</text:span>, la partition, la clé et l’offset</text:p>
                  </text:list-item>
                  <text:list-item>
                    <text:p>Si le broker n’arrive pas à écrire le message dans le journal, il renvoie une erreur et le producteur peut réessayer un certain nombre de foi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5.597cm" svg:height="10.985cm" svg:x="2.623cm" svg:y="2.258cm" draw:page-number="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Envoi de message (2)" draw:style-name="dp5" draw:master-page-name="Vide">
        <draw:frame draw:name="Titre 74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Envoi de message</text:span></text:p>
          </draw:text-box>
        </draw:frame>
        <draw:frame draw:name="Espace réservé du texte 64" presentation:style-name="pr40" draw:text-style-name="P24" draw:layer="layout" svg:width="23.499cm" svg:height="12.18cm" svg:x="3.033cm" svg:y="6.283cm" presentation:class="outline" presentation:placeholder="true" presentation:user-transformed="true">
          <draw:text-box/>
        </draw:frame>
        <draw:frame draw:name="Image 20" draw:style-name="gr6" draw:text-style-name="P25" draw:layer="layout" svg:width="13.222cm" svg:height="14.63cm" svg:x="6.377cm" svg:y="6.17cm">
          <draw:image xlink:href="Pictures/1000000100000468000004E0069CD733.png" xlink:type="simple" xlink:show="embed" xlink:actuate="onLoad" draw:mime-type="image/png">
            <text:p/>
          </draw:image>
        </draw:frame>
        <presentation:notes draw:style-name="dp6">
          <draw:page-thumbnail draw:name="Espace réservé de l'image des diapositives 66" draw:style-name="gr2" draw:layer="layout" svg:width="15.597cm" svg:height="10.984cm" svg:x="2.623cm" svg:y="2.258cm" draw:page-number="26" presentation:class="page"/>
          <draw:frame draw:name="Espace réservé des notes 75" presentation:style-name="pr41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27" draw:style-name="dp8" draw:master-page-name="Standard" presentation:presentation-page-layout-name="AL1T1">
        <draw:frame presentation:style-name="pr38" draw:layer="layout" svg:width="23.499cm" svg:height="3.575cm" svg:x="3.033cm" svg:y="2.367cm" presentation:class="title">
          <draw:text-box>
            <text:p>Construire un Producteur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première étape pour l’envoi consiste à instancier un <text:span text:style-name="T41">KafkaProducer </text:span><text:span text:style-name="T44">en lui passant des propriétés de configuration</text:span></text:p>
              </text:list-item>
              <text:list-item>
                <text:p>3 propriétés de configurations sont obligatoires :</text:p>
                <text:list>
                  <text:list-item>
                    <text:p><text:span text:style-name="T41">bootstrap.servers</text:span> : Liste de brokers que le producteur contacte au départ pour découvrir le cluster</text:p>
                  </text:list-item>
                  <text:list-item>
                    <text:p><text:span text:style-name="T41">key.serializer </text:span>: La classe utilisée pour la sérialisation de la clé</text:p>
                  </text:list-item>
                  <text:list-item>
                    <text:p><text:span text:style-name="T41">value.serializer</text:span><text:span text:style-name="T45"> : La classe </text:span>utilisée pour la sérialisation du message …</text:p>
                  </text:list-item>
                  <text:list-item>
                    <text:p><text:span text:style-name="T39">Pour la sémantique Exactly Once, les propriétés </text:span><text:span text:style-name="T46">enable.idempotence</text:span> et <text:span text:style-name="T41">transactional.id </text:span><text:span text:style-name="T44">sont généralement positionné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5.597cm" svg:height="10.985cm" svg:x="2.623cm" svg:y="2.258cm" draw:page-number="27" presentation:class="page"/>
          <draw:frame presentation:style-name="pr1" draw:text-style-name="P3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8" draw:style-name="dp8" draw:master-page-name="Standard" presentation:presentation-page-layout-name="AL1T1">
        <draw:frame presentation:style-name="pr38" draw:layer="layout" svg:width="23.499cm" svg:height="3.575cm" svg:x="3.033cm" svg:y="2.367cm" presentation:class="title" presentation:user-transformed="true">
          <draw:text-box>
            <text:p>Exemple Java : <text:line-break/><text:span text:style-name="T47">Envoi asynchrone avec call-back</text:span></text:p>
          </draw:text-box>
        </draw:frame>
        <draw:frame presentation:style-name="pr42" draw:text-style-name="P37" draw:layer="layout" svg:width="23.499cm" svg:height="14.322cm" svg:x="3.033cm" svg:y="6.283cm" presentation:class="outline" presentation:user-transformed="true">
          <draw:text-box>
            <text:list text:style-name="L1">
              <text:list-item>
                <text:p text:style-name="P35"><text:span text:style-name="T48">private Properties kafkaProps = new Properties();</text:span></text:p>
              </text:list-item>
              <text:list-item>
                <text:p text:style-name="P35"><text:span text:style-name="T48">kafkaProps.put("bootstrap.servers", "broker1:9092,broker2:9092");</text:span></text:p>
              </text:list-item>
              <text:list-item>
                <text:p text:style-name="P35"><text:span text:style-name="T48">kafkaProps.put("key.serializer", "org.apache.kafka.common.serialization.StringSerializer");</text:span></text:p>
              </text:list-item>
              <text:list-item>
                <text:p text:style-name="P35"><text:span text:style-name="T48">kafkaProps.put("value.serializer",</text:span><text:span text:style-name="T48"><text:line-break/></text:span><text:span text:style-name="T48">"org.apache.kafka.common.serialization.StringSerializer");</text:span></text:p>
              </text:list-item>
              <text:list-item>
                <text:p text:style-name="P35"><text:span text:style-name="T49">producer = new KafkaProducer&lt;String, String&gt;(kafkaProps);</text:span></text:p>
              </text:list-item>
              <text:list-item>
                <text:p text:style-name="P35"><text:span text:style-name="T48"/></text:p>
              </text:list-item>
              <text:list-item>
                <text:p text:style-name="P36"><text:span text:style-name="T49">ProducerRecord</text:span><text:span text:style-name="T48">&lt;String, String&gt; record =</text:span></text:p>
              </text:list-item>
              <text:list-item>
                <text:p text:style-name="P36"><text:span text:style-name="T48"><text:s text:c="4"/></text:span><text:span text:style-name="T48">new ProducerRecord&lt;&gt;("CustomerCountry", "Biomedical Materials", "USA");</text:span></text:p>
              </text:list-item>
              <text:list-item>
                <text:p text:style-name="P36"><text:span text:style-name="T48"/></text:p>
              </text:list-item>
              <text:list-item>
                <text:p text:style-name="P36"><text:span text:style-name="T49">producer.send</text:span><text:span text:style-name="T48">(record, new Callback() {</text:span></text:p>
              </text:list-item>
              <text:list-item>
                <text:p text:style-name="P36"><text:span text:style-name="T48"><text:s text:c="4"/></text:span><text:span text:style-name="T48">@Override</text:span></text:p>
              </text:list-item>
              <text:list-item>
                <text:p text:style-name="P36"><text:span text:style-name="T48"><text:s text:c="4"/></text:span><text:span text:style-name="T48">public void onCompletion(RecordMetadata recordMetadata, Exception e) {</text:span></text:p>
              </text:list-item>
              <text:list-item>
                <text:p text:style-name="P36"><text:span text:style-name="T48"><text:s text:c="8"/></text:span><text:span text:style-name="T48">if (e != null) {</text:span></text:p>
              </text:list-item>
              <text:list-item>
                <text:p text:style-name="P36"><text:span text:style-name="T48"><text:s text:c="12"/></text:span><text:span text:style-name="T48">e.printStackTrace();</text:span></text:p>
              </text:list-item>
              <text:list-item>
                <text:p text:style-name="P36"><text:span text:style-name="T48"><text:s text:c="8"/></text:span><text:span text:style-name="T48">}</text:span></text:p>
              </text:list-item>
              <text:list-item>
                <text:p text:style-name="P36"><text:span text:style-name="T48"><text:s text:c="4"/></text:span><text:span text:style-name="T48">}</text:span></text:p>
              </text:list-item>
              <text:list-item>
                <text:p text:style-name="P36"><text:span text:style-name="T48">});</text:span></text:p>
              </text:list-item>
              <text:list-item>
                <text:p text:style-name="P36"><text:span text:style-name="T48"/></text:p>
              </text:list-item>
            </text:list>
          </draw:text-box>
        </draw:frame>
        <presentation:notes draw:style-name="dp4">
          <draw:page-thumbnail draw:style-name="gr2" draw:layer="layout" svg:width="15.597cm" svg:height="10.985cm" svg:x="2.623cm" svg:y="2.258cm" draw:page-number="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draw:frame presentation:style-name="pr38" draw:layer="layout" svg:width="23.499cm" svg:height="3.575cm" svg:x="3.033cm" svg:y="2.367cm" presentation:class="title">
          <draw:text-box>
            <text:p>Sérialiseur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43">Kafka</text:span> inclut les classes <text:span text:style-name="T50">ByteArraySerializer</text:span> et <text:span text:style-name="T50">StringSerializer</text:span> utile pour types basiques. </text:p>
              </text:list-item>
              <text:list-item>
                <text:p>Pour des objets du domaine, il faut implémenter ses propres sérialiseurs/désérialiseurs en s’appuyant sur des formats comme <text:span text:style-name="T43">Avro</text:span>, <text:s/><text:span text:style-name="T43">Protobuf</text:span> ou <text:span text:style-name="T43">JSON</text:span></text:p>
              </text:list-item>
              <text:list-item>
                <text:p><text:span text:style-name="T51"/></text:p>
              </text:list-item>
              <text:list-item>
                <text:p><text:span text:style-name="T51">L’utilisation de </text:span><text:span text:style-name="T50">Schema</text:span><text:span text:style-name="T43"> </text:span><text:span text:style-name="T50">Registry</text:span><text:span text:style-name="T43"> </text:span><text:span text:style-name="T51">permet de s’assurer que les évolutions de format sont compatibles.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9" presentation:class="page"/>
          <draw:frame presentation:style-name="pr1" draw:text-style-name="P3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Groupes de consommateurs" draw:style-name="dp5" draw:master-page-name="Vide">
        <draw:frame draw:name="Titre 90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Groupes de consommateurs</text:span></text:p>
          </draw:text-box>
        </draw:frame>
        <draw:frame draw:name="Espace réservé du texte 79" presentation:style-name="pr13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5">Les consommateurs font généralement partie d'un </text:span><text:span text:style-name="T30">groupe de consommateurs</text:span><text:span text:style-name="T15">.</text:span></text:p>
            <text:list text:style-name="L5">
              <text:list-item>
                <text:list>
                  <text:list-item>
                    <text:p text:style-name="P19"><text:span text:style-name="T15">Chaque consommateur d’un groupe reçoit les messages d'un sous-ensemble différent des partitions du topic.</text:span></text:p>
                  </text:list-item>
                </text:list>
              </text:list-item>
            </text:list>
          </draw:text-box>
        </draw:frame>
        <draw:frame draw:name="Image 19" draw:style-name="gr6" draw:text-style-name="P25" draw:layer="layout" svg:width="7.63cm" svg:height="5.384cm" svg:x="0.569cm" svg:y="14.8cm">
          <draw:image xlink:href="Pictures/10000001000002C6000001F5A5AA6B72.png" xlink:type="simple" xlink:show="embed" xlink:actuate="onLoad" draw:mime-type="image/png">
            <text:p/>
          </draw:image>
        </draw:frame>
        <draw:frame draw:name="Image 23" draw:style-name="gr6" draw:text-style-name="P25" draw:layer="layout" svg:width="7.651cm" svg:height="5.399cm" svg:x="8.8cm" svg:y="14.8cm">
          <draw:image xlink:href="Pictures/10000001000002C6000001F577A322C2.png" xlink:type="simple" xlink:show="embed" xlink:actuate="onLoad" draw:mime-type="image/png">
            <text:p/>
          </draw:image>
        </draw:frame>
        <draw:frame draw:name="Image 24" draw:style-name="gr6" draw:text-style-name="P25" draw:layer="layout" svg:width="7.525cm" svg:height="6.253cm" svg:x="18.2cm" svg:y="14.8cm">
          <draw:image xlink:href="Pictures/10000001000002C60000024EE140356B.png" xlink:type="simple" xlink:show="embed" xlink:actuate="onLoad" draw:mime-type="image/png">
            <text:p/>
          </draw:image>
        </draw:frame>
        <presentation:notes draw:style-name="dp6">
          <draw:page-thumbnail draw:name="Espace réservé de l'image des diapositives 81" draw:style-name="gr2" draw:layer="layout" svg:width="15.597cm" svg:height="10.984cm" svg:x="2.623cm" svg:y="2.258cm" draw:page-number="30" presentation:class="page"/>
          <draw:frame draw:name="Espace réservé des notes 91" presentation:style-name="pr43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Rééquilibrage dynamique des consommateurs" draw:style-name="dp5" draw:master-page-name="Vide">
        <draw:frame draw:name="Titre 91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Rééquilibrage dynamique des consommateurs</text:span></text:p>
          </draw:text-box>
        </draw:frame>
        <draw:frame draw:name="Espace réservé du texte 80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ors de l’ajout d’un nouveau consommateur, celui-ci peut se faire affecter une partition consommée précédemment par un autre consommateur du groupe.</text:span></text:p>
            <text:p text:style-name="P18"><text:span text:style-name="T10">Lors de l’arrêt d’un consommateur, la partition qui lui était assignée est réaffectée à un autre consommateur</text:span></text:p>
            <text:p text:style-name="P18"><text:span text:style-name="T10">Cette répartition dynamique offre la scalabilité et la tolérance aux défaillances mais n’est pas spécialement désirable</text:span></text:p>
            <text:list text:style-name="L5">
              <text:list-item>
                <text:list>
                  <text:list-item>
                    <text:list>
                      <text:list-item>
                        <text:p><text:span text:style-name="T10">Durant le rééquilibrage les messages ne sont pas consommés</text:span></text:p>
                      </text:list-item>
                      <text:list-item>
                        <text:p><text:span text:style-name="T10">Le rééquilibrage peut donner lieu à des pertes de messages ou à des doublons (en fonction de la configuration)</text:span></text:p>
                      </text:list-item>
                    </text:list>
                    <text:p text:style-name="P19"><text:span text:style-name="T10"/></text:p>
                  </text:list-item>
                </text:list>
              </text:list-item>
            </text:list>
          </draw:text-box>
        </draw:frame>
        <presentation:notes draw:style-name="dp6">
          <draw:page-thumbnail draw:name="Espace réservé de l'image des diapositives 82" draw:style-name="gr2" draw:layer="layout" svg:width="15.535cm" svg:height="10.984cm" svg:x="2.655cm" svg:y="2.258cm" draw:page-number="31" presentation:class="page"/>
          <draw:frame draw:name="Espace réservé des notes 92" presentation:style-name="pr44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38" draw:layer="layout" svg:width="23.499cm" svg:height="3.575cm" svg:x="3.033cm" svg:y="2.367cm" presentation:class="title">
          <draw:text-box>
            <text:p><text:s/><text:span text:style-name="T43">KafkaConsumer</text:span>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’instanciation d’un <text:span text:style-name="T41">KafkaConsumer</text:span> est similaire à celle d’une <text:span text:style-name="T43">KafkaProducer</text:span></text:p>
              </text:list-item>
              <text:list-item>
                <text:p>Les propriétés obligatoires sont <text:span text:style-name="T43"> </text:span>:</text:p>
                <text:list>
                  <text:list-item>
                    <text:p><text:span text:style-name="T43">bootstrap.servers </text:span></text:p>
                  </text:list-item>
                  <text:list-item>
                    <text:p><text:span text:style-name="T43">key.deserializer</text:span> , et <text:span text:style-name="T43">value.deserializer</text:span></text:p>
                  </text:list-item>
                  <text:list-item>
                    <text:p><text:span text:style-name="T43">group.id</text:span> qui spécifie le groupe de consommateur</text:p>
                  </text:list-item>
                </text:list>
              </text:list-item>
              <text:list-item>
                <text:p>Une fois créé le consumer s’abonne à une liste de topic et poll régulièrement les messages.</text:p>
              </text:list-item>
              <text:list-item>
                <text:p>Un poll récupère un lot de messages.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3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38" draw:layer="layout" svg:width="23.499cm" svg:height="3.575cm" svg:x="3.033cm" svg:y="2.367cm" presentation:class="title">
          <draw:text-box>
            <text:p>Exemple Java</text:p>
          </draw:text-box>
        </draw:frame>
        <draw:frame presentation:style-name="pr45" draw:text-style-name="P39" draw:layer="layout" svg:width="23.499cm" svg:height="13.54cm" svg:x="3.033cm" svg:y="6.283cm" presentation:class="outline" presentation:user-transformed="true">
          <draw:text-box>
            <text:list text:style-name="L1">
              <text:list-item>
                <text:p text:style-name="P35"><text:span text:style-name="T52">private Properties kafkaProps = new Properties();</text:span></text:p>
              </text:list-item>
              <text:list-item>
                <text:p text:style-name="P36"><text:span text:style-name="T53">// Renseigment de bootstrap-servers, key et value Deserializer + group.id</text:span></text:p>
              </text:list-item>
              <text:list-item>
                <text:p text:style-name="P36"><text:span text:style-name="T53">// Plus d’autres configurations optionnelles</text:span></text:p>
              </text:list-item>
              <text:list-item>
                <text:p text:style-name="P36"><text:span text:style-name="T53">...</text:span></text:p>
              </text:list-item>
              <text:list-item>
                <text:p text:style-name="P36"><text:span text:style-name="T52">consumer = </text:span><text:span text:style-name="T54">new KafkaConsumer&lt;String, String&gt;(kafkaProps)</text:span><text:span text:style-name="T52">;</text:span></text:p>
              </text:list-item>
              <text:list-item>
                <text:p text:style-name="P36"><text:span text:style-name="T52"/></text:p>
              </text:list-item>
              <text:list-item>
                <text:p text:style-name="P38"><text:span text:style-name="T55">consumer.subscribe(Collections.singletonList("myTopic"));</text:span></text:p>
              </text:list-item>
              <text:list-item>
                <text:p text:style-name="P38"><text:span text:style-name="T56"/></text:p>
              </text:list-item>
              <text:list-item>
                <text:p text:style-name="P35"><text:span text:style-name="T52">try {</text:span></text:p>
              </text:list-item>
              <text:list-item>
                <text:p text:style-name="P35"><text:span text:style-name="T52">while (true) {</text:span></text:p>
              </text:list-item>
              <text:list-item>
                <text:p text:style-name="P35"><text:span text:style-name="T52"><text:s text:c="2"/></text:span><text:span text:style-name="T52">// poll timeout de 100ms pour récupérer les messages </text:span></text:p>
              </text:list-item>
              <text:list-item>
                <text:p text:style-name="P35"><text:span text:style-name="T52"><text:s text:c="2"/></text:span><text:span text:style-name="T52">ConsumerRecords&lt;String, String&gt; records = </text:span><text:span text:style-name="T54">consumer.poll(100)</text:span><text:span text:style-name="T52">;</text:span></text:p>
              </text:list-item>
              <text:list-item>
                <text:p text:style-name="P35"><text:span text:style-name="T52"><text:s text:c="2"/></text:span><text:span text:style-name="T52">for (ConsumerRecord&lt;String, String&gt; record : records) {</text:span></text:p>
              </text:list-item>
              <text:list-item>
                <text:p text:style-name="P35"><text:span text:style-name="T53"><text:s text:c="5"/></text:span><text:span text:style-name="T53">// Traitement message ..</text:span></text:p>
              </text:list-item>
              <text:list-item>
                <text:p text:style-name="P35"><text:span text:style-name="T52"><text:s text:c="2"/></text:span><text:span text:style-name="T52">}</text:span></text:p>
              </text:list-item>
              <text:list-item>
                <text:p text:style-name="P35"><text:span text:style-name="T52">}</text:span></text:p>
              </text:list-item>
              <text:list-item>
                <text:p text:style-name="P35"><text:span text:style-name="T52">} finally {</text:span></text:p>
              </text:list-item>
              <text:list-item>
                <text:p text:style-name="P35"><text:span text:style-name="T52"><text:s text:c="2"/></text:span><text:span text:style-name="T52">consumer.close();</text:span></text:p>
              </text:list-item>
              <text:list-item>
                <text:p text:style-name="P35"><text:span text:style-name="T52">}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33" presentation:class="page"/>
          <draw:frame presentation:style-name="pr1" draw:text-style-name="P3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Configuration des consommateurs" draw:style-name="dp5" draw:master-page-name="Vide">
        <draw:frame draw:name="Titre 97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Gestion des commits</text:span></text:p>
          </draw:text-box>
        </draw:frame>
        <draw:frame draw:name="Espace réservé du texte 86" presentation:style-name="pr11" draw:text-style-name="P21" draw:layer="layout" svg:width="23.499cm" svg:height="12.18cm" svg:x="3.033cm" svg:y="6.382cm" presentation:class="outline" presentation:user-transformed="true">
          <draw:text-box>
            <text:p text:style-name="P18"><text:span text:style-name="T10">La gestion des commits (indiquer à Kafka que le message a été traité) influe sur la garantie de consommation des messages. </text:span></text:p>
            <text:p text:style-name="P18"><text:span text:style-name="T10">2 stratégies :</text:span></text:p>
            <text:list text:style-name="L4">
              <text:list-item>
                <text:list>
                  <text:list-item>
                    <text:p><text:span text:style-name="T10">Laisser le client Kafka effectuer régulièrement les commits (</text:span><text:span text:style-name="T57">enable.auo.commit=true</text:span><text:span text:style-name="T10">)</text:span></text:p>
                  </text:list-item>
                  <text:list-item>
                    <text:p><text:span text:style-name="T10">Gérer soit même les commits</text:span></text:p>
                  </text:list-item>
                </text:list>
              </text:list-item>
            </text:list>
            <text:p><text:span text:style-name="T10">Si la consommation consiste à produire un message vers Kafka, on peut associer l’envoi du commit vers Kafka à la validation d’une transaction.</text:span><text:span text:style-name="T10"><text:line-break/></text:span><text:span text:style-name="T10">=&gt; Exactly Once</text:span></text:p>
            <text:p text:style-name="P18"><text:span text:style-name="T10"/></text:p>
          </draw:text-box>
        </draw:frame>
        <presentation:notes draw:style-name="dp6">
          <draw:page-thumbnail draw:name="Espace réservé de l'image des diapositives 88" draw:style-name="gr2" draw:layer="layout" svg:width="15.535cm" svg:height="10.984cm" svg:x="2.655cm" svg:y="2.258cm" draw:page-number="34" presentation:class="page"/>
          <draw:frame draw:name="Espace réservé des notes 98" presentation:style-name="pr46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" presentation:presentation-page-layout-name="AL1T1">
        <draw:frame presentation:style-name="pr38" draw:layer="layout" svg:width="23.499cm" svg:height="3.577cm" svg:x="3.033cm" svg:y="2.366cm" presentation:class="title">
          <draw:text-box>
            <text:p>Consommateur/Producteur Exactly-Once</text:p>
          </draw:text-box>
        </draw:frame>
        <draw:frame presentation:style-name="pr6" draw:text-style-name="P40" draw:layer="layout" svg:width="23.499cm" svg:height="12.18cm" svg:x="3.033cm" svg:y="6.283cm" presentation:class="outline">
          <draw:text-box>
            <text:list text:style-name="L1">
              <text:list-item>
                <text:p text:style-name="P38"><text:span text:style-name="T58"><text:s/></text:span><text:span text:style-name="T58">while (true) {</text:span></text:p>
              </text:list-item>
              <text:list-item>
                <text:p text:style-name="P38"><text:span text:style-name="T58"/></text:p>
              </text:list-item>
              <text:list-item>
                <text:p text:style-name="P38"><text:span text:style-name="T58"><text:s text:c="6"/></text:span><text:span text:style-name="T58">ConsumerRecords&lt;String, String&gt; records = consumer.poll(ofSeconds(60));</text:span></text:p>
              </text:list-item>
              <text:list-item>
                <text:p text:style-name="P38"><text:span text:style-name="T58"/></text:p>
              </text:list-item>
              <text:list-item>
                <text:p text:style-name="P38"><text:span text:style-name="T59"><text:s text:c="6"/></text:span><text:span text:style-name="T59">// Transform message</text:span></text:p>
              </text:list-item>
              <text:list-item>
                <text:p text:style-name="P38"><text:span text:style-name="T58"><text:s text:c="6"/></text:span><text:span text:style-name="T58">Map&lt;String, Integer&gt; wordCountMap =...</text:span></text:p>
              </text:list-item>
              <text:list-item>
                <text:p text:style-name="P38"><text:span text:style-name="T58"/></text:p>
              </text:list-item>
              <text:list-item>
                <text:p text:style-name="P38"><text:span text:style-name="T60"><text:s text:c="6"/></text:span><text:span text:style-name="T60">producer.beginTransaction();</text:span></text:p>
              </text:list-item>
              <text:list-item>
                <text:p text:style-name="P38"><text:span text:style-name="T58"/></text:p>
              </text:list-item>
              <text:list-item>
                <text:p text:style-name="P38"><text:span text:style-name="T58"><text:s text:c="6"/></text:span><text:span text:style-name="T58">wordCountMap.forEach((key, value) -&gt; </text:span><text:span text:style-name="T58"><text:line-break/></text:span><text:span text:style-name="T58"> <text:s text:c="15"/>producer.send(new ProducerRecord&lt;String, String&gt;(OUTPUT_TOPIC, key, value.toString())));</text:span></text:p>
              </text:list-item>
              <text:list-item>
                <text:p text:style-name="P38"><text:span text:style-name="T58"/></text:p>
              </text:list-item>
              <text:list-item>
                <text:p text:style-name="P38"><text:span text:style-name="T58"><text:s text:c="6"/></text:span><text:span text:style-name="T58">Map&lt;TopicPartition, OffsetAndMetadata&gt; offsetsToCommit = new HashMap&lt;&gt;();</text:span></text:p>
              </text:list-item>
              <text:list-item>
                <text:p text:style-name="P38"><text:span text:style-name="T58"/></text:p>
              </text:list-item>
              <text:list-item>
                <text:p text:style-name="P38"><text:span text:style-name="T59"><text:s text:c="6"/></text:span><text:span text:style-name="T59">// Retreive offsets for each partition</text:span></text:p>
              </text:list-item>
              <text:list-item>
                <text:p text:style-name="P38"><text:span text:style-name="T58"><text:s text:c="6"/></text:span><text:span text:style-name="T58">for (TopicPartition partition : records.partitions()) {</text:span></text:p>
              </text:list-item>
              <text:list-item>
                <text:p text:style-name="P38"><text:span text:style-name="T58"><text:s text:c="10"/></text:span><text:span text:style-name="T58">List&lt;ConsumerRecord&lt;String, String&gt;&gt; partitionedRecords = records.records(partition);</text:span></text:p>
              </text:list-item>
              <text:list-item>
                <text:p text:style-name="P38"><text:span text:style-name="T58"><text:s text:c="10"/></text:span><text:span text:style-name="T58">long offset = partitionedRecords.get(partitionedRecords.size() - 1).offset();</text:span></text:p>
              </text:list-item>
              <text:list-item>
                <text:p text:style-name="P38"><text:span text:style-name="T58"><text:s text:c="10"/></text:span><text:span text:style-name="T58">offsetsToCommit.put(partition, new OffsetAndMetadata(offset + 1));</text:span></text:p>
              </text:list-item>
              <text:list-item>
                <text:p text:style-name="P38"><text:span text:style-name="T58"><text:s text:c="6"/></text:span><text:span text:style-name="T58">}</text:span></text:p>
              </text:list-item>
              <text:list-item>
                <text:p text:style-name="P38"><text:span text:style-name="T59"><text:s text:c="6"/></text:span><text:span text:style-name="T59">// Commit Offset for consumer associated with the commit of the transaction</text:span></text:p>
              </text:list-item>
              <text:list-item>
                <text:p text:style-name="P38"><text:span text:style-name="T61"><text:s text:c="6"/></text:span><text:span text:style-name="T60">producer.sendOffsetsToTransaction(offsetsToCommit, CONSUMER_GROUP_ID);</text:span></text:p>
              </text:list-item>
              <text:list-item>
                <text:p text:style-name="P38"><text:span text:style-name="T60"><text:s text:c="6"/></text:span><text:span text:style-name="T60">producer.commitTransaction();</text:span></text:p>
              </text:list-item>
              <text:list-item>
                <text:p text:style-name="P38"><text:span text:style-name="T58"/></text:p>
              </text:list-item>
              <text:list-item>
                <text:p text:style-name="P38"><text:span text:style-name="T58">}</text:span></text:p>
              </text:list-item>
            </text:list>
          </draw:text-box>
        </draw:frame>
        <presentation:notes draw:style-name="dp7">
          <draw:page-thumbnail draw:style-name="gr2" draw:layer="layout" svg:width="15.597cm" svg:height="10.985cm" svg:x="2.623cm" svg:y="2.258cm" draw:page-number="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draw:frame presentation:style-name="pr38" draw:layer="layout" svg:width="23.499cm" svg:height="3.575cm" svg:x="3.033cm" svg:y="2.367cm" presentation:class="title">
          <draw:text-box>
            <text:p>Autres API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43">Kafka</text:span> propose 2 autres APIs :</text:p>
                <text:list>
                  <text:list-item>
                    <text:p><text:span text:style-name="T41">Admin API</text:span> : Client d’administration permettant de gérer et inspecter les topics, brokers, configurations et ACLs</text:p>
                  </text:list-item>
                  <text:list-item>
                    <text:p><text:span text:style-name="T41">Connect</text:span> <text:span text:style-name="T41">API</text:span> : Permettant l’intégration à d’autres systèmes BD, ElasticSearch, etc</text:p>
                  </text:list-item>
                  <text:list-item>
                    <text:p><text:span text:style-name="T62">Streams API</text:span><text:span text:style-name="T63">1</text:span> : Notre sujet !</text:p>
                  </text:list-item>
                </text:list>
              </text:list-item>
            </text:list>
          </draw:text-box>
        </draw:frame>
        <draw:frame draw:style-name="gr9" draw:text-style-name="P33" draw:layer="layout" svg:width="16.572cm" svg:height="1.859cm" svg:x="1.454cm" svg:y="18.441cm">
          <draw:text-box>
            <text:p><text:span text:style-name="T64">1. Équivalent Python : Faust, .NET : Streamiz</text:span></text:p>
          </draw:text-box>
        </draw:frame>
        <draw:frame draw:style-name="gr10" draw:text-style-name="P41" draw:layer="layout" svg:width="20.238cm" svg:height="1.216cm" svg:x="1.604cm" svg:y="19.4cm">
          <draw:text-box>
            <text:p><text:span text:style-name="T65">Atelier 0 : Démarrage Cluster et production de messages</text:span></text:p>
          </draw:text-box>
        </draw:frame>
        <presentation:notes draw:style-name="dp7">
          <draw:page-thumbnail draw:style-name="gr2" draw:layer="layout" svg:width="15.597cm" svg:height="10.985cm" svg:x="2.623cm" svg:y="2.258cm" draw:page-number="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7" draw:style-name="dp5" draw:master-page-name="Vide_5f__5f__5f_">
        <draw:frame draw:name="Titre 123" presentation:style-name="pr47" draw:text-style-name="P12" draw:layer="layout" svg:width="23.499cm" svg:height="3.506cm" svg:x="3.033cm" svg:y="2.402cm" presentation:class="title" presentation:user-transformed="true">
          <draw:text-box>
            <text:p text:style-name="P11"><text:span text:style-name="T9">KafkaStream</text:span></text:p>
          </draw:text-box>
        </draw:frame>
        <draw:frame draw:name="Sous-titre 14" presentation:style-name="pr48" draw:text-style-name="P14" draw:layer="layout" svg:width="23.499cm" svg:height="12.18cm" svg:x="3.033cm" svg:y="6.283cm" presentation:class="subtitle" presentation:user-transformed="true">
          <draw:text-box>
            <text:p text:style-name="P13"><text:span text:style-name="T10"/></text:p>
            <text:p text:style-name="P13"><text:span text:style-name="T10"/></text:p>
            <text:p text:style-name="P26"><text:span text:style-name="T22">Concepts</text:span></text:p>
            <text:p text:style-name="P26"><text:span text:style-name="T66">Démarrage</text:span></text:p>
            <text:p text:style-name="P26"><text:span text:style-name="T66">Configuration</text:span></text:p>
            <text:p text:style-name="P26"><text:span text:style-name="T66">Opérateurs stateless</text:span></text:p>
            <text:p text:style-name="P26"><text:span text:style-name="T66">Opérateurs stateful</text:span></text:p>
            <text:p text:style-name="P26"><text:span text:style-name="T66">Requêtes interactives</text:span></text:p>
          </draw:text-box>
        </draw:frame>
        <presentation:notes draw:style-name="dp6">
          <draw:custom-shape draw:name="Forme libre 14" draw:style-name="gr11" draw:text-style-name="P15" draw:layer="layout" svg:width="15.751cm" svg:height="11.138cm" svg:x="2.624cm" svg:y="2.227cm">
            <text:p/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frame draw:name="Espace réservé des notes 124" presentation:style-name="pr49" draw:text-style-name="P16" draw:layer="layout" svg:width="14.367cm" svg:height="11.259cm" svg:x="3.249cm" svg:y="14.129cm" presentation:class="notes" presentation:placeholder="true" presentation:user-transformed="true">
            <draw:text-box/>
          </draw:frame>
        </presentation:notes>
      </draw:page>
      <draw:page draw:name="Kafka Streams" draw:style-name="dp5" draw:master-page-name="Vide">
        <draw:frame draw:name="Titre 180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Kafka Streams</text:span></text:p>
          </draw:text-box>
        </draw:frame>
        <draw:frame draw:name="Espace réservé du texte 161" presentation:style-name="pr13" draw:text-style-name="P21" draw:layer="layout" svg:width="23.499cm" svg:height="7.881cm" svg:x="3.033cm" svg:y="6.283cm" presentation:class="outline" presentation:user-transformed="true">
          <draw:text-box>
            <text:p text:style-name="P18"><text:span text:style-name="T67">Kafka Streams API </text:span><text:span text:style-name="T28">est une bibliothèque cliente pour la création d'applications, où les données d'entrée et de sortie sont stockées dans des topics Kafka</text:span></text:p>
            <text:p text:style-name="P18"><text:span text:style-name="T28">Une seule dépendance :</text:span><text:span text:style-name="T28"><text:line-break/></text:span><text:span text:style-name="T68">org.apache.kafka: kafka-streams</text:span></text:p>
            <text:p text:style-name="P18"><text:span text:style-name="T28">+ Eventuellement des sérialiseurs spécialisés</text:span></text:p>
          </draw:text-box>
        </draw:frame>
        <draw:frame draw:name="Image 33" draw:style-name="gr6" draw:text-style-name="P25" draw:layer="layout" svg:width="20.379cm" svg:height="7.144cm" svg:x="4.498cm" svg:y="13.512cm">
          <draw:image xlink:href="Pictures/10000001000007100000027A070F0685.png" xlink:type="simple" xlink:show="embed" xlink:actuate="onLoad" draw:mime-type="image/png">
            <text:p/>
          </draw:image>
        </draw:frame>
        <presentation:notes draw:style-name="dp6">
          <draw:page-thumbnail draw:name="Espace réservé de l'image des diapositives 163" draw:style-name="gr2" draw:layer="layout" svg:width="15.597cm" svg:height="10.984cm" svg:x="2.623cm" svg:y="2.258cm" draw:page-number="38" presentation:class="page"/>
          <draw:frame draw:name="Espace réservé des notes 181" presentation:style-name="pr50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Application KafkaStream" draw:style-name="dp5" draw:master-page-name="Vide">
        <draw:frame draw:name="Titre 183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Application KafkaStream</text:span></text:p>
          </draw:text-box>
        </draw:frame>
        <draw:frame draw:name="Espace réservé du texte 164" presentation:style-name="pr11" draw:text-style-name="P21" draw:layer="layout" svg:width="23.499cm" svg:height="12.18cm" svg:x="3.033cm" svg:y="6.379cm" presentation:class="outline" presentation:user-transformed="true">
          <draw:text-box>
            <text:p text:style-name="P18"><text:span text:style-name="T10">Une application KafkaStream défini sa logique de traitement à travers une ou plusieurs </text:span><text:span text:style-name="T36">topologies de processeurs</text:span><text:span text:style-name="T10">, i.e. un graphe de processeurs de flux connectés</text:span></text:p>
            <text:p text:style-name="P18"><text:span text:style-name="T10">Un processeur représente une étape de traitement qui prend en entrée un évènement, le transforme puis produit un ou plusieurs événement</text:span></text:p>
            <text:p text:style-name="P18"><text:span text:style-name="T10">Certains processeurs :</text:span></text:p>
            <text:list text:style-name="L5">
              <text:list-item>
                <text:list>
                  <text:list-item>
                    <text:p text:style-name="P19"><text:span text:style-name="T10">n’ont pas de connexions entrantes : </text:span><text:span text:style-name="T26">Source</text:span></text:p>
                  </text:list-item>
                  <text:list-item>
                    <text:p text:style-name="P19"><text:span text:style-name="T10">d’autres n’ont pas de connexions sortantes : </text:span><text:span text:style-name="T26">Sink</text:span></text:p>
                  </text:list-item>
                  <text:list-item>
                    <text:p text:style-name="P19"><text:span text:style-name="T10">Les autres ont des connexions entrantes et sortantes </text:span></text:p>
                  </text:list-item>
                </text:list>
              </text:list-item>
            </text:list>
            <text:p text:style-name="P20"><text:span text:style-name="T10">La topologie peut être spécifiée programmatiquement ou par un DSL offrant les opérateurs classiques (filter, map, join, …)</text:span></text:p>
          </draw:text-box>
        </draw:frame>
        <presentation:notes draw:style-name="dp6">
          <draw:page-thumbnail draw:name="Espace réservé de l'image des diapositives 166" draw:style-name="gr2" draw:layer="layout" svg:width="15.535cm" svg:height="10.984cm" svg:x="2.655cm" svg:y="2.258cm" draw:page-number="39" presentation:class="page"/>
          <draw:frame draw:name="Espace réservé des notes 184" presentation:style-name="pr51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Topologie processeurs" draw:style-name="dp5" draw:master-page-name="Vide">
        <draw:frame draw:name="Titre 184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Topologie processeurs</text:span></text:p>
          </draw:text-box>
        </draw:frame>
        <draw:frame draw:name="Espace réservé du texte 165" presentation:style-name="pr52" draw:text-style-name="P24" draw:layer="layout" svg:width="23.499cm" svg:height="12.18cm" svg:x="3.033cm" svg:y="6.283cm" presentation:class="outline" presentation:placeholder="true" presentation:user-transformed="true">
          <draw:text-box/>
        </draw:frame>
        <draw:frame draw:name="Image 36" draw:style-name="gr6" draw:text-style-name="P25" draw:layer="layout" svg:width="11.716cm" svg:height="14.007cm" svg:x="8.283cm" svg:y="6.283cm">
          <draw:image xlink:href="Pictures/10000000000004380000050B61909730.png" xlink:type="simple" xlink:show="embed" xlink:actuate="onLoad" draw:mime-type="image/png">
            <text:p/>
          </draw:image>
        </draw:frame>
        <presentation:notes draw:style-name="dp6">
          <draw:page-thumbnail draw:name="Espace réservé de l'image des diapositives 167" draw:style-name="gr2" draw:layer="layout" svg:width="15.597cm" svg:height="10.984cm" svg:x="2.623cm" svg:y="2.258cm" draw:page-number="40" presentation:class="page"/>
          <draw:frame draw:name="Espace réservé des notes 185" presentation:style-name="pr53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Apports de KafkaStream" draw:style-name="dp5" draw:master-page-name="Vide">
        <draw:frame draw:name="Titre 181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Apports de </text:span><text:span text:style-name="T69">KafkaStream</text:span></text:p>
          </draw:text-box>
        </draw:frame>
        <draw:frame draw:name="Espace réservé du texte 162" presentation:style-name="pr11" draw:text-style-name="P21" draw:layer="layout" svg:width="23.499cm" svg:height="12.18cm" svg:x="3.033cm" svg:y="6.283cm" presentation:class="outline" presentation:user-transformed="true">
          <draw:text-box>
            <text:list text:style-name="L10">
              <text:list-item>
                <text:p text:style-name="P42"><text:span text:style-name="T10">Abstractions </text:span><text:span text:style-name="T13">KStream</text:span><text:span text:style-name="T10"> et </text:span><text:span text:style-name="T13">KTable</text:span><text:span text:style-name="T10"> permettant la transformation de flux d’évènements, des jointures entre fluix, des agrégations et des requêtes</text:span></text:p>
              </text:list-item>
              <text:list-item>
                <text:p text:style-name="P42"><text:span text:style-name="T10">Peut garantir que chaque évènement soit traité une et une seule fois, même en cas de défaillance. </text:span><text:span text:style-name="T10"><text:line-break/></text:span><text:span text:style-name="T10">(Par défaut, configuration </text:span><text:span text:style-name="T14">At Least Once</text:span><text:span text:style-name="T10">)</text:span></text:p>
              </text:list-item>
              <text:list-item>
                <text:p text:style-name="P42"><text:span text:style-name="T10">Temps de latence des traitements en millisecondes, modèle énormément scalable</text:span></text:p>
              </text:list-item>
              <text:list-item>
                <text:p text:style-name="P42"><text:span text:style-name="T10">Un ensemble d’opérateurs stateless ou stateful permettant de filtrer, transformer les messages</text:span></text:p>
              </text:list-item>
              <text:list-item>
                <text:p text:style-name="P42"><text:span text:style-name="T10">Supporte des opérations de fenêtrage temporel avec l'arrivée des événements dans le désordre.</text:span></text:p>
              </text:list-item>
            </text:list>
            <text:p text:style-name="P42"><text:span text:style-name="T10"/></text:p>
          </draw:text-box>
        </draw:frame>
        <presentation:notes draw:style-name="dp6">
          <draw:page-thumbnail draw:name="Espace réservé de l'image des diapositives 164" draw:style-name="gr2" draw:layer="layout" svg:width="15.535cm" svg:height="10.984cm" svg:x="2.655cm" svg:y="2.258cm" draw:page-number="41" presentation:class="page"/>
          <draw:frame draw:name="Espace réservé des notes 182" presentation:style-name="pr54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Définitions" draw:style-name="dp5" draw:master-page-name="Vide">
        <draw:frame draw:name="Titre 182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Définitions</text:span></text:p>
          </draw:text-box>
        </draw:frame>
        <draw:frame draw:name="Espace réservé du texte 163" presentation:style-name="pr11" draw:text-style-name="P21" draw:layer="layout" svg:width="23.499cm" svg:height="12.18cm" svg:x="3.033cm" svg:y="6.315cm" presentation:class="outline" presentation:user-transformed="true">
          <draw:text-box>
            <text:p text:style-name="P18"><text:span text:style-name="T10">Un </text:span><text:span text:style-name="T27">KStream</text:span><text:span text:style-name="T10"> est une abstraction représentant un ensemble de données illimité, c’est à dire infini et sans cesse croissant car de nouveaux enregistrements continuent d'arriver</text:span></text:p>
            <text:p text:style-name="P18"><text:span text:style-name="T10">Les caractéristiques de ce flux :</text:span></text:p>
            <text:list text:style-name="L5">
              <text:list-item>
                <text:list>
                  <text:list-item>
                    <text:list>
                      <text:list-item>
                        <text:p><text:span text:style-name="T10">Les événements sont partitionnés </text:span></text:p>
                      </text:list-item>
                      <text:list-item>
                        <text:p><text:span text:style-name="T10">A l’intérieur d’une partition, les évènement sont ordonnés</text:span></text:p>
                      </text:list-item>
                      <text:list-item>
                        <text:p><text:span text:style-name="T10">Les événements sont immuables et ont un horodatage</text:span></text:p>
                      </text:list-item>
                    </text:list>
                  </text:list-item>
                </text:list>
              </text:list-item>
            </text:list>
            <text:p><text:span text:style-name="T10">Si il est persisté, il correspond à un topic Kafka partitionné avec une stratégie d’archivage </text:span><text:span text:style-name="T14">delete</text:span></text:p>
            <text:p text:style-name="P20"><text:span text:style-name="T10"/></text:p>
          </draw:text-box>
        </draw:frame>
        <presentation:notes draw:style-name="dp6">
          <draw:page-thumbnail draw:name="Espace réservé de l'image des diapositives 165" draw:style-name="gr2" draw:layer="layout" svg:width="15.535cm" svg:height="10.984cm" svg:x="2.655cm" svg:y="2.258cm" draw:page-number="42" presentation:class="page"/>
          <draw:frame draw:name="Espace réservé des notes 183" presentation:style-name="pr55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KStream et KTable" draw:style-name="dp5" draw:master-page-name="Vide">
        <draw:frame draw:name="Titre 185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KStream et KTable</text:span></text:p>
          </draw:text-box>
        </draw:frame>
        <draw:frame draw:name="Espace réservé du texte 166" presentation:style-name="pr11" draw:text-style-name="P21" draw:layer="layout" svg:width="23.499cm" svg:height="6.545cm" svg:x="3.033cm" svg:y="6.765cm" presentation:class="outline" presentation:user-transformed="true">
          <draw:text-box>
            <text:p text:style-name="P18"><text:span text:style-name="T10"><text:s/></text:span><text:span text:style-name="T14">KafkaStream</text:span><text:span text:style-name="T10"> fournit également l’abstraction </text:span><text:span text:style-name="T26">KTable</text:span><text:span text:style-name="T10"> qui représente un ensemble de faits qui évoluent.</text:span></text:p>
            <text:p text:style-name="P18"><text:span text:style-name="T10">L’arrivée d’une valeur avec une clé connue met à jour la valeur précédente.</text:span></text:p>
            <text:p text:style-name="P18"><text:span text:style-name="T10">Cela peut être vu comme une table d’une base de données ou il n’existe qu’une valeur pour une clé donné.</text:span></text:p>
            <text:p text:style-name="P18"><text:span text:style-name="T10">Cela correspond à un topic Kafka avec un archivage compact</text:span></text:p>
            <text:p text:style-name="P18"><text:span text:style-name="T10"/></text:p>
            <text:p text:style-name="P18"><text:span text:style-name="T10"/></text:p>
            <text:p text:style-name="P18"><text:span text:style-name="T10"/></text:p>
          </draw:text-box>
        </draw:frame>
        <draw:frame draw:name="Picture 2" draw:style-name="gr6" draw:text-style-name="P25" draw:layer="layout" svg:width="7.407cm" svg:height="5.767cm" svg:x="10.26cm" svg:y="14.523cm">
          <draw:image xlink:href="Pictures/1000000100000118000000DAD03F2387.png" xlink:type="simple" xlink:show="embed" xlink:actuate="onLoad" draw:mime-type="image/png">
            <text:p/>
          </draw:image>
          <svg:desc>https://kafka.apache.org/38/images/streams-table-duality-01.png</svg:desc>
        </draw:frame>
        <presentation:notes draw:style-name="dp6">
          <draw:page-thumbnail draw:name="Espace réservé de l'image des diapositives 168" draw:style-name="gr2" draw:layer="layout" svg:width="15.535cm" svg:height="10.984cm" svg:x="2.655cm" svg:y="2.258cm" draw:page-number="43" presentation:class="page"/>
          <draw:frame draw:name="Espace réservé des notes 186" presentation:style-name="pr56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Dualité KStream / KTable" draw:style-name="dp5" draw:master-page-name="Vide">
        <draw:frame draw:name="Titre 186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Dualité KStream / KTable</text:span></text:p>
          </draw:text-box>
        </draw:frame>
        <draw:frame draw:name="Picture 1" draw:style-name="gr6" draw:text-style-name="P25" draw:layer="layout" svg:width="15.837cm" svg:height="13.155cm" svg:x="6.509cm" svg:y="6.589cm">
          <draw:image xlink:href="Pictures/100000010000039F00000302DD05C76F.png" xlink:type="simple" xlink:show="embed" xlink:actuate="onLoad" draw:mime-type="image/png">
            <text:p/>
          </draw:image>
          <svg:desc>https://kafka.apache.org/38/images/streams-table-duality-03.png</svg:desc>
        </draw:frame>
        <presentation:notes draw:style-name="dp6">
          <draw:page-thumbnail draw:name="Espace réservé de l'image des diapositives 169" draw:style-name="gr2" draw:layer="layout" svg:width="15.535cm" svg:height="10.984cm" svg:x="2.655cm" svg:y="2.258cm" draw:page-number="44" presentation:class="page"/>
          <draw:frame draw:name="Espace réservé des notes 187" presentation:style-name="pr57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KGlobalTable" draw:style-name="dp5" draw:master-page-name="Vide">
        <draw:frame draw:name="Titre 188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69">KGlobalTable</text:span></text:p>
          </draw:text-box>
        </draw:frame>
        <draw:frame draw:name="Espace réservé du texte 168" presentation:style-name="pr11" draw:text-style-name="P21" draw:layer="layout" svg:width="23.499cm" svg:height="12.18cm" svg:x="3.033cm" svg:y="6.765cm" presentation:class="outline" presentation:user-transformed="true">
          <draw:text-box>
            <text:p text:style-name="P18"><text:span text:style-name="T70">KGlobalTable</text:span><text:span text:style-name="T10"> représente une table distribuée globale. </text:span></text:p>
            <text:p text:style-name="P18"><text:span text:style-name="T10">Contrairement à une </text:span><text:span text:style-name="T14">KTable</text:span><text:span text:style-name="T10">, qui est partitionnée et contient donc un sous-ensemble des clés des évènements, </text:span><text:span text:style-name="T10"><text:line-break/></text:span><text:span text:style-name="T10">Une </text:span><text:span text:style-name="T14">KGlobalTable</text:span><text:span text:style-name="T10"> contient une copie complète des données.</text:span></text:p>
            <text:p text:style-name="P18"><text:span text:style-name="T10">Elle est accessible par chaque instance de l’application </text:span><text:span text:style-name="T14">KafkaStream</text:span></text:p>
          </draw:text-box>
        </draw:frame>
        <presentation:notes draw:style-name="dp6">
          <draw:page-thumbnail draw:name="Espace réservé de l'image des diapositives 171" draw:style-name="gr2" draw:layer="layout" svg:width="15.535cm" svg:height="10.984cm" svg:x="2.655cm" svg:y="2.258cm" draw:page-number="45" presentation:class="page"/>
          <draw:frame draw:name="Espace réservé des notes 189" presentation:style-name="pr58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Agrégation" draw:style-name="dp5" draw:master-page-name="Vide">
        <draw:frame draw:name="Titre 189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Opérateurs stateless / stateful</text:span></text:p>
          </draw:text-box>
        </draw:frame>
        <draw:frame draw:name="Espace réservé du texte 169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71">KafkaStream propose de nombreux opérateurs permettant de traiter les enregistrements entrants.</text:span></text:p>
            <text:p text:style-name="P18"><text:span text:style-name="T71">Certains sont </text:span><text:span text:style-name="T13">stateless</text:span><text:span text:style-name="T71">, d’autres </text:span><text:span text:style-name="T13">stateful</text:span><text:span text:style-name="T71">.</text:span></text:p>
            <text:list text:style-name="L4">
              <text:list-item>
                <text:list>
                  <text:list-item>
                    <text:p><text:span text:style-name="T71">Exemple stateless : filter, map, …</text:span></text:p>
                  </text:list-item>
                  <text:list-item>
                    <text:p><text:span text:style-name="T71">Exemple stateful : Agrégation, Jointure</text:span></text:p>
                  </text:list-item>
                </text:list>
              </text:list-item>
            </text:list>
            <text:p text:style-name="P18"><text:span text:style-name="T71"/></text:p>
            <text:p text:style-name="P18"><text:span text:style-name="T71">Les opérateurs stateful doivent maintenir un état stocké dans un </text:span><text:span text:style-name="T13">StateStore</text:span></text:p>
            <text:list text:continue-numbering="true" text:style-name="L4">
              <text:list-item>
                <text:list>
                  <text:list-item>
                    <text:p><text:span text:style-name="T10">On peut interroger ces états via des </text:span><text:span text:style-name="T14">interactive queries</text:span><text:span text:style-name="T10"> </text:span></text:p>
                  </text:list-item>
                  <text:list-item>
                    <text:p><text:span text:style-name="T10">Les state store sont généralement partitionnés</text:span></text:p>
                  </text:list-item>
                </text:list>
              </text:list-item>
            </text:list>
            <text:p text:style-name="P18"><text:span text:style-name="T71"/></text:p>
            <text:list text:style-name="L5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presentation:notes draw:style-name="dp6">
          <draw:page-thumbnail draw:name="Espace réservé de l'image des diapositives 172" draw:style-name="gr2" draw:layer="layout" svg:width="15.535cm" svg:height="10.984cm" svg:x="2.655cm" svg:y="2.258cm" draw:page-number="46" presentation:class="page"/>
          <draw:frame draw:name="Espace réservé des notes 190" presentation:style-name="pr59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Tâches et partitions" draw:style-name="dp5" draw:master-page-name="Vide">
        <draw:frame draw:name="Titre 191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Tâches et partitions</text:span></text:p>
          </draw:text-box>
        </draw:frame>
        <draw:frame draw:name="Espace réservé du texte 171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En se basant sur les partitions Kafka et les clés des messages, KafkaStream implémenter le parallélisme via des </text:span><text:span text:style-name="T13">Task</text:span></text:p>
            <text:p text:style-name="P18"><text:span text:style-name="T10"/></text:p>
            <text:p text:style-name="P20"><text:span text:style-name="T10">Les tâches permettent la scalabilité. </text:span></text:p>
            <text:list text:style-name="L11">
              <text:list-item>
                <text:list>
                  <text:list-item>
                    <text:p text:style-name="P43"><text:span text:style-name="T72">KafkaStream</text:span><text:span text:style-name="T73"> crée un nombre fixe de tâches en fonction des partitions du flux d'entrée</text:span></text:p>
                  </text:list-item>
                  <text:list-item>
                    <text:p text:style-name="P43"><text:span text:style-name="T73">Chaque tâche est affectée à une liste de partitions. </text:span><text:span text:style-name="T73"><text:line-break/></text:span><text:span text:style-name="T73">L'affectation ne change que lorsqu’une instance de l’application disparaît ou apparaît</text:span></text:p>
                  </text:list-item>
                  <text:list-item>
                    <text:p text:style-name="P43"><text:span text:style-name="T73">Les taches instancient leur propre topologie de processeurs et <text:s/>ont leur propre StateStore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name="Espace réservé de l'image des diapositives 174" draw:style-name="gr2" draw:layer="layout" svg:width="15.535cm" svg:height="10.984cm" svg:x="2.655cm" svg:y="2.258cm" draw:page-number="47" presentation:class="page"/>
          <draw:frame draw:name="Espace réservé des notes 192" presentation:style-name="pr60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Modèle de threads" draw:style-name="dp5" draw:master-page-name="Vide">
        <draw:frame draw:name="Titre 193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Modèle de threads</text:span></text:p>
          </draw:text-box>
        </draw:frame>
        <draw:frame draw:name="Espace réservé du texte 173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4">KafkaStream</text:span><text:span text:style-name="T10"> permet de configurer le nombre de threads utilisées pour paralléliser le traitement au sein d'une instance d'application.</text:span></text:p>
            <text:list text:style-name="L4">
              <text:list-item>
                <text:list>
                  <text:list-item>
                    <text:p><text:span text:style-name="T10">Chaque thread peut exécuter une ou plusieurs tâches avec leurs topologies de processeur de manière indépendante.</text:span></text:p>
                  </text:list-item>
                </text:list>
              </text:list-item>
            </text:list>
            <text:p text:style-name="P18"><text:span text:style-name="T10"/></text:p>
            <text:p text:style-name="P18"><text:span text:style-name="T10">=&gt; Le scaling horizontal consiste donc à augmenter le nombre de threads.</text:span></text:p>
            <text:p text:style-name="P18"><text:span text:style-name="T10">=&gt; Le scaling vertical consiste à démarrer plusieurs fois la même instance.</text:span></text:p>
            <text:p text:style-name="P18"><text:span text:style-name="T10">Dans les 2 cas, Kafka Streams se charge de distribuer les partitions entre les tâches qui s'exécutent dans les instances de l'application. </text:span></text:p>
            <text:p text:style-name="P18"><text:span text:style-name="T10"/></text:p>
          </draw:text-box>
        </draw:frame>
        <presentation:notes draw:style-name="dp6">
          <draw:page-thumbnail draw:name="Espace réservé de l'image des diapositives 176" draw:style-name="gr2" draw:layer="layout" svg:width="15.535cm" svg:height="10.984cm" svg:x="2.655cm" svg:y="2.258cm" draw:page-number="48" presentation:class="page"/>
          <draw:frame draw:name="Espace réservé des notes 194" presentation:style-name="pr61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Architecture et scalabilité" draw:style-name="dp5" draw:master-page-name="Vide">
        <draw:frame draw:name="Titre 192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Architecture et scalabilité</text:span></text:p>
          </draw:text-box>
        </draw:frame>
        <draw:frame draw:name="Espace réservé du texte 172" presentation:style-name="pr62" draw:text-style-name="P24" draw:layer="layout" svg:width="23.499cm" svg:height="12.18cm" svg:x="3.033cm" svg:y="6.283cm" presentation:class="outline" presentation:placeholder="true" presentation:user-transformed="true">
          <draw:text-box/>
        </draw:frame>
        <draw:frame draw:name="Image 35" draw:style-name="gr6" draw:text-style-name="P25" draw:layer="layout" svg:width="16.798cm" svg:height="13.71cm" svg:x="6.4cm" svg:y="6.69cm">
          <draw:image xlink:href="Pictures/100000000000075A0000060065113F76.png" xlink:type="simple" xlink:show="embed" xlink:actuate="onLoad" draw:mime-type="image/png">
            <text:p/>
          </draw:image>
        </draw:frame>
        <presentation:notes draw:style-name="dp6">
          <draw:page-thumbnail draw:name="Espace réservé de l'image des diapositives 175" draw:style-name="gr2" draw:layer="layout" svg:width="15.597cm" svg:height="10.984cm" svg:x="2.623cm" svg:y="2.258cm" draw:page-number="49" presentation:class="page"/>
          <draw:frame draw:name="Espace réservé des notes 193" presentation:style-name="pr63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50" draw:style-name="dp5" draw:master-page-name="Vide">
        <draw:frame draw:name="Titre 14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Tolérance aux pannes</text:span></text:p>
          </draw:text-box>
        </draw:frame>
        <draw:frame draw:name="Espace réservé du texte 11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Chaque tâche maintient son propre </text:span><text:span text:style-name="T14">LocalStore</text:span><text:span text:style-name="T10">.</text:span></text:p>
            <text:p text:style-name="P18"><text:span text:style-name="T10">Pour garantir la tolérance aux pannes, </text:span><text:span text:style-name="T14">KafkaStream</text:span><text:span text:style-name="T10"> crée un topic en mode compact qui contient les dernières valeurs du Store </text:span></text:p>
            <text:p text:style-name="P18"><text:span text:style-name="T10">Lors d’une réaffectation de tâches, la nouvel instance doit reconstruire l’état du </text:span><text:span text:style-name="T14">LocalStore</text:span><text:span text:style-name="T10"> </text:span></text:p>
            <text:p text:style-name="P18"><text:span text:style-name="T10"><text:s/></text:span><text:span text:style-name="T10">Pour minimiser le coût de la restauration, il est possible de répliquer les Local Store sur différentes instances, (</text:span><text:span text:style-name="T14">num.standby.replica</text:span><text:span text:style-name="T10">) . </text:span></text:p>
          </draw:text-box>
        </draw:frame>
        <presentation:notes draw:style-name="dp6">
          <draw:page-thumbnail draw:name="Espace réservé de l'image des diapositives 9" draw:style-name="gr2" draw:layer="layout" svg:width="15.535cm" svg:height="10.984cm" svg:x="2.655cm" svg:y="2.258cm" draw:page-number="50" presentation:class="page"/>
          <draw:frame draw:name="Espace réservé des notes 16" presentation:style-name="pr64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51" draw:style-name="dp5" draw:master-page-name="Vide_5f__5f_">
        <draw:frame draw:name="Titre 46" presentation:style-name="pr65" draw:text-style-name="P12" draw:layer="layout" svg:width="23.499cm" svg:height="3.506cm" svg:x="3.033cm" svg:y="2.402cm" presentation:class="title" presentation:user-transformed="true">
          <draw:text-box>
            <text:p text:style-name="P11"><text:span text:style-name="T9">KafkaStream</text:span></text:p>
          </draw:text-box>
        </draw:frame>
        <draw:frame draw:name="Sous-titre 7" presentation:style-name="pr66" draw:text-style-name="P14" draw:layer="layout" svg:width="23.499cm" svg:height="12.18cm" svg:x="3.033cm" svg:y="6.283cm" presentation:class="subtitle" presentation:user-transformed="true">
          <draw:text-box>
            <text:p text:style-name="P13"><text:span text:style-name="T10"/></text:p>
            <text:p text:style-name="P13"><text:span text:style-name="T10"/></text:p>
            <text:p text:style-name="P13"><text:span text:style-name="T10">Concepts</text:span></text:p>
            <text:p text:style-name="P26"><text:span text:style-name="T22">Démarrage</text:span></text:p>
            <text:p text:style-name="P26"><text:span text:style-name="T66">Configuration</text:span></text:p>
            <text:p text:style-name="P26"><text:span text:style-name="T66">Opérateurs stateless</text:span></text:p>
            <text:p text:style-name="P26"><text:span text:style-name="T66">Opérateurs stateful</text:span></text:p>
            <text:p text:style-name="P44"><text:span text:style-name="T66">Requêtes interactives</text:span></text:p>
          </draw:text-box>
        </draw:frame>
        <presentation:notes draw:style-name="dp6">
          <draw:custom-shape draw:name="Forme libre 7" draw:style-name="gr11" draw:text-style-name="P15" draw:layer="layout" svg:width="15.751cm" svg:height="11.138cm" svg:x="2.624cm" svg:y="2.227cm">
            <text:p/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frame draw:name="Espace réservé des notes 46" presentation:style-name="pr67" draw:text-style-name="P16" draw:layer="layout" svg:width="14.367cm" svg:height="11.259cm" svg:x="3.249cm" svg:y="14.129cm" presentation:class="notes" presentation:placeholder="true" presentation:user-transformed="true">
            <draw:text-box/>
          </draw:frame>
        </presentation:notes>
      </draw:page>
      <draw:page draw:name="page52" draw:style-name="dp5" draw:master-page-name="Vide_5f_">
        <draw:frame draw:name="Titre 47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Structure d’une application</text:span></text:p>
          </draw:text-box>
        </draw:frame>
        <draw:frame draw:name="Espace réservé du texte 38" presentation:style-name="pr24" draw:text-style-name="P21" draw:layer="layout" svg:width="23.499cm" svg:height="12.18cm" svg:x="3.033cm" svg:y="6.283cm" presentation:class="outline" presentation:user-transformed="true">
          <draw:text-box>
            <text:list text:style-name="L4">
              <text:list-item>
                <text:p text:style-name="P20"><text:span text:style-name="T10">Typiquement, une application KafkaStream :</text:span></text:p>
                <text:list>
                  <text:list-item>
                    <text:p><text:span text:style-name="T73">Positionne les valeurs de configuration via une classe </text:span><text:span text:style-name="T72">Properties</text:span><text:span text:style-name="T73"> (</text:span><text:span text:style-name="T72">bootstrap-servers, Serdes, ApplicationId</text:span><text:span text:style-name="T73">)</text:span></text:p>
                  </text:list-item>
                  <text:list-item>
                    <text:p><text:span text:style-name="T73">Construit</text:span><text:span text:style-name="T74"> </text:span><text:span text:style-name="T73">une</text:span><text:span text:style-name="T74"> </text:span><text:span text:style-name="T73">topologie</text:span><text:span text:style-name="T74"> </text:span><text:span text:style-name="T73">à</text:span><text:span text:style-name="T74"> </text:span><text:span text:style-name="T73">l’aide</text:span><text:span text:style-name="T74"> de </text:span><text:span text:style-name="T75">StreamsBuilder</text:span></text:p>
                  </text:list-item>
                  <text:list-item>
                    <text:p><text:span text:style-name="T73">Instancie un </text:span><text:span text:style-name="T76">KafkaStreams</text:span><text:span text:style-name="T73"> à partir de la topologie et des propriétés</text:span></text:p>
                  </text:list-item>
                  <text:list-item>
                    <text:p><text:span text:style-name="T77">Implémente un moyen d’arrêter l’application proprement puis démarre le </text:span><text:span text:style-name="T78">KafkaStreams</text:span><text:span text:style-name="T77"> 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name="Espace réservé de l'image des diapositives 40" draw:style-name="gr2" draw:layer="layout" svg:width="15.535cm" svg:height="10.984cm" svg:x="2.655cm" svg:y="2.258cm" draw:page-number="52" presentation:class="page"/>
          <draw:frame draw:name="Espace réservé des notes 47" presentation:style-name="pr68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Standard" presentation:presentation-page-layout-name="AL1T1">
        <draw:frame presentation:style-name="pr38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46" draw:layer="layout" svg:width="23.499cm" svg:height="12.18cm" svg:x="3.033cm" svg:y="6.283cm" presentation:class="outline" presentation:user-transformed="true">
          <draw:text-box>
            <text:p text:style-name="P45"><text:span text:style-name="T79">// Propriétés : ID, BOOTSTRAP, Serialiseur/Désérialiseur <text:s text:c="7"/></text:span></text:p>
            <text:p text:style-name="P45"><text:span text:style-name="T80">Properties props = new Properties();</text:span></text:p>
            <text:p text:style-name="P45"><text:span text:style-name="T80">props.put(StreamsConfig.APPLICATION_ID_CONFIG, "streams-pipe");</text:span></text:p>
            <text:p text:style-name="P45"><text:span text:style-name="T80">props.put(StreamsConfig.BOOTSTRAP_SERVERS_CONFIG, "localhost:9092");</text:span></text:p>
            <text:p text:style-name="P45"><text:span text:style-name="T80">props.put(StreamsConfig.DEFAULT_KEY_SERDE_CLASS_CONFIG, Serdes.String().getClass());</text:span></text:p>
            <text:p text:style-name="P45"><text:span text:style-name="T80">props.put(StreamsConfig.DEFAULT_VALUE_SERDE_CLASS_CONFIG, Serdes.String().getClass());</text:span></text:p>
            <text:p text:style-name="P45"><text:span text:style-name="T81"/></text:p>
            <text:p text:style-name="P45"><text:span text:style-name="T79">// Création d’une topolgie de processeurs </text:span></text:p>
            <text:p text:style-name="P45"><text:span text:style-name="T82">final StreamsBuilder builder = new StreamsBuilder();</text:span></text:p>
            <text:p text:style-name="P45"><text:span text:style-name="T83">builder.&lt;String, String&gt;stream("streams-plaintext-input")</text:span></text:p>
            <text:p text:style-name="P45"><text:span text:style-name="T82"><text:s text:c="7"/></text:span><text:span text:style-name="T82">.flatMapValues(value -&gt; Arrays.asList(value.split("\\W+")))</text:span></text:p>
            <text:p text:style-name="P45"><text:span text:style-name="T82"><text:s text:c="7"/></text:span><text:span text:style-name="T82">.to("streams-linesplit-output");</text:span><text:span text:style-name="T82"><text:line-break/></text:span><text:span text:style-name="T82"/></text:p>
            <text:p text:style-name="P45"><text:span text:style-name="T82">final Topology topology = builder.build();</text:span></text:p>
            <text:p text:style-name="P45"><text:span text:style-name="T84"/></text:p>
            <text:p text:style-name="P45"><text:span text:style-name="T79">// Instanciation du Stream à partir d’une topologie et des propriétés</text:span></text:p>
            <text:p text:style-name="P45"><text:span text:style-name="T82">final KafkaStreams streams = new KafkaStreams(topology, props);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5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1T1">
        <draw:frame presentation:style-name="pr38" draw:layer="layout" svg:width="23.499cm" svg:height="3.575cm" svg:x="3.033cm" svg:y="2.367cm" presentation:class="title">
          <draw:text-box>
            <text:p>Exemple (2)</text:p>
          </draw:text-box>
        </draw:frame>
        <draw:frame presentation:style-name="pr6" draw:text-style-name="P48" draw:layer="layout" svg:width="23.499cm" svg:height="12.18cm" svg:x="3.033cm" svg:y="6.283cm" presentation:class="outline">
          <draw:text-box>
            <text:p text:style-name="P47"><text:span text:style-name="T85"><text:s text:c="8"/></text:span><text:span text:style-name="T86">final</text:span><text:span text:style-name="T87"> CountDownLatch latch = </text:span><text:span text:style-name="T86">new</text:span><text:span text:style-name="T87"> CountDownLatch(1);</text:span></text:p>
            <text:p text:style-name="P47"><text:span text:style-name="T88"/></text:p>
            <text:p text:style-name="P47"><text:span text:style-name="T89"><text:s text:c="8"/></text:span><text:span text:style-name="T89">// attach shutdown handler to catch control-c</text:span></text:p>
            <text:p text:style-name="P47"><text:span text:style-name="T87"><text:s text:c="8"/></text:span><text:span text:style-name="T87">Runtime.getRuntime().addShutdownHook(</text:span><text:span text:style-name="T86">new</text:span><text:span text:style-name="T87"> Thread("streams-shutdown-hook") {</text:span></text:p>
            <text:p text:style-name="P47"><text:span text:style-name="T87"><text:s text:c="12"/></text:span><text:span text:style-name="T87">@Override</text:span></text:p>
            <text:p text:style-name="P47"><text:span text:style-name="T87"><text:s text:c="12"/></text:span><text:span text:style-name="T86">public void</text:span><text:span text:style-name="T87"> run() {</text:span></text:p>
            <text:p text:style-name="P47"><text:span text:style-name="T87"><text:s text:c="16"/></text:span><text:span text:style-name="T87">streams.close();</text:span></text:p>
            <text:p text:style-name="P47"><text:span text:style-name="T87"><text:s text:c="16"/></text:span><text:span text:style-name="T87">latch.countDown();</text:span></text:p>
            <text:p text:style-name="P47"><text:span text:style-name="T87"><text:s text:c="12"/></text:span><text:span text:style-name="T87">}</text:span></text:p>
            <text:p text:style-name="P47"><text:span text:style-name="T87"><text:s text:c="8"/></text:span><text:span text:style-name="T87">});</text:span></text:p>
            <text:p text:style-name="P47"><text:span text:style-name="T88"/></text:p>
            <text:p text:style-name="P47"><text:span text:style-name="T90"><text:s text:c="8"/></text:span><text:span text:style-name="T89">// Démarrage du stream</text:span></text:p>
            <text:p text:style-name="P47"><text:span text:style-name="T87"><text:s text:c="8"/></text:span><text:span text:style-name="T86">try</text:span><text:span text:style-name="T87"> {</text:span></text:p>
            <text:p text:style-name="P47"><text:span text:style-name="T87"><text:s text:c="12"/></text:span><text:span text:style-name="T87">streams.start();</text:span></text:p>
            <text:p text:style-name="P47"><text:span text:style-name="T87"><text:s text:c="12"/></text:span><text:span text:style-name="T87">latch.await();</text:span></text:p>
            <text:p text:style-name="P47"><text:span text:style-name="T87"><text:s text:c="8"/></text:span><text:span text:style-name="T87">} </text:span><text:span text:style-name="T86">catch</text:span><text:span text:style-name="T87"> (Throwable e) {</text:span></text:p>
            <text:p text:style-name="P47"><text:span text:style-name="T87"><text:s text:c="12"/></text:span><text:span text:style-name="T87">System.exit(1);</text:span></text:p>
            <text:p text:style-name="P47"><text:span text:style-name="T87"><text:s text:c="8"/></text:span><text:span text:style-name="T87">}</text:span></text:p>
            <text:p text:style-name="P47"><text:span text:style-name="T87"><text:s text:c="8"/></text:span><text:span text:style-name="T87">System.exit(0);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5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1">
        <draw:frame presentation:style-name="pr38" draw:layer="layout" svg:width="23.499cm" svg:height="3.575cm" svg:x="3.033cm" svg:y="2.367cm" presentation:class="title">
          <draw:text-box>
            <text:p>Serde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applications KafkaStream ont besoin de sérialiser et désérialiser les clé et les valeurs du record</text:p>
              </text:list-item>
              <text:list-item>
                <text:p><text:span text:style-name="T39">Le type </text:span><text:span text:style-name="T40">Serde</text:span> encapsule donc un sérialiseur et un désérialiseur. </text:p>
              </text:list-item>
              <text:list-item>
                <text:p text:style-name="P38"><text:span text:style-name="T91">public interface Serde&lt;T&gt; extends Closeable {</text:span></text:p>
              </text:list-item>
              <text:list-item>
                <text:p text:style-name="P38"><text:span text:style-name="T91"><text:s/></text:span><text:span text:style-name="T91"><text:tab/></text:span><text:span text:style-name="T91">Serializer&lt;T&gt; serializer();</text:span></text:p>
              </text:list-item>
              <text:list-item>
                <text:p text:style-name="P38"><text:span text:style-name="T91"><text:s/></text:span><text:span text:style-name="T91"><text:tab/></text:span><text:span text:style-name="T91">Deserializer&lt;T&gt; deserializer();</text:span></text:p>
              </text:list-item>
              <text:list-item>
                <text:p text:style-name="P38"><text:span text:style-name="T91"><text:s/></text:span><text:span text:style-name="T91">}</text:span></text:p>
              </text:list-item>
              <text:list-item>
                <text:p/>
              </text:list-item>
              <text:list-item>
                <text:p>Les Serde pour la clé peut être différent de celui utilisé pour la valeur.</text:p>
              </text:list-item>
              <text:list-item>
                <text:p>Les Serde à utiliser peuvent être spécifié :</text:p>
                <text:list>
                  <text:list-item>
                    <text:p>En définissant des Serde par défaut </text:p>
                  </text:list-item>
                  <text:list-item>
                    <text:p>En spécifiant explicitement les Serde lors de l'appel des méthodes de l’API.</text:p>
                  </text:list-item>
                </text:list>
              </text:list-item>
              <text:list-item>
                <text:p/>
              </text:list-item>
              <text:list-item>
                <text:p>Durant l’exécution d’une topologie, plusieurs Serdes sont généralement utilisés.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5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1">
        <draw:frame presentation:style-name="pr38" draw:layer="layout" svg:width="23.499cm" svg:height="3.575cm" svg:x="3.033cm" svg:y="2.367cm" presentation:class="title">
          <draw:text-box>
            <text:p>Serde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KafkaStream fourni des Serdes pour les types de base : String, Double, Integer, Long, UUID, byte[], ByteBuffer, Void</text:p>
              </text:list-item>
              <text:list-item>
                <text:p/>
              </text:list-item>
              <text:list-item>
                <text:p>On peut surcharger ou implémenter des propres Serdes</text:p>
                <text:list>
                  <text:list-item>
                    <text:p>Cela demande d’implémenter 3 classes : un sérialiseur, un désérialiseur un Serde</text:p>
                  </text:list-item>
                  <text:list-item>
                    <text:p/>
                  </text:list-item>
                </text:list>
              </text:list-item>
              <text:list-item>
                <text:p>Confluent fournit des Serde pour les formats classiques : Json, Avro, Protobuf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5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1">
        <draw:frame presentation:style-name="pr38" draw:layer="layout" svg:width="23.499cm" svg:height="3.575cm" svg:x="3.033cm" svg:y="2.367cm" presentation:class="title">
          <draw:text-box>
            <text:p>Exemples</text:p>
          </draw:text-box>
        </draw:frame>
        <draw:frame presentation:style-name="pr6" draw:text-style-name="P40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38"><text:span text:style-name="T92">Properties settings = new Properties();</text:span></text:p>
              </text:list-item>
              <text:list-item>
                <text:p text:style-name="P38"><text:span text:style-name="T93">// Serde par défaut pour les clés</text:span></text:p>
              </text:list-item>
              <text:list-item>
                <text:p text:style-name="P38"><text:span text:style-name="T92">settings.put(StreamsConfig.DEFAULT_KEY_SERDE_CLASS_CONFIG, Serdes.String().getClass().getName());</text:span></text:p>
              </text:list-item>
              <text:list-item>
                <text:p text:style-name="P38"><text:span text:style-name="T93">// Serde par défaut pour les valeurs</text:span></text:p>
              </text:list-item>
              <text:list-item>
                <text:p text:style-name="P38"><text:span text:style-name="T92">settings.put(StreamsConfig.DEFAULT_VALUE_SERDE_CLASS_CONFIG, Serdes.Long().getClass().getName());</text:span></text:p>
              </text:list-item>
              <text:list-item>
                <text:p text:style-name="P38"><text:span text:style-name="T92"/></text:p>
              </text:list-item>
              <text:list-item>
                <text:p text:style-name="P38"><text:span text:style-name="T92">---</text:span></text:p>
              </text:list-item>
              <text:list-item>
                <text:p text:style-name="P38"><text:span text:style-name="T93">// Précision du Serde pour la consommation</text:span></text:p>
              </text:list-item>
              <text:list-item>
                <text:p text:style-name="P38"><text:span text:style-name="T92">KStream&lt;String, Coursier&gt; coursierStream = builder.stream(</text:span></text:p>
              </text:list-item>
              <text:list-item>
                <text:p text:style-name="P38"><text:span text:style-name="T92"><text:s text:c="4"/></text:span><text:span text:style-name="T92">"input-topic", </text:span></text:p>
              </text:list-item>
              <text:list-item>
                <text:p text:style-name="P38"><text:span text:style-name="T92"><text:s text:c="4"/></text:span><text:span text:style-name="T94">Consumed.with(Serdes.String(), new CoursierSerde()</text:span><text:span text:style-name="T92">)</text:span></text:p>
              </text:list-item>
              <text:list-item>
                <text:p text:style-name="P38"><text:span text:style-name="T92">);</text:span></text:p>
              </text:list-item>
              <text:list-item>
                <text:p text:style-name="P38"><text:span text:style-name="T92"/></text:p>
              </text:list-item>
              <text:list-item>
                <text:p text:style-name="P38"><text:span text:style-name="T92">---</text:span></text:p>
              </text:list-item>
              <text:list-item>
                <text:p text:style-name="P38"><text:span text:style-name="T93">// Précision pour la production</text:span></text:p>
              </text:list-item>
              <text:list-item>
                <text:p text:style-name="P38"><text:span text:style-name="T92">KStream&lt;String, Long&gt; userCountByRegion = ...;</text:span></text:p>
              </text:list-item>
              <text:list-item>
                <text:p text:style-name="P38"><text:span text:style-name="T92">userCountByRegion.to("RegionCountsTopic", </text:span><text:span text:style-name="T94">Produced.with(stringSerde, longSerde)</text:span><text:span text:style-name="T92">);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5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1T1">
        <draw:frame presentation:style-name="pr38" draw:layer="layout" svg:width="23.499cm" svg:height="3.575cm" svg:x="3.033cm" svg:y="2.367cm" presentation:class="title">
          <draw:text-box>
            <text:p>Exemple JsonSerde</text:p>
          </draw:text-box>
        </draw:frame>
        <draw:frame presentation:style-name="pr6" draw:text-style-name="P40" draw:layer="layout" svg:width="23.499cm" svg:height="12.18cm" svg:x="3.033cm" svg:y="6.283cm" presentation:class="outline">
          <draw:text-box>
            <text:list text:style-name="L1">
              <text:list-item>
                <text:p text:style-name="P38"><text:span text:style-name="T58">public class JsonSerde&lt;T&gt; implements Serde&lt;T&gt; {</text:span></text:p>
              </text:list-item>
              <text:list-item>
                <text:p text:style-name="P38"><text:span text:style-name="T58"><text:s text:c="4"/></text:span><text:span text:style-name="T58">private final ObjectMapper objectMapper = new ObjectMapper();</text:span></text:p>
              </text:list-item>
              <text:list-item>
                <text:p text:style-name="P38"><text:span text:style-name="T58"><text:s text:c="4"/></text:span><text:span text:style-name="T58">private final Class&lt;T&gt; targetType;</text:span></text:p>
              </text:list-item>
              <text:list-item>
                <text:p text:style-name="P38"><text:span text:style-name="T58"/></text:p>
              </text:list-item>
              <text:list-item>
                <text:p text:style-name="P38"><text:span text:style-name="T58"><text:s text:c="4"/></text:span><text:span text:style-name="T58">public JsonSerde(Class&lt;T&gt; targetType) {</text:span></text:p>
              </text:list-item>
              <text:list-item>
                <text:p text:style-name="P38"><text:span text:style-name="T58"><text:s text:c="8"/></text:span><text:span text:style-name="T58">this.targetType = targetType;</text:span></text:p>
              </text:list-item>
              <text:list-item>
                <text:p text:style-name="P38"><text:span text:style-name="T58"><text:s text:c="4"/></text:span><text:span text:style-name="T58">}</text:span></text:p>
              </text:list-item>
              <text:list-item>
                <text:p text:style-name="P38"><text:span text:style-name="T58"/></text:p>
              </text:list-item>
              <text:list-item>
                <text:p text:style-name="P38"><text:span text:style-name="T58"><text:s text:c="4"/></text:span><text:span text:style-name="T58">@Override</text:span></text:p>
              </text:list-item>
              <text:list-item>
                <text:p text:style-name="P38"><text:span text:style-name="T58"><text:s text:c="4"/></text:span><text:span text:style-name="T58">public Serializer&lt;T&gt; serializer() {</text:span></text:p>
              </text:list-item>
              <text:list-item>
                <text:p text:style-name="P38"><text:span text:style-name="T58"><text:s text:c="8"/></text:span><text:span text:style-name="T58">return (topic, data) -&gt; {</text:span></text:p>
              </text:list-item>
              <text:list-item>
                <text:p text:style-name="P38"><text:span text:style-name="T58"><text:s text:c="12"/></text:span><text:span text:style-name="T58">try {</text:span></text:p>
              </text:list-item>
              <text:list-item>
                <text:p text:style-name="P38"><text:span text:style-name="T58"><text:s text:c="16"/></text:span><text:span text:style-name="T58">return objectMapper.writeValueAsBytes(data);</text:span></text:p>
              </text:list-item>
              <text:list-item>
                <text:p text:style-name="P38"><text:span text:style-name="T58"><text:s text:c="12"/></text:span><text:span text:style-name="T58">} catch (Exception e) {</text:span></text:p>
              </text:list-item>
              <text:list-item>
                <text:p text:style-name="P38"><text:span text:style-name="T58"><text:s text:c="16"/></text:span><text:span text:style-name="T58">throw new RuntimeException("Erreur de sérialisation", e);</text:span></text:p>
              </text:list-item>
              <text:list-item>
                <text:p text:style-name="P38"><text:span text:style-name="T58"><text:s text:c="12"/></text:span><text:span text:style-name="T58">}</text:span></text:p>
              </text:list-item>
              <text:list-item>
                <text:p text:style-name="P38"><text:span text:style-name="T58"><text:s text:c="8"/></text:span><text:span text:style-name="T58">};</text:span></text:p>
              </text:list-item>
              <text:list-item>
                <text:p text:style-name="P38"><text:span text:style-name="T58"><text:s text:c="4"/></text:span><text:span text:style-name="T58">}</text:span></text:p>
              </text:list-item>
              <text:list-item>
                <text:p text:style-name="P38"><text:span text:style-name="T58"/></text:p>
              </text:list-item>
              <text:list-item>
                <text:p text:style-name="P38"><text:span text:style-name="T58"><text:s text:c="4"/></text:span><text:span text:style-name="T58">@Override</text:span></text:p>
              </text:list-item>
              <text:list-item>
                <text:p text:style-name="P38"><text:span text:style-name="T58"><text:s text:c="4"/></text:span><text:span text:style-name="T58">public Deserializer&lt;T&gt; deserializer() {</text:span></text:p>
              </text:list-item>
              <text:list-item>
                <text:p text:style-name="P38"><text:span text:style-name="T58"><text:s text:c="8"/></text:span><text:span text:style-name="T58">return (topic, data) -&gt; {</text:span></text:p>
              </text:list-item>
              <text:list-item>
                <text:p text:style-name="P38"><text:span text:style-name="T58"><text:s text:c="12"/></text:span><text:span text:style-name="T58">try {</text:span></text:p>
              </text:list-item>
              <text:list-item>
                <text:p text:style-name="P38"><text:span text:style-name="T58"><text:s text:c="16"/></text:span><text:span text:style-name="T58">return objectMapper.readValue(data, targetType);</text:span></text:p>
              </text:list-item>
              <text:list-item>
                <text:p text:style-name="P38"><text:span text:style-name="T58"><text:s text:c="12"/></text:span><text:span text:style-name="T58">} catch (Exception e) {</text:span></text:p>
              </text:list-item>
              <text:list-item>
                <text:p text:style-name="P38"><text:span text:style-name="T58"><text:s text:c="16"/></text:span><text:span text:style-name="T58">throw new RuntimeException("Erreur de désérialisation", e);</text:span></text:p>
              </text:list-item>
              <text:list-item>
                <text:p text:style-name="P38"><text:span text:style-name="T58"><text:s text:c="12"/></text:span><text:span text:style-name="T58">}</text:span></text:p>
              </text:list-item>
              <text:list-item>
                <text:p text:style-name="P38"><text:span text:style-name="T58"><text:s text:c="8"/></text:span><text:span text:style-name="T58">};</text:span></text:p>
              </text:list-item>
              <text:list-item>
                <text:p text:style-name="P38"><text:span text:style-name="T58"><text:s text:c="4"/></text:span><text:span text:style-name="T58">}</text:span></text:p>
              </text:list-item>
              <text:list-item>
                <text:p text:style-name="P38"><text:span text:style-name="T58">}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5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1T1">
        <draw:frame presentation:style-name="pr38" draw:layer="layout" svg:width="23.499cm" svg:height="3.575cm" svg:x="3.033cm" svg:y="2.367cm" presentation:class="title">
          <draw:text-box>
            <text:p>Confluent Avro Serd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bibliothèque <text:span text:style-name="T19">io.confluent :kafka-streams-avro-serde</text:span> foutnit 2 Serde pour Avro :</text:p>
                <text:list>
                  <text:list-item>
                    <text:p><text:span text:style-name="T19">GenericAvroSerde</text:span> permet de dé/sérialiser des GenericRecord de Avro</text:p>
                  </text:list-item>
                  <text:list-item>
                    <text:p><text:span text:style-name="T19">SpecificAvroSerde</text:span> permet de dé/sérialiser des classes spécifiques générées par les outils Avro</text:p>
                  </text:list-item>
                </text:list>
              </text:list-item>
              <text:list-item>
                <text:p>Exemple SpecificAvroSerde :</text:p>
              </text:list-item>
              <text:list-item>
                <text:p><text:span text:style-name="T95">final Map&lt;String, String&gt; serdeConfig = Collections.singletonMap("schema.registry.url", <text:s text:c="61"/>"http://my-schema-registry:8081");</text:span></text:p>
              </text:list-item>
              <text:list-item>
                <text:p><text:span text:style-name="T96">// <text:s/>`Bar` est généré à partir d’un Schéma Avro</text:span></text:p>
              </text:list-item>
              <text:list-item>
                <text:p><text:span text:style-name="T95">final Serde&lt;Bar&gt; valueSpecificAvroSerde = new SpecificAvroSerde&lt;&gt;();</text:span></text:p>
              </text:list-item>
              <text:list-item>
                <text:p><text:span text:style-name="T95">valueSpecificAvroSerde.configure(serdeConfig, false); // `false` pour valeurs, true pour clé</text:span></text:p>
              </text:list-item>
              <text:list-item>
                <text:p><text:span text:style-name="T97"/></text:p>
              </text:list-item>
              <text:list-item>
                <text:p><text:span text:style-name="T95">KStream&lt;Foo, Bar&gt; textLines = builder.stream("my-avro-topic", Consumed.with(Serdes.string(), valueSpecificAvroSerde));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5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0" draw:style-name="dp5" draw:master-page-name="Vide_5f_">
        <draw:frame draw:name="Titre 48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Création de Stream </text:span></text:p>
          </draw:text-box>
        </draw:frame>
        <draw:frame draw:name="Espace réservé du texte 39" presentation:style-name="pr24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’API permet de créer des </text:span><text:span text:style-name="T14">KStream</text:span><text:span text:style-name="T10"> à partir de topics</text:span></text:p>
            <text:p text:style-name="P18"><text:span text:style-name="T10">Soit les </text:span><text:span text:style-name="T14">Serde</text:span><text:span text:style-name="T10"> par défaut sont utilisés, soit ils sont précisés via l’API</text:span></text:p>
            <text:p text:style-name="P18"><text:span text:style-name="T98">KStream&lt;String, Long&gt; wordCounts = builder.stream(</text:span></text:p>
            <text:p text:style-name="P18"><text:span text:style-name="T98"><text:s text:c="4"/></text:span><text:span text:style-name="T98">"word-counts-input-topic", /* input topic */</text:span></text:p>
            <text:p text:style-name="P18"><text:span text:style-name="T98"><text:s text:c="4"/></text:span><text:span text:style-name="T98">Consumed.with(</text:span></text:p>
            <text:p text:style-name="P18"><text:span text:style-name="T98"><text:s text:c="6"/></text:span><text:span text:style-name="T98">Serdes.String(), /* key serde */</text:span></text:p>
            <text:p text:style-name="P18"><text:span text:style-name="T98"><text:s text:c="6"/></text:span><text:span text:style-name="T98">Serdes.Long() <text:s text:c="2"/>/* value serde */</text:span></text:p>
            <text:p text:style-name="P18"><text:span text:style-name="T98"><text:s text:c="4"/></text:span><text:span text:style-name="T98">);</text:span></text:p>
            <text:p text:style-name="P20"><text:span text:style-name="T10"/></text:p>
          </draw:text-box>
        </draw:frame>
        <presentation:notes draw:style-name="dp6">
          <draw:page-thumbnail draw:name="Espace réservé de l'image des diapositives 41" draw:style-name="gr2" draw:layer="layout" svg:width="15.535cm" svg:height="10.984cm" svg:x="2.655cm" svg:y="2.258cm" draw:page-number="60" presentation:class="page"/>
          <draw:frame draw:name="Espace réservé des notes 48" presentation:style-name="pr69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61" draw:style-name="dp5" draw:master-page-name="Vide_5f_">
        <draw:frame draw:name="Titre 41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Création de Table ou GlobalTable </text:span></text:p>
          </draw:text-box>
        </draw:frame>
        <draw:frame draw:name="Espace réservé du texte 22" presentation:style-name="pr24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s tables peuvent également être construites à partir d’un topic. </text:span></text:p>
            <text:p text:style-name="P18"><text:span text:style-name="T99">Un nom, identifiant le Store associén doit être fourni pour permettre les requêtes interactives.</text:span></text:p>
            <text:p text:style-name="P18"><text:span text:style-name="T100">GlobalKTable&lt;String, Long&gt; wordCounts = builder.globalTable(</text:span></text:p>
            <text:p text:style-name="P18"><text:span text:style-name="T100"><text:s text:c="4"/></text:span><text:span text:style-name="T100">"word-counts-input-topic",</text:span></text:p>
            <text:p text:style-name="P18"><text:span text:style-name="T100"><text:s text:c="4"/></text:span><text:span text:style-name="T101">Materialized.&lt;String, Long, KeyValueStore&lt;Bytes, byte[]&gt;&gt;</text:span><text:span text:style-name="T100">as(</text:span></text:p>
            <text:p text:style-name="P18"><text:span text:style-name="T100"><text:s text:c="6"/></text:span><text:span text:style-name="T100">"word-counts-global-store" /* table/store name */)</text:span></text:p>
            <text:p text:style-name="P18"><text:span text:style-name="T100"><text:s text:c="6"/></text:span><text:span text:style-name="T100">.withKeySerde(Serdes.String()) /* key serde */</text:span></text:p>
            <text:p text:style-name="P18"><text:span text:style-name="T100"><text:s text:c="6"/></text:span><text:span text:style-name="T100">.withValueSerde(Serdes.Long()) /* value serde */</text:span></text:p>
            <text:p text:style-name="P18"><text:span text:style-name="T100"><text:s text:c="4"/></text:span><text:span text:style-name="T100">);</text:span></text:p>
            <text:p text:style-name="P49"><text:span text:style-name="T102"/></text:p>
          </draw:text-box>
        </draw:frame>
        <presentation:notes draw:style-name="dp6">
          <draw:page-thumbnail draw:name="Espace réservé de l'image des diapositives 22" draw:style-name="gr2" draw:layer="layout" svg:width="15.535cm" svg:height="10.984cm" svg:x="2.655cm" svg:y="2.258cm" draw:page-number="61" presentation:class="page"/>
          <draw:frame draw:name="Espace réservé des notes 40" presentation:style-name="pr70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62" draw:style-name="dp5" draw:master-page-name="Vide_5f_">
        <draw:frame draw:name="Titre 39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Opérateur to</text:span></text:p>
          </draw:text-box>
        </draw:frame>
        <draw:frame draw:name="Espace réservé du texte 21" presentation:style-name="pr24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’opérateur </text:span><text:span text:style-name="T13">to</text:span><text:span text:style-name="T10"> permet de déverser un </text:span><text:span text:style-name="T14">KStream</text:span><text:span text:style-name="T10"> dans un topic.</text:span></text:p>
            <text:p text:style-name="P18"><text:span text:style-name="T100"><text:s/></text:span><text:span text:style-name="T100">aStream.to(OUTPUT_TOPIC, </text:span><text:span text:style-name="T100"><text:line-break/></text:span><text:span text:style-name="T100">Produced.with(Serdes.String(), valueSerde));</text:span></text:p>
            <text:p text:style-name="P31"><text:span text:style-name="T2">L’opérateur </text:span><text:span text:style-name="T103">streamToTable</text:span><text:span text:style-name="T2"> permet de convertir une table en </text:span><text:span text:style-name="T104">KStream</text:span><text:span text:style-name="T2"> avant de le déverser dans un topic :</text:span></text:p>
            <text:p text:style-name="P18"><text:span text:style-name="T100">KStream&lt;String, Long&gt; streamFromTable = table.toStream();</text:span></text:p>
            <text:p text:style-name="P18"><text:span text:style-name="T100">// Écrire le KStream résultant dans un topic Kafka</text:span></text:p>
            <text:p text:style-name="P18"><text:span text:style-name="T100">streamFromTable.to("output-topic", Produced.with(Serdes.String(), Serdes.Long()));</text:span></text:p>
            <text:p text:style-name="P18"><text:span text:style-name="T100"/></text:p>
          </draw:text-box>
        </draw:frame>
        <draw:frame draw:style-name="gr12" draw:text-style-name="P41" draw:layer="layout" svg:width="14.544cm" svg:height="1.216cm" svg:x="1.603cm" svg:y="19.4cm">
          <draw:text-box>
            <text:p><text:span text:style-name="T65">Atelier 1 : Première application et Serde</text:span></text:p>
          </draw:text-box>
        </draw:frame>
        <presentation:notes draw:style-name="dp6">
          <draw:page-thumbnail draw:name="Espace réservé de l'image des diapositives 21" draw:style-name="gr2" draw:layer="layout" svg:width="15.535cm" svg:height="10.984cm" svg:x="2.655cm" svg:y="2.258cm" draw:page-number="62" presentation:class="page"/>
          <draw:frame draw:name="Espace réservé des notes 27" presentation:style-name="pr71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63" draw:style-name="dp5" draw:master-page-name="Vide_5f_">
        <draw:frame draw:name="Titre 10" presentation:style-name="pr72" draw:text-style-name="P12" draw:layer="layout" svg:width="23.499cm" svg:height="3.506cm" svg:x="3.033cm" svg:y="2.402cm" presentation:class="title" presentation:user-transformed="true">
          <draw:text-box>
            <text:p text:style-name="P11"><text:span text:style-name="T9">KafkaStream</text:span></text:p>
          </draw:text-box>
        </draw:frame>
        <draw:frame draw:name="Sous-titre 5" presentation:style-name="pr73" draw:text-style-name="P14" draw:layer="layout" svg:width="23.499cm" svg:height="12.18cm" svg:x="3.033cm" svg:y="6.283cm" presentation:class="subtitle" presentation:user-transformed="true">
          <draw:text-box>
            <text:p text:style-name="P13"><text:span text:style-name="T10"/></text:p>
            <text:p text:style-name="P13"><text:span text:style-name="T10"/></text:p>
            <text:p text:style-name="P13"><text:span text:style-name="T10">Concepts</text:span></text:p>
            <text:p text:style-name="P13"><text:span text:style-name="T10">Démarrage</text:span></text:p>
            <text:p text:style-name="P13"><text:span text:style-name="T11">Configuration</text:span></text:p>
            <text:p text:style-name="P26"><text:span text:style-name="T66">Opérateurs stateless</text:span></text:p>
            <text:p text:style-name="P26"><text:span text:style-name="T66">Opérateurs stateful</text:span></text:p>
            <text:p text:style-name="P44"><text:span text:style-name="T66">Requêtes interactives</text:span></text:p>
          </draw:text-box>
        </draw:frame>
        <presentation:notes draw:style-name="dp6">
          <draw:custom-shape draw:name="Forme libre 5" draw:style-name="gr11" draw:text-style-name="P15" draw:layer="layout" svg:width="15.751cm" svg:height="11.138cm" svg:x="2.624cm" svg:y="2.227cm">
            <text:p/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frame draw:name="Espace réservé des notes 12" presentation:style-name="pr74" draw:text-style-name="P16" draw:layer="layout" svg:width="14.367cm" svg:height="11.259cm" svg:x="3.249cm" svg:y="14.129cm" presentation:class="notes" presentation:placeholder="true" presentation:user-transformed="true">
            <draw:text-box/>
          </draw:frame>
        </presentation:notes>
      </draw:page>
      <draw:page draw:name="Configuration" draw:style-name="dp5" draw:master-page-name="Vide">
        <draw:frame draw:name="Titre 198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Configuration</text:span></text:p>
          </draw:text-box>
        </draw:frame>
        <draw:frame draw:name="Espace réservé du texte 177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5">La configuration s’effectue via une classe </text:span><text:span text:style-name="T106">Properties</text:span></text:p>
            <text:p text:style-name="P50"><text:span text:style-name="T107"/></text:p>
            <text:p text:style-name="P50"><text:span text:style-name="T108">Properties settings = new Properties();</text:span></text:p>
            <text:p text:style-name="P50"><text:span text:style-name="T108"/></text:p>
            <text:p text:style-name="P50"><text:span text:style-name="T108">// Set a few key parameters</text:span></text:p>
            <text:p text:style-name="P50"><text:span text:style-name="T108">settings.put(StreamsConfig.APPLICATION_ID_CONFIG, </text:span><text:span text:style-name="T108"><text:line-break/></text:span><text:span text:style-name="T108">"my-first-streams-application");</text:span></text:p>
            <text:p text:style-name="P50"><text:span text:style-name="T108">settings.put(StreamsConfig.BOOTSTRAP_SERVERS_CONFIG, </text:span><text:span text:style-name="T108"><text:line-break/></text:span><text:span text:style-name="T108">"kafka-broker1:9092");</text:span></text:p>
            <text:p text:style-name="P50"><text:span text:style-name="T108">// Any further settings</text:span></text:p>
            <text:p text:style-name="P50"><text:span text:style-name="T108">settings.put(... , ...);</text:span></text:p>
            <text:p text:style-name="P50"><text:span text:style-name="T109"/></text:p>
          </draw:text-box>
        </draw:frame>
        <presentation:notes draw:style-name="dp6">
          <draw:page-thumbnail draw:name="Espace réservé de l'image des diapositives 180" draw:style-name="gr2" draw:layer="layout" svg:width="15.535cm" svg:height="10.984cm" svg:x="2.655cm" svg:y="2.258cm" draw:page-number="64" presentation:class="page"/>
          <draw:frame draw:name="Espace réservé des notes 199" presentation:style-name="pr75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65" draw:style-name="dp5" draw:master-page-name="Vide">
        <draw:frame draw:name="Titre 11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Configuration</text:span></text:p>
          </draw:text-box>
        </draw:frame>
        <draw:frame draw:name="Espace réservé du texte 8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Paramètres requis :</text:span></text:p>
            <text:list text:style-name="L12">
              <text:list-item>
                <text:list>
                  <text:list-item>
                    <text:p text:style-name="P43"><text:span text:style-name="T110">application.id</text:span><text:span text:style-name="T73"> : Identifiant unique de l’application (groupe de consommateurs)</text:span></text:p>
                  </text:list-item>
                  <text:list-item>
                    <text:p text:style-name="P43"><text:span text:style-name="T110">bootstrap-servers</text:span><text:span text:style-name="T73"> :</text:span></text:p>
                  </text:list-item>
                </text:list>
              </text:list-item>
            </text:list>
            <text:p text:style-name="P20"><text:span text:style-name="T10"/></text:p>
            <text:p text:style-name="P20"><text:span text:style-name="T10">Configuration pour la résilience :</text:span></text:p>
            <text:list text:continue-numbering="true" text:style-name="L12">
              <text:list-item>
                <text:list>
                  <text:list-item>
                    <text:p text:style-name="P43"><text:span text:style-name="T110">acks</text:span><text:span text:style-name="T73"> : Défaut all</text:span></text:p>
                  </text:list-item>
                  <text:list-item>
                    <text:p text:style-name="P43"><text:span text:style-name="T110">replication.factor</text:span><text:span text:style-name="T73"> : Le facteur de réplication des topics internes créés par KafkaStream. Recommendation &gt; 1 et généralement égal au facteur de réplication du topic source</text:span></text:p>
                  </text:list-item>
                  <text:list-item>
                    <text:p text:style-name="P43"><text:span text:style-name="T110">processing.guarantee</text:span><text:span text:style-name="T73"> : </text:span><text:span text:style-name="T76">At Least Once</text:span><text:span text:style-name="T73"> ou </text:span><text:span text:style-name="T76">Exactly Once</text:span></text:p>
                  </text:list-item>
                </text:list>
              </text:list-item>
            </text:list>
            <text:p text:style-name="P31"><text:span text:style-name="T111"/></text:p>
          </draw:text-box>
        </draw:frame>
        <presentation:notes draw:style-name="dp6">
          <draw:page-thumbnail draw:name="Espace réservé de l'image des diapositives 4" draw:style-name="gr2" draw:layer="layout" svg:width="15.535cm" svg:height="10.984cm" svg:x="2.655cm" svg:y="2.258cm" draw:page-number="65" presentation:class="page"/>
          <draw:frame draw:name="Espace réservé des notes 13" presentation:style-name="pr76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66" draw:style-name="dp5" draw:master-page-name="Vide">
        <draw:frame draw:name="Titre 13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Configuration</text:span></text:p>
          </draw:text-box>
        </draw:frame>
        <draw:frame draw:name="Espace réservé du texte 10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2">Principales configuration</text:span><text:span text:style-name="T73"> </text:span><text:span text:style-name="T2">optionnelles</text:span></text:p>
            <text:list text:style-name="L12">
              <text:list-item>
                <text:list>
                  <text:list-item>
                    <text:p text:style-name="P51"><text:span text:style-name="T112">default.keySerde</text:span><text:span text:style-name="T73">, </text:span><text:span text:style-name="T113">default.valueSerde</text:span><text:span text:style-name="T73"> : Les sérialiseur/désérialiseur par défaut pour les clés et les valeurs</text:span></text:p>
                  </text:list-item>
                  <text:list-item>
                    <text:p text:style-name="P43"><text:span text:style-name="T110">num.stream.threads</text:span><text:span text:style-name="T73"> : Nombre de threads par instance d’application. </text:span></text:p>
                  </text:list-item>
                  <text:list-item>
                    <text:p text:style-name="P51"><text:span text:style-name="T113">default.deserialization.exception.handler</text:span><text:span text:style-name="T73">, </text:span><text:span text:style-name="T113">default.production.exception.handler</text:span><text:span text:style-name="T73"> </text:span><text:span text:style-name="T110">: </text:span><text:span text:style-name="T73">Gestionnaires d’erreur. KafkaStream en fournit 2 prédéfinis : </text:span><text:span text:style-name="T72">LogAndContinueExceptionHandler, LogAndFailExceptionHandler</text:span></text:p>
                  </text:list-item>
                  <text:list-item>
                    <text:p text:style-name="P51"><text:span text:style-name="T113">default.timestamp.extractor</text:span><text:span text:style-name="T73"> : La classe responsable de résoudre le timestamp du message. Important pour le windowing</text:span></text:p>
                  </text:list-item>
                </text:list>
              </text:list-item>
            </text:list>
            <text:p text:style-name="P20"><text:span text:style-name="T114"/></text:p>
          </draw:text-box>
        </draw:frame>
        <presentation:notes draw:style-name="dp6">
          <draw:page-thumbnail draw:name="Espace réservé de l'image des diapositives 8" draw:style-name="gr2" draw:layer="layout" svg:width="15.535cm" svg:height="10.984cm" svg:x="2.655cm" svg:y="2.258cm" draw:page-number="66" presentation:class="page"/>
          <draw:frame draw:name="Espace réservé des notes 15" presentation:style-name="pr77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67" draw:style-name="dp5" draw:master-page-name="Vide">
        <draw:frame draw:name="Titre 12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15">Configuration des clients Kafka</text:span></text:p>
          </draw:text-box>
        </draw:frame>
        <draw:frame draw:name="Espace réservé du texte 9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s clients interne de KafkaStream (Consommateur, Producteur, Admin) peuvent également être configurés.</text:span></text:p>
            <text:p text:style-name="P18"><text:span text:style-name="T10">KafkaStream propose un mécanisme permettant de fixer une propriété pour tous les clients ou seulement l’un d’entre eux.</text:span></text:p>
            <text:p text:style-name="P18"><text:span text:style-name="T10">Certaines configurations ne peuvent pas être surchargées.</text:span></text:p>
            <text:p text:style-name="P18"><text:span text:style-name="T10"/></text:p>
          </draw:text-box>
        </draw:frame>
        <presentation:notes draw:style-name="dp6">
          <draw:page-thumbnail draw:name="Espace réservé de l'image des diapositives 6" draw:style-name="gr2" draw:layer="layout" svg:width="15.535cm" svg:height="10.984cm" svg:x="2.655cm" svg:y="2.258cm" draw:page-number="67" presentation:class="page"/>
          <draw:frame draw:name="Espace réservé des notes 14" presentation:style-name="pr78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68" draw:style-name="dp5" draw:master-page-name="Vide">
        <draw:frame draw:name="Titre 15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15">Configuration des clients Kafka</text:span></text:p>
          </draw:text-box>
        </draw:frame>
        <draw:frame draw:name="Espace réservé du texte 12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s propriétés peuvent être préfixées par consumer., produce. ou admin. </text:span></text:p>
            <text:p text:style-name="P52"><text:span text:style-name="T108">Properties streamsSettings = new Properties();</text:span></text:p>
            <text:p text:style-name="P52"><text:span text:style-name="T116">// Même valeur pour tous les clients</text:span></text:p>
            <text:p text:style-name="P52"><text:span text:style-name="T108">streamsSettings.put("PARAMETER_NAME", "value");</text:span></text:p>
            <text:p text:style-name="P52"><text:span text:style-name="T116">// Valeur différente pour chaque client</text:span></text:p>
            <text:p text:style-name="P52"><text:span text:style-name="T108">streamsSettings.put("consumer.PARAMETER_NAME", "consumer-value");</text:span></text:p>
            <text:p text:style-name="P52"><text:span text:style-name="T108">streamsSettings.put("producer.PARAMETER_NAME", "producer-value");</text:span></text:p>
            <text:p text:style-name="P52"><text:span text:style-name="T108">streamsSettings.put("admin.PARAMETER_NAME", "admin-value");</text:span></text:p>
            <text:p text:style-name="P52"><text:span text:style-name="T116">// Idem avec constante</text:span></text:p>
            <text:p text:style-name="P52"><text:span text:style-name="T108">streamsSettings.put(StreamsConfig.consumerPrefix("PARAMETER_NAME"), "consumer-value");</text:span></text:p>
            <text:p text:style-name="P52"><text:span text:style-name="T108">streamsSettings.put(StreamsConfig.producerPrefix("PARAMETER_NAME"), "producer-value");</text:span></text:p>
            <text:p text:style-name="P52"><text:span text:style-name="T108">streamsSettings.put(StreamsConfig.adminClientPrefix("PARAMETER_NAME"), "admin-value");</text:span></text:p>
            <text:p text:style-name="P52"><text:span text:style-name="T102"/></text:p>
          </draw:text-box>
        </draw:frame>
        <presentation:notes draw:style-name="dp6">
          <draw:page-thumbnail draw:name="Espace réservé de l'image des diapositives 10" draw:style-name="gr2" draw:layer="layout" svg:width="15.535cm" svg:height="10.984cm" svg:x="2.655cm" svg:y="2.258cm" draw:page-number="68" presentation:class="page"/>
          <draw:frame draw:name="Espace réservé des notes 17" presentation:style-name="pr79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69" draw:style-name="dp5" draw:master-page-name="Vide">
        <draw:frame draw:name="Titre 16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15">Configuration consommateurs</text:span></text:p>
          </draw:text-box>
        </draw:frame>
        <draw:frame draw:name="Espace réservé du texte 13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s différents consommateurs peuvent également être distingués : </text:span></text:p>
            <text:list text:style-name="L4">
              <text:list-item>
                <text:list>
                  <text:list-item>
                    <text:p><text:span text:style-name="T28">les consommateurs principaux consommant le topic source (</text:span><text:span text:style-name="T29">main.consumer</text:span><text:span text:style-name="T28">), </text:span></text:p>
                  </text:list-item>
                  <text:list-item>
                    <text:p><text:span text:style-name="T28">les consommateurs des </text:span><text:span text:style-name="T29">LocalStore</text:span><text:span text:style-name="T28"> (</text:span><text:span text:style-name="T29">restore.consumer</text:span><text:span text:style-name="T28">) </text:span></text:p>
                  </text:list-item>
                  <text:list-item>
                    <text:p><text:span text:style-name="T28">ou des </text:span><text:span text:style-name="T29">GlobalTable</text:span><text:span text:style-name="T28"> (</text:span><text:span text:style-name="T29">global.consumer</text:span><text:span text:style-name="T28">)</text:span></text:p>
                  </text:list-item>
                </text:list>
              </text:list-item>
            </text:list>
            <text:p text:style-name="P53"><text:span text:style-name="T108"/></text:p>
            <text:p text:style-name="P53"><text:span text:style-name="T108">Properties streamsSettings = new Properties();</text:span></text:p>
            <text:p text:style-name="P53"><text:span text:style-name="T116">// Configuration pour tous les consommateurs</text:span></text:p>
            <text:p text:style-name="P53"><text:span text:style-name="T108">streamsSettings.put("consumer.PARAMETER_NAME", "general-consumer-value");</text:span></text:p>
            <text:p text:style-name="P53"><text:span text:style-name="T116">// Seulement pour le restore.consumer</text:span></text:p>
            <text:p text:style-name="P53"><text:span text:style-name="T108">streamsSettings.put("restore.consumer.PARAMETER_NAME", "restore-consumer-value");</text:span></text:p>
            <text:p text:style-name="P53"><text:span text:style-name="T116">// Idem avec constante</text:span></text:p>
            <text:p text:style-name="P53"><text:span text:style-name="T108">streamsSettings.put(StreamsConfig.restoreConsumerPrefix("PARAMETER_NAME"), "restore-consumer-value");</text:span></text:p>
          </draw:text-box>
        </draw:frame>
        <presentation:notes draw:style-name="dp6">
          <draw:page-thumbnail draw:name="Espace réservé de l'image des diapositives 11" draw:style-name="gr2" draw:layer="layout" svg:width="15.535cm" svg:height="10.984cm" svg:x="2.655cm" svg:y="2.258cm" draw:page-number="69" presentation:class="page"/>
          <draw:frame draw:name="Espace réservé des notes 18" presentation:style-name="pr80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70" draw:style-name="dp5" draw:master-page-name="Vide">
        <draw:frame draw:name="Titre 17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15">Configuration des topics internes</text:span></text:p>
          </draw:text-box>
        </draw:frame>
        <draw:frame draw:name="Espace réservé du texte 14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De la même façon, les topics utilisés en interne </text:span><text:span text:style-name="T13">changelog</text:span><text:span text:style-name="T10"> et </text:span><text:span text:style-name="T13">repartition</text:span><text:span text:style-name="T10"> peuvent être configurés en utilisant le préfixe topic </text:span></text:p>
            <text:p text:style-name="P53"><text:span text:style-name="T108"/></text:p>
            <text:p text:style-name="P53"><text:span text:style-name="T108">Properties streamsSettings = new Properties();</text:span></text:p>
            <text:p text:style-name="P53"><text:span text:style-name="T108">// Surcharge de la valeur par défaut pour tous les topics</text:span></text:p>
            <text:p text:style-name="P53"><text:span text:style-name="T108">streamsSettings.put("topic.PARAMETER_NAME", "topic-value");</text:span></text:p>
            <text:p text:style-name="P53"><text:span text:style-name="T108">// idem</text:span></text:p>
            <text:p text:style-name="P53"><text:span text:style-name="T108">streamsSettings.put(StreamsConfig.topicPrefix("PARAMETER_NAME"), "topic-value");</text:span></text:p>
          </draw:text-box>
        </draw:frame>
        <presentation:notes draw:style-name="dp6">
          <draw:page-thumbnail draw:name="Espace réservé de l'image des diapositives 12" draw:style-name="gr2" draw:layer="layout" svg:width="15.535cm" svg:height="10.984cm" svg:x="2.655cm" svg:y="2.258cm" draw:page-number="70" presentation:class="page"/>
          <draw:frame draw:name="Espace réservé des notes 21" presentation:style-name="pr81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71" draw:style-name="dp5" draw:master-page-name="Vide">
        <draw:frame draw:name="Titre 22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15">Valeurs par défaut</text:span></text:p>
          </draw:text-box>
        </draw:frame>
        <draw:frame draw:name="Espace réservé du texte 18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4">client.id=&lt;application.id&gt;-&lt;random-UUID&gt;</text:span></text:p>
            <text:p text:style-name="P18"><text:span text:style-name="T10">Consommateur :</text:span></text:p>
            <text:list text:style-name="L4">
              <text:list-item>
                <text:list>
                  <text:list-item>
                    <text:p><text:span text:style-name="T10">auto.offset.reset=earliest</text:span></text:p>
                  </text:list-item>
                  <text:list-item>
                    <text:p><text:span text:style-name="T10">max.poll.records=1000</text:span></text:p>
                  </text:list-item>
                </text:list>
              </text:list-item>
            </text:list>
            <text:p><text:span text:style-name="T10">Producteur :</text:span></text:p>
            <text:list text:continue-numbering="true" text:style-name="L4">
              <text:list-item>
                <text:list>
                  <text:list-item>
                    <text:p><text:span text:style-name="T10">linger.ms=100</text:span></text:p>
                  </text:list-item>
                </text:list>
              </text:list-item>
            </text:list>
            <text:p><text:span text:style-name="T10">Si Exactly Once :</text:span></text:p>
            <text:list text:continue-numbering="true" text:style-name="L4">
              <text:list-item>
                <text:list>
                  <text:list-item>
                    <text:p><text:span text:style-name="T10">transaction.timeout.ms</text:span><text:span text:style-name="T10"><text:tab/></text:span><text:span text:style-name="T10">= 10000</text:span></text:p>
                  </text:list-item>
                  <text:list-item>
                    <text:p><text:span text:style-name="T10">delivery.timeout.ms</text:span><text:span text:style-name="T10"><text:tab/></text:span><text:span text:style-name="T10"> = Integer.MAX_VALUE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name="Espace réservé de l'image des diapositives 13" draw:style-name="gr2" draw:layer="layout" svg:width="15.535cm" svg:height="10.984cm" svg:x="2.655cm" svg:y="2.258cm" draw:page-number="71" presentation:class="page"/>
          <draw:frame draw:name="Espace réservé des notes 23" presentation:style-name="pr82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72" draw:style-name="dp5" draw:master-page-name="Vide">
        <draw:frame draw:name="Titre 24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15">Paramètres contrôlé par KafkaStreams</text:span></text:p>
          </draw:text-box>
        </draw:frame>
        <draw:frame draw:name="Espace réservé du texte 15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Certains paramètres ne peuvent pas être surchargés :</text:span></text:p>
            <text:list text:style-name="L4">
              <text:list-item>
                <text:list>
                  <text:list-item>
                    <text:p><text:span text:style-name="T117">allow.auto.create.topics=false</text:span><text:span text:style-name="T15"><text:tab/></text:span><text:span text:style-name="T15">(pour le consommateur)</text:span></text:p>
                  </text:list-item>
                  <text:list-item>
                    <text:p><text:span text:style-name="T117">group.id = application.id</text:span></text:p>
                  </text:list-item>
                  <text:list-item>
                    <text:p><text:span text:style-name="T117">enable.auto.commit=false</text:span></text:p>
                  </text:list-item>
                  <text:list-item>
                    <text:p><text:span text:style-name="T117">partition.assignment.strategy=StreamsPartitionAssignor</text:span></text:p>
                  </text:list-item>
                </text:list>
              </text:list-item>
            </text:list>
            <text:p text:style-name="P18"><text:span text:style-name="T14"/></text:p>
            <text:p text:style-name="P18"><text:span text:style-name="T10">Si Exactly Once:</text:span></text:p>
            <text:list text:continue-numbering="true" text:style-name="L4">
              <text:list-item>
                <text:list>
                  <text:list-item>
                    <text:p><text:span text:style-name="T117">isolation.level=read_committed</text:span></text:p>
                  </text:list-item>
                  <text:list-item>
                    <text:p><text:span text:style-name="T117">enable.idempotence=true</text:span></text:p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6">
          <draw:page-thumbnail draw:name="Espace réservé de l'image des diapositives 14" draw:style-name="gr2" draw:layer="layout" svg:width="15.535cm" svg:height="10.984cm" svg:x="2.655cm" svg:y="2.258cm" draw:page-number="72" presentation:class="page"/>
          <draw:frame draw:name="Espace réservé des notes 22" presentation:style-name="pr83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73" draw:style-name="dp5" draw:master-page-name="Vide">
        <draw:frame draw:name="Titre 25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15">Client.id</text:span></text:p>
          </draw:text-box>
        </draw:frame>
        <draw:frame draw:name="Espace réservé du texte 19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4">client.id</text:span><text:span text:style-name="T10"> est utilisé pour dériver d’autres noms utilisés en interne.</text:span></text:p>
            <text:list text:style-name="L4">
              <text:list-item>
                <text:list>
                  <text:list-item>
                    <text:p><text:span text:style-name="T10">Consommateur principal :</text:span><text:span text:style-name="T10"><text:line-break/></text:span><text:span text:style-name="T118">&lt;client.id&gt;-StreamThread-&lt;threadIdx&gt;-consumer</text:span></text:p>
                  </text:list-item>
                  <text:list-item>
                    <text:p><text:span text:style-name="T10">Consommateur de restauration :</text:span><text:span text:style-name="T10"><text:line-break/></text:span><text:span text:style-name="T119">&lt;client.id&gt;-StreamThread-&lt;threadIdx&gt;-restore-consumer</text:span></text:p>
                  </text:list-item>
                  <text:list-item>
                    <text:p><text:span text:style-name="T10">Consommateur pour le tables globales :</text:span><text:span text:style-name="T10"><text:line-break/></text:span><text:span text:style-name="T119">&lt;client.id&gt;-global-consumer</text:span></text:p>
                  </text:list-item>
                  <text:list-item>
                    <text:p><text:span text:style-name="T10">Producteur :</text:span><text:span text:style-name="T10"><text:line-break/></text:span><text:span text:style-name="T119">&lt;client.id&gt;-StreamThread-&lt;threadIdx&gt;-producer</text:span></text:p>
                  </text:list-item>
                  <text:list-item>
                    <text:p><text:span text:style-name="T10">Pour l’admin :</text:span><text:span text:style-name="T10"><text:line-break/></text:span><text:span text:style-name="T119">&lt;client.id&gt;-admin</text:span></text:p>
                  </text:list-item>
                </text:list>
              </text:list-item>
            </text:list>
          </draw:text-box>
        </draw:frame>
        <draw:frame draw:style-name="gr13" draw:text-style-name="P41" draw:layer="layout" svg:width="14.087cm" svg:height="1.216cm" svg:x="1.603cm" svg:y="19.4cm">
          <draw:text-box>
            <text:p><text:span text:style-name="T65">Atelier 2 : Configuration Exactly Once</text:span></text:p>
          </draw:text-box>
        </draw:frame>
        <presentation:notes draw:style-name="dp6">
          <draw:page-thumbnail draw:name="Espace réservé de l'image des diapositives 15" draw:style-name="gr2" draw:layer="layout" svg:width="15.535cm" svg:height="10.984cm" svg:x="2.655cm" svg:y="2.258cm" draw:page-number="73" presentation:class="page"/>
          <draw:frame draw:name="Espace réservé des notes 25" presentation:style-name="pr84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74" draw:style-name="dp5" draw:master-page-name="Vide_5f__5f_">
        <draw:frame draw:name="Titre 26" presentation:style-name="pr85" draw:text-style-name="P12" draw:layer="layout" svg:width="23.499cm" svg:height="3.506cm" svg:x="3.033cm" svg:y="2.402cm" presentation:class="title" presentation:user-transformed="true">
          <draw:text-box>
            <text:p text:style-name="P11"><text:span text:style-name="T9">KafkaStream</text:span></text:p>
          </draw:text-box>
        </draw:frame>
        <draw:frame draw:name="Sous-titre 6" presentation:style-name="pr86" draw:text-style-name="P14" draw:layer="layout" svg:width="23.499cm" svg:height="12.18cm" svg:x="3.033cm" svg:y="6.283cm" presentation:class="subtitle" presentation:user-transformed="true">
          <draw:text-box>
            <text:p text:style-name="P13"><text:span text:style-name="T10"/></text:p>
            <text:p text:style-name="P13"><text:span text:style-name="T10"/></text:p>
            <text:p text:style-name="P13"><text:span text:style-name="T10">Concepts</text:span></text:p>
            <text:p text:style-name="P13"><text:span text:style-name="T10">Démarrage</text:span></text:p>
            <text:p text:style-name="P26"><text:span text:style-name="T66">Configuration</text:span></text:p>
            <text:p text:style-name="P13"><text:span text:style-name="T11">Opérateurs stateless</text:span></text:p>
            <text:p text:style-name="P26"><text:span text:style-name="T66">Opérateurs stateful</text:span></text:p>
            <text:p text:style-name="P44"><text:span text:style-name="T66">Requêtes interactives</text:span></text:p>
          </draw:text-box>
        </draw:frame>
        <presentation:notes draw:style-name="dp6">
          <draw:custom-shape draw:name="Forme libre 6" draw:style-name="gr11" draw:text-style-name="P15" draw:layer="layout" svg:width="15.751cm" svg:height="11.138cm" svg:x="2.624cm" svg:y="2.227cm">
            <text:p/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frame draw:name="Espace réservé des notes 26" presentation:style-name="pr87" draw:text-style-name="P16" draw:layer="layout" svg:width="14.367cm" svg:height="11.259cm" svg:x="3.249cm" svg:y="14.129cm" presentation:class="notes" presentation:placeholder="true" presentation:user-transformed="true">
            <draw:text-box/>
          </draw:frame>
        </presentation:notes>
      </draw:page>
      <draw:page draw:name="Processeurs stateless" draw:style-name="dp5" draw:master-page-name="Vide">
        <draw:frame draw:name="Titre 200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Processeurs stateless</text:span></text:p>
          </draw:text-box>
        </draw:frame>
        <draw:frame draw:name="Espace réservé du texte 179" presentation:style-name="pr13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s processeurs stateless ne nécessitent pas de </text:span><text:span text:style-name="T14">StateStore</text:span><text:span text:style-name="T10">.</text:span></text:p>
            <text:p text:style-name="P18"><text:span text:style-name="T10">Cependant le résultat de la transformation peut être matérialisé sous forme de </text:span><text:span text:style-name="T14">KTable</text:span><text:span text:style-name="T10"> permettant des requêtes interactives</text:span></text:p>
            <text:p text:style-name="P18"><text:span text:style-name="T10">Les processeurs prennent donc un argument optionnel, le nom du store associé à la Table</text:span></text:p>
          </draw:text-box>
        </draw:frame>
        <presentation:notes draw:style-name="dp6">
          <draw:page-thumbnail draw:name="Espace réservé de l'image des diapositives 182" draw:style-name="gr2" draw:layer="layout" svg:width="15.535cm" svg:height="10.984cm" svg:x="2.655cm" svg:y="2.258cm" draw:page-number="75" presentation:class="page"/>
          <draw:frame draw:name="Espace réservé des notes 201" presentation:style-name="pr88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Quelques processeurs stateless" draw:style-name="dp5" draw:master-page-name="Vide">
        <draw:frame draw:name="Titre 201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Les processeurs stateless</text:span></text:p>
          </draw:text-box>
        </draw:frame>
        <draw:frame draw:name="Espace réservé du texte 180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70">filter, filterNot</text:span><text:span text:style-name="T10"> : Filtre à partir d’une fonction booléenne</text:span></text:p>
            <text:p text:style-name="P18"><text:span text:style-name="T120">map</text:span><text:span text:style-name="T10">, </text:span><text:span text:style-name="T120">mapValues</text:span><text:span text:style-name="T10"> : Transformation du message</text:span></text:p>
            <text:p text:style-name="P18"><text:span text:style-name="T120">flatMap</text:span><text:span text:style-name="T10">, </text:span><text:span text:style-name="T120">flatMapValues</text:span><text:span text:style-name="T10"> : Un message produit 0, 1 ou plusieurs messages transformés</text:span></text:p>
            <text:p text:style-name="P18"><text:span text:style-name="T120">branch</text:span><text:span text:style-name="T10"> : Split le flux d’entrée en plusieurs flux</text:span></text:p>
            <text:p text:style-name="P31"><text:span text:style-name="T121">merge</text:span><text:span text:style-name="T10"> : Fusionne 2 flux </text:span></text:p>
            <text:p text:style-name="P18"><text:span text:style-name="T120">foreach</text:span><text:span text:style-name="T10"> : Opération terminale ne retournant pas de messages mais permettant de faire un traitement sur chaque message</text:span></text:p>
            <text:p text:style-name="P18"><text:span text:style-name="T120">print</text:span><text:span text:style-name="T10"> : Opération terminale affichant le message sur la console</text:span></text:p>
            <text:p text:style-name="P18"><text:span text:style-name="T120">peek</text:span><text:span text:style-name="T10"> : Idem que ForEach mais opération non terminale renvoyant le même flux</text:span></text:p>
          </draw:text-box>
        </draw:frame>
        <presentation:notes draw:style-name="dp6">
          <draw:page-thumbnail draw:name="Espace réservé de l'image des diapositives 183" draw:style-name="gr2" draw:layer="layout" svg:width="15.535cm" svg:height="10.984cm" svg:x="2.655cm" svg:y="2.258cm" draw:page-number="76" presentation:class="page"/>
          <draw:frame draw:name="Espace réservé des notes 202" presentation:style-name="pr89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77" draw:style-name="dp5" draw:master-page-name="Vide">
        <draw:frame draw:name="Titre 42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Les processeurs stateless (2)</text:span></text:p>
          </draw:text-box>
        </draw:frame>
        <draw:frame draw:name="Espace réservé du texte 23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20">groupBy</text:span><text:span text:style-name="T10"> : Regroupe les enregistrements par une nouvelle clé. Pré-requis pour faire de l’agrégation</text:span></text:p>
            <text:p text:style-name="P18"><text:span text:style-name="T120">groupByKey</text:span><text:span text:style-name="T10"> : Regroupe en utilisant la clé</text:span></text:p>
            <text:p text:style-name="P31"><text:span text:style-name="T121">coGroup</text:span><text:span text:style-name="T10"> : Agrégation de plusieurs stream ayant les mêmes clés</text:span></text:p>
            <text:p text:style-name="P18"><text:span text:style-name="T120">selectKey</text:span><text:span text:style-name="T10"> : Permet de définir une nouvelle clé</text:span></text:p>
            <text:p text:style-name="P18"><text:span text:style-name="T120">mapAsync</text:span><text:span text:style-name="T10">, </text:span><text:span text:style-name="T120">mapValuesAsync</text:span><text:span text:style-name="T10">, </text:span><text:span text:style-name="T120">flatMapAsync</text:span><text:span text:style-name="T10">, </text:span><text:span text:style-name="T120">FlatMapValuesAsync</text:span><text:span text:style-name="T10">, </text:span><text:span text:style-name="T120">ForEachAsync</text:span><text:span text:style-name="T10"> : Opérations asynchrones sur le modèle requête réponse. Cas d’usage : Enrichir les données avec un système externe</text:span></text:p>
            <text:p text:style-name="P31"><text:span text:style-name="T121">tableToStream</text:span><text:span text:style-name="T10">, </text:span><text:span text:style-name="T121">streamToTable</text:span><text:span text:style-name="T10"> : </text:span></text:p>
            <text:p text:style-name="P31"><text:span text:style-name="T121">repartition</text:span><text:span text:style-name="T10"> : Repartitionne le flux avec le nombre de partititions voulus</text:span></text:p>
          </draw:text-box>
        </draw:frame>
        <presentation:notes draw:style-name="dp6">
          <draw:page-thumbnail draw:name="Espace réservé de l'image des diapositives 23" draw:style-name="gr2" draw:layer="layout" svg:width="15.535cm" svg:height="10.984cm" svg:x="2.655cm" svg:y="2.258cm" draw:page-number="77" presentation:class="page"/>
          <draw:frame draw:name="Espace réservé des notes 42" presentation:style-name="pr90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Exemples" draw:style-name="dp5" draw:master-page-name="Vide">
        <draw:frame draw:name="Titre 202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Exemples</text:span></text:p>
          </draw:text-box>
        </draw:frame>
        <draw:frame draw:name="Espace réservé du texte 181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53"><text:span text:style-name="T122">// Branch</text:span></text:p>
            <text:p text:style-name="P53"><text:span text:style-name="T123">Map&lt;String, KStream&lt;String, Long&gt;&gt; branches =</text:span></text:p>
            <text:p text:style-name="P53"><text:span text:style-name="T123"><text:s text:c="4"/></text:span><text:span text:style-name="T123">stream.split(Named.as("Branch-"))</text:span></text:p>
            <text:p text:style-name="P53"><text:span text:style-name="T123"><text:s text:c="8"/></text:span><text:span text:style-name="T123">.branch((key, value) -&gt; key.startsWith("A"), <text:s/>/* first predicate <text:s/>*/</text:span></text:p>
            <text:p text:style-name="P53"><text:span text:style-name="T123"><text:s text:c="13"/></text:span><text:span text:style-name="T123">Branched.as("A"))</text:span></text:p>
            <text:p text:style-name="P53"><text:span text:style-name="T123"><text:s text:c="8"/></text:span><text:span text:style-name="T123">.branch((key, value) -&gt; key.startsWith("B"), <text:s/>/* second predicate */</text:span></text:p>
            <text:p text:style-name="P53"><text:span text:style-name="T123"><text:s text:c="13"/></text:span><text:span text:style-name="T123">Branched.as("B"))</text:span></text:p>
            <text:p text:style-name="P53"><text:span text:style-name="T123"><text:s text:c="8"/></text:span><text:span text:style-name="T123">.defaultBranch(Branched.as("C")) <text:s text:c="13"/>/* default branch */</text:span></text:p>
            <text:p text:style-name="P53"><text:span text:style-name="T123">);</text:span></text:p>
            <text:p text:style-name="P53"><text:span text:style-name="T123"/></text:p>
            <text:p text:style-name="P53"><text:span text:style-name="T123">// KStream branches.get("Branch-A") contains all records whose keys start with "A"</text:span></text:p>
            <text:p text:style-name="P53"><text:span text:style-name="T123">// KStream branches.get("Branch-B") contains all records whose keys start with "B"</text:span></text:p>
            <text:p text:style-name="P53"><text:span text:style-name="T123">// KStream branches.get("Branch-C") contains all other records</text:span></text:p>
            <text:p text:style-name="P53"><text:span text:style-name="T122">// Filtre Kstream, KTable</text:span></text:p>
            <text:p text:style-name="P53"><text:span text:style-name="T123">KStream&lt;String, Long&gt; onlyPositives = stream.filter((key, value) -&gt; value &gt; 0);</text:span></text:p>
            <text:p text:style-name="P53"><text:span text:style-name="T122">// Map, MaValues</text:span></text:p>
            <text:p text:style-name="P53"><text:span text:style-name="T123">KStream&lt;String, Integer&gt; transformed = stream.map(</text:span></text:p>
            <text:p text:style-name="P53"><text:span text:style-name="T123"><text:s text:c="4"/></text:span><text:span text:style-name="T123">(key, value) -&gt; KeyValue.pair(value.toLowerCase(), value.length()));</text:span></text:p>
            <text:p text:style-name="P53"><text:span text:style-name="T123">KStream&lt;byte[], String&gt; uppercased = stream.mapValues(value -&gt; value.toUpperCase());</text:span></text:p>
            <text:p text:style-name="P53"><text:span text:style-name="T123"/></text:p>
          </draw:text-box>
        </draw:frame>
        <presentation:notes draw:style-name="dp6">
          <draw:page-thumbnail draw:name="Espace réservé de l'image des diapositives 184" draw:style-name="gr2" draw:layer="layout" svg:width="15.535cm" svg:height="10.984cm" svg:x="2.655cm" svg:y="2.258cm" draw:page-number="78" presentation:class="page"/>
          <draw:frame draw:name="Espace réservé des notes 203" presentation:style-name="pr91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79" draw:style-name="dp5" draw:master-page-name="Vide">
        <draw:frame draw:name="Titre 43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Exemples</text:span></text:p>
          </draw:text-box>
        </draw:frame>
        <draw:frame draw:name="Espace réservé du texte 35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53"><text:span text:style-name="T122">// FkatMap</text:span></text:p>
            <text:p text:style-name="P53"><text:span text:style-name="T123">KStream&lt;String, Integer&gt; transformed = stream.flatMap(</text:span></text:p>
            <text:p text:style-name="P53"><text:span text:style-name="T123"><text:s text:c="5"/></text:span><text:span text:style-name="T123">// Here, we generate two output records for each input record.</text:span></text:p>
            <text:p text:style-name="P53"><text:span text:style-name="T123"><text:s text:c="5"/></text:span><text:span text:style-name="T123">// We also change the key and value types.</text:span></text:p>
            <text:p text:style-name="P53"><text:span text:style-name="T123"><text:s text:c="5"/></text:span><text:span text:style-name="T123">// Example: (345L, "Hello") -&gt; ("HELLO", 1000), ("hello", 9000)</text:span></text:p>
            <text:p text:style-name="P53"><text:span text:style-name="T123"><text:s text:c="4"/></text:span><text:span text:style-name="T123">(key, value) -&gt; {</text:span></text:p>
            <text:p text:style-name="P53"><text:span text:style-name="T123"><text:s text:c="6"/></text:span><text:span text:style-name="T123">List&lt;KeyValue&lt;String, Integer&gt;&gt; result = new LinkedList&lt;&gt;();</text:span></text:p>
            <text:p text:style-name="P53"><text:span text:style-name="T123"><text:s text:c="6"/></text:span><text:span text:style-name="T123">result.add(KeyValue.pair(value.toUpperCase(), 1000));</text:span></text:p>
            <text:p text:style-name="P53"><text:span text:style-name="T123"><text:s text:c="6"/></text:span><text:span text:style-name="T123">result.add(KeyValue.pair(value.toLowerCase(), 9000));</text:span></text:p>
            <text:p text:style-name="P53"><text:span text:style-name="T123"><text:s text:c="6"/></text:span><text:span text:style-name="T123">return result;</text:span></text:p>
            <text:p text:style-name="P53"><text:span text:style-name="T123"><text:s text:c="4"/></text:span><text:span text:style-name="T123">}</text:span></text:p>
            <text:p text:style-name="P53"><text:span text:style-name="T123"><text:s text:c="2"/></text:span><text:span text:style-name="T123">);</text:span></text:p>
            <text:p text:style-name="P53"><text:span text:style-name="T123"/></text:p>
            <text:p text:style-name="P53"><text:span text:style-name="T122">// Merge</text:span></text:p>
            <text:p text:style-name="P53"><text:span text:style-name="T123">KStream&lt;byte[], String&gt; merged = stream1.merge(stream2);</text:span></text:p>
            <text:p text:style-name="P53"><text:span text:style-name="T122">// Re-partitionnement</text:span></text:p>
            <text:p text:style-name="P53"><text:span text:style-name="T123">KStream&lt;byte[], String&gt; repartitionedStream = stream.repartition(Repartitioned.numberOfPartitions(10));</text:span></text:p>
            <text:p text:style-name="P53"><text:span text:style-name="T123"/></text:p>
          </draw:text-box>
        </draw:frame>
        <presentation:notes draw:style-name="dp6">
          <draw:page-thumbnail draw:name="Espace réservé de l'image des diapositives 37" draw:style-name="gr2" draw:layer="layout" svg:width="15.535cm" svg:height="10.984cm" svg:x="2.655cm" svg:y="2.258cm" draw:page-number="79" presentation:class="page"/>
          <draw:frame draw:name="Espace réservé des notes 43" presentation:style-name="pr92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80" draw:style-name="dp5" draw:master-page-name="Vide">
        <draw:frame draw:name="Titre 45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Exemples</text:span><text:span text:style-name="T12"><text:line-break/></text:span><text:span text:style-name="T12">Side Effect</text:span></text:p>
          </draw:text-box>
        </draw:frame>
        <draw:frame draw:name="Espace réservé du texte 37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53"><text:span text:style-name="T124">// ForEach : Kstream → void, KTable → void</text:span></text:p>
            <text:p text:style-name="P53"><text:span text:style-name="T125">stream.foreach((key, value) -&gt; System.out.println(key + " =&gt; " + value));</text:span></text:p>
            <text:p text:style-name="P53"><text:span text:style-name="T123"/></text:p>
            <text:p text:style-name="P53"><text:span text:style-name="T124">// Print : Kstream → void</text:span></text:p>
            <text:p text:style-name="P53"><text:span text:style-name="T125">stream.print(Printed.toFile("streams.out").withLabel("streams"));</text:span></text:p>
            <text:p text:style-name="P53"><text:span text:style-name="T123"/></text:p>
            <text:p text:style-name="P53"><text:span text:style-name="T124">// Peek : Kstream → Kstream</text:span></text:p>
            <text:p text:style-name="P53"><text:span text:style-name="T125">KStream&lt;byte[], String&gt; unmodifiedStream = stream.peek(</text:span></text:p>
            <text:p text:style-name="P53"><text:span text:style-name="T125"><text:s text:c="4"/></text:span><text:span text:style-name="T125">(key, value) -&gt; System.out.println("key=" + key + ", value=" + value));</text:span></text:p>
          </draw:text-box>
        </draw:frame>
        <presentation:notes draw:style-name="dp6">
          <draw:page-thumbnail draw:name="Espace réservé de l'image des diapositives 39" draw:style-name="gr2" draw:layer="layout" svg:width="15.535cm" svg:height="10.984cm" svg:x="2.655cm" svg:y="2.258cm" draw:page-number="80" presentation:class="page"/>
          <draw:frame draw:name="Espace réservé des notes 45" presentation:style-name="pr93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81" draw:style-name="dp5" draw:master-page-name="Vide">
        <office:forms form:automatic-focus="false" form:apply-design-mode="false"/>
        <draw:frame draw:name="Titre 44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Exemples, groupes</text:span></text:p>
          </draw:text-box>
        </draw:frame>
        <draw:frame draw:name="Espace réservé du texte 36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53"><text:span text:style-name="T122">// SelectKey : KStream → KStream</text:span></text:p>
            <text:p text:style-name="P53"><text:span text:style-name="T123">KStream&lt;String, String&gt; rekeyed = stream.selectKey((key, value) -&gt; value.split(" ")[0])</text:span></text:p>
            <text:p text:style-name="P54"><text:span text:style-name="T126">// GroubByKey : Kstream → KgroupedStream</text:span></text:p>
            <text:p text:style-name="P54"><text:span text:style-name="T127">KGroupedStream&lt;byte[], String&gt; groupedStream = stream.groupByKey();</text:span></text:p>
            <text:p text:style-name="P54"><text:span text:style-name="T126">// GroupBy : KStream → KgroupedStream ou KTable → KGroupedTable</text:span></text:p>
            <text:p text:style-name="P53"><text:span text:style-name="T123">KGroupedTable&lt;String, Integer&gt; groupedTable = table.groupBy(</text:span></text:p>
            <text:p text:style-name="P53"><text:span text:style-name="T123"><text:s text:c="4"/></text:span><text:span text:style-name="T123">(key, value) -&gt; KeyValue.pair(value, value.length()),</text:span></text:p>
            <text:p text:style-name="P53"><text:span text:style-name="T123"><text:s text:c="4"/></text:span><text:span text:style-name="T123">Grouped.with(</text:span></text:p>
            <text:p text:style-name="P53"><text:span text:style-name="T123"><text:s text:c="6"/></text:span><text:span text:style-name="T123">Serdes.String(), /* key (note: type was modified) */</text:span></text:p>
            <text:p text:style-name="P53"><text:span text:style-name="T123"><text:s text:c="6"/></text:span><text:span text:style-name="T123">Serdes.Integer()) /* value (note: type was modified) */</text:span></text:p>
            <text:p text:style-name="P53"><text:span text:style-name="T123"><text:s text:c="2"/></text:span><text:span text:style-name="T123">);</text:span></text:p>
            <text:p text:style-name="P53"><text:span text:style-name="T123"/></text:p>
            <text:p text:style-name="P53"><text:span text:style-name="T122">// Cogroup : KGroupedStream → CogroupedKStream, CogroupedKStream → CogroupedKStream</text:span></text:p>
            <text:p text:style-name="P53"><text:span text:style-name="T123">KGroupedStream&lt;byte[], String&gt; groupedStream = stream.groupByKey();</text:span></text:p>
            <text:p text:style-name="P53"><text:span text:style-name="T123">KGroupedStream&lt;byte[], String&gt; groupedStream2 = stream2.groupByKey();</text:span></text:p>
            <text:p text:style-name="P53"><text:span text:style-name="T123">CogroupedKStream&lt;byte[], String&gt; cogroupedStream = groupedStream.cogroup(aggregator1).cogroup(groupedStream2, aggregator2);</text:span></text:p>
            <text:p text:style-name="P53"><text:span text:style-name="T122"/></text:p>
          </draw:text-box>
        </draw:frame>
        <draw:custom-shape draw:name="ZoneTexte 3" draw:style-name="gr14" draw:text-style-name="P23" draw:layer="layout" svg:width="11.179cm" svg:height="1.216cm" svg:x="1.769cm" svg:y="19.4cm">
          <text:p text:style-name="P22"><text:span text:style-name="T128">Atelier 3 : Opérateurs statel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page-thumbnail draw:name="Espace réservé de l'image des diapositives 38" draw:style-name="gr2" draw:layer="layout" svg:width="15.535cm" svg:height="10.984cm" svg:x="2.655cm" svg:y="2.258cm" draw:page-number="81" presentation:class="page"/>
          <draw:frame draw:name="Espace réservé des notes 44" presentation:style-name="pr94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82" draw:style-name="dp5" draw:master-page-name="Vide_5f__5f__5f_">
        <office:forms form:automatic-focus="false" form:apply-design-mode="false"/>
        <draw:frame draw:name="Titre 83" presentation:style-name="pr95" draw:text-style-name="P12" draw:layer="layout" svg:width="23.499cm" svg:height="3.506cm" svg:x="3.033cm" svg:y="2.402cm" presentation:class="title" presentation:user-transformed="true">
          <draw:text-box>
            <text:p text:style-name="P11"><text:span text:style-name="T9">KafkaStream</text:span></text:p>
          </draw:text-box>
        </draw:frame>
        <draw:frame draw:name="Sous-titre 8" presentation:style-name="pr96" draw:text-style-name="P14" draw:layer="layout" svg:width="23.499cm" svg:height="12.18cm" svg:x="3.033cm" svg:y="6.283cm" presentation:class="subtitle" presentation:user-transformed="true">
          <draw:text-box>
            <text:p text:style-name="P13"><text:span text:style-name="T10"/></text:p>
            <text:p text:style-name="P13"><text:span text:style-name="T10"/></text:p>
            <text:p text:style-name="P13"><text:span text:style-name="T10">Concepts</text:span></text:p>
            <text:p text:style-name="P13"><text:span text:style-name="T10">Démarrage</text:span></text:p>
            <text:p text:style-name="P26"><text:span text:style-name="T66">Configuration</text:span></text:p>
            <text:p text:style-name="P26"><text:span text:style-name="T66">Opérateurs stateless</text:span></text:p>
            <text:p text:style-name="P26"><text:span text:style-name="T22">Opérateurs stateful</text:span></text:p>
            <text:p text:style-name="P26"><text:span text:style-name="T66">Requêtes interactives</text:span></text:p>
          </draw:text-box>
        </draw:frame>
        <presentation:notes draw:style-name="dp6">
          <draw:custom-shape draw:name="Forme libre 8" draw:style-name="gr11" draw:text-style-name="P15" draw:layer="layout" svg:width="15.751cm" svg:height="11.138cm" svg:x="2.624cm" svg:y="2.227cm">
            <text:p/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frame draw:name="Espace réservé des notes 84" presentation:style-name="pr97" draw:text-style-name="P16" draw:layer="layout" svg:width="14.367cm" svg:height="11.259cm" svg:x="3.249cm" svg:y="14.129cm" presentation:class="notes" presentation:placeholder="true" presentation:user-transformed="true">
            <draw:text-box/>
          </draw:frame>
        </presentation:notes>
      </draw:page>
      <draw:page draw:name="page83" draw:style-name="dp5" draw:master-page-name="Vide">
        <office:forms form:automatic-focus="false" form:apply-design-mode="false"/>
        <draw:frame draw:name="Titre 50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Processeurs stateful</text:span></text:p>
          </draw:text-box>
        </draw:frame>
        <draw:frame draw:name="Espace réservé du texte 40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s opérateurs stateful disponibles sont :</text:span></text:p>
            <text:list text:style-name="L4">
              <text:list-item>
                <text:list>
                  <text:list-item>
                    <text:p><text:span text:style-name="T73">Les agrégations</text:span></text:p>
                    <text:list>
                      <text:list-item>
                        <text:p><text:span text:style-name="T73">En continue</text:span></text:p>
                      </text:list-item>
                      <text:list-item>
                        <text:p><text:span text:style-name="T73">Utilisant des fenêtres temporelles</text:span></text:p>
                      </text:list-item>
                    </text:list>
                  </text:list-item>
                  <text:list-item>
                    <text:p><text:span text:style-name="T73">Les jointures</text:span></text:p>
                    <text:list>
                      <text:list-item>
                        <text:p><text:span text:style-name="T73">Entre 2 Stream</text:span></text:p>
                      </text:list-item>
                      <text:list-item>
                        <text:p><text:span text:style-name="T73">Entre un Stream et une table</text:span></text:p>
                      </text:list-item>
                      <text:list-item>
                        <text:p><text:span text:style-name="T73">Entre 2 tables</text:span></text:p>
                      </text:list-item>
                    </text:list>
                    <text:p><text:span text:style-name="T73"/></text:p>
                  </text:list-item>
                </text:list>
              </text:list-item>
            </text:list>
            <text:p text:style-name="P20"><text:span text:style-name="T10"/></text:p>
          </draw:text-box>
        </draw:frame>
        <presentation:notes draw:style-name="dp6">
          <draw:page-thumbnail draw:name="Espace réservé de l'image des diapositives 42" draw:style-name="gr2" draw:layer="layout" svg:width="15.535cm" svg:height="10.984cm" svg:x="2.655cm" svg:y="2.258cm" draw:page-number="83" presentation:class="page"/>
          <draw:frame draw:name="Espace réservé des notes 49" presentation:style-name="pr98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rocesseurs stateful" draw:style-name="dp5" draw:master-page-name="Vide">
        <office:forms form:automatic-focus="false" form:apply-design-mode="false"/>
        <draw:frame draw:name="Titre 203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State Store associés</text:span></text:p>
          </draw:text-box>
        </draw:frame>
        <draw:frame draw:name="Espace réservé du texte 182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s opérateurs stateful nécessitent un StateStore associé ou pas à une fenêtre temporelle</text:span></text:p>
            <text:p text:style-name="P18"><text:span text:style-name="T10">Les StateStore sont spécifié via le paramètre </text:span><text:span text:style-name="T13">materialized</text:span><text:span text:style-name="T10">. </text:span></text:p>
            <text:p text:style-name="P18"><text:span text:style-name="T10">3 types de StateStore sont possibles :</text:span></text:p>
            <text:list text:style-name="L4">
              <text:list-item>
                <text:list>
                  <text:list-item>
                    <text:p><text:span text:style-name="T10">les agrégations non fenêtrées et les KTables non fenêtrées utilisent des </text:span><text:span text:style-name="T13">TimestampedKeyValueStores</text:span><text:span text:style-name="T10"> ou des </text:span><text:span text:style-name="T13">VersionedKeyValueStores</text:span><text:span text:style-name="T129">1</text:span></text:p>
                  </text:list-item>
                  <text:list-item>
                    <text:p><text:span text:style-name="T10">Les agrégations fenêtrées temporelles et les jointures </text:span><text:span text:style-name="T14">KStream-KStream</text:span><text:span text:style-name="T10"> utilisent des </text:span><text:span text:style-name="T13">TimestampedWindowStores</text:span></text:p>
                  </text:list-item>
                  <text:list-item>
                    <text:p><text:span text:style-name="T10">Les agrégations fenêtrées de session utilisent des </text:span><text:span text:style-name="T13">SessionStores</text:span><text:span text:style-name="T10"> </text:span></text:p>
                  </text:list-item>
                </text:list>
              </text:list-item>
              <text:list-item>
                <text:p><text:span text:style-name="T10">Les stateStore sont fault-tolerant</text:span></text:p>
              </text:list-item>
            </text:list>
          </draw:text-box>
        </draw:frame>
        <draw:frame draw:style-name="gr15" draw:text-style-name="P33" draw:layer="layout" svg:width="15.954cm" svg:height="1.096cm" svg:x="1.657cm" svg:y="19.777cm">
          <draw:text-box>
            <text:p><text:span text:style-name="T38">1. Les tables versionnées apportent des restrictions </text:span></text:p>
          </draw:text-box>
        </draw:frame>
        <presentation:notes draw:style-name="dp6">
          <draw:page-thumbnail draw:name="Espace réservé de l'image des diapositives 185" draw:style-name="gr2" draw:layer="layout" svg:width="15.535cm" svg:height="10.984cm" svg:x="2.655cm" svg:y="2.258cm" draw:page-number="84" presentation:class="page"/>
          <draw:frame draw:name="Espace réservé des notes 204" presentation:style-name="pr99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85" draw:style-name="dp5" draw:master-page-name="Vide">
        <office:forms form:automatic-focus="false" form:apply-design-mode="false"/>
        <draw:frame draw:name="Titre 52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Agrégations</text:span></text:p>
          </draw:text-box>
        </draw:frame>
        <draw:frame draw:name="Espace réservé du texte 43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20"><text:span text:style-name="T10">Pour appliquer une agrégation, il est généralement nécessaire de grouper les enregistrement avec les opérateurs stateless </text:span><text:span text:style-name="T13">GroupBy*</text:span></text:p>
            <text:p text:style-name="P20"><text:span text:style-name="T10">Ces opérateurs génèrent :</text:span></text:p>
            <text:list text:style-name="L4">
              <text:list-item>
                <text:list>
                  <text:list-item>
                    <text:p><text:span text:style-name="T10">Un </text:span><text:span text:style-name="T13">KGroupedStream</text:span><text:span text:style-name="T10"> si appliqués sur un KStream</text:span></text:p>
                  </text:list-item>
                  <text:list-item>
                    <text:p><text:span text:style-name="T10">Un </text:span><text:span text:style-name="T13">KGroupedTable</text:span><text:span text:style-name="T10"> si appliqués sur une KTable</text:span></text:p>
                  </text:list-item>
                </text:list>
              </text:list-item>
            </text:list>
            <text:p><text:span text:style-name="T10">Ces opérateurs ont pour effet de repartitionner le flux en fonction de la nouvelle clé.</text:span></text:p>
            <text:p text:style-name="P20"><text:span text:style-name="T10"/></text:p>
          </draw:text-box>
        </draw:frame>
        <presentation:notes draw:style-name="dp6">
          <draw:page-thumbnail draw:name="Espace réservé de l'image des diapositives 45" draw:style-name="gr2" draw:layer="layout" svg:width="15.535cm" svg:height="10.984cm" svg:x="2.655cm" svg:y="2.258cm" draw:page-number="85" presentation:class="page"/>
          <draw:frame draw:name="Espace réservé des notes 52" presentation:style-name="pr100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Quelques processeurs stateful" draw:style-name="dp5" draw:master-page-name="Vide">
        <office:forms form:automatic-focus="false" form:apply-design-mode="false"/>
        <draw:frame draw:name="Titre 205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55"><text:span text:style-name="T12">Opérations d’agrégation</text:span></text:p>
          </draw:text-box>
        </draw:frame>
        <draw:frame draw:name="Espace réservé du texte 184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70">count</text:span><text:span text:style-name="T10"> : A partir d’un </text:span><text:span text:style-name="T14">Grouped*</text:span><text:span text:style-name="T10">, compte les enregistrements</text:span></text:p>
            <text:p text:style-name="P18"><text:span text:style-name="T120">agregate </text:span><text:span text:style-name="T10">: A partir d’un </text:span><text:span text:style-name="T14">Grouped*</text:span><text:span text:style-name="T10">, agrège les enregistrements. Prend en arguments :</text:span></text:p>
            <text:list text:style-name="L4">
              <text:list-item>
                <text:list>
                  <text:list-item>
                    <text:p><text:span text:style-name="T10">La valeur initiale de l’agrégation</text:span></text:p>
                  </text:list-item>
                  <text:list-item>
                    <text:p><text:span text:style-name="T10">La fonction d’agrégation (lambda)</text:span></text:p>
                  </text:list-item>
                  <text:list-item>
                    <text:p><text:span text:style-name="T10">Le store via Materialized et le Serde permettant de sérialiser la valeur agrégée</text:span></text:p>
                  </text:list-item>
                </text:list>
              </text:list-item>
            </text:list>
            <text:p text:style-name="P18"><text:span text:style-name="T120">reduce</text:span><text:span text:style-name="T10"> : A partir d’un </text:span><text:span text:style-name="T14">GroupedStream</text:span><text:span text:style-name="T10">, L'enregistrement courant est combiné avec la dernière valeur réduite et une nouvelle valeur réduite est renvoyée. Le type de valeur de résultat ne peut pas être modifié.</text:span><text:span text:style-name="T10"><text:line-break/></text:span><text:span text:style-name="T10">Lorsque l’on applique à un KGroupedTable, il faut en plus fournir un substractor qui s’applique lorsque un enregistrement change de groupe</text:span></text:p>
          </draw:text-box>
        </draw:frame>
        <presentation:notes draw:style-name="dp6">
          <draw:page-thumbnail draw:name="Espace réservé de l'image des diapositives 187" draw:style-name="gr2" draw:layer="layout" svg:width="15.535cm" svg:height="10.984cm" svg:x="2.655cm" svg:y="2.258cm" draw:page-number="86" presentation:class="page"/>
          <draw:frame draw:name="Espace réservé des notes 206" presentation:style-name="pr101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Types de store" draw:style-name="dp5" draw:master-page-name="Vide">
        <office:forms form:automatic-focus="false" form:apply-design-mode="false"/>
        <draw:frame draw:name="Titre 204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56"><text:span text:style-name="T130">Exemple count</text:span></text:p>
          </draw:text-box>
        </draw:frame>
        <draw:frame draw:name="Espace réservé du texte 183" presentation:style-name="pr11" draw:text-style-name="P57" draw:layer="layout" svg:width="23.499cm" svg:height="12.18cm" svg:x="3.033cm" svg:y="6.283cm" presentation:class="outline" presentation:user-transformed="true">
          <draw:text-box>
            <text:p text:style-name="P18"><text:span text:style-name="T131">KStream&lt;String, String&gt; textLines = ...;</text:span></text:p>
            <text:p text:style-name="P18"><text:span text:style-name="T102"/></text:p>
            <text:p text:style-name="P18"><text:span text:style-name="T131">KStream&lt;String, Long&gt; wordCounts = textLines</text:span></text:p>
            <text:p text:style-name="P18"><text:span text:style-name="T131"><text:s text:c="4"/></text:span><text:span text:style-name="T131">.flatMapValues(value -&gt; </text:span><text:span text:style-name="T131"><text:line-break/></text:span><text:span text:style-name="T131"> <text:s text:c="14"/>Arrays.asList(value.toLowerCase().split("\\W+")))</text:span></text:p>
            <text:p text:style-name="P18"><text:span text:style-name="T132"><text:s text:c="4"/></text:span><text:span text:style-name="T132">// Groupe le flux, la clé est word.</text:span></text:p>
            <text:p text:style-name="P18"><text:span text:style-name="T133"><text:s text:c="4"/></text:span><text:span text:style-name="T133">.groupBy((key, word) -&gt; word)</text:span></text:p>
            <text:p text:style-name="P18"><text:span text:style-name="T132"><text:s text:c="4"/></text:span><text:span text:style-name="T132">// Count l’occurrence de chaque mot</text:span></text:p>
            <text:p text:style-name="P18"><text:span text:style-name="T132"><text:s text:c="4"/></text:span><text:span text:style-name="T132">// `KGroupedStream&lt;String, String&gt;` devient `KTable&lt;String, Long&gt;` .</text:span></text:p>
            <text:p text:style-name="P18"><text:span text:style-name="T133"><text:s text:c="4"/></text:span><text:span text:style-name="T133">.count()</text:span></text:p>
            <text:p text:style-name="P18"><text:span text:style-name="T132"><text:s text:c="4"/></text:span><text:span text:style-name="T132">// Convertit the `KTable&lt;String, Long&gt;` into a `KStream&lt;String, Long&gt;`.</text:span></text:p>
            <text:p text:style-name="P18"><text:span text:style-name="T131"><text:s text:c="4"/></text:span><text:span text:style-name="T131">.toStream();</text:span></text:p>
          </draw:text-box>
        </draw:frame>
        <presentation:notes draw:style-name="dp6">
          <draw:page-thumbnail draw:name="Espace réservé de l'image des diapositives 186" draw:style-name="gr2" draw:layer="layout" svg:width="15.535cm" svg:height="10.984cm" svg:x="2.655cm" svg:y="2.258cm" draw:page-number="87" presentation:class="page"/>
          <draw:frame draw:name="Espace réservé des notes 205" presentation:style-name="pr102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88" draw:style-name="dp5" draw:master-page-name="Vide">
        <office:forms form:automatic-focus="false" form:apply-design-mode="false"/>
        <draw:frame draw:name="Titre 55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56"><text:span text:style-name="T130">Agrégation en continu</text:span></text:p>
          </draw:text-box>
        </draw:frame>
        <draw:frame draw:name="Espace réservé du texte 46" presentation:style-name="pr11" draw:text-style-name="P57" draw:layer="layout" svg:width="23.499cm" svg:height="12.18cm" svg:x="3.033cm" svg:y="6.283cm" presentation:class="outline" presentation:user-transformed="true">
          <draw:text-box>
            <text:p text:style-name="P18"><text:span text:style-name="T134">KGroupedStream&lt;byte[], String&gt; groupedStream = ...;</text:span></text:p>
            <text:p text:style-name="P18"><text:span text:style-name="T131"/></text:p>
            <text:p text:style-name="P18"><text:span text:style-name="T135">// Aggregating a KGroupedStream </text:span></text:p>
            <text:p text:style-name="P18"><text:span text:style-name="T134">KTable&lt;byte[], Long&gt; aggregatedStream = groupedStream.aggregate(</text:span></text:p>
            <text:p text:style-name="P18"><text:span text:style-name="T134"><text:s text:c="4"/></text:span><text:span text:style-name="T134">() -&gt; 0L, </text:span><text:span text:style-name="T135">/* Initialisation */</text:span></text:p>
            <text:p text:style-name="P18"><text:span text:style-name="T134"><text:s text:c="4"/></text:span><text:span text:style-name="T134">(aggKey, newValue, aggValue) -&gt; </text:span><text:span text:style-name="T134"><text:line-break/></text:span><text:span text:style-name="T134"> <text:s text:c="8"/>aggValue + newValue.length(),</text:span><text:span text:style-name="T135"> /* Ajout */</text:span></text:p>
            <text:p text:style-name="P18"><text:span text:style-name="T134"><text:s text:c="4"/></text:span><text:span text:style-name="T134">Materialized.&lt;String, Long, KeyValueStore&lt;Bytes, byte[]&gt;&gt;</text:span><text:span text:style-name="T134"><text:line-break/></text:span><text:span text:style-name="T134"> <text:s text:c="4"/>as("aggregated-stream-store") </text:span><text:span text:style-name="T135">/* Nom du stateStore */</text:span></text:p>
            <text:p text:style-name="P18"><text:span text:style-name="T134"><text:s text:c="8"/></text:span><text:span text:style-name="T134">.withValueSerde(Serdes.Long()); </text:span><text:span text:style-name="T135">/* serde pour la valeur agrégée*/</text:span></text:p>
          </draw:text-box>
        </draw:frame>
        <presentation:notes draw:style-name="dp6">
          <draw:page-thumbnail draw:name="Espace réservé de l'image des diapositives 48" draw:style-name="gr2" draw:layer="layout" svg:width="15.535cm" svg:height="10.984cm" svg:x="2.655cm" svg:y="2.258cm" draw:page-number="88" presentation:class="page"/>
          <draw:frame draw:name="Espace réservé des notes 55" presentation:style-name="pr103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89" draw:style-name="dp5" draw:master-page-name="Vide_5f_">
        <office:forms form:automatic-focus="false" form:apply-design-mode="false"/>
        <draw:frame draw:name="Titre 77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Fenêtrage</text:span></text:p>
          </draw:text-box>
        </draw:frame>
        <draw:frame draw:name="Espace réservé du texte 68" presentation:style-name="pr24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 regroupement par clé garantit que les données sont correctement partitionnées. </text:span></text:p>
            <text:p text:style-name="P18"><text:span text:style-name="T10">Une fois groupées par clé, le fenêtrage permet de sous-regrouper davantage les enregistrements d'une même clé.</text:span></text:p>
            <text:p text:style-name="P20"><text:span text:style-name="T136">Les informations fenêtres valeurs sont stockées dans un </text:span><text:span text:style-name="T13">WindowedStateStore</text:span></text:p>
            <text:list text:style-name="L4">
              <text:list-item>
                <text:list>
                  <text:list-item>
                    <text:p><text:span text:style-name="T10">Dans les opérations de jointure, il est utilisé pour stocker tous les enregistrements reçus jusqu'à présent dans la limite de la fenêtre définie. </text:span></text:p>
                  </text:list-item>
                  <text:list-item>
                    <text:p><text:span text:style-name="T136">Dans les opérations d'agrégation, il</text:span><text:span text:style-name="T10"> est utilisé pour stocker les derniers résultats d'agrégation par fenêtre.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name="Espace réservé de l'image des diapositives 70" draw:style-name="gr2" draw:layer="layout" svg:width="15.535cm" svg:height="10.984cm" svg:x="2.655cm" svg:y="2.258cm" draw:page-number="89" presentation:class="page"/>
          <draw:frame draw:name="Espace réservé des notes 77" presentation:style-name="pr104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Jointures" draw:style-name="dp5" draw:master-page-name="Vide_5f_">
        <office:forms form:automatic-focus="false" form:apply-design-mode="false"/>
        <draw:frame draw:name="Titre 207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Types de fenêtres</text:span></text:p>
          </draw:text-box>
        </draw:frame>
        <draw:frame draw:name="Espace réservé du texte 74" presentation:style-name="pr24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 DSL supporte différents types de fenêtres :</text:span></text:p>
            <text:list text:style-name="L4">
              <text:list-item>
                <text:list>
                  <text:list-item>
                    <text:p><text:span text:style-name="T13">Hopping time</text:span><text:span text:style-name="T10"> : </text:span><text:span text:style-name="T10"><text:tab/></text:span><text:span text:style-name="T10">Fenêtres de taille fixe qui se chevauchent définie par une taille et un pas d’avancement</text:span></text:p>
                  </text:list-item>
                  <text:list-item>
                    <text:p><text:span text:style-name="T137">Tumbling</text:span><text:span text:style-name="T10"> </text:span><text:span text:style-name="T137">time</text:span><text:span text:style-name="T10"> : Fenêtres de taille fixe, sans chevauchement et sans espace définies juste par leur taille</text:span></text:p>
                  </text:list-item>
                  <text:list-item>
                    <text:p><text:span text:style-name="T137">Sliding</text:span><text:span text:style-name="T10"> </text:span><text:span text:style-name="T137">time</text:span><text:span text:style-name="T10"> : Fenêtres de taille fixe se chevauchant et qui qui fonctionnent sur les différences entre les horodatages d'enregistrement.</text:span><text:span text:style-name="T10"><text:line-break/></text:span><text:span text:style-name="T10">2 enregistrements sont dans la même fenêtre si le différence de timestamp est inférieure à la taille de la fenêtre</text:span></text:p>
                  </text:list-item>
                  <text:list-item>
                    <text:p><text:span text:style-name="T137">Session</text:span><text:span text:style-name="T10"> : Fenêtres de taille dynamique, sans chevauchement et pilotées par les données. </text:span><text:span text:style-name="T10"><text:line-break/></text:span><text:span text:style-name="T10">Timeout d’inactivité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name="Espace réservé de l'image des diapositives 189" draw:style-name="gr2" draw:layer="layout" svg:width="15.535cm" svg:height="10.984cm" svg:x="2.655cm" svg:y="2.258cm" draw:page-number="90" presentation:class="page"/>
          <draw:frame draw:name="Espace réservé des notes 83" presentation:style-name="pr105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91" draw:style-name="dp5" draw:master-page-name="Vide">
        <office:forms form:automatic-focus="false" form:apply-design-mode="false"/>
        <draw:frame draw:name="Titre 56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56"><text:span text:style-name="T130">Agrégation avec fenêtrage</text:span></text:p>
          </draw:text-box>
        </draw:frame>
        <draw:frame draw:name="Espace réservé du texte 47" presentation:style-name="pr11" draw:text-style-name="P57" draw:layer="layout" svg:width="23.499cm" svg:height="12.18cm" svg:x="3.033cm" svg:y="6.283cm" presentation:class="outline" presentation:user-transformed="true">
          <draw:text-box>
            <text:p text:style-name="P18"><text:span text:style-name="T134">KGroupedStream&lt;byte[], String&gt; groupedStream = ...;</text:span></text:p>
            <text:p text:style-name="P18"><text:span text:style-name="T131"/></text:p>
            <text:p text:style-name="P18"><text:span text:style-name="T135">// Aggregation avec des fenêtres basculant tous les 5 minutes</text:span></text:p>
            <text:p text:style-name="P18"><text:span text:style-name="T134">KTable&lt;</text:span><text:span text:style-name="T138">Windowed&lt;String&gt;</text:span><text:span text:style-name="T134">, Long&gt; timeWindowedAggregatedStream = groupedStream</text:span><text:span text:style-name="T138">.windowedBy(Duration.ofMinutes(5))</text:span></text:p>
            <text:p text:style-name="P18"><text:span text:style-name="T134"><text:s text:c="4"/></text:span><text:span text:style-name="T134">.</text:span><text:span text:style-name="T138">aggregate</text:span><text:span text:style-name="T134">(</text:span></text:p>
            <text:p text:style-name="P18"><text:span text:style-name="T134"><text:s text:c="8"/></text:span><text:span text:style-name="T134">() -&gt; 0L, </text:span></text:p>
            <text:p text:style-name="P18"><text:span text:style-name="T134"><text:s text:c="8"/></text:span><text:span text:style-name="T134">(aggKey, newValue, aggValue) -&gt; aggValue + newValue, </text:span></text:p>
            <text:p text:style-name="P18"><text:span text:style-name="T134"><text:s text:c="8"/></text:span><text:span text:style-name="T134">Materialized.&lt;String, Long, WindowStore&lt;Bytes, byte[]&gt;&gt;</text:span><text:span text:style-name="T134"><text:line-break/></text:span><text:span text:style-name="T134"> <text:s text:c="6"/>as("time-windowed-aggregated-stream-store") </text:span></text:p>
            <text:p text:style-name="P18"><text:span text:style-name="T134"><text:s text:c="8"/></text:span><text:span text:style-name="T134">.withValueSerde(Serdes.Long()));</text:span></text:p>
          </draw:text-box>
        </draw:frame>
        <presentation:notes draw:style-name="dp6">
          <draw:page-thumbnail draw:name="Espace réservé de l'image des diapositives 49" draw:style-name="gr2" draw:layer="layout" svg:width="15.535cm" svg:height="10.984cm" svg:x="2.655cm" svg:y="2.258cm" draw:page-number="91" presentation:class="page"/>
          <draw:frame draw:name="Espace réservé des notes 56" presentation:style-name="pr106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92" draw:style-name="dp5" draw:master-page-name="Vide">
        <office:forms form:automatic-focus="false" form:apply-design-mode="false"/>
        <draw:frame draw:name="Titre 57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56"><text:span text:style-name="T130">Reduce </text:span></text:p>
          </draw:text-box>
        </draw:frame>
        <draw:frame draw:name="Espace réservé du texte 48" presentation:style-name="pr11" draw:text-style-name="P57" draw:layer="layout" svg:width="23.499cm" svg:height="12.18cm" svg:x="3.033cm" svg:y="6.283cm" presentation:class="outline" presentation:user-transformed="true">
          <draw:text-box>
            <text:p text:style-name="P18"><text:span text:style-name="T134">KGroupedTable&lt;String, Long&gt; groupedTable = ...;</text:span></text:p>
            <text:p text:style-name="P18"><text:span text:style-name="T134"/></text:p>
            <text:p text:style-name="P18"><text:span text:style-name="T134"/></text:p>
            <text:p text:style-name="P18"><text:span text:style-name="T135">// KGroupedStream</text:span></text:p>
            <text:p text:style-name="P18"><text:span text:style-name="T134">KTable&lt;String, Long&gt; aggregatedStream = groupedStream.reduce(</text:span></text:p>
            <text:p text:style-name="P18"><text:span text:style-name="T134"><text:s text:c="4"/></text:span><text:span text:style-name="T134">(aggValue, newValue) -&gt; aggValue + newValue /* adder */);</text:span></text:p>
            <text:p text:style-name="P18"><text:span text:style-name="T134"/></text:p>
            <text:p text:style-name="P18"><text:span text:style-name="T135">// KgroupedTable, utilisation d’un substractor pour mettre à jour un </text:span></text:p>
            <text:p text:style-name="P18"><text:span text:style-name="T135">// changement de groupe</text:span></text:p>
            <text:p text:style-name="P18"><text:span text:style-name="T134">KTable&lt;String, Long&gt; aggregatedTable = groupedTable.reduce(</text:span></text:p>
            <text:p text:style-name="P18"><text:span text:style-name="T134"><text:s text:c="4"/></text:span><text:span text:style-name="T134">(aggValue, newValue) -&gt; aggValue + newValue, /* adder */</text:span></text:p>
            <text:p text:style-name="P18"><text:span text:style-name="T134"><text:s text:c="4"/></text:span><text:span text:style-name="T134">(aggValue, oldValue) -&gt; aggValue - oldValue /* subtractor */);</text:span></text:p>
          </draw:text-box>
        </draw:frame>
        <presentation:notes draw:style-name="dp6">
          <draw:page-thumbnail draw:name="Espace réservé de l'image des diapositives 50" draw:style-name="gr2" draw:layer="layout" svg:width="15.535cm" svg:height="10.984cm" svg:x="2.655cm" svg:y="2.258cm" draw:page-number="92" presentation:class="page"/>
          <draw:frame draw:name="Espace réservé des notes 57" presentation:style-name="pr107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93" draw:style-name="dp5" draw:master-page-name="Vide">
        <office:forms form:automatic-focus="false" form:apply-design-mode="false"/>
        <draw:frame draw:style-name="gr16" draw:text-style-name="P58" draw:layer="layout" svg:width="26.008cm" svg:height="19.949cm" svg:x="1.882cm" svg:y="0.528cm">
          <draw:image xlink:href="Pictures/10000001000003D7000002F216B6367B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9.799cm" svg:height="11.136cm" svg:x="0.6cm" svg:y="2.257cm" draw:page-number="93" presentation:class="page"/>
          <draw:frame presentation:style-name="pr10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4" draw:style-name="dp5" draw:master-page-name="Vide">
        <office:forms form:automatic-focus="false" form:apply-design-mode="false"/>
        <draw:frame draw:name="Titre 54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Topics internes</text:span></text:p>
          </draw:text-box>
        </draw:frame>
        <draw:frame draw:name="Espace réservé du texte 45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31"><text:span text:style-name="T10">Lors d’opérations d'agrégation, des topics internes appelés </text:span><text:span text:style-name="T13">changelog</text:span><text:span text:style-name="T10"> et </text:span><text:span text:style-name="T103">repartition</text:span><text:span text:style-name="T10"> sont créés automatiquement. </text:span></text:p>
            <text:p text:style-name="P18"><text:span text:style-name="T10">Ils servent à assurer la durabilité, la tolérance aux pannes et à faciliter le traitement distribué. </text:span></text:p>
            <text:list text:style-name="L11">
              <text:list-item>
                <text:list>
                  <text:list-item>
                    <text:p text:style-name="P43"><text:span text:style-name="T76">changelog</text:span><text:span text:style-name="T73"> stocke durablement les modifications apportées à un (state store) associé à une </text:span><text:span text:style-name="T72">KTable</text:span><text:span text:style-name="T73"> ou à une agrégation. Il permet de reconstituer le Store en cas de défaillance ou lors d'un redémarrage </text:span></text:p>
                  </text:list-item>
                  <text:list-item>
                    <text:p text:style-name="P43"><text:span text:style-name="T76">repartition</text:span><text:span text:style-name="T73"> est utilisés lorsque les données doivent être re-partitionnées en fonction d'une nouvelle clé. (clé différente de la clé de partitionnement d'origine)</text:span></text:p>
                  </text:list-item>
                </text:list>
              </text:list-item>
            </text:list>
          </draw:text-box>
        </draw:frame>
        <draw:custom-shape draw:name="ZoneTexte 1" draw:style-name="gr17" draw:text-style-name="P23" draw:layer="layout" svg:width="8.428cm" svg:height="1.216cm" svg:x="0.662cm" svg:y="19.533cm">
          <text:p text:style-name="P22"><text:span text:style-name="T128">Atelier 4 : Agrég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page-thumbnail draw:name="Espace réservé de l'image des diapositives 47" draw:style-name="gr2" draw:layer="layout" svg:width="15.535cm" svg:height="10.984cm" svg:x="2.655cm" svg:y="2.258cm" draw:page-number="94" presentation:class="page"/>
          <draw:frame draw:name="Espace réservé des notes 54" presentation:style-name="pr109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95" draw:style-name="dp5" draw:master-page-name="Vide">
        <office:forms form:automatic-focus="false" form:apply-design-mode="false"/>
        <draw:frame draw:name="Titre 53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Jointures</text:span></text:p>
          </draw:text-box>
        </draw:frame>
        <draw:frame draw:name="Espace réservé du texte 44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20"><text:span text:style-name="T10">Les jointures peuvent s’appliquer :</text:span></text:p>
            <text:list text:style-name="L4">
              <text:list-item>
                <text:list>
                  <text:list-item>
                    <text:p><text:span text:style-name="T10">Entre 2 stream, le fenêtrage s’applique. </text:span><text:span text:style-name="T10"><text:line-break/></text:span><text:span text:style-name="T10">Le résultat est un </text:span><text:span text:style-name="T14">KStream</text:span></text:p>
                  </text:list-item>
                  <text:list-item>
                    <text:p><text:span text:style-name="T10">Entre un Stream et une KTable, pas de fenêtrage. </text:span><text:span text:style-name="T10"><text:line-break/></text:span><text:span text:style-name="T10">Le résultat est un </text:span><text:span text:style-name="T14">KStream</text:span></text:p>
                  </text:list-item>
                  <text:list-item>
                    <text:p><text:span text:style-name="T10">Entre 2 tables, pas de fenêtrage. </text:span><text:span text:style-name="T10"><text:line-break/></text:span><text:span text:style-name="T10">Le résultat est une KTable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name="Espace réservé de l'image des diapositives 46" draw:style-name="gr2" draw:layer="layout" svg:width="15.535cm" svg:height="10.984cm" svg:x="2.655cm" svg:y="2.258cm" draw:page-number="95" presentation:class="page"/>
          <draw:frame draw:name="Espace réservé des notes 53" presentation:style-name="pr110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96" draw:style-name="dp5" draw:master-page-name="Vide">
        <office:forms form:automatic-focus="false" form:apply-design-mode="false"/>
        <draw:frame draw:name="Titre 70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Pré-requis pour les jointures</text:span></text:p>
          </draw:text-box>
        </draw:frame>
        <draw:frame draw:name="Espace réservé du texte 61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Pour la plupart des jointures, les données d'entrée doivent être copartitionnées. </text:span></text:p>
            <text:list text:style-name="L4">
              <text:list-item>
                <text:list>
                  <text:list-item>
                    <text:p><text:span text:style-name="T10">Cela garantit que les enregistrements d'entrée avec la même clé des deux côtés de la jointure sont transmis à la même tâche de flux pendant le traitement.</text:span></text:p>
                  </text:list-item>
                </text:list>
              </text:list-item>
            </text:list>
            <text:p text:style-name="P18"><text:span text:style-name="T10"/></text:p>
            <text:p text:style-name="P18"><text:span text:style-name="T10">Cette contrainte n’est pas requise pour les jointures vers les </text:span><text:span text:style-name="T14">GlobalKTable</text:span><text:span text:style-name="T10"> ou avec les clé-étrangères</text:span></text:p>
          </draw:text-box>
        </draw:frame>
        <presentation:notes draw:style-name="dp6">
          <draw:page-thumbnail draw:name="Espace réservé de l'image des diapositives 63" draw:style-name="gr2" draw:layer="layout" svg:width="15.535cm" svg:height="10.984cm" svg:x="2.655cm" svg:y="2.258cm" draw:page-number="96" presentation:class="page"/>
          <draw:frame draw:name="Espace réservé des notes 66" presentation:style-name="pr111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97" draw:style-name="dp5" draw:master-page-name="Vide">
        <office:forms form:automatic-focus="false" form:apply-design-mode="false"/>
        <draw:frame draw:name="Titre 71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Jointure KStream / KStream</text:span></text:p>
          </draw:text-box>
        </draw:frame>
        <draw:frame draw:name="Espace réservé du texte 62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Ces jointures sont toujours fenêtrées.</text:span></text:p>
            <text:p text:style-name="P18"><text:span text:style-name="T10">Chaque nouvel enregistrement d’un des topics produira une sortie de jointure pour chaque enregistrement correspondant de l'autre côté.</text:span></text:p>
            <text:p text:style-name="P18"><text:span text:style-name="T10">Les enregistrements de sortie de jointure sont créés avec un </text:span><text:span text:style-name="T13">ValueJoiner</text:span><text:span text:style-name="T10"> fourni par l'utilisateur :</text:span></text:p>
            <text:p text:style-name="P53"><text:span text:style-name="T139">KeyValue&lt;K, LV&gt; leftRecord = ...;</text:span></text:p>
            <text:p text:style-name="P53"><text:span text:style-name="T139">KeyValue&lt;K, RV&gt; rightRecord = ...;</text:span></text:p>
            <text:p text:style-name="P53"><text:span text:style-name="T139">ValueJoiner&lt;LV, RV, JV&gt; joiner = ...;</text:span></text:p>
            <text:p text:style-name="P53"><text:span text:style-name="T102"/></text:p>
            <text:p text:style-name="P53"><text:span text:style-name="T139">KeyValue&lt;K, JV&gt; joinOutputRecord = KeyValue.pair(</text:span></text:p>
            <text:p text:style-name="P53"><text:span text:style-name="T139"><text:s text:c="4"/></text:span><text:span text:style-name="T139">leftRecord.key,</text:span></text:p>
            <text:p text:style-name="P53"><text:span text:style-name="T139"><text:s text:c="4"/></text:span><text:span text:style-name="T139">joiner.apply(leftRecord.value, rightRecord.value)</text:span></text:p>
            <text:p text:style-name="P53"><text:span text:style-name="T139"><text:s text:c="2"/></text:span><text:span text:style-name="T139">);</text:span></text:p>
            <text:p text:style-name="P53"><text:span text:style-name="T102"/></text:p>
          </draw:text-box>
        </draw:frame>
        <presentation:notes draw:style-name="dp6">
          <draw:page-thumbnail draw:name="Espace réservé de l'image des diapositives 64" draw:style-name="gr2" draw:layer="layout" svg:width="15.535cm" svg:height="10.984cm" svg:x="2.655cm" svg:y="2.258cm" draw:page-number="97" presentation:class="page"/>
          <draw:frame draw:name="Espace réservé des notes 71" presentation:style-name="pr112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98" draw:style-name="dp5" draw:master-page-name="Vide">
        <office:forms form:automatic-focus="false" form:apply-design-mode="false"/>
        <draw:frame draw:name="Titre 75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Exemple Inner Join</text:span></text:p>
          </draw:text-box>
        </draw:frame>
        <draw:frame draw:name="Espace réservé du texte 66" presentation:style-name="pr11" draw:text-style-name="P59" draw:layer="layout" svg:width="23.499cm" svg:height="12.18cm" svg:x="3.033cm" svg:y="6.283cm" presentation:class="outline" presentation:user-transformed="true">
          <draw:text-box>
            <text:p text:style-name="P53"><text:span text:style-name="T140">KStream&lt;String, Long&gt; left = ...;</text:span></text:p>
            <text:p text:style-name="P53"><text:span text:style-name="T140">KStream&lt;String, Double&gt; right = ...;</text:span></text:p>
            <text:p text:style-name="P53"><text:span text:style-name="T139"/></text:p>
            <text:p text:style-name="P54"><text:span text:style-name="T141">// Jointure leftRecord.key == rightRecord.key pour une fenêtre de 5mn</text:span></text:p>
            <text:p text:style-name="P53"><text:span text:style-name="T140">KStream&lt;String, String&gt; joined = left.join(right,</text:span></text:p>
            <text:p text:style-name="P53"><text:span text:style-name="T142"><text:s text:c="4"/></text:span><text:span text:style-name="T142">// Valeur résultante : Value Joiner</text:span></text:p>
            <text:p text:style-name="P53"><text:span text:style-name="T140"><text:s text:c="4"/></text:span><text:span text:style-name="T140">(leftValue, rightValue) -&gt; "left=" + leftValue + ", right=" + rightValue, </text:span></text:p>
            <text:p text:style-name="P53"><text:span text:style-name="T140"><text:s text:c="4"/></text:span><text:span text:style-name="T140">JoinWindows.ofTimeDifferenceWithNoGrace(Duration.ofMinutes(5)),</text:span></text:p>
            <text:p text:style-name="P53"><text:span text:style-name="T140"><text:s text:c="4"/></text:span><text:span text:style-name="T140">Joined.with(</text:span></text:p>
            <text:p text:style-name="P53"><text:span text:style-name="T140"><text:s text:c="6"/></text:span><text:span text:style-name="T140">Serdes.String(), </text:span><text:span text:style-name="T142">/* key */</text:span></text:p>
            <text:p text:style-name="P53"><text:span text:style-name="T140"><text:s text:c="6"/></text:span><text:span text:style-name="T140">Serdes.Long(), <text:s text:c="2"/></text:span><text:span text:style-name="T142">/* left value */</text:span></text:p>
            <text:p text:style-name="P53"><text:span text:style-name="T140"><text:s text:c="6"/></text:span><text:span text:style-name="T140">Serdes.Double()) <text:s/></text:span><text:span text:style-name="T142">/* right value */</text:span></text:p>
            <text:p text:style-name="P53"><text:span text:style-name="T140"><text:s text:c="2"/></text:span><text:span text:style-name="T140">);</text:span></text:p>
          </draw:text-box>
        </draw:frame>
        <presentation:notes draw:style-name="dp6">
          <draw:page-thumbnail draw:name="Espace réservé de l'image des diapositives 68" draw:style-name="gr2" draw:layer="layout" svg:width="15.535cm" svg:height="10.984cm" svg:x="2.655cm" svg:y="2.258cm" draw:page-number="98" presentation:class="page"/>
          <draw:frame draw:name="Espace réservé des notes 73" presentation:style-name="pr113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99" draw:style-name="dp5" draw:master-page-name="Vide">
        <office:forms form:automatic-focus="false" form:apply-design-mode="false"/>
        <draw:frame draw:name="Titre 76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Exemple Outer Join</text:span></text:p>
          </draw:text-box>
        </draw:frame>
        <draw:frame draw:name="Espace réservé du texte 67" presentation:style-name="pr11" draw:text-style-name="P59" draw:layer="layout" svg:width="23.499cm" svg:height="12.18cm" svg:x="3.033cm" svg:y="6.283cm" presentation:class="outline" presentation:user-transformed="true">
          <draw:text-box>
            <text:p text:style-name="P53"><text:span text:style-name="T140">KStream&lt;String, Long&gt; left = ...;</text:span></text:p>
            <text:p text:style-name="P53"><text:span text:style-name="T140">KStream&lt;String, Double&gt; right = ...;</text:span></text:p>
            <text:p text:style-name="P53"><text:span text:style-name="T140"/></text:p>
            <text:p text:style-name="P53"><text:span text:style-name="T142">// Les enregistrements arrivant à droite et n’ayant pas de correspondance à gauche</text:span></text:p>
            <text:p text:style-name="P53"><text:span text:style-name="T142">// génèrent une valeur avec leftValue = null</text:span></text:p>
            <text:p text:style-name="P53"><text:span text:style-name="T140">KStream&lt;String, String&gt; joined = left.outerJoin(right,</text:span></text:p>
            <text:p text:style-name="P53"><text:span text:style-name="T140"><text:s text:c="4"/></text:span><text:span text:style-name="T140">(leftValue, rightValue) -&gt; "left=" + leftValue + ", right=" + rightValue, /* ValueJoiner */</text:span></text:p>
            <text:p text:style-name="P53"><text:span text:style-name="T140"><text:s text:c="4"/></text:span><text:span text:style-name="T140">JoinWindows.ofTimeDifferenceWithNoGrace(Duration.ofMinutes(5)),</text:span></text:p>
            <text:p text:style-name="P53"><text:span text:style-name="T140"><text:s text:c="4"/></text:span><text:span text:style-name="T140">Joined.with(</text:span></text:p>
            <text:p text:style-name="P53"><text:span text:style-name="T140"><text:s text:c="6"/></text:span><text:span text:style-name="T140">Serdes.String(), /* key */</text:span></text:p>
            <text:p text:style-name="P53"><text:span text:style-name="T140"><text:s text:c="6"/></text:span><text:span text:style-name="T140">Serdes.Long(), <text:s text:c="2"/>/* left value */</text:span></text:p>
            <text:p text:style-name="P53"><text:span text:style-name="T140"><text:s text:c="6"/></text:span><text:span text:style-name="T140">Serdes.Double()) <text:s/>/* right value */</text:span></text:p>
          </draw:text-box>
        </draw:frame>
        <presentation:notes draw:style-name="dp6">
          <draw:page-thumbnail draw:name="Espace réservé de l'image des diapositives 69" draw:style-name="gr2" draw:layer="layout" svg:width="15.535cm" svg:height="10.984cm" svg:x="2.655cm" svg:y="2.258cm" draw:page-number="99" presentation:class="page"/>
          <draw:frame draw:name="Espace réservé des notes 76" presentation:style-name="pr114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00" draw:style-name="dp5" draw:master-page-name="Vide">
        <office:forms form:automatic-focus="false" form:apply-design-mode="false"/>
        <draw:frame draw:name="Titre 72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Jointure KTable / KTable</text:span></text:p>
          </draw:text-box>
        </draw:frame>
        <draw:frame draw:name="Espace réservé du texte 65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Ces jointures sont non fenêtrées et sont équivalent au modèle relationnel</text:span></text:p>
            <text:p text:style-name="P18"><text:span text:style-name="T10">Les données doivent être co-partitionnés.</text:span></text:p>
            <text:p text:style-name="P18"><text:span text:style-name="T10">Exemple </text:span><text:span text:style-name="T14">leftJoin </text:span><text:span text:style-name="T10">:</text:span></text:p>
            <text:p text:style-name="P18"><text:span text:style-name="T107">KTable&lt;String, Long&gt; left = ...;</text:span></text:p>
            <text:p text:style-name="P18"><text:span text:style-name="T107">KTable&lt;String, Double&gt; right = ...;</text:span></text:p>
            <text:p text:style-name="P18"><text:span text:style-name="T107"/></text:p>
            <text:p text:style-name="P18"><text:span text:style-name="T107">KTable&lt;String, String&gt; joined = left.leftJoin(right,</text:span></text:p>
            <text:p text:style-name="P18"><text:span text:style-name="T143"><text:s text:c="3"/></text:span><text:span text:style-name="T143">// ValueJoiner</text:span></text:p>
            <text:p text:style-name="P18"><text:span text:style-name="T107"><text:s text:c="4"/></text:span><text:span text:style-name="T107">(leftValue, rightValue) -&gt; "left=" + leftValue + ", right=" + rightValue </text:span></text:p>
            <text:p text:style-name="P18"><text:span text:style-name="T107"><text:s text:c="2"/></text:span><text:span text:style-name="T107">);</text:span></text:p>
          </draw:text-box>
        </draw:frame>
        <presentation:notes draw:style-name="dp6">
          <draw:page-thumbnail draw:name="Espace réservé de l'image des diapositives 67" draw:style-name="gr2" draw:layer="layout" svg:width="15.535cm" svg:height="10.984cm" svg:x="2.655cm" svg:y="2.258cm" draw:page-number="100" presentation:class="page"/>
          <draw:frame draw:name="Espace réservé des notes 72" presentation:style-name="pr115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01" draw:style-name="dp5" draw:master-page-name="Vide">
        <draw:frame draw:name="Titre 78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Jointure KTable / KTable avec une clé étrangère</text:span></text:p>
          </draw:text-box>
        </draw:frame>
        <draw:frame draw:name="Espace réservé du texte 69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Ces jointures sont non fenêtrées et sont équivalent au modèle relationnel</text:span></text:p>
            <text:p text:style-name="P18"><text:span text:style-name="T10">Les données doivent être co-partitionnés.</text:span></text:p>
            <text:p><text:span text:style-name="T10">La </text:span><text:span text:style-name="T14">KTable</text:span><text:span text:style-name="T10"> de gauche peut contenir plusieurs enregistrements qui correspondent à la même clé sur la </text:span><text:span text:style-name="T14">KTable</text:span><text:span text:style-name="T10"> de droite. </text:span></text:p>
            <text:list text:style-name="L4">
              <text:list-item>
                <text:list>
                  <text:list-item>
                    <text:p><text:span text:style-name="T10">Une mise à jour d'une entrée de la </text:span><text:span text:style-name="T14">KTable</text:span><text:span text:style-name="T10"> de gauche peut entraîner un seul événement de sortie (à condition que la clé correspondante existe dans la KTable de droite). </text:span></text:p>
                  </text:list-item>
                  <text:list-item>
                    <text:p><text:span text:style-name="T10">Une seule mise à jour d'une entrée de la KTable de droite entraînera une mise à jour pour chaque enregistrement de la KTable de gauche qui a la même clé étrangère.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6">
          <draw:page-thumbnail draw:name="Espace réservé de l'image des diapositives 71" draw:style-name="gr2" draw:layer="layout" svg:width="15.535cm" svg:height="10.984cm" svg:x="2.655cm" svg:y="2.258cm" draw:page-number="101" presentation:class="page"/>
          <draw:frame draw:name="Espace réservé des notes 78" presentation:style-name="pr116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02" draw:style-name="dp5" draw:master-page-name="Vide">
        <draw:frame draw:name="Titre 79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Exemple Clé-étrangère</text:span></text:p>
          </draw:text-box>
        </draw:frame>
        <draw:frame draw:name="Espace réservé du texte 70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53"><text:span text:style-name="T144">KTable&lt;String, Long&gt; left = ...;</text:span></text:p>
            <text:p text:style-name="P53"><text:span text:style-name="T144">KTable&lt;Long, Double&gt; right = ...;</text:span></text:p>
            <text:p text:style-name="P53"><text:span text:style-name="T144"/></text:p>
            <text:p text:style-name="P53"><text:span text:style-name="T145">// foreignKeyExtractor simply uses the left-value to map to the right-key.</text:span></text:p>
            <text:p text:style-name="P53"><text:span text:style-name="T144">Function&lt;Long, Long&gt; foreignKeyExtractor = (x) -&gt; x;</text:span></text:p>
            <text:p text:style-name="P53"><text:span text:style-name="T144"/></text:p>
            <text:p text:style-name="P53"><text:span text:style-name="T144"/></text:p>
            <text:p text:style-name="P53"><text:span text:style-name="T145">// La jointure s’effectue quand :</text:span></text:p>
            <text:p text:style-name="P53"><text:span text:style-name="T145">// foreignKeyExtractor.apply(leftRecord.value) == rightRecord.key</text:span></text:p>
            <text:p text:style-name="P53"><text:span text:style-name="T144"/></text:p>
            <text:p text:style-name="P53"><text:span text:style-name="T144">KTable&lt;String, String&gt; joined = left.join(right, foreignKeyExtractor,</text:span></text:p>
            <text:p text:style-name="P53"><text:span text:style-name="T144"><text:s text:c="10"/></text:span><text:span text:style-name="T144">(leftValue, rightValue) -&gt; "left=" + leftValue + ", right=" + rightValue );</text:span></text:p>
          </draw:text-box>
        </draw:frame>
        <presentation:notes draw:style-name="dp6">
          <draw:page-thumbnail draw:name="Espace réservé de l'image des diapositives 72" draw:style-name="gr2" draw:layer="layout" svg:width="15.535cm" svg:height="10.984cm" svg:x="2.655cm" svg:y="2.258cm" draw:page-number="102" presentation:class="page"/>
          <draw:frame draw:name="Espace réservé des notes 79" presentation:style-name="pr117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03" draw:style-name="dp5" draw:master-page-name="Vide_5f_">
        <draw:frame draw:name="Titre 80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Jointure KStream / KTable</text:span></text:p>
          </draw:text-box>
        </draw:frame>
        <draw:frame draw:name="Espace réservé du texte 71" presentation:style-name="pr24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Ces jointures sont non fenêtrées, elles permettent d’enrichir le flux avec des données de la table.</text:span></text:p>
            <text:p text:style-name="P18"><text:span text:style-name="T10">Les données doivent être co-partitionnés.</text:span></text:p>
            <text:p text:style-name="P18"><text:span text:style-name="T10">La jointure s’effectue sur la clé : </text:span><text:span text:style-name="T14">leftRecord.key == rightRecord.key</text:span></text:p>
            <text:list text:style-name="L4">
              <text:list-item>
                <text:list>
                  <text:list-item>
                    <text:p><text:span text:style-name="T10">Seuls les messages du (flux) déclenchent la jointure. Les messages de la table ne mettent à jour uniquement l'état de jointure interne du côté droit.</text:span></text:p>
                  </text:list-item>
                  <text:list-item>
                    <text:p><text:span text:style-name="T10">Les messages avec une clé nulle ou une valeur nulle sont ignorés </text:span></text:p>
                  </text:list-item>
                  <text:list-item>
                    <text:p><text:span text:style-name="T10">Les enregistrements d'entrée de la table avec une valeur nulle indique la suppression de la clé de la table. </text:span></text:p>
                  </text:list-item>
                </text:list>
              </text:list-item>
            </text:list>
            <text:p text:style-name="P18"><text:span text:style-name="T10"/></text:p>
          </draw:text-box>
        </draw:frame>
        <presentation:notes draw:style-name="dp6">
          <draw:page-thumbnail draw:name="Espace réservé de l'image des diapositives 73" draw:style-name="gr2" draw:layer="layout" svg:width="15.535cm" svg:height="10.984cm" svg:x="2.655cm" svg:y="2.258cm" draw:page-number="103" presentation:class="page"/>
          <draw:frame draw:name="Espace réservé des notes 80" presentation:style-name="pr118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04" draw:style-name="dp5" draw:master-page-name="Vide_5f_">
        <draw:frame draw:name="Titre 81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56"><text:span text:style-name="T146">Exemple leftJoin :</text:span></text:p>
          </draw:text-box>
        </draw:frame>
        <draw:frame draw:name="Espace réservé du texte 72" presentation:style-name="pr24" draw:text-style-name="P59" draw:layer="layout" svg:width="23.499cm" svg:height="12.18cm" svg:x="3.033cm" svg:y="6.283cm" presentation:class="outline" presentation:user-transformed="true">
          <draw:text-box>
            <text:p text:style-name="P53"><text:span text:style-name="T134">KStream&lt;String, Long&gt; left = ...;</text:span></text:p>
            <text:p text:style-name="P53"><text:span text:style-name="T134">KTable&lt;String, Double&gt; right = ...;</text:span></text:p>
            <text:p text:style-name="P53"><text:span text:style-name="T107"/></text:p>
            <text:p text:style-name="P53"><text:span text:style-name="T134">KStream&lt;String, String&gt; joined = left.join(right,</text:span></text:p>
            <text:p text:style-name="P53"><text:span text:style-name="T134"><text:s text:c="4"/></text:span><text:span text:style-name="T134">(leftValue, rightValue) -&gt; "left=" + leftValue + ", right=" + rightValue, </text:span></text:p>
            <text:p text:style-name="P53"><text:span text:style-name="T134"><text:s text:c="4"/></text:span><text:span text:style-name="T134">Joined.keySerde(Serdes.String()) /* key */</text:span></text:p>
            <text:p text:style-name="P53"><text:span text:style-name="T134"><text:s text:c="6"/></text:span><text:span text:style-name="T134">.withValueSerde(Serdes.Long()) /* left value */</text:span></text:p>
            <text:p text:style-name="P53"><text:span text:style-name="T134"><text:s text:c="6"/></text:span><text:span text:style-name="T134">.withGracePeriod(Duration.ZERO) </text:span><text:span text:style-name="T134"><text:line-break/></text:span><text:span text:style-name="T135">// Grace period : tolérance pour attendre </text:span></text:p>
            <text:p text:style-name="P53"><text:span text:style-name="T135"><text:s text:c="2"/></text:span><text:span text:style-name="T135">// une maj tardive de la table </text:span><text:span text:style-name="T134"><text:s/></text:span></text:p>
            <text:p text:style-name="P53"><text:span text:style-name="T134"><text:s text:c="2"/></text:span><text:span text:style-name="T134">);</text:span></text:p>
          </draw:text-box>
        </draw:frame>
        <presentation:notes draw:style-name="dp6">
          <draw:page-thumbnail draw:name="Espace réservé de l'image des diapositives 74" draw:style-name="gr2" draw:layer="layout" svg:width="15.535cm" svg:height="10.984cm" svg:x="2.655cm" svg:y="2.258cm" draw:page-number="104" presentation:class="page"/>
          <draw:frame draw:name="Espace réservé des notes 81" presentation:style-name="pr119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05" draw:style-name="dp5" draw:master-page-name="Vide_5f__5f_">
        <office:forms form:automatic-focus="false" form:apply-design-mode="false"/>
        <draw:frame draw:name="Titre 82" presentation:style-name="pr12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Jointure </text:span><text:span text:style-name="T69">KStream / KGlobalTable</text:span></text:p>
          </draw:text-box>
        </draw:frame>
        <draw:frame draw:name="Espace réservé du texte 73" presentation:style-name="pr12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Ces jointures sont non fenêtrées, elles permettent d’enrichir le flux avec des données de la table.</text:span></text:p>
            <text:p text:style-name="P18"><text:span text:style-name="T10">Les données ne nécessitent pas d’être co-partitionnés.</text:span></text:p>
            <text:p text:style-name="P18"><text:span text:style-name="T10">La jointure sur clé étrangère est possible</text:span></text:p>
            <text:p text:style-name="P18"><text:span text:style-name="T10">Plus efficaces qu’une KTable partitionné lorsque vous devez effectuer plusieurs jointures successivement.</text:span></text:p>
            <text:p text:style-name="P53"><text:span text:style-name="T107">KStream&lt;String, Long&gt; left = ...;</text:span></text:p>
            <text:p text:style-name="P53"><text:span text:style-name="T107">GlobalKTable&lt;Integer, Double&gt; right = ...;</text:span></text:p>
            <text:p text:style-name="P53"><text:span text:style-name="T102"/></text:p>
            <text:p text:style-name="P53"><text:span text:style-name="T107">KStream&lt;String, String&gt; joined = left.join(right,</text:span></text:p>
            <text:p text:style-name="P53"><text:span text:style-name="T107"><text:s text:c="4"/></text:span><text:span text:style-name="T107">(leftKey, leftValue) -&gt; leftKey.length(), </text:span><text:span text:style-name="T143">/* Nouvelle clé pour la jointure */</text:span></text:p>
            <text:p text:style-name="P53"><text:span text:style-name="T107"><text:s text:c="4"/></text:span><text:span text:style-name="T107">(leftValue, rightValue) -&gt; "left=" + leftValue + ", right=" + rightValue <text:s/></text:span></text:p>
            <text:p text:style-name="P53"><text:span text:style-name="T107"><text:s text:c="2"/></text:span><text:span text:style-name="T107">);</text:span></text:p>
          </draw:text-box>
        </draw:frame>
        <draw:custom-shape draw:name="ZoneTexte 6" draw:style-name="gr18" draw:text-style-name="P23" draw:layer="layout" svg:width="7.488cm" svg:height="1.216cm" svg:x="1.133cm" svg:y="19.533cm">
          <text:p text:style-name="P22"><text:span text:style-name="T128">Atelier 5 : Join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page-thumbnail draw:name="Espace réservé de l'image des diapositives 75" draw:style-name="gr2" draw:layer="layout" svg:width="15.535cm" svg:height="10.984cm" svg:x="2.655cm" svg:y="2.258cm" draw:page-number="105" presentation:class="page"/>
          <draw:frame draw:name="Espace réservé des notes 82" presentation:style-name="pr122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06" draw:style-name="dp5" draw:master-page-name="Vide_5f__5f__5f__5f_">
        <office:forms form:automatic-focus="false" form:apply-design-mode="false"/>
        <draw:frame draw:name="Titre 84" presentation:style-name="pr123" draw:text-style-name="P12" draw:layer="layout" svg:width="23.499cm" svg:height="3.506cm" svg:x="3.033cm" svg:y="2.402cm" presentation:class="title" presentation:user-transformed="true">
          <draw:text-box>
            <text:p text:style-name="P11"><text:span text:style-name="T9">KafkaStream</text:span></text:p>
          </draw:text-box>
        </draw:frame>
        <draw:frame draw:name="Sous-titre 9" presentation:style-name="pr124" draw:text-style-name="P14" draw:layer="layout" svg:width="23.499cm" svg:height="12.18cm" svg:x="3.033cm" svg:y="6.283cm" presentation:class="subtitle" presentation:user-transformed="true">
          <draw:text-box>
            <text:p text:style-name="P13"><text:span text:style-name="T10"/></text:p>
            <text:p text:style-name="P13"><text:span text:style-name="T10"/></text:p>
            <text:p text:style-name="P13"><text:span text:style-name="T10">Concepts</text:span></text:p>
            <text:p text:style-name="P13"><text:span text:style-name="T10">Démarrage</text:span></text:p>
            <text:p text:style-name="P26"><text:span text:style-name="T66">Configuration</text:span></text:p>
            <text:p text:style-name="P26"><text:span text:style-name="T66">Opérateurs stateless</text:span></text:p>
            <text:p text:style-name="P26"><text:span text:style-name="T66">Opérateurs stateful</text:span></text:p>
            <text:p text:style-name="P26"><text:span text:style-name="T22">Requêtes interactives</text:span></text:p>
          </draw:text-box>
        </draw:frame>
        <presentation:notes draw:style-name="dp6">
          <draw:custom-shape draw:name="Forme libre 9" draw:style-name="gr11" draw:text-style-name="P15" draw:layer="layout" svg:width="15.751cm" svg:height="11.138cm" svg:x="2.624cm" svg:y="2.227cm">
            <text:p/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frame draw:name="Espace réservé des notes 85" presentation:style-name="pr125" draw:text-style-name="P16" draw:layer="layout" svg:width="14.367cm" svg:height="11.259cm" svg:x="3.249cm" svg:y="14.129cm" presentation:class="notes" presentation:placeholder="true" presentation:user-transformed="true">
            <draw:text-box/>
          </draw:frame>
        </presentation:notes>
      </draw:page>
      <draw:page draw:name="page107" draw:style-name="dp5" draw:master-page-name="Vide_5f__5f__5f_">
        <office:forms form:automatic-focus="false" form:apply-design-mode="false"/>
        <draw:frame draw:name="Titre 85" presentation:style-name="pr126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Introduction</text:span></text:p>
          </draw:text-box>
        </draw:frame>
        <draw:frame draw:name="Espace réservé du texte 75" presentation:style-name="pr127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s requêtes interactives permettent d'interroger les </text:span><text:span text:style-name="T14">StateStore</text:span><text:span text:style-name="T10"> de l’application.</text:span></text:p>
            <text:p text:style-name="P18"><text:span text:style-name="T10"/></text:p>
            <text:p text:style-name="P18"><text:span text:style-name="T10">Les requêtes peuvent être locales ou remote (Ajout d’une couche RPC)</text:span></text:p>
            <text:p text:style-name="P18"><text:span text:style-name="T10"/></text:p>
            <text:p text:style-name="P18"><text:span text:style-name="T10">Elles peuvent concerner tout type de store (Windowed ou non)</text:span></text:p>
            <text:p text:style-name="P18"><text:span text:style-name="T10"/></text:p>
          </draw:text-box>
        </draw:frame>
        <presentation:notes draw:style-name="dp6">
          <draw:page-thumbnail draw:name="Espace réservé de l'image des diapositives 76" draw:style-name="gr2" draw:layer="layout" svg:width="15.535cm" svg:height="10.984cm" svg:x="2.655cm" svg:y="2.258cm" draw:page-number="107" presentation:class="page"/>
          <draw:frame draw:name="Espace réservé des notes 86" presentation:style-name="pr128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08" draw:style-name="dp5" draw:master-page-name="Vide_5f__5f__5f_">
        <office:forms form:automatic-focus="false" form:apply-design-mode="false"/>
        <draw:frame draw:name="Titre 86" presentation:style-name="pr126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Requêtes locales</text:span></text:p>
          </draw:text-box>
        </draw:frame>
        <draw:frame draw:name="Espace réservé du texte 76" presentation:style-name="pr127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Une application Kafka Streams s'exécute généralement sur plusieurs instances. </text:span></text:p>
            <text:p text:style-name="P18"><text:span text:style-name="T10">L'état disponible localement sur une instance donnée n'est qu'un sous-ensemble de l'état complet de l'application. </text:span></text:p>
            <text:p text:style-name="P18"><text:span text:style-name="T10">Les requêtes locales ne renverront que les données disponibles localement sur cette instance particulière.</text:span></text:p>
            <text:p text:style-name="P18"><text:span text:style-name="T10">La méthode KafkaStreams#store(...) recherche les StateStore locaux d’une instance d’application par son nom et type.</text:span></text:p>
            <text:list text:style-name="L4">
              <text:list-item>
                <text:list>
                  <text:list-item>
                    <text:p><text:span text:style-name="T10">Le nom du StateStore est donné à la création</text:span></text:p>
                  </text:list-item>
                  <text:list-item>
                    <text:p><text:span text:style-name="T10">2 types sont supportés par Kafka</text:span></text:p>
                    <text:list>
                      <text:list-item>
                        <text:p><text:span text:style-name="T14">KeyValueStore</text:span></text:p>
                      </text:list-item>
                      <text:list-item>
                        <text:p><text:span text:style-name="T14">WindowSto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6">
          <draw:page-thumbnail draw:name="Espace réservé de l'image des diapositives 77" draw:style-name="gr2" draw:layer="layout" svg:width="15.535cm" svg:height="10.984cm" svg:x="2.655cm" svg:y="2.258cm" draw:page-number="108" presentation:class="page"/>
          <draw:frame draw:name="Espace réservé des notes 87" presentation:style-name="pr129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09" draw:style-name="dp5" draw:master-page-name="Vide_5f__5f__5f_">
        <office:forms form:automatic-focus="false" form:apply-design-mode="false"/>
        <draw:frame draw:name="Titre 87" presentation:style-name="pr126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Création des KeyValueStore</text:span></text:p>
          </draw:text-box>
        </draw:frame>
        <draw:frame draw:name="Espace réservé du texte 77" presentation:style-name="pr127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s stateStore sont nécessaires pour les opérations d’agrégation. </text:span></text:p>
            <text:p text:style-name="P54"><text:span text:style-name="T147">groupedByWord.count(Materialized.&lt;String, String, KeyValueStore&lt;Bytes, byte[]&gt;as("CountsKeyValueStore"));</text:span></text:p>
            <text:p text:style-name="P18"><text:span text:style-name="T10"/></text:p>
            <text:p text:style-name="P18"><text:span text:style-name="T10">Mais il est également possible de matérialiser le résultat d’une opération stateless dans un store </text:span></text:p>
            <text:p text:style-name="P53"><text:span text:style-name="T148">KTable&lt;String, Integer&gt; oddCounts = numberLines.filter((region, count) -&gt; (count % 2 != 0),</text:span></text:p>
            <text:p text:style-name="P53"><text:span text:style-name="T148"><text:s text:c="2"/></text:span><text:span text:style-name="T148">Materialized.&lt;String, Integer, KeyValueStore&lt;Bytes, byte[]&gt;as("queryableStoreName"));</text:span></text:p>
          </draw:text-box>
        </draw:frame>
        <presentation:notes draw:style-name="dp6">
          <draw:page-thumbnail draw:name="Espace réservé de l'image des diapositives 78" draw:style-name="gr2" draw:layer="layout" svg:width="15.535cm" svg:height="10.984cm" svg:x="2.655cm" svg:y="2.258cm" draw:page-number="109" presentation:class="page"/>
          <draw:frame draw:name="Espace réservé des notes 88" presentation:style-name="pr130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10" draw:style-name="dp5" draw:master-page-name="Vide_5f__5f__5f_">
        <office:forms form:automatic-focus="false" form:apply-design-mode="false"/>
        <draw:frame draw:name="Titre 88" presentation:style-name="pr126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Requêtage de KeyValueStore</text:span></text:p>
          </draw:text-box>
        </draw:frame>
        <draw:frame draw:name="Espace réservé du texte 78" presentation:style-name="pr127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Après avoir démarré l’application, on récupère une instance de </text:span><text:span text:style-name="T13">ReadOnlyKeyValueStore</text:span><text:span text:style-name="T10"> et on l’interroge via les clés . </text:span></text:p>
            <text:p text:style-name="P54"><text:span text:style-name="T147">ReadOnlyKeyValueStore&lt;String, Long&gt; keyValueStore =</text:span></text:p>
            <text:p text:style-name="P54"><text:span text:style-name="T147"><text:s text:c="4"/></text:span><text:span text:style-name="T147">streams.store("CountsKeyValueStore", QueryableStoreTypes.keyValueStore());</text:span></text:p>
            <text:p text:style-name="P54"><text:span text:style-name="T147"/></text:p>
            <text:p text:style-name="P54"><text:span text:style-name="T147">// Get value by key</text:span></text:p>
            <text:p text:style-name="P54"><text:span text:style-name="T147">System.out.println("count for hello:" + keyValueStore.</text:span><text:span text:style-name="T149">get</text:span><text:span text:style-name="T147">("hello"));</text:span></text:p>
            <text:p text:style-name="P54"><text:span text:style-name="T147"/></text:p>
            <text:p text:style-name="P54"><text:span text:style-name="T147">// Get the values for a range of keys available in this application instance</text:span></text:p>
            <text:p text:style-name="P54"><text:span text:style-name="T147">KeyValueIterator&lt;String, Long&gt; range = keyValueStore.</text:span><text:span text:style-name="T149">range</text:span><text:span text:style-name="T147">("all", "streams");</text:span></text:p>
            <text:p text:style-name="P54"><text:span text:style-name="T147">while (range.hasNext()) {</text:span></text:p>
            <text:p text:style-name="P54"><text:span text:style-name="T147"><text:s text:c="2"/></text:span><text:span text:style-name="T147">KeyValue&lt;String, Long&gt; next = range.next();</text:span></text:p>
            <text:p text:style-name="P54"><text:span text:style-name="T147"><text:s text:c="2"/></text:span><text:span text:style-name="T147">System.out.println("count for " + next.key + ": " + next.value);</text:span></text:p>
            <text:p text:style-name="P54"><text:span text:style-name="T147">}</text:span></text:p>
            <text:p text:style-name="P54"><text:span text:style-name="T147"/></text:p>
            <text:p text:style-name="P54"><text:span text:style-name="T147">// Get the values for all of the keys available in this application instance</text:span></text:p>
            <text:p text:style-name="P54"><text:span text:style-name="T147">KeyValueIterator&lt;String, Long&gt; range = keyValueStore.</text:span><text:span text:style-name="T149">all</text:span><text:span text:style-name="T147">();</text:span></text:p>
            <text:p text:style-name="P54"><text:span text:style-name="T147">while (range.hasNext()) {</text:span></text:p>
            <text:p text:style-name="P54"><text:span text:style-name="T147"><text:s text:c="2"/></text:span><text:span text:style-name="T147">KeyValue&lt;String, Long&gt; next = range.next();</text:span></text:p>
            <text:p text:style-name="P54"><text:span text:style-name="T147"><text:s text:c="2"/></text:span><text:span text:style-name="T147">System.out.println("count for " + next.key + ": " + next.value);</text:span></text:p>
            <text:p text:style-name="P54"><text:span text:style-name="T147">}</text:span></text:p>
            <text:p text:style-name="P18"><text:span text:style-name="T10"/></text:p>
          </draw:text-box>
        </draw:frame>
        <presentation:notes draw:style-name="dp6">
          <draw:page-thumbnail draw:name="Espace réservé de l'image des diapositives 79" draw:style-name="gr2" draw:layer="layout" svg:width="15.535cm" svg:height="10.984cm" svg:x="2.655cm" svg:y="2.258cm" draw:page-number="110" presentation:class="page"/>
          <draw:frame draw:name="Espace réservé des notes 89" presentation:style-name="pr131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11" draw:style-name="dp5" draw:master-page-name="Vide_5f__5f__5f_">
        <office:forms form:automatic-focus="false" form:apply-design-mode="false"/>
        <draw:frame draw:name="Titre 89" presentation:style-name="pr126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Création de WindowStore</text:span></text:p>
          </draw:text-box>
        </draw:frame>
        <draw:frame draw:name="Espace réservé du texte 81" presentation:style-name="pr127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Un magasin de fenêtres peut potentiellement avoir de nombreux résultats pour une clé donnée, car la clé peut être présente dans plusieurs fenêtres. Cependant, il n'y a qu'un seul résultat par fenêtre pour une clé donnée.</text:span></text:p>
            <text:p text:style-name="P18"><text:span text:style-name="T10">Le store est créé par des applications stateful. </text:span></text:p>
            <text:p text:style-name="P54"><text:span text:style-name="T147">groupedByWord.windowedBy(TimeWindows.ofSizeWithNoGrace(Duration.ofSeconds(60)))</text:span></text:p>
            <text:p text:style-name="P54"><text:span text:style-name="T147"><text:s text:c="2"/></text:span><text:span text:style-name="T147">.count(Materialized.&lt;String, Long, WindowStore&lt;Bytes, byte[]&gt;as("CountsWindowStore"));</text:span></text:p>
            <text:p text:style-name="P18"><text:span text:style-name="T10"/></text:p>
          </draw:text-box>
        </draw:frame>
        <presentation:notes draw:style-name="dp6">
          <draw:page-thumbnail draw:name="Espace réservé de l'image des diapositives 80" draw:style-name="gr2" draw:layer="layout" svg:width="15.535cm" svg:height="10.984cm" svg:x="2.655cm" svg:y="2.258cm" draw:page-number="111" presentation:class="page"/>
          <draw:frame draw:name="Espace réservé des notes 90" presentation:style-name="pr132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12" draw:style-name="dp5" draw:master-page-name="Vide_5f__5f__5f__5f_">
        <office:forms form:automatic-focus="false" form:apply-design-mode="false"/>
        <draw:frame draw:name="Titre 92" presentation:style-name="pr13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Requêtage de WindowStore</text:span></text:p>
          </draw:text-box>
        </draw:frame>
        <draw:frame draw:name="Espace réservé du texte 82" presentation:style-name="pr134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Après avoir démarré l’application, on récupère une instance de </text:span><text:span text:style-name="T13">ReadOnlyWindowStore</text:span><text:span text:style-name="T10"> et on l’interroge via les clés et un intervalle de temps . </text:span></text:p>
            <text:p text:style-name="P54"><text:span text:style-name="T148">ReadOnlyWindowStore&lt;String, Long&gt; windowStore =</text:span></text:p>
            <text:p text:style-name="P54"><text:span text:style-name="T148"><text:s text:c="4"/></text:span><text:span text:style-name="T148">streams.store("CountsWindowStore", QueryableStoreTypes.windowStore());</text:span></text:p>
            <text:p text:style-name="P54"><text:span text:style-name="T148"/></text:p>
            <text:p text:style-name="P54"><text:span text:style-name="T150">// Récupère les valeurs pour la clé "world" pour toutes les fenêtres disponibles</text:span></text:p>
            <text:p text:style-name="P54"><text:span text:style-name="T150">// L’intervalle est à partir du début du temps jusqu’à maintenant.</text:span></text:p>
            <text:p text:style-name="P54"><text:span text:style-name="T148">Instant timeFrom = Instant.ofEpochMilli(0); </text:span></text:p>
            <text:p text:style-name="P54"><text:span text:style-name="T148">Instant timeTo = Instant.now(); </text:span></text:p>
            <text:p text:style-name="P54"><text:span text:style-name="T148">WindowStoreIterator&lt;Long&gt; iterator = windowStore.fetch("world", timeFrom, timeTo);</text:span></text:p>
            <text:p text:style-name="P54"><text:span text:style-name="T148">while (iterator.hasNext()) {</text:span></text:p>
            <text:p text:style-name="P54"><text:span text:style-name="T148"><text:s text:c="2"/></text:span><text:span text:style-name="T148">KeyValue&lt;Long, Long&gt; next = iterator.next();</text:span></text:p>
            <text:p text:style-name="P54"><text:span text:style-name="T148"><text:s text:c="2"/></text:span><text:span text:style-name="T148">long windowTimestamp = next.key;</text:span></text:p>
            <text:p text:style-name="P54"><text:span text:style-name="T148"><text:s text:c="2"/></text:span><text:span text:style-name="T148">System.out.println("Count of 'world' @ time " + windowTimestamp + " is " + next.value);</text:span></text:p>
            <text:p text:style-name="P54"><text:span text:style-name="T148">}</text:span></text:p>
          </draw:text-box>
        </draw:frame>
        <presentation:notes draw:style-name="dp6">
          <draw:page-thumbnail draw:name="Espace réservé de l'image des diapositives 83" draw:style-name="gr2" draw:layer="layout" svg:width="15.535cm" svg:height="10.984cm" svg:x="2.655cm" svg:y="2.258cm" draw:page-number="112" presentation:class="page"/>
          <draw:frame draw:name="Espace réservé des notes 93" presentation:style-name="pr135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13" draw:style-name="dp5" draw:master-page-name="Vide_5f__5f__5f__5f_">
        <office:forms form:automatic-focus="false" form:apply-design-mode="false"/>
        <draw:frame draw:name="Titre 93" presentation:style-name="pr13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Requêtes distantes</text:span></text:p>
          </draw:text-box>
        </draw:frame>
        <draw:frame draw:name="Espace réservé du texte 83" presentation:style-name="pr134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Pour pouvoir interroger à distance l’état global d’une application KafkaStream, plusieurs étapes sont nécessaires :</text:span></text:p>
            <text:list text:style-name="L4">
              <text:list-item>
                <text:list>
                  <text:list-item>
                    <text:p><text:span text:style-name="T10">Ajoutez une couche RPC afin que les instances de l’application <text:s/>puissent interagir via le réseau (par exemple, une API REST, etc.). </text:span></text:p>
                  </text:list-item>
                  <text:list-item>
                    <text:p><text:span text:style-name="T10">Exposez les endpoint RPC via le paramètre de configuration </text:span><text:span text:style-name="T13">application.server</text:span><text:span text:style-name="T10"> de Kafka Streams. </text:span><text:span text:style-name="T10"><text:line-break/></text:span><text:span text:style-name="T10">Chaque instance a sa propre valeur pour ce paramètre de configuration.</text:span></text:p>
                  </text:list-item>
                  <text:list-item>
                    <text:p><text:span text:style-name="T10">Dans la couche RPC, découvrir les instances d'application distantes et leurs StateStore et interrogez les magasins d'état disponibles localement. </text:span><text:span text:style-name="T10"><text:line-break/></text:span><text:span text:style-name="T10">=&gt; Les instances d'application distantes peuvent transmettre des requêtes à d'autres instances d'application si une instance particulière ne dispose pas des données locales pour répondre à une requête. </text:span><text:span text:style-name="T10"><text:line-break/></text:span><text:span text:style-name="T10">=&gt; Les magasins d'état disponibles localement peuvent répondre directement aux requêtes. </text:span></text:p>
                  </text:list-item>
                </text:list>
              </text:list-item>
            </text:list>
            <text:p text:style-name="P18"><text:span text:style-name="T10"/></text:p>
          </draw:text-box>
        </draw:frame>
        <presentation:notes draw:style-name="dp6">
          <draw:page-thumbnail draw:name="Espace réservé de l'image des diapositives 84" draw:style-name="gr2" draw:layer="layout" svg:width="15.535cm" svg:height="10.984cm" svg:x="2.655cm" svg:y="2.258cm" draw:page-number="113" presentation:class="page"/>
          <draw:frame draw:name="Espace réservé des notes 94" presentation:style-name="pr136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14" draw:style-name="dp5" draw:master-page-name="Vide_5f__5f__5f__5f_">
        <office:forms form:automatic-focus="false" form:apply-design-mode="false"/>
        <draw:frame draw:name="Titre 94" presentation:style-name="pr13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Exemple Couche RPC</text:span></text:p>
          </draw:text-box>
        </draw:frame>
        <draw:frame draw:name="Espace réservé du texte 84" presentation:style-name="pr134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48">KafkaStreams streams = ...;</text:span></text:p>
            <text:p text:style-name="P18"><text:span text:style-name="T150">// Retrouver tous les emplacemenents des StateStore nommé "word-count"</text:span></text:p>
            <text:p text:style-name="P18"><text:span text:style-name="T148">Collection&lt;StreamsMetadata&gt; wordCountHosts = streams.allMetadataForStore("word-count");</text:span></text:p>
            <text:p text:style-name="P18"><text:span text:style-name="T148"/></text:p>
            <text:p text:style-name="P18"><text:span text:style-name="T148">HttpClient http = ...;</text:span></text:p>
            <text:p text:style-name="P18"><text:span text:style-name="T148"/></text:p>
            <text:p text:style-name="P18"><text:span text:style-name="T148">// Get the word count for word (aka key) 'alice'</text:span></text:p>
            <text:p text:style-name="P18"><text:span text:style-name="T148">//</text:span></text:p>
            <text:p text:style-name="P18"><text:span text:style-name="T150">// Retrouver le store qui continent la clé 'alice'</text:span></text:p>
            <text:p text:style-name="P18"><text:span text:style-name="T148">StreamsMetadata metadata = streams.metadataForKey("word-count", "alice", Serdes.String().serializer());</text:span></text:p>
            <text:p text:style-name="P18"><text:span text:style-name="T150">// Appel du endpoint renvoyant le résulat</text:span></text:p>
            <text:p text:style-name="P18"><text:span text:style-name="T148">Long result = http.getLong("http://" + metadata.host() + ":" + metadata.port() + "/word-count/alice");</text:span></text:p>
          </draw:text-box>
        </draw:frame>
        <draw:custom-shape draw:name="ZoneTexte 7" draw:style-name="gr19" draw:text-style-name="P23" draw:layer="layout" svg:width="11.552cm" svg:height="1.216cm" svg:x="2.448cm" svg:y="19.533cm">
          <text:p text:style-name="P22"><text:span text:style-name="T128">Atelier 6 : Requêtes intera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page-thumbnail draw:name="Espace réservé de l'image des diapositives 85" draw:style-name="gr2" draw:layer="layout" svg:width="15.535cm" svg:height="10.984cm" svg:x="2.655cm" svg:y="2.258cm" draw:page-number="114" presentation:class="page"/>
          <draw:frame draw:name="Espace réservé des notes 95" presentation:style-name="pr137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15" draw:style-name="dp5" draw:master-page-name="Vide_5f_">
        <office:forms form:automatic-focus="false" form:apply-design-mode="false"/>
        <draw:frame draw:name="Titre 96" presentation:style-name="pr138" draw:text-style-name="P12" draw:layer="layout" svg:width="23.499cm" svg:height="3.506cm" svg:x="3.033cm" svg:y="2.401cm" presentation:class="title" presentation:user-transformed="true">
          <draw:text-box>
            <text:p text:style-name="P11"><text:span text:style-name="T9">ksqlDB</text:span></text:p>
          </draw:text-box>
        </draw:frame>
        <draw:frame draw:name="Sous-titre 10" presentation:style-name="pr139" draw:text-style-name="P14" draw:layer="layout" svg:width="23.499cm" svg:height="12.18cm" svg:x="3.033cm" svg:y="6.283cm" presentation:class="subtitle" presentation:user-transformed="true">
          <draw:text-box>
            <text:p text:style-name="P13"><text:span text:style-name="T114"/></text:p>
            <text:p text:style-name="P13"><text:span text:style-name="T114"/></text:p>
            <text:p text:style-name="P13"><text:span text:style-name="T11">Présentation</text:span></text:p>
            <text:p text:style-name="P13"><text:span text:style-name="T10">SQL</text:span></text:p>
            <text:p text:style-name="P26"><text:span text:style-name="T66">Statement</text:span></text:p>
            <text:p text:style-name="P13"><text:span text:style-name="T10">Fonctions disponibles</text:span></text:p>
            <text:p text:style-name="P13"><text:span text:style-name="T10"/></text:p>
          </draw:text-box>
        </draw:frame>
        <presentation:notes draw:style-name="dp6">
          <draw:custom-shape draw:name="Forme libre 10" draw:style-name="gr11" draw:text-style-name="P15" draw:layer="layout" svg:width="15.751cm" svg:height="11.138cm" svg:x="2.624cm" svg:y="2.227cm">
            <text:p/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frame draw:name="Espace réservé des notes 97" presentation:style-name="pr140" draw:text-style-name="P16" draw:layer="layout" svg:width="14.367cm" svg:height="11.259cm" svg:x="3.249cm" svg:y="14.129cm" presentation:class="notes" presentation:placeholder="true" presentation:user-transformed="true">
            <draw:text-box/>
          </draw:frame>
        </presentation:notes>
      </draw:page>
      <draw:page draw:name="ksqlDB" draw:style-name="dp5" draw:master-page-name="Vide_5f_">
        <office:forms form:automatic-focus="false" form:apply-design-mode="false"/>
        <draw:frame draw:name="Titre 20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ksqlDB</text:span></text:p>
          </draw:text-box>
        </draw:frame>
        <draw:frame draw:name="Espace réservé du texte 2" presentation:style-name="pr141" draw:text-style-name="P21" draw:layer="layout" svg:width="23.499cm" svg:height="6.945cm" svg:x="3.033cm" svg:y="6.283cm" presentation:class="outline" presentation:user-transformed="true">
          <draw:text-box>
            <text:p text:style-name="P18"><text:span text:style-name="T14">ksqlDB</text:span><text:span text:style-name="T10"> est une abstraction au dessus de KafkaStream permettant de bâtir ces applications via des instructions SQL</text:span></text:p>
          </draw:text-box>
        </draw:frame>
        <draw:frame draw:name="Image 2" draw:style-name="gr6" draw:text-style-name="P25" draw:layer="layout" svg:width="21.006cm" svg:height="9.086cm" svg:x="4.597cm" svg:y="10.949cm">
          <draw:image xlink:href="Pictures/1000000100000AD1000004AEF47DE572.png" xlink:type="simple" xlink:show="embed" xlink:actuate="onLoad" draw:mime-type="image/png">
            <text:p/>
          </draw:image>
        </draw:frame>
        <presentation:notes draw:style-name="dp6">
          <draw:page-thumbnail draw:name="Espace réservé de l'image des diapositives 18" draw:style-name="gr2" draw:layer="layout" svg:width="15.535cm" svg:height="10.984cm" svg:x="2.655cm" svg:y="2.258cm" draw:page-number="116" presentation:class="page"/>
          <draw:frame draw:name="Espace réservé des notes 2" presentation:style-name="pr142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Architecture ksqlDB" draw:style-name="dp5" draw:master-page-name="Vide_5f_">
        <office:forms form:automatic-focus="false" form:apply-design-mode="false"/>
        <draw:frame draw:name="Titre 21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Architecture ksqlDB</text:span></text:p>
          </draw:text-box>
        </draw:frame>
        <draw:frame draw:name="Espace réservé du texte 3" presentation:style-name="pr24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>Intégration via </text:span></text:p>
            <text:list text:style-name="L14">
              <text:list-item>
                <text:p text:style-name="P42"><text:span text:style-name="T10">API REST et ksqlCli</text:span></text:p>
              </text:list-item>
              <text:list-item>
                <text:p text:style-name="P42"><text:span text:style-name="T10">Librairies : Clients Java, Python, NodeJS</text:span></text:p>
              </text:list-item>
            </text:list>
            <text:p text:style-name="P18"><text:span text:style-name="T10"/></text:p>
          </draw:text-box>
        </draw:frame>
        <draw:frame draw:name="Image 1" draw:style-name="gr6" draw:text-style-name="P25" draw:layer="layout" svg:width="14.317cm" svg:height="8.053cm" svg:x="11.399cm" svg:y="6.283cm">
          <draw:image xlink:href="Pictures/1000000000000500000002D00D415DCF.png" xlink:type="simple" xlink:show="embed" xlink:actuate="onLoad" draw:mime-type="image/png">
            <text:p/>
          </draw:image>
        </draw:frame>
        <presentation:notes draw:style-name="dp6">
          <draw:page-thumbnail draw:name="Espace réservé de l'image des diapositives 19" draw:style-name="gr2" draw:layer="layout" svg:width="15.535cm" svg:height="10.984cm" svg:x="2.655cm" svg:y="2.258cm" draw:page-number="117" presentation:class="page"/>
          <draw:frame draw:name="Espace réservé des notes 3" presentation:style-name="pr143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ksqlDB (2)" draw:style-name="dp5" draw:master-page-name="Vide">
        <office:forms form:automatic-focus="false" form:apply-design-mode="false"/>
        <draw:frame draw:name="Titre 211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ksqlDB</text:span></text:p>
          </draw:text-box>
        </draw:frame>
        <draw:frame draw:name="Espace réservé du texte 189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51">ksqlDB</text:span><text:span text:style-name="T10"> fournit donc une couche d’abstraction SQL permettant de manipuler les </text:span><text:span text:style-name="T14">KTable</text:span><text:span text:style-name="T10"> de </text:span><text:span text:style-name="T14">KafkaStream</text:span></text:p>
            <text:p text:style-name="P18"><text:span text:style-name="T10">ksqlDB convertit les requêtes SQL en tâches Kafka Streams en coulisses. </text:span></text:p>
            <text:list text:style-name="L11">
              <text:list-item>
                <text:list>
                  <text:list-item>
                    <text:p text:style-name="P43"><text:span text:style-name="T73">Chaque requête ksqlDB (par exemple, une CREATE STREAM ou CREATE TABLE) est compilée en un flux Kafka Streams qui est ensuite exécuté dans le cadre de l'infrastructure ksqlDB.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name="Espace réservé de l'image des diapositives 192" draw:style-name="gr2" draw:layer="layout" svg:width="15.535cm" svg:height="10.984cm" svg:x="2.655cm" svg:y="2.258cm" draw:page-number="118" presentation:class="page"/>
          <draw:frame draw:name="Espace réservé des notes 212" presentation:style-name="pr144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ksqlDB (3)" draw:style-name="dp5" draw:master-page-name="Vide">
        <office:forms form:automatic-focus="false" form:apply-design-mode="false"/>
        <draw:frame draw:name="Titre 212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ksqlDB</text:span></text:p>
          </draw:text-box>
        </draw:frame>
        <draw:frame draw:name="Espace réservé du texte 190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51">ksqlDB</text:span><text:span text:style-name="T10"> est donc un serveur</text:span></text:p>
            <text:p text:style-name="P18"><text:span text:style-name="T10">L’interaction avec le serveur peut se faire via :</text:span></text:p>
            <text:list text:style-name="L11">
              <text:list-item>
                <text:list>
                  <text:list-item>
                    <text:p text:style-name="P43"><text:span text:style-name="T73">Son API REST</text:span></text:p>
                  </text:list-item>
                  <text:list-item>
                    <text:p text:style-name="P43"><text:span text:style-name="T73">Un client (Java, .NET, Python)</text:span></text:p>
                  </text:list-item>
                  <text:list-item>
                    <text:p text:style-name="P43"><text:span text:style-name="T73">ksqldb-cli : Une commande en ligne qui appelle l’API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name="Espace réservé de l'image des diapositives 193" draw:style-name="gr2" draw:layer="layout" svg:width="15.535cm" svg:height="10.984cm" svg:x="2.655cm" svg:y="2.258cm" draw:page-number="119" presentation:class="page"/>
          <draw:frame draw:name="Espace réservé des notes 213" presentation:style-name="pr145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Démarrage" draw:style-name="dp5" draw:master-page-name="Vide">
        <office:forms form:automatic-focus="false" form:apply-design-mode="false"/>
        <draw:frame draw:name="Titre 214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Démarrage</text:span></text:p>
          </draw:text-box>
        </draw:frame>
        <draw:frame draw:name="Espace réservé du texte 192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Une fois le serveur ksqlDB démarré, on peut se connecter à l'interface de ligne de commande et exécuter des requêtes SQL.</text:span></text:p>
            <text:p text:style-name="P18"><text:span text:style-name="T10">Lister les flux disponibles :</text:span><text:span text:style-name="T10"><text:line-break/></text:span><text:span text:style-name="T152">SHOW STREAMS;</text:span></text:p>
            <text:p text:style-name="P18"><text:span text:style-name="T10"/></text:p>
            <text:p text:style-name="P18"><text:span text:style-name="T10">Créer un flux à partir d’un topic :</text:span><text:span text:style-name="T10"><text:line-break/></text:span><text:span text:style-name="T152">CREATE STREAM pageviews (viewtime BIGINT, userid VARCHAR, pageid VARCHAR)</text:span><text:span text:style-name="T152"><text:line-break/></text:span><text:span text:style-name="T152">WITH (KAFKA_TOPIC='pageviews', VALUE_FORMAT='JSON');</text:span></text:p>
            <text:p text:style-name="P18"><text:span text:style-name="T10"/></text:p>
            <text:p text:style-name="P18"><text:span text:style-name="T10">Renseigner un flux :</text:span><text:span text:style-name="T10"><text:line-break/></text:span><text:span text:style-name="T152">INSERT INTO pageviews (viewtime, userid, pageid) VALUES (1000, 1, 1);</text:span></text:p>
            <text:p text:style-name="P18"><text:span text:style-name="T10"/></text:p>
            <text:p text:style-name="P18"><text:span text:style-name="T10">Lister les données d’un flux :</text:span><text:span text:style-name="T10"><text:line-break/></text:span><text:span text:style-name="T153">SELECT * FROM pageviews EMIT CHANGES;</text:span></text:p>
            <text:p text:style-name="P18"><text:span text:style-name="T10"/></text:p>
          </draw:text-box>
        </draw:frame>
        <presentation:notes draw:style-name="dp6">
          <draw:page-thumbnail draw:name="Espace réservé de l'image des diapositives 195" draw:style-name="gr2" draw:layer="layout" svg:width="15.535cm" svg:height="10.984cm" svg:x="2.655cm" svg:y="2.258cm" draw:page-number="120" presentation:class="page"/>
          <draw:frame draw:name="Espace réservé des notes 215" presentation:style-name="pr146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Equivalence" draw:style-name="dp5" draw:master-page-name="Vide">
        <office:forms form:automatic-focus="false" form:apply-design-mode="false"/>
        <draw:frame draw:name="Titre 215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Equivalences</text:span></text:p>
          </draw:text-box>
        </draw:frame>
        <draw:frame draw:name="Espace réservé du texte 193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’équivalent de l’opérateur Filter() de KafkaStream est la clause WHERE</text:span></text:p>
            <text:p text:style-name="P18"><text:span text:style-name="T153">CREATE STREAM important_events AS SELECT * FROM source_stream WHERE event_type = 'important';</text:span></text:p>
            <text:p text:style-name="P18"><text:span text:style-name="T10"/></text:p>
            <text:p text:style-name="P18"><text:span text:style-name="T10">L’opérateur Map s’effectue généralement avec des fonctions prédéfinies appliquées sur les colonnes</text:span><text:span text:style-name="T10"><text:line-break/></text:span><text:span text:style-name="T153">CREATE STREAM uppercase_events AS</text:span><text:span text:style-name="T153"><text:line-break/></text:span><text:span text:style-name="T153">SELECT UCASE(event_type) </text:span><text:span text:style-name="T153"><text:line-break/></text:span><text:span text:style-name="T153">AS event_type_upper</text:span><text:span text:style-name="T153"><text:line-break/></text:span><text:span text:style-name="T153">FROM source_stream;</text:span></text:p>
            <text:p text:style-name="P18"><text:span text:style-name="T10"/></text:p>
            <text:p text:style-name="P18"><text:span text:style-name="T10">L’opérateur flatMap peut s’implémenter via des fonctions EXPLODE</text:span></text:p>
            <text:p text:style-name="P18"><text:span text:style-name="T153">CREATE STREAM exploded_events AS</text:span></text:p>
            <text:p text:style-name="P18"><text:span text:style-name="T153">SELECT EXPLODE(SPLIT(event_ids, ',')) AS event_id</text:span></text:p>
            <text:p text:style-name="P18"><text:span text:style-name="T153">FROM source_stream;</text:span></text:p>
            <text:p text:style-name="P18"><text:span text:style-name="T153"/></text:p>
            <text:p text:style-name="P18"><text:span text:style-name="T10"/></text:p>
          </draw:text-box>
        </draw:frame>
        <presentation:notes draw:style-name="dp6">
          <draw:page-thumbnail draw:name="Espace réservé de l'image des diapositives 196" draw:style-name="gr2" draw:layer="layout" svg:width="15.535cm" svg:height="10.984cm" svg:x="2.655cm" svg:y="2.258cm" draw:page-number="121" presentation:class="page"/>
          <draw:frame draw:name="Espace réservé des notes 216" presentation:style-name="pr147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Equivalence (2)" draw:style-name="dp5" draw:master-page-name="Vide">
        <office:forms form:automatic-focus="false" form:apply-design-mode="false"/>
        <draw:frame draw:name="Titre 216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Equivalences (2)</text:span></text:p>
          </draw:text-box>
        </draw:frame>
        <draw:frame draw:name="Espace réservé du texte 194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es agrégations se font avec GROUP BY et les méthodes d’agrégations classiques </text:span></text:p>
            <text:p text:style-name="P18"><text:span text:style-name="T153">SELECT user_id, COUNT(*) AS event_count FROM event_stream GROUP BY user_id;</text:span></text:p>
            <text:p text:style-name="P18"><text:span text:style-name="T154"/></text:p>
            <text:p text:style-name="P18"><text:span text:style-name="T154">Les jointures :</text:span></text:p>
            <text:p text:style-name="P18"><text:span text:style-name="T153">CREATE STREAM enriched_stream AS</text:span><text:span text:style-name="T153"><text:line-break/></text:span><text:span text:style-name="T153">SELECT s.event_id, u.user_name</text:span><text:span text:style-name="T153"><text:line-break/></text:span><text:span text:style-name="T153">FROM events_stream s</text:span><text:span text:style-name="T153"><text:line-break/></text:span><text:span text:style-name="T153">LEFT JOIN users_table u ON s.user_id = u.user_id;</text:span></text:p>
            <text:p text:style-name="P18"><text:span text:style-name="T155"/></text:p>
            <text:p text:style-name="P18"><text:span text:style-name="T155">Les fenêtres temporelles :</text:span></text:p>
            <text:p text:style-name="P18"><text:span text:style-name="T153">SELECT COUNT(*), WINDOWSTART AS start_time, WINDOWEND AS end_time</text:span><text:span text:style-name="T153"><text:line-break/></text:span><text:span text:style-name="T153">FROM events_stream</text:span><text:span text:style-name="T153"><text:line-break/></text:span><text:span text:style-name="T153">WINDOW TUMBLING (SIZE 10 MINUTES)</text:span><text:span text:style-name="T153"><text:line-break/></text:span><text:span text:style-name="T153">GROUP BY event_type;</text:span></text:p>
            <text:p text:style-name="P18"><text:span text:style-name="T153"/></text:p>
            <text:p text:style-name="P18"><text:span text:style-name="T152"/></text:p>
          </draw:text-box>
        </draw:frame>
        <draw:custom-shape draw:name="ZoneTexte 26" draw:style-name="gr20" draw:text-style-name="P23" draw:layer="layout" svg:width="8.779cm" svg:height="1.216cm" svg:x="0.875cm" svg:y="19.4cm">
          <text:p text:style-name="P22"><text:span text:style-name="T128">Atelier 7.1 : Démar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page-thumbnail draw:name="Espace réservé de l'image des diapositives 197" draw:style-name="gr2" draw:layer="layout" svg:width="15.535cm" svg:height="10.984cm" svg:x="2.655cm" svg:y="2.258cm" draw:page-number="122" presentation:class="page"/>
          <draw:frame draw:name="Espace réservé des notes 217" presentation:style-name="pr148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23" draw:style-name="dp5" draw:master-page-name="Vide_5f__5f_">
        <office:forms form:automatic-focus="false" form:apply-design-mode="false"/>
        <draw:frame draw:name="Titre 98" presentation:style-name="pr149" draw:text-style-name="P12" draw:layer="layout" svg:width="23.499cm" svg:height="3.506cm" svg:x="3.033cm" svg:y="2.401cm" presentation:class="title" presentation:user-transformed="true">
          <draw:text-box>
            <text:p text:style-name="P11"><text:span text:style-name="T9">ksqlDB</text:span></text:p>
          </draw:text-box>
        </draw:frame>
        <draw:frame draw:name="Sous-titre 11" presentation:style-name="pr150" draw:text-style-name="P14" draw:layer="layout" svg:width="23.499cm" svg:height="12.18cm" svg:x="3.033cm" svg:y="6.283cm" presentation:class="subtitle" presentation:user-transformed="true">
          <draw:text-box>
            <text:p text:style-name="P13"><text:span text:style-name="T114"/></text:p>
            <text:p text:style-name="P13"><text:span text:style-name="T114"/></text:p>
            <text:p text:style-name="P26"><text:span text:style-name="T66">Présentation</text:span></text:p>
            <text:p text:style-name="P26"><text:span text:style-name="T22">Données</text:span></text:p>
            <text:p text:style-name="P26"><text:span text:style-name="T66">Statement</text:span></text:p>
            <text:p text:style-name="P13"><text:span text:style-name="T10">Fonctions disponibles</text:span></text:p>
            <text:p text:style-name="P13"><text:span text:style-name="T10"/></text:p>
          </draw:text-box>
        </draw:frame>
        <presentation:notes draw:style-name="dp6">
          <draw:custom-shape draw:name="Forme libre 11" draw:style-name="gr11" draw:text-style-name="P15" draw:layer="layout" svg:width="15.751cm" svg:height="11.138cm" svg:x="2.624cm" svg:y="2.227cm">
            <text:p/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frame draw:name="Espace réservé des notes 99" presentation:style-name="pr151" draw:text-style-name="P16" draw:layer="layout" svg:width="14.367cm" svg:height="11.259cm" svg:x="3.249cm" svg:y="14.129cm" presentation:class="notes" presentation:placeholder="true" presentation:user-transformed="true">
            <draw:text-box/>
          </draw:frame>
        </presentation:notes>
      </draw:page>
      <draw:page draw:name="page124" draw:style-name="dp5" draw:master-page-name="Vide">
        <office:forms form:automatic-focus="false" form:apply-design-mode="false"/>
        <draw:frame draw:name="Titre 95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Syntaxe</text:span></text:p>
          </draw:text-box>
        </draw:frame>
        <draw:frame draw:name="Espace réservé du texte 85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La grammaire SQL de ksqlDB a été initialement construite autour de la grammaire de Presto et a été étendue.</text:span></text:p>
            <text:p text:style-name="P18"><text:span text:style-name="T10"><text:s/></text:span><text:span text:style-name="T10">ksqlDB va au-delà de SQL-92, car la norme n'a actuellement aucune construction pour les requêtes en streaming.</text:span></text:p>
            <text:p text:style-name="P18"><text:span text:style-name="T10">Une instruction est composée :</text:span></text:p>
            <text:list text:style-name="L4">
              <text:list-item>
                <text:list>
                  <text:list-item>
                    <text:p><text:span text:style-name="T10">De mots clés (SELECT, INSERT, CREATE, …)</text:span></text:p>
                  </text:list-item>
                  <text:list-item>
                    <text:p><text:span text:style-name="T10">D’identifieurs, i.e. noms pour les streams, les tables, les colonnes, généralement entouré par des backquote</text:span></text:p>
                  </text:list-item>
                  <text:list-item>
                    <text:p><text:span text:style-name="T10">Des constantes typées (string, number, boolean)</text:span></text:p>
                  </text:list-item>
                  <text:list-item>
                    <text:p><text:span text:style-name="T10">Des opérateurs (=,!=, LIKE, BETWEEN)</text:span></text:p>
                  </text:list-item>
                  <text:list-item>
                    <text:p><text:span text:style-name="T10">De commentaires (lignes préfixées par --)</text:span></text:p>
                  </text:list-item>
                </text:list>
              </text:list-item>
            </text:list>
            <text:p text:style-name="P18"><text:span text:style-name="T153"/></text:p>
            <text:p text:style-name="P18"><text:span text:style-name="T153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86" draw:style-name="gr2" draw:layer="layout" svg:width="15.535cm" svg:height="10.984cm" svg:x="2.655cm" svg:y="2.258cm" draw:page-number="124" presentation:class="page"/>
          <draw:frame draw:name="Espace réservé des notes 96" presentation:style-name="pr152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25" draw:style-name="dp5" draw:master-page-name="Vide">
        <office:forms form:automatic-focus="false" form:apply-design-mode="false"/>
        <draw:frame draw:name="Titre 99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Données lignes/colonnes</text:span></text:p>
          </draw:text-box>
        </draw:frame>
        <draw:frame draw:name="Espace réservé du texte 87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ksqlDB abstrait les événements sous forme de lignes avec des colonnes et les stocke dans des stream et des tables.</text:span></text:p>
            <text:p text:style-name="P18"><text:span text:style-name="T10"><text:s/></text:span><text:span text:style-name="T10">Les streams et les tables modélisent des collections d'événements qui s'accumulent au fil du temps. </text:span></text:p>
            <text:p text:style-name="P18"><text:span text:style-name="T10">Les deux sont représentés sous la forme d'une série de lignes et de colonnes avec un schéma, à la manière d'une table de base de données relationnelle.</text:span></text:p>
            <text:p text:style-name="P18"><text:span text:style-name="T10">Les lignes représentent des événements individuels. Les colonnes représentent les attributs de ces événements.</text:span></text:p>
            <text:p text:style-name="P18"><text:span text:style-name="T10">Chaque colonne a un type</text:span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87" draw:style-name="gr2" draw:layer="layout" svg:width="15.535cm" svg:height="10.984cm" svg:x="2.655cm" svg:y="2.258cm" draw:page-number="125" presentation:class="page"/>
          <draw:frame draw:name="Espace réservé des notes 100" presentation:style-name="pr153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26" draw:style-name="dp5" draw:master-page-name="Vide">
        <office:forms form:automatic-focus="false" form:apply-design-mode="false"/>
        <draw:frame draw:name="Titre 100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Colonnes Clé / Valeur</text:span></text:p>
          </draw:text-box>
        </draw:frame>
        <draw:frame draw:name="Espace réservé du texte 88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Une colonne est soit une colonne clé soit une colonne valeur</text:span></text:p>
            <text:p text:style-name="P18"><text:span text:style-name="T10">La colonne clé contrôle la partition ou réside la ligne</text:span></text:p>
            <text:p text:style-name="P18"><text:span text:style-name="T10">Il est obligatoire de créer une PRIMARY KEY sur une Table</text:span></text:p>
            <text:p text:style-name="P18"><text:span text:style-name="T10">Chaque ligne représente un enregistrement d’un topic Kafka</text:span></text:p>
            <text:p text:style-name="P18"><text:span text:style-name="T10">Si une colonne est déclarée dans un schéma, mais qu'aucun attribut n'est présent dans l'enregistrement Kafka sous-jacent, la valeur de la colonne de la ligne est renseignée comme nulle.</text:span></text:p>
            <text:p text:style-name="P18"><text:span text:style-name="T10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89" draw:style-name="gr2" draw:layer="layout" svg:width="15.535cm" svg:height="10.984cm" svg:x="2.655cm" svg:y="2.258cm" draw:page-number="126" presentation:class="page"/>
          <draw:frame draw:name="Espace réservé des notes 101" presentation:style-name="pr154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27" draw:style-name="dp5" draw:master-page-name="Vide">
        <office:forms form:automatic-focus="false" form:apply-design-mode="false"/>
        <draw:frame draw:name="Titre 101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Streams</text:span></text:p>
          </draw:text-box>
        </draw:frame>
        <draw:frame draw:name="Espace réservé du texte 89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Un stream est partitionné, immuable et append-only</text:span></text:p>
            <text:p text:style-name="P18"><text:span text:style-name="T20">CREATE STREAM</text:span><text:span text:style-name="T10"> permet de créer un stream à partir d’un topic Kafka, précréé ou créé automatiquement lors de l’exécution du statement</text:span></text:p>
            <text:p text:style-name="P53"><text:span text:style-name="T139">CREATE STREAM s1 (</text:span></text:p>
            <text:p text:style-name="P53"><text:span text:style-name="T139"><text:s text:c="4"/></text:span><text:span text:style-name="T139">k VARCHAR KEY,</text:span></text:p>
            <text:p text:style-name="P53"><text:span text:style-name="T139"><text:s text:c="4"/></text:span><text:span text:style-name="T139">v1 INT,</text:span></text:p>
            <text:p text:style-name="P53"><text:span text:style-name="T139"><text:s text:c="4"/></text:span><text:span text:style-name="T139">v2 VARCHAR</text:span></text:p>
            <text:p text:style-name="P53"><text:span text:style-name="T139">) WITH (</text:span></text:p>
            <text:p text:style-name="P53"><text:span text:style-name="T139"><text:s text:c="4"/></text:span><text:span text:style-name="T139">kafka_topic = 's1',</text:span></text:p>
            <text:p text:style-name="P53"><text:span text:style-name="T139"><text:s text:c="4"/></text:span><text:span text:style-name="T139">partitions = 3, </text:span><text:span text:style-name="T156">// Pas précisé si le topic existe</text:span></text:p>
            <text:p text:style-name="P53"><text:span text:style-name="T139"><text:s text:c="4"/></text:span><text:span text:style-name="T139">value_format = 'json'</text:span></text:p>
            <text:p text:style-name="P53"><text:span text:style-name="T139">);</text:span></text:p>
            <text:p text:style-name="P53"><text:span text:style-name="T102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90" draw:style-name="gr2" draw:layer="layout" svg:width="15.535cm" svg:height="10.984cm" svg:x="2.655cm" svg:y="2.258cm" draw:page-number="127" presentation:class="page"/>
          <draw:frame draw:name="Espace réservé des notes 102" presentation:style-name="pr155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28" draw:style-name="dp5" draw:master-page-name="Vide">
        <office:forms form:automatic-focus="false" form:apply-design-mode="false"/>
        <draw:frame draw:name="Titre 102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Tables</text:span></text:p>
          </draw:text-box>
        </draw:frame>
        <draw:frame draw:name="Espace réservé du texte 90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Une table est partitionnée et muable </text:span></text:p>
            <text:p text:style-name="P18"><text:span text:style-name="T20">CREATE TABLE</text:span><text:span text:style-name="T10"> permet de créer une table à partir d’un topic Kafka, précréé ou créé automatiquement lors de l’exécution du statement</text:span></text:p>
            <text:p text:style-name="P53"><text:span text:style-name="T139">CREATE TABLE current_location (</text:span></text:p>
            <text:p text:style-name="P53"><text:span text:style-name="T139"><text:s text:c="4"/></text:span><text:span text:style-name="T139">person VARCHAR PRIMARY KEY,</text:span></text:p>
            <text:p text:style-name="P53"><text:span text:style-name="T139"><text:s text:c="4"/></text:span><text:span text:style-name="T139">location VARCHAR</text:span></text:p>
            <text:p text:style-name="P53"><text:span text:style-name="T139">) WITH (</text:span></text:p>
            <text:p text:style-name="P53"><text:span text:style-name="T139"><text:s text:c="4"/></text:span><text:span text:style-name="T139">kafka_topic = 'current_location',</text:span></text:p>
            <text:p text:style-name="P53"><text:span text:style-name="T139"><text:s text:c="4"/></text:span><text:span text:style-name="T139">partitions = 3,</text:span></text:p>
            <text:p text:style-name="P53"><text:span text:style-name="T139"><text:s text:c="4"/></text:span><text:span text:style-name="T139">value_format = 'json'</text:span></text:p>
            <text:p text:style-name="P53"><text:span text:style-name="T139">);</text:span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91" draw:style-name="gr2" draw:layer="layout" svg:width="15.535cm" svg:height="10.984cm" svg:x="2.655cm" svg:y="2.258cm" draw:page-number="128" presentation:class="page"/>
          <draw:frame draw:name="Espace réservé des notes 103" presentation:style-name="pr156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29" draw:style-name="dp5" draw:master-page-name="Vide">
        <office:forms form:automatic-focus="false" form:apply-design-mode="false"/>
        <draw:frame draw:name="Titre 103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PseudoColonnes</text:span></text:p>
          </draw:text-box>
        </draw:frame>
        <draw:frame draw:name="Espace réservé du texte 91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Une pseudo-colonne est une colonne automatiquement renseignée par ksqlDB . Elles ne sont pas renvoyées lors d’un SELECT *.</text:span></text:p>
            <text:p text:style-name="P18"><text:span text:style-name="T10">Les pseudo-colonnes disponibles :</text:span></text:p>
            <text:list text:style-name="L4">
              <text:list-item>
                <text:list>
                  <text:list-item>
                    <text:p><text:span text:style-name="T13">HEADERS </text:span><text:span text:style-name="T10">: les entêtes de l'enregistrement Kafka.</text:span></text:p>
                  </text:list-item>
                  <text:list-item>
                    <text:p><text:span text:style-name="T137">ROWOFFSET </text:span><text:span text:style-name="T10">: L’offset de l'enregistrement .</text:span></text:p>
                  </text:list-item>
                  <text:list-item>
                    <text:p><text:span text:style-name="T137">ROWPARTITION </text:span><text:span text:style-name="T10">: La partition de l'enregistrement source.</text:span></text:p>
                  </text:list-item>
                  <text:list-item>
                    <text:p><text:span text:style-name="T137">ROWTIME </text:span><text:span text:style-name="T10">: Le timestamp</text:span></text:p>
                  </text:list-item>
                </text:list>
              </text:list-item>
            </text:list>
            <text:p><text:span text:style-name="T10">Exemple :</text:span></text:p>
            <text:p text:style-name="P53"><text:span text:style-name="T157">SELECT ROWTIME, * FROM s1 EMIT CHANGES;</text:span></text:p>
            <text:p text:style-name="P53"><text:span text:style-name="T139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92" draw:style-name="gr2" draw:layer="layout" svg:width="15.535cm" svg:height="10.984cm" svg:x="2.655cm" svg:y="2.258cm" draw:page-number="129" presentation:class="page"/>
          <draw:frame draw:name="Espace réservé des notes 104" presentation:style-name="pr157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30" draw:style-name="dp5" draw:master-page-name="Vide">
        <office:forms form:automatic-focus="false" form:apply-design-mode="false"/>
        <draw:frame draw:name="Titre 104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Clé-primaires</text:span></text:p>
          </draw:text-box>
        </draw:frame>
        <draw:frame draw:name="Espace réservé du texte 92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">ksqlDB utilise les clés primaires mais pas de la même façon qu’une BD relationelle : </text:span></text:p>
            <text:list text:style-name="L4">
              <text:list-item>
                <text:list>
                  <text:list-item>
                    <text:p><text:span text:style-name="T10">Seules les tables peuvent avoir des clés primaires. Les Stream ne les prennent pas en charge.</text:span></text:p>
                  </text:list-item>
                  <text:list-item>
                    <text:p><text:span text:style-name="T10">L'ajout de plusieurs lignes à une table avec la même clé primaire n'entraîne pas le rejet des lignes suivantes.</text:span></text:p>
                  </text:list-item>
                </text:list>
              </text:list-item>
            </text:list>
            <text:p text:style-name="P18"><text:span text:style-name="T10"/></text:p>
            <text:p text:style-name="P18"><text:span text:style-name="T10">Les clés primaires ne peuvent pas être nulles et doivent être utilisées dans toutes les tables déclarées:</text:span></text:p>
            <text:p text:style-name="P53"><text:span text:style-name="T139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93" draw:style-name="gr2" draw:layer="layout" svg:width="15.535cm" svg:height="10.984cm" svg:x="2.655cm" svg:y="2.258cm" draw:page-number="130" presentation:class="page"/>
          <draw:frame draw:name="Espace réservé des notes 105" presentation:style-name="pr158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31" draw:style-name="dp5" draw:master-page-name="Vide">
        <office:forms form:automatic-focus="false" form:apply-design-mode="false"/>
        <draw:frame draw:name="Titre 105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Types de données</text:span></text:p>
          </draw:text-box>
        </draw:frame>
        <draw:frame draw:name="Espace réservé du texte 93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58">Booléen</text:span><text:span text:style-name="T10"> : </text:span><text:span text:style-name="T14">boolean</text:span></text:p>
            <text:p text:style-name="P18"><text:span text:style-name="T158">Caractères</text:span><text:span text:style-name="T10"> : </text:span><text:span text:style-name="T14">varchar, string, bytes</text:span><text:span text:style-name="T10"> (taille variable)</text:span></text:p>
            <text:p text:style-name="P18"><text:span text:style-name="T158">Numériques</text:span><text:span text:style-name="T10"> : </text:span><text:span text:style-name="T14">int, bigint, double, decimal</text:span><text:span text:style-name="T10"> (précision et scale)</text:span></text:p>
            <text:p text:style-name="P18"><text:span text:style-name="T158">Temporel</text:span><text:span text:style-name="T10"> : </text:span><text:span text:style-name="T14">time, date, timestamp</text:span><text:span text:style-name="T10"> (java.sql.*)</text:span></text:p>
            <text:p text:style-name="P18"><text:span text:style-name="T158">Types composés</text:span><text:span text:style-name="T10"> : </text:span><text:span text:style-name="T14">array, struct</text:span><text:span text:style-name="T10"> (package Kafka, i.e données structurées typées), </text:span><text:span text:style-name="T14">map</text:span></text:p>
            <text:p text:style-name="P18"><text:span text:style-name="T158">Types Custom</text:span><text:span text:style-name="T14"> : </text:span><text:span text:style-name="T10">Peuvent être créés par</text:span><text:span text:style-name="T14"> CREATE TYPE</text:span></text:p>
            <text:p text:style-name="P53"><text:span text:style-name="T139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94" draw:style-name="gr2" draw:layer="layout" svg:width="15.535cm" svg:height="10.984cm" svg:x="2.655cm" svg:y="2.258cm" draw:page-number="131" presentation:class="page"/>
          <draw:frame draw:name="Espace réservé des notes 106" presentation:style-name="pr159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32" draw:style-name="dp5" draw:master-page-name="Vide">
        <office:forms form:automatic-focus="false" form:apply-design-mode="false"/>
        <draw:frame draw:name="Titre 106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Types composés</text:span></text:p>
          </draw:text-box>
        </draw:frame>
        <draw:frame draw:name="Espace réservé du texte 94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59">Ils peuvent être définis lors d’un CREATE (TABLE/STREAM) ou créer à la volée dans une requête SELECT</text:span></text:p>
            <text:p text:style-name="P53"><text:span text:style-name="T160">CREATE STREAM orders (</text:span></text:p>
            <text:p text:style-name="P53"><text:span text:style-name="T160"><text:s text:c="4"/></text:span><text:span text:style-name="T160">order_id VARCHAR,</text:span></text:p>
            <text:p text:style-name="P53"><text:span text:style-name="T160"><text:s text:c="4"/></text:span><text:span text:style-name="T160">delivery_address </text:span><text:span text:style-name="T161">STRUCT&lt;</text:span></text:p>
            <text:p text:style-name="P53"><text:span text:style-name="T161"><text:s text:c="8"/></text:span><text:span text:style-name="T161">street VARCHAR, </text:span></text:p>
            <text:p text:style-name="P53"><text:span text:style-name="T161"><text:s text:c="8"/></text:span><text:span text:style-name="T161">city VARCHAR, </text:span></text:p>
            <text:p text:style-name="P53"><text:span text:style-name="T161"><text:s text:c="8"/></text:span><text:span text:style-name="T161">postal_code VARCHAR</text:span></text:p>
            <text:p text:style-name="P53"><text:span text:style-name="T161"><text:s text:c="4"/></text:span><text:span text:style-name="T161">&gt;</text:span></text:p>
            <text:p text:style-name="P53"><text:span text:style-name="T160">) WITH (</text:span></text:p>
            <text:p text:style-name="P53"><text:span text:style-name="T160"><text:s text:c="4"/></text:span><text:span text:style-name="T160">KAFKA_TOPIC='orders_topic',</text:span></text:p>
            <text:p text:style-name="P53"><text:span text:style-name="T160"><text:s text:c="4"/></text:span><text:span text:style-name="T160">VALUE_FORMAT='JSON'</text:span></text:p>
            <text:p text:style-name="P53"><text:span text:style-name="T160">);</text:span></text:p>
            <text:p text:style-name="P53"><text:span text:style-name="T162"/></text:p>
            <text:p text:style-name="P53"><text:span text:style-name="T160">SELECT </text:span><text:span text:style-name="T161">STRUCT(f1 := v1, f2 := v2)</text:span><text:span text:style-name="T160"> FROM s1 EMIT CHANGES;</text:span></text:p>
            <text:p text:style-name="P53"><text:span text:style-name="T162"/></text:p>
            <text:p text:style-name="P53"><text:span text:style-name="T160">SELECT </text:span><text:span text:style-name="T161">MAP(k1:=v1, k2:=v1*2)</text:span><text:span text:style-name="T160"> FROM s1 EMIT CHANGES;</text:span></text:p>
            <text:p text:style-name="P18"><text:span text:style-name="T159"/></text:p>
            <text:p text:style-name="P53"><text:span text:style-name="T139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95" draw:style-name="gr2" draw:layer="layout" svg:width="15.535cm" svg:height="10.984cm" svg:x="2.655cm" svg:y="2.258cm" draw:page-number="132" presentation:class="page"/>
          <draw:frame draw:name="Espace réservé des notes 107" presentation:style-name="pr160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33" draw:style-name="dp5" draw:master-page-name="Vide">
        <office:forms form:automatic-focus="false" form:apply-design-mode="false"/>
        <draw:frame draw:name="Titre 107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Timestamp </text:span></text:p>
          </draw:text-box>
        </draw:frame>
        <draw:frame draw:name="Espace réservé du texte 95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59">Les opérations basées sur le temps, comme le fenêtrage, traitent les enregistrements en fonction de ROWTIME. La précision est d'une milliseconde.</text:span></text:p>
            <text:p text:style-name="P18"><text:span text:style-name="T159"/></text:p>
            <text:p text:style-name="P18"><text:span text:style-name="T159">La propriété TIMESTAMP permet de remplacer ROWTIME par le contenu de la colonne spécifiée. </text:span></text:p>
            <text:p text:style-name="P53"><text:span text:style-name="T160">CREATE STREAM TEST (id BIGINT KEY, event_timestamp VARCHAR)</text:span></text:p>
            <text:p text:style-name="P53"><text:span text:style-name="T160"><text:s text:c="2"/></text:span><text:span text:style-name="T160">WITH (</text:span></text:p>
            <text:p text:style-name="P53"><text:span text:style-name="T160"><text:s text:c="4"/></text:span><text:span text:style-name="T160">kafka_topic='test_topic',</text:span></text:p>
            <text:p text:style-name="P53"><text:span text:style-name="T160"><text:s text:c="4"/></text:span><text:span text:style-name="T160">value_format='JSON',</text:span></text:p>
            <text:p text:style-name="P53"><text:span text:style-name="T161"><text:s text:c="4"/></text:span><text:span text:style-name="T161">timestamp='event_timestamp',</text:span></text:p>
            <text:p text:style-name="P53"><text:span text:style-name="T161"><text:s text:c="4"/></text:span><text:span text:style-name="T161">timestamp_format='yyyy-MM-dd''T''HH:mm:ssX'</text:span></text:p>
            <text:p text:style-name="P53"><text:span text:style-name="T160"><text:s text:c="2"/></text:span><text:span text:style-name="T160">);</text:span></text:p>
            <text:p text:style-name="P53"><text:span text:style-name="T139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96" draw:style-name="gr2" draw:layer="layout" svg:width="15.535cm" svg:height="10.984cm" svg:x="2.655cm" svg:y="2.258cm" draw:page-number="133" presentation:class="page"/>
          <draw:frame draw:name="Espace réservé des notes 108" presentation:style-name="pr161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34" draw:style-name="dp5" draw:master-page-name="Vide_5f__5f__5f__5f_">
        <office:forms form:automatic-focus="false" form:apply-design-mode="false"/>
        <draw:frame draw:name="Titre 122" presentation:style-name="pr162" draw:text-style-name="P12" draw:layer="layout" svg:width="23.499cm" svg:height="3.506cm" svg:x="3.033cm" svg:y="2.401cm" presentation:class="title" presentation:user-transformed="true">
          <draw:text-box>
            <text:p text:style-name="P11"><text:span text:style-name="T9">ksqlDB</text:span></text:p>
          </draw:text-box>
        </draw:frame>
        <draw:frame draw:name="Sous-titre 13" presentation:style-name="pr163" draw:text-style-name="P14" draw:layer="layout" svg:width="23.499cm" svg:height="12.18cm" svg:x="3.033cm" svg:y="6.283cm" presentation:class="subtitle" presentation:user-transformed="true">
          <draw:text-box>
            <text:p text:style-name="P13"><text:span text:style-name="T114"/></text:p>
            <text:p text:style-name="P13"><text:span text:style-name="T114"/></text:p>
            <text:p text:style-name="P26"><text:span text:style-name="T66">Présentation</text:span></text:p>
            <text:p text:style-name="P26"><text:span text:style-name="T66">Données</text:span></text:p>
            <text:p text:style-name="P26"><text:span text:style-name="T22">Statement</text:span></text:p>
            <text:p text:style-name="P26"><text:span text:style-name="T66">Fonctions disponibles</text:span></text:p>
            <text:p text:style-name="P13"><text:span text:style-name="T10"/></text:p>
          </draw:text-box>
        </draw:frame>
        <presentation:notes draw:style-name="dp6">
          <draw:custom-shape draw:name="Forme libre 13" draw:style-name="gr11" draw:text-style-name="P15" draw:layer="layout" svg:width="15.751cm" svg:height="11.138cm" svg:x="2.624cm" svg:y="2.227cm">
            <text:p/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frame draw:name="Espace réservé des notes 123" presentation:style-name="pr164" draw:text-style-name="P16" draw:layer="layout" svg:width="14.367cm" svg:height="11.259cm" svg:x="3.249cm" svg:y="14.129cm" presentation:class="notes" presentation:placeholder="true" presentation:user-transformed="true">
            <draw:text-box/>
          </draw:frame>
        </presentation:notes>
      </draw:page>
      <draw:page draw:name="page135" draw:style-name="dp5" draw:master-page-name="Vide">
        <office:forms form:automatic-focus="false" form:apply-design-mode="false"/>
        <draw:frame draw:name="Titre 108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PULL QUERY</text:span><text:span text:style-name="T12"><text:tab/></text:span><text:span text:style-name="T12"> </text:span></text:p>
          </draw:text-box>
        </draw:frame>
        <draw:frame draw:name="Espace réservé du texte 96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59">Exécute la requête et se termine <text:s/></text:span></text:p>
            <text:p text:style-name="P18"><text:span text:style-name="T159">Le résultat n'est pas conservé dans un topic Kafka, il est affiché dans la console ou renvoyé au client. </text:span></text:p>
            <text:p text:style-name="P18"><text:span text:style-name="T159">Par défaut, seules les recherches de clés sont activées. :</text:span></text:p>
            <text:list text:style-name="L4">
              <text:list-item>
                <text:list>
                  <text:list-item>
                    <text:p><text:span text:style-name="T159">Les colonnes clés doivent utiliser une comparaison d'égalité avec un littéral (par exemple, KEY = 'abc').</text:span></text:p>
                  </text:list-item>
                  <text:list-item>
                    <text:p><text:span text:style-name="T159">Sur les tables fenêtrées, WINDOWSTART et WINDOWEND peuvent éventuellement être comparés à des littéraux.</text:span></text:p>
                  </text:list-item>
                </text:list>
              </text:list-item>
            </text:list>
            <text:p><text:span text:style-name="T159">Si la propriété 'ksql.query.pull.table.scan.enabled'='true'; ces restrictions sur la clause WHERE sont levées</text:span></text:p>
            <text:p><text:span text:style-name="T159"/></text:p>
            <text:p text:style-name="P53"><text:span text:style-name="T163">SELECT select_expr [, ...]</text:span></text:p>
            <text:p text:style-name="P53"><text:span text:style-name="T163"><text:s text:c="2"/></text:span><text:span text:style-name="T163">FROM from_item -- Materialized View, Stream ou Table</text:span></text:p>
            <text:p text:style-name="P53"><text:span text:style-name="T163"><text:s text:c="2"/></text:span><text:span text:style-name="T163">[ WHERE where_condition ]</text:span></text:p>
            <text:p text:style-name="P53"><text:span text:style-name="T163"><text:s text:c="2"/></text:span><text:span text:style-name="T163">[ AND window_bounds ]</text:span></text:p>
            <text:p text:style-name="P53"><text:span text:style-name="T163"><text:s text:c="2"/></text:span><text:span text:style-name="T163">[ LIMIT count ];</text:span></text:p>
            <text:p text:style-name="P53"><text:span text:style-name="T163"/></text:p>
            <text:p text:style-name="P53"><text:span text:style-name="T163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draw:frame draw:style-name="gr21" draw:text-style-name="P33" draw:layer="layout" svg:width="22.566cm" svg:height="1.216cm" svg:x="1.39cm" svg:y="19.723cm">
          <draw:text-box>
            <text:p><text:span text:style-name="T43">https://docs.ksqldb.io/en/latest/developer-guide/ksqldb-reference</text:span></text:p>
          </draw:text-box>
        </draw:frame>
        <presentation:notes draw:style-name="dp6">
          <draw:page-thumbnail draw:name="Espace réservé de l'image des diapositives 97" draw:style-name="gr2" draw:layer="layout" svg:width="15.535cm" svg:height="10.984cm" svg:x="2.655cm" svg:y="2.258cm" draw:page-number="135" presentation:class="page"/>
          <draw:frame draw:name="Espace réservé des notes 109" presentation:style-name="pr165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36" draw:style-name="dp5" draw:master-page-name="Vide">
        <office:forms form:automatic-focus="false" form:apply-design-mode="false"/>
        <draw:frame draw:name="Titre 111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Exemples PULL QUERY</text:span><text:span text:style-name="T12"><text:tab/></text:span><text:span text:style-name="T12"> </text:span></text:p>
          </draw:text-box>
        </draw:frame>
        <draw:frame draw:name="Espace réservé du texte 99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64">-- Création d’une table, la table n’est pas requêtable en PULL</text:span></text:p>
            <text:p text:style-name="P18"><text:span text:style-name="T163">CREATE TABLE GRADES (ID INT PRIMARY KEY, GRADE STRING, RANK INT) WITH (kafka_topic = 'test_topic', value_format = 'JSON', partitions = 4);</text:span></text:p>
            <text:p text:style-name="P53"><text:span text:style-name="T164">-- Création d’une table dérivée avec un SELECT</text:span></text:p>
            <text:p text:style-name="P53"><text:span text:style-name="T163">CREATE TABLE TOP_TEN_RANKS </text:span></text:p>
            <text:p text:style-name="P53"><text:span text:style-name="T163"><text:s text:c="2"/></text:span><text:span text:style-name="T163">AS SELECT ID, RANK </text:span></text:p>
            <text:p text:style-name="P53"><text:span text:style-name="T163"><text:s text:c="2"/></text:span><text:span text:style-name="T163">FROM GRADES </text:span></text:p>
            <text:p text:style-name="P53"><text:span text:style-name="T163"><text:s text:c="2"/></text:span><text:span text:style-name="T163">WHERE RANK &lt;= 10;</text:span></text:p>
            <text:p text:style-name="P53"><text:span text:style-name="T164">-- Récupération via un ID</text:span></text:p>
            <text:p text:style-name="P53"><text:span text:style-name="T163">SELECT * FROM TOP_TEN_RANKS</text:span></text:p>
            <text:p text:style-name="P53"><text:span text:style-name="T163"><text:s text:c="2"/></text:span><text:span text:style-name="T163">WHERE ID = 5;</text:span></text:p>
            <text:p text:style-name="P53"><text:span text:style-name="T164">-- Autorisation du scan de table</text:span></text:p>
            <text:p text:style-name="P53"><text:span text:style-name="T163">SET 'ksql.query.pull.table.scan.enabled'='true';</text:span></text:p>
            <text:p text:style-name="P53"><text:span text:style-name="T164">-- Recherche par une colonne</text:span></text:p>
            <text:p text:style-name="P53"><text:span text:style-name="T163">SELECT * FROM TOP_TEN_RANKS</text:span></text:p>
            <text:p text:style-name="P53"><text:span text:style-name="T163"><text:s text:c="2"/></text:span><text:span text:style-name="T163">WHERE RANK &gt; 4 AND RANK &lt; 8;</text:span></text:p>
            <text:p text:style-name="P53"><text:span text:style-name="T163"/></text:p>
            <text:p text:style-name="P53"><text:span text:style-name="T163"/></text:p>
            <text:p text:style-name="P53"><text:span text:style-name="T163"/></text:p>
            <text:p text:style-name="P53"><text:span text:style-name="T163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100" draw:style-name="gr2" draw:layer="layout" svg:width="15.535cm" svg:height="10.984cm" svg:x="2.655cm" svg:y="2.258cm" draw:page-number="136" presentation:class="page"/>
          <draw:frame draw:name="Espace réservé des notes 112" presentation:style-name="pr166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37" draw:style-name="dp5" draw:master-page-name="Vide">
        <office:forms form:automatic-focus="false" form:apply-design-mode="false"/>
        <draw:frame draw:name="Titre 110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PUSH QUERY</text:span><text:span text:style-name="T12"><text:tab/></text:span><text:span text:style-name="T12"> </text:span></text:p>
          </draw:text-box>
        </draw:frame>
        <draw:frame draw:name="Espace réservé du texte 98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59">Pousse un flux continu de mises à jour vers un stream ou une table. </text:span></text:p>
            <text:p text:style-name="P18"><text:span text:style-name="T159">Le résultat du select n'est pas conservé dans un topic Kafka et est imprimé uniquement dans la console ou renvoyé au client. </text:span></text:p>
            <text:p text:style-name="P18"><text:span text:style-name="T159">Permet de s’abonner aux mises à jour, et de réagir en temps réel.</text:span></text:p>
            <text:p text:style-name="P53"><text:span text:style-name="T163">SELECT select_expr [, ...]</text:span></text:p>
            <text:p text:style-name="P53"><text:span text:style-name="T163"><text:s text:c="2"/></text:span><text:span text:style-name="T163">FROM from_item -- Un stream ou une table</text:span></text:p>
            <text:p text:style-name="P53"><text:span text:style-name="T163"><text:s text:c="2"/></text:span><text:span text:style-name="T163">[[ LEFT | FULL | INNER ]</text:span></text:p>
            <text:p text:style-name="P53"><text:span text:style-name="T163"><text:s text:c="4"/></text:span><text:span text:style-name="T163">JOIN join_item</text:span></text:p>
            <text:p text:style-name="P53"><text:span text:style-name="T163"><text:s text:c="8"/></text:span><text:span text:style-name="T163">[WITHIN [&lt;size&gt; &lt;timeunit&gt; | (&lt;before_size&gt; &lt;timeunit&gt;, &lt;after_size&gt; &lt;timeunit&gt;)] [GRACE PERIOD &lt;grace_size&gt; &lt;timeunit&gt;]]</text:span></text:p>
            <text:p text:style-name="P53"><text:span text:style-name="T163"><text:s text:c="4"/></text:span><text:span text:style-name="T163">ON join_criteria]*</text:span></text:p>
            <text:p text:style-name="P53"><text:span text:style-name="T163"><text:s text:c="2"/></text:span><text:span text:style-name="T163">[ WINDOW window_expression ]</text:span></text:p>
            <text:p text:style-name="P53"><text:span text:style-name="T163"><text:s text:c="2"/></text:span><text:span text:style-name="T163">[ WHERE where_condition ]</text:span></text:p>
            <text:p text:style-name="P53"><text:span text:style-name="T163"><text:s text:c="2"/></text:span><text:span text:style-name="T163">[ GROUP BY grouping_expression ]</text:span></text:p>
            <text:p text:style-name="P53"><text:span text:style-name="T163"><text:s text:c="2"/></text:span><text:span text:style-name="T163">[ HAVING having_expression ]</text:span></text:p>
            <text:p text:style-name="P53"><text:span text:style-name="T163"><text:s text:c="2"/></text:span><text:span text:style-name="T163">EMIT [ output_refinement ] -- CHANGE ou FINAL</text:span></text:p>
            <text:p text:style-name="P53"><text:span text:style-name="T163"><text:s text:c="2"/></text:span><text:span text:style-name="T163">[ LIMIT count ];</text:span></text:p>
            <text:p text:style-name="P53"><text:span text:style-name="T163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99" draw:style-name="gr2" draw:layer="layout" svg:width="15.535cm" svg:height="10.984cm" svg:x="2.655cm" svg:y="2.258cm" draw:page-number="137" presentation:class="page"/>
          <draw:frame draw:name="Espace réservé des notes 111" presentation:style-name="pr167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38" draw:style-name="dp5" draw:master-page-name="Vide">
        <office:forms form:automatic-focus="false" form:apply-design-mode="false"/>
        <draw:frame draw:name="Titre 109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Exemples PUSH QUERY</text:span><text:span text:style-name="T12"><text:tab/></text:span><text:span text:style-name="T12"> </text:span></text:p>
          </draw:text-box>
        </draw:frame>
        <draw:frame draw:name="Espace réservé du texte 97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08">SELECT * FROM pageviews</text:span></text:p>
            <text:p text:style-name="P53"><text:span text:style-name="T108"><text:s text:c="2"/></text:span><text:span text:style-name="T108">WHERE ROWTIME &gt;= '2017-11-17T04:53:45'</text:span></text:p>
            <text:p text:style-name="P53"><text:span text:style-name="T108"><text:s text:c="4"/></text:span><text:span text:style-name="T108">AND ROWTIME &lt;= '2017-11-17T04:53:48'</text:span></text:p>
            <text:p text:style-name="P53"><text:span text:style-name="T108"><text:s text:c="2"/></text:span><text:span text:style-name="T108">EMIT CHANGES;</text:span></text:p>
            <text:p text:style-name="P53"><text:span text:style-name="T163"/></text:p>
            <text:p text:style-name="P53"><text:span text:style-name="T163"/></text:p>
            <text:p text:style-name="P53"><text:span text:style-name="T108">-- orders est un stream, le fenêtrage est disponible sur les stream</text:span></text:p>
            <text:p text:style-name="P53"><text:span text:style-name="T108">SELECT windowstart, windowend, item_id, SUM(quantity)</text:span></text:p>
            <text:p text:style-name="P53"><text:span text:style-name="T108"><text:s text:c="2"/></text:span><text:span text:style-name="T108">FROM orders</text:span></text:p>
            <text:p text:style-name="P53"><text:span text:style-name="T108"><text:s text:c="2"/></text:span><text:span text:style-name="T108">WINDOW TUMBLING (SIZE 20 SECONDS)</text:span></text:p>
            <text:p text:style-name="P53"><text:span text:style-name="T108"><text:s text:c="2"/></text:span><text:span text:style-name="T108">GROUP BY item_id</text:span></text:p>
            <text:p text:style-name="P53"><text:span text:style-name="T108"><text:s text:c="2"/></text:span><text:span text:style-name="T108">EMIT CHANGES;</text:span></text:p>
            <text:p text:style-name="P53"><text:span text:style-name="T163"/></text:p>
            <text:p text:style-name="P53"><text:span text:style-name="T163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98" draw:style-name="gr2" draw:layer="layout" svg:width="15.535cm" svg:height="10.984cm" svg:x="2.655cm" svg:y="2.258cm" draw:page-number="138" presentation:class="page"/>
          <draw:frame draw:name="Espace réservé des notes 110" presentation:style-name="pr168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39" draw:style-name="dp5" draw:master-page-name="Vide">
        <office:forms form:automatic-focus="false" form:apply-design-mode="false"/>
        <draw:frame draw:name="Titre 112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Jointures</text:span></text:p>
          </draw:text-box>
        </draw:frame>
        <draw:frame draw:name="Espace réservé du texte 100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59">Les jointures respectent les règles des jointures de KafkaStream</text:span></text:p>
            <text:list text:style-name="L4">
              <text:list-item>
                <text:list>
                  <text:list-item>
                    <text:p><text:span text:style-name="T159">Une jointure entre 2 Stream doivent spécifier une fenêtre temporelle avec WITHIN</text:span></text:p>
                  </text:list-item>
                  <text:list-item>
                    <text:p><text:span text:style-name="T159">Un jointure entre STREAM et TABLE produit un STREAM, une grace periode peut être spéciiée</text:span></text:p>
                  </text:list-item>
                  <text:list-item>
                    <text:p><text:span text:style-name="T159">Une jointure entre 2 TABLE produit une TABLE</text:span></text:p>
                  </text:list-item>
                </text:list>
              </text:list-item>
            </text:list>
            <text:p><text:span text:style-name="T159">Les jointures servent généralement à créer de nouveau STREAM ou TABLE</text:span></text:p>
            <text:p text:style-name="P18"><text:span text:style-name="T10"/></text:p>
            <text:p text:style-name="P53"><text:span text:style-name="T163"/></text:p>
            <text:p text:style-name="P53"><text:span text:style-name="T163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101" draw:style-name="gr2" draw:layer="layout" svg:width="15.535cm" svg:height="10.984cm" svg:x="2.655cm" svg:y="2.258cm" draw:page-number="139" presentation:class="page"/>
          <draw:frame draw:name="Espace réservé des notes 113" presentation:style-name="pr169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0" draw:style-name="dp5" draw:master-page-name="Vide_5f_">
        <office:forms form:automatic-focus="false" form:apply-design-mode="false"/>
        <draw:frame draw:name="Titre 32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Exemples </text:span></text:p>
          </draw:text-box>
        </draw:frame>
        <draw:frame draw:name="Espace réservé du texte 33" presentation:style-name="pr24" draw:text-style-name="P62" draw:layer="layout" svg:width="23.499cm" svg:height="12.18cm" svg:x="3.033cm" svg:y="6.283cm" presentation:class="outline" presentation:user-transformed="true">
          <draw:text-box>
            <text:p text:style-name="P49"><text:span text:style-name="T108">-- Jointure STREAM STREAM</text:span></text:p>
            <text:p text:style-name="P52"><text:span text:style-name="T108">CREATE STREAM position_statut AS</text:span></text:p>
            <text:p text:style-name="P52"><text:span text:style-name="T108"><text:s text:c="4"/></text:span><text:span text:style-name="T108">SELECT c.coursierId,</text:span></text:p>
            <text:p text:style-name="P52"><text:span text:style-name="T108"><text:s text:c="11"/></text:span><text:span text:style-name="T108">c.statut,</text:span></text:p>
            <text:p text:style-name="P52"><text:span text:style-name="T108"><text:s text:c="11"/></text:span><text:span text:style-name="T108">p.position-&gt;latitude AS latitude,</text:span></text:p>
            <text:p text:style-name="P52"><text:span text:style-name="T108"><text:s text:c="11"/></text:span><text:span text:style-name="T108">p.position-&gt;longitude AS longitude</text:span></text:p>
            <text:p text:style-name="P52"><text:span text:style-name="T108"><text:s text:c="4"/></text:span><text:span text:style-name="T108">FROM statut_stream c</text:span></text:p>
            <text:p text:style-name="P52"><text:span text:style-name="T108"><text:s text:c="4"/></text:span><text:span text:style-name="T108">JOIN position_stream p</text:span></text:p>
            <text:p text:style-name="P52"><text:span text:style-name="T108"><text:s text:c="4"/></text:span><text:span text:style-name="T108">WITHIN 5 MINUTES -- Fenêtre de jointure de 5 minutes</text:span></text:p>
            <text:p text:style-name="P52"><text:span text:style-name="T108"><text:s text:c="4"/></text:span><text:span text:style-name="T108">ON c.coursierId = p.coursierId</text:span></text:p>
            <text:p text:style-name="P52"><text:span text:style-name="T108"><text:s text:c="4"/></text:span><text:span text:style-name="T108">EMIT CHANGES;</text:span></text:p>
            <text:p text:style-name="P53"><text:span text:style-name="T163"/></text:p>
            <text:p text:style-name="P53"><text:span text:style-name="T108">-- Jointure STREAM TABLE</text:span></text:p>
            <text:p text:style-name="P60"><text:span text:style-name="T108">CREATE STREAM transaction_coursier AS</text:span></text:p>
            <text:p text:style-name="P53"><text:span text:style-name="T108">SELECT t.coursierId,</text:span></text:p>
            <text:p text:style-name="P53"><text:span text:style-name="T108"><text:s text:c="7"/></text:span><text:span text:style-name="T108">t.montant,</text:span></text:p>
            <text:p text:style-name="P53"><text:span text:style-name="T108"><text:s text:c="7"/></text:span><text:span text:style-name="T108">c.statut</text:span></text:p>
            <text:p text:style-name="P53"><text:span text:style-name="T108">FROM transaction_stream t</text:span></text:p>
            <text:p text:style-name="P53"><text:span text:style-name="T108">JOIN coursier_table c</text:span></text:p>
            <text:p text:style-name="P53"><text:span text:style-name="T108">ON t.coursierId = c.coursierId</text:span></text:p>
            <text:p text:style-name="P53"><text:span text:style-name="T108">EMIT CHANGES</text:span></text:p>
            <text:p text:style-name="P53"><text:span text:style-name="T163"/></text:p>
            <text:p text:style-name="P53"><text:span text:style-name="T163"/></text:p>
            <text:p text:style-name="P53"><text:span text:style-name="T139"/></text:p>
            <text:p text:style-name="P53"><text:span text:style-name="T102"/></text:p>
            <text:p text:style-name="P61"><text:span text:style-name="T10"/></text:p>
            <text:p text:style-name="P61"><text:span text:style-name="T152"/></text:p>
          </draw:text-box>
        </draw:frame>
        <presentation:notes draw:style-name="dp6">
          <draw:page-thumbnail draw:name="Espace réservé de l'image des diapositives 33" draw:style-name="gr2" draw:layer="layout" svg:width="15.535cm" svg:height="10.984cm" svg:x="2.655cm" svg:y="2.258cm" draw:page-number="140" presentation:class="page"/>
          <draw:frame draw:name="Espace réservé des notes 37" presentation:style-name="pr170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1" draw:style-name="dp5" draw:master-page-name="Vide_5f_">
        <office:forms form:automatic-focus="false" form:apply-design-mode="false"/>
        <draw:frame draw:name="Titre 36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Exemples (2) </text:span></text:p>
          </draw:text-box>
        </draw:frame>
        <draw:frame draw:name="Espace réservé du texte 41" presentation:style-name="pr24" draw:text-style-name="P62" draw:layer="layout" svg:width="23.499cm" svg:height="12.18cm" svg:x="3.033cm" svg:y="6.283cm" presentation:class="outline" presentation:user-transformed="true">
          <draw:text-box>
            <text:p text:style-name="P49"><text:span text:style-name="T108">-- Jointure TABLE TABLE</text:span></text:p>
            <text:p text:style-name="P49"><text:span text:style-name="T108">CREATE TABLE coursier_position_table AS</text:span></text:p>
            <text:p text:style-name="P52"><text:span text:style-name="T108">SELECT c.coursierId,</text:span></text:p>
            <text:p text:style-name="P52"><text:span text:style-name="T108"><text:s text:c="7"/></text:span><text:span text:style-name="T108">c.nom,</text:span></text:p>
            <text:p text:style-name="P52"><text:span text:style-name="T108"><text:s text:c="7"/></text:span><text:span text:style-name="T108">c.statut,</text:span></text:p>
            <text:p text:style-name="P52"><text:span text:style-name="T108"><text:s text:c="7"/></text:span><text:span text:style-name="T108">p.latitude,</text:span></text:p>
            <text:p text:style-name="P52"><text:span text:style-name="T108"><text:s text:c="7"/></text:span><text:span text:style-name="T108">p.longitude</text:span></text:p>
            <text:p text:style-name="P52"><text:span text:style-name="T108">FROM coursier_table c</text:span></text:p>
            <text:p text:style-name="P52"><text:span text:style-name="T108">JOIN position_table p</text:span></text:p>
            <text:p text:style-name="P52"><text:span text:style-name="T108">ON c.coursierId = p.coursierId</text:span></text:p>
            <text:p text:style-name="P52"><text:span text:style-name="T108">EMIT CHANGES;</text:span></text:p>
            <text:p text:style-name="P53"><text:span text:style-name="T163"/></text:p>
            <text:p text:style-name="P53"><text:span text:style-name="T108"/></text:p>
            <text:p text:style-name="P53"><text:span text:style-name="T163"/></text:p>
            <text:p text:style-name="P53"><text:span text:style-name="T163"/></text:p>
            <text:p text:style-name="P53"><text:span text:style-name="T139"/></text:p>
            <text:p text:style-name="P53"><text:span text:style-name="T102"/></text:p>
            <text:p text:style-name="P61"><text:span text:style-name="T10"/></text:p>
            <text:p text:style-name="P61"><text:span text:style-name="T152"/></text:p>
          </draw:text-box>
        </draw:frame>
        <presentation:notes draw:style-name="dp6">
          <draw:page-thumbnail draw:name="Espace réservé de l'image des diapositives 34" draw:style-name="gr2" draw:layer="layout" svg:width="15.535cm" svg:height="10.984cm" svg:x="2.655cm" svg:y="2.258cm" draw:page-number="141" presentation:class="page"/>
          <draw:frame draw:name="Espace réservé des notes 38" presentation:style-name="pr171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2" draw:style-name="dp5" draw:master-page-name="Vide">
        <office:forms form:automatic-focus="false" form:apply-design-mode="false"/>
        <draw:frame draw:name="Titre 4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Insertions</text:span></text:p>
          </draw:text-box>
        </draw:frame>
        <draw:frame draw:name="Espace réservé du texte 32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59">2 moyens pour insérer des données dans une stream ou une table</text:span></text:p>
            <text:list text:style-name="L4">
              <text:list-item>
                <text:list>
                  <text:list-item>
                    <text:p><text:span text:style-name="T159">Insertion de valeurs</text:span></text:p>
                  </text:list-item>
                  <text:list-item>
                    <text:p><text:span text:style-name="T159">Insertions à partir d’un SELECT (seulement pour les streams)</text:span></text:p>
                  </text:list-item>
                </text:list>
              </text:list-item>
            </text:list>
            <text:p text:style-name="P18"><text:span text:style-name="T159"/></text:p>
            <text:p text:style-name="P53"><text:span text:style-name="T164">-- Insert avec valeurs</text:span></text:p>
            <text:p text:style-name="P53"><text:span text:style-name="T163">INSERT INTO foo (ROWTIME, KEY_COL, COL_A) VALUES (1510923225000, 'key', 'A');</text:span></text:p>
            <text:p text:style-name="P53"><text:span text:style-name="T164">-- Insert avec SELECT</text:span></text:p>
            <text:p text:style-name="P53"><text:span text:style-name="T163">INSERT INTO large_orders</text:span></text:p>
            <text:p text:style-name="P53"><text:span text:style-name="T163">SELECT order_id, customer, amount </text:span></text:p>
            <text:p text:style-name="P53"><text:span text:style-name="T163">FROM orders</text:span></text:p>
            <text:p text:style-name="P53"><text:span text:style-name="T163">WHERE amount &gt; 100;</text:span></text:p>
            <text:p text:style-name="P53"><text:span text:style-name="T163"/></text:p>
            <text:p text:style-name="P53"><text:span text:style-name="T163"/></text:p>
            <text:p text:style-name="P53"><text:span text:style-name="T163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29" draw:style-name="gr2" draw:layer="layout" svg:width="15.535cm" svg:height="10.984cm" svg:x="2.655cm" svg:y="2.258cm" draw:page-number="142" presentation:class="page"/>
          <draw:frame draw:name="Espace réservé des notes 33" presentation:style-name="pr172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3" draw:style-name="dp5" draw:master-page-name="Vide">
        <office:forms form:automatic-focus="false" form:apply-design-mode="false"/>
        <draw:frame draw:name="Titre 113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SHOW</text:span></text:p>
          </draw:text-box>
        </draw:frame>
        <draw:frame draw:name="Espace réservé du texte 101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59">SHOW permet de lister les objets du cluster </text:span></text:p>
            <text:list text:style-name="L4">
              <text:list-item>
                <text:list>
                  <text:list-item>
                    <text:p><text:span text:style-name="T159">STREAMS</text:span></text:p>
                  </text:list-item>
                  <text:list-item>
                    <text:p><text:span text:style-name="T159">TABLES</text:span></text:p>
                  </text:list-item>
                  <text:list-item>
                    <text:p><text:span text:style-name="T159">QUERIES </text:span></text:p>
                  </text:list-item>
                  <text:list-item>
                    <text:p><text:span text:style-name="T159">TOPICS</text:span></text:p>
                  </text:list-item>
                  <text:list-item>
                    <text:p><text:span text:style-name="T159">PROPERTIES</text:span></text:p>
                  </text:list-item>
                  <text:list-item>
                    <text:p><text:span text:style-name="T159">CONNECTORS (KafkaConnect)</text:span></text:p>
                  </text:list-item>
                  <text:list-item>
                    <text:p><text:span text:style-name="T159">FUNCTIONS</text:span></text:p>
                  </text:list-item>
                  <text:list-item>
                    <text:p><text:span text:style-name="T159">VARIABLES (défini avec DEFINE)</text:span></text:p>
                  </text:list-item>
                  <text:list-item>
                    <text:p><text:span text:style-name="T159">TYPE : Les types custom</text:span></text:p>
                  </text:list-item>
                </text:list>
              </text:list-item>
            </text:list>
            <text:p text:style-name="P18"><text:span text:style-name="T159"/></text:p>
            <text:p text:style-name="P53"><text:span text:style-name="T164"/></text:p>
            <text:p text:style-name="P53"><text:span text:style-name="T163"/></text:p>
            <text:p text:style-name="P53"><text:span text:style-name="T163"/></text:p>
            <text:p text:style-name="P53"><text:span text:style-name="T163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102" draw:style-name="gr2" draw:layer="layout" svg:width="15.535cm" svg:height="10.984cm" svg:x="2.655cm" svg:y="2.258cm" draw:page-number="143" presentation:class="page"/>
          <draw:frame draw:name="Espace réservé des notes 114" presentation:style-name="pr173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4" draw:style-name="dp5" draw:master-page-name="Vide">
        <office:forms form:automatic-focus="false" form:apply-design-mode="false"/>
        <draw:frame draw:name="Titre 114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DESCRIBE</text:span></text:p>
          </draw:text-box>
        </draw:frame>
        <draw:frame draw:name="Espace réservé du texte 102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65">DESCRIBE</text:span><text:span text:style-name="T159"> permet de lister les informations détaillées d’un objet, le mot clé EXTENDED permet d’accéder à des statistiques d’exécution</text:span></text:p>
            <text:list text:style-name="L4">
              <text:list-item>
                <text:list>
                  <text:list-item>
                    <text:p><text:span text:style-name="T159">STREAMS | TABLE : Tous les STREAM ou Toutes les table</text:span></text:p>
                  </text:list-item>
                  <text:list-item>
                    <text:p><text:span text:style-name="T159">&lt;Nom STREAM&gt; | &lt;Nom TABLE&gt; : Seulement le STREAM/TABLE spécifié </text:span></text:p>
                  </text:list-item>
                  <text:list-item>
                    <text:p><text:span text:style-name="T159">TOPICS</text:span></text:p>
                  </text:list-item>
                  <text:list-item>
                    <text:p><text:span text:style-name="T159">CONNECTOR (KafkaConnect)</text:span></text:p>
                  </text:list-item>
                  <text:list-item>
                    <text:p><text:span text:style-name="T159">FUNCTIONS</text:span></text:p>
                    <text:p><text:span text:style-name="T159"/></text:p>
                  </text:list-item>
                </text:list>
              </text:list-item>
            </text:list>
            <text:p text:style-name="P18"><text:span text:style-name="T159"/></text:p>
            <text:p text:style-name="P53"><text:span text:style-name="T164"/></text:p>
            <text:p text:style-name="P53"><text:span text:style-name="T163"/></text:p>
            <text:p text:style-name="P53"><text:span text:style-name="T163"/></text:p>
            <text:p text:style-name="P53"><text:span text:style-name="T163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103" draw:style-name="gr2" draw:layer="layout" svg:width="15.535cm" svg:height="10.984cm" svg:x="2.655cm" svg:y="2.258cm" draw:page-number="144" presentation:class="page"/>
          <draw:frame draw:name="Espace réservé des notes 115" presentation:style-name="pr174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5" draw:style-name="dp5" draw:master-page-name="Vide">
        <office:forms form:automatic-focus="false" form:apply-design-mode="false"/>
        <draw:frame draw:name="Titre 115" presentation:style-name="pr10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DROP</text:span></text:p>
          </draw:text-box>
        </draw:frame>
        <draw:frame draw:name="Espace réservé du texte 103" presentation:style-name="pr11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66">DROP</text:span><text:span text:style-name="T159"> permet de supprimer un objet</text:span></text:p>
            <text:list text:style-name="L4">
              <text:list-item>
                <text:list>
                  <text:list-item>
                    <text:p><text:span text:style-name="T167">DROP STREAM [IF EXISTS] stream_name [DELETE TOPIC];</text:span></text:p>
                  </text:list-item>
                  <text:list-item>
                    <text:p><text:span text:style-name="T167">DROP TABLE [IF EXISTS] table_name [DELETE TOPIC];</text:span></text:p>
                  </text:list-item>
                  <text:list-item>
                    <text:p><text:span text:style-name="T167">DROP CONNECTOR [IF EXISTS] connector_name;</text:span></text:p>
                    <text:p><text:span text:style-name="T159"/></text:p>
                  </text:list-item>
                </text:list>
              </text:list-item>
            </text:list>
            <text:p text:style-name="P53"><text:span text:style-name="T164"/></text:p>
            <text:p text:style-name="P53"><text:span text:style-name="T163"/></text:p>
            <text:p text:style-name="P53"><text:span text:style-name="T163"/></text:p>
            <text:p text:style-name="P53"><text:span text:style-name="T163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draw:custom-shape draw:name="ZoneTexte 4" draw:style-name="gr22" draw:text-style-name="P23" draw:layer="layout" svg:width="17.339cm" svg:height="1.216cm" svg:x="1.308cm" svg:y="19.426cm">
          <text:p text:style-name="P22"><text:span text:style-name="T128">Atelier 7.2 : Création de Stream, Table, requê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page-thumbnail draw:name="Espace réservé de l'image des diapositives 104" draw:style-name="gr2" draw:layer="layout" svg:width="15.535cm" svg:height="10.984cm" svg:x="2.655cm" svg:y="2.258cm" draw:page-number="145" presentation:class="page"/>
          <draw:frame draw:name="Espace réservé des notes 116" presentation:style-name="pr175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6" draw:style-name="dp5" draw:master-page-name="Vide_5f__5f__5f_">
        <office:forms form:automatic-focus="false" form:apply-design-mode="false"/>
        <draw:frame draw:name="Titre 116" presentation:style-name="pr176" draw:text-style-name="P12" draw:layer="layout" svg:width="23.499cm" svg:height="3.506cm" svg:x="3.033cm" svg:y="2.401cm" presentation:class="title" presentation:user-transformed="true">
          <draw:text-box>
            <text:p text:style-name="P11"><text:span text:style-name="T9">ksqlDB</text:span></text:p>
          </draw:text-box>
        </draw:frame>
        <draw:frame draw:name="Sous-titre 12" presentation:style-name="pr177" draw:text-style-name="P14" draw:layer="layout" svg:width="23.499cm" svg:height="12.18cm" svg:x="3.033cm" svg:y="6.283cm" presentation:class="subtitle" presentation:user-transformed="true">
          <draw:text-box>
            <text:p text:style-name="P13"><text:span text:style-name="T114"/></text:p>
            <text:p text:style-name="P13"><text:span text:style-name="T114"/></text:p>
            <text:p text:style-name="P26"><text:span text:style-name="T66">Présentation</text:span></text:p>
            <text:p text:style-name="P26"><text:span text:style-name="T66">Données</text:span></text:p>
            <text:p text:style-name="P26"><text:span text:style-name="T66">Statement</text:span></text:p>
            <text:p text:style-name="P26"><text:span text:style-name="T22">Fonctions disponibles</text:span></text:p>
            <text:p text:style-name="P13"><text:span text:style-name="T10"/></text:p>
          </draw:text-box>
        </draw:frame>
        <presentation:notes draw:style-name="dp6">
          <draw:custom-shape draw:name="Forme libre 12" draw:style-name="gr11" draw:text-style-name="P15" draw:layer="layout" svg:width="15.751cm" svg:height="11.138cm" svg:x="2.624cm" svg:y="2.227cm">
            <text:p/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frame draw:name="Espace réservé des notes 117" presentation:style-name="pr178" draw:text-style-name="P16" draw:layer="layout" svg:width="14.367cm" svg:height="11.259cm" svg:x="3.249cm" svg:y="14.129cm" presentation:class="notes" presentation:placeholder="true" presentation:user-transformed="true">
            <draw:text-box/>
          </draw:frame>
        </presentation:notes>
      </draw:page>
      <draw:page draw:name="page147" draw:style-name="dp5" draw:master-page-name="Vide_5f_">
        <office:forms form:automatic-focus="false" form:apply-design-mode="false"/>
        <draw:frame draw:name="Titre 117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Fonctions</text:span></text:p>
          </draw:text-box>
        </draw:frame>
        <draw:frame draw:name="Espace réservé du texte 104" presentation:style-name="pr24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68">3 types de fonctions :</text:span></text:p>
            <text:list text:style-name="L4">
              <text:list-item>
                <text:list>
                  <text:list-item>
                    <text:p><text:span text:style-name="T168">Les fonctions </text:span><text:span text:style-name="T165">scalaires</text:span><text:span text:style-name="T168"><text:line-break/></text:span><text:span text:style-name="T168">S’applique sur une colonne</text:span></text:p>
                  </text:list-item>
                  <text:list-item>
                    <text:p><text:span text:style-name="T168">Les fonctions </text:span><text:span text:style-name="T165">d’agrégations</text:span><text:span text:style-name="T168"><text:line-break/></text:span><text:span text:style-name="T168">Utilisées avec un GROUP BY</text:span></text:p>
                  </text:list-item>
                  <text:list-item>
                    <text:p><text:span text:style-name="T168">Les fonctions de </text:span><text:span text:style-name="T165">table</text:span><text:span text:style-name="T168"><text:line-break/></text:span><text:span text:style-name="T168">Retourne zéro ou plusieurs lignes</text:span></text:p>
                    <text:p><text:span text:style-name="T167"/></text:p>
                    <text:p><text:span text:style-name="T159"/></text:p>
                  </text:list-item>
                </text:list>
              </text:list-item>
            </text:list>
            <text:p text:style-name="P53"><text:span text:style-name="T164"/></text:p>
            <text:p text:style-name="P53"><text:span text:style-name="T163"/></text:p>
            <text:p text:style-name="P53"><text:span text:style-name="T163"/></text:p>
            <text:p text:style-name="P53"><text:span text:style-name="T163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105" draw:style-name="gr2" draw:layer="layout" svg:width="15.535cm" svg:height="10.984cm" svg:x="2.655cm" svg:y="2.258cm" draw:page-number="147" presentation:class="page"/>
          <draw:frame draw:name="Espace réservé des notes 118" presentation:style-name="pr179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8" draw:style-name="dp5" draw:master-page-name="Vide_5f_">
        <office:forms form:automatic-focus="false" form:apply-design-mode="false"/>
        <draw:frame draw:name="Titre 118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Fonctions scalaires</text:span></text:p>
          </draw:text-box>
        </draw:frame>
        <draw:frame draw:name="Espace réservé du texte 105" presentation:style-name="pr24" draw:text-style-name="P21" draw:layer="layout" svg:width="23.499cm" svg:height="12.18cm" svg:x="3.033cm" svg:y="6.283cm" presentation:class="outline" presentation:user-transformed="true">
          <draw:text-box>
            <text:p text:style-name="P18"><text:span text:style-name="T169">Numériques </text:span><text:span text:style-name="T168">: Arrondis, Trigonométrie, Valeur absolue, Racine carré, Puissance, Log, Exponentiel, Distance géo, Plus grandes valeurs entre colonnes, …</text:span></text:p>
            <text:p text:style-name="P18"><text:span text:style-name="T169">Sur les collections</text:span><text:span text:style-name="T168"> : Longueur, test si contient, Accès à un élément, tri, intersection, union, map, …</text:span></text:p>
            <text:p text:style-name="P18"><text:span text:style-name="T169">Invocations de fonction</text:span><text:span text:style-name="T168"> (lambda) : Filter, Transform, Reduce</text:span></text:p>
            <text:p text:style-name="P18"><text:span text:style-name="T169">Chaînes de caractères</text:span><text:span text:style-name="T168"> : split, trim, regexp, substring, replace, mask, fonctions JSON </text:span></text:p>
            <text:p text:style-name="P18"><text:span text:style-name="T169">Bytes </text:span><text:span text:style-name="T168">: Conversion en numérique</text:span></text:p>
            <text:p text:style-name="P18"><text:span text:style-name="T169">Null </text:span><text:span text:style-name="T168">: Valeur alternative si null, Valeur null si condition, première valeur non null entre plusieurs colonnes</text:span></text:p>
            <text:p text:style-name="P18"><text:span text:style-name="T169">Date  et Time</text:span><text:span text:style-name="T168">: Ajout/soustraction, Parsing, Formatting, Conversion</text:span></text:p>
            <text:p text:style-name="P18"><text:span text:style-name="T169">URLs </text:span><text:span text:style-name="T168">: extraction des champs (host,…), Encoding/Decoding, </text:span></text:p>
            <text:list text:style-name="L4">
              <text:list-item>
                <text:list>
                  <text:list-header>
                    <text:p><text:span text:style-name="T159"/></text:p>
                  </text:list-header>
                </text:list>
              </text:list-item>
            </text:list>
            <text:p text:style-name="P53"><text:span text:style-name="T164"/></text:p>
            <text:p text:style-name="P53"><text:span text:style-name="T163"/></text:p>
            <text:p text:style-name="P53"><text:span text:style-name="T163"/></text:p>
            <text:p text:style-name="P53"><text:span text:style-name="T163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106" draw:style-name="gr2" draw:layer="layout" svg:width="15.535cm" svg:height="10.984cm" svg:x="2.655cm" svg:y="2.258cm" draw:page-number="148" presentation:class="page"/>
          <draw:frame draw:name="Espace réservé des notes 119" presentation:style-name="pr180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9" draw:style-name="dp5" draw:master-page-name="Vide_5f_">
        <office:forms form:automatic-focus="false" form:apply-design-mode="false"/>
        <draw:frame draw:name="Titre 119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Fonctions d’agrégation</text:span></text:p>
          </draw:text-box>
        </draw:frame>
        <draw:frame draw:name="Espace réservé du texte 106" presentation:style-name="pr24" draw:text-style-name="P21" draw:layer="layout" svg:width="23.499cm" svg:height="12.18cm" svg:x="3.033cm" svg:y="6.283cm" presentation:class="outline" presentation:user-transformed="true">
          <draw:text-box>
            <text:p text:style-name="P20"><text:span text:style-name="T170">Les classiques :</text:span></text:p>
            <text:p text:style-name="P20"><text:span text:style-name="T136">COUNT, COUNTDISTINCT, </text:span><text:span text:style-name="T168">AVG, MIN, MAX, SUM, TOP</text:span></text:p>
            <text:p text:style-name="P20"><text:span text:style-name="T169">Les avancés :</text:span></text:p>
            <text:p text:style-name="P20"><text:span text:style-name="T168">COLLECT_LIST, COLLECT_SET, HISTOGRAM, STDEV, CORRELATION</text:span></text:p>
            <text:p text:style-name="P18"><text:span text:style-name="T169">Spécifiques Kafka</text:span><text:span text:style-name="T168">: </text:span></text:p>
            <text:p text:style-name="P18"><text:span text:style-name="T168">EARLIEST_BY_OFFSET, LATEST_BY_OFFSET</text:span></text:p>
            <text:p text:style-name="P18"><text:span text:style-name="T168"/></text:p>
            <text:p text:style-name="P18"><text:span text:style-name="T168">Exemple :</text:span></text:p>
            <text:p text:style-name="P49"><text:span text:style-name="T139">CREATE TABLE customer_avg_amount AS</text:span></text:p>
            <text:p text:style-name="P49"><text:span text:style-name="T139"><text:s text:c="4"/></text:span><text:span text:style-name="T139">SELECT customer, </text:span></text:p>
            <text:p text:style-name="P49"><text:span text:style-name="T139"><text:s text:c="11"/></text:span><text:span text:style-name="T171">AVG(amount)</text:span><text:span text:style-name="T139"> AS avg_amount</text:span></text:p>
            <text:p text:style-name="P49"><text:span text:style-name="T139"><text:s text:c="4"/></text:span><text:span text:style-name="T139">FROM orders</text:span></text:p>
            <text:p text:style-name="P49"><text:span text:style-name="T171"><text:s text:c="4"/></text:span><text:span text:style-name="T171">GROUP BY customer</text:span></text:p>
            <text:p text:style-name="P49"><text:span text:style-name="T139"><text:s text:c="4"/></text:span><text:span text:style-name="T139">EMIT CHANGES;</text:span></text:p>
            <text:p text:style-name="P18"><text:span text:style-name="T168"/></text:p>
            <text:list text:style-name="L4">
              <text:list-item>
                <text:list>
                  <text:list-header>
                    <text:p><text:span text:style-name="T159"/></text:p>
                  </text:list-header>
                </text:list>
              </text:list-item>
            </text:list>
            <text:p text:style-name="P53"><text:span text:style-name="T164"/></text:p>
            <text:p text:style-name="P53"><text:span text:style-name="T163"/></text:p>
            <text:p text:style-name="P53"><text:span text:style-name="T163"/></text:p>
            <text:p text:style-name="P53"><text:span text:style-name="T163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107" draw:style-name="gr2" draw:layer="layout" svg:width="15.535cm" svg:height="10.984cm" svg:x="2.655cm" svg:y="2.258cm" draw:page-number="149" presentation:class="page"/>
          <draw:frame draw:name="Espace réservé des notes 120" presentation:style-name="pr181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50" draw:style-name="dp5" draw:master-page-name="Vide_5f_">
        <office:forms form:automatic-focus="false" form:apply-design-mode="false"/>
        <draw:frame draw:name="Titre 120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Fonctions de table</text:span></text:p>
          </draw:text-box>
        </draw:frame>
        <draw:frame draw:name="Espace réservé du texte 107" presentation:style-name="pr24" draw:text-style-name="P21" draw:layer="layout" svg:width="23.499cm" svg:height="12.18cm" svg:x="3.033cm" svg:y="6.283cm" presentation:class="outline" presentation:user-transformed="true">
          <draw:text-box>
            <text:p text:style-name="P20"><text:span text:style-name="T136">Les fonctions tables sont équivalent à un flatMap en programmation réactive.</text:span></text:p>
            <text:list text:style-name="L4">
              <text:list-item>
                <text:list>
                  <text:list-item>
                    <text:p><text:span text:style-name="T136">Elles ne s’appliquent que sur des STREAM</text:span></text:p>
                  </text:list-item>
                  <text:list-item>
                    <text:p><text:span text:style-name="T136">Elles se spécifie dans la clause SELECT d’une requête</text:span></text:p>
                  </text:list-item>
                  <text:list-item>
                    <text:p><text:span text:style-name="T168">Elle revoie plusieurs lignes mais une seule colonne</text:span></text:p>
                  </text:list-item>
                </text:list>
              </text:list-item>
            </text:list>
            <text:p text:style-name="P20"><text:span text:style-name="T168">Par exemple, appliqué à un tableau, elle renvoie toutes les valeurs du tableau</text:span></text:p>
            <text:p text:style-name="P18"><text:span text:style-name="T168">Exemple :</text:span></text:p>
            <text:p text:style-name="P54"><text:span text:style-name="T172">-- Données tu topic</text:span></text:p>
            <text:p text:style-name="P49"><text:span text:style-name="T139"><text:s text:c="2"/></text:span><text:span text:style-name="T139">{sensor_id:12345 readings: [23, 56 ]}</text:span></text:p>
            <text:p text:style-name="P49"><text:span text:style-name="T139"><text:s text:c="2"/></text:span><text:span text:style-name="T139">{sensor_id:54321 readings: [12, 65, 38]}</text:span></text:p>
            <text:p text:style-name="P49"><text:span text:style-name="T156">-- Utilisation de EXPLODE</text:span></text:p>
            <text:p text:style-name="P49"><text:span text:style-name="T139"><text:s text:c="2"/></text:span><text:span text:style-name="T139">CREATE STREAM exploded_stream AS</text:span></text:p>
            <text:p text:style-name="P49"><text:span text:style-name="T139"><text:s text:c="4"/></text:span><text:span text:style-name="T139">SELECT sensor_id, </text:span><text:span text:style-name="T171">EXPLODE(readings)</text:span><text:span text:style-name="T139"> AS reading FROM batched_readings;</text:span></text:p>
            <text:p text:style-name="P49"><text:span text:style-name="T156">-- Résultat</text:span></text:p>
            <text:p text:style-name="P49"><text:span text:style-name="T139"><text:s text:c="2"/></text:span><text:span text:style-name="T139">{sensor_id:12345 reading: 23}</text:span></text:p>
            <text:p text:style-name="P49"><text:span text:style-name="T139"><text:s text:c="2"/></text:span><text:span text:style-name="T139">{sensor_id:12345 reading: 56}</text:span></text:p>
            <text:p text:style-name="P49"><text:span text:style-name="T139"><text:s text:c="2"/></text:span><text:span text:style-name="T139">{sensor_id:54321 reading: 12}</text:span></text:p>
            <text:p text:style-name="P49"><text:span text:style-name="T139"><text:s text:c="2"/></text:span><text:span text:style-name="T139">{sensor_id:54321 reading: 65}</text:span></text:p>
            <text:p text:style-name="P49"><text:span text:style-name="T139"><text:s text:c="2"/></text:span><text:span text:style-name="T139">{sensor_id:54321 reading: 38}</text:span></text:p>
            <text:p text:style-name="P49"><text:span text:style-name="T139"/></text:p>
            <text:p text:style-name="P49"><text:span text:style-name="T139"/></text:p>
            <text:p text:style-name="P18"><text:span text:style-name="T168"/></text:p>
            <text:list text:continue-numbering="true" text:style-name="L4">
              <text:list-item>
                <text:list>
                  <text:list-header>
                    <text:p><text:span text:style-name="T159"/></text:p>
                  </text:list-header>
                </text:list>
              </text:list-item>
            </text:list>
            <text:p text:style-name="P53"><text:span text:style-name="T164"/></text:p>
            <text:p text:style-name="P53"><text:span text:style-name="T163"/></text:p>
            <text:p text:style-name="P53"><text:span text:style-name="T163"/></text:p>
            <text:p text:style-name="P53"><text:span text:style-name="T163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presentation:notes draw:style-name="dp6">
          <draw:page-thumbnail draw:name="Espace réservé de l'image des diapositives 108" draw:style-name="gr2" draw:layer="layout" svg:width="15.535cm" svg:height="10.984cm" svg:x="2.655cm" svg:y="2.258cm" draw:page-number="150" presentation:class="page"/>
          <draw:frame draw:name="Espace réservé des notes 121" presentation:style-name="pr182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51" draw:style-name="dp5" draw:master-page-name="Vide_5f_">
        <office:forms form:automatic-focus="false" form:apply-design-mode="false"/>
        <draw:frame draw:name="Titre 121" presentation:style-name="pr23" draw:text-style-name="P17" draw:layer="layout" svg:width="23.499cm" svg:height="3.574cm" svg:x="3.033cm" svg:y="2.367cm" presentation:class="title" presentation:user-transformed="true">
          <draw:text-box>
            <text:p text:style-name="P11"><text:span text:style-name="T12">Fonctions de table</text:span></text:p>
          </draw:text-box>
        </draw:frame>
        <draw:frame draw:name="Espace réservé du texte 108" presentation:style-name="pr24" draw:text-style-name="P21" draw:layer="layout" svg:width="23.499cm" svg:height="12.18cm" svg:x="3.033cm" svg:y="6.283cm" presentation:class="outline" presentation:user-transformed="true">
          <draw:text-box>
            <text:p text:style-name="P20"><text:span text:style-name="T173">EXPLODE(array)</text:span><text:span text:style-name="T136"> : Affiche une valeur pour chacun des éléments du tableau.</text:span><text:span text:style-name="T136"><text:line-break/></text:span><text:span text:style-name="T136">Les valeurs de sortie ont le même type que les éléments du tableau.</text:span></text:p>
            <text:p text:style-name="P20"><text:span text:style-name="T136"/></text:p>
            <text:p text:style-name="P20"><text:span text:style-name="T173">CUBE_EXPLODE(array[col1, ..., colN]) </text:span><text:span text:style-name="T136">: Pour le tableau de colonnes spécifié, génère toutes leurs combinaisons possibles.</text:span><text:span text:style-name="T136"><text:line-break/></text:span><text:span text:style-name="T136">Produit 2</text:span><text:span text:style-name="T174">n</text:span><text:span text:style-name="T136"> lignes</text:span></text:p>
            <text:p text:style-name="P18"><text:span text:style-name="T10"/></text:p>
            <text:p text:style-name="P49"><text:span text:style-name="T139"/></text:p>
            <text:p text:style-name="P18"><text:span text:style-name="T168"/></text:p>
            <text:list text:style-name="L4">
              <text:list-item>
                <text:list>
                  <text:list-header>
                    <text:p><text:span text:style-name="T159"/></text:p>
                  </text:list-header>
                </text:list>
              </text:list-item>
            </text:list>
            <text:p text:style-name="P53"><text:span text:style-name="T164"/></text:p>
            <text:p text:style-name="P53"><text:span text:style-name="T163"/></text:p>
            <text:p text:style-name="P53"><text:span text:style-name="T163"/></text:p>
            <text:p text:style-name="P53"><text:span text:style-name="T163"/></text:p>
            <text:p text:style-name="P53"><text:span text:style-name="T139"/></text:p>
            <text:p text:style-name="P53"><text:span text:style-name="T102"/></text:p>
            <text:p text:style-name="P18"><text:span text:style-name="T10"/></text:p>
            <text:p text:style-name="P18"><text:span text:style-name="T152"/></text:p>
          </draw:text-box>
        </draw:frame>
        <draw:custom-shape draw:name="ZoneTexte 8" draw:style-name="gr23" draw:text-style-name="P23" draw:layer="layout" svg:width="8.356cm" svg:height="1.216cm" svg:x="1.089cm" svg:y="19.4cm">
          <text:p text:style-name="P22"><text:span text:style-name="T128">Atelier 7.3 : Fo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page-thumbnail draw:name="Espace réservé de l'image des diapositives 109" draw:style-name="gr2" draw:layer="layout" svg:width="15.535cm" svg:height="10.984cm" svg:x="2.655cm" svg:y="2.258cm" draw:page-number="151" presentation:class="page"/>
          <draw:frame draw:name="Espace réservé des notes 122" presentation:style-name="pr183" draw:text-style-name="P16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roman"/>
    <style:font-face style:name="FreeSans1" svg:font-family="FreeSans" style:font-pitch="variable"/>
    <style:font-face style:name="FreeSans2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roman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modern" style:font-pitch="fixed"/>
    <style:font-face style:name="Lucida Sans Unicode2" svg:font-family="'Lucida Sans Unicode'" style:font-family-generic="swiss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333cc" draw:end-color="#ffffff" draw:start-intensity="100%" draw:end-intensity="100%" draw:angle="27deg" draw:border="0%">
      <loext:gradient-stop svg:offset="0" loext:color-type="rgb" loext:color-value="#3333cc"/>
      <loext:gradient-stop svg:offset="1" loext:color-type="rgb" loext:color-value="#ffffff"/>
    </draw:gradient>
    <draw:gradient draw:name="Gradient_20_10" draw:display-name="Gradient 10" draw:style="linear" draw:start-color="#1c1c1c" draw:end-color="#ffffff" draw:start-intensity="100%" draw:end-intensity="100%" draw:angle="270deg" draw:border="0%">
      <loext:gradient-stop svg:offset="0" loext:color-type="rgb" loext:color-value="#1c1c1c"/>
      <loext:gradient-stop svg:offset="1" loext:color-type="rgb" loext:color-value="#ffffff"/>
    </draw:gradient>
    <draw:gradient draw:name="Gradient_20_2" draw:display-name="Gradient 2" draw:style="linear" draw:start-color="#ffcf01" draw:end-color="#ffffff" draw:start-intensity="100%" draw:end-intensity="100%" draw:angle="27deg" draw:border="0%">
      <loext:gradient-stop svg:offset="0" loext:color-type="rgb" loext:color-value="#ffcf01"/>
      <loext:gradient-stop svg:offset="1" loext:color-type="rgb" loext:color-value="#ffffff"/>
    </draw:gradient>
    <draw:gradient draw:name="Gradient_20_3" draw:display-name="Gradient 3" draw:style="linear" draw:start-color="#ffffff" draw:end-color="#ff0000" draw:start-intensity="100%" draw:end-intensity="100%" draw:angle="31.5deg" draw:border="0%">
      <loext:gradient-stop svg:offset="0" loext:color-type="rgb" loext:color-value="#ffffff"/>
      <loext:gradient-stop svg:offset="1" loext:color-type="rgb" loext:color-value="#ff0000"/>
    </draw:gradient>
    <draw:gradient draw:name="Gradient_20_4" draw:display-name="Gradient 4" draw:style="linear" draw:start-color="#1c1c1c" draw:end-color="#ffffff" draw:start-intensity="100%" draw:end-intensity="100%" draw:angle="207deg" draw:border="0%">
      <loext:gradient-stop svg:offset="0" loext:color-type="rgb" loext:color-value="#1c1c1c"/>
      <loext:gradient-stop svg:offset="1" loext:color-type="rgb" loext:color-value="#ffffff"/>
    </draw:gradient>
    <draw:gradient draw:name="Gradient_20_7" draw:display-name="Gradient 7" draw:style="linear" draw:start-color="#3333cc" draw:end-color="#ffffff" draw:start-intensity="100%" draw:end-intensity="100%" draw:angle="270deg" draw:border="0%">
      <loext:gradient-stop svg:offset="0" loext:color-type="rgb" loext:color-value="#3333cc"/>
      <loext:gradient-stop svg:offset="1" loext:color-type="rgb" loext:color-value="#ffffff"/>
    </draw:gradient>
    <draw:gradient draw:name="Gradient_20_8" draw:display-name="Gradient 8" draw:style="linear" draw:start-color="#ffcf01" draw:end-color="#ffffff" draw:start-intensity="100%" draw:end-intensity="100%" draw:angle="270deg" draw:border="0%">
      <loext:gradient-stop svg:offset="0" loext:color-type="rgb" loext:color-value="#ffcf01"/>
      <loext:gradient-stop svg:offset="1" loext:color-type="rgb" loext:color-value="#ffffff"/>
    </draw:gradient>
    <draw:gradient draw:name="Gradient_20_9" draw:display-name="Gradient 9" draw:style="linear" draw:start-color="#ffffff" draw:end-color="#ff0000" draw:start-intensity="100%" draw:end-intensity="100%" draw:angle="315deg" draw:border="0%">
      <loext:gradient-stop svg:offset="0" loext:color-type="rgb" loext:color-value="#ffffff"/>
      <loext:gradient-stop svg:offset="1" loext:color-type="rgb" loext:color-value="#ff00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itre_20_2" style:display-name="Titre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itre_20_3" style:display-name="Titre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itre_20_4" style:display-name="Titre 4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andard_5f_2" style:display-name="Standard_2" style:family="graphic">
      <style:paragraph-properties fo:margin-top="0cm" fo:margin-bottom="0cm" fo:line-height="95%" fo:text-align="start" style:text-autospace="none" loext:tab-stop-distance="0cm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2_7e_LT_7e_Hintergrund" style:display-name="Standard 2~LT~Hintergrund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andard_20_2_7e_LT_7e_Hintergrundobjekte" style:display-name="Standard 2~LT~Hintergrundobjek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andard_20_2_7e_LT_7e_Notizen" style:display-name="Standard 2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2_7e_LT_7e_Untertitel" style:display-name="Standard 2~LT~Unter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2_7e_LT_7e_Titel" style:display-name="Standard 2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44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2_7e_LT_7e_Gliederung_20_9" style:display-name="Standard 2~LT~Gliederung 9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8" style:display-name="Standard 2~LT~Gliederung 8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7" style:display-name="Standard 2~LT~Gliederung 7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6" style:display-name="Standard 2~LT~Gliederung 6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5" style:display-name="Standard 2~LT~Gliederung 5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4" style:display-name="Standard 2~LT~Gliederung 4" style:family="graphic">
      <style:paragraph-properties fo:margin-top="0cm" fo:margin-bottom="0.351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3" style:display-name="Standard 2~LT~Gliederung 3" style:family="graphic">
      <style:paragraph-properties fo:margin-top="0cm" fo:margin-bottom="0.529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2" style:display-name="Standard 2~LT~Gliederung 2" style:family="graphic">
      <style:paragraph-properties fo:margin-top="0cm" fo:margin-bottom="0.706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1" style:display-name="Standard 2~LT~Gliederung 1" style:family="graphic">
      <style:paragraph-properties fo:margin-top="0cm" fo:margin-bottom="0.8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_5f_3" style:display-name="Standard_1_3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_5f_2" style:display-name="Standard_1_2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_5f_1_5f_1" style:display-name="Standard_1_1_1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_5f_1" style:display-name="Standard_1_1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" style:display-name="Standard_1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Hintergrund" style:display-name="Blank Slide~LT~Hintergrund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Blank_20_Slide_7e_LT_7e_Hintergrundobjekte" style:display-name="Blank Slide~LT~Hintergrundobjek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Blank_20_Slide_7e_LT_7e_Notizen" style:display-name="Blank Slide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Untertitel" style:display-name="Blank Slide~LT~Unter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Titel" style:display-name="Blank Slide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44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Gliederung_20_9" style:display-name="Blank Slide~LT~Gliederung 9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8" style:display-name="Blank Slide~LT~Gliederung 8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7" style:display-name="Blank Slide~LT~Gliederung 7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6" style:display-name="Blank Slide~LT~Gliederung 6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5" style:display-name="Blank Slide~LT~Gliederung 5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4" style:display-name="Blank Slide~LT~Gliederung 4" style:family="graphic">
      <style:paragraph-properties fo:margin-top="0cm" fo:margin-bottom="0.351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3" style:display-name="Blank Slide~LT~Gliederung 3" style:family="graphic">
      <style:paragraph-properties fo:margin-top="0cm" fo:margin-bottom="0.529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2" style:display-name="Blank Slide~LT~Gliederung 2" style:family="graphic">
      <style:paragraph-properties fo:margin-top="0cm" fo:margin-bottom="0.706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1" style:display-name="Blank Slide~LT~Gliederung 1" style:family="graphic">
      <style:paragraph-properties fo:margin-top="0cm" fo:margin-bottom="0.8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u_20_de_20_cadre" style:display-name="Contenu de cadre" style:family="graphic">
      <style:paragraph-properties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itre_20_10" style:display-name="Titre 10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Citations" style:family="graphic">
      <style:paragraph-properties style:text-autospace="none"/>
    </style:style>
    <style:style style:name="Standard_20_1_7e_LT_7e_Hintergrund" style:display-name="Standard 1~LT~Hintergrund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andard_20_1_7e_LT_7e_Hintergrundobjekte" style:display-name="Standard 1~LT~Hintergrundobjek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andard_20_1_7e_LT_7e_Notizen" style:display-name="Standard 1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Untertitel" style:display-name="Standard 1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Titel" style:display-name="Standard 1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44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Gliederung_20_9" style:display-name="Standard 1~LT~Gliederung 9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8" style:display-name="Standard 1~LT~Gliederung 8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7" style:display-name="Standard 1~LT~Gliederung 7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6" style:display-name="Standard 1~LT~Gliederung 6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5" style:display-name="Standard 1~LT~Gliederung 5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4" style:display-name="Standard 1~LT~Gliederung 4" style:family="graphic">
      <style:paragraph-properties fo:margin-left="0cm" fo:margin-right="0cm" fo:margin-top="0cm" fo:margin-bottom="0.388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3" style:display-name="Standard 1~LT~Gliederung 3" style:family="graphic">
      <style:paragraph-properties fo:margin-left="0cm" fo:margin-right="0cm" fo:margin-top="0cm" fo:margin-bottom="0.58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2" style:display-name="Standard 1~LT~Gliederung 2" style:family="graphic">
      <style:paragraph-properties fo:margin-left="0cm" fo:margin-right="0cm" fo:margin-top="0cm" fo:margin-bottom="0.774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1" style:display-name="Standard 1~LT~Gliederung 1" style:family="graphic">
      <style:paragraph-properties fo:margin-left="0cm" fo:margin-right="0cm" fo:margin-top="0cm" fo:margin-bottom="0.968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44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left="0cm" fo:margin-right="0cm" fo:margin-top="0cm" fo:margin-bottom="0.351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left="0cm" fo:margin-right="0cm" fo:margin-top="0cm" fo:margin-bottom="0.529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left="0cm" fo:margin-right="0cm" fo:margin-top="0cm" fo:margin-bottom="0.704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left="0cm" fo:margin-right="0cm" fo:margin-top="0cm" fo:margin-bottom="0.88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32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2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6%" fo:text-align="start" fo:text-indent="-0.793cm" style:punctuation-wrap="simple" style:line-break="strict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8pt" style:font-style-asian="normal" style:font-weight-asian="normal" style:font-name-complex="Lucida Sans Unicode2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6%" fo:text-align="center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44pt" style:font-style-asian="normal" style:font-weight-asian="normal" style:font-name-complex="Lucida Sans Unicode2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 style:writing-mode="lr-tb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ide-outline3" style:family="presentation" style:parent-style-name="Vide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4" style:family="presentation" style:parent-style-name="Vide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5" style:family="presentation" style:parent-style-name="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 style:writing-mode="lr-tb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-background" style:display-name="Vide_-background" style:family="presentation">
      <style:graphic-properties draw:stroke="none" draw:fill="solid" draw:fill-color="#ffffff"/>
      <style:text-properties style:letter-kerning="true"/>
    </style:style>
    <style:style style:name="Vide_5f_-backgroundobjects" style:display-name="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-notes" style:display-name="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-outline1" style:display-name="Vide_-outline1" style:family="presentation">
      <style:graphic-properties draw:stroke="none" draw:fill="none" draw:auto-grow-height="false" draw:fit-to-size="false" style:shrink-to-fit="true" style:writing-mode="lr-tb">
        <text:list-style style:name="Vide_5f_-outline1" style:display-name="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-outline2" style:display-name="Vide_-outline2" style:family="presentation" style:parent-style-name="Vide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ide_5f_-outline3" style:display-name="Vide_-outline3" style:family="presentation" style:parent-style-name="Vide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_5f_-outline4" style:display-name="Vide_-outline4" style:family="presentation" style:parent-style-name="Vide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_5f_-outline5" style:display-name="Vide_-outline5" style:family="presentation" style:parent-style-name="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outline6" style:display-name="Vide_-outline6" style:family="presentation" style:parent-style-name="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outline7" style:display-name="Vide_-outline7" style:family="presentation" style:parent-style-name="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outline8" style:display-name="Vide_-outline8" style:family="presentation" style:parent-style-name="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outline9" style:display-name="Vide_-outline9" style:family="presentation" style:parent-style-name="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subtitle" style:display-name="Vide_-subtitle" style:family="presentation">
      <style:graphic-properties draw:stroke="none" draw:fill="none" draw:textarea-vertical-align="middle">
        <text:list-style style:name="Vide_5f_-subtitle" style:display-name="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-title" style:display-name="Vide_-title" style:family="presentation">
      <style:graphic-properties draw:stroke="none" draw:fill="none" draw:textarea-vertical-align="middle" style:writing-mode="lr-tb">
        <text:list-style style:name="Vide_5f_-title" style:display-name="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-background" style:display-name="Vide__-background" style:family="presentation">
      <style:graphic-properties draw:stroke="none" draw:fill="solid" draw:fill-color="#ffffff"/>
      <style:text-properties style:letter-kerning="true"/>
    </style:style>
    <style:style style:name="Vide_5f__5f_-backgroundobjects" style:display-name="V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-notes" style:display-name="V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_5f_-outline1" style:display-name="Vide__-outline1" style:family="presentation">
      <style:graphic-properties draw:stroke="none" draw:fill="none" draw:auto-grow-height="false" draw:fit-to-size="false" style:shrink-to-fit="true" style:writing-mode="lr-tb">
        <text:list-style style:name="Vide_5f__5f_-outline1" style:display-name="V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-outline2" style:display-name="Vide__-outline2" style:family="presentation" style:parent-style-name="Vide_5f_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ide_5f__5f_-outline3" style:display-name="Vide__-outline3" style:family="presentation" style:parent-style-name="Vide_5f_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_5f__5f_-outline4" style:display-name="Vide__-outline4" style:family="presentation" style:parent-style-name="Vide_5f_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_5f__5f_-outline5" style:display-name="Vide__-outline5" style:family="presentation" style:parent-style-name="Vid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outline6" style:display-name="Vide__-outline6" style:family="presentation" style:parent-style-name="Vid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outline7" style:display-name="Vide__-outline7" style:family="presentation" style:parent-style-name="Vid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outline8" style:display-name="Vide__-outline8" style:family="presentation" style:parent-style-name="Vid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outline9" style:display-name="Vide__-outline9" style:family="presentation" style:parent-style-name="Vid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subtitle" style:display-name="Vide__-subtitle" style:family="presentation">
      <style:graphic-properties draw:stroke="none" draw:fill="none" draw:textarea-vertical-align="middle">
        <text:list-style style:name="Vide_5f__5f_-subtitle" style:display-name="V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-title" style:display-name="Vide__-title" style:family="presentation">
      <style:graphic-properties draw:stroke="none" draw:fill="none" draw:textarea-vertical-align="middle" style:writing-mode="lr-tb">
        <text:list-style style:name="Vide_5f__5f_-title" style:display-name="V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_5f_-background" style:display-name="Vide___-background" style:family="presentation">
      <style:graphic-properties draw:stroke="none" draw:fill="solid" draw:fill-color="#ffffff"/>
      <style:text-properties style:letter-kerning="true"/>
    </style:style>
    <style:style style:name="Vide_5f__5f__5f_-backgroundobjects" style:display-name="V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_5f_-notes" style:display-name="Vid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_5f__5f_-outline1" style:display-name="Vide___-outline1" style:family="presentation">
      <style:graphic-properties draw:stroke="none" draw:fill="none" draw:auto-grow-height="false" draw:fit-to-size="false" style:shrink-to-fit="true" style:writing-mode="lr-tb">
        <text:list-style style:name="Vide_5f__5f__5f_-outline1" style:display-name="V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_5f_-outline2" style:display-name="Vide___-outline2" style:family="presentation" style:parent-style-name="Vide_5f__5f_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ide_5f__5f__5f_-outline3" style:display-name="Vide___-outline3" style:family="presentation" style:parent-style-name="Vide_5f__5f_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_5f__5f__5f_-outline4" style:display-name="Vide___-outline4" style:family="presentation" style:parent-style-name="Vide_5f__5f_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_5f__5f__5f_-outline5" style:display-name="Vide___-outline5" style:family="presentation" style:parent-style-name="Vide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outline6" style:display-name="Vide___-outline6" style:family="presentation" style:parent-style-name="Vide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outline7" style:display-name="Vide___-outline7" style:family="presentation" style:parent-style-name="Vide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outline8" style:display-name="Vide___-outline8" style:family="presentation" style:parent-style-name="Vide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outline9" style:display-name="Vide___-outline9" style:family="presentation" style:parent-style-name="Vide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subtitle" style:display-name="Vide___-subtitle" style:family="presentation">
      <style:graphic-properties draw:stroke="none" draw:fill="none" draw:textarea-vertical-align="middle">
        <text:list-style style:name="Vide_5f__5f__5f_-subtitle" style:display-name="Vid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_5f_-title" style:display-name="Vide___-title" style:family="presentation">
      <style:graphic-properties draw:stroke="none" draw:fill="none" draw:textarea-vertical-align="middle" style:writing-mode="lr-tb">
        <text:list-style style:name="Vide_5f__5f__5f_-title" style:display-name="Vid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_5f__5f_-background" style:display-name="Vide____-background" style:family="presentation">
      <style:graphic-properties draw:stroke="none" draw:fill="solid" draw:fill-color="#ffffff"/>
      <style:text-properties style:letter-kerning="true"/>
    </style:style>
    <style:style style:name="Vide_5f__5f__5f__5f_-backgroundobjects" style:display-name="Vid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_5f__5f_-notes" style:display-name="Vid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_5f__5f__5f_-outline1" style:display-name="Vide____-outline1" style:family="presentation">
      <style:graphic-properties draw:stroke="none" draw:fill="none" draw:auto-grow-height="false" draw:fit-to-size="false" style:shrink-to-fit="true" style:writing-mode="lr-tb">
        <text:list-style style:name="Vide_5f__5f__5f__5f_-outline1" style:display-name="Vide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_5f__5f_-outline2" style:display-name="Vide____-outline2" style:family="presentation" style:parent-style-name="Vide_5f__5f__5f_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ide_5f__5f__5f__5f_-outline3" style:display-name="Vide____-outline3" style:family="presentation" style:parent-style-name="Vide_5f__5f__5f_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_5f__5f__5f__5f_-outline4" style:display-name="Vide____-outline4" style:family="presentation" style:parent-style-name="Vide_5f__5f__5f_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_5f__5f__5f__5f_-outline5" style:display-name="Vide____-outline5" style:family="presentation" style:parent-style-name="Vide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outline6" style:display-name="Vide____-outline6" style:family="presentation" style:parent-style-name="Vide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outline7" style:display-name="Vide____-outline7" style:family="presentation" style:parent-style-name="Vide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outline8" style:display-name="Vide____-outline8" style:family="presentation" style:parent-style-name="Vide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outline9" style:display-name="Vide____-outline9" style:family="presentation" style:parent-style-name="Vide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subtitle" style:display-name="Vide____-subtitle" style:family="presentation">
      <style:graphic-properties draw:stroke="none" draw:fill="none" draw:textarea-vertical-align="middle">
        <text:list-style style:name="Vide_5f__5f__5f__5f_-subtitle" style:display-name="Vide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_5f__5f_-title" style:display-name="Vide____-title" style:family="presentation">
      <style:graphic-properties draw:stroke="none" draw:fill="none" draw:textarea-vertical-align="middle" style:writing-mode="lr-tb">
        <text:list-style style:name="Vide_5f__5f__5f__5f_-title" style:display-name="Vide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_5f__5f__5f_-background" style:display-name="Vide_____-background" style:family="presentation">
      <style:graphic-properties draw:stroke="none" draw:fill="solid" draw:fill-color="#ffffff"/>
      <style:text-properties style:letter-kerning="true"/>
    </style:style>
    <style:style style:name="Vide_5f__5f__5f__5f__5f_-backgroundobjects" style:display-name="Vide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_5f__5f__5f_-notes" style:display-name="Vide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_5f__5f__5f__5f_-outline1" style:display-name="Vide_____-outline1" style:family="presentation">
      <style:graphic-properties draw:stroke="none" draw:fill="none" draw:auto-grow-height="false" draw:fit-to-size="false" style:shrink-to-fit="true" style:writing-mode="lr-tb">
        <text:list-style style:name="Vide_5f__5f__5f__5f__5f_-outline1" style:display-name="Vide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_5f__5f__5f_-outline2" style:display-name="Vide_____-outline2" style:family="presentation" style:parent-style-name="Vide_5f__5f__5f__5f_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ide_5f__5f__5f__5f__5f_-outline3" style:display-name="Vide_____-outline3" style:family="presentation" style:parent-style-name="Vide_5f__5f__5f__5f_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_5f__5f__5f__5f__5f_-outline4" style:display-name="Vide_____-outline4" style:family="presentation" style:parent-style-name="Vide_5f__5f__5f__5f_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_5f__5f__5f__5f__5f_-outline5" style:display-name="Vide_____-outline5" style:family="presentation" style:parent-style-name="Vide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_5f_-outline6" style:display-name="Vide_____-outline6" style:family="presentation" style:parent-style-name="Vide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_5f_-outline7" style:display-name="Vide_____-outline7" style:family="presentation" style:parent-style-name="Vide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_5f_-outline8" style:display-name="Vide_____-outline8" style:family="presentation" style:parent-style-name="Vide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_5f_-outline9" style:display-name="Vide_____-outline9" style:family="presentation" style:parent-style-name="Vide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_5f_-subtitle" style:display-name="Vide_____-subtitle" style:family="presentation">
      <style:graphic-properties draw:stroke="none" draw:fill="none" draw:textarea-vertical-align="middle">
        <text:list-style style:name="Vide_5f__5f__5f__5f__5f_-subtitle" style:display-name="Vide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_5f__5f__5f_-title" style:display-name="Vide_____-title" style:family="presentation">
      <style:graphic-properties draw:stroke="none" draw:fill="none" draw:textarea-vertical-align="middle" style:writing-mode="lr-tb">
        <text:list-style style:name="Vide_5f__5f__5f__5f__5f_-title" style:display-name="Vide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5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7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0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 loext:decorative="fals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5" style:family="graphic" style:parent-style-name="standard">
      <style:graphic-properties draw:stroke="none" svg:stroke-width="0cm" draw:fill="solid" draw:fill-color="#3333cc" draw:textarea-vertical-align="middle" draw:auto-grow-height="false" draw:fit-to-size="false" style:shrink-to-fit="false" fo:min-height="1.033cm" fo:min-width="0.70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16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1.033cm" fo:min-width="0.40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svg:stroke-width="0cm" draw:fill="solid" draw:fill-color="#ffcf01" draw:textarea-vertical-align="middle" draw:auto-grow-height="false" draw:fit-to-size="false" style:shrink-to-fit="false" fo:min-height="1.038cm" fo:min-width="0.66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18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1.038cm" fo:min-width="0.51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19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.906cm" fo:min-width="1.05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0" style:family="graphic" style:parent-style-name="standard">
      <style:graphic-properties draw:stroke="none" svg:stroke-width="0cm" draw:fill="solid" draw:fill-color="#1c1c1c" draw:textarea-vertical-align="middle" draw:auto-grow-height="false" draw:fit-to-size="false" style:shrink-to-fit="false" fo:min-height="2.647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1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23.623cm" fo:padding-top="0.076cm" fo:padding-bottom="0.076cm" fo:padding-left="0.25cm" fo:padding-right="0.25cm" fo:wrap-option="no-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cm" draw:fill="none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V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V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Vid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id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ide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Vide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Vide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Vide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ide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Vide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c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cf01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9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loext:graphic-properties draw:fill="solid" draw:fill-color="#3333cc"/>
      <style:paragraph-properties fo:text-align="start" style:writing-mode="lr-tb" style:font-independent-line-spacing="true"/>
      <style:text-properties fo:font-size="18pt"/>
    </style:style>
    <style:style style:name="MP17" style:family="paragraph">
      <loext:graphic-properties draw:fill="gradient" draw:fill-gradient-name="Gradient_20_1"/>
      <style:paragraph-properties fo:text-align="start" style:writing-mode="lr-tb" style:font-independent-line-spacing="true"/>
      <style:text-properties fo:font-size="18pt"/>
    </style:style>
    <style:style style:name="MP18" style:family="paragraph">
      <loext:graphic-properties draw:fill="solid" draw:fill-color="#ffcf01"/>
      <style:paragraph-properties fo:text-align="start" style:writing-mode="lr-tb" style:font-independent-line-spacing="true"/>
      <style:text-properties fo:font-size="18pt"/>
    </style:style>
    <style:style style:name="MP19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size="18pt"/>
    </style:style>
    <style:style style:name="MP20" style:family="paragraph">
      <loext:graphic-properties draw:fill="gradient" draw:fill-gradient-name="Gradient_20_3"/>
      <style:paragraph-properties fo:text-align="start" style:writing-mode="lr-tb" style:font-independent-line-spacing="true"/>
      <style:text-properties fo:font-size="18pt"/>
    </style:style>
    <style:style style:name="MP21" style:family="paragraph">
      <loext:graphic-properties draw:fill="solid" draw:fill-color="#1c1c1c"/>
      <style:paragraph-properties fo:text-align="start" style:writing-mode="lr-tb" style:font-independent-line-spacing="true"/>
      <style:text-properties fo:font-size="18pt"/>
    </style:style>
    <style:style style:name="MP22" style:family="paragraph">
      <loext:graphic-properties draw:fill="gradient" draw:fill-gradient-name="Gradient_20_4"/>
      <style:paragraph-properties fo:text-align="start" style:writing-mode="lr-tb" style:font-independent-line-spacing="true"/>
      <style:text-properties fo:font-size="18pt"/>
    </style:style>
    <style:style style:name="MP23" style:family="paragraph">
      <style:paragraph-properties fo:margin-left="0cm" fo:margin-right="0cm" fo:margin-top="0cm" fo:margin-bottom="0cm" fo:line-height="95%" fo:text-align="end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4" style:family="paragraph">
      <loext:graphic-properties draw:fill="none"/>
      <style:paragraph-properties fo:margin-left="0cm" fo:margin-right="0cm" fo:margin-top="0cm" fo:margin-bottom="0cm" fo:line-height="95%" fo:text-align="end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size-asian="14pt" style:font-size-complex="14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3.499cm" svg:height="3.575cm" svg:x="3.033cm" svg:y="2.367cm" presentation:class="title" presentation:placeholder="true">
        <draw:text-box/>
      </draw:frame>
      <draw:frame presentation:style-name="Standard-outline1" draw:layer="backgroundobjects" svg:width="23.499cm" svg:height="12.18cm" svg:x="3.033cm" svg:y="6.283cm" presentation:class="outline" presentation:placeholder="true">
        <draw:text-box/>
      </draw:frame>
      <draw:g draw:style-name="Mgr3">
        <draw:g draw:style-name="Mgr3">
          <draw:custom-shape draw:style-name="Mgr4" draw:text-style-name="MP5" draw:layer="backgroundobjects" svg:width="1.204cm" svg:height="1.296cm" svg:x="0.807cm" svg:y="3.881cm">
            <text:p/>
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5" draw:text-style-name="MP6" draw:layer="backgroundobjects" svg:width="0.904cm" svg:height="1.296cm" svg:x="1.856cm" svg:y="3.881cm">
            <text:p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Mgr3">
          <draw:custom-shape draw:style-name="Mgr6" draw:text-style-name="MP7" draw:layer="backgroundobjects" svg:width="1.169cm" svg:height="1.301cm" svg:x="1.151cm" svg:y="5.04cm">
            <text:p/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7" draw:text-style-name="MP8" draw:layer="backgroundobjects" svg:width="1.019cm" svg:height="1.301cm" svg:x="2.165cm" svg:y="5.04cm">
            <text:p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Mgr8" draw:text-style-name="MP9" draw:layer="backgroundobjects" svg:width="1.557cm" svg:height="1.169cm" svg:x="0cm" svg:y="4.837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0.088cm" svg:height="2.91cm" svg:x="1.764cm" svg:y="3.581cm">
          <text:p/>
          <draw:enhanced-geometry svg:viewBox="0 0 21600 21600" draw:path-stretchpoint-x="10800" draw:path-stretchpoint-y="10800" draw:text-areas="?f3 ?f4 ?f5 ?f6" draw:type="round-rectangle" draw:modifiers="10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1" draw:layer="backgroundobjects" svg:width="24.125cm" svg:height="0.154cm" draw:transform="rotate (-3.14159265358979) translate (25.156cm 6.319cm)">
          <text:p/>
          <draw:enhanced-geometry svg:viewBox="0 0 21600 21600" draw:path-stretchpoint-x="10800" draw:path-stretchpoint-y="10800" draw:text-areas="?f3 ?f4 ?f5 ?f6" draw:type="round-rectangle" draw:modifiers="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11" draw:text-style-name="MP13" draw:layer="backgroundobjects" svg:width="6.927cm" svg:height="1.455cm" svg:x="21.286cm" svg:y="19.125cm">
        <text:list text:style-name="ML1">
          <text:list-header>
            <text:p text:style-name="MP12"><text:span text:style-name="MT2"><text:page-number>&lt;numéro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Standard-notes" draw:layer="backgroundobjects" svg:width="14.362cm" svg:height="11.254cm" svg:x="3.25cm" svg:y="14.128cm" presentation:class="notes" presentation:placeholder="true">
          <draw:text-box/>
        </draw:frame>
        <draw:page-thumbnail presentation:style-name="Standard-title" draw:layer="backgroundobjects" svg:width="15.597cm" svg:height="10.985cm" svg:x="2.623cm" svg:y="2.258cm" presentation:class="page"/>
      </presentation:notes>
    </style:master-page>
    <style:master-page style:name="V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e 3" draw:style-name="Mgr3">
        <draw:g draw:name="Groupe 4" draw:style-name="Mgr3">
          <draw:custom-shape draw:name="Forme libre 5" draw:style-name="Mgr15" draw:text-style-name="MP16" draw:layer="backgroundobjects" svg:width="1.203cm" svg:height="1.295cm" svg:x="0.807cm" svg:y="3.881cm">
            <text:p/>
            <draw:enhanced-geometry draw:mirror-horizontal="false" draw:mirror-vertical="false" svg:viewBox="0 0 0 0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16" draw:text-style-name="MP17" draw:layer="backgroundobjects" svg:width="0.903cm" svg:height="1.295cm" svg:x="1.856cm" svg:y="3.881cm">
            <text:p/>
            <draw:enhanced-geometry draw:mirror-horizontal="false" draw:mirror-vertical="false" svg:viewBox="0 0 0 0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17" draw:text-style-name="MP18" draw:layer="backgroundobjects" svg:width="1.168cm" svg:height="1.3cm" svg:x="1.151cm" svg:y="5.04cm">
            <text:p/>
  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18" draw:text-style-name="MP19" draw:layer="backgroundobjects" svg:width="1.018cm" svg:height="1.3cm" svg:x="2.165cm" svg:y="5.04cm">
            <text:p/>
            <draw:enhanced-geometry draw:mirror-horizontal="false" draw:mirror-vertical="false" svg:viewBox="0 0 0 0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19" draw:text-style-name="MP20" draw:layer="backgroundobjects" svg:width="1.556cm" svg:height="1.168cm" svg:x="0cm" svg:y="4.837cm">
          <text:p/>
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20" draw:text-style-name="MP21" draw:layer="backgroundobjects" svg:width="0.087cm" svg:height="2.909cm" svg:x="1.764cm" svg:y="3.581cm">
          <text:p/>
          <draw:enhanced-geometry draw:mirror-horizontal="false" draw:mirror-vertical="false" svg:viewBox="0 0 0 0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21" draw:text-style-name="MP22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22" draw:text-style-name="MP24" draw:layer="backgroundobjects" svg:width="6.926cm" svg:height="1.454cm" svg:x="21.286cm" svg:y="19.125cm">
        <text:p text:style-name="MP23"><text:span text:style-name="MT3"><text:page-number>&lt;numéro&gt;</text:page-number></text:span></text:p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-title" draw:layer="backgroundobjects" svg:width="26.729cm" svg:height="3.505cm" svg:x="1.484cm" svg:y="0.837cm" presentation:class="title" presentation:placeholder="true">
        <draw:text-box/>
      </draw:frame>
      <draw:frame presentation:style-name="Vide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-title" draw:layer="backgroundobjects" svg:width="19.799cm" svg:height="11.136cm" svg:x="0.6cm" svg:y="2.257cm" presentation:class="page"/>
        <draw:frame presentation:style-name="Vide-notes" draw:layer="backgroundobjects" svg:width="16.8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_5f_" style:display-name="V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e 3" draw:style-name="Mgr3">
        <draw:g draw:name="Groupe 4" draw:style-name="Mgr3">
          <draw:custom-shape draw:name="Forme libre 5" draw:style-name="Mgr15" draw:text-style-name="MP16" draw:layer="backgroundobjects" svg:width="1.203cm" svg:height="1.295cm" svg:x="0.807cm" svg:y="3.881cm">
            <text:p/>
            <draw:enhanced-geometry draw:mirror-horizontal="false" draw:mirror-vertical="false" svg:viewBox="0 0 0 0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16" draw:text-style-name="MP17" draw:layer="backgroundobjects" svg:width="0.903cm" svg:height="1.295cm" svg:x="1.856cm" svg:y="3.881cm">
            <text:p/>
            <draw:enhanced-geometry draw:mirror-horizontal="false" draw:mirror-vertical="false" svg:viewBox="0 0 0 0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17" draw:text-style-name="MP18" draw:layer="backgroundobjects" svg:width="1.168cm" svg:height="1.3cm" svg:x="1.151cm" svg:y="5.04cm">
            <text:p/>
  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18" draw:text-style-name="MP19" draw:layer="backgroundobjects" svg:width="1.018cm" svg:height="1.3cm" svg:x="2.165cm" svg:y="5.04cm">
            <text:p/>
            <draw:enhanced-geometry draw:mirror-horizontal="false" draw:mirror-vertical="false" svg:viewBox="0 0 0 0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19" draw:text-style-name="MP20" draw:layer="backgroundobjects" svg:width="1.556cm" svg:height="1.168cm" svg:x="0cm" svg:y="4.837cm">
          <text:p/>
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20" draw:text-style-name="MP21" draw:layer="backgroundobjects" svg:width="0.087cm" svg:height="2.909cm" svg:x="1.764cm" svg:y="3.581cm">
          <text:p/>
          <draw:enhanced-geometry draw:mirror-horizontal="false" draw:mirror-vertical="false" svg:viewBox="0 0 0 0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21" draw:text-style-name="MP22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23" draw:text-style-name="MP24" draw:layer="backgroundobjects" svg:width="6.926cm" svg:height="1.454cm" svg:x="21.286cm" svg:y="19.125cm">
        <text:p text:style-name="MP23"><text:span text:style-name="MT3"><text:page-number>&lt;numéro&gt;</text:page-number></text:span></text:p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-title" draw:layer="backgroundobjects" svg:width="26.729cm" svg:height="3.505cm" svg:x="1.484cm" svg:y="0.837cm" presentation:class="title" presentation:placeholder="true">
        <draw:text-box/>
      </draw:frame>
      <draw:frame presentation:style-name="Vide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_5f_-title" draw:layer="backgroundobjects" svg:width="19.799cm" svg:height="11.136cm" svg:x="0.6cm" svg:y="2.257cm" presentation:class="page"/>
        <draw:frame presentation:style-name="Vide_5f_-notes" draw:layer="backgroundobjects" svg:width="16.8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_5f__5f_" style:display-name="Vide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e 3" draw:style-name="Mgr3">
        <draw:g draw:name="Groupe 4" draw:style-name="Mgr3">
          <draw:custom-shape draw:name="Forme libre 5" draw:style-name="Mgr15" draw:text-style-name="MP16" draw:layer="backgroundobjects" svg:width="1.203cm" svg:height="1.295cm" svg:x="0.807cm" svg:y="3.881cm">
            <text:p/>
            <draw:enhanced-geometry draw:mirror-horizontal="false" draw:mirror-vertical="false" svg:viewBox="0 0 0 0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16" draw:text-style-name="MP17" draw:layer="backgroundobjects" svg:width="0.903cm" svg:height="1.295cm" svg:x="1.856cm" svg:y="3.881cm">
            <text:p/>
            <draw:enhanced-geometry draw:mirror-horizontal="false" draw:mirror-vertical="false" svg:viewBox="0 0 0 0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17" draw:text-style-name="MP18" draw:layer="backgroundobjects" svg:width="1.168cm" svg:height="1.3cm" svg:x="1.151cm" svg:y="5.04cm">
            <text:p/>
  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18" draw:text-style-name="MP19" draw:layer="backgroundobjects" svg:width="1.018cm" svg:height="1.3cm" svg:x="2.165cm" svg:y="5.04cm">
            <text:p/>
            <draw:enhanced-geometry draw:mirror-horizontal="false" draw:mirror-vertical="false" svg:viewBox="0 0 0 0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19" draw:text-style-name="MP20" draw:layer="backgroundobjects" svg:width="1.556cm" svg:height="1.168cm" svg:x="0cm" svg:y="4.837cm">
          <text:p/>
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20" draw:text-style-name="MP21" draw:layer="backgroundobjects" svg:width="0.087cm" svg:height="2.909cm" svg:x="1.764cm" svg:y="3.581cm">
          <text:p/>
          <draw:enhanced-geometry draw:mirror-horizontal="false" draw:mirror-vertical="false" svg:viewBox="0 0 0 0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21" draw:text-style-name="MP22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24" draw:text-style-name="MP24" draw:layer="backgroundobjects" svg:width="6.926cm" svg:height="1.454cm" svg:x="21.286cm" svg:y="19.125cm">
        <text:p text:style-name="MP23"><text:span text:style-name="MT3"><text:page-number>&lt;numéro&gt;</text:page-number></text:span></text:p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_5f_-title" draw:layer="backgroundobjects" svg:width="26.729cm" svg:height="3.505cm" svg:x="1.484cm" svg:y="0.837cm" presentation:class="title" presentation:placeholder="true">
        <draw:text-box/>
      </draw:frame>
      <draw:frame presentation:style-name="Vide_5f_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_5f__5f_-title" draw:layer="backgroundobjects" svg:width="19.799cm" svg:height="11.136cm" svg:x="0.6cm" svg:y="2.257cm" presentation:class="page"/>
        <draw:frame presentation:style-name="Vide_5f__5f_-notes" draw:layer="backgroundobjects" svg:width="16.8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_5f__5f__5f_" style:display-name="Vide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e 3" draw:style-name="Mgr3">
        <draw:g draw:name="Groupe 4" draw:style-name="Mgr3">
          <draw:custom-shape draw:name="Forme libre 5" draw:style-name="Mgr15" draw:text-style-name="MP16" draw:layer="backgroundobjects" svg:width="1.203cm" svg:height="1.295cm" svg:x="0.807cm" svg:y="3.881cm">
            <text:p/>
            <draw:enhanced-geometry draw:mirror-horizontal="false" draw:mirror-vertical="false" svg:viewBox="0 0 0 0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16" draw:text-style-name="MP17" draw:layer="backgroundobjects" svg:width="0.903cm" svg:height="1.295cm" svg:x="1.856cm" svg:y="3.881cm">
            <text:p/>
            <draw:enhanced-geometry draw:mirror-horizontal="false" draw:mirror-vertical="false" svg:viewBox="0 0 0 0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17" draw:text-style-name="MP18" draw:layer="backgroundobjects" svg:width="1.168cm" svg:height="1.3cm" svg:x="1.151cm" svg:y="5.04cm">
            <text:p/>
  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18" draw:text-style-name="MP19" draw:layer="backgroundobjects" svg:width="1.018cm" svg:height="1.3cm" svg:x="2.165cm" svg:y="5.04cm">
            <text:p/>
            <draw:enhanced-geometry draw:mirror-horizontal="false" draw:mirror-vertical="false" svg:viewBox="0 0 0 0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19" draw:text-style-name="MP20" draw:layer="backgroundobjects" svg:width="1.556cm" svg:height="1.168cm" svg:x="0cm" svg:y="4.837cm">
          <text:p/>
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20" draw:text-style-name="MP21" draw:layer="backgroundobjects" svg:width="0.087cm" svg:height="2.909cm" svg:x="1.764cm" svg:y="3.581cm">
          <text:p/>
          <draw:enhanced-geometry draw:mirror-horizontal="false" draw:mirror-vertical="false" svg:viewBox="0 0 0 0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21" draw:text-style-name="MP22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25" draw:text-style-name="MP24" draw:layer="backgroundobjects" svg:width="6.926cm" svg:height="1.454cm" svg:x="21.286cm" svg:y="19.125cm">
        <text:p text:style-name="MP23"><text:span text:style-name="MT3"><text:page-number>&lt;numéro&gt;</text:page-number></text:span></text:p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_5f__5f_-title" draw:layer="backgroundobjects" svg:width="26.729cm" svg:height="3.505cm" svg:x="1.484cm" svg:y="0.837cm" presentation:class="title" presentation:placeholder="true">
        <draw:text-box/>
      </draw:frame>
      <draw:frame presentation:style-name="Vide_5f__5f_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_5f__5f__5f_-title" draw:layer="backgroundobjects" svg:width="19.799cm" svg:height="11.136cm" svg:x="0.6cm" svg:y="2.257cm" presentation:class="page"/>
        <draw:frame presentation:style-name="Vide_5f__5f__5f_-notes" draw:layer="backgroundobjects" svg:width="16.8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_5f__5f__5f__5f_" style:display-name="Vide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e 3" draw:style-name="Mgr3">
        <draw:g draw:name="Groupe 4" draw:style-name="Mgr3">
          <draw:custom-shape draw:name="Forme libre 5" draw:style-name="Mgr15" draw:text-style-name="MP16" draw:layer="backgroundobjects" svg:width="1.203cm" svg:height="1.295cm" svg:x="0.807cm" svg:y="3.881cm">
            <text:p/>
            <draw:enhanced-geometry draw:mirror-horizontal="false" draw:mirror-vertical="false" svg:viewBox="0 0 0 0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16" draw:text-style-name="MP17" draw:layer="backgroundobjects" svg:width="0.903cm" svg:height="1.295cm" svg:x="1.856cm" svg:y="3.881cm">
            <text:p/>
            <draw:enhanced-geometry draw:mirror-horizontal="false" draw:mirror-vertical="false" svg:viewBox="0 0 0 0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17" draw:text-style-name="MP18" draw:layer="backgroundobjects" svg:width="1.168cm" svg:height="1.3cm" svg:x="1.151cm" svg:y="5.04cm">
            <text:p/>
  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18" draw:text-style-name="MP19" draw:layer="backgroundobjects" svg:width="1.018cm" svg:height="1.3cm" svg:x="2.165cm" svg:y="5.04cm">
            <text:p/>
            <draw:enhanced-geometry draw:mirror-horizontal="false" draw:mirror-vertical="false" svg:viewBox="0 0 0 0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19" draw:text-style-name="MP20" draw:layer="backgroundobjects" svg:width="1.556cm" svg:height="1.168cm" svg:x="0cm" svg:y="4.837cm">
          <text:p/>
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20" draw:text-style-name="MP21" draw:layer="backgroundobjects" svg:width="0.087cm" svg:height="2.909cm" svg:x="1.764cm" svg:y="3.581cm">
          <text:p/>
          <draw:enhanced-geometry draw:mirror-horizontal="false" draw:mirror-vertical="false" svg:viewBox="0 0 0 0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21" draw:text-style-name="MP22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26" draw:text-style-name="MP24" draw:layer="backgroundobjects" svg:width="6.926cm" svg:height="1.454cm" svg:x="21.286cm" svg:y="19.125cm">
        <text:p text:style-name="MP23"><text:span text:style-name="MT3"><text:page-number>&lt;numéro&gt;</text:page-number></text:span></text:p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_5f__5f__5f_-title" draw:layer="backgroundobjects" svg:width="26.729cm" svg:height="3.505cm" svg:x="1.484cm" svg:y="0.837cm" presentation:class="title" presentation:placeholder="true">
        <draw:text-box/>
      </draw:frame>
      <draw:frame presentation:style-name="Vide_5f__5f__5f_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_5f__5f__5f__5f_-title" draw:layer="backgroundobjects" svg:width="19.799cm" svg:height="11.136cm" svg:x="0.6cm" svg:y="2.257cm" presentation:class="page"/>
        <draw:frame presentation:style-name="Vide_5f__5f__5f__5f_-notes" draw:layer="backgroundobjects" svg:width="16.8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_5f__5f__5f__5f__5f_" style:display-name="Vide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e 3" draw:style-name="Mgr3">
        <draw:g draw:name="Groupe 4" draw:style-name="Mgr3">
          <draw:custom-shape draw:name="Forme libre 5" draw:style-name="Mgr15" draw:text-style-name="MP16" draw:layer="backgroundobjects" svg:width="1.203cm" svg:height="1.295cm" svg:x="0.807cm" svg:y="3.881cm">
            <text:p/>
            <draw:enhanced-geometry draw:mirror-horizontal="false" draw:mirror-vertical="false" svg:viewBox="0 0 0 0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16" draw:text-style-name="MP17" draw:layer="backgroundobjects" svg:width="0.903cm" svg:height="1.295cm" svg:x="1.856cm" svg:y="3.881cm">
            <text:p/>
            <draw:enhanced-geometry draw:mirror-horizontal="false" draw:mirror-vertical="false" svg:viewBox="0 0 0 0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17" draw:text-style-name="MP18" draw:layer="backgroundobjects" svg:width="1.168cm" svg:height="1.3cm" svg:x="1.151cm" svg:y="5.04cm">
            <text:p/>
  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18" draw:text-style-name="MP19" draw:layer="backgroundobjects" svg:width="1.018cm" svg:height="1.3cm" svg:x="2.165cm" svg:y="5.04cm">
            <text:p/>
            <draw:enhanced-geometry draw:mirror-horizontal="false" draw:mirror-vertical="false" svg:viewBox="0 0 0 0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19" draw:text-style-name="MP20" draw:layer="backgroundobjects" svg:width="1.556cm" svg:height="1.168cm" svg:x="0cm" svg:y="4.837cm">
          <text:p/>
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20" draw:text-style-name="MP21" draw:layer="backgroundobjects" svg:width="0.087cm" svg:height="2.909cm" svg:x="1.764cm" svg:y="3.581cm">
          <text:p/>
          <draw:enhanced-geometry draw:mirror-horizontal="false" draw:mirror-vertical="false" svg:viewBox="0 0 0 0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21" draw:text-style-name="MP22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27" draw:text-style-name="MP24" draw:layer="backgroundobjects" svg:width="6.926cm" svg:height="1.454cm" svg:x="21.286cm" svg:y="19.125cm">
        <text:p text:style-name="MP23"><text:span text:style-name="MT3"><text:page-number>&lt;numéro&gt;</text:page-number></text:span></text:p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_5f__5f__5f__5f_-title" draw:layer="backgroundobjects" svg:width="26.729cm" svg:height="3.505cm" svg:x="1.484cm" svg:y="0.837cm" presentation:class="title" presentation:placeholder="true">
        <draw:text-box/>
      </draw:frame>
      <draw:frame presentation:style-name="Vide_5f__5f__5f__5f_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_5f__5f__5f__5f__5f_-title" draw:layer="backgroundobjects" svg:width="19.799cm" svg:height="11.136cm" svg:x="0.6cm" svg:y="2.257cm" presentation:class="page"/>
        <draw:frame presentation:style-name="Vide_5f__5f__5f__5f__5f_-notes" draw:layer="backgroundobjects" svg:width="16.8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essagerie distribuée avec Kafka</dc:title>
    <dc:date>2024-09-27T13:59:53.227961947</dc:date>
    <meta:editing-cycles>3451</meta:editing-cycles>
    <meta:editing-duration>P49DT16H6M21S</meta:editing-duration>
    <meta:generator>LibreOffice/24.2.7.2$Linux_X86_64 LibreOffice_project/420$Build-2</meta:generator>
    <meta:document-statistic meta:object-count="809"/>
  </office:meta>
</office:document-meta>
</file>