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style:font-face style:name="Droid Sans Mono1"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var font-mono" svg:font-family="'var font-mono'"/>
  </office:font-face-decls>
  <office:automatic-styles>
    <style:style style:name="Tableau1" style:family="table">
      <style:table-properties style:width="15.891cm" table:align="left"/>
    </style:style>
    <style:style style:name="Tableau1.A" style:family="table-column">
      <style:table-column-properties style:column-width="4.023cm"/>
    </style:style>
    <style:style style:name="Tableau1.B" style:family="table-column">
      <style:table-column-properties style:column-width="6.267cm"/>
    </style:style>
    <style:style style:name="Tableau1.C" style:family="table-column">
      <style:table-column-properties style:column-width="5.6cm"/>
    </style:style>
    <style:style style:name="Tableau1.A1" style:family="table-cell">
      <style:table-cell-properties style:vertical-align="middle" fo:padding="0.049cm" fo:border="none"/>
    </style:style>
    <style:style style:name="Tableau2" style:family="table">
      <style:table-properties style:width="8.193cm" table:align="left"/>
    </style:style>
    <style:style style:name="Tableau2.A" style:family="table-column">
      <style:table-column-properties style:column-width="2.26cm"/>
    </style:style>
    <style:style style:name="Tableau2.B" style:family="table-column">
      <style:table-column-properties style:column-width="5.934cm"/>
    </style:style>
    <style:style style:name="Tableau2.A1" style:family="table-cell">
      <style:table-cell-properties style:vertical-align="middle" fo:padding="0.049cm" fo:border="none"/>
    </style:style>
    <style:style style:name="P1" style:family="paragraph" style:parent-style-name="Text_20_body">
      <style:text-properties officeooo:rsid="005c91dd" officeooo:paragraph-rsid="0076eb9f"/>
    </style:style>
    <style:style style:name="P2" style:family="paragraph" style:parent-style-name="Standard">
      <style:text-properties officeooo:rsid="005c91dd"/>
    </style:style>
    <style:style style:name="P3" style:family="paragraph" style:parent-style-name="Text_20_body">
      <style:text-properties fo:font-style="italic" officeooo:rsid="005c91dd" officeooo:paragraph-rsid="0076eb9f" style:font-style-asian="italic" style:font-style-complex="italic"/>
    </style:style>
    <style:style style:name="P4" style:family="paragraph" style:parent-style-name="Text_20_body">
      <style:text-properties fo:font-style="italic" officeooo:rsid="01a207d6" officeooo:paragraph-rsid="01a207d6" style:font-style-asian="italic" style:font-style-complex="italic"/>
    </style:style>
    <style:style style:name="P5" style:family="paragraph" style:parent-style-name="Text_20_body">
      <style:text-properties fo:font-style="italic" officeooo:rsid="00e5cefd" officeooo:paragraph-rsid="00e5cefd" style:font-style-asian="italic" style:font-style-complex="italic"/>
    </style:style>
    <style:style style:name="P6" style:family="paragraph" style:parent-style-name="Text_20_body">
      <style:text-properties fo:font-style="normal" officeooo:paragraph-rsid="00e03516" style:font-style-asian="normal" style:font-style-complex="normal"/>
    </style:style>
    <style:style style:name="P7" style:family="paragraph" style:parent-style-name="Text_20_body">
      <style:text-properties fo:font-style="normal" officeooo:rsid="00e03516" officeooo:paragraph-rsid="00e56bfd" style:font-style-asian="normal" style:font-style-complex="normal"/>
    </style:style>
    <style:style style:name="P8" style:family="paragraph" style:parent-style-name="Text_20_body">
      <style:text-properties fo:font-style="normal" officeooo:rsid="00e03516" officeooo:paragraph-rsid="00e5cefd" style:font-style-asian="normal" style:font-style-complex="normal"/>
    </style:style>
    <style:style style:name="P9" style:family="paragraph" style:parent-style-name="Text_20_body">
      <style:text-properties fo:font-style="normal" officeooo:rsid="00e12903" officeooo:paragraph-rsid="00e12903" style:font-style-asian="normal" style:font-style-complex="normal"/>
    </style:style>
    <style:style style:name="P10" style:family="paragraph" style:parent-style-name="Text_20_body">
      <style:text-properties fo:font-style="normal" officeooo:rsid="00e5cefd" officeooo:paragraph-rsid="00e5cefd" style:font-style-asian="normal" style:font-style-complex="normal"/>
    </style:style>
    <style:style style:name="P11" style:family="paragraph" style:parent-style-name="Text_20_body">
      <style:text-properties fo:font-style="normal" officeooo:rsid="00e5cefd" officeooo:paragraph-rsid="01a9bf19" style:font-style-asian="normal" style:font-style-complex="normal"/>
    </style:style>
    <style:style style:name="P12" style:family="paragraph" style:parent-style-name="Text_20_body">
      <style:text-properties fo:font-style="normal" officeooo:rsid="00e41927" officeooo:paragraph-rsid="00e41927" style:font-style-asian="normal" style:font-style-complex="normal"/>
    </style:style>
    <style:style style:name="P13" style:family="paragraph" style:parent-style-name="Text_20_body">
      <style:text-properties fo:font-style="normal" style:text-underline-style="none" officeooo:rsid="00e5cefd" officeooo:paragraph-rsid="01a9bf19" style:font-style-asian="normal" style:font-style-complex="normal"/>
    </style:style>
    <style:style style:name="P14" style:family="paragraph" style:parent-style-name="Text_20_body">
      <style:text-properties style:font-name="Times New Roman" fo:font-size="12pt" fo:font-style="normal" fo:font-weight="normal" officeooo:rsid="00d240a6" officeooo:paragraph-rsid="015ccb1c" style:font-name-asian="WenQuanYi Micro Hei" style:font-size-asian="12pt" style:font-style-asian="normal" style:font-weight-asian="normal" style:font-name-complex="Lohit Hindi2" style:font-size-complex="12pt" style:font-style-complex="normal" style:font-weight-complex="normal"/>
    </style:style>
    <style:style style:name="P15" style:family="paragraph" style:parent-style-name="Text_20_body">
      <style:text-properties style:font-name="Times New Roman" fo:font-size="12pt" fo:font-style="normal" fo:font-weight="normal" officeooo:rsid="00d240a6" officeooo:paragraph-rsid="01cf08dc" style:font-name-asian="WenQuanYi Micro Hei" style:font-size-asian="12pt" style:font-style-asian="normal" style:font-weight-asian="normal" style:font-name-complex="Lohit Hindi2" style:font-size-complex="12pt" style:font-style-complex="normal" style:font-weight-complex="normal"/>
    </style:style>
    <style:style style:name="P16" style:family="paragraph" style:parent-style-name="Text_20_body">
      <style:text-properties style:font-name="Times New Roman" fo:font-size="12pt" fo:font-style="normal" fo:font-weight="normal" officeooo:rsid="00d21738" officeooo:paragraph-rsid="015ccb1c" style:font-name-asian="WenQuanYi Micro Hei" style:font-size-asian="12pt" style:font-style-asian="normal" style:font-weight-asian="normal" style:font-name-complex="Lohit Hindi2" style:font-size-complex="12pt" style:font-style-complex="normal" style:font-weight-complex="normal"/>
    </style:style>
    <style:style style:name="P17" style:family="paragraph" style:parent-style-name="Text_20_body">
      <style:text-properties style:font-name="Times New Roman" fo:font-size="12pt" fo:font-style="normal" fo:font-weight="normal" officeooo:rsid="00cd76d4" officeooo:paragraph-rsid="015ccb1c"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Times New Roman" fo:font-size="12pt" fo:font-style="normal" fo:font-weight="normal" officeooo:rsid="00cd76d4" officeooo:paragraph-rsid="01f7c542"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Times New Roman" fo:font-size="12pt" fo:font-style="normal" fo:font-weight="normal" officeooo:rsid="00d21738" officeooo:paragraph-rsid="015ccb1c"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Times New Roman" fo:font-size="12pt" fo:font-style="normal" style:text-underline-style="none" fo:font-weight="normal" officeooo:rsid="00e5cefd" officeooo:paragraph-rsid="01a76de8" style:font-name-asian="WenQuanYi Micro Hei" style:font-size-asian="12pt" style:font-style-asian="normal" style:font-weight-asian="normal" style:font-name-complex="Lohit Hindi2" style:font-size-complex="12pt" style:font-style-complex="normal" style:font-weight-complex="normal"/>
    </style:style>
    <style:style style:name="P21" style:family="paragraph" style:parent-style-name="Text_20_body">
      <style:text-properties style:font-name="Times New Roman" fo:font-size="12pt" fo:font-style="normal" style:text-underline-style="none" fo:font-weight="normal" officeooo:rsid="01a3c2bb" officeooo:paragraph-rsid="01a3c2bb" style:font-name-asian="WenQuanYi Micro Hei" style:font-size-asian="12pt" style:font-style-asian="normal" style:font-weight-asian="normal" style:font-name-complex="Lohit Hindi2" style:font-size-complex="12pt" style:font-style-complex="normal" style:font-weight-complex="normal"/>
    </style:style>
    <style:style style:name="P22" style:family="paragraph" style:parent-style-name="Text_20_body">
      <style:text-properties style:font-name="Times New Roman" fo:font-size="12pt" fo:font-style="normal" style:text-underline-style="none" fo:font-weight="normal" officeooo:rsid="01a76de8" officeooo:paragraph-rsid="01a76de8" style:font-name-asian="WenQuanYi Micro Hei" style:font-size-asian="12pt" style:font-style-asian="normal" style:font-weight-asian="normal" style:font-name-complex="Lohit Hindi2" style:font-size-complex="12pt" style:font-style-complex="normal" style:font-weight-complex="normal"/>
    </style:style>
    <style:style style:name="P23" style:family="paragraph" style:parent-style-name="Text_20_body">
      <style:text-properties style:font-name="Times New Roman" fo:font-size="12pt" fo:font-style="normal" style:text-underline-style="none" fo:font-weight="normal" officeooo:rsid="01a91ebd" officeooo:paragraph-rsid="01a91ebd" style:font-name-asian="WenQuanYi Micro Hei" style:font-size-asian="12pt" style:font-style-asian="normal" style:font-weight-asian="normal" style:font-name-complex="Lohit Hindi2" style:font-size-complex="12pt" style:font-style-complex="normal" style:font-weight-complex="normal"/>
    </style:style>
    <style:style style:name="P24" style:family="paragraph" style:parent-style-name="Text_20_body">
      <style:text-properties style:font-name="Times New Roman" fo:font-size="12pt" fo:font-style="normal" style:text-underline-style="solid" style:text-underline-width="auto" style:text-underline-color="font-color" fo:font-weight="normal" officeooo:rsid="01a3c2bb" officeooo:paragraph-rsid="01a3c2bb" style:font-name-asian="WenQuanYi Micro Hei" style:font-size-asian="12pt" style:font-style-asian="normal" style:font-weight-asian="normal" style:font-name-complex="Lohit Hindi2" style:font-size-complex="12pt" style:font-style-complex="normal" style:font-weight-complex="normal"/>
    </style:style>
    <style:style style:name="P25" style:family="paragraph" style:parent-style-name="Text_20_body">
      <style:paragraph-properties fo:margin-top="0cm" fo:margin-bottom="0.101cm" style:contextual-spacing="false"/>
      <style:text-properties style:font-name="Times New Roman" fo:font-size="11.8000001907349pt" fo:font-style="normal" fo:font-weight="normal" officeooo:rsid="0132dea7"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26" style:family="paragraph" style:parent-style-name="Text_20_body">
      <style:paragraph-properties fo:margin-top="0cm" fo:margin-bottom="0.101cm" style:contextual-spacing="false"/>
      <style:text-properties style:font-name="Times New Roman" fo:font-size="11.8000001907349pt" fo:font-style="normal" fo:font-weight="normal" officeooo:rsid="01cc1945"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27" style:family="paragraph" style:parent-style-name="Text_20_body">
      <style:paragraph-properties fo:margin-top="0cm" fo:margin-bottom="0.101cm" style:contextual-spacing="false"/>
      <style:text-properties style:font-name="Times New Roman" fo:font-size="11.8000001907349pt" fo:font-style="italic" fo:font-weight="normal" officeooo:rsid="01cd9776" officeooo:paragraph-rsid="01911ccb"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28" style:family="paragraph" style:parent-style-name="Text_20_body">
      <style:text-properties style:font-name="Times New Roman" fo:font-size="11.8000001907349pt" officeooo:rsid="00fc47ef" officeooo:paragraph-rsid="01e8015f" style:font-size-asian="11.8000001907349pt" style:font-size-complex="11.8000001907349pt"/>
    </style:style>
    <style:style style:name="P29" style:family="paragraph" style:parent-style-name="Text_20_body">
      <style:text-properties style:font-name="Times New Roman" fo:font-size="11.8000001907349pt" officeooo:rsid="01c073c6" officeooo:paragraph-rsid="01e8015f" style:font-size-asian="11.8000001907349pt" style:font-size-complex="11.8000001907349pt"/>
    </style:style>
    <style:style style:name="P30" style:family="paragraph" style:parent-style-name="Text_20_body">
      <style:text-properties style:font-name="Times New Roman" fo:font-size="11.8000001907349pt" officeooo:rsid="01c17a57" officeooo:paragraph-rsid="01e8015f" style:font-size-asian="11.8000001907349pt" style:font-size-complex="11.8000001907349pt"/>
    </style:style>
    <style:style style:name="P31" style:family="paragraph" style:parent-style-name="Text_20_body">
      <style:text-properties style:font-name="Times New Roman" fo:font-size="11.8000001907349pt" style:text-underline-style="none" officeooo:rsid="0153c5a9" officeooo:paragraph-rsid="01e8015f" style:font-size-asian="11.8000001907349pt" style:font-size-complex="11.8000001907349pt"/>
    </style:style>
    <style:style style:name="P32" style:family="paragraph" style:parent-style-name="Text_20_body">
      <style:text-properties style:font-name="Times New Roman" fo:font-size="11.8000001907349pt" style:text-underline-style="none" officeooo:rsid="016c735d" officeooo:paragraph-rsid="01e8015f" style:font-size-asian="11.8000001907349pt" style:font-size-complex="11.8000001907349pt"/>
    </style:style>
    <style:style style:name="P33" style:family="paragraph" style:parent-style-name="Text_20_body">
      <style:text-properties style:font-name="Times New Roman" fo:font-size="11.8000001907349pt" fo:font-weight="normal" officeooo:rsid="010be942" officeooo:paragraph-rsid="010efc1d" style:font-name-asian="WenQuanYi Micro Hei" style:font-size-asian="11.8000001907349pt" style:font-weight-asian="normal" style:font-name-complex="Lohit Hindi2" style:font-size-complex="11.8000001907349pt" style:font-weight-complex="normal"/>
    </style:style>
    <style:style style:name="P34" style:family="paragraph" style:parent-style-name="Standard">
      <style:text-properties style:text-underline-style="solid" style:text-underline-width="auto" style:text-underline-color="font-color" officeooo:paragraph-rsid="006f4cb2"/>
    </style:style>
    <style:style style:name="P35" style:family="paragraph" style:parent-style-name="Text_20_body">
      <style:text-properties style:font-name="Arial" fo:font-size="11.8000001907349pt" fo:font-weight="bold" officeooo:rsid="01030653" officeooo:paragraph-rsid="01030653" style:font-name-asian="WenQuanYi Micro Hei" style:font-size-asian="11.8000001907349pt" style:font-weight-asian="bold" style:font-name-complex="Lohit Hindi2" style:font-size-complex="11.8000001907349pt" style:font-weight-complex="bold"/>
    </style:style>
    <style:style style:name="P36" style:family="paragraph" style:parent-style-name="Text_20_body">
      <style:text-properties style:font-name="Arial" fo:font-size="11.8000001907349pt" fo:font-weight="normal" officeooo:rsid="01030653" officeooo:paragraph-rsid="010efc1d" style:font-name-asian="WenQuanYi Micro Hei" style:font-size-asian="11.8000001907349pt" style:font-weight-asian="normal" style:font-name-complex="Lohit Hindi2" style:font-size-complex="11.8000001907349pt" style:font-weight-complex="normal"/>
    </style:style>
    <style:style style:name="P37" style:family="paragraph" style:parent-style-name="Text_20_body">
      <style:text-properties style:font-name="Arial" fo:font-weight="bold" officeooo:rsid="01c8aba3" officeooo:paragraph-rsid="01911ccb" style:font-weight-asian="bold" style:font-weight-complex="bold"/>
    </style:style>
    <style:style style:name="P38" style:family="paragraph" style:parent-style-name="Text_20_body">
      <style:text-properties officeooo:rsid="00e03516" officeooo:paragraph-rsid="00e03516"/>
    </style:style>
    <style:style style:name="P39" style:family="paragraph" style:parent-style-name="Text_20_body">
      <style:text-properties officeooo:rsid="00e03516" officeooo:paragraph-rsid="00e56bfd"/>
    </style:style>
    <style:style style:name="P40" style:family="paragraph" style:parent-style-name="Text_20_body">
      <style:text-properties officeooo:rsid="00e03516" officeooo:paragraph-rsid="00e0865e"/>
    </style:style>
    <style:style style:name="P41" style:family="paragraph" style:parent-style-name="Text_20_body">
      <style:text-properties officeooo:rsid="00e2e35a" officeooo:paragraph-rsid="00e2e35a"/>
    </style:style>
    <style:style style:name="P42" style:family="paragraph" style:parent-style-name="Text_20_body">
      <style:text-properties officeooo:paragraph-rsid="00e5cefd"/>
    </style:style>
    <style:style style:name="P43" style:family="paragraph" style:parent-style-name="Text_20_body">
      <style:text-properties officeooo:rsid="00e0865e" officeooo:paragraph-rsid="00e0865e"/>
    </style:style>
    <style:style style:name="P44" style:family="paragraph" style:parent-style-name="Text_20_body">
      <style:text-properties fo:color="#000000" loext:opacity="100%" style:font-name="Times New Roman" fo:font-size="12pt" fo:font-style="normal" style:text-underline-style="none" fo:font-weight="normal" officeooo:rsid="00d240a6" officeooo:paragraph-rsid="015ccb1c"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P45" style:family="paragraph" style:parent-style-name="Text_20_body">
      <style:text-properties fo:color="#000000" loext:opacity="100%" style:font-name="Times New Roman" fo:font-size="12pt" fo:font-style="normal" style:text-underline-style="none" fo:font-weight="normal" officeooo:rsid="01a12190" officeooo:paragraph-rsid="01a12190"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P46" style:family="paragraph" style:parent-style-name="Standard">
      <style:text-properties fo:color="#000000" loext:opacity="100%" style:font-name="Times New Roman" fo:font-size="12pt" officeooo:rsid="0120e97a" officeooo:paragraph-rsid="01eca848" fo:background-color="transparent" style:font-size-asian="12pt" style:font-size-complex="12pt"/>
    </style:style>
    <style:style style:name="P47" style:family="paragraph" style:parent-style-name="Standard">
      <style:text-properties fo:color="#000000" loext:opacity="100%" style:font-name="Times New Roman" fo:font-size="12pt" officeooo:rsid="014dfe9f" officeooo:paragraph-rsid="01eca848" fo:background-color="transparent" style:font-size-asian="12pt" style:font-size-complex="12pt"/>
    </style:style>
    <style:style style:name="P48" style:family="paragraph" style:parent-style-name="Standard">
      <style:text-properties fo:color="#000000" loext:opacity="100%" style:font-name="Times New Roman" fo:font-size="12pt" fo:font-style="italic" fo:font-weight="bold" officeooo:rsid="014dfe9f" officeooo:paragraph-rsid="01eca848" fo:background-color="transparent" style:font-size-asian="12pt" style:font-style-asian="italic" style:font-weight-asian="bold" style:font-size-complex="12pt" style:font-style-complex="italic" style:font-weight-complex="bold"/>
    </style:style>
    <style:style style:name="P49" style:family="paragraph" style:parent-style-name="Standard">
      <style:text-properties fo:color="#000000" loext:opacity="100%" style:font-name="Times New Roman" fo:font-size="11.8000001907349pt" fo:font-style="italic" fo:font-weight="normal" officeooo:rsid="01cd9776" officeooo:paragraph-rsid="01911ccb" fo:background-color="#ffffff"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50" style:family="paragraph" style:parent-style-name="Text_20_body">
      <style:text-properties fo:color="#000000" loext:opacity="100%" style:font-name="Arial" fo:font-size="10.5pt" fo:font-style="italic" style:text-underline-style="none" fo:font-weight="bold" officeooo:rsid="015ccb1c" officeooo:paragraph-rsid="015ccb1c" style:font-name-asian="WenQuanYi Micro Hei" style:font-size-asian="14pt" style:font-style-asian="italic" style:font-weight-asian="bold" style:font-name-complex="Lohit Hindi2" style:font-size-complex="14pt" style:font-style-complex="italic" style:font-weight-complex="bold" style:text-overline-style="none" style:text-overline-color="font-color"/>
    </style:style>
    <style:style style:name="P51" style:family="paragraph" style:parent-style-name="Text_20_body">
      <style:text-properties fo:color="#000000" loext:opacity="100%" style:font-name="Arial" fo:font-size="10.5pt" fo:font-style="italic" style:text-underline-style="none" fo:font-weight="normal" officeooo:rsid="01a12190" officeooo:paragraph-rsid="01a12190" style:font-name-asian="WenQuanYi Micro Hei" style:font-size-asian="14pt" style:font-style-asian="italic" style:font-weight-asian="normal" style:font-name-complex="Lohit Hindi2" style:font-size-complex="14pt" style:font-style-complex="italic" style:font-weight-complex="normal" style:text-overline-style="none" style:text-overline-color="font-color"/>
    </style:style>
    <style:style style:name="P52" style:family="paragraph" style:parent-style-name="Standard">
      <style:text-properties fo:color="#000000" loext:opacity="100%" style:font-name="Monospace" fo:font-size="10pt" officeooo:rsid="0120e97a" officeooo:paragraph-rsid="01eca848" fo:background-color="#e8f2fe" style:font-size-asian="10pt"/>
    </style:style>
    <style:style style:name="P53" style:family="paragraph" style:parent-style-name="Standard">
      <style:paragraph-properties fo:margin-top="0cm" fo:margin-bottom="0.101cm" style:contextual-spacing="false"/>
      <style:text-properties fo:color="#000000" loext:opacity="100%" style:font-name="Droid Sans Mono1" fo:font-size="10.5pt" fo:font-style="normal" fo:font-weight="normal" officeooo:rsid="01c8c640" officeooo:paragraph-rsid="01911ccb" fo:background-color="#ffffff"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54" style:family="paragraph" style:parent-style-name="Standard">
      <style:paragraph-properties fo:margin-top="0cm" fo:margin-bottom="0.101cm" style:contextual-spacing="false"/>
      <style:text-properties fo:color="#000000" loext:opacity="100%" style:font-name="Droid Sans Mono1" fo:font-size="10.5pt" fo:font-style="normal" fo:font-weight="normal" officeooo:rsid="01c9a844" officeooo:paragraph-rsid="01c9a844" fo:background-color="#ffffff"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55" style:family="paragraph" style:parent-style-name="Standard">
      <style:text-properties officeooo:rsid="0002d88f" officeooo:paragraph-rsid="006f4cb2"/>
    </style:style>
    <style:style style:name="P56" style:family="paragraph" style:parent-style-name="Standard">
      <style:text-properties officeooo:rsid="0015b9e3" officeooo:paragraph-rsid="0089b706"/>
    </style:style>
    <style:style style:name="P57" style:family="paragraph" style:parent-style-name="Standard">
      <style:text-properties officeooo:rsid="0015b9e3" officeooo:paragraph-rsid="008a61ff"/>
    </style:style>
    <style:style style:name="P58" style:family="paragraph" style:parent-style-name="Standard">
      <style:text-properties officeooo:paragraph-rsid="01911ccb"/>
    </style:style>
    <style:style style:name="P59" style:family="paragraph" style:parent-style-name="Text_20_body">
      <style:text-properties officeooo:paragraph-rsid="01911ccb"/>
    </style:style>
    <style:style style:name="P60" style:family="paragraph" style:parent-style-name="commande">
      <style:text-properties officeooo:paragraph-rsid="01911ccb"/>
    </style:style>
    <style:style style:name="P61" style:family="paragraph" style:parent-style-name="Standard">
      <style:text-properties officeooo:rsid="01d0aff0" officeooo:paragraph-rsid="01911ccb"/>
    </style:style>
    <style:style style:name="P62" style:family="paragraph" style:parent-style-name="Standard">
      <style:paragraph-properties fo:margin-top="0cm" fo:margin-bottom="0.101cm" style:contextual-spacing="false"/>
      <style:text-properties fo:color="#bcbec4" loext:opacity="100%" style:font-name="JetBrains Mono" fo:font-size="10pt" fo:font-style="normal" fo:font-weight="normal" officeooo:rsid="011a1c56" officeooo:paragraph-rsid="01911ccb" style:font-name-asian="WenQuanYi Micro Hei" style:font-size-asian="10pt" style:font-style-asian="normal" style:font-weight-asian="normal" style:font-name-complex="Lohit Hindi2" style:font-size-complex="11.8000001907349pt" style:font-style-complex="normal" style:font-weight-complex="normal"/>
    </style:style>
    <style:style style:name="P63" style:family="paragraph" style:parent-style-name="Standard">
      <style:text-properties officeooo:paragraph-rsid="0080df97"/>
    </style:style>
    <style:style style:name="P64" style:family="paragraph" style:parent-style-name="Standard">
      <style:text-properties officeooo:paragraph-rsid="01ae3332"/>
    </style:style>
    <style:style style:name="P65" style:family="paragraph" style:parent-style-name="Standard">
      <style:text-properties officeooo:rsid="01ae3332" officeooo:paragraph-rsid="01ae3332"/>
    </style:style>
    <style:style style:name="P66" style:family="paragraph" style:parent-style-name="Standard">
      <style:paragraph-properties fo:margin-top="0cm" fo:margin-bottom="0.101cm" style:contextual-spacing="false"/>
      <style:text-properties officeooo:paragraph-rsid="01c9a844"/>
    </style:style>
    <style:style style:name="P67" style:family="paragraph" style:parent-style-name="Standard">
      <style:text-properties officeooo:rsid="01d00433" officeooo:paragraph-rsid="01911ccb"/>
    </style:style>
    <style:style style:name="P68" style:family="paragraph" style:parent-style-name="Text_20_body">
      <style:text-properties style:font-name="Liberation Mono" fo:font-size="10pt" fo:font-weight="bold" officeooo:paragraph-rsid="015ccb1c" style:font-name-asian="Droid Sans Fallback" style:font-size-asian="10pt" style:font-name-complex="Liberation Mono" style:font-size-complex="10pt"/>
    </style:style>
    <style:style style:name="P69" style:family="paragraph" style:parent-style-name="Text_20_body">
      <style:text-properties officeooo:paragraph-rsid="01a9bf19"/>
    </style:style>
    <style:style style:name="P70" style:family="paragraph" style:parent-style-name="Text_20_body">
      <style:text-properties officeooo:rsid="0120e97a" officeooo:paragraph-rsid="01eca848"/>
    </style:style>
    <style:style style:name="P71" style:family="paragraph" style:parent-style-name="Text_20_body">
      <style:text-properties officeooo:rsid="01ba4bb2" officeooo:paragraph-rsid="01eca848"/>
    </style:style>
    <style:style style:name="P72" style:family="paragraph" style:parent-style-name="Text_20_body">
      <style:text-properties officeooo:rsid="01030653" officeooo:paragraph-rsid="01c5b334"/>
    </style:style>
    <style:style style:name="P73" style:family="paragraph" style:parent-style-name="Text_20_body">
      <style:text-properties officeooo:rsid="01c9a844" officeooo:paragraph-rsid="01c9a844"/>
    </style:style>
    <style:style style:name="P74" style:family="paragraph" style:parent-style-name="Text_20_body">
      <style:text-properties officeooo:rsid="01ca3856" officeooo:paragraph-rsid="01ca3856"/>
    </style:style>
    <style:style style:name="P75" style:family="paragraph" style:parent-style-name="Text_20_body">
      <style:text-properties officeooo:rsid="01cb9b85" officeooo:paragraph-rsid="01cb9b85"/>
    </style:style>
    <style:style style:name="P76" style:family="paragraph" style:parent-style-name="Standard">
      <style:text-properties officeooo:rsid="00ce615c" officeooo:paragraph-rsid="00ea8470"/>
    </style:style>
    <style:style style:name="P77" style:family="paragraph" style:parent-style-name="Standard">
      <style:text-properties officeooo:rsid="01ddbda3" officeooo:paragraph-rsid="01ddbda3"/>
    </style:style>
    <style:style style:name="P78" style:family="paragraph" style:parent-style-name="Standard">
      <style:text-properties style:font-name="Courier new"/>
    </style:style>
    <style:style style:name="P79" style:family="paragraph" style:parent-style-name="Standard">
      <style:text-properties officeooo:paragraph-rsid="01eca848"/>
    </style:style>
    <style:style style:name="P80" style:family="paragraph" style:parent-style-name="Text_20_body">
      <style:text-properties officeooo:paragraph-rsid="01eca848"/>
    </style:style>
    <style:style style:name="P81" style:family="paragraph" style:parent-style-name="Text_20_body">
      <style:text-properties officeooo:paragraph-rsid="01ecb6b3"/>
    </style:style>
    <style:style style:name="P82" style:family="paragraph" style:parent-style-name="Text_20_body">
      <style:text-properties officeooo:paragraph-rsid="01fa69eb"/>
    </style:style>
    <style:style style:name="P83" style:family="paragraph" style:parent-style-name="commande">
      <style:text-properties officeooo:paragraph-rsid="01f7c542"/>
    </style:style>
    <style:style style:name="P84" style:family="paragraph" style:parent-style-name="commande">
      <style:text-properties officeooo:paragraph-rsid="0209b58d"/>
    </style:style>
    <style:style style:name="P85" style:family="paragraph" style:parent-style-name="Standard">
      <style:text-properties officeooo:paragraph-rsid="0209b58d"/>
    </style:style>
    <style:style style:name="P86" style:family="paragraph" style:parent-style-name="Code">
      <style:text-properties officeooo:paragraph-rsid="02297ca8"/>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2">
      <style:paragraph-properties>
        <style:tab-stops>
          <style:tab-stop style:position="16.999cm" style:type="right" style:leader-style="dotted" style:leader-text="."/>
        </style:tab-stops>
      </style:paragraph-properties>
    </style:style>
    <style:style style:name="P89" style:family="paragraph" style:parent-style-name="Contents_20_3">
      <style:paragraph-properties>
        <style:tab-stops>
          <style:tab-stop style:position="16.999cm" style:type="right" style:leader-style="dotted" style:leader-text="."/>
        </style:tab-stops>
      </style:paragraph-properties>
    </style:style>
    <style:style style:name="P90" style:family="paragraph" style:parent-style-name="Heading_20_1" style:list-style-name=""/>
    <style:style style:name="P91" style:family="paragraph" style:parent-style-name="Heading_20_1" style:list-style-name="">
      <style:text-properties officeooo:paragraph-rsid="0076eb9f"/>
    </style:style>
    <style:style style:name="P92" style:family="paragraph" style:parent-style-name="Heading_20_1" style:list-style-name="">
      <style:text-properties officeooo:paragraph-rsid="013a2b1b"/>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076eb9f"/>
    </style:style>
    <style:style style:name="P95" style:family="paragraph" style:parent-style-name="Heading_20_1">
      <style:text-properties officeooo:paragraph-rsid="0080df97"/>
    </style:style>
    <style:style style:name="P96" style:family="paragraph" style:parent-style-name="Heading_20_1">
      <style:paragraph-properties fo:break-before="page"/>
      <style:text-properties officeooo:paragraph-rsid="0080df97"/>
    </style:style>
    <style:style style:name="P97" style:family="paragraph" style:parent-style-name="Heading_20_1">
      <style:paragraph-properties fo:break-before="page"/>
      <style:text-properties officeooo:paragraph-rsid="013a2b1b"/>
    </style:style>
    <style:style style:name="P98" style:family="paragraph" style:parent-style-name="Heading_20_1">
      <style:paragraph-properties fo:break-before="page"/>
      <style:text-properties officeooo:rsid="0089b706" officeooo:paragraph-rsid="0089b706"/>
    </style:style>
    <style:style style:name="P99" style:family="paragraph" style:parent-style-name="Heading_20_1">
      <style:paragraph-properties fo:break-before="page"/>
      <style:text-properties officeooo:paragraph-rsid="01e8015f"/>
    </style:style>
    <style:style style:name="P100" style:family="paragraph" style:parent-style-name="Heading_20_1">
      <style:paragraph-properties fo:break-before="page"/>
      <style:text-properties officeooo:rsid="001e5a7e" officeooo:paragraph-rsid="01e8015f"/>
    </style:style>
    <style:style style:name="P101" style:family="paragraph" style:parent-style-name="Heading_20_1" style:list-style-name="">
      <style:text-properties style:font-name="Times New Roman" officeooo:paragraph-rsid="008b0c85"/>
    </style:style>
    <style:style style:name="P102" style:family="paragraph" style:parent-style-name="Heading_20_1">
      <style:paragraph-properties fo:break-before="page"/>
      <style:text-properties officeooo:paragraph-rsid="01b60f4d"/>
    </style:style>
    <style:style style:name="P103" style:family="paragraph" style:parent-style-name="Heading_20_1">
      <style:paragraph-properties fo:break-before="page"/>
      <style:text-properties style:font-name="Arial" fo:font-size="16.1000003814697pt" officeooo:rsid="00f469e8" officeooo:paragraph-rsid="01911ccb" style:font-size-asian="16.1000003814697pt" style:font-size-complex="16.1000003814697pt"/>
    </style:style>
    <style:style style:name="P104" style:family="paragraph" style:parent-style-name="Heading_20_1" style:list-style-name="">
      <style:text-properties style:font-name="Arial" fo:font-size="16.1000003814697pt" fo:font-weight="bold" officeooo:rsid="00f469e8" officeooo:paragraph-rsid="01eca848" style:font-name-asian="WenQuanYi Micro Hei" style:font-size-asian="16.1000003814697pt" style:font-weight-asian="bold" style:font-name-complex="Lohit Hindi2" style:font-size-complex="16.1000003814697pt" style:font-weight-complex="bold"/>
    </style:style>
    <style:style style:name="P105" style:family="paragraph" style:parent-style-name="Heading_20_1">
      <style:paragraph-properties fo:break-before="page"/>
      <style:text-properties style:font-name="Arial" fo:font-size="16.1000003814697pt" fo:font-weight="bold" officeooo:rsid="00f469e8" officeooo:paragraph-rsid="01eca848" style:font-name-asian="WenQuanYi Micro Hei" style:font-size-asian="16.1000003814697pt" style:font-weight-asian="bold" style:font-name-complex="Lohit Hindi2" style:font-size-complex="16.1000003814697pt" style:font-weight-complex="bold"/>
    </style:style>
    <style:style style:name="P106" style:family="paragraph" style:parent-style-name="Heading_20_1">
      <style:paragraph-properties fo:break-before="page"/>
      <style:text-properties officeooo:paragraph-rsid="02297ca8"/>
    </style:style>
    <style:style style:name="P107" style:family="paragraph" style:parent-style-name="Heading_20_2">
      <style:text-properties officeooo:paragraph-rsid="01ae3332"/>
    </style:style>
    <style:style style:name="P108" style:family="paragraph" style:parent-style-name="Heading_20_2">
      <style:text-properties officeooo:rsid="001e5a7e"/>
    </style:style>
    <style:style style:name="P109" style:family="paragraph" style:parent-style-name="Heading_20_2">
      <style:text-properties officeooo:paragraph-rsid="01e8015f"/>
    </style:style>
    <style:style style:name="P110" style:family="paragraph" style:parent-style-name="Heading_20_2">
      <style:paragraph-properties fo:margin-top="0.423cm" fo:margin-bottom="0.212cm" style:contextual-spacing="false" fo:keep-with-next="always"/>
    </style:style>
    <style:style style:name="P111" style:family="paragraph" style:parent-style-name="Heading_20_2">
      <style:text-properties officeooo:paragraph-rsid="01911ccb"/>
    </style:style>
    <style:style style:name="P112" style:family="paragraph" style:parent-style-name="Heading_20_2">
      <style:text-properties officeooo:paragraph-rsid="01eca848"/>
    </style:style>
    <style:style style:name="P113" style:family="paragraph" style:parent-style-name="Heading_20_2">
      <style:text-properties officeooo:rsid="01b88285" officeooo:paragraph-rsid="01eca848"/>
    </style:style>
    <style:style style:name="P114" style:family="paragraph" style:parent-style-name="Heading_20_2">
      <style:text-properties officeooo:paragraph-rsid="02297ca8"/>
    </style:style>
    <style:style style:name="P115" style:family="paragraph" style:parent-style-name="Heading_20_2">
      <style:text-properties officeooo:paragraph-rsid="024125b1"/>
    </style:style>
    <style:style style:name="P116" style:family="paragraph" style:parent-style-name="Heading_20_3">
      <style:text-properties officeooo:paragraph-rsid="01e8015f"/>
    </style:style>
    <style:style style:name="P117" style:family="paragraph" style:parent-style-name="Heading_20_3">
      <style:text-properties officeooo:paragraph-rsid="01911ccb"/>
    </style:style>
    <style:style style:name="P118" style:family="paragraph" style:parent-style-name="Heading_20_3">
      <style:text-properties style:font-name="Arial" fo:font-size="16.1000003814697pt" fo:language="zxx" fo:country="none" fo:font-weight="bold" officeooo:rsid="016e4cfb" officeooo:paragraph-rsid="01911ccb" style:font-name-asian="WenQuanYi Micro Hei" style:font-size-asian="16.1000003814697pt" style:language-asian="zxx" style:country-asian="none" style:font-weight-asian="bold" style:font-name-complex="Lohit Hindi2" style:font-size-complex="16.1000003814697pt" style:language-complex="zxx" style:country-complex="none" style:font-weight-complex="bold"/>
    </style:style>
    <style:style style:name="P119" style:family="paragraph" style:parent-style-name="Heading_20_3">
      <style:text-properties fo:font-style="normal" style:text-underline-style="none" officeooo:rsid="02229f96" officeooo:paragraph-rsid="02229f96" style:font-style-asian="normal" style:font-style-complex="normal"/>
    </style:style>
    <style:style style:name="P120" style:family="paragraph" style:parent-style-name="Preformatted_20_Text">
      <loext:graphic-properties draw:fill="none" draw:fill-color="#ffffff"/>
      <style:paragraph-properties fo:background-color="transparent"/>
    </style:style>
    <style:style style:name="P121" style:family="paragraph" style:parent-style-name="Preformatted_20_Text">
      <style:paragraph-properties fo:margin-top="0cm" fo:margin-bottom="0.499cm" style:contextual-spacing="false"/>
    </style:style>
    <style:style style:name="P122" style:family="paragraph" style:parent-style-name="Preformatted_20_Text">
      <loext:graphic-properties draw:fill="none" draw:fill-color="#ffffff"/>
      <style:paragraph-properties fo:margin-left="0cm" fo:margin-right="0cm" fo:margin-top="0cm" fo:margin-bottom="0.499cm" style:contextual-spacing="false" fo:text-indent="0cm" style:auto-text-indent="false" fo:background-color="transparent"/>
    </style:style>
    <style:style style:name="P123" style:family="paragraph" style:parent-style-name="Preformatted_20_Text">
      <loext:graphic-properties draw:fill="none" draw:fill-color="#ffffff"/>
      <style:paragraph-properties fo:margin-left="0cm" fo:margin-right="0cm" fo:text-indent="0cm" style:auto-text-indent="false" fo:background-color="transparent"/>
    </style:style>
    <style:style style:name="P124" style:family="paragraph" style:parent-style-name="Standard" style:list-style-name="L1">
      <style:text-properties officeooo:rsid="00071684" officeooo:paragraph-rsid="006f4cb2"/>
    </style:style>
    <style:style style:name="P125" style:family="paragraph" style:parent-style-name="Standard" style:list-style-name="L1">
      <style:text-properties officeooo:rsid="0046be32" officeooo:paragraph-rsid="006f4cb2"/>
    </style:style>
    <style:style style:name="P126" style:family="paragraph" style:parent-style-name="Standard" style:list-style-name="L1">
      <style:text-properties officeooo:rsid="006f4cb2" officeooo:paragraph-rsid="006f4cb2"/>
    </style:style>
    <style:style style:name="P127" style:family="paragraph" style:parent-style-name="Standard" style:list-style-name="L1">
      <style:text-properties officeooo:rsid="016b81c2" officeooo:paragraph-rsid="006f4cb2"/>
    </style:style>
    <style:style style:name="P128" style:family="paragraph" style:parent-style-name="Standard" style:list-style-name="L1">
      <style:text-properties officeooo:rsid="00ce615c" officeooo:paragraph-rsid="00ea8470"/>
    </style:style>
    <style:style style:name="P129" style:family="paragraph" style:parent-style-name="Standard" style:list-style-name="L2">
      <style:text-properties officeooo:paragraph-rsid="01ddbda3"/>
    </style:style>
    <style:style style:name="P130" style:family="paragraph" style:parent-style-name="Standard" style:list-style-name="L2">
      <style:text-properties fo:font-style="italic" style:font-style-asian="italic" style:font-style-complex="italic"/>
    </style:style>
    <style:style style:name="P131" style:family="paragraph" style:parent-style-name="Standard">
      <style:text-properties fo:font-style="italic" officeooo:rsid="01ddbda3" officeooo:paragraph-rsid="01ddbda3" style:font-style-asian="italic" style:font-style-complex="italic"/>
    </style:style>
    <style:style style:name="P132" style:family="paragraph" style:parent-style-name="Standard">
      <style:text-properties fo:font-style="italic" fo:font-weight="bold" officeooo:paragraph-rsid="02297ca8" style:font-style-asian="italic" style:font-weight-asian="bold" style:font-style-complex="italic" style:font-weight-complex="bold"/>
    </style:style>
    <style:style style:name="P133" style:family="paragraph" style:parent-style-name="Standard" style:list-style-name="L1">
      <style:text-properties officeooo:rsid="017278c8" officeooo:paragraph-rsid="006f4cb2"/>
    </style:style>
    <style:style style:name="P134" style:family="paragraph" style:parent-style-name="Standard" style:list-style-name="L6">
      <style:text-properties officeooo:paragraph-rsid="01ae3332"/>
    </style:style>
    <style:style style:name="P135" style:family="paragraph" style:parent-style-name="Standard" style:list-style-name="">
      <style:text-properties style:font-name="Times New Roman" fo:font-size="11.8999996185303pt" fo:font-style="normal" fo:font-weight="normal" officeooo:rsid="015ebe13"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36" style:family="paragraph" style:parent-style-name="Standard" style:list-style-name="L18">
      <style:text-properties style:font-name="Times New Roman" fo:font-size="12pt" officeooo:paragraph-rsid="01eca848" fo:background-color="transparent" style:font-size-asian="12pt" style:font-size-complex="12pt"/>
    </style:style>
    <style:style style:name="P137" style:family="paragraph" style:parent-style-name="Standard" style:list-style-name="">
      <style:text-properties fo:color="#000000" loext:opacity="100%" style:font-name="Times New Roman" fo:font-size="11.8999996185303pt" fo:font-style="normal" fo:font-weight="normal" officeooo:rsid="015ebe13"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38" style:family="paragraph" style:parent-style-name="Standard">
      <style:text-properties fo:color="#000000" loext:opacity="100%" style:font-name="Times New Roman" fo:font-size="11.8999996185303pt" fo:font-style="normal" fo:font-weight="normal" officeooo:rsid="01a49154"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39" style:family="paragraph" style:parent-style-name="Standard">
      <style:text-properties fo:color="#000000" loext:opacity="100%" style:font-name="Times New Roman" fo:font-size="11.8999996185303pt" fo:font-style="italic" fo:font-weight="bold" officeooo:rsid="01a49154" officeooo:paragraph-rsid="02297ca8"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P140" style:family="paragraph" style:parent-style-name="Standard" style:list-style-name="L17">
      <style:text-properties fo:color="#000000" loext:opacity="100%" style:font-name="Times New Roman" fo:font-size="12pt" officeooo:rsid="0120e97a" officeooo:paragraph-rsid="01eca848" fo:background-color="transparent" style:font-size-asian="12pt" style:font-size-complex="12pt"/>
    </style:style>
    <style:style style:name="P141" style:family="paragraph" style:parent-style-name="Standard" style:list-style-name="L18">
      <style:text-properties fo:color="#000000" loext:opacity="100%" style:font-name="Times New Roman" fo:font-size="12pt" officeooo:rsid="0120e97a" officeooo:paragraph-rsid="01eca848" fo:background-color="transparent" style:font-size-asian="12pt" style:font-size-complex="12pt"/>
    </style:style>
    <style:style style:name="P142" style:family="paragraph" style:parent-style-name="Standard" style:list-style-name="">
      <style:text-properties fo:color="#000000" loext:opacity="100%" style:font-name="Monospace" fo:font-size="16pt" fo:font-style="normal" fo:font-weight="normal" officeooo:rsid="0140333d" officeooo:paragraph-rsid="02297ca8" style:font-size-asian="16pt" style:font-style-asian="normal" style:font-weight-asian="normal" style:font-style-complex="normal" style:font-weight-complex="normal"/>
    </style:style>
    <style:style style:name="P143" style:family="paragraph" style:parent-style-name="Standard" style:list-style-name="L16">
      <style:text-properties fo:color="#000000" loext:opacity="100%" style:font-name="Monospace" fo:font-size="10pt" officeooo:rsid="011ebf00" officeooo:paragraph-rsid="01eca848" fo:background-color="#e8f2fe" style:font-size-asian="10pt"/>
    </style:style>
    <style:style style:name="P144" style:family="paragraph" style:parent-style-name="Standard" style:list-style-name="L16">
      <style:text-properties fo:color="#000000" loext:opacity="100%" style:font-name="Monospace" fo:font-size="10pt" officeooo:rsid="011ebf00" officeooo:paragraph-rsid="01eca848" fo:background-color="transparent" style:font-size-asian="10pt"/>
    </style:style>
    <style:style style:name="P145" style:family="paragraph" style:parent-style-name="Standard">
      <style:paragraph-properties fo:margin-left="0cm" fo:margin-right="0cm" fo:text-align="start" style:justify-single-word="false" fo:text-indent="0cm" style:auto-text-indent="false"/>
      <style:text-properties fo:color="#000000" loext:opacity="100%" style:font-name="Monospace" fo:font-size="11.8999996185303pt" officeooo:paragraph-rsid="02297ca8" style:font-name-asian="WenQuanYi Micro Hei" style:font-size-asian="11.8999996185303pt" style:font-name-complex="Lohit Hindi2" style:font-size-complex="11.8999996185303pt"/>
    </style:style>
    <style:style style:name="P146"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47" style:family="paragraph" style:parent-style-name="Standard">
      <style:paragraph-properties fo:margin-top="0cm" fo:margin-bottom="0.101cm" style:contextual-spacing="false"/>
      <style:text-properties fo:color="#000000" loext:opacity="100%" style:font-name="Droid Sans Mono" fo:font-size="10.5pt" fo:font-style="italic" fo:font-weight="normal" officeooo:rsid="01cd9776" officeooo:paragraph-rsid="01911ccb" fo:background-color="#ffffff"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148" style:family="paragraph" style:parent-style-name="Standard" style:list-style-name="L1">
      <style:text-properties officeooo:rsid="0213d0cf" officeooo:paragraph-rsid="0213d0cf"/>
    </style:style>
    <style:style style:name="P149" style:family="paragraph" style:parent-style-name="Standard" style:list-style-name="L1">
      <style:text-properties officeooo:rsid="02225c12" officeooo:paragraph-rsid="02225c12"/>
    </style:style>
    <style:style style:name="P150" style:family="paragraph" style:parent-style-name="Standard">
      <style:text-properties officeooo:rsid="015fbfae" officeooo:paragraph-rsid="02297ca8"/>
    </style:style>
    <style:style style:name="P151" style:family="paragraph" style:parent-style-name="Standard">
      <style:text-properties fo:font-size="11.8999996185303pt" fo:font-weight="normal" officeooo:rsid="01a3ac4f" officeooo:paragraph-rsid="02297ca8" style:font-name-asian="WenQuanYi Micro Hei" style:font-size-asian="11.8999996185303pt" style:font-weight-asian="normal" style:font-name-complex="Lohit Hindi2" style:font-size-complex="11.8999996185303pt" style:font-weight-complex="normal"/>
    </style:style>
    <style:style style:name="P152" style:family="paragraph" style:parent-style-name="Standard">
      <style:text-properties fo:font-size="11.8999996185303pt" officeooo:paragraph-rsid="02297ca8" style:font-name-asian="WenQuanYi Micro Hei" style:font-size-asian="11.8999996185303pt" style:font-name-complex="Lohit Hindi2" style:font-size-complex="11.8999996185303pt"/>
    </style:style>
    <style:style style:name="P153" style:family="paragraph" style:parent-style-name="Standard">
      <style:text-properties fo:font-size="11.8999996185303pt" fo:font-style="normal" fo:font-weight="normal" officeooo:rsid="01c31d8c"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54" style:family="paragraph" style:parent-style-name="Standard">
      <style:text-properties officeooo:rsid="01a3e481" officeooo:paragraph-rsid="02297ca8"/>
    </style:style>
    <style:style style:name="P155" style:family="paragraph" style:parent-style-name="Standard">
      <style:text-properties officeooo:rsid="01a49154" officeooo:paragraph-rsid="02297ca8"/>
    </style:style>
    <style:style style:name="P156" style:family="paragraph" style:parent-style-name="Standard">
      <style:text-properties fo:font-style="normal" fo:font-weight="normal" officeooo:rsid="015fbfae" officeooo:paragraph-rsid="02297ca8" style:font-style-asian="normal" style:font-weight-asian="normal" style:font-style-complex="normal" style:font-weight-complex="normal"/>
    </style:style>
    <style:style style:name="P157" style:family="paragraph" style:parent-style-name="Standard">
      <style:text-properties fo:font-style="normal" fo:font-weight="normal" officeooo:rsid="01a4cc4c" officeooo:paragraph-rsid="02297ca8" style:font-style-asian="normal" style:font-weight-asian="normal" style:font-style-complex="normal"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style:font-name="Monospace" fo:font-size="10pt" officeooo:paragraph-rsid="02297ca8" style:font-size-asian="10pt"/>
    </style:style>
    <style:style style:name="P159" style:family="paragraph" style:parent-style-name="Standard">
      <style:paragraph-properties fo:margin-left="0cm" fo:margin-right="0cm" fo:text-align="start" style:justify-single-word="false" fo:text-indent="0cm" style:auto-text-indent="false"/>
      <style:text-properties style:font-name="Monospace" fo:font-size="10pt" officeooo:rsid="0293182e" officeooo:paragraph-rsid="02297ca8" style:font-size-asian="10pt"/>
    </style:style>
    <style:style style:name="P160" style:family="paragraph" style:parent-style-name="Standard">
      <style:text-properties style:font-name="Monospace" fo:font-size="10pt" officeooo:paragraph-rsid="02297ca8" style:font-size-asian="10pt"/>
    </style:style>
    <style:style style:name="P161" style:family="paragraph" style:parent-style-name="Standard">
      <style:text-properties officeooo:rsid="01e600e1" officeooo:paragraph-rsid="02297ca8"/>
    </style:style>
    <style:style style:name="P162" style:family="paragraph" style:parent-style-name="Standard">
      <style:text-properties style:font-name="Courier New" fo:font-size="10pt" officeooo:rsid="01e600e1" officeooo:paragraph-rsid="02297ca8"/>
    </style:style>
    <style:style style:name="P163" style:family="paragraph" style:parent-style-name="Standard">
      <style:paragraph-properties fo:margin-left="0cm" fo:margin-right="0cm" fo:text-align="start" style:justify-single-word="false" fo:text-indent="0cm" style:auto-text-indent="false"/>
      <style:text-properties officeooo:paragraph-rsid="02297ca8"/>
    </style:style>
    <style:style style:name="P164" style:family="paragraph" style:parent-style-name="Standard">
      <style:text-properties officeooo:paragraph-rsid="02297ca8"/>
    </style:style>
    <style:style style:name="P165" style:family="paragraph" style:parent-style-name="Standard">
      <style:text-properties officeooo:rsid="0244cff5" officeooo:paragraph-rsid="0244cff5"/>
    </style:style>
    <style:style style:name="P166" style:family="paragraph" style:parent-style-name="Text_20_body" style:list-style-name="L3">
      <style:text-properties officeooo:rsid="00e03516" officeooo:paragraph-rsid="00e03516"/>
    </style:style>
    <style:style style:name="P167" style:family="paragraph" style:parent-style-name="Text_20_body" style:list-style-name="L3">
      <style:text-properties officeooo:rsid="00e03516" officeooo:paragraph-rsid="00e56bfd"/>
    </style:style>
    <style:style style:name="P168" style:family="paragraph" style:parent-style-name="Text_20_body" style:list-style-name="L4">
      <style:text-properties fo:font-style="normal" officeooo:paragraph-rsid="00e03516" style:font-style-asian="normal" style:font-style-complex="normal"/>
    </style:style>
    <style:style style:name="P169" style:family="paragraph" style:parent-style-name="Text_20_body" style:list-style-name="L4">
      <style:text-properties fo:font-style="normal" officeooo:rsid="00e03516" officeooo:paragraph-rsid="00e03516" style:font-style-asian="normal" style:font-style-complex="normal"/>
    </style:style>
    <style:style style:name="P170" style:family="paragraph" style:parent-style-name="Text_20_body" style:list-style-name="L7">
      <style:text-properties fo:font-style="normal" officeooo:rsid="00e03516" officeooo:paragraph-rsid="00e56bfd" style:font-style-asian="normal" style:font-style-complex="normal"/>
    </style:style>
    <style:style style:name="P171" style:family="paragraph" style:parent-style-name="Text_20_body" style:list-style-name="L7">
      <style:text-properties fo:font-style="normal" officeooo:paragraph-rsid="00e56bfd" style:font-style-asian="normal" style:font-style-complex="normal"/>
    </style:style>
    <style:style style:name="P172" style:family="paragraph" style:parent-style-name="Text_20_body" style:list-style-name="L8">
      <style:text-properties fo:font-style="normal" officeooo:rsid="00e5cefd" officeooo:paragraph-rsid="00e5cefd" style:font-style-asian="normal" style:font-style-complex="normal"/>
    </style:style>
    <style:style style:name="P173" style:family="paragraph" style:parent-style-name="Text_20_body" style:list-style-name="L5">
      <style:text-properties officeooo:rsid="00e0865e" officeooo:paragraph-rsid="00e0865e"/>
    </style:style>
    <style:style style:name="P174" style:family="paragraph" style:parent-style-name="Text_20_body" style:list-style-name="L5">
      <style:text-properties style:font-name="Times New Roman" fo:font-size="12pt" officeooo:rsid="00e12903" officeooo:paragraph-rsid="00e12903" fo:background-color="transparent" style:font-size-asian="12pt" style:font-size-complex="12pt"/>
    </style:style>
    <style:style style:name="P175" style:family="paragraph" style:parent-style-name="Text_20_body" style:list-style-name="L19">
      <style:text-properties style:font-name="Times New Roman" fo:font-size="11.8000001907349pt" fo:font-weight="normal" officeooo:rsid="010be942" officeooo:paragraph-rsid="010efc1d" style:font-name-asian="WenQuanYi Micro Hei" style:font-size-asian="11.8000001907349pt" style:font-weight-asian="normal" style:font-name-complex="Lohit Hindi2" style:font-size-complex="11.8000001907349pt" style:font-weight-complex="normal"/>
    </style:style>
    <style:style style:name="P176" style:family="paragraph" style:parent-style-name="Text_20_body">
      <style:paragraph-properties fo:margin-top="0cm" fo:margin-bottom="0.101cm" style:contextual-spacing="false"/>
      <style:text-properties style:font-name="Times New Roman" fo:font-size="11.8000001907349pt" fo:font-style="normal" fo:font-weight="normal" officeooo:rsid="02fbabe3"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177" style:family="paragraph" style:parent-style-name="Text_20_body">
      <style:paragraph-properties fo:margin-top="0cm" fo:margin-bottom="0.101cm" style:contextual-spacing="false"/>
      <style:text-properties style:font-name="Times New Roman" fo:font-size="11.8000001907349pt" fo:font-style="italic" fo:font-weight="normal" officeooo:rsid="01cd9776" officeooo:paragraph-rsid="01911ccb"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178" style:family="paragraph" style:parent-style-name="Text_20_body" style:list-style-name="L5">
      <style:text-properties fo:color="#000000" loext:opacity="100%" style:font-name="Times New Roman" fo:font-size="12pt" officeooo:rsid="00e12903" officeooo:paragraph-rsid="00e12903" fo:background-color="transparent" style:font-size-asian="12pt" style:font-size-complex="12pt"/>
    </style:style>
    <style:style style:name="P179" style:family="paragraph" style:parent-style-name="Text_20_body">
      <style:text-properties fo:color="#000000" loext:opacity="100%" style:font-name="Times New Roman" fo:font-size="11.8999996185303pt" fo:font-style="italic" fo:font-weight="bold" officeooo:rsid="01a49154" officeooo:paragraph-rsid="02297ca8"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P180" style:family="paragraph" style:parent-style-name="Text_20_body" style:list-style-name="L8">
      <style:text-properties officeooo:paragraph-rsid="00e5cefd"/>
    </style:style>
    <style:style style:name="P181" style:family="paragraph" style:parent-style-name="Text_20_body" style:list-style-name="L8">
      <style:text-properties officeooo:rsid="00e5cefd" officeooo:paragraph-rsid="00e5cefd"/>
    </style:style>
    <style:style style:name="P182" style:family="paragraph" style:parent-style-name="Text_20_body" style:list-style-name="L12"/>
    <style:style style:name="P183" style:family="paragraph" style:parent-style-name="Text_20_body" style:list-style-name="L13"/>
    <style:style style:name="P184" style:family="paragraph" style:parent-style-name="Text_20_body" style:list-style-name="L14"/>
    <style:style style:name="P185" style:family="paragraph" style:parent-style-name="Text_20_body" style:list-style-name="L15">
      <style:text-properties officeooo:paragraph-rsid="01fa69eb"/>
    </style:style>
    <style:style style:name="P186" style:family="paragraph" style:parent-style-name="Text_20_body">
      <style:text-properties style:font-name="Liberation Mono" fo:font-size="10pt" fo:font-style="italic" fo:font-weight="bold" officeooo:rsid="00d21738" officeooo:paragraph-rsid="0210383e" style:font-name-asian="Droid Sans Fallback" style:font-size-asian="10pt" style:font-style-asian="italic" style:font-weight-asian="normal" style:font-name-complex="Liberation Mono" style:font-size-complex="10pt" style:font-style-complex="italic" style:font-weight-complex="normal"/>
    </style:style>
    <style:style style:name="P187" style:family="paragraph" style:parent-style-name="Text_20_body">
      <style:text-properties officeooo:rsid="0210383e" officeooo:paragraph-rsid="0210383e"/>
    </style:style>
    <style:style style:name="P188" style:family="paragraph" style:parent-style-name="Text_20_body">
      <style:text-properties officeooo:paragraph-rsid="0080df97"/>
    </style:style>
    <style:style style:name="P189" style:family="paragraph" style:parent-style-name="Text_20_body">
      <style:text-properties style:text-underline-style="solid" style:text-underline-width="auto" style:text-underline-color="font-color" officeooo:paragraph-rsid="0080df97"/>
    </style:style>
    <style:style style:name="P190" style:family="paragraph" style:parent-style-name="Text_20_body">
      <style:text-properties style:text-underline-style="solid" style:text-underline-width="auto" style:text-underline-color="font-color" fo:font-weight="normal" style:font-weight-asian="normal" style:font-weight-complex="normal"/>
    </style:style>
    <style:style style:name="P191" style:family="paragraph" style:parent-style-name="Text_20_body">
      <style:text-properties style:text-underline-style="solid" style:text-underline-width="auto" style:text-underline-color="font-color" officeooo:paragraph-rsid="022a1898"/>
    </style:style>
    <style:style style:name="P192" style:family="paragraph" style:parent-style-name="Text_20_body">
      <style:text-properties style:text-underline-style="solid" style:text-underline-width="auto" style:text-underline-color="font-color"/>
    </style:style>
    <style:style style:name="P193" style:family="paragraph" style:parent-style-name="Text_20_body" style:list-style-name="L20">
      <style:text-properties officeooo:paragraph-rsid="0080df97"/>
    </style:style>
    <style:style style:name="P194" style:family="paragraph" style:parent-style-name="Text_20_body">
      <style:text-properties officeooo:rsid="02164def" officeooo:paragraph-rsid="02164def"/>
    </style:style>
    <style:style style:name="P195" style:family="paragraph" style:parent-style-name="Text_20_body" style:list-style-name="L21">
      <style:text-properties officeooo:paragraph-rsid="0080df97"/>
    </style:style>
    <style:style style:name="P196" style:family="paragraph" style:parent-style-name="Text_20_body">
      <style:text-properties fo:font-weight="bold" officeooo:paragraph-rsid="0080df97" style:font-weight-asian="bold" style:font-weight-complex="bold"/>
    </style:style>
    <style:style style:name="P197" style:family="paragraph" style:parent-style-name="Text_20_body" style:list-style-name="L22"/>
    <style:style style:name="P198" style:family="paragraph" style:parent-style-name="Text_20_body" style:list-style-name="L22">
      <style:paragraph-properties fo:margin-top="0cm" fo:margin-bottom="0cm" style:contextual-spacing="false"/>
    </style:style>
    <style:style style:name="P199" style:family="paragraph" style:parent-style-name="Text_20_body" style:list-style-name="L23">
      <style:paragraph-properties fo:margin-top="0cm" fo:margin-bottom="0cm" style:contextual-spacing="false"/>
    </style:style>
    <style:style style:name="P200" style:family="paragraph" style:parent-style-name="Text_20_body" style:list-style-name="L23">
      <style:text-properties officeooo:paragraph-rsid="021d3d74"/>
    </style:style>
    <style:style style:name="P201" style:family="paragraph" style:parent-style-name="Text_20_body" style:list-style-name="L24"/>
    <style:style style:name="P202" style:family="paragraph" style:parent-style-name="Text_20_body" style:list-style-name="L24">
      <style:paragraph-properties fo:margin-top="0cm" fo:margin-bottom="0cm" style:contextual-spacing="false"/>
    </style:style>
    <style:style style:name="P203" style:family="paragraph" style:parent-style-name="Text_20_body" style:list-style-name="L25"/>
    <style:style style:name="P204" style:family="paragraph" style:parent-style-name="Text_20_body" style:list-style-name="L25">
      <style:paragraph-properties fo:margin-top="0cm" fo:margin-bottom="0cm" style:contextual-spacing="false"/>
    </style:style>
    <style:style style:name="P205" style:family="paragraph" style:parent-style-name="Text_20_body" style:list-style-name="L26"/>
    <style:style style:name="P206" style:family="paragraph" style:parent-style-name="Text_20_body" style:list-style-name="L26">
      <style:paragraph-properties fo:margin-top="0cm" fo:margin-bottom="0cm" style:contextual-spacing="false"/>
    </style:style>
    <style:style style:name="P207" style:family="paragraph" style:parent-style-name="Text_20_body" style:list-style-name="L27"/>
    <style:style style:name="P208" style:family="paragraph" style:parent-style-name="Text_20_body" style:list-style-name="L27">
      <style:paragraph-properties fo:margin-top="0cm" fo:margin-bottom="0cm" style:contextual-spacing="false"/>
    </style:style>
    <style:style style:name="P209" style:family="paragraph" style:parent-style-name="Text_20_body" style:list-style-name="L28"/>
    <style:style style:name="P210" style:family="paragraph" style:parent-style-name="Text_20_body" style:list-style-name="L28">
      <style:paragraph-properties fo:margin-top="0cm" fo:margin-bottom="0cm" style:contextual-spacing="false"/>
    </style:style>
    <style:style style:name="P211" style:family="paragraph" style:parent-style-name="Text_20_body" style:list-style-name="L29"/>
    <style:style style:name="P212" style:family="paragraph" style:parent-style-name="Text_20_body" style:list-style-name="L29">
      <style:paragraph-properties fo:margin-top="0cm" fo:margin-bottom="0cm" style:contextual-spacing="false"/>
    </style:style>
    <style:style style:name="P213" style:family="paragraph" style:parent-style-name="Text_20_body" style:list-style-name="L30"/>
    <style:style style:name="P214" style:family="paragraph" style:parent-style-name="Text_20_body" style:list-style-name="L30">
      <style:paragraph-properties fo:margin-top="0cm" fo:margin-bottom="0cm" style:contextual-spacing="false"/>
    </style:style>
    <style:style style:name="P215" style:family="paragraph" style:parent-style-name="Text_20_body" style:list-style-name="L31"/>
    <style:style style:name="P216" style:family="paragraph" style:parent-style-name="Text_20_body" style:list-style-name="L31">
      <style:paragraph-properties fo:margin-top="0cm" fo:margin-bottom="0cm" style:contextual-spacing="false"/>
    </style:style>
    <style:style style:name="P217" style:family="paragraph" style:parent-style-name="Text_20_body" style:list-style-name="L32"/>
    <style:style style:name="P218" style:family="paragraph" style:parent-style-name="Text_20_body" style:list-style-name="L32">
      <style:paragraph-properties fo:margin-top="0cm" fo:margin-bottom="0cm" style:contextual-spacing="false"/>
    </style:style>
    <style:style style:name="P219" style:family="paragraph" style:parent-style-name="Text_20_body" style:list-style-name="L33">
      <style:paragraph-properties fo:margin-top="0cm" fo:margin-bottom="0cm" style:contextual-spacing="false"/>
    </style:style>
    <style:style style:name="P220" style:family="paragraph" style:parent-style-name="Text_20_body" style:list-style-name="L34"/>
    <style:style style:name="P221" style:family="paragraph" style:parent-style-name="Text_20_body" style:list-style-name="L34">
      <style:paragraph-properties fo:margin-top="0cm" fo:margin-bottom="0cm" style:contextual-spacing="false"/>
    </style:style>
    <style:style style:name="P222" style:family="paragraph" style:parent-style-name="Text_20_body">
      <style:text-properties fo:font-style="italic" officeooo:rsid="01a8bab4" officeooo:paragraph-rsid="02297ca8" style:font-style-asian="italic" style:font-style-complex="italic"/>
    </style:style>
    <style:style style:name="P223" style:family="paragraph" style:parent-style-name="Text_20_body">
      <style:text-properties fo:font-style="italic" style:text-underline-style="solid" style:text-underline-width="auto" style:text-underline-color="font-color" style:font-style-asian="italic" style:font-style-complex="italic"/>
    </style:style>
    <style:style style:name="P224" style:family="paragraph" style:parent-style-name="Text_20_body">
      <style:text-properties fo:font-style="italic" fo:font-weight="bold" officeooo:rsid="01e600e1" officeooo:paragraph-rsid="02297ca8" style:font-style-asian="italic" style:font-weight-asian="bold" style:font-style-complex="italic" style:font-weight-complex="bold"/>
    </style:style>
    <style:style style:name="P225" style:family="paragraph" style:parent-style-name="Text_20_body">
      <style:text-properties officeooo:rsid="02008497" officeooo:paragraph-rsid="02297ca8"/>
    </style:style>
    <style:style style:name="P226" style:family="paragraph" style:parent-style-name="Text_20_body" style:list-style-name="L35">
      <style:text-properties officeooo:rsid="01a49154" officeooo:paragraph-rsid="02297ca8"/>
    </style:style>
    <style:style style:name="P227" style:family="paragraph" style:parent-style-name="Text_20_body">
      <style:text-properties officeooo:rsid="01a49154" officeooo:paragraph-rsid="02297ca8"/>
    </style:style>
    <style:style style:name="P228" style:family="paragraph" style:parent-style-name="Text_20_body" style:list-style-name="L35">
      <style:text-properties officeooo:paragraph-rsid="02297ca8"/>
    </style:style>
    <style:style style:name="P229" style:family="paragraph" style:parent-style-name="Text_20_body">
      <style:text-properties officeooo:rsid="01e600e1" officeooo:paragraph-rsid="02297ca8"/>
    </style:style>
    <style:style style:name="P230" style:family="paragraph" style:parent-style-name="Text_20_body">
      <style:text-properties officeooo:paragraph-rsid="02297ca8"/>
    </style:style>
    <style:style style:name="P231" style:family="paragraph" style:parent-style-name="Text_20_body">
      <style:text-properties officeooo:paragraph-rsid="01b60f4d"/>
    </style:style>
    <style:style style:name="P232" style:family="paragraph" style:parent-style-name="Text_20_body" style:list-style-name="L36">
      <style:paragraph-properties fo:margin-top="0cm" fo:margin-bottom="0cm" style:contextual-spacing="false"/>
    </style:style>
    <style:style style:name="P233" style:family="paragraph" style:parent-style-name="Text_20_body" style:list-style-name="L36">
      <style:text-properties officeooo:paragraph-rsid="022a1898"/>
    </style:style>
    <style:style style:name="P234" style:family="paragraph" style:parent-style-name="Text_20_body" style:list-style-name="L37"/>
    <style:style style:name="P235" style:family="paragraph" style:parent-style-name="Text_20_body" style:list-style-name="L37">
      <style:paragraph-properties fo:margin-top="0cm" fo:margin-bottom="0cm" style:contextual-spacing="false"/>
    </style:style>
    <style:style style:name="P236" style:family="paragraph" style:parent-style-name="Text_20_body">
      <style:paragraph-properties fo:margin-left="0cm" fo:margin-right="0cm" fo:text-indent="0cm" style:auto-text-indent="false"/>
    </style:style>
    <style:style style:name="P237" style:family="paragraph" style:parent-style-name="Text_20_body">
      <style:paragraph-properties fo:margin-left="1cm" fo:margin-right="1cm" fo:text-indent="0cm" style:auto-text-indent="false"/>
    </style:style>
    <style:style style:name="P238" style:family="paragraph" style:parent-style-name="Text_20_body" style:list-style-name="L38"/>
    <style:style style:name="P239" style:family="paragraph" style:parent-style-name="Text_20_body" style:list-style-name="L38">
      <style:paragraph-properties fo:margin-top="0cm" fo:margin-bottom="0cm" style:contextual-spacing="false"/>
    </style:style>
    <style:style style:name="P240" style:family="paragraph" style:parent-style-name="Text_20_body" style:list-style-name="L39"/>
    <style:style style:name="P241" style:family="paragraph" style:parent-style-name="Text_20_body" style:list-style-name="L39">
      <style:paragraph-properties fo:margin-top="0cm" fo:margin-bottom="0cm" style:contextual-spacing="false"/>
    </style:style>
    <style:style style:name="P242" style:family="paragraph" style:parent-style-name="Text_20_body" style:list-style-name="L40"/>
    <style:style style:name="P243" style:family="paragraph" style:parent-style-name="Text_20_body" style:list-style-name="L40">
      <style:paragraph-properties fo:margin-top="0cm" fo:margin-bottom="0cm" style:contextual-spacing="false"/>
    </style:style>
    <style:style style:name="P244" style:family="paragraph" style:parent-style-name="Text_20_body">
      <style:text-properties style:font-name="Arial" fo:font-size="11.8000001907349pt" fo:font-weight="bold" officeooo:rsid="01030653" officeooo:paragraph-rsid="01eca848" style:font-name-asian="WenQuanYi Micro Hei" style:font-size-asian="11.8000001907349pt" style:font-weight-asian="bold" style:font-name-complex="Lohit Hindi2" style:font-size-complex="11.8000001907349pt" style:font-weight-complex="bold"/>
    </style:style>
    <style:style style:name="P245" style:family="paragraph" style:parent-style-name="Text_20_body" style:list-style-name="L41"/>
    <style:style style:name="P246" style:family="paragraph" style:parent-style-name="Text_20_body" style:list-style-name="L41">
      <style:paragraph-properties fo:margin-top="0cm" fo:margin-bottom="0cm" style:contextual-spacing="false"/>
    </style:style>
    <style:style style:name="P247" style:family="paragraph" style:parent-style-name="Text_20_body" style:list-style-name="L42"/>
    <style:style style:name="P248" style:family="paragraph" style:parent-style-name="Text_20_body" style:list-style-name="L42">
      <style:paragraph-properties fo:margin-top="0cm" fo:margin-bottom="0cm" style:contextual-spacing="false"/>
    </style:style>
    <style:style style:name="P249" style:family="paragraph" style:parent-style-name="Text_20_body" style:list-style-name="L43"/>
    <style:style style:name="P250" style:family="paragraph" style:parent-style-name="Text_20_body" style:list-style-name="L43">
      <style:paragraph-properties fo:margin-top="0cm" fo:margin-bottom="0cm" style:contextual-spacing="false"/>
    </style:style>
    <style:style style:name="P251" style:family="paragraph" style:parent-style-name="Text_20_body" style:list-style-name="L44"/>
    <style:style style:name="P252" style:family="paragraph" style:parent-style-name="Text_20_body" style:list-style-name="L44">
      <style:paragraph-properties fo:margin-top="0cm" fo:margin-bottom="0cm" style:contextual-spacing="false"/>
    </style:style>
    <style:style style:name="P253" style:family="paragraph" style:parent-style-name="Text_20_body" style:list-style-name="L45"/>
    <style:style style:name="P254" style:family="paragraph" style:parent-style-name="Text_20_body" style:list-style-name="L45">
      <style:paragraph-properties fo:margin-top="0cm" fo:margin-bottom="0cm" style:contextual-spacing="false"/>
    </style:style>
    <style:style style:name="P255" style:family="paragraph" style:parent-style-name="Text_20_body" style:list-style-name="L46"/>
    <style:style style:name="P256" style:family="paragraph" style:parent-style-name="Text_20_body" style:list-style-name="L46">
      <style:paragraph-properties fo:margin-top="0cm" fo:margin-bottom="0cm" style:contextual-spacing="false"/>
    </style:style>
    <style:style style:name="P257" style:family="paragraph" style:parent-style-name="Text_20_body" style:list-style-name="L47"/>
    <style:style style:name="P258" style:family="paragraph" style:parent-style-name="Text_20_body" style:list-style-name="L47">
      <style:paragraph-properties fo:margin-top="0cm" fo:margin-bottom="0cm" style:contextual-spacing="false"/>
    </style:style>
    <style:style style:name="P259" style:family="paragraph" style:parent-style-name="Text_20_body" style:list-style-name="L48"/>
    <style:style style:name="P260" style:family="paragraph" style:parent-style-name="Text_20_body" style:list-style-name="L48">
      <style:paragraph-properties fo:margin-top="0cm" fo:margin-bottom="0cm" style:contextual-spacing="false"/>
    </style:style>
    <style:style style:name="P261" style:family="paragraph" style:parent-style-name="Text_20_body" style:list-style-name="L49"/>
    <style:style style:name="P262" style:family="paragraph" style:parent-style-name="Text_20_body" style:list-style-name="L49">
      <style:paragraph-properties fo:margin-top="0cm" fo:margin-bottom="0cm" style:contextual-spacing="false"/>
    </style:style>
    <style:style style:name="P263" style:family="paragraph" style:parent-style-name="Title">
      <style:paragraph-properties fo:text-align="center" style:justify-single-word="false"/>
      <style:text-properties fo:font-size="18pt" officeooo:paragraph-rsid="006f4cb2" style:font-size-asian="18pt" style:font-size-complex="18pt"/>
    </style:style>
    <style:style style:name="P264" style:family="paragraph" style:parent-style-name="commande">
      <style:text-properties officeooo:paragraph-rsid="0210383e"/>
    </style:style>
    <style:style style:name="P265" style:family="paragraph" style:parent-style-name="commande">
      <style:text-properties officeooo:paragraph-rsid="02164def"/>
    </style:style>
    <style:style style:name="T1" style:family="text">
      <style:text-properties fo:font-style="italic" style:font-style-asian="italic" style:font-style-complex="italic"/>
    </style:style>
    <style:style style:name="T2" style:family="text">
      <style:text-properties fo:font-style="italic" officeooo:rsid="00e03516" style:font-style-asian="italic" style:font-style-complex="italic"/>
    </style:style>
    <style:style style:name="T3" style:family="text">
      <style:text-properties fo:font-style="italic" officeooo:rsid="00e2d819" style:font-style-asian="italic" style:font-style-complex="italic"/>
    </style:style>
    <style:style style:name="T4" style:family="text">
      <style:text-properties fo:font-style="italic" officeooo:rsid="00e56bfd" style:font-style-asian="italic" style:font-style-complex="italic"/>
    </style:style>
    <style:style style:name="T5" style:family="text">
      <style:text-properties fo:font-style="italic" officeooo:rsid="00e5cefd" style:font-style-asian="italic" style:font-style-complex="italic"/>
    </style:style>
    <style:style style:name="T6" style:family="text">
      <style:text-properties fo:font-style="italic" officeooo:rsid="00ea8470" style:font-style-asian="italic" style:font-style-complex="italic"/>
    </style:style>
    <style:style style:name="T7" style:family="text">
      <style:text-properties fo:font-style="italic" officeooo:rsid="0120e97a" style:font-style-asian="italic" style:font-style-complex="italic"/>
    </style:style>
    <style:style style:name="T8" style:family="text">
      <style:text-properties fo:font-style="italic" officeooo:rsid="02fd9c6b" style:font-style-asian="italic" style:font-style-complex="italic"/>
    </style:style>
    <style:style style:name="T9" style:family="text">
      <style:text-properties fo:font-style="italic" officeooo:rsid="03049a1a" style:font-style-asian="italic" style:font-style-complex="italic"/>
    </style:style>
    <style:style style:name="T10" style:family="text">
      <style:text-properties fo:font-style="italic" officeooo:rsid="01a2fb20" style:font-style-asian="italic" style:font-style-complex="italic"/>
    </style:style>
    <style:style style:name="T11" style:family="text">
      <style:text-properties fo:font-style="italic" officeooo:rsid="01a5a56b" style:font-style-asian="italic" style:font-style-complex="italic"/>
    </style:style>
    <style:style style:name="T12" style:family="text">
      <style:text-properties fo:font-style="italic" officeooo:rsid="0209b58d" style:font-style-asian="italic" style:font-style-complex="italic"/>
    </style:style>
    <style:style style:name="T13" style:family="text">
      <style:text-properties fo:font-style="italic" officeooo:rsid="02166e74" style:font-style-asian="italic" style:font-style-complex="italic"/>
    </style:style>
    <style:style style:name="T14" style:family="text">
      <style:text-properties fo:font-style="italic" officeooo:rsid="01a2e720" style:font-style-asian="italic" style:font-style-complex="italic"/>
    </style:style>
    <style:style style:name="T15" style:family="text">
      <style:text-properties fo:font-style="italic" officeooo:rsid="01ddbda3" style:font-style-asian="italic" style:font-style-complex="italic"/>
    </style:style>
    <style:style style:name="T16" style:family="text">
      <style:text-properties fo:font-style="italic" officeooo:rsid="00cd76d4" style:font-style-asian="italic" style:font-weight-asian="normal" style:font-style-complex="italic" style:font-weight-complex="normal"/>
    </style:style>
    <style:style style:name="T17" style:family="text">
      <style:text-properties fo:font-style="italic" officeooo:rsid="0127d61b" style:font-style-asian="italic" style:font-weight-asian="normal" style:font-style-complex="italic" style:font-weight-complex="normal"/>
    </style:style>
    <style:style style:name="T18" style:family="text">
      <style:text-properties fo:font-style="italic" officeooo:rsid="0210383e"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e03516" style:font-style-asian="italic" style:font-weight-asian="bold" style:font-style-complex="italic" style:font-weight-complex="bold"/>
    </style:style>
    <style:style style:name="T21" style:family="text">
      <style:text-properties fo:font-style="italic" fo:font-weight="bold" officeooo:rsid="00e56bfd" style:font-style-asian="italic" style:font-weight-asian="bold" style:font-style-complex="italic" style:font-weight-complex="bold"/>
    </style:style>
    <style:style style:name="T22" style:family="text">
      <style:text-properties fo:font-style="italic" fo:font-weight="bold" officeooo:rsid="0129e4ac" style:font-style-asian="italic" style:font-weight-asian="bold" style:font-style-complex="italic" style:font-weight-complex="bold"/>
    </style:style>
    <style:style style:name="T23" style:family="text">
      <style:text-properties fo:font-style="italic" fo:font-weight="bold" officeooo:rsid="0302d63b" style:font-style-asian="italic" style:font-weight-asian="bold" style:font-style-complex="italic" style:font-weight-complex="bold"/>
    </style:style>
    <style:style style:name="T24" style:family="text">
      <style:text-properties fo:font-style="italic" fo:font-weight="bold" officeooo:rsid="01a5a56b" style:font-style-asian="italic" style:font-weight-asian="bold" style:font-style-complex="italic" style:font-weight-complex="bold"/>
    </style:style>
    <style:style style:name="T25" style:family="text">
      <style:text-properties fo:font-style="italic" fo:font-weight="bold" officeooo:rsid="01ae3332" style:font-style-asian="italic" style:font-weight-asian="bold" style:font-style-complex="italic" style:font-weight-complex="bold"/>
    </style:style>
    <style:style style:name="T26" style:family="text">
      <style:text-properties fo:font-style="italic" fo:font-weight="bold" officeooo:rsid="01e3ce5c" style:font-style-asian="italic" style:font-weight-asian="bold" style:font-style-complex="italic" style:font-weight-complex="bold"/>
    </style:style>
    <style:style style:name="T27" style:family="text">
      <style:text-properties fo:font-style="italic" fo:font-weight="bold" officeooo:rsid="00d21738" style:font-name-asian="WenQuanYi Micro Hei" style:font-style-asian="italic" style:font-weight-asian="bold" style:font-name-complex="Lohit Hindi2" style:font-style-complex="italic" style:font-weight-complex="bold"/>
    </style:style>
    <style:style style:name="T28" style:family="text">
      <style:text-properties fo:color="#000000" loext:opacity="100%"/>
    </style:style>
    <style:style style:name="T29" style:family="text">
      <style:text-properties fo:color="#000000" loext:opacity="100%" style:font-name="Times New Roman" fo:font-size="12pt" fo:background-color="transparent" loext:char-shading-value="0" style:font-size-asian="12pt" style:font-size-complex="12pt"/>
    </style:style>
    <style:style style:name="T30" style:family="text">
      <style:text-properties fo:color="#000000" loext:opacity="100%" style:font-name="Times New Roman" fo:font-size="12pt" officeooo:rsid="0120e97a" fo:background-color="transparent" loext:char-shading-value="0" style:font-size-asian="12pt" style:font-size-complex="12pt"/>
    </style:style>
    <style:style style:name="T31" style:family="text">
      <style:text-properties fo:color="#000000" loext:opacity="100%" style:font-name="Times New Roman" fo:font-size="12pt" officeooo:rsid="0129e4ac" fo:background-color="transparent" loext:char-shading-value="0" style:font-size-asian="12pt" style:font-size-complex="12pt"/>
    </style:style>
    <style:style style:name="T32" style:family="text">
      <style:text-properties fo:color="#000000" loext:opacity="100%" style:font-name="Times New Roman" fo:font-size="12pt" fo:font-style="italic" fo:background-color="transparent" loext:char-shading-value="0" style:font-size-asian="12pt" style:font-style-asian="italic" style:font-size-complex="12pt" style:font-style-complex="italic"/>
    </style:style>
    <style:style style:name="T33" style:family="text">
      <style:text-properties fo:color="#000000" loext:opacity="100%" style:font-name="Times New Roman" fo:font-size="12pt" fo:font-style="italic" fo:font-weight="bold" officeooo:rsid="0120e97a" fo:background-color="transparent" loext:char-shading-value="0" style:font-size-asian="12pt" style:font-style-asian="italic" style:font-weight-asian="bold" style:font-size-complex="12pt" style:font-style-complex="italic" style:font-weight-complex="bold"/>
    </style:style>
    <style:style style:name="T34" style:family="text">
      <style:text-properties fo:color="#000000" loext:opacity="100%" style:font-name="Times New Roman" fo:font-size="12pt" fo:font-style="italic" fo:font-weight="bold" officeooo:rsid="0129e4ac" fo:background-color="transparent" loext:char-shading-value="0" style:font-size-asian="12pt" style:font-style-asian="italic" style:font-weight-asian="bold" style:font-size-complex="12pt" style:font-style-complex="italic" style:font-weight-complex="bold"/>
    </style:style>
    <style:style style:name="T35" style:family="text">
      <style:text-properties fo:color="#000000" loext:opacity="100%" style:font-name="Times New Roman" fo:font-size="12pt" fo:font-style="italic" style:text-underline-style="none" fo:font-weight="bold" officeooo:rsid="00d240a6" style:font-name-asian="WenQuanYi Micro Hei" style:font-size-asian="12pt" style:font-style-asian="italic" style:font-weight-asian="bold" style:font-name-complex="Lohit Hindi2" style:font-size-complex="12pt" style:font-style-complex="italic" style:font-weight-complex="bold" style:text-overline-style="none" style:text-overline-color="font-color"/>
    </style:style>
    <style:style style:name="T36" style:family="text">
      <style:text-properties fo:color="#000000" loext:opacity="100%" style:font-name="Times New Roman" fo:font-size="12pt" fo:font-style="normal" style:text-underline-style="none" fo:font-weight="normal" officeooo:rsid="00d240a6"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T37" style:family="text">
      <style:text-properties fo:color="#000000" loext:opacity="100%" style:font-name="Times New Roman" fo:font-size="11.8999996185303pt" fo:font-style="normal" fo:font-weight="normal"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38" style:family="text">
      <style:text-properties fo:color="#000000" loext:opacity="100%" style:font-name="Times New Roman" fo:font-size="11.8999996185303pt" fo:font-style="normal" fo:font-weight="normal" officeooo:rsid="013df41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39" style:family="text">
      <style:text-properties fo:color="#000000" loext:opacity="100%" style:font-name="Times New Roman" fo:font-size="11.8999996185303pt" fo:font-style="normal" fo:font-weight="normal" officeooo:rsid="01606946"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0" style:family="text">
      <style:text-properties fo:color="#000000" loext:opacity="100%" style:font-name="Times New Roman" fo:font-size="11.8999996185303pt" fo:font-style="normal" fo:font-weight="normal" officeooo:rsid="015ebe13"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1" style:family="text">
      <style:text-properties fo:color="#000000" loext:opacity="100%" style:font-name="Times New Roman" fo:font-size="11.8999996185303pt" fo:font-style="normal" fo:font-weight="normal" officeooo:rsid="01c31d8c"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2" style:family="text">
      <style:text-properties fo:color="#000000" loext:opacity="100%" style:font-name="Times New Roman" fo:font-size="11.8999996185303pt" fo:font-style="normal" fo:font-weight="normal" officeooo:rsid="01a49154"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3" style:family="text">
      <style:text-properties fo:color="#000000" loext:opacity="100%" style:font-name="Times New Roman" fo:font-size="11.8999996185303pt" fo:font-style="normal" fo:font-weight="normal" officeooo:rsid="020606e7"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4" style:family="text">
      <style:text-properties fo:color="#000000" loext:opacity="100%" style:font-name="Times New Roman" fo:font-size="11.8999996185303pt" fo:font-style="italic" fo:font-weight="bold"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45" style:family="text">
      <style:text-properties fo:color="#000000" loext:opacity="100%" style:font-name="Times New Roman" fo:font-size="11.8999996185303pt" fo:font-style="italic" fo:font-weight="bold" officeooo:rsid="01a49154"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46" style:family="text">
      <style:text-properties fo:color="#000000" loext:opacity="100%" fo:font-style="italic" style:font-style-asian="italic" style:font-style-complex="italic"/>
    </style:style>
    <style:style style:name="T47" style:family="text">
      <style:text-properties fo:color="#000000" loext:opacity="100%" fo:font-style="italic" officeooo:rsid="0120e97a" style:font-style-asian="italic" style:font-style-complex="italic"/>
    </style:style>
    <style:style style:name="T48" style:family="text">
      <style:text-properties fo:color="#000000" loext:opacity="100%" fo:font-style="italic" fo:font-weight="bold" style:font-style-asian="italic" style:font-weight-asian="bold" style:font-style-complex="italic" style:font-weight-complex="bold"/>
    </style:style>
    <style:style style:name="T49" style:family="text">
      <style:text-properties fo:color="#000000" loext:opacity="100%" fo:font-style="italic" fo:font-weight="bold" officeooo:rsid="02915030" style:font-style-asian="italic" style:font-weight-asian="bold" style:font-style-complex="italic" style:font-weight-complex="bold"/>
    </style:style>
    <style:style style:name="T50" style:family="text">
      <style:text-properties fo:color="#000000" loext:opacity="100%" fo:font-style="italic" fo:font-weight="bold" officeooo:rsid="02944c22" style:font-style-asian="italic" style:font-weight-asian="bold" style:font-style-complex="italic" style:font-weight-complex="bold"/>
    </style:style>
    <style:style style:name="T51" style:family="text">
      <style:text-properties fo:color="#000000" loext:opacity="100%" officeooo:rsid="0120e97a"/>
    </style:style>
    <style:style style:name="T52" style:family="text">
      <style:text-properties fo:color="#000000" loext:opacity="100%" style:font-name="Monospace" fo:font-size="10pt" style:text-underline-style="solid" style:text-underline-width="auto" style:text-underline-color="font-color" style:font-size-asian="10pt"/>
    </style:style>
    <style:style style:name="T53" style:family="text">
      <style:text-properties fo:color="#000000" loext:opacity="100%" style:font-name="Arial" fo:font-size="10.5pt" fo:font-style="italic" style:text-underline-style="none" fo:font-weight="bold" officeooo:rsid="015b0b2d" style:font-name-asian="WenQuanYi Micro Hei" style:font-size-asian="14pt" style:font-style-asian="italic" style:font-weight-asian="bold" style:font-name-complex="Lohit Hindi2" style:font-size-complex="14pt" style:font-style-complex="italic" style:font-weight-complex="bold" style:text-overline-style="none" style:text-overline-color="font-color"/>
    </style:style>
    <style:style style:name="T54" style:family="text">
      <style:text-properties fo:color="#000000" loext:opacity="100%" officeooo:rsid="0156cb9f"/>
    </style:style>
    <style:style style:name="T55" style:family="text">
      <style:text-properties fo:color="#000000" loext:opacity="100%" officeooo:rsid="02915030"/>
    </style:style>
    <style:style style:name="T56" style:family="text">
      <style:text-properties fo:color="#000000" loext:opacity="100%" officeooo:rsid="02944c22"/>
    </style:style>
    <style:style style:name="T57" style:family="text">
      <style:text-properties fo:color="#000000" loext:opacity="100%" style:font-name="Droid Sans Mono1" fo:font-size="10.5pt" fo:font-style="normal" fo:font-weight="normal" officeooo:rsid="01c9a844" fo:background-color="#ffffff" loext:char-shading-value="0"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bold" officeooo:rsid="02f30735" style:font-name-asian="WenQuanYi Micro Hei" style:font-weight-asian="bold" style:font-name-complex="Lohit Hindi2" style:font-weight-complex="bold"/>
    </style:style>
    <style:style style:name="T60" style:family="text">
      <style:text-properties fo:font-weight="bold" officeooo:rsid="01911ccb" style:font-name-asian="WenQuanYi Micro Hei" style:font-weight-asian="bold" style:font-name-complex="Lohit Hindi2" style:font-weight-complex="bold"/>
    </style:style>
    <style:style style:name="T61" style:family="text">
      <style:text-properties fo:font-weight="bold" officeooo:rsid="01c5b334" style:font-name-asian="WenQuanYi Micro Hei" style:font-weight-asian="bold" style:font-name-complex="Lohit Hindi2" style:font-weight-complex="bold"/>
    </style:style>
    <style:style style:name="T62" style:family="text">
      <style:text-properties style:font-name="Times New Roman"/>
    </style:style>
    <style:style style:name="T63" style:family="text">
      <style:text-properties style:font-name="Times New Roman" fo:font-size="12pt" fo:font-weight="normal" style:font-name-asian="WenQuanYi Micro Hei" style:font-size-asian="12pt" style:font-weight-asian="normal" style:font-name-complex="Lohit Hindi2" style:font-size-complex="12pt" style:font-weight-complex="normal"/>
    </style:style>
    <style:style style:name="T64" style:family="text">
      <style:text-properties style:font-name="Times New Roman" fo:font-size="12pt" fo:font-weight="normal" officeooo:rsid="00e7c813" style:font-name-asian="WenQuanYi Micro Hei" style:font-size-asian="12pt" style:font-weight-asian="normal" style:font-name-complex="Lohit Hindi2" style:font-size-complex="12pt" style:font-weight-complex="normal"/>
    </style:style>
    <style:style style:name="T65" style:family="text">
      <style:text-properties style:font-name="Times New Roman" fo:font-size="12pt" fo:font-weight="normal" officeooo:rsid="01a9bf19" style:font-name-asian="WenQuanYi Micro Hei" style:font-size-asian="12pt" style:font-weight-asian="normal" style:font-name-complex="Lohit Hindi2" style:font-size-complex="12pt" style:font-weight-complex="normal"/>
    </style:style>
    <style:style style:name="T66" style:family="text">
      <style:text-properties style:font-name="Times New Roman" fo:font-size="12pt" style:text-underline-style="solid" style:text-underline-width="auto" style:text-underline-color="font-color" fo:font-weight="normal" style:font-name-asian="WenQuanYi Micro Hei" style:font-size-asian="12pt" style:font-weight-asian="normal" style:font-name-complex="Lohit Hindi2" style:font-size-complex="12pt" style:font-weight-complex="normal"/>
    </style:style>
    <style:style style:name="T67" style:family="text">
      <style:text-properties style:font-name="Times New Roman" fo:font-size="12pt" fo:font-style="normal" style:text-underline-style="none" fo:font-weight="normal" officeooo:rsid="01a91ebd" style:font-name-asian="WenQuanYi Micro Hei" style:font-size-asian="12pt" style:font-style-asian="normal" style:font-weight-asian="normal" style:font-name-complex="Lohit Hindi2" style:font-size-complex="12pt" style:font-style-complex="normal" style:font-weight-complex="normal"/>
    </style:style>
    <style:style style:name="T68" style:family="text">
      <style:text-properties style:font-name="Times New Roman" fo:font-size="12pt" fo:font-style="normal" style:text-underline-style="none" fo:font-weight="normal" officeooo:rsid="00e5cefd" style:font-name-asian="WenQuanYi Micro Hei" style:font-size-asian="12pt" style:font-style-asian="normal" style:font-weight-asian="normal" style:font-name-complex="Lohit Hindi2" style:font-size-complex="12pt" style:font-style-complex="normal" style:font-weight-complex="normal"/>
    </style:style>
    <style:style style:name="T69" style:family="text">
      <style:text-properties style:font-name="Times New Roman" fo:font-size="12pt" fo:font-style="normal" style:text-underline-style="solid" style:text-underline-width="auto" style:text-underline-color="font-color" fo:font-weight="normal" officeooo:rsid="00e5cefd" style:font-name-asian="WenQuanYi Micro Hei" style:font-size-asian="12pt" style:font-style-asian="normal" style:font-weight-asian="normal" style:font-name-complex="Lohit Hindi2" style:font-size-complex="12pt" style:font-style-complex="normal" style:font-weight-complex="normal"/>
    </style:style>
    <style:style style:name="T70" style:family="text">
      <style:text-properties style:font-name="Times New Roman" fo:font-size="11.8000001907349pt" fo:font-weight="bold" officeooo:rsid="00fc47ef" style:font-name-asian="WenQuanYi Micro Hei" style:font-size-asian="11.8000001907349pt" style:font-weight-asian="bold" style:font-name-complex="Lohit Hindi2" style:font-size-complex="11.8000001907349pt" style:font-weight-complex="bold"/>
    </style:style>
    <style:style style:name="T71" style:family="text">
      <style:text-properties style:font-name="Times New Roman" fo:font-size="11.8000001907349pt" fo:font-weight="normal" style:font-name-asian="WenQuanYi Micro Hei" style:font-size-asian="11.8000001907349pt" style:font-weight-asian="normal" style:font-name-complex="Lohit Hindi2" style:font-size-complex="11.8000001907349pt" style:font-weight-complex="normal"/>
    </style:style>
    <style:style style:name="T72" style:family="text">
      <style:text-properties style:font-name="Times New Roman" fo:font-size="11.8000001907349pt" fo:font-weight="normal" officeooo:rsid="00fc47ef" style:font-name-asian="WenQuanYi Micro Hei" style:font-size-asian="11.8000001907349pt" style:font-weight-asian="normal" style:font-name-complex="Lohit Hindi2" style:font-size-complex="11.8000001907349pt" style:font-weight-complex="normal"/>
    </style:style>
    <style:style style:name="T73" style:family="text">
      <style:text-properties style:font-name="Times New Roman" fo:font-size="11.8000001907349pt" fo:font-weight="normal" officeooo:rsid="010ef496" style:font-name-asian="WenQuanYi Micro Hei" style:font-size-asian="11.8000001907349pt" style:font-weight-asian="normal" style:font-name-complex="Lohit Hindi2" style:font-size-complex="11.8000001907349pt" style:font-weight-complex="normal"/>
    </style:style>
    <style:style style:name="T74" style:family="text">
      <style:text-properties style:font-name="Times New Roman" fo:font-size="11.8000001907349pt" fo:font-style="italic" fo:font-weight="bold" officeooo:rsid="00fc47ef" style:font-size-asian="11.8000001907349pt" style:font-style-asian="italic" style:font-weight-asian="bold" style:font-size-complex="11.8000001907349pt" style:font-style-complex="italic" style:font-weight-complex="bold"/>
    </style:style>
    <style:style style:name="T75" style:family="text">
      <style:text-properties style:font-name="Times New Roman" fo:font-size="11.8000001907349pt" style:text-underline-style="solid" style:text-underline-width="auto" style:text-underline-color="font-color" officeooo:rsid="01503b47" style:font-size-asian="11.8000001907349pt" style:font-size-complex="11.8000001907349pt"/>
    </style:style>
    <style:style style:name="T76" style:family="text">
      <style:text-properties style:font-name="Times New Roman" fo:font-size="11.8000001907349pt" style:text-underline-style="solid" style:text-underline-width="auto" style:text-underline-color="font-color" officeooo:rsid="0153c5a9" style:font-size-asian="11.8000001907349pt" style:font-size-complex="11.8000001907349pt"/>
    </style:style>
    <style:style style:name="T77" style:family="text">
      <style:text-properties style:font-name="Times New Roman" fo:font-size="11.8000001907349pt" style:text-underline-style="solid" style:text-underline-width="auto" style:text-underline-color="font-color" officeooo:rsid="01e8015f" style:font-size-asian="11.8000001907349pt" style:font-size-complex="11.8000001907349pt"/>
    </style:style>
    <style:style style:name="T78" style:family="text">
      <style:text-properties style:font-name="Times New Roman" fo:font-size="11.8000001907349pt" officeooo:rsid="00fc47ef" style:font-size-asian="11.8000001907349pt" style:font-size-complex="11.8000001907349pt"/>
    </style:style>
    <style:style style:name="T79" style:family="text">
      <style:text-properties style:font-name="Times New Roman" fo:font-size="11.8000001907349pt" officeooo:rsid="0208384c" style:font-size-asian="11.8000001907349pt" style:font-size-complex="11.8000001907349pt"/>
    </style:style>
    <style:style style:name="T80" style:family="text">
      <style:text-properties style:font-name="Times New Roman" fo:font-size="11.8000001907349pt" fo:font-style="normal" fo:font-weight="normal" officeooo:rsid="0208384c" style:font-size-asian="11.8000001907349pt" style:font-style-asian="normal" style:font-weight-asian="normal" style:font-size-complex="11.8000001907349pt" style:font-style-complex="normal" style:font-weight-complex="normal"/>
    </style:style>
    <style:style style:name="T81" style:family="text">
      <style:text-properties style:font-name="Times New Roman" officeooo:rsid="010be942"/>
    </style:style>
    <style:style style:name="T82" style:family="text">
      <style:text-properties style:font-name="Times New Roman" fo:font-style="italic" fo:font-weight="bold" style:font-style-asian="italic" style:font-weight-asian="bold" style:font-style-complex="italic" style:font-weight-complex="bold"/>
    </style:style>
    <style:style style:name="T83" style:family="text">
      <style:text-properties style:font-name="Times New Roman" fo:font-style="italic" fo:font-weight="bold" officeooo:rsid="010be942" style:font-style-asian="italic" style:font-weight-asian="bold" style:font-style-complex="italic" style:font-weight-complex="bold"/>
    </style:style>
    <style:style style:name="T84" style:family="text">
      <style:text-properties style:font-name="Times New Roman" officeooo:rsid="01ead6ea"/>
    </style:style>
    <style:style style:name="T85" style:family="text">
      <style:text-properties style:font-name="Times New Roman" officeooo:rsid="01fa69eb"/>
    </style:style>
    <style:style style:name="T86" style:family="text">
      <style:text-properties style:font-name="Times New Roman" officeooo:rsid="01fba039"/>
    </style:style>
    <style:style style:name="T87" style:family="text">
      <style:text-properties officeooo:rsid="0080df97"/>
    </style:style>
    <style:style style:name="T88" style:family="text">
      <style:text-properties officeooo:rsid="008a61ff"/>
    </style:style>
    <style:style style:name="T89" style:family="text">
      <style:text-properties officeooo:rsid="008b0c85"/>
    </style:style>
    <style:style style:name="T90" style:family="text">
      <style:text-properties officeooo:rsid="00c7c8d0"/>
    </style:style>
    <style:style style:name="T91" style:family="text">
      <style:text-properties fo:font-style="normal" style:font-style-asian="normal" style:font-style-complex="normal"/>
    </style:style>
    <style:style style:name="T92" style:family="text">
      <style:text-properties fo:font-style="normal" officeooo:rsid="00e5cefd" style:font-style-asian="normal" style:font-style-complex="normal"/>
    </style:style>
    <style:style style:name="T93" style:family="text">
      <style:text-properties fo:font-style="normal" officeooo:rsid="00e7c813" style:font-style-asian="normal" style:font-style-complex="normal"/>
    </style:style>
    <style:style style:name="T94" style:family="text">
      <style:text-properties fo:font-style="normal" officeooo:rsid="03049a1a" style:font-style-asian="normal" style:font-style-complex="normal"/>
    </style:style>
    <style:style style:name="T95" style:family="text">
      <style:text-properties style:font-name-asian="WenQuanYi Micro Hei" style:font-name-complex="Lohit Hindi2"/>
    </style:style>
    <style:style style:name="T96" style:family="text">
      <style:text-properties officeooo:rsid="00d21738" style:font-name-asian="WenQuanYi Micro Hei" style:font-name-complex="Lohit Hindi2"/>
    </style:style>
    <style:style style:name="T97" style:family="text">
      <style:text-properties officeooo:rsid="00d240a6" style:font-name-asian="WenQuanYi Micro Hei" style:font-name-complex="Lohit Hindi2"/>
    </style:style>
    <style:style style:name="T98" style:family="text">
      <style:text-properties officeooo:rsid="00e03516"/>
    </style:style>
    <style:style style:name="T99" style:family="text">
      <style:text-properties officeooo:rsid="00e41927"/>
    </style:style>
    <style:style style:name="T100" style:family="text">
      <style:text-properties officeooo:rsid="00e56bfd"/>
    </style:style>
    <style:style style:name="T101" style:family="text">
      <style:text-properties officeooo:rsid="00e5cefd"/>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120e97a"/>
    </style:style>
    <style:style style:name="T104" style:family="text">
      <style:text-properties officeooo:rsid="00ea8470"/>
    </style:style>
    <style:style style:name="T105" style:family="text">
      <style:text-properties officeooo:rsid="00f2b526"/>
    </style:style>
    <style:style style:name="T106" style:family="text">
      <style:text-properties style:font-name="Arial" fo:font-size="11.8000001907349pt" fo:font-weight="bold" officeooo:rsid="01030653" style:font-name-asian="WenQuanYi Micro Hei" style:font-size-asian="11.8000001907349pt" style:font-weight-asian="bold" style:font-name-complex="Lohit Hindi2" style:font-size-complex="11.8000001907349pt" style:font-weight-complex="bold"/>
    </style:style>
    <style:style style:name="T107" style:family="text">
      <style:text-properties style:font-name="Arial" fo:font-size="11.8000001907349pt" fo:font-weight="bold" officeooo:rsid="0106ea35" style:font-name-asian="WenQuanYi Micro Hei" style:font-size-asian="11.8000001907349pt" style:font-weight-asian="bold" style:font-name-complex="Lohit Hindi2" style:font-size-complex="11.8000001907349pt" style:font-weight-complex="bold"/>
    </style:style>
    <style:style style:name="T108" style:family="text">
      <style:text-properties style:font-name="Arial" fo:font-size="11.8000001907349pt" fo:font-weight="bold" officeooo:rsid="010efc1d" style:font-name-asian="WenQuanYi Micro Hei" style:font-size-asian="11.8000001907349pt" style:font-weight-asian="bold" style:font-name-complex="Lohit Hindi2" style:font-size-complex="11.8000001907349pt" style:font-weight-complex="bold"/>
    </style:style>
    <style:style style:name="T109" style:family="text">
      <style:text-properties style:font-name="Arial" fo:font-size="11.8000001907349pt" fo:font-weight="bold" officeooo:rsid="0109ee0f" style:font-name-asian="WenQuanYi Micro Hei" style:font-size-asian="11.8000001907349pt" style:font-weight-asian="bold" style:font-name-complex="Lohit Hindi2" style:font-size-complex="11.8000001907349pt" style:font-weight-complex="bold"/>
    </style:style>
    <style:style style:name="T110" style:family="text">
      <style:text-properties style:font-name="Arial" fo:font-size="11.8000001907349pt" fo:font-weight="bold" officeooo:rsid="01cb9b85" style:font-name-asian="WenQuanYi Micro Hei" style:font-size-asian="11.8000001907349pt" style:font-weight-asian="bold" style:font-name-complex="Lohit Hindi2" style:font-size-complex="11.8000001907349pt" style:font-weight-complex="bold"/>
    </style:style>
    <style:style style:name="T111" style:family="text">
      <style:text-properties style:font-name="Arial" fo:font-size="11.8000001907349pt" fo:font-style="italic" fo:font-weight="bold" officeooo:rsid="01eca848" style:font-name-asian="WenQuanYi Micro Hei" style:font-size-asian="11.8000001907349pt" style:font-style-asian="italic" style:font-weight-asian="bold" style:font-name-complex="Lohit Hindi2" style:font-size-complex="11.8000001907349pt" style:font-style-complex="italic" style:font-weight-complex="bold"/>
    </style:style>
    <style:style style:name="T112" style:family="text">
      <style:text-properties style:font-name="Arial" fo:font-weight="bold" officeooo:rsid="01030653" style:font-weight-asian="bold" style:font-weight-complex="bold"/>
    </style:style>
    <style:style style:name="T113" style:family="text">
      <style:text-properties style:font-name="Arial" fo:font-weight="bold" officeooo:rsid="0113287e" style:font-weight-asian="bold" style:font-weight-complex="bold"/>
    </style:style>
    <style:style style:name="T114" style:family="text">
      <style:text-properties style:font-name="Arial" fo:font-weight="bold" officeooo:rsid="016e4cfb" style:font-weight-asian="bold" style:font-weight-complex="bold"/>
    </style:style>
    <style:style style:name="T115" style:family="text">
      <style:text-properties style:font-name="Arial" fo:font-weight="bold" officeooo:rsid="01c7aa88" style:font-weight-asian="bold" style:font-weight-complex="bold"/>
    </style:style>
    <style:style style:name="T116" style:family="text">
      <style:text-properties style:font-name="Arial" fo:font-weight="bold" officeooo:rsid="01c8aba3" style:font-weight-asian="bold" style:font-weight-complex="bold"/>
    </style:style>
    <style:style style:name="T117" style:family="text">
      <style:text-properties style:font-name="Arial" fo:font-weight="bold" officeooo:rsid="020682c2" style:font-weight-asian="bold" style:font-weight-complex="bold"/>
    </style:style>
    <style:style style:name="T118" style:family="text">
      <style:text-properties style:font-name="Arial" fo:font-weight="bold" officeooo:rsid="024125b1" style:font-weight-asian="bold" style:font-weight-complex="bold"/>
    </style:style>
    <style:style style:name="T119" style:family="text">
      <style:text-properties style:font-name="Arial" fo:font-size="16.1000003814697pt" fo:font-weight="bold" officeooo:rsid="013a2b1b" style:font-name-asian="WenQuanYi Micro Hei" style:font-size-asian="16.1000003814697pt" style:font-weight-asian="bold" style:font-name-complex="Lohit Hindi2" style:font-size-complex="16.1000003814697pt" style:font-weight-complex="bold"/>
    </style:style>
    <style:style style:name="T120" style:family="text">
      <style:text-properties style:font-name="Arial" fo:font-size="16.1000003814697pt" fo:font-weight="bold" officeooo:rsid="01eca848" style:font-name-asian="WenQuanYi Micro Hei" style:font-size-asian="16.1000003814697pt" style:font-weight-asian="bold" style:font-name-complex="Lohit Hindi2" style:font-size-complex="16.1000003814697pt" style:font-weight-complex="bold"/>
    </style:style>
    <style:style style:name="T121" style:family="text">
      <style:text-properties style:font-name="Arial" fo:font-size="16.1000003814697pt" fo:font-weight="bold" officeooo:rsid="02008497" style:font-name-asian="WenQuanYi Micro Hei" style:font-size-asian="16.1000003814697pt" style:font-weight-asian="bold" style:font-name-complex="Lohit Hindi2" style:font-size-complex="16.1000003814697pt" style:font-weight-complex="bold"/>
    </style:style>
    <style:style style:name="T122" style:family="text">
      <style:text-properties style:font-name="Arial" fo:font-size="16.1000003814697pt" fo:font-weight="bold" officeooo:rsid="02297ca8" style:font-name-asian="WenQuanYi Micro Hei" style:font-size-asian="16.1000003814697pt" style:font-weight-asian="bold" style:font-name-complex="Lohit Hindi2" style:font-size-complex="16.1000003814697pt" style:font-weight-complex="bold"/>
    </style:style>
    <style:style style:name="T123" style:family="text">
      <style:text-properties style:font-name="Arial" fo:font-size="16.1000003814697pt" fo:font-style="italic" fo:font-weight="bold" officeooo:rsid="013a2b1b" style:font-name-asian="WenQuanYi Micro Hei" style:font-size-asian="16.1000003814697pt" style:font-style-asian="italic" style:font-weight-asian="bold" style:font-name-complex="Lohit Hindi2" style:font-size-complex="16.1000003814697pt" style:font-style-complex="italic" style:font-weight-complex="bold"/>
    </style:style>
    <style:style style:name="T124" style:family="text">
      <style:text-properties style:font-name="Arial" fo:font-style="italic" fo:font-weight="bold" officeooo:rsid="016f129f" style:font-style-asian="italic" style:font-weight-asian="bold" style:font-style-complex="italic" style:font-weight-complex="bold"/>
    </style:style>
    <style:style style:name="T125" style:family="text">
      <style:text-properties style:font-name="Arial" style:font-name-asian="WenQuanYi Micro Hei" style:font-name-complex="Lohit Hindi2"/>
    </style:style>
    <style:style style:name="T126" style:family="text">
      <style:text-properties officeooo:rsid="011c910b"/>
    </style:style>
    <style:style style:name="T127" style:family="text">
      <style:text-properties officeooo:rsid="011ba880"/>
    </style:style>
    <style:style style:name="T128" style:family="text">
      <style:text-properties officeooo:rsid="011ebf00"/>
    </style:style>
    <style:style style:name="T129" style:family="text">
      <style:text-properties officeooo:rsid="0120e97a"/>
    </style:style>
    <style:style style:name="T130" style:family="text">
      <style:text-properties officeooo:rsid="0129e4ac"/>
    </style:style>
    <style:style style:name="T131" style:family="text">
      <style:text-properties officeooo:rsid="01391e09"/>
    </style:style>
    <style:style style:name="T132" style:family="text">
      <style:text-properties fo:font-size="11.8999996185303pt" style:font-name-asian="WenQuanYi Micro Hei" style:font-size-asian="11.8999996185303pt" style:font-name-complex="Lohit Hindi2" style:font-size-complex="11.8999996185303pt"/>
    </style:style>
    <style:style style:name="T133" style:family="text">
      <style:text-properties fo:font-size="11.8999996185303pt" officeooo:rsid="01a3ac4f" style:font-name-asian="WenQuanYi Micro Hei" style:font-size-asian="11.8999996185303pt" style:font-name-complex="Lohit Hindi2" style:font-size-complex="11.8999996185303pt"/>
    </style:style>
    <style:style style:name="T134" style:family="text">
      <style:text-properties fo:font-size="11.8999996185303pt" officeooo:rsid="01a3e481" style:font-name-asian="WenQuanYi Micro Hei" style:font-size-asian="11.8999996185303pt" style:font-name-complex="Lohit Hindi2" style:font-size-complex="11.8999996185303pt"/>
    </style:style>
    <style:style style:name="T135" style:family="text">
      <style:text-properties fo:font-size="11.8999996185303pt" officeooo:rsid="01c31d8c" style:font-name-asian="WenQuanYi Micro Hei" style:font-size-asian="11.8999996185303pt" style:font-name-complex="Lohit Hindi2" style:font-size-complex="11.8999996185303pt"/>
    </style:style>
    <style:style style:name="T136" style:family="text">
      <style:text-properties fo:font-size="11.8999996185303pt" fo:font-style="italic" fo:font-weight="bold"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7" style:family="text">
      <style:text-properties fo:font-size="11.8999996185303pt" fo:font-style="italic" fo:font-weight="bold" officeooo:rsid="01a3e481"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8" style:family="text">
      <style:text-properties fo:font-size="11.8999996185303pt" fo:font-style="italic" fo:font-weight="bold" officeooo:rsid="01c31d8c"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9" style:family="text">
      <style:text-properties fo:font-size="11.8999996185303pt" fo:font-style="italic" fo:font-weight="bold" officeooo:rsid="01611fc4"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40" style:family="text">
      <style:text-properties fo:font-size="11.8999996185303pt" fo:font-weight="bold" style:font-name-asian="WenQuanYi Micro Hei" style:font-size-asian="11.8999996185303pt" style:font-weight-asian="bold" style:font-name-complex="Lohit Hindi2" style:font-size-complex="11.8999996185303pt" style:font-weight-complex="bold"/>
    </style:style>
    <style:style style:name="T141" style:family="text">
      <style:text-properties fo:font-size="11.8999996185303pt" fo:font-weight="bold" officeooo:rsid="015fbfae" style:font-name-asian="WenQuanYi Micro Hei" style:font-size-asian="11.8999996185303pt" style:font-weight-asian="bold" style:font-name-complex="Lohit Hindi2" style:font-size-complex="11.8999996185303pt" style:font-weight-complex="bold"/>
    </style:style>
    <style:style style:name="T142" style:family="text">
      <style:text-properties fo:font-size="11.8999996185303pt" fo:font-weight="bold" officeooo:rsid="01a3ac4f" style:font-name-asian="WenQuanYi Micro Hei" style:font-size-asian="11.8999996185303pt" style:font-weight-asian="bold" style:font-name-complex="Lohit Hindi2" style:font-size-complex="11.8999996185303pt" style:font-weight-complex="bold"/>
    </style:style>
    <style:style style:name="T143" style:family="text">
      <style:text-properties fo:font-size="11.8999996185303pt" fo:font-weight="normal" style:font-name-asian="WenQuanYi Micro Hei" style:font-size-asian="11.8999996185303pt" style:font-weight-asian="normal" style:font-name-complex="Lohit Hindi2" style:font-size-complex="11.8999996185303pt" style:font-weight-complex="normal"/>
    </style:style>
    <style:style style:name="T144" style:family="text">
      <style:text-properties fo:font-size="11.8999996185303pt" fo:font-weight="normal" officeooo:rsid="01a3ac4f" style:font-name-asian="WenQuanYi Micro Hei" style:font-size-asian="11.8999996185303pt" style:font-weight-asian="normal" style:font-name-complex="Lohit Hindi2" style:font-size-complex="11.8999996185303pt" style:font-weight-complex="normal"/>
    </style:style>
    <style:style style:name="T145" style:family="text">
      <style:text-properties fo:font-size="11.8999996185303pt" fo:font-style="normal" fo:font-weight="normal" officeooo:rsid="01a3e481"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146" style:family="text">
      <style:text-properties style:font-name="Monospace" fo:font-size="10pt" style:font-size-asian="10pt"/>
    </style:style>
    <style:style style:name="T147" style:family="text">
      <style:text-properties officeooo:rsid="014639d4"/>
    </style:style>
    <style:style style:name="T148" style:family="text">
      <style:text-properties officeooo:rsid="01477dd7"/>
    </style:style>
    <style:style style:name="T149" style:family="text">
      <style:text-properties officeooo:rsid="014dfe9f"/>
    </style:style>
    <style:style style:name="T150" style:family="text">
      <style:text-properties officeooo:rsid="0153c5a9"/>
    </style:style>
    <style:style style:name="T151" style:family="text">
      <style:text-properties officeooo:rsid="02915030"/>
    </style:style>
    <style:style style:name="T152" style:family="text">
      <style:text-properties officeooo:rsid="0233990a"/>
    </style:style>
    <style:style style:name="T153" style:family="text">
      <style:text-properties officeooo:rsid="018eee36"/>
    </style:style>
    <style:style style:name="T154" style:family="text">
      <style:text-properties officeooo:rsid="02ff2044"/>
    </style:style>
    <style:style style:name="T155" style:family="text">
      <style:text-properties officeooo:rsid="02f9d7fc"/>
    </style:style>
    <style:style style:name="T156" style:family="text">
      <style:text-properties officeooo:rsid="02fd9c6b"/>
    </style:style>
    <style:style style:name="T157" style:family="text">
      <style:text-properties officeooo:rsid="0302d63b"/>
    </style:style>
    <style:style style:name="T158" style:family="text">
      <style:text-properties officeooo:rsid="03049a1a"/>
    </style:style>
    <style:style style:name="T159" style:family="text">
      <style:text-properties officeooo:rsid="03055172"/>
    </style:style>
    <style:style style:name="T160" style:family="text">
      <style:text-properties officeooo:rsid="019f5228"/>
    </style:style>
    <style:style style:name="T161" style:family="text">
      <style:text-properties officeooo:rsid="01a12190"/>
    </style:style>
    <style:style style:name="T162" style:family="text">
      <style:text-properties officeooo:rsid="01a207d6"/>
    </style:style>
    <style:style style:name="T163" style:family="text">
      <style:text-properties officeooo:rsid="01a2fb20"/>
    </style:style>
    <style:style style:name="T164" style:family="text">
      <style:text-properties officeooo:rsid="01a5289e"/>
    </style:style>
    <style:style style:name="T165" style:family="text">
      <style:text-properties officeooo:rsid="01a5a56b"/>
    </style:style>
    <style:style style:name="T166" style:family="text">
      <style:text-properties officeooo:rsid="01a76de8"/>
    </style:style>
    <style:style style:name="T167" style:family="text">
      <style:text-properties officeooo:rsid="01a9bf19"/>
    </style:style>
    <style:style style:name="T168" style:family="text">
      <style:text-properties officeooo:rsid="01ae3332"/>
    </style:style>
    <style:style style:name="T169" style:family="text">
      <style:text-properties officeooo:rsid="01b05ab0"/>
    </style:style>
    <style:style style:name="T170" style:family="text">
      <style:text-properties officeooo:rsid="01b70140"/>
    </style:style>
    <style:style style:name="T171" style:family="text">
      <style:text-properties officeooo:rsid="01bb9aa0"/>
    </style:style>
    <style:style style:name="T172" style:family="text">
      <style:text-properties officeooo:rsid="01bc7022"/>
    </style:style>
    <style:style style:name="T173" style:family="text">
      <style:text-properties officeooo:rsid="01be0962"/>
    </style:style>
    <style:style style:name="T174" style:family="text">
      <style:text-properties officeooo:rsid="01bffca9"/>
    </style:style>
    <style:style style:name="T175" style:family="text">
      <style:text-properties officeooo:rsid="01c32816"/>
    </style:style>
    <style:style style:name="T176" style:family="text">
      <style:text-properties officeooo:rsid="01c9a844"/>
    </style:style>
    <style:style style:name="T177" style:family="text">
      <style:text-properties officeooo:rsid="01ca3856"/>
    </style:style>
    <style:style style:name="T178" style:family="text">
      <style:text-properties officeooo:rsid="01cb9b85"/>
    </style:style>
    <style:style style:name="T179" style:family="text">
      <style:text-properties officeooo:rsid="01cf08dc"/>
    </style:style>
    <style:style style:name="T180" style:family="text">
      <style:text-properties officeooo:rsid="01d17e32"/>
    </style:style>
    <style:style style:name="T181" style:family="text">
      <style:text-properties officeooo:rsid="01e2a873"/>
    </style:style>
    <style:style style:name="T182" style:family="text">
      <style:text-properties officeooo:rsid="01e8015f"/>
    </style:style>
    <style:style style:name="T183" style:family="text">
      <style:text-properties officeooo:rsid="01ead6ea"/>
    </style:style>
    <style:style style:name="T184" style:family="text">
      <style:text-properties officeooo:rsid="01eca848"/>
    </style:style>
    <style:style style:name="T185" style:family="text">
      <style:text-properties officeooo:rsid="01efaec7"/>
    </style:style>
    <style:style style:name="T186" style:family="text">
      <style:text-properties officeooo:rsid="0127d61b"/>
    </style:style>
    <style:style style:name="T187" style:family="text">
      <style:text-properties officeooo:rsid="020682c2"/>
    </style:style>
    <style:style style:name="T188" style:family="text">
      <style:text-properties officeooo:rsid="0207b6b7"/>
    </style:style>
    <style:style style:name="T189" style:family="text">
      <style:text-properties officeooo:rsid="020885bc"/>
    </style:style>
    <style:style style:name="T190" style:family="text">
      <style:text-properties officeooo:rsid="0209b58d"/>
    </style:style>
    <style:style style:name="T191" style:family="text">
      <style:text-properties fo:color="#0000ff" loext:opacity="100%"/>
    </style:style>
    <style:style style:name="T192" style:family="text">
      <style:text-properties fo:color="#0000ff" loext:opacity="100%" style:font-name="Droid Sans Mono" fo:font-size="10.5pt" fo:font-weight="normal" fo:background-color="#ffffff" loext:char-shading-value="0"/>
    </style:style>
    <style:style style:name="T193" style:family="text">
      <style:text-properties officeooo:rsid="020ed083"/>
    </style:style>
    <style:style style:name="T194" style:family="text">
      <style:text-properties officeooo:rsid="0210383e"/>
    </style:style>
    <style:style style:name="T195" style:family="text">
      <style:text-properties style:font-name="Liberation Mono" fo:font-size="10pt" fo:font-style="italic" fo:font-weight="bold" officeooo:rsid="0210383e" style:font-name-asian="Droid Sans Fallback" style:font-size-asian="10pt" style:font-style-asian="italic" style:font-weight-asian="normal" style:font-name-complex="Liberation Mono" style:font-size-complex="10pt" style:font-style-complex="italic" style:font-weight-complex="normal"/>
    </style:style>
    <style:style style:name="T196" style:family="text">
      <style:text-properties officeooo:rsid="0213d0cf"/>
    </style:style>
    <style:style style:name="T197" style:family="text">
      <style:text-properties officeooo:rsid="02164def"/>
    </style:style>
    <style:style style:name="T198" style:family="text">
      <style:text-properties officeooo:rsid="02166e74"/>
    </style:style>
    <style:style style:name="T199" style:family="text">
      <style:text-properties officeooo:rsid="0217a2c2"/>
    </style:style>
    <style:style style:name="T200" style:family="text">
      <style:text-properties officeooo:rsid="0218ccd7"/>
    </style:style>
    <style:style style:name="T201" style:family="text">
      <style:text-properties officeooo:rsid="021ad36f"/>
    </style:style>
    <style:style style:name="T202" style:family="text">
      <style:text-properties officeooo:rsid="021c9f4c"/>
    </style:style>
    <style:style style:name="T203" style:family="text">
      <style:text-properties officeooo:rsid="021d3d74"/>
    </style:style>
    <style:style style:name="T204" style:family="text">
      <style:text-properties fo:color="#b34a00" loext:opacity="100%"/>
    </style:style>
    <style:style style:name="T205" style:family="text">
      <style:text-properties fo:color="#0051c2" loext:opacity="100%"/>
    </style:style>
    <style:style style:name="T206" style:family="text">
      <style:text-properties fo:color="#0051c2" loext:opacity="100%" style:font-name="var font-mono" fo:background-color="transparent" loext:char-shading-value="0"/>
    </style:style>
    <style:style style:name="T207" style:family="text">
      <style:text-properties officeooo:rsid="02268a38"/>
    </style:style>
    <style:style style:name="T208" style:family="text">
      <style:text-properties officeooo:rsid="01c22379"/>
    </style:style>
    <style:style style:name="T209" style:family="text">
      <style:text-properties officeooo:rsid="02008497"/>
    </style:style>
    <style:style style:name="T210" style:family="text">
      <style:text-properties officeooo:rsid="01a49154"/>
    </style:style>
    <style:style style:name="T211" style:family="text">
      <style:text-properties officeooo:rsid="02046e19"/>
    </style:style>
    <style:style style:name="T212" style:family="text">
      <style:text-properties officeooo:rsid="01a6fd45"/>
    </style:style>
    <style:style style:name="T213" style:family="text">
      <style:text-properties officeooo:rsid="01e526c1"/>
    </style:style>
    <style:style style:name="T214" style:family="text">
      <style:text-properties officeooo:rsid="0207dd43"/>
    </style:style>
    <style:style style:name="T215" style:family="text">
      <style:text-properties officeooo:rsid="01e6888c"/>
    </style:style>
    <style:style style:name="T216" style:family="text">
      <style:text-properties officeooo:rsid="02297ca8"/>
    </style:style>
    <style:style style:name="T217" style:family="text">
      <style:text-properties fo:color="#14181f" loext:opacity="100%" style:font-name="var font-mono" fo:background-color="transparent" loext:char-shading-value="0"/>
    </style:style>
    <style:style style:name="T218" style:family="text">
      <style:text-properties fo:color="#14181f" loext:opacity="100%" fo:background-color="transparent" loext:char-shading-value="0"/>
    </style:style>
    <style:style style:name="T219" style:family="text">
      <style:text-properties fo:color="#8100c2" loext:opacity="100%" style:font-name="var font-mono" fo:background-color="transparent" loext:char-shading-value="0"/>
    </style:style>
    <style:style style:name="T220" style:family="text">
      <style:text-properties fo:color="#2b303b" loext:opacity="100%" style:font-name="var font-mono" fo:background-color="transparent" loext:char-shading-value="0"/>
    </style:style>
    <style:style style:name="T221" style:family="text">
      <style:text-properties fo:color="#008000" loext:opacity="100%"/>
    </style:style>
    <style:style style:name="T222" style:family="text">
      <style:text-properties fo:color="#008000" loext:opacity="100%" style:font-name="var font-mono" fo:background-color="transparent" loext:char-shading-value="0"/>
    </style:style>
    <style:style style:name="T223" style:family="text">
      <style:text-properties fo:color="#008080" loext:opacity="100%" style:font-name="var font-mono" fo:background-color="transparent" loext:char-shading-value="0"/>
    </style:style>
    <style:style style:name="T224" style:family="text">
      <style:text-properties fo:color="#6e7687" loext:opacity="100%" style:font-name="var font-mono" fo:background-color="transparent" loext:char-shading-value="0"/>
    </style:style>
    <style:style style:name="T225" style:family="text">
      <style:text-properties officeooo:rsid="022cfa05"/>
    </style:style>
    <style:style style:name="T226" style:family="text">
      <style:text-properties style:font-name="Times New Roman"/>
    </style:style>
    <style:style style:name="T227" style:family="text">
      <style:text-properties officeooo:rsid="02336ad8"/>
    </style:style>
    <style:style style:name="T228" style:family="text">
      <style:text-properties officeooo:rsid="02339bea"/>
    </style:style>
    <style:style style:name="T229" style:family="text">
      <style:text-properties officeooo:rsid="0234cc8b"/>
    </style:style>
    <style:style style:name="T230" style:family="text">
      <style:text-properties officeooo:rsid="024125b1"/>
    </style:style>
    <style:style style:name="T231" style:family="text">
      <style:text-properties officeooo:rsid="0243c1a2"/>
    </style:style>
    <style:style style:name="T232" style:family="text">
      <style:text-properties fo:color="#a31515" loext: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3">Cahier de TP <text:line-break/>« Confluent Developer Skills for Apache Kafka®<text:span text:style-name="T90"> </text:span>»</text:p>
      <text:p text:style-name="P55"/>
      <text:p text:style-name="P34">Pré-requis : </text:p>
      <text:list xml:id="list370897916" text:style-name="L1">
        <text:list-item>
          <text:p text:style-name="P124">Bonne connexion Internet </text:p>
        </text:list-item>
        <text:list-item>
          <text:p text:style-name="P125">Système d'exploitation recommandé : Linux, <text:span text:style-name="T189">32Go RAM</text:span></text:p>
        </text:list-item>
        <text:list-item>
          <text:p text:style-name="P126">JDK<text:span text:style-name="T160">2</text:span><text:span text:style-name="T131">1</text:span>+, <text:span text:style-name="T131">Maven</text:span></text:p>
        </text:list-item>
        <text:list-item>
          <text:p text:style-name="P127">IDE Recommandés : STS 4, IntelliJIDEA, VSCode</text:p>
        </text:list-item>
        <text:list-item>
          <text:p text:style-name="P128"><text:span text:style-name="T104">Docker, </text:span>Git</text:p>
        </text:list-item>
        <text:list-item>
          <text:p text:style-name="P148">Apache JMeter </text:p>
        </text:list-item>
        <text:list-item>
          <text:p text:style-name="P149">Python3 et pip</text:p>
        </text:list-item>
      </text:list>
      <text:p text:style-name="P76"/>
      <text:p text:style-name="P77">Images utilisées :</text:p>
      <text:list text:style-name="L2">
        <text:list-item>
          <text:p text:style-name="P130"><text:span text:style-name="T192">confluentinc/cp-server:7.7.8</text:span></text:p>
        </text:list-item>
        <text:list-item>
          <text:p text:style-name="P130"><text:span text:style-name="T192">docker.redpanda.com/redpandadata/console:v2.3.8</text:span></text:p>
        </text:list-item>
        <text:list-item>
          <text:p text:style-name="P130"><text:span text:style-name="T192">confluentinc/cp-schema-registry:7.7.8</text:span></text:p>
        </text:list-item>
        <text:list-item>
          <text:p text:style-name="P130">postgres:15.1</text:p>
        </text:list-item>
        <text:list-item>
          <text:p text:style-name="P130">dpage/pgadmin4</text:p>
        </text:list-item>
        <text:list-item>
          <text:p text:style-name="P129"><text:span text:style-name="T15">docker.elastic.co/elasticsearch/elasticsearch:</text:span><text:span text:style-name="T192">8.13.0</text:span></text:p>
        </text:list-item>
        <text:list-item>
          <text:p text:style-name="P129"><text:span text:style-name="T15">docker.elastic.co/kibana/kibana:</text:span><text:span text:style-name="T192">8.13.0</text:span></text:p>
        </text:list-item>
        <text:list-item>
          <text:p text:style-name="P129"><text:span text:style-name="T192">quay.io/keycloak/keycloak:26.1</text:span></text:p>
        </text:list-item>
      </text:list>
      <text:p text:style-name="P131"/>
      <text:list text:continue-list="list370897916" text:style-name="L1">
        <text:list-header>
          <text:p text:style-name="P133"/>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87"><text:a xlink:type="simple" xlink:href="#__RefHeading___Toc9766_3845367211" text:style-name="Index_20_Link" text:visited-style-name="Index_20_Link">Atelier 1: Le cluster kafka<text:tab/>3</text:a></text:p>
          <text:p text:style-name="P88"><text:a xlink:type="simple" xlink:href="#__RefHeading___Toc6515_2862341397" text:style-name="Index_20_Link" text:visited-style-name="Index_20_Link">1.1 Premier démarrage et logs<text:tab/>3</text:a></text:p>
          <text:p text:style-name="P88"><text:a xlink:type="simple" xlink:href="#__RefHeading___Toc9858_3845367211" text:style-name="Index_20_Link" text:visited-style-name="Index_20_Link">1.2 Utilisation des utilitaires<text:tab/>3</text:a></text:p>
          <text:p text:style-name="P88"><text:a xlink:type="simple" xlink:href="#__RefHeading___Toc9858_38453672111" text:style-name="Index_20_Link" text:visited-style-name="Index_20_Link">1.3 Outils graphiques<text:tab/>3</text:a></text:p>
          <text:p text:style-name="P87"><text:a xlink:type="simple" xlink:href="#__RefHeading___Toc9782_3845367211" text:style-name="Index_20_Link" text:visited-style-name="Index_20_Link">Atelier 2: Producer API (Java)<text:tab/>4</text:a></text:p>
          <text:p text:style-name="P87"><text:a xlink:type="simple" xlink:href="#__RefHeading___Toc4938_2024334449" text:style-name="Index_20_Link" text:visited-style-name="Index_20_Link">Atelier 2B : Producer via Confluent REST Proxy<text:tab/>5</text:a></text:p>
          <text:p text:style-name="P88"><text:a xlink:type="simple" xlink:href="#__RefHeading___Toc4940_2024334449" text:style-name="Index_20_Link" text:visited-style-name="Index_20_Link">2B.1 Démarrage de la stack<text:tab/>5</text:a></text:p>
          <text:p text:style-name="P88"><text:a xlink:type="simple" xlink:href="#__RefHeading___Toc4942_2024334449" text:style-name="Index_20_Link" text:visited-style-name="Index_20_Link">2B.2 Découverte du REST Proxy<text:tab/>5</text:a></text:p>
          <text:p text:style-name="P88"><text:a xlink:type="simple" xlink:href="#__RefHeading___Toc4944_2024334449" text:style-name="Index_20_Link" text:visited-style-name="Index_20_Link">2B.3 Prise en main du script JMeter<text:tab/>6</text:a></text:p>
          <text:p text:style-name="P88"><text:a xlink:type="simple" xlink:href="#__RefHeading___Toc4946_2024334449" text:style-name="Index_20_Link" text:visited-style-name="Index_20_Link">2B.4 Expérimentation des paramètres de fiabilité (acks)<text:tab/>7</text:a></text:p>
          <text:p text:style-name="P88"><text:a xlink:type="simple" xlink:href="#__RefHeading___Toc4948_2024334449" text:style-name="Index_20_Link" text:visited-style-name="Index_20_Link">2B.5 Expérimentation du batching (batch.size et linger.ms)<text:tab/>9</text:a></text:p>
          <text:p text:style-name="P88"><text:a xlink:type="simple" xlink:href="#__RefHeading___Toc4950_2024334449" text:style-name="Index_20_Link" text:visited-style-name="Index_20_Link">2B.6 Arrêt d’un borker durant ke test<text:tab/>10</text:a></text:p>
          <text:p text:style-name="P87"><text:a xlink:type="simple" xlink:href="#__RefHeading___Toc9784_3845367211" text:style-name="Index_20_Link" text:visited-style-name="Index_20_Link">Atelier 3 : Consumer API<text:tab/>11</text:a></text:p>
          <text:p text:style-name="P88"><text:a xlink:type="simple" xlink:href="#__RefHeading___Toc9786_38453672111" text:style-name="Index_20_Link" text:visited-style-name="Index_20_Link">3.0 Mise en place d’une base Postgres<text:tab/>11</text:a></text:p>
          <text:p text:style-name="P88"><text:a xlink:type="simple" xlink:href="#__RefHeading___Toc9786_3845367211" text:style-name="Index_20_Link" text:visited-style-name="Index_20_Link">3.1 Implémentation<text:tab/>11</text:a></text:p>
          <text:p text:style-name="P88"><text:a xlink:type="simple" xlink:href="#__RefHeading___Toc9788_3845367211" text:style-name="Index_20_Link" text:visited-style-name="Index_20_Link">3.2 Tests<text:tab/>12</text:a></text:p>
          <text:p text:style-name="P87"><text:a xlink:type="simple" xlink:href="#__RefHeading___Toc4952_2024334449" text:style-name="Index_20_Link" text:visited-style-name="Index_20_Link">Atelier 3B : Consumer via Confluent REST Proxy<text:tab/>13</text:a></text:p>
          <text:p text:style-name="P88"><text:a xlink:type="simple" xlink:href="#__RefHeading___Toc4954_2024334449" text:style-name="Index_20_Link" text:visited-style-name="Index_20_Link">3B.0 Mise en place de la base Postgres<text:tab/>13</text:a></text:p>
          <text:p text:style-name="P88"><text:a xlink:type="simple" xlink:href="#__RefHeading___Toc4956_2024334449" text:style-name="Index_20_Link" text:visited-style-name="Index_20_Link">3B.1 Découverte de l'API Consumer REST Proxy<text:tab/>13</text:a></text:p>
          <text:p text:style-name="P88"><text:a xlink:type="simple" xlink:href="#__RefHeading___Toc4968_2024334449" text:style-name="Index_20_Link" text:visited-style-name="Index_20_Link">3B.2 Script consumer Python fourni<text:tab/>14</text:a></text:p>
          <text:p text:style-name="P88"><text:a xlink:type="simple" xlink:href="#__RefHeading___Toc4976_2024334449" text:style-name="Index_20_Link" text:visited-style-name="Index_20_Link">3B.3 Tests de rééquilibrage<text:tab/>15</text:a></text:p>
          <text:p text:style-name="P88"><text:a xlink:type="simple" xlink:href="#__RefHeading___Toc4992_2024334449" text:style-name="Index_20_Link" text:visited-style-name="Index_20_Link">3B.4 Garanties de livraison<text:tab/>16</text:a></text:p>
          <text:p text:style-name="P88"><text:a xlink:type="simple" xlink:href="#__RefHeading___Toc5000_2024334449" text:style-name="Index_20_Link" text:visited-style-name="Index_20_Link">3B.5 Test de résilience broker<text:tab/>17</text:a></text:p>
          <text:p text:style-name="P87"><text:a xlink:type="simple" xlink:href="#__RefHeading___Toc9790_3845367211" text:style-name="Index_20_Link" text:visited-style-name="Index_20_Link">Atelier 4. Schema Registry et sérialisation Avro<text:tab/>18</text:a></text:p>
          <text:p text:style-name="P88"><text:a xlink:type="simple" xlink:href="#__RefHeading___Toc9792_3845367211" text:style-name="Index_20_Link" text:visited-style-name="Index_20_Link">4.1 Démarrage de Confuent Registry<text:tab/>18</text:a></text:p>
          <text:p text:style-name="P88"><text:a xlink:type="simple" xlink:href="#__RefHeading___Toc9794_3845367211" text:style-name="Index_20_Link" text:visited-style-name="Index_20_Link"><text:soft-page-break/>4.2 Producteur de message<text:tab/>18</text:a></text:p>
          <text:p text:style-name="P88"><text:a xlink:type="simple" xlink:href="#__RefHeading___Toc9796_3845367211" text:style-name="Index_20_Link" text:visited-style-name="Index_20_Link">4.3 Consommateur de message<text:tab/>18</text:a></text:p>
          <text:p text:style-name="P88"><text:a xlink:type="simple" xlink:href="#__RefHeading___Toc9798_38453672111" text:style-name="Index_20_Link" text:visited-style-name="Index_20_Link">4.4 Evolution du schéma compatible<text:tab/>19</text:a></text:p>
          <text:p text:style-name="P88"><text:a xlink:type="simple" xlink:href="#__RefHeading___Toc9798_38453672112" text:style-name="Index_20_Link" text:visited-style-name="Index_20_Link">4.5 Evolution du schéma incompatible<text:tab/>19</text:a></text:p>
          <text:p text:style-name="P87"><text:a xlink:type="simple" xlink:href="#__RefHeading___Toc9814_3845367211" text:style-name="Index_20_Link" text:visited-style-name="Index_20_Link">Atelier 5. Kafka Connect<text:tab/>20</text:a></text:p>
          <text:p text:style-name="P88"><text:a xlink:type="simple" xlink:href="#__RefHeading___Toc3462_866167920" text:style-name="Index_20_Link" text:visited-style-name="Index_20_Link">5.1 Installation du plugin ElasticSearch dans kafka connect<text:tab/>20</text:a></text:p>
          <text:p text:style-name="P88"><text:a xlink:type="simple" xlink:href="#__RefHeading___Toc3464_866167920" text:style-name="Index_20_Link" text:visited-style-name="Index_20_Link">5.2 Démarrage de la stack<text:tab/>20</text:a></text:p>
          <text:p text:style-name="P88"><text:a xlink:type="simple" xlink:href="#__RefHeading___Toc3466_866167920" text:style-name="Index_20_Link" text:visited-style-name="Index_20_Link">5.3 Configuration du connecteur<text:tab/>20</text:a></text:p>
          <text:p text:style-name="P88"><text:a xlink:type="simple" xlink:href="#__RefHeading___Toc3468_866167920" text:style-name="Index_20_Link" text:visited-style-name="Index_20_Link">5.3 Améliorations<text:tab/>21</text:a></text:p>
          <text:p text:style-name="P87"><text:a xlink:type="simple" xlink:href="#__RefHeading___Toc9822_3845367211" text:style-name="Index_20_Link" text:visited-style-name="Index_20_Link">Atelier 6 : EOS<text:tab/>22</text:a></text:p>
          <text:p text:style-name="P88"><text:a xlink:type="simple" xlink:href="#__RefHeading___Toc17798_2862341397" text:style-name="Index_20_Link" text:visited-style-name="Index_20_Link">6.1. Transaction et ISOLATION_LEVEL<text:tab/>22</text:a></text:p>
          <text:p text:style-name="P89"><text:a xlink:type="simple" xlink:href="#__RefHeading___Toc9895_3845367211" text:style-name="Index_20_Link" text:visited-style-name="Index_20_Link">6.1.1 Producteur transactionnel<text:tab/>22</text:a></text:p>
          <text:p text:style-name="P89"><text:a xlink:type="simple" xlink:href="#__RefHeading___Toc9897_3845367211" text:style-name="Index_20_Link" text:visited-style-name="Index_20_Link">6.1.2 Consommateur<text:tab/>22</text:a></text:p>
          <text:p text:style-name="P88"><text:a xlink:type="simple" xlink:href="#__RefHeading___Toc9899_3845367211" text:style-name="Index_20_Link" text:visited-style-name="Index_20_Link">6.2 Transfert Exactly Once<text:tab/>22</text:a></text:p>
          <text:p text:style-name="P88"><text:a xlink:type="simple" xlink:href="#__RefHeading___Toc7597_2982398481" text:style-name="Index_20_Link" text:visited-style-name="Index_20_Link">6.3 Stockage et rétention<text:tab/>22</text:a></text:p>
          <text:p text:style-name="P87"><text:a xlink:type="simple" xlink:href="#__RefHeading___Toc9820_3845367211" text:style-name="Index_20_Link" text:visited-style-name="Index_20_Link">Atelier 7 : Introduction à KafkaStream<text:tab/>23</text:a></text:p>
          <text:p text:style-name="P88"><text:a xlink:type="simple" xlink:href="#__RefHeading___Toc7611_2982398481" text:style-name="Index_20_Link" text:visited-style-name="Index_20_Link">7.1 Opérateurs stateless<text:tab/>23</text:a></text:p>
          <text:p text:style-name="P88"><text:a xlink:type="simple" xlink:href="#__RefHeading___Toc7613_2982398481" text:style-name="Index_20_Link" text:visited-style-name="Index_20_Link">7.2 Opérateurs stateful<text:tab/>23</text:a></text:p>
          <text:p text:style-name="P89"><text:a xlink:type="simple" xlink:href="#__RefHeading___Toc3470_866167920" text:style-name="Index_20_Link" text:visited-style-name="Index_20_Link">7.2.1 Count<text:tab/>23</text:a></text:p>
          <text:p text:style-name="P89"><text:a xlink:type="simple" xlink:href="#__RefHeading___Toc3472_866167920" text:style-name="Index_20_Link" text:visited-style-name="Index_20_Link">7.2.2 Aggregate<text:tab/>23</text:a></text:p>
          <text:p text:style-name="P87"><text:a xlink:type="simple" xlink:href="#__RefHeading___Toc15341_2024334449" text:style-name="Index_20_Link" text:visited-style-name="Index_20_Link">Atelier 8 : ksqlDB<text:tab/>24</text:a></text:p>
          <text:p text:style-name="P88"><text:a xlink:type="simple" xlink:href="#__RefHeading___Toc15343_2024334449" text:style-name="Index_20_Link" text:visited-style-name="Index_20_Link">8.0 Démarrage de la stack<text:tab/>24</text:a></text:p>
          <text:p text:style-name="P88"><text:a xlink:type="simple" xlink:href="#__RefHeading___Toc15345_2024334449" text:style-name="Index_20_Link" text:visited-style-name="Index_20_Link">8.1 Getting Started<text:tab/>24</text:a></text:p>
          <text:p text:style-name="P88"><text:a xlink:type="simple" xlink:href="#__RefHeading___Toc15351_2024334449" text:style-name="Index_20_Link" text:visited-style-name="Index_20_Link">8.2 Transformations et filtres<text:tab/>25</text:a></text:p>
          <text:p text:style-name="P88"><text:a xlink:type="simple" xlink:href="#__RefHeading___Toc15359_2024334449" text:style-name="Index_20_Link" text:visited-style-name="Index_20_Link">8.3 Requêtes<text:tab/>26</text:a></text:p>
          <text:p text:style-name="P88"><text:a xlink:type="simple" xlink:href="#__RefHeading___Toc15367_2024334449" text:style-name="Index_20_Link" text:visited-style-name="Index_20_Link">8.4 Pour aller plus loin (optionnel)<text:tab/>27</text:a></text:p>
          <text:p text:style-name="P87"><text:a xlink:type="simple" xlink:href="#__RefHeading___Toc9828_38453672111" text:style-name="Index_20_Link" text:visited-style-name="Index_20_Link">Ateliers 9: Sécurité<text:tab/>28</text:a></text:p>
          <text:p text:style-name="P88"><text:a xlink:type="simple" xlink:href="#__RefHeading___Toc9834_3845367211" text:style-name="Index_20_Link" text:visited-style-name="Index_20_Link">9.1 Mise en place de TLS<text:tab/>28</text:a></text:p>
          <text:p text:style-name="P88"><text:a xlink:type="simple" xlink:href="#__RefHeading___Toc9836_3845367211" text:style-name="Index_20_Link" text:visited-style-name="Index_20_Link">9.2 Authentification avec SASL/PLAIN<text:tab/>28</text:a></text:p>
          <text:p text:style-name="P89"><text:a xlink:type="simple" xlink:href="#__RefHeading___Toc14195_3893618287" text:style-name="Index_20_Link" text:visited-style-name="Index_20_Link">9.2.1 Authentification inter-broker<text:tab/>28</text:a></text:p>
          <text:p text:style-name="P89"><text:a xlink:type="simple" xlink:href="#__RefHeading___Toc14197_3893618287" text:style-name="Index_20_Link" text:visited-style-name="Index_20_Link">9.2.2 Authentification client<text:tab/>28</text:a></text:p>
          <text:p text:style-name="P88"><text:a xlink:type="simple" xlink:href="#__RefHeading___Toc9891_3845367211" text:style-name="Index_20_Link" text:visited-style-name="Index_20_Link">9.3 ACL<text:tab/>29</text:a></text:p>
          <text:p text:style-name="P88"><text:a xlink:type="simple" xlink:href="#__RefHeading___Toc7619_2982398481" text:style-name="Index_20_Link" text:visited-style-name="Index_20_Link">9.4 Quotas<text:tab/>29</text:a></text:p>
          <text:p text:style-name="P87"><text:a xlink:type="simple" xlink:href="#__RefHeading___Toc19194_2024334449" text:style-name="Index_20_Link" text:visited-style-name="Index_20_Link">Atelier 10 - Monitoring — Confluent Control Center<text:tab/>30</text:a></text:p>
          <text:p text:style-name="P88"><text:a xlink:type="simple" xlink:href="#__RefHeading___Toc19196_2024334449" text:style-name="Index_20_Link" text:visited-style-name="Index_20_Link">10.1 Explorer le cluster<text:tab/>30</text:a></text:p>
          <text:p text:style-name="P88"><text:a xlink:type="simple" xlink:href="#__RefHeading___Toc19198_2024334449" text:style-name="Index_20_Link" text:visited-style-name="Index_20_Link">10.2 Observer la production en temps réel<text:tab/>30</text:a></text:p>
          <text:p text:style-name="P88"><text:a xlink:type="simple" xlink:href="#__RefHeading___Toc19200_2024334449" text:style-name="Index_20_Link" text:visited-style-name="Index_20_Link">10.3 Observer le lag consommateur<text:tab/>31</text:a></text:p>
          <text:p text:style-name="P88"><text:a xlink:type="simple" xlink:href="#__RefHeading___Toc19202_2024334449" text:style-name="Index_20_Link" text:visited-style-name="Index_20_Link">10.4 Simuler une panne broker<text:tab/>31</text:a></text:p>
          <text:p text:style-name="P88"><text:a xlink:type="simple" xlink:href="#__RefHeading___Toc19204_2024334449" text:style-name="Index_20_Link" text:visited-style-name="Index_20_Link">10.5 Configurer une alerte<text:tab/>31</text:a></text:p>
        </text:index-body>
      </text:table-of-content>
      <text:h text:style-name="Heading_20_1" text:outline-level="1"/>
      <text:h text:style-name="P90" text:outline-level="1"/>
      <text:h text:style-name="P93" text:outline-level="1"><text:bookmark-start text:name="__RefHeading___Toc9766_3845367211"/><text:span text:style-name="T87">Atelier 1</text:span>: <text:span text:style-name="T161">Le</text:span><text:span text:style-name="T160"> cluster kafka</text:span><text:bookmark-end text:name="__RefHeading___Toc9766_3845367211"/></text:h>
      <text:p text:style-name="P2"/>
      <text:h text:style-name="Heading_20_2" text:outline-level="2"><text:bookmark-start text:name="__RefHeading___Toc6515_2862341397"/>1.1 Premier démarrage et logs<text:bookmark-end text:name="__RefHeading___Toc6515_2862341397"/></text:h>
      <text:p text:style-name="Text_20_body"><text:span text:style-name="T36">Visualiser le fichier </text:span><text:span text:style-name="T35">docker-compose.yml</text:span><text:span text:style-name="T53"> </text:span></text:p>
      <text:p text:style-name="P45">Il permet de démarrer un cluster 3 nœuds ainsi que 2 containers utiles pour l’administration du cluster</text:p>
      <text:p text:style-name="P45">Démarrer cette stack avec :</text:p>
      <text:p text:style-name="commande">docker compose up -d</text:p>
      <text:p text:style-name="P44"><text:span text:style-name="T161">O</text:span>bserver les logs de démarrages <text:span text:style-name="T161">d’un noeud</text:span></text:p>
      <text:p text:style-name="commande">docker logs -f kafka-<text:span text:style-name="T193">1</text:span></text:p>
      <text:p text:style-name="P50"/>
      <text:h text:style-name="Heading_20_2" text:outline-level="2"><text:bookmark-start text:name="__RefHeading___Toc9858_3845367211"/>1.2 Utilisation des utilitaires<text:bookmark-end text:name="__RefHeading___Toc9858_3845367211"/></text:h>
      <text:p text:style-name="P51"><text:span text:style-name="T91">Ouvrir un bash sur un des nœuds</text:span> </text:p>
      <text:p text:style-name="commande">docker exec -it kafka-<text:span text:style-name="T193">1</text:span> bash</text:p>
      <text:p text:style-name="P17"><text:span text:style-name="T95">Créer un topic </text:span><text:span text:style-name="T27">testing</text:span><text:span text:style-name="T96"> avec 5 partitions et 2 répliques :</text:span></text:p>
      <text:p text:style-name="P68"><text:span text:style-name="T16">kafka-topics --create --</text:span><text:span text:style-name="T17">bootstrap-server</text:span><text:span text:style-name="T16"> </text:span><text:span text:style-name="T18">kafka-1</text:span><text:span text:style-name="T16">:</text:span><text:span text:style-name="T17">9092</text:span><text:span text:style-name="T16"> --replication-factor 2 --partitions 5 --topic testing</text:span></text:p>
      <text:p text:style-name="P16">Lister les topics du cluster </text:p>
      <text:p text:style-name="P15">Accéder à la description détaillée du topic</text:p>
      <text:p text:style-name="P16">Démarrer un producteur de message</text:p>
      <text:p text:style-name="P186">kafka-console-producer --<text:span text:style-name="T186">bootstrap-server</text:span> <text:span text:style-name="T194">kafka-1</text:span>:9092 --topic testing --property "parse.key=true" --property "key.separator=:"</text:p>
      <text:p text:style-name="P19"><text:span text:style-name="T97">Saisir</text:span><text:span text:style-name="T95"> quelques messages</text:span></text:p>
      <text:p text:style-name="P14">Consommer les messages depuis le début</text:p>
      <text:p text:style-name="P264">kafka-console-consumer --bootstrap-server <text:span text:style-name="T195">kafka-1</text:span>:9092 --topic testing --from-beginning</text:p>
      <text:p text:style-name="P44">Dans une autre fenêtre, lister les groupes de consommateurs et accéder au détail du groupe de consommateur en lecture sur le topic <text:span text:style-name="T19">testing</text:span></text:p>
      <text:p text:style-name="P50"/>
      <text:h text:style-name="Heading_20_2" text:outline-level="2"><text:bookmark-start text:name="__RefHeading___Toc9858_38453672111"/>1.3 Outils graphiques<text:bookmark-end text:name="__RefHeading___Toc9858_38453672111"/></text:h>
      <text:p text:style-name="Text_20_body">Parcourir l’UI des 2 outils graphiques fournis :</text:p>
      <text:p text:style-name="Text_20_body"><text:span text:style-name="T19">Redpanda Console</text:span> : <text:a xlink:type="simple" xlink:href="http://localhost:9090/" text:style-name="Internet_20_link" text:visited-style-name="Visited_20_Internet_20_Link">http://localhost:9090</text:a></text:p>
      <text:p text:style-name="P187">Confluent UI Center : <text:a xlink:type="simple" xlink:href="http://localhost:9090/" text:style-name="Internet_20_link" text:visited-style-name="Visited_20_Internet_20_Link">http://localhost:902</text:a>1</text:p>
      <text:h text:style-name="P91" text:outline-level="1"/>
      <text:h text:style-name="P94" text:outline-level="1"><text:bookmark-start text:name="__RefHeading___Toc9782_3845367211"/><text:span text:style-name="T87">Atelier 2</text:span>: <text:span text:style-name="T98">Producer API </text:span><text:span text:style-name="T227">(Java)</text:span><text:bookmark-end text:name="__RefHeading___Toc9782_3845367211"/></text:h>
      <text:p text:style-name="P1"/>
      <text:p text:style-name="P38">Importer le projet Maven fourni</text:p>
      <text:p text:style-name="P38">Le projet est composé de :</text:p>
      <text:list xml:id="list4137473975" text:style-name="L3">
        <text:list-item>
          <text:p text:style-name="P166">Une classe principale <text:span text:style-name="T19">KafkaProducerApplication</text:span> qui prend en arguments :</text:p>
          <text:list>
            <text:list-item>
              <text:p text:style-name="P166"><text:span text:style-name="T19">nbThreads</text:span> : Un nombre de threads</text:p>
            </text:list-item>
            <text:list-item>
              <text:p text:style-name="P166"><text:span text:style-name="T19">nbMessages</text:span> : Un nombre de messages</text:p>
            </text:list-item>
            <text:list-item>
              <text:p text:style-name="P166"><text:span text:style-name="T19">sleep</text:span> : Un temps de pause <text:span text:style-name="T179">en ms</text:span></text:p>
            </text:list-item>
            <text:list-item>
              <text:p text:style-name="P166"><text:span text:style-name="T19">sendMode</text:span> : Le mode d’envoi : 0 pour Fire_And_Forget, 1 pour Synchrone, 2 pour Asynchrone</text:p>
              <text:p text:style-name="P166">L’application instancie <text:span text:style-name="T1">nbThreads</text:span> <text:span text:style-name="T1">KafkaProducerThread</text:span> et leur demande de s’exécuter ; quand toutes les threads sont terminées. Elle affiche le temps d’exécution</text:p>
            </text:list-item>
          </text:list>
        </text:list-item>
      </text:list>
      <text:list text:style-name="L4">
        <text:list-item>
          <text:p text:style-name="P168"><text:span text:style-name="T98">Une classe </text:span><text:span text:style-name="T20">KafkaProducerThread</text:span><text:span text:style-name="T98"> qui une fois instanciée envoie </text:span><text:span text:style-name="T2">nbMessages</text:span><text:span text:style-name="T98"> tout les temps de pause selon un des 3 modes d’envoi. <text:line-break/>Les messages sont constitués d‘une au format String (</text:span><text:span text:style-name="T2">courier.id</text:span><text:span text:style-name="T98">) et d’une payload au format JSON (classe </text:span><text:span text:style-name="T2">Courier</text:span><text:span text:style-name="T3">)</text:span></text:p>
        </text:list-item>
        <text:list-item>
          <text:p text:style-name="P169">Le package <text:span text:style-name="T19">model</text:span> contient les classes modélisant les données</text:p>
          <text:list>
            <text:list-item>
              <text:p text:style-name="P169"><text:span text:style-name="T19">Position</text:span> : Une position en latitude, longitude</text:p>
            </text:list-item>
            <text:list-item>
              <text:p text:style-name="P169"><text:span text:style-name="T19">Courier</text:span> : Un coursier associé à une position</text:p>
            </text:list-item>
            <text:list-item>
              <text:p text:style-name="P169"><text:span text:style-name="T19">SendMode</text:span> : Une énumération des modes d’envoi</text:p>
            </text:list-item>
          </text:list>
        </text:list-item>
      </text:list>
      <text:p text:style-name="P6"/>
      <text:p text:style-name="P40">Compléter les méthodes d’envoi de <text:span text:style-name="T1">KafkaProducerThread</text:span>.</text:p>
      <text:p text:style-name="P43">Pour cela vous devez :</text:p>
      <text:list text:style-name="L5">
        <text:list-item>
          <text:p text:style-name="P173">Initialiser un <text:span text:style-name="T32">KafkaProducer&lt;String,Courier&gt;</text:span><text:span text:style-name="T29"> et y positionner des sérialiseurs JSON pour la classe </text:span><text:span text:style-name="T32">Courier</text:span></text:p>
        </text:list-item>
        <text:list-item>
          <text:p text:style-name="P174"><text:span text:style-name="T28">Construire un </text:span><text:span text:style-name="T46">ProducerRecord</text:span><text:span text:style-name="T28"> pour chaque messages</text:span></text:p>
        </text:list-item>
        <text:list-item>
          <text:p text:style-name="P178">Implémenter les 3 méthodes d’envoi</text:p>
        </text:list-item>
      </text:list>
      <text:p text:style-name="P3"/>
      <text:p text:style-name="P4">Tester l’envoi de messages dans les différents dans l’IDE</text:p>
      <text:p text:style-name="P9">Via les commandes utilitaires <text:span text:style-name="T162">ou l’interface d’admin</text:span>, vérifier la création du topic et <text:span text:style-name="T162">le contenu des </text:span>messages</text:p>
      <text:p text:style-name="P9"/>
      <text:p text:style-name="P11">Construire un jar exécutable avec : </text:p>
      <text:p text:style-name="commande">mvn package</text:p>
      <text:p text:style-name="P41"><text:span text:style-name="T91">Supprimer le topic et le recréer avec un nombre de </text:span><text:span text:style-name="T1">partitions=5</text:span><text:span text:style-name="T91"> et un </text:span><text:span text:style-name="T1">replication-factor=</text:span><text:span text:style-name="T10">3</text:span></text:p>
      <text:p text:style-name="P12">Envoyer <text:span text:style-name="T162">1M </text:span>de messages, <text:span text:style-name="T163">par exemple :</text:span></text:p>
      <text:p text:style-name="commande">java -jar target/producer-0.0.1-SNAPSHOT-jar-with-dependencies.jar 500 2000 10 1</text:p>
      <text:p text:style-name="P5"/>
      <text:h text:style-name="P95" text:outline-level="1"><text:bookmark-start text:name="__RefHeading___Toc4938_2024334449"/><text:soft-page-break/>Atelier 2<text:span text:style-name="T227">B</text:span> : Producer via Confluent REST Proxy<text:bookmark-end text:name="__RefHeading___Toc4938_2024334449"/></text:h>
      <text:p text:style-name="P188"/>
      <text:p text:style-name="P189">Objectifs</text:p>
      <text:list text:style-name="L20">
        <text:list-item>
          <text:p text:style-name="P193">Comprendre le rôle du Confluent REST Proxy comme passerelle HTTP → Kafka</text:p>
        </text:list-item>
        <text:list-item>
          <text:p text:style-name="P193">Envoyer des messages de positions de coursiers via des requêtes HTTP POST</text:p>
        </text:list-item>
        <text:list-item>
          <text:p text:style-name="P193">Observer l'impact des paramètres producer (acks, batch.size, linger.ms) sur les performances et la fiabilité</text:p>
        </text:list-item>
        <text:list-item>
          <text:p text:style-name="P193">Utiliser JMeter pour simuler plusieurs coursiers en parallèle et faire varier la charge</text:p>
        </text:list-item>
      </text:list>
      <text:p text:style-name="P188"/>
      <text:p text:style-name="P189">Contexte</text:p>
      <text:p text:style-name="P188">Dans cet atelier, le rôle du client Kafka est joué par un outil de test de charge HTTP (Apache JMeter).</text:p>
      <text:p text:style-name="P188">Chaque thread JMeter simule un coursier envoyant des positions GPS au topic `position` via le REST Proxy.</text:p>
      <text:p text:style-name="P188">Le REST Proxy traduit chaque requête HTTP POST en un message Kafka Producer, en appliquant les paramètres de configuration que vous passerez dans les headers HTTP.</text:p>
      <text:p text:style-name="P188"/>
      <text:p text:style-name="P188">Le scénario métier est identique à l'atelier précédent : des coursiers envoient régulièrement leur position.</text:p>
      <text:p text:style-name="P188"/>
      <text:h text:style-name="Heading_20_2" text:outline-level="2"><text:bookmark-start text:name="__RefHeading___Toc4940_2024334449"/>2<text:span text:style-name="T196">B</text:span>.<text:span text:style-name="T196">1</text:span> Démarrage de la stack<text:bookmark-end text:name="__RefHeading___Toc4940_2024334449"/></text:h>
      <text:p text:style-name="P188"/>
      <text:p text:style-name="P188">Un fichier `docker-compose.yml` vous est fourni. Il étend le cluster 3 nœuds existant avec :</text:p>
      <text:p text:style-name="P188">- **Confluent REST Proxy** (port 8082) : la passerelle HTTP → Kafka</text:p>
      <text:p text:style-name="P188">- **Redpanda Console** reste disponible sur http://localhost:9090</text:p>
      <text:p text:style-name="P188"/>
      <text:p text:style-name="P188">Démarrer la stack complète :</text:p>
      <text:p text:style-name="commande">docker compose up -d</text:p>
      <text:p text:style-name="P188"/>
      <text:p text:style-name="P188">Vérifier que le REST Proxy est opérationnel :</text:p>
      <text:p text:style-name="commande">curl http://localhost:8082/topics</text:p>
      <text:p text:style-name="P188">Vous devez obtenir la liste des topics existants au format JSON.</text:p>
      <text:p text:style-name="P188"/>
      <text:h text:style-name="Heading_20_2" text:outline-level="2"><text:bookmark-start text:name="__RefHeading___Toc4942_2024334449"/>2<text:span text:style-name="T196">B</text:span>.<text:span text:style-name="T196">2</text:span> Découverte du REST Proxy<text:bookmark-end text:name="__RefHeading___Toc4942_2024334449"/></text:h>
      <text:p text:style-name="P194">Récupérer l’ID du cluster</text:p>
      <text:p text:style-name="P265">curl http://localhost:8082/<text:span text:style-name="T197">v3/clusters</text:span></text:p>
      <text:p text:style-name="P188"><text:soft-page-break/>Créer le topic `position` avec 5 partitions et un replication-factor de 3 via le REST Proxy :</text:p>
      <text:p text:style-name="P188"/>
      <text:p text:style-name="commande">curl -X POST http://localhost:8082/<text:span text:style-name="T199">v3/</text:span><text:span text:style-name="T200">clusters/</text:span><text:span text:style-name="T198">[</text:span><text:span text:style-name="T13">clusterId]</text:span><text:span text:style-name="T198">/</text:span>topics \</text:p>
      <text:p text:style-name="commande"><text:s text:c="2"/>-H "Content-Type: application/json" \</text:p>
      <text:p text:style-name="commande"><text:s text:c="2"/>-d '{</text:p>
      <text:p text:style-name="commande"><text:s text:c="4"/>"topic_name": "position",</text:p>
      <text:p text:style-name="commande"><text:s text:c="4"/>"partitions_count": 5,</text:p>
      <text:p text:style-name="commande"><text:s text:c="4"/>"replication_factor": 3</text:p>
      <text:p text:style-name="commande"><text:s text:c="2"/>}'</text:p>
      <text:p text:style-name="P188"/>
      <text:p text:style-name="P188"/>
      <text:p text:style-name="P188">Envoyer un message de test à la main pour valider la chaîne :</text:p>
      <text:p text:style-name="commande">curl -X POST http://localhost:8082/topics/position \</text:p>
      <text:p text:style-name="commande"><text:s text:c="2"/>-H "Content-Type: application/vnd.kafka.json.v2+json" \</text:p>
      <text:p text:style-name="commande"><text:s text:c="2"/>-d '{</text:p>
      <text:p text:style-name="commande"><text:s text:c="4"/>"records": [</text:p>
      <text:p text:style-name="commande"><text:s text:c="6"/>{</text:p>
      <text:p text:style-name="commande"><text:s text:c="8"/>"key": "courier-1",</text:p>
      <text:p text:style-name="commande"><text:s text:c="8"/>"value": {</text:p>
      <text:p text:style-name="commande"><text:s text:c="10"/>"courierId": "courier-1",</text:p>
      <text:p text:style-name="commande"><text:s text:c="10"/>"latitude": 48.8566,</text:p>
      <text:p text:style-name="commande"><text:s text:c="10"/>"longitude": 2.3522</text:p>
      <text:p text:style-name="commande"><text:s text:c="8"/>}</text:p>
      <text:p text:style-name="commande"><text:s text:c="6"/>}</text:p>
      <text:p text:style-name="commande"><text:s text:c="4"/>]</text:p>
      <text:p text:style-name="commande"><text:s text:c="2"/>}'</text:p>
      <text:p text:style-name="commande"/>
      <text:p text:style-name="P188"/>
      <text:p text:style-name="P188">Observer dans Redpanda Console (http://localhost:9090) la création du topic et la réception du message.</text:p>
      <text:p text:style-name="P188"/>
      <text:p text:style-name="P188">Identifier dans la réponse HTTP : l'offset, la partition et le topic de destination.</text:p>
      <text:p text:style-name="P188"/>
      <text:h text:style-name="Heading_20_2" text:outline-level="2"><text:bookmark-start text:name="__RefHeading___Toc4944_2024334449"/>2<text:span text:style-name="T196">B</text:span>.<text:span text:style-name="T228">3</text:span> Prise en main du script JMeter<text:bookmark-end text:name="__RefHeading___Toc4944_2024334449"/></text:h>
      <text:p text:style-name="P188"/>
      <text:p text:style-name="P188">Un script JMeter `<text:span text:style-name="T19">kafka-rest-proxy.jmx</text:span>` vous est fourni.</text:p>
      <text:p text:style-name="P188"><text:soft-page-break/></text:p>
      <text:p text:style-name="P188">Lancer JMeter en mode graphique :</text:p>
      <text:p text:style-name="P188"/>
      <text:p text:style-name="commande">jmeter -t kafka-rest-proxy.jmx</text:p>
      <text:p text:style-name="P188"/>
      <text:p text:style-name="P188">Le script est organisé ainsi :</text:p>
      <text:p text:style-name="P188">- **Thread Group** : simule les coursiers (1 thread = 1 coursier)</text:p>
      <text:p text:style-name="P188">- **HTTP Request** : envoie un POST vers `http://localhost:8082/topics/position`</text:p>
      <text:p text:style-name="P188">- **HTTP Header Manager** : configure le `Content-Type` et les headers Kafka (`X-Kafka-acks`, etc.)</text:p>
      <text:p text:style-name="P188">- **JSR223 PreProcessor** : génère dynamiquement le payload JSON avec des coordonnées aléatoires et l'ID du coursier</text:p>
      <text:p text:style-name="P188">- **Aggregate Report** : mesure les temps de réponse et le débit (throughput)</text:p>
      <text:p text:style-name="P188">- **Response Assertion** : vérifie que chaque requête retourne un HTTP 200</text:p>
      <text:p text:style-name="P188"/>
      <text:p text:style-name="P189">Paramètres utilisateur (User Defined Variables)</text:p>
      <text:p text:style-name="P188"/>
      <text:p text:style-name="P188">En haut du plan de test, vous trouverez les variables suivantes, modifiables sans toucher au script :</text:p>
      <text:p text:style-name="P188"/>
      <text:list text:style-name="L21">
        <text:list-item>
          <text:p text:style-name="P195">NB_COURSIERS : Nombre de threads (coursiers simultanés) <text:span text:style-name="T201">(</text:span> 5 <text:span text:style-name="T201">)</text:span></text:p>
        </text:list-item>
        <text:list-item>
          <text:p text:style-name="P195">NB_MESSAGES : Nombre de messages par coursier <text:span text:style-name="T201">(</text:span> 100 <text:span text:style-name="T201">)</text:span></text:p>
        </text:list-item>
        <text:list-item>
          <text:p text:style-name="P195">PAUSE_MS : Temps de pause entre deux messages (ms) <text:span text:style-name="T201">(</text:span> 500 <text:span text:style-name="T201">)</text:span></text:p>
        </text:list-item>
        <text:list-item>
          <text:p text:style-name="P195">ACKS :Niveau de garantie : 0, 1 ou -<text:span text:style-name="T201">1</text:span> <text:span text:style-name="T201">(</text:span> -1 <text:span text:style-name="T201">)</text:span></text:p>
        </text:list-item>
        <text:list-item>
          <text:p text:style-name="P195">BATCH_SIZE :Taille du batch en octets | 16384 |</text:p>
        </text:list-item>
        <text:list-item>
          <text:p text:style-name="P195">LINGER_MS : <text:s/>Délai de batching (ms) | 0 |</text:p>
        </text:list-item>
      </text:list>
      <text:p text:style-name="P188"/>
      <text:p text:style-name="P189">Premier test</text:p>
      <text:p text:style-name="P188"/>
      <text:p text:style-name="P188">Lancer le script avec les valeurs par défaut, observer dans Aggregate Report :</text:p>
      <text:p text:style-name="P188">- Le throughput (messages/s)</text:p>
      <text:p text:style-name="P188">- Les temps de réponse moyen, médian et P99</text:p>
      <text:p text:style-name="P188"/>
      <text:p text:style-name="P188"/>
      <text:h text:style-name="Heading_20_2" text:outline-level="2"><text:bookmark-start text:name="__RefHeading___Toc4946_2024334449"/>2B.<text:span text:style-name="T228">4</text:span> Expérimentation des paramètres de fiabilité (acks)<text:bookmark-end text:name="__RefHeading___Toc4946_2024334449"/></text:h>
      <text:p text:style-name="P188"/>
      <text:p text:style-name="P189">Objectif</text:p>
      <text:p text:style-name="P188"><text:soft-page-break/></text:p>
      <text:p text:style-name="P188">Mesurer l'impact du paramètre `acks` sur le débit et les temps de réponse.</text:p>
      <text:p text:style-name="P188"/>
      <text:p text:style-name="P188">Configuration</text:p>
      <text:p text:style-name="P188"/>
      <text:p text:style-name="P188">Fixer les variables communes pour avoir un test suffisamment long et stable :</text:p>
      <text:p text:style-name="P188">- `NB_COUR<text:span text:style-name="T201">S</text:span>IERS` = 10<text:span text:style-name="T201">0</text:span></text:p>
      <text:p text:style-name="P188">- `NB_MESSAGES` = 50<text:span text:style-name="T201">00</text:span></text:p>
      <text:p text:style-name="P188">- `PAUSE_MS` = 0 (envoi en rafale pour stresser)</text:p>
      <text:p text:style-name="P188"/>
      <text:p text:style-name="P188">Tests à effectuer</text:p>
      <text:p text:style-name="P188"/>
      <text:p text:style-name="P188">Exécuter 3 fois le test en changeant uniquement `ACKS` :</text:p>
      <text:p text:style-name="P188"/>
      <text:p text:style-name="P196">Test A — acks=0 (Fire and Forget)</text:p>
      <text:p text:style-name="P188">- Aucun acquittement attendu</text:p>
      <text:p text:style-name="P188">- Risque de perte de messages</text:p>
      <text:p text:style-name="P188"/>
      <text:p text:style-name="P188"><text:span text:style-name="T58">Test B — acks=1 (Leader ACK)</text:span></text:p>
      <text:p text:style-name="P188">- Seul le broker leader acquitte</text:p>
      <text:p text:style-name="P188">- Compromis performance/fiabilité</text:p>
      <text:p text:style-name="P188"/>
      <text:p text:style-name="P196">Test C — acks=all (Full Durability)</text:p>
      <text:p text:style-name="P188">- Tous les réplicas ISR acquittent</text:p>
      <text:p text:style-name="P188">- Garantie maximale</text:p>
      <text:p text:style-name="P188"/>
      <text:p text:style-name="P189">Observations</text:p>
      <text:p text:style-name="P188"/>
      <text:p text:style-name="P188">Pour chaque test, noter dans un tableau :</text:p>
      <text:p text:style-name="P188">- Throughput (msg/s)</text:p>
      <text:p text:style-name="P188">- Temps de réponse moyen</text:p>
      <text:p text:style-name="P188"/>
      <text:p text:style-name="P188">Vérifier dans Redpanda Console le nombre de messages effectivement reçus dans le topic.</text:p>
      <text:p text:style-name="P188">Avec `acks=0`, observer s'il y a des messages manquants sous charge.</text:p>
      <text:p text:style-name="P188"/>
      <text:h text:style-name="Heading_20_2" text:outline-level="2"><text:bookmark-start text:name="__RefHeading___Toc4948_2024334449"/><text:soft-page-break/>2<text:span text:style-name="T201">B</text:span>.<text:span text:style-name="T228">5</text:span> Expérimentation du batching (batch.size et linger.ms)<text:bookmark-end text:name="__RefHeading___Toc4948_2024334449"/></text:h>
      <text:p text:style-name="P188"/>
      <text:p text:style-name="P189">Objectif</text:p>
      <text:p text:style-name="P188"/>
      <text:p text:style-name="P188">Comprendre comment le batching améliore le débit en regroupant les messages avant envoi.</text:p>
      <text:p text:style-name="P188"/>
      <text:p text:style-name="P189">Rappel</text:p>
      <text:p text:style-name="P188"/>
      <text:p text:style-name="P188">- `<text:span text:style-name="T19">batch.size</text:span>` : taille maximum d'un batch en octets. Si le batch est plein, il est envoyé immédiatement.</text:p>
      <text:p text:style-name="P188">- `<text:span text:style-name="T19">linger.ms</text:span>` : temps d'attente maximum avant d'envoyer un batch même s'il n'est pas plein. Augmenter cette valeur laisse le temps au batch de se remplir.</text:p>
      <text:p text:style-name="P188"/>
      <text:p text:style-name="P188">Ces deux paramètres interagissent : un batch est envoyé dès que `batch.size` est atteint ou que `linger.ms` est écoulé.</text:p>
      <text:p text:style-name="P188"/>
      <text:p text:style-name="P189">Configuration commune</text:p>
      <text:p text:style-name="P188"/>
      <text:p text:style-name="P188">- `NB_COUR<text:span text:style-name="T202">S</text:span>IERS` = <text:span text:style-name="T202">100</text:span></text:p>
      <text:p text:style-name="P188">- `NB_MESSAGES` = <text:span text:style-name="T202">5</text:span>000</text:p>
      <text:p text:style-name="P188">- `PAUSE_MS` = 0</text:p>
      <text:p text:style-name="P188">- `ACKS` = 1</text:p>
      <text:p text:style-name="P188"/>
      <text:p text:style-name="P189"><text:span text:style-name="T202">T</text:span>ests à effectuer</text:p>
      <text:p text:style-name="P188"/>
      <text:p text:style-name="P196">Test 1 — Configuration par défaut</text:p>
      <text:p text:style-name="P188">- `BATCH_SIZE` = 16384</text:p>
      <text:p text:style-name="P188">- `LINGER_MS` = 0</text:p>
      <text:p text:style-name="P188"/>
      <text:p text:style-name="P188"><text:span text:style-name="T58">Test 2 — Linger augmenté</text:span></text:p>
      <text:p text:style-name="P188">- `BATCH_SIZE` = 16384</text:p>
      <text:p text:style-name="P188">- `LINGER_MS` = 20</text:p>
      <text:p text:style-name="P188"/>
      <text:p text:style-name="P196">Test 3 — Batch et linger augmentés</text:p>
      <text:p text:style-name="P188">- `BATCH_SIZE` = 65536</text:p>
      <text:p text:style-name="P188">- `LINGER_MS` = 20</text:p>
      <text:p text:style-name="P188"/>
      <text:p text:style-name="P188"><text:soft-page-break/>**Test 4 — Grand batch, fort linger**</text:p>
      <text:p text:style-name="P188">- `BATCH_SIZE` = 131072</text:p>
      <text:p text:style-name="P188">- `LINGER_MS` = 50</text:p>
      <text:p text:style-name="P188"/>
      <text:p text:style-name="P189">Observations</text:p>
      <text:p text:style-name="P188"/>
      <text:p text:style-name="P188">JMeter envoie les requêtes HTTP une par une. Il ne voit pas si le proxy les regroupe en un seul batch avant de les envoyer à Kafka. La latence HTTP individuelle peut même <text:span text:style-name="Strong_20_Emphasis">augmenter</text:span> avec <text:span text:style-name="Source_20_Text">linger.ms</text:span> élevé (le proxy attend avant d'envoyer) alors que le débit global côté Kafka s'améliore.</text:p>
      <text:p text:style-name="Text_20_body">Dans Control Center, naviguer vers <text:span text:style-name="Source_20_Text">Cluster → Brokers → Metrics</text:span> et observer :</text:p>
      <text:list text:style-name="L22">
        <text:list-item>
          <text:p text:style-name="P198"><text:span text:style-name="Strong_20_Emphasis">Network Request Rate</text:span> : nombre de requêtes réseau reçues par les brokers. Avec un batching efficace, ce taux <text:span text:style-name="Strong_20_Emphasis">baisse</text:span> car plusieurs messages sont regroupés en une seule requête réseau. </text:p>
        </text:list-item>
        <text:list-item>
          <text:p text:style-name="P197"><text:span text:style-name="Strong_20_Emphasis">Bytes In/sec</text:span> : débit entrant brut — reste stable ou augmente car on envoie autant de données, juste en moins de requêtes.</text:p>
        </text:list-item>
      </text:list>
      <text:p text:style-name="P188"/>
      <text:p text:style-name="P188"/>
      <text:h text:style-name="Heading_20_2" text:outline-level="2"><text:bookmark-start text:name="__RefHeading___Toc4950_2024334449"/>2<text:span text:style-name="T202">B</text:span>.<text:span text:style-name="T228">6</text:span> <text:span text:style-name="T202">Arrêt d’un borker durant ke test</text:span><text:bookmark-end text:name="__RefHeading___Toc4950_2024334449"/></text:h>
      <text:p text:style-name="P188"/>
      <text:p text:style-name="P188">Arrêter un broker pendant l'envoi :</text:p>
      <text:p text:style-name="commande">docker stop kafka-2</text:p>
      <text:p text:style-name="P188"/>
      <text:p text:style-name="P188">Observer le comportement de JMeter : y a-t-il des erreurs ? Des retries ?</text:p>
      <text:p text:style-name="P188"/>
      <text:p text:style-name="P188">Redémarrer le broker :</text:p>
      <text:p text:style-name="commande">docker compose <text:s/>up -d</text:p>
      <text:p text:style-name="P188"/>
      <text:p text:style-name="P188"/>
      <text:h text:style-name="P96" text:outline-level="1"><text:bookmark-start text:name="__RefHeading___Toc9784_3845367211"/><text:span text:style-name="T87">Atelier 3 </text:span>: <text:span text:style-name="T99">Consumer API</text:span><text:bookmark-end text:name="__RefHeading___Toc9784_3845367211"/></text:h>
      <text:p text:style-name="P63"/>
      <text:h text:style-name="P107" text:outline-level="2"><text:bookmark-start text:name="__RefHeading___Toc9786_38453672111"/><text:span text:style-name="T147">3</text:span>.<text:span text:style-name="T168">0 Mise en place d’une base Postgres</text:span><text:bookmark-end text:name="__RefHeading___Toc9786_38453672111"/></text:h>
      <text:p text:style-name="P65">Démarrer un serveur postgres et sa console d’administration</text:p>
      <text:p text:style-name="commande">docker compose -f postgres-docker-compose.yml up -d</text:p>
      <text:p text:style-name="P63">Accéder à <text:span text:style-name="T1">localhost:81</text:span> et se logger avec <text:span text:style-name="T19">admin@admin.com/admin</text:span></text:p>
      <text:p text:style-name="P64">Enregistre un serveur avec comme paramètres de connexion :</text:p>
      <text:list text:style-name="L6">
        <text:list-item>
          <text:p text:style-name="P134">host : <text:span text:style-name="T19">consumer-postgresql</text:span></text:p>
        </text:list-item>
        <text:list-item>
          <text:p text:style-name="P134">user : <text:span text:style-name="T19">postgres</text:span></text:p>
        </text:list-item>
        <text:list-item>
          <text:p text:style-name="P134">password : <text:span text:style-name="T19">postgres</text:span></text:p>
        </text:list-item>
      </text:list>
      <text:p text:style-name="P64"/>
      <text:p text:style-name="P65">Créer une base consumer et y exécuter le script de création de table fourni : <text:span text:style-name="T19">create-table.sql</text:span></text:p>
      <text:h text:style-name="Heading_20_2" text:outline-level="2"><text:bookmark-start text:name="__RefHeading___Toc9786_3845367211"/><text:span text:style-name="T147">3</text:span>.1 Implémentation <text:bookmark-end text:name="__RefHeading___Toc9786_3845367211"/></text:h>
      <text:p text:style-name="P39">Le projet est composé de :</text:p>
      <text:list text:continue-list="list4137473975" text:style-name="L3">
        <text:list-item>
          <text:p text:style-name="P167">Une classe principale <text:span text:style-name="T19">Kafka</text:span><text:span text:style-name="T21">Consumer</text:span><text:span text:style-name="T19">Application</text:span> qui prend en arguments :</text:p>
          <text:list>
            <text:list-item>
              <text:p text:style-name="P167"><text:span text:style-name="T19">nbThreads</text:span> : Un nombre de threads</text:p>
              <text:p text:style-name="P167">L’application instancie <text:span text:style-name="T1">nbThreads</text:span> <text:span text:style-name="T1">Kafka</text:span><text:span text:style-name="T4">Consumer</text:span><text:span text:style-name="T1">Thread</text:span> et leur demande de s’exécuter. <text:span text:style-name="T100">Le programme s’arrête au bout d’un certains temps.</text:span></text:p>
            </text:list-item>
          </text:list>
        </text:list-item>
      </text:list>
      <text:list text:style-name="L7">
        <text:list-item>
          <text:p text:style-name="P171"><text:span text:style-name="T98">Une classe </text:span><text:span text:style-name="T20">Kafka</text:span><text:span text:style-name="T21">Consumer</text:span><text:span text:style-name="T20">Thread</text:span><text:span text:style-name="T98"> qui une fois instanciée poll le topic position <text:line-break/></text:span><text:span text:style-name="T180">Le traitement d’un message consiste à un insérer un enregistrement en BD </text:span></text:p>
        </text:list-item>
        <text:list-item>
          <text:p text:style-name="P170">Le package <text:span text:style-name="T19">model</text:span> contient les classes modélisant les données</text:p>
          <text:list>
            <text:list-item>
              <text:p text:style-name="P170"><text:span text:style-name="T19">Position</text:span> : Une position en latitude, longitude</text:p>
            </text:list-item>
            <text:list-item>
              <text:p text:style-name="P170"><text:span text:style-name="T19">Courier</text:span> : Un coursier associé à une position</text:p>
            </text:list-item>
          </text:list>
        </text:list-item>
      </text:list>
      <text:p text:style-name="P7"/>
      <text:p text:style-name="P8">Compléter l<text:span text:style-name="T101">a boucle de réception des messages</text:span></text:p>
      <text:p text:style-name="P8"/>
      <text:p text:style-name="P10">Pour cela, vous devez </text:p>
      <text:list text:style-name="L8">
        <text:list-item>
          <text:p text:style-name="P180"><text:span text:style-name="T92">Initialiser un </text:span><text:span text:style-name="T5">KafkaConsumer </text:span><text:span text:style-name="T11">avec la propriété </text:span><text:span text:style-name="T19">ConsumerConfig.AUTO_OFFSET_RESET_CONFIG</text:span> <text:span text:style-name="T165">à « </text:span><text:span text:style-name="T24">earliest</text:span><text:span text:style-name="T165"> »</text:span></text:p>
        </text:list-item>
        <text:list-item>
          <text:p text:style-name="P181"><text:span text:style-name="T91">Fournir un Deseri</text:span><text:span text:style-name="T93">a</text:span><text:span text:style-name="T91">liseur</text:span></text:p>
        </text:list-item>
        <text:list-item>
          <text:p text:style-name="P172">Implémenter la boucle de réception, <text:span text:style-name="T168">pour chaque enregistrement reçu stocker dans la base postgres id du coursier et l’offset kafka en utilisant la classe </text:span><text:span text:style-name="T25">ConsumerDao</text:span></text:p>
        </text:list-item>
      </text:list>
      <text:p text:style-name="P10"/>
      <text:p text:style-name="P10">Pour tester la réception, vous pouvez utiliser le programme précédent et le lancer afin qu’il exécute de nombreux message :</text:p>
      <text:p text:style-name="P10">Par exemple :</text:p>
      <text:p text:style-name="commande">producer_home$ java -jar target/producer-0.0.1-SNAPSHOT-jar-with-dependencies.jar 10 100000 500 0</text:p>
      <text:p text:style-name="commande"/>
      <text:p text:style-name="Text_20_body"><text:soft-page-break/>Implémenter un <text:span text:style-name="T19">ConsumerRebalanceListener</text:span> et l’associer au moment du <text:span text:style-name="T1">subscribe()</text:span></text:p>
      <text:h text:style-name="Heading_20_2" text:outline-level="2"><text:bookmark-start text:name="__RefHeading___Toc9788_3845367211"/><text:span text:style-name="T147">3</text:span>.2 Tests <text:bookmark-end text:name="__RefHeading___Toc9788_3845367211"/></text:h>
      <text:p text:style-name="P20">Une fois le programme mis au point, <text:span text:style-name="T166">construire l’application avec :</text:span></text:p>
      <text:p text:style-name="commande">mvn clean package </text:p>
      <text:p text:style-name="P20">effectuer plusieurs tests, <text:span text:style-name="T164">entre chaque démarrage effacer les offsets du groupe </text:span><text:span text:style-name="T167">et nettoyer la base de données</text:span></text:p>
      <text:p text:style-name="P22"/>
      <text:p text:style-name="P13"><text:span text:style-name="T66">Tester qu’aucun message n’est perdu : </text:span><text:span text:style-name="T63"><text:line-break/>Démarrer le programme avec </text:span><text:span text:style-name="T65">3</text:span><text:span text:style-name="T63"> thread </text:span></text:p>
      <text:p text:style-name="commande">java -jar target/consumer-0.0.1-SNAPSHOT-jar-with-dependencies.jar 3 10</text:p>
      <text:p text:style-name="P13"><text:span text:style-name="T65">V</text:span><text:span text:style-name="T63">isualiser la </text:span><text:span text:style-name="T64">répartition</text:span><text:span text:style-name="T63"> des partitions </text:span></text:p>
      <text:p text:style-name="P13"><text:span text:style-name="T65">A</text:span><text:span text:style-name="T63">rrêter puis redémarrer avec la même configuration</text:span></text:p>
      <text:p text:style-name="P69"><text:span text:style-name="T69">Tester la réaffectation de partitions : </text:span><text:span text:style-name="T68"><text:line-break/>Démarrer </text:span><text:span text:style-name="T67">2 fois l’application : 1 </text:span><text:span text:style-name="T68">avec 2 threads </text:span><text:span text:style-name="T67">l’autre avec</text:span><text:span text:style-name="T68"> 3 threads </text:span></text:p>
      <text:p text:style-name="commande">java -jar target/consumer-0.0.1-SNAPSHOT-jar-with-dependencies.jar 2 10</text:p>
      <text:p text:style-name="commande">java -jar target/consumer-0.0.1-SNAPSHOT-jar-with-dependencies.jar 3 10</text:p>
      <text:p text:style-name="P13"><text:span text:style-name="T63">visualiser la </text:span><text:span text:style-name="T64">répartition</text:span><text:span text:style-name="T63"> des partitions</text:span></text:p>
      <text:p text:style-name="P23">Arrêter et redémarrer un processus pendant la consommation</text:p>
      <text:p text:style-name="P24">Test redémarrage broker</text:p>
      <text:p text:style-name="P21">Arrêter un broker :</text:p>
      <text:p text:style-name="commande">docker stop kafka-0</text:p>
      <text:p text:style-name="P21">Redémarrer le, Dans le répertoire du fichier docker-compose </text:p>
      <text:p text:style-name="commande">docker compose up -d</text:p>
      <text:p text:style-name="P21">Essayer de vérifier le traitement de tous les messages. (Il se peut qu’il y ait des doublons de traitement)</text:p>
      <text:p text:style-name="P42"/>
      <text:h text:style-name="P97" text:outline-level="1"><text:bookmark-start text:name="__RefHeading___Toc4952_2024334449"/>Atelier 3<text:span text:style-name="T229">B</text:span> : Consumer via Confluent REST Proxy<text:bookmark-end text:name="__RefHeading___Toc4952_2024334449"/></text:h>
      <text:p text:style-name="P190">Objectifs</text:p>
      <text:list text:style-name="L23">
        <text:list-item>
          <text:p text:style-name="P199">Consommer des messages Kafka via des requêtes HTTP GET sans client Kafka natif </text:p>
        </text:list-item>
        <text:list-item>
          <text:p text:style-name="P199">Comprendre le modèle stateful de la consommation REST Proxy (instance liée à un groupe) </text:p>
        </text:list-item>
        <text:list-item>
          <text:p text:style-name="P199">Observer le rééquilibrage des partitions en ajoutant ou supprimant des consommateurs </text:p>
        </text:list-item>
        <text:list-item>
          <text:p text:style-name="P199">Mesurer le lag de consommation dans Confluent Control Center </text:p>
        </text:list-item>
        <text:list-item>
          <text:p text:style-name="P200">Comprendre les contraintes d'affinité de session propres au REST Proxy </text:p>
        </text:list-item>
      </text:list>
      <text:p text:style-name="P190">Contexte</text:p>
      <text:p text:style-name="Text_20_body">Dans cet atelier, le consommateur est un script Python qui appelle l'API REST du proxy via des requêtes HTTP GET répétées. Le script insère chaque message reçu dans une base Postgres — même modèle de données que l'atelier Java original.</text:p>
      <text:p text:style-name="Text_20_body">Le producteur de messages est le script JMeter de l'atelier précédent.</text:p>
      <text:p text:style-name="Horizontal_20_Line"/>
      <text:h text:style-name="Heading_20_2" text:outline-level="2"><text:bookmark-start text:name="__RefHeading___Toc4954_2024334449"/>3<text:span text:style-name="T203">B</text:span>.0 Mise en place de la base Postgres<text:bookmark-end text:name="__RefHeading___Toc4954_2024334449"/></text:h>
      <text:p text:style-name="Text_20_body">Démarrer le serveur Postgres et sa console d'administration :</text:p>
      <text:p text:style-name="commande"><text:span text:style-name="Source_20_Text">docker compose -f postgres-docker-compose.yml up -d</text:span></text:p>
      <text:p text:style-name="Text_20_body">Accéder à pgAdmin sur <text:span text:style-name="Source_20_Text">http://localhost:81</text:span> avec <text:span text:style-name="Source_20_Text">admin@admin.com</text:span> / <text:span text:style-name="Source_20_Text">admin</text:span>.</text:p>
      <text:p text:style-name="Text_20_body">Enregistrer un serveur avec les paramètres :</text:p>
      <text:list text:style-name="L24">
        <text:list-item>
          <text:p text:style-name="P202">host : <text:span text:style-name="Source_20_Text">consumer-postgresql</text:span> </text:p>
        </text:list-item>
        <text:list-item>
          <text:p text:style-name="P202">user : <text:span text:style-name="Source_20_Text">postgres</text:span> </text:p>
        </text:list-item>
        <text:list-item>
          <text:p text:style-name="P201">password : <text:span text:style-name="Source_20_Text">postgres</text:span> </text:p>
        </text:list-item>
      </text:list>
      <text:p text:style-name="Text_20_body">Créer une base <text:span text:style-name="Source_20_Text">consumer</text:span> et y exécuter le script <text:span text:style-name="Source_20_Text">create-table.sql</text:span> fourni.</text:p>
      <text:h text:style-name="Heading_20_2" text:outline-level="2"><text:bookmark-start text:name="__RefHeading___Toc4956_2024334449"/>3<text:span text:style-name="T203">B</text:span>.1 Découverte de l'API Consumer REST Proxy<text:bookmark-end text:name="__RefHeading___Toc4956_2024334449"/></text:h>
      <text:p text:style-name="Text_20_body">La consommation via REST Proxy est <text:span text:style-name="Strong_20_Emphasis">stateful</text:span> : contrairement à la production, il faut d'abord créer une instance de consommateur sur le proxy, puis appeler régulièrement GET /records pour dépiler les messages.</text:p>
      <text:p text:style-name="Quotations"><text:span text:style-name="Strong_20_Emphasis">Contrainte importante</text:span> : toutes les requêtes d'une instance consommateur doivent aller vers <text:span text:style-name="Strong_20_Emphasis">la même instance du proxy</text:span>. Dans cet atelier avec un proxy unique, ce n'est pas un problème. En production avec plusieurs instances proxy, un load balancer avec session affinity (sticky sessions) est obligatoire.</text:p>
      <text:p text:style-name="P223"><text:bookmark-start text:name="__RefHeading___Toc4958_2024334449"/>Étape 1 — Créer l'instance consommateur<text:bookmark-end text:name="__RefHeading___Toc4958_2024334449"/></text:p>
      <text:p text:style-name="commande"><text:span text:style-name="Source_20_Text">curl -X POST http://localhost:8082/consumers/position-group \</text:span></text:p>
      <text:p text:style-name="commande"><text:span text:style-name="Source_20_Text"><text:s text:c="2"/>-H "Content-Type: application/vnd.kafka.v2+json" \</text:span></text:p>
      <text:p text:style-name="commande"><text:span text:style-name="Source_20_Text"><text:s text:c="2"/>-d '{</text:span></text:p>
      <text:p text:style-name="commande"><text:span text:style-name="Source_20_Text"><text:s text:c="4"/>"name": "consumer-1",</text:span></text:p>
      <text:p text:style-name="commande"><text:span text:style-name="Source_20_Text"><text:s text:c="4"/>"format": "json",</text:span></text:p>
      <text:p text:style-name="commande"><text:span text:style-name="Source_20_Text"><text:s text:c="4"/>"auto.offset.reset": "earliest",</text:span></text:p>
      <text:p text:style-name="commande"><text:span text:style-name="Source_20_Text"><text:s text:c="4"/>"auto.commit.enable": "false"</text:span></text:p>
      <text:p text:style-name="commande"><text:soft-page-break/><text:span text:style-name="Source_20_Text"><text:s text:c="2"/>}'</text:span></text:p>
      <text:p text:style-name="Text_20_body">La réponse contient le <text:span text:style-name="Source_20_Text">base_uri</text:span> à utiliser pour toutes les requêtes suivantes :</text:p>
      <text:p text:style-name="Preformatted_20_Text"><text:span text:style-name="Source_20_Text">{</text:span></text:p>
      <text:p text:style-name="Preformatted_20_Text"><text:span text:style-name="Source_20_Text"><text:s text:c="2"/>"instance_id": "consumer-1",</text:span></text:p>
      <text:p text:style-name="Preformatted_20_Text"><text:span text:style-name="Source_20_Text"><text:s text:c="2"/>"base_uri": "http://localhost:8082/consumers/position-group/instances/consumer-1"</text:span></text:p>
      <text:p text:style-name="P121"><text:span text:style-name="Source_20_Text">}</text:span></text:p>
      <text:p text:style-name="Text_20_body">Stocker ce <text:span text:style-name="Source_20_Text">base_uri</text:span> dans une variable :</text:p>
      <text:p text:style-name="P121"><text:span text:style-name="Source_20_Text">BASE_URI="http://localhost:8082/consumers/position-group/instances/consumer-1"</text:span></text:p>
      <text:p text:style-name="P223"><text:bookmark-start text:name="__RefHeading___Toc4960_2024334449"/>Étape 2 — S'abonner au topic<text:bookmark-end text:name="__RefHeading___Toc4960_2024334449"/></text:p>
      <text:p text:style-name="Preformatted_20_Text"><text:span text:style-name="Source_20_Text">curl -X POST ${BASE_URI}/subscription \</text:span></text:p>
      <text:p text:style-name="Preformatted_20_Text"><text:span text:style-name="Source_20_Text"><text:s text:c="2"/>-H "Content-Type: application/vnd.kafka.v2+json" \</text:span></text:p>
      <text:p text:style-name="P121"><text:span text:style-name="Source_20_Text"><text:s text:c="2"/>-d '{"topics": ["position"]}'</text:span></text:p>
      <text:p text:style-name="P223"><text:bookmark-start text:name="__RefHeading___Toc4962_2024334449"/>Étape 3 — Consommer des messages (appel à répéter)<text:bookmark-end text:name="__RefHeading___Toc4962_2024334449"/></text:p>
      <text:p text:style-name="Preformatted_20_Text"><text:span text:style-name="Source_20_Text">curl -X GET ${BASE_URI}/records \</text:span></text:p>
      <text:p text:style-name="P121"><text:span text:style-name="Source_20_Text"><text:s text:c="2"/>-H "Accept: application/vnd.kafka.json.v2+json"</text:span></text:p>
      <text:p text:style-name="Text_20_body">La réponse est un tableau JSON de messages. Si le topic est vide ou si aucun message n'est disponible, la réponse est un tableau vide <text:span text:style-name="Source_20_Text">[]</text:span>.</text:p>
      <text:p text:style-name="Quotations"><text:span text:style-name="Strong_20_Emphasis">Pourquoi répéter l'appel ?</text:span> Contrairement au client Java natif qui maintient une connexion TCP persistante, le REST Proxy ne pousse pas les messages — c'est le client qui poll. Il faut donc appeler GET /records en boucle.</text:p>
      <text:p text:style-name="P223"><text:bookmark-start text:name="__RefHeading___Toc4964_2024334449"/>Étape 4 — Commiter les offsets<text:bookmark-end text:name="__RefHeading___Toc4964_2024334449"/></text:p>
      <text:p text:style-name="Preformatted_20_Text"><text:span text:style-name="Source_20_Text">curl -X POST ${BASE_URI}/offsets \</text:span></text:p>
      <text:p text:style-name="Preformatted_20_Text"><text:span text:style-name="Source_20_Text"><text:s text:c="2"/>-H "Content-Type: application/vnd.kafka.v2+json" \</text:span></text:p>
      <text:p text:style-name="Preformatted_20_Text"><text:span text:style-name="Source_20_Text"><text:s text:c="2"/>-d '{</text:span></text:p>
      <text:p text:style-name="Preformatted_20_Text"><text:span text:style-name="Source_20_Text"><text:s text:c="4"/>"offsets": [</text:span></text:p>
      <text:p text:style-name="Preformatted_20_Text"><text:span text:style-name="Source_20_Text"><text:s text:c="6"/>{"topic": "position", "partition": 0, "offset": 10},</text:span></text:p>
      <text:p text:style-name="Preformatted_20_Text"><text:span text:style-name="Source_20_Text"><text:s text:c="6"/>{"topic": "position", "partition": 1, "offset": 5}</text:span></text:p>
      <text:p text:style-name="Preformatted_20_Text"><text:span text:style-name="Source_20_Text"><text:s text:c="4"/>]</text:span></text:p>
      <text:p text:style-name="P121"><text:span text:style-name="Source_20_Text"><text:s text:c="2"/>}'</text:span></text:p>
      <text:p text:style-name="P223"><text:bookmark-start text:name="__RefHeading___Toc4966_2024334449"/>Étape 5 — Supprimer l'instance en fin de session<text:bookmark-end text:name="__RefHeading___Toc4966_2024334449"/></text:p>
      <text:p text:style-name="Preformatted_20_Text"><text:span text:style-name="Source_20_Text">curl -X DELETE ${BASE_URI} \</text:span></text:p>
      <text:p text:style-name="P121"><text:span text:style-name="Source_20_Text"><text:s text:c="2"/>-H "Content-Type: application/vnd.kafka.v2+json"</text:span></text:p>
      <text:p text:style-name="Quotations">Ne pas supprimer l'instance → elle reste active sur le proxy jusqu'au timeout (<text:span text:style-name="Source_20_Text">consumer.instance.timeout.ms</text:span>, défaut 5 minutes).</text:p>
      <text:h text:style-name="Heading_20_2" text:outline-level="2"/>
      <text:h text:style-name="Heading_20_2" text:outline-level="2"><text:bookmark-start text:name="__RefHeading___Toc4968_2024334449"/>3<text:span text:style-name="T229">B</text:span>.2 Script consumer Python fourni<text:bookmark-end text:name="__RefHeading___Toc4968_2024334449"/></text:h>
      <text:p text:style-name="Text_20_body">Un script <text:span text:style-name="Source_20_Text"><text:span text:style-name="T58">consumer-rest.py</text:span></text:span> vous est fourni. Il encapsule les 5 étapes ci-dessus dans une boucle continue et insère chaque message reçu en base Postgres.</text:p>
      <text:p text:style-name="P192"><text:bookmark-start text:name="__RefHeading___Toc4970_2024334449"/>Structure du script<text:bookmark-end text:name="__RefHeading___Toc4970_2024334449"/></text:p>
      <text:p text:style-name="Text_20_body"><text:soft-page-break/>Le script prend les arguments suivant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Argument</text:p>
            </table:table-cell>
            <table:table-cell table:style-name="Tableau1.A1" office:value-type="string">
              <text:p text:style-name="Table_20_Heading">Description</text:p>
            </table:table-cell>
            <table:table-cell table:style-name="Tableau1.A1" office:value-type="string">
              <text:p text:style-name="Table_20_Heading">Défaut</text:p>
            </table:table-cell>
          </table:table-row>
        </table:table-header-rows>
        <table:table-row>
          <table:table-cell table:style-name="Tableau1.A1" office:value-type="string">
            <text:p text:style-name="Table_20_Contents"><text:span text:style-name="Source_20_Text">--group</text:span></text:p>
          </table:table-cell>
          <table:table-cell table:style-name="Tableau1.A1" office:value-type="string">
            <text:p text:style-name="Table_20_Contents">Nom du consumer group</text:p>
          </table:table-cell>
          <table:table-cell table:style-name="Tableau1.A1" office:value-type="string">
            <text:p text:style-name="Table_20_Contents"><text:span text:style-name="Source_20_Text">position-group</text:span></text:p>
          </table:table-cell>
        </table:table-row>
        <table:table-row>
          <table:table-cell table:style-name="Tableau1.A1" office:value-type="string">
            <text:p text:style-name="Table_20_Contents"><text:span text:style-name="Source_20_Text">--consumer-id</text:span></text:p>
          </table:table-cell>
          <table:table-cell table:style-name="Tableau1.A1" office:value-type="string">
            <text:p text:style-name="Table_20_Contents">Identifiant unique de l'instance</text:p>
          </table:table-cell>
          <table:table-cell table:style-name="Tableau1.A1" office:value-type="string">
            <text:p text:style-name="Table_20_Contents"><text:span text:style-name="Source_20_Text">consumer-1</text:span></text:p>
          </table:table-cell>
        </table:table-row>
        <table:table-row>
          <table:table-cell table:style-name="Tableau1.A1" office:value-type="string">
            <text:p text:style-name="Table_20_Contents"><text:span text:style-name="Source_20_Text">--proxy</text:span></text:p>
          </table:table-cell>
          <table:table-cell table:style-name="Tableau1.A1" office:value-type="string">
            <text:p text:style-name="Table_20_Contents">URL du REST Proxy</text:p>
          </table:table-cell>
          <table:table-cell table:style-name="Tableau1.A1" office:value-type="string">
            <text:p text:style-name="Table_20_Contents"><text:span text:style-name="Source_20_Text">http://localhost:8082</text:span></text:p>
          </table:table-cell>
        </table:table-row>
        <table:table-row>
          <table:table-cell table:style-name="Tableau1.A1" office:value-type="string">
            <text:p text:style-name="Table_20_Contents"><text:span text:style-name="Source_20_Text">--topic</text:span></text:p>
          </table:table-cell>
          <table:table-cell table:style-name="Tableau1.A1" office:value-type="string">
            <text:p text:style-name="Table_20_Contents">Topic à consommer</text:p>
          </table:table-cell>
          <table:table-cell table:style-name="Tableau1.A1" office:value-type="string">
            <text:p text:style-name="Table_20_Contents"><text:span text:style-name="Source_20_Text">position</text:span></text:p>
          </table:table-cell>
        </table:table-row>
        <table:table-row>
          <table:table-cell table:style-name="Tableau1.A1" office:value-type="string">
            <text:p text:style-name="Table_20_Contents"><text:span text:style-name="Source_20_Text">--poll-interval</text:span></text:p>
          </table:table-cell>
          <table:table-cell table:style-name="Tableau1.A1" office:value-type="string">
            <text:p text:style-name="Table_20_Contents">Délai entre deux GET /records (ms)</text:p>
          </table:table-cell>
          <table:table-cell table:style-name="Tableau1.A1" office:value-type="string">
            <text:p text:style-name="Table_20_Contents"><text:span text:style-name="Source_20_Text">500</text:span></text:p>
          </table:table-cell>
        </table:table-row>
      </table:table>
      <text:h text:style-name="P119" text:outline-level="3"/>
      <text:p text:style-name="Text_20_body"><text:bookmark-start text:name="__RefHeading___Toc4972_2024334449"/>Éventuellement, ajouter les modules supplémentaires :<text:bookmark-end text:name="__RefHeading___Toc4972_2024334449"/></text:p>
      <text:p text:style-name="commande">python3 -m venv ~/kafka-venv <text:line-break/><text:span text:style-name="T204">source</text:span> ~/kafka-venv/bin/activate <text:line-break/>pip <text:span text:style-name="T205">install</text:span> requests psycopg2-binary</text:p>
      <text:p text:style-name="P192"><text:bookmark-start text:name="__RefHeading___Toc4974_2024334449"/>Lancer le script<text:bookmark-end text:name="__RefHeading___Toc4974_2024334449"/></text:p>
      <text:p text:style-name="commande"><text:span text:style-name="Source_20_Text">python3 consumer-rest.py --consumer-id consumer-1</text:span></text:p>
      <text:p text:style-name="Text_20_body">Observer dans le terminal :</text:p>
      <text:list text:style-name="L25">
        <text:list-item>
          <text:p text:style-name="P204">Les messages reçus à chaque appel GET </text:p>
        </text:list-item>
        <text:list-item>
          <text:p text:style-name="P204">Les offsets commités après chaque batch </text:p>
        </text:list-item>
        <text:list-item>
          <text:p text:style-name="P203">Les insertions en base Postgres </text:p>
        </text:list-item>
      </text:list>
      <text:p text:style-name="Text_20_body">Vérifier en parallèle dans pgAdmin que les enregistrements apparaissent dans la table.</text:p>
      <text:h text:style-name="Heading_20_2" text:outline-level="2"><text:bookmark-start text:name="__RefHeading___Toc4976_2024334449"/>3<text:span text:style-name="T229">B</text:span>.3 Tests de rééquilibrage<text:bookmark-end text:name="__RefHeading___Toc4976_2024334449"/></text:h>
      <text:p text:style-name="P192"><text:bookmark-start text:name="__RefHeading___Toc4978_2024334449"/>Objectif<text:bookmark-end text:name="__RefHeading___Toc4978_2024334449"/></text:p>
      <text:p text:style-name="Text_20_body">Observer comment le proxy redistribue les partitions quand des consommateurs rejoignent ou quittent le groupe.</text:p>
      <text:p text:style-name="P192"><text:bookmark-start text:name="__RefHeading___Toc4980_2024334449"/>Démarrer le producteur<text:bookmark-end text:name="__RefHeading___Toc4980_2024334449"/></text:p>
      <text:p text:style-name="Text_20_body">Depuis le script JMeter (atelier 2), lancer un envoi continu :</text:p>
      <text:list text:style-name="L26">
        <text:list-item>
          <text:p text:style-name="P206"><text:span text:style-name="Source_20_Text">NB_COURSIERS</text:span> = 20 </text:p>
        </text:list-item>
        <text:list-item>
          <text:p text:style-name="P206"><text:span text:style-name="Source_20_Text">NB_MESSAGES</text:span> = 10000 </text:p>
        </text:list-item>
        <text:list-item>
          <text:p text:style-name="P206"><text:span text:style-name="Source_20_Text">PAUSE_MS</text:span> = 100 </text:p>
        </text:list-item>
        <text:list-item>
          <text:p text:style-name="P205"><text:span text:style-name="Source_20_Text">ACKS</text:span> = 1 </text:p>
        </text:list-item>
      </text:list>
      <text:p text:style-name="P192"><text:bookmark-start text:name="__RefHeading___Toc4982_2024334449"/>Test A — Un seul consommateur<text:bookmark-end text:name="__RefHeading___Toc4982_2024334449"/></text:p>
      <text:p text:style-name="Text_20_body">Démarrer un premier consommateur dans un terminal :</text:p>
      <text:p text:style-name="P121"><text:span text:style-name="Source_20_Text">python3 consumer-rest.py --consumer-id consumer-1</text:span></text:p>
      <text:p text:style-name="Text_20_body">Dans <text:span text:style-name="Strong_20_Emphasis">Confluent Control Center</text:span> (<text:span text:style-name="Source_20_Text">http://localhost:9021</text:span>) :</text:p>
      <text:list text:style-name="L27">
        <text:list-item>
          <text:p text:style-name="P208">Naviguer vers <text:span text:style-name="Source_20_Text">Consumer Groups → position-group</text:span> </text:p>
        </text:list-item>
        <text:list-item>
          <text:p text:style-name="P208">Observer que le consommateur a reçu les 5 partitions du topic <text:span text:style-name="Source_20_Text">position</text:span> </text:p>
        </text:list-item>
        <text:list-item>
          <text:p text:style-name="P207">Relever le lag de consommation </text:p>
        </text:list-item>
      </text:list>
      <text:p text:style-name="P192"><text:bookmark-start text:name="__RefHeading___Toc4984_2024334449"/>Test B — Ajout d'un deuxième consommateur<text:bookmark-end text:name="__RefHeading___Toc4984_2024334449"/></text:p>
      <text:p text:style-name="Text_20_body">Ouvrir un deuxième terminal et démarrer un second consommateur :</text:p>
      <text:p text:style-name="P121"><text:span text:style-name="Source_20_Text">python3 consumer-rest.py --consumer-id consumer-2</text:span></text:p>
      <text:p text:style-name="Text_20_body"><text:soft-page-break/>Dans Control Center, observer <text:span text:style-name="Strong_20_Emphasis">le rééquilibrage</text:span> :</text:p>
      <text:list text:style-name="L28">
        <text:list-item>
          <text:p text:style-name="P210">Les 5 partitions se redistribuent entre les 2 consommateurs </text:p>
        </text:list-item>
        <text:list-item>
          <text:p text:style-name="P209">Le lag évolue-t-il ? À quelle vitesse est-il résorbé ? </text:p>
        </text:list-item>
      </text:list>
      <text:p text:style-name="Text_20_body">Questions :</text:p>
      <text:list text:style-name="L29">
        <text:list-item>
          <text:p text:style-name="P212">Combien de partitions chaque consommateur reçoit-il ? </text:p>
        </text:list-item>
        <text:list-item>
          <text:p text:style-name="P211">Y a-t-il une pause dans la consommation pendant le rééquilibrage ? </text:p>
        </text:list-item>
      </text:list>
      <text:p text:style-name="P192"><text:bookmark-start text:name="__RefHeading___Toc4986_2024334449"/>Test C — 5 consommateurs (parallélisme optimal)<text:bookmark-end text:name="__RefHeading___Toc4986_2024334449"/></text:p>
      <text:p text:style-name="Text_20_body">Ouvrir 3 terminaux supplémentaires et démarrer consumer-3, consumer-4, consumer-5.</text:p>
      <text:p text:style-name="Text_20_body">Observer dans Control Center :</text:p>
      <text:list text:style-name="L30">
        <text:list-item>
          <text:p text:style-name="P214">La répartition 1 partition / 1 consommateur </text:p>
        </text:list-item>
        <text:list-item>
          <text:p text:style-name="P213">Le lag se résorbe-t-il plus vite ? </text:p>
        </text:list-item>
      </text:list>
      <text:p text:style-name="P192"><text:bookmark-start text:name="__RefHeading___Toc4988_2024334449"/>Test D — 6 consommateurs (au-delà du nombre de partitions)<text:bookmark-end text:name="__RefHeading___Toc4988_2024334449"/></text:p>
      <text:p text:style-name="Text_20_body">Démarrer un 6e consommateur :</text:p>
      <text:p text:style-name="P121"><text:span text:style-name="Source_20_Text">python3 consumer-rest.py --consumer-id consumer-6</text:span></text:p>
      <text:p text:style-name="Text_20_body">Observer dans Control Center :</text:p>
      <text:list text:style-name="L31">
        <text:list-item>
          <text:p text:style-name="P216">Le 6e consommateur reçoit-il des partitions ? </text:p>
        </text:list-item>
        <text:list-item>
          <text:p text:style-name="P215">Que se passe-t-il dans le terminal du consumer-6 ? </text:p>
        </text:list-item>
      </text:list>
      <text:p text:style-name="P192"><text:bookmark-start text:name="__RefHeading___Toc4990_2024334449"/>Test E — Arrêt d'un consommateur<text:bookmark-end text:name="__RefHeading___Toc4990_2024334449"/></text:p>
      <text:p text:style-name="Text_20_body">Arrêter consumer-2 avec Ctrl+C.</text:p>
      <text:p text:style-name="Text_20_body">Observer dans Control Center :</text:p>
      <text:list text:style-name="L32">
        <text:list-item>
          <text:p text:style-name="P218">Le rééquilibrage se déclenche-t-il automatiquement ? </text:p>
        </text:list-item>
        <text:list-item>
          <text:p text:style-name="P218">Dans quel délai ? (lié au <text:span text:style-name="Source_20_Text">session.timeout.ms</text:span>) </text:p>
        </text:list-item>
        <text:list-item>
          <text:p text:style-name="P217">Les partitions de consumer-2 sont-elles redistribuées ? </text:p>
        </text:list-item>
      </text:list>
      <text:p text:style-name="Quotations"><text:span text:style-name="Strong_20_Emphasis">Différence avec l'API Java</text:span> : le rééquilibrage est géré côté proxy, pas côté client HTTP. Le script Python ne reçoit pas de callback <text:span text:style-name="Source_20_Text">onPartitionsRevoked</text:span> / <text:span text:style-name="Source_20_Text">onPartitionsAssigned</text:span> — c'est transparent.</text:p>
      <text:h text:style-name="Heading_20_2" text:outline-level="2"><text:bookmark-start text:name="__RefHeading___Toc4992_2024334449"/>3<text:span text:style-name="T229">B</text:span>.4 Garanties de livraison<text:bookmark-end text:name="__RefHeading___Toc4992_2024334449"/></text:h>
      <text:p text:style-name="P192"><text:bookmark-start text:name="__RefHeading___Toc4994_2024334449"/>Objectif<text:bookmark-end text:name="__RefHeading___Toc4994_2024334449"/></text:p>
      <text:p text:style-name="Text_20_body">Observer le comportement At Least Once avec commit manuel.</text:p>
      <text:p text:style-name="P192"><text:bookmark-start text:name="__RefHeading___Toc4996_2024334449"/>Préparer le test<text:bookmark-end text:name="__RefHeading___Toc4996_2024334449"/></text:p>
      <text:p text:style-name="Text_20_body">Vider la table Postgres et réinitialiser les offsets du groupe :</text:p>
      <text:p text:style-name="Preformatted_20_Text"><text:span text:style-name="Source_20_Text"># Depuis le container kafka-1</text:span></text:p>
      <text:p text:style-name="Preformatted_20_Text"><text:span text:style-name="Source_20_Text">docker exec -it kafka-1 \</text:span></text:p>
      <text:p text:style-name="Preformatted_20_Text"><text:span text:style-name="Source_20_Text"><text:s text:c="2"/>kafka-consumer-groups --bootstrap-server kafka-1:9092 \</text:span></text:p>
      <text:p text:style-name="Preformatted_20_Text"><text:span text:style-name="Source_20_Text"><text:s text:c="2"/>--group position-group --reset-offsets \</text:span></text:p>
      <text:p text:style-name="P121"><text:span text:style-name="Source_20_Text"><text:s text:c="2"/>--to-earliest --topic position --execute</text:span></text:p>
      <text:p text:style-name="P192"><text:bookmark-start text:name="__RefHeading___Toc4998_2024334449"/>Test At Least Once<text:bookmark-end text:name="__RefHeading___Toc4998_2024334449"/></text:p>
      <text:p text:style-name="Text_20_body">Lancer le producteur JMeter avec 1 000 messages, puis démarrer un consommateur <text:span text:style-name="T207">en provoquant un crash :</text:span></text:p>
      <text:p text:style-name="commande"><text:soft-page-break/>python3 consumer-rest.py --consumer-id consumer-1 --crash-after 50</text:p>
      <text:p text:style-name="Text_20_body"/>
      <text:p text:style-name="Text_20_body">Relancer le consommateur avec le <text:span text:style-name="Strong_20_Emphasis">même consumer-id</text:span> et le <text:span text:style-name="Strong_20_Emphasis">même group</text:span> :</text:p>
      <text:p text:style-name="commande"><text:span text:style-name="Source_20_Text">python3 consumer-rest.py --consumer-id consumer-1</text:span></text:p>
      <text:p text:style-name="Text_20_body">Observer :</text:p>
      <text:list text:style-name="L33">
        <text:list-item>
          <text:p text:style-name="P219">Le consommateur reprend-il depuis le dernier offset commité ? <text:s/></text:p>
        </text:list-item>
      </text:list>
      <text:p text:style-name="Text_20_body"/>
      <text:h text:style-name="Heading_20_2" text:outline-level="2"><text:bookmark-start text:name="__RefHeading___Toc5000_2024334449"/>3<text:span text:style-name="T229">B</text:span>.5 Test de résilience broker<text:bookmark-end text:name="__RefHeading___Toc5000_2024334449"/></text:h>
      <text:p text:style-name="P192"><text:bookmark-start text:name="__RefHeading___Toc5002_2024334449"/>Arrêt d'un broker pendant la consommation<text:bookmark-end text:name="__RefHeading___Toc5002_2024334449"/></text:p>
      <text:p text:style-name="Text_20_body">Lancer JMeter en continu et démarrer un consommateur, puis arrêter un broker :</text:p>
      <text:p text:style-name="commande"><text:span text:style-name="Source_20_Text">docker stop kafka-2</text:span></text:p>
      <text:p text:style-name="Text_20_body">Observer :</text:p>
      <text:list text:style-name="L34">
        <text:list-item>
          <text:p text:style-name="P221">Dans le terminal du consumer : des erreurs apparaissent-elles ? </text:p>
        </text:list-item>
        <text:list-item>
          <text:p text:style-name="P221">Dans Control Center : le cluster réélect-il un nouveau leader pour les partitions affectées ? </text:p>
        </text:list-item>
        <text:list-item>
          <text:p text:style-name="P220">La consommation reprend-elle automatiquement ? </text:p>
        </text:list-item>
      </text:list>
      <text:p text:style-name="Text_20_body">Redémarrer le broker :</text:p>
      <text:p text:style-name="commande"><text:span text:style-name="Source_20_Text">docker compose -f docker-compose-rest.yml up -d</text:span></text:p>
      <text:p text:style-name="Text_20_body">Observer la réintégration dans Control Center.</text:p>
      <text:h text:style-name="P92" text:outline-level="1"/>
      <text:h text:style-name="P106" text:outline-level="1"><text:bookmark-start text:name="__RefHeading___Toc9790_3845367211"/><text:span text:style-name="T127">Atelier </text:span><text:span text:style-name="T122">4</text:span><text:span text:style-name="T127">. </text:span><text:span text:style-name="T119">S</text:span><text:span text:style-name="T121">chema Registry et sérialisation Avro</text:span><text:bookmark-end text:name="__RefHeading___Toc9790_3845367211"/></text:h>
      <text:h text:style-name="Heading_20_2" text:outline-level="2"><text:bookmark-start text:name="__RefHeading___Toc9792_3845367211"/>4.1 Démarrage de Confuent Registry<text:bookmark-end text:name="__RefHeading___Toc9792_3845367211"/></text:h>
      <text:p text:style-name="P230"><text:bookmark-start text:name="__RefHeading___Toc9865_3845367211"/>Visualiser le fichier <text:span text:style-name="T19">docker-compose.yml</text:span> fourni <text:span text:style-name="T208">qui démarre Redpanda Console, </text:span><text:span text:style-name="T209">akhq</text:span><text:span text:style-name="T208"> et SchemaRegistry de confluent</text:span><text:bookmark-end text:name="__RefHeading___Toc9865_3845367211"/></text:p>
      <text:p text:style-name="P230"/>
      <text:p text:style-name="P230"><text:bookmark-start text:name="__RefHeading___Toc9867_3845367211"/>Démarrer la stack <text:span text:style-name="T209">via :</text:span><text:bookmark-end text:name="__RefHeading___Toc9867_3845367211"/></text:p>
      <text:p text:style-name="P86">docker compose up -d</text:p>
      <text:p text:style-name="P225">Vérifier le bon démarrage des containers</text:p>
      <text:p text:style-name="P230"><text:bookmark-start text:name="__RefHeading___Toc9869_3845367211"/>Accéder à <text:span text:style-name="T1">localhost:808</text:span><text:span text:style-name="T14">5</text:span><text:span text:style-name="T1">/subjects</text:span><text:bookmark-end text:name="__RefHeading___Toc9869_3845367211"/></text:p>
      <text:h text:style-name="P135" text:outline-level="1"/>
      <text:h text:style-name="P114" text:outline-level="2"><text:bookmark-start text:name="__RefHeading___Toc9794_3845367211"/><text:span text:style-name="T216">4</text:span>.2 Producteur de message<text:bookmark-end text:name="__RefHeading___Toc9794_3845367211"/></text:h>
      <text:p text:style-name="P150"><text:span text:style-name="T133">Récupérer le projet</text:span><text:span text:style-name="T132"> </text:span><text:span text:style-name="T136">producer-avro</text:span></text:p>
      <text:p text:style-name="P151"/>
      <text:p text:style-name="P164"><text:span text:style-name="T144">Visualiser le </text:span><text:span text:style-name="T143">schéma Avro : </text:span><text:span text:style-name="T140"><text:line-break/></text:span><text:span text:style-name="T142">src/main/resources/</text:span><text:span text:style-name="T141">Courier.avsc</text:span></text:p>
      <text:p text:style-name="P152"/>
      <text:p text:style-name="P164"><text:span text:style-name="T134">Lancer la commande</text:span><text:span text:style-name="T132"> ./</text:span><text:span text:style-name="T136">mvn</text:span><text:span text:style-name="T137">w</text:span><text:span text:style-name="T136"> compile</text:span><text:span text:style-name="T132"> et regarder les classes générées par le plugin Avro</text:span></text:p>
      <text:p text:style-name="P164"/>
      <text:p text:style-name="P154">Lancer ensuite .<text:span text:style-name="T19">/mvnw package</text:span> pour construire l’exécutable</text:p>
      <text:p text:style-name="P164"/>
      <text:p text:style-name="P138">Démarrer l’exécutable par </text:p>
      <text:p text:style-name="P139">java -jar target/producer-avro-0.0.1-SNAPSHOT-jar-with-dependencies.jar 10 500 10 0</text:p>
      <text:p text:style-name="P138"/>
      <text:p text:style-name="P155"><text:span text:style-name="T38">L</text:span><text:span text:style-name="T37">e programme, après avoir enregistré le schéma, envoie </text:span><text:span text:style-name="T41">10*</text:span><text:span text:style-name="T37">500 messages qui sont sérialisés avec Avro sur le topic </text:span><text:span text:style-name="T44">avro-position</text:span></text:p>
      <text:p text:style-name="P138"/>
      <text:p text:style-name="P227"><text:bookmark-start text:name="__RefHeading___Toc9871_3845367211"/>Après un premier démarrage, le schéma doit être consultable :<text:bookmark-end text:name="__RefHeading___Toc9871_3845367211"/></text:p>
      <text:list text:style-name="L35">
        <text:list-item>
          <text:p text:style-name="P228"><text:span text:style-name="T210">sur </text:span><text:span text:style-name="T211">schema-registry</text:span><text:span text:style-name="T210"> (</text:span>localhost:808<text:span text:style-name="T210">5</text:span>/subjects<text:span text:style-name="T211">)</text:span></text:p>
        </text:list-item>
        <text:list-item>
          <text:p text:style-name="P226">ou via votre outil d’admin</text:p>
        </text:list-item>
      </text:list>
      <text:h text:style-name="P137" text:outline-level="1"/>
      <text:p text:style-name="P230"><text:bookmark-start text:name="__RefHeading___Toc9875_3845367211"/><text:span text:style-name="T40">V</text:span><text:span text:style-name="T39">érifier que </text:span><text:span text:style-name="T42">l’outil graphique</text:span><text:span text:style-name="T45"> </text:span><text:span text:style-name="T39">puisse lire les messages </text:span><text:span text:style-name="T43">Avro</text:span><text:bookmark-end text:name="__RefHeading___Toc9875_3845367211"/></text:p>
      <text:p text:style-name="P164"/>
      <text:h text:style-name="P114" text:outline-level="2"><text:bookmark-start text:name="__RefHeading___Toc9796_3845367211"/><text:span text:style-name="T216">4</text:span>.3 Consommateur de message<text:bookmark-end text:name="__RefHeading___Toc9796_3845367211"/></text:h>
      <text:p text:style-name="P156"><text:span text:style-name="T133">Récupérer le projet </text:span><text:span text:style-name="T138">consumer</text:span><text:span text:style-name="T139">-avro </text:span></text:p>
      <text:p text:style-name="P157"><text:span text:style-name="T132">Visualiser le code source </text:span><text:span text:style-name="T135">et en particulier la boucle de poll et l’utilisation de </text:span><text:span text:style-name="T138">GenericMessage</text:span></text:p>
      <text:p text:style-name="P153"/>
      <text:p text:style-name="P164"><text:span text:style-name="T145">Lancer ensuite </text:span><text:span text:style-name="T137">./mvnw package</text:span><text:span text:style-name="T145"> pour construire l’exécutable</text:span></text:p>
      <text:p text:style-name="P164"/>
      <text:p text:style-name="P164">Consommer les messages du topic précédent <text:span text:style-name="T212">avec la commande </text:span></text:p>
      <text:p text:style-name="P132">java -jar target/consumer-0.0.1-SNAPSHOT-jar-with-dependencies.jar 2 1</text:p>
      <text:p text:style-name="P145"/>
      <text:p text:style-name="P164">Laisser le programme tourner</text:p>
      <text:h text:style-name="P142" text:outline-level="1"><text:soft-page-break/></text:h>
      <text:h text:style-name="P114" text:outline-level="2"><text:bookmark-start text:name="__RefHeading___Toc9798_38453672111"/><text:span text:style-name="T216">4</text:span><text:span text:style-name="T213">.4</text:span> <text:span text:style-name="T151">Evolution</text:span> du schéma <text:span text:style-name="T152">compatible</text:span><text:bookmark-end text:name="__RefHeading___Toc9798_38453672111"/></text:h>
      <text:p text:style-name="P230"><text:bookmark-start text:name="__RefHeading___Toc9800_38453672111"/><text:span text:style-name="T54">Mettre</text:span><text:span text:style-name="T28"> à jour le schéma </text:span><text:span text:style-name="T55">en ajoutant les champs optionnels : </text:span><text:span text:style-name="T28"><text:s/></text:span><text:span text:style-name="T48">firstName</text:span><text:span text:style-name="T28"> dans la structure </text:span><text:span text:style-name="T48">Cour</text:span><text:span text:style-name="T49">s</text:span><text:span text:style-name="T48">ier</text:span><text:span text:style-name="T28"> </text:span><text:bookmark-end text:name="__RefHeading___Toc9800_38453672111"/></text:p>
      <text:p text:style-name="P158"><text:bookmark-start text:name="__DdeLink__13624_1047798942"/>{ </text:p>
      <text:p text:style-name="P158"><text:tab/>"name": "first_name",</text:p>
      <text:p text:style-name="P158"><text:tab/>"type": "string",</text:p>
      <text:p text:style-name="P158"><text:tab/>"default": "undefined"</text:p>
      <text:p text:style-name="P160">},<text:bookmark-end text:name="__DdeLink__13624_1047798942"/></text:p>
      <text:p text:style-name="P230"/>
      <text:p text:style-name="P164">Fixer les problèmes de compilation :</text:p>
      <text:p text:style-name="P161">Dans <text:tab/><text:span text:style-name="T19">src/main/java/org/formation/KafkaProducerThread.java</text:span><text:tab/></text:p>
      <text:p text:style-name="P161"/>
      <text:p text:style-name="P161">Changer la ligne 29 par :</text:p>
      <text:p text:style-name="P162">this.courier = new Courier(id, "David", new Position(Math.random() + 45, Math.random() + 2));</text:p>
      <text:p text:style-name="P159"/>
      <text:p text:style-name="P229">Reconstruire l’application via :</text:p>
      <text:p text:style-name="P224">./mvnw clean package</text:p>
      <text:p text:style-name="P230"><text:bookmark-start text:name="__RefHeading___Toc9802_38453672111"/>Relancer le programme de production <text:bookmark-end text:name="__RefHeading___Toc9802_38453672111"/></text:p>
      <text:p text:style-name="P179">java -jar target/producer-avro-0.0.1-SNAPSHOT-jar-with-dependencies.jar 10 500 10 0</text:p>
      <text:p text:style-name="P230"><text:span text:style-name="T214">V</text:span>isualiser <text:span text:style-name="T214">ensuite </text:span>la nouvelle version du schéma dans le registre</text:p>
      <text:p text:style-name="P230"><text:bookmark-start text:name="__RefHeading___Toc9804_38453672111"/>Consommer les messages sans modifications du programme consommateur<text:bookmark-end text:name="__RefHeading___Toc9804_38453672111"/></text:p>
      <text:p text:style-name="P230"/>
      <text:h text:style-name="P114" text:outline-level="2"><text:bookmark-start text:name="__RefHeading___Toc9798_38453672112"/><text:span text:style-name="T216">4</text:span><text:span text:style-name="T215">.</text:span>5 Evolution du schéma incompatible<text:bookmark-end text:name="__RefHeading___Toc9798_38453672112"/></text:h>
      <text:p text:style-name="P230"><text:bookmark-start text:name="__RefHeading___Toc9800_38453672112"/><text:span text:style-name="T54">Mettre</text:span><text:span text:style-name="T28"> à jour le schéma </text:span><text:span text:style-name="T55">en ajoutant </text:span><text:span text:style-name="T56">un</text:span><text:span text:style-name="T55"> champs </text:span><text:span text:style-name="T56">obligatoire</text:span><text:span text:style-name="T55"> : </text:span><text:span text:style-name="T28"><text:s/></text:span><text:span text:style-name="T50">vehicle_id</text:span><text:span text:style-name="T28"> dans la structure </text:span><text:span text:style-name="T48">Cour</text:span><text:span text:style-name="T49">s</text:span><text:span text:style-name="T48">ier</text:span><text:span text:style-name="T28"> </text:span><text:bookmark-end text:name="__RefHeading___Toc9800_38453672112"/></text:p>
      <text:p text:style-name="P158"><text:bookmark-start text:name="__DdeLink__13629_1047798942"/><text:tab/>{ </text:p>
      <text:p text:style-name="P158"><text:s text:c="3"/><text:tab/><text:tab/>"name": "vehicle_id",</text:p>
      <text:p text:style-name="P163"><text:span text:style-name="T146"><text:s text:c="3"/><text:tab/><text:tab/>"type": "</text:span><text:span text:style-name="T52">int</text:span><text:span text:style-name="T146">"</text:span></text:p>
      <text:p text:style-name="P158"><text:tab/>},<text:bookmark-end text:name="__DdeLink__13629_1047798942"/></text:p>
      <text:p text:style-name="P230"/>
      <text:p text:style-name="P164">Fixer les problèmes de compilation</text:p>
      <text:p text:style-name="P161">Dans <text:tab/><text:span text:style-name="T19">src/main/java/org/formation/KafkaProducerThread.java</text:span><text:tab/></text:p>
      <text:p text:style-name="P161">Changer la ligne 29 par :</text:p>
      <text:p text:style-name="P162">this.courier = new Courier(id, "David", <text:span text:style-name="T215">1, </text:span>new Position(Math.random() + 45, Math.random() + 2));</text:p>
      <text:p text:style-name="P161"/>
      <text:p text:style-name="P230"><text:bookmark-start text:name="__RefHeading___Toc9802_38453672112"/>Relancer le programme de production et visualiser l’exception au moment de l’enregistrement du nouveau schéma. <text:bookmark-end text:name="__RefHeading___Toc9802_38453672112"/></text:p>
      <text:p text:style-name="P222"><text:span text:style-name="T123"/></text:p>
      <text:h text:style-name="P98" text:outline-level="1"><text:bookmark-start text:name="__RefHeading___Toc9814_3845367211"/>Atelier <text:span text:style-name="T169">5</text:span>. Kafka Connect<text:bookmark-end text:name="__RefHeading___Toc9814_3845367211"/></text:h>
      <text:p text:style-name="P56"/>
      <text:p text:style-name="P56"><text:span text:style-name="T102">Objectifs </text:span>: <text:span text:style-name="T104">Déverser le topic </text:span><text:span text:style-name="T6">position</text:span><text:span text:style-name="T104"> dans un index ElasticSearch </text:span></text:p>
      <text:h text:style-name="P108" text:outline-level="2"/>
      <text:h text:style-name="Heading_20_2" text:outline-level="2"><text:bookmark-start text:name="__RefHeading___Toc3462_866167920"/>5.1 Installation du plugin ElasticSearch dans kafka connect<text:bookmark-end text:name="__RefHeading___Toc3462_866167920"/></text:h>
      <text:p text:style-name="Text_20_body">Visualiser le fichier Dockerfile fourni et construire une image <text:span text:style-name="T19">my-kafka-connect-with-elasticsearch </text:span>via :</text:p>
      <text:p text:style-name="commande">docker build -t my-kafka-connect-with-elasticsearch .</text:p>
      <text:h text:style-name="Heading_20_2" text:outline-level="2"><text:bookmark-start text:name="__RefHeading___Toc3464_866167920"/>5.2 Démarrage de la stack<text:bookmark-end text:name="__RefHeading___Toc3464_866167920"/></text:h>
      <text:p text:style-name="Text_20_body">Démarrer la nouvelle stack qui ajoute l’image précédemment construite, ElasticSearch et Kibana</text:p>
      <text:p text:style-name="commande">docker-compose up -d</text:p>
      <text:p text:style-name="Text_20_body">Vérifier l’installation du plugin via :</text:p>
      <text:p text:style-name="Text_20_body">http://localhost:8083/connector-plugins</text:p>
      <text:p text:style-name="Text_20_body">Se connecter à kibana localhost :5601 et dans la DevConsole exécuter :</text:p>
      <text:p text:style-name="commande">PUT /position</text:p>
      <text:p text:style-name="commande">{</text:p>
      <text:p text:style-name="commande"><text:s text:c="2"/>"mappings":{</text:p>
      <text:p text:style-name="commande"><text:s text:c="4"/>"properties": {</text:p>
      <text:p text:style-name="commande"><text:s text:c="6"/>"@timestamp": {</text:p>
      <text:p text:style-name="commande"><text:s text:c="8"/>"type": "date",</text:p>
      <text:p text:style-name="commande"><text:s text:c="8"/>"format": "epoch_millis"</text:p>
      <text:p text:style-name="commande"><text:s text:c="6"/>}</text:p>
      <text:p text:style-name="commande"><text:s text:c="4"/>}</text:p>
      <text:p text:style-name="commande"><text:s text:c="2"/>}</text:p>
      <text:p text:style-name="commande">}</text:p>
      <text:p text:style-name="P81">La commande crée un index elasticsearch <text:span text:style-name="T19">position</text:span> avec pour l’instant un seul champ @timestamp</text:p>
      <text:h text:style-name="Heading_20_2" text:outline-level="2"><text:bookmark-start text:name="__RefHeading___Toc3466_866167920"/>5.3 Configuration du connecteur<text:bookmark-end text:name="__RefHeading___Toc3466_866167920"/></text:h>
      <text:p text:style-name="Text_20_body">Définir un connecteur <text:span text:style-name="T19">elasticsearch-sink</text:span> qui déverse le topic position dans l’index position :</text:p>
      <text:p text:style-name="commande">curl -X POST http://localhost:8083/connectors \</text:p>
      <text:p text:style-name="commande">-H "Content-Type: application/json" \</text:p>
      <text:p text:style-name="commande">-d '{</text:p>
      <text:p text:style-name="commande">"name": "elasticsearch-sink",</text:p>
      <text:p text:style-name="commande">"config": {</text:p>
      <text:p text:style-name="commande">"connector.class":</text:p>
      <text:p text:style-name="commande"><text:soft-page-break/>"io.confluent.connect.elasticsearch.ElasticsearchSinkConnector",</text:p>
      <text:p text:style-name="commande">"tasks.max": "1",</text:p>
      <text:p text:style-name="commande">"topics": "position",</text:p>
      <text:p text:style-name="commande">"topic.index.map": "position:position_index",</text:p>
      <text:p text:style-name="commande">"connection.url": "http://elasticsearch:9200",</text:p>
      <text:p text:style-name="commande">"type.name": "log",</text:p>
      <text:p text:style-name="commande">"key.ignore": "true",</text:p>
      <text:p text:style-name="commande">"schema.ignore": "true",</text:p>
      <text:p text:style-name="commande">"key.converter": "org.apache.kafka.connect.json.JsonConverter",</text:p>
      <text:p text:style-name="commande">"key.converter.schemas.enable": "false",</text:p>
      <text:p text:style-name="commande">"value.converter": "org.apache.kafka.connect.json.JsonConverter",</text:p>
      <text:p text:style-name="commande">"value.converter.schemas.enable": "false"</text:p>
      <text:p text:style-name="commande">}</text:p>
      <text:p text:style-name="commande">}'</text:p>
      <text:p text:style-name="Text_20_body">Vous pouvez vérifier la bonne installation du connecteur :</text:p>
      <text:list text:style-name="L12">
        <text:list-item>
          <text:p text:style-name="P182">Via les logs de KafkaConnect</text:p>
        </text:list-item>
        <text:list-item>
          <text:p text:style-name="P182">Via http://localhost:8083 /connectors : Liste des connecteurs actifs</text:p>
        </text:list-item>
        <text:list-item>
          <text:p text:style-name="P182">Via l’interface de RedPanda</text:p>
        </text:list-item>
      </text:list>
      <text:p text:style-name="Text_20_body">Alimenter le topic position</text:p>
      <text:p text:style-name="Text_20_body">Vous pouvez visualiser les effets du connecteur</text:p>
      <text:list text:style-name="L13">
        <text:list-item>
          <text:p text:style-name="P183">Via ElasticSearch : http://localhost:9200/position/_search</text:p>
        </text:list-item>
        <text:list-item>
          <text:p text:style-name="P183">Via Kibana : http://localhost:5601</text:p>
        </text:list-item>
      </text:list>
      <text:h text:style-name="Heading_20_2" text:outline-level="2"><text:bookmark-start text:name="__RefHeading___Toc3468_866167920"/>5.3 Améliorations<text:bookmark-end text:name="__RefHeading___Toc3468_866167920"/></text:h>
      <text:p text:style-name="Text_20_body">Améliorer le fichier de configuration afin que le timestamp Kafka soit renseigné dans le champ <text:span text:style-name="T19">@timestamp </text:span>de l’index d’ElasticSearch</text:p>
      <text:p text:style-name="Text_20_body"><text:span text:style-name="T185">Créer un autre connecteur pour d</text:span>éverser le topic <text:span text:style-name="T19">position-avro</text:span> dans un index <text:span text:style-name="T19">position-avro</text:span></text:p>
      <text:h text:style-name="P99" text:outline-level="1"><text:bookmark-start text:name="__RefHeading___Toc9822_3845367211"/><text:span text:style-name="T89">Atelier </text:span><text:span text:style-name="T182">6</text:span> : <text:span text:style-name="T225">EOS</text:span><text:bookmark-end text:name="__RefHeading___Toc9822_3845367211"/></text:h>
      <text:h text:style-name="P109" text:outline-level="2"><text:bookmark-start text:name="__RefHeading___Toc17798_2862341397"/><text:span text:style-name="T182">6</text:span><text:span text:style-name="T148">.</text:span>1. Transaction et <text:span text:style-name="T174">ISOLATION_LEVEL</text:span><text:bookmark-end text:name="__RefHeading___Toc17798_2862341397"/></text:h>
      <text:h text:style-name="P116" text:outline-level="3"><text:bookmark-start text:name="__RefHeading___Toc9895_3845367211"/><text:span text:style-name="T182">6</text:span>.<text:span text:style-name="T182">1</text:span>.1 <text:span text:style-name="T150">Producteur transactionnel</text:span><text:bookmark-end text:name="__RefHeading___Toc9895_3845367211"/></text:h>
      <text:p text:style-name="P28">Modifier l<text:span text:style-name="T150">e code du producer afin d’englober plusieurs envois de messages dans une transaction.</text:span></text:p>
      <text:p text:style-name="P29">Commiter tous les 10 envois</text:p>
      <text:p text:style-name="P29">Lancer ensuite le programme avec comme arguments 1 <text:span text:style-name="T58">105</text:span> 100 0</text:p>
      <text:p text:style-name="P28">Ce qui signifie que 1 threads envoie 105 messages, les 100 premiers messages font partie de 10</text:p>
      <text:p text:style-name="P28">transactions validées. Les 5 derniers messages ne sont pas validés.</text:p>
      <text:p text:style-name="P28">Visualiser les messages dans une console d’administration.</text:p>
      <text:p text:style-name="P28">Noter le nombre et les offsets, Visualiser le flag transactionnel</text:p>
      <text:h text:style-name="P116" text:outline-level="3"><text:bookmark-start text:name="__RefHeading___Toc9897_3845367211"/><text:span text:style-name="T77">6</text:span><text:span text:style-name="T75">.</text:span><text:span text:style-name="T77">1</text:span><text:span text:style-name="T75">.2 </text:span><text:span text:style-name="T76">Consommateur</text:span><text:bookmark-end text:name="__RefHeading___Toc9897_3845367211"/></text:h>
      <text:p text:style-name="P31">Modifier la configuration du consommateur afin qu’il ne lise que les messages committés</text:p>
      <text:p text:style-name="P31"/>
      <text:h text:style-name="P109" text:outline-level="2"><text:bookmark-start text:name="__RefHeading___Toc9899_3845367211"/><text:span text:style-name="T182">6</text:span>.2 Transfert Exactly Once<text:bookmark-end text:name="__RefHeading___Toc9899_3845367211"/></text:h>
      <text:p text:style-name="P32">Modifier le consommateur afin qu’il transfert exactement une fois les messages produits en amont <text:span text:style-name="T175">vers un autre topic de sortie</text:span></text:p>
      <text:p text:style-name="P30">Éventuellement on peut effectuer un traitement du message comme calculer la distance à un point d’origine.</text:p>
      <text:p text:style-name="P28"/>
      <text:p text:style-name="P28">Vérifier les messages produits et les offsets consommés</text:p>
      <text:h text:style-name="Heading_20_2" text:outline-level="2"><text:bookmark-start text:name="__RefHeading___Toc7597_2982398481"/>6.3 Stockage et rétention<text:bookmark-end text:name="__RefHeading___Toc7597_2982398481"/></text:h>
      <text:p text:style-name="Text_20_body"><text:bookmark-start text:name="__RefHeading___Toc7599_2982398481"/>Ouvrir un bash sur un des nœuds<text:bookmark-end text:name="__RefHeading___Toc7599_2982398481"/></text:p>
      <text:p text:style-name="commande">docker exec -it kafka-<text:span text:style-name="T190">1</text:span> bash</text:p>
      <text:p text:style-name="Text_20_body"><text:bookmark-start text:name="__RefHeading___Toc7601_2982398481"/>Visualiser les répertoires de logs sur les brokers :<text:bookmark-end text:name="__RefHeading___Toc7601_2982398481"/></text:p>
      <text:p text:style-name="commande">kafka-log-dirs.sh --bootstrap-server localhost:9092 --describe</text:p>
      <text:p text:style-name="Text_20_body"><text:bookmark-start text:name="__RefHeading___Toc7603_2982398481"/>Visualiser les segments du topic position et apprécier la taille<text:bookmark-end text:name="__RefHeading___Toc7603_2982398481"/></text:p>
      <text:p text:style-name="Text_20_body"><text:bookmark-start text:name="__RefHeading___Toc7605_2982398481"/><text:span text:style-name="T78">Pour le topic position modifier le </text:span><text:span text:style-name="T74">segment.bytes</text:span><text:span text:style-name="T78"> à 1</text:span><text:span text:style-name="T79">0</text:span><text:span text:style-name="T78">Mo</text:span><text:bookmark-end text:name="__RefHeading___Toc7605_2982398481"/></text:p>
      <text:p text:style-name="Text_20_body"><text:bookmark-start text:name="__RefHeading___Toc7607_2982398481"/><text:span text:style-name="T78">Diminuer le </text:span><text:span text:style-name="T74">retention.bytes </text:span><text:span text:style-name="T80">à 50Mo</text:span><text:bookmark-end text:name="__RefHeading___Toc7607_2982398481"/></text:p>
      <text:p text:style-name="Text_20_body"><text:bookmark-start text:name="__RefHeading___Toc7609_2982398481"/>Produire de nombreux messages afin de voir des segments disparaître<text:bookmark-end text:name="__RefHeading___Toc7609_2982398481"/></text:p>
      <text:h text:style-name="P100" text:outline-level="1"><text:bookmark-start text:name="__RefHeading___Toc9820_3845367211"/><text:span text:style-name="T88">Atelier </text:span><text:span text:style-name="T183">7</text:span><text:span text:style-name="T88"> :</text:span> <text:span text:style-name="T170">Introduction à </text:span><text:span text:style-name="T105">KafkaStream</text:span><text:bookmark-end text:name="__RefHeading___Toc9820_3845367211"/></text:h>
      <text:p text:style-name="P57"/>
      <text:p text:style-name="Text_20_body"><text:span text:style-name="Source_20_Text"><text:span text:style-name="T62">Objectifs :</text:span></text:span></text:p>
      <text:p text:style-name="Text_20_body"><text:span text:style-name="Source_20_Text"><text:span text:style-name="T62">Écrire une application Stream qui prend en entrée le topic </text:span></text:span><text:span text:style-name="Source_20_Text"><text:span text:style-name="T82">position-avro</text:span></text:span></text:p>
      <text:h text:style-name="P110" text:outline-level="2"><text:bookmark-start text:name="__RefHeading___Toc7611_2982398481"/><text:span text:style-name="Source_20_Text"><text:span text:style-name="T125">7.1 Opérateurs stateless</text:span></text:span><text:bookmark-end text:name="__RefHeading___Toc7611_2982398481"/></text:h>
      <text:p text:style-name="Text_20_body"><text:span text:style-name="Source_20_Text"><text:span text:style-name="T62">Créer un projet </text:span></text:span><text:span text:style-name="Source_20_Text"><text:span text:style-name="T82">PositionStream</text:span></text:span><text:span text:style-name="Source_20_Text"><text:span text:style-name="T62"> et installer le package </text:span></text:span><text:span text:style-name="Source_20_Text"><text:span text:style-name="T82">io.confluent :kafka-avro-serializer</text:span></text:span></text:p>
      <text:p text:style-name="Standard"><text:span text:style-name="Source_20_Text"><text:span text:style-name="T62"/></text:span></text:p>
      <text:p text:style-name="Text_20_body"><text:span text:style-name="Source_20_Text"><text:span text:style-name="T62">Reprendre le schéma Avro initial du producteur Avro et générer les classes </text:span></text:span><text:span text:style-name="Source_20_Text"><text:span text:style-name="T84">du modèle</text:span></text:span></text:p>
      <text:p text:style-name="Text_20_body"><text:span text:style-name="Source_20_Text"><text:span text:style-name="T62"/></text:span></text:p>
      <text:list text:style-name="L14">
        <text:list-item>
          <text:p text:style-name="P184"><text:span text:style-name="Source_20_Text"><text:span text:style-name="T62">Dans un premier temps, transformer les informations de la position d’un coursier en arrondissant la longitude et la latitude à 1 valeur entière.<text:line-break/><text:line-break/>Tester, regarder les timestamp des messages<text:line-break/><text:line-break/>Supprimer le topic de sortie</text:span></text:span></text:p>
        </text:list-item>
        <text:list-item>
          <text:p text:style-name="P184"><text:span text:style-name="Source_20_Text"><text:span text:style-name="T62">Compléter le stream en inversant les clés et Valeurs (La position du coursier devient la clé, l’id du coursier la valeur)<text:line-break/>Tester</text:span></text:span></text:p>
        </text:list-item>
        <text:list-item>
          <text:p text:style-name="P184"><text:span text:style-name="Source_20_Text"><text:span text:style-name="T62">Utiliser branch pour créer 2 topic</text:span></text:span><text:span text:style-name="Source_20_Text"><text:span text:style-name="T86">s</text:span></text:span><text:span text:style-name="Source_20_Text"><text:span text:style-name="T62"> de sortie un contenant les positions dont la latitude est supérieure à 45.0 et l’autre le reste<text:line-break/>Tester</text:span></text:span></text:p>
        </text:list-item>
      </text:list>
      <text:h text:style-name="P110" text:outline-level="2"><text:bookmark-start text:name="__RefHeading___Toc7613_2982398481"/><text:span text:style-name="Source_20_Text"><text:span text:style-name="T125">7.2 Opérateurs stateful</text:span></text:span><text:bookmark-end text:name="__RefHeading___Toc7613_2982398481"/></text:h>
      <text:h text:style-name="Heading_20_3" text:outline-level="3"><text:bookmark-start text:name="__RefHeading___Toc3470_866167920"/><text:span text:style-name="Source_20_Text"><text:span text:style-name="T85">7.2.1</text:span></text:span><text:span text:style-name="Source_20_Text"><text:span text:style-name="T62"> Count</text:span></text:span><text:bookmark-end text:name="__RefHeading___Toc3470_866167920"/></text:h>
      <text:p text:style-name="P82"><text:span text:style-name="Source_20_Text"><text:span text:style-name="T62">Sur les branches nord/sud précédentes, effectuer une agrégation de type Count(), i.e compter le nombre de coursier ayant passé à une position donné. </text:span></text:span></text:p>
      <text:p text:style-name="P82"><text:span text:style-name="Source_20_Text"><text:span text:style-name="T62">Tester </text:span></text:span></text:p>
      <text:p text:style-name="P82"><text:span text:style-name="Source_20_Text"><text:span text:style-name="T62">Modifier en utilisant une fenêtre temporelle de 5 minutes. </text:span></text:span></text:p>
      <text:h text:style-name="Heading_20_3" text:outline-level="3"><text:bookmark-start text:name="__RefHeading___Toc3472_866167920"/><text:span text:style-name="Source_20_Text"><text:span text:style-name="T85">7.2.2</text:span></text:span><text:span text:style-name="Source_20_Text"><text:span text:style-name="T62"> Aggregate</text:span></text:span><text:bookmark-end text:name="__RefHeading___Toc3472_866167920"/></text:h>
      <text:p text:style-name="P82"><text:span text:style-name="Source_20_Text"><text:span text:style-name="T62">Nous voulons dorénavant avoir en temps-réel, la liste des coursiers associés à une position. Implémenter via une fonction aggregate, la valeur agrégée étant une liste </text:span></text:span></text:p>
      <text:list text:style-name="L15">
        <text:list-item>
          <text:p text:style-name="P185"><text:span text:style-name="Source_20_Text"><text:span text:style-name="T62">Partir du topic position </text:span></text:span></text:p>
        </text:list-item>
        <text:list-item>
          <text:p text:style-name="P185"><text:span text:style-name="Source_20_Text"><text:span text:style-name="T62">Transformer la valeur en Position en arrondissant la latitude et la longitude à </text:span></text:span><text:span text:style-name="Source_20_Text"><text:span text:style-name="T85">une position entière</text:span></text:span><text:span text:style-name="Source_20_Text"><text:span text:style-name="T62"> </text:span></text:span></text:p>
        </text:list-item>
        <text:list-item>
          <text:p text:style-name="P185"><text:span text:style-name="Source_20_Text"><text:span text:style-name="T62">Transformer en une table contenant la dernière Position du Coursier </text:span></text:span></text:p>
        </text:list-item>
        <text:list-item>
          <text:p text:style-name="P185"><text:span text:style-name="Source_20_Text"><text:span text:style-name="T62">Grouper la table par Position </text:span></text:span></text:p>
        </text:list-item>
        <text:list-item>
          <text:p text:style-name="P185"><text:span text:style-name="Source_20_Text"><text:span text:style-name="T62">Agréger en utilisant un adder et substractor</text:span></text:span></text:p>
        </text:list-item>
      </text:list>
      <text:h text:style-name="P101" text:outline-level="1"/>
      <text:h text:style-name="P102" text:outline-level="1"><text:bookmark-start text:name="__RefHeading___Toc15341_2024334449"/>Atelier 8 : ksqlDB<text:bookmark-end text:name="__RefHeading___Toc15341_2024334449"/></text:h>
      <text:p text:style-name="P190">Objectifs</text:p>
      <text:list text:style-name="L36">
        <text:list-item>
          <text:p text:style-name="P232">Découvrir l'interface CLI de ksqlDB </text:p>
        </text:list-item>
        <text:list-item>
          <text:p text:style-name="P232">Créer des streams et des tables à partir du topic <text:span text:style-name="Source_20_Text">position</text:span> produit aux ateliers précédents </text:p>
        </text:list-item>
        <text:list-item>
          <text:p text:style-name="P232">Écrire des requêtes dérivées pour filtrer et agréger les positions des coursiers </text:p>
        </text:list-item>
        <text:list-item>
          <text:p text:style-name="P233">Comprendre la différence entre Push Query (temps réel) et Pull Query (snapshot) </text:p>
        </text:list-item>
      </text:list>
      <text:p text:style-name="P191">Contexte</text:p>
      <text:p text:style-name="Text_20_body">Dans cet atelier, ksqlDB consomme directement le topic <text:span text:style-name="Source_20_Text">position</text:span> produit par JMeter (atelier 2). Aucun code Java n'est nécessaire — tout se fait en SQL depuis la CLI ou via l'API REST.</text:p>
      <text:h text:style-name="Heading_20_2" text:outline-level="2"><text:bookmark-start text:name="__RefHeading___Toc15343_2024334449"/>8.0 Démarrage de la stack<text:bookmark-end text:name="__RefHeading___Toc15343_2024334449"/></text:h>
      <text:p text:style-name="Text_20_body">Un fichier <text:span text:style-name="Source_20_Text">docker-compose-ksqldb.yml</text:span> vous est fourni. Il étend la stack existante avec :</text:p>
      <text:list text:style-name="L37">
        <text:list-item>
          <text:p text:style-name="P235"><text:span text:style-name="Strong_20_Emphasis">ksqlDB Server</text:span> (port 8088) </text:p>
        </text:list-item>
        <text:list-item>
          <text:p text:style-name="P234"><text:span text:style-name="Strong_20_Emphasis">ksqlDB CLI</text:span> (client interactif) </text:p>
        </text:list-item>
      </text:list>
      <text:p text:style-name="P236"/>
      <text:p text:style-name="commande"><text:span text:style-name="Source_20_Text">docker compose -f docker-compose-ksqldb.yml up -d</text:span></text:p>
      <text:p text:style-name="Text_20_body">Vérifier que le serveur est opérationnel :</text:p>
      <text:p text:style-name="commande"><text:span text:style-name="Source_20_Text">curl http://localhost:8088/info</text:span></text:p>
      <text:h text:style-name="Heading_20_2" text:outline-level="2"><text:bookmark-start text:name="__RefHeading___Toc15345_2024334449"/>8.1 Getting Started<text:bookmark-end text:name="__RefHeading___Toc15345_2024334449"/></text:h>
      <text:p text:style-name="P192"><text:bookmark-start text:name="__RefHeading___Toc15347_2024334449"/>Connexion à la CLI<text:bookmark-end text:name="__RefHeading___Toc15347_2024334449"/></text:p>
      <text:p text:style-name="commande"><text:span text:style-name="Source_20_Text">docker exec -it ksqldb-cli ksql http://ksqldb-server:8088</text:span></text:p>
      <text:p text:style-name="Text_20_body">Explorer l'environnement :</text:p>
      <text:p text:style-name="P123"><text:span text:style-name="Source_20_Text"><text:span text:style-name="T219">SHOW</text:span></text:span><text:span text:style-name="Source_20_Text"><text:span text:style-name="T217"> TOPICS</text:span></text:span><text:span text:style-name="Source_20_Text"><text:span text:style-name="T220">;</text:span></text:span></text:p>
      <text:p text:style-name="P123"><text:span text:style-name="Source_20_Text"><text:span text:style-name="T219">SHOW</text:span></text:span><text:span text:style-name="Source_20_Text"><text:span text:style-name="T217"> STREAMS</text:span></text:span><text:span text:style-name="Source_20_Text"><text:span text:style-name="T220">;</text:span></text:span></text:p>
      <text:p text:style-name="P122"><text:span text:style-name="Source_20_Text"><text:span text:style-name="T219">SHOW</text:span></text:span><text:span text:style-name="Source_20_Text"><text:span text:style-name="T217"> </text:span></text:span><text:span text:style-name="Source_20_Text"><text:span text:style-name="T219">TABLES</text:span></text:span><text:span text:style-name="Source_20_Text"><text:span text:style-name="T220">;</text:span></text:span></text:p>
      <text:p text:style-name="Text_20_body">Inspecter le topic <text:span text:style-name="Source_20_Text">position</text:span> pour voir les messages existants :</text:p>
      <text:p text:style-name="P122"><text:span text:style-name="Source_20_Text"><text:span text:style-name="T219">PRINT</text:span></text:span><text:span text:style-name="Source_20_Text"><text:span text:style-name="T217"> </text:span></text:span><text:span text:style-name="Source_20_Text"><text:span text:style-name="T222">'position'</text:span></text:span><text:span text:style-name="Source_20_Text"><text:span text:style-name="T217"> </text:span></text:span><text:span text:style-name="Source_20_Text"><text:span text:style-name="T219">FROM</text:span></text:span><text:span text:style-name="Source_20_Text"><text:span text:style-name="T217"> BEGINNING </text:span></text:span><text:span text:style-name="Source_20_Text"><text:span text:style-name="T219">LIMIT</text:span></text:span><text:span text:style-name="Source_20_Text"><text:span text:style-name="T217"> </text:span></text:span><text:span text:style-name="Source_20_Text"><text:span text:style-name="T223">5</text:span></text:span><text:span text:style-name="Source_20_Text"><text:span text:style-name="T220">;</text:span></text:span></text:p>
      <text:p text:style-name="Text_20_body">Observer la structure d'un message : <text:span text:style-name="Source_20_Text">courierId</text:span>, <text:span text:style-name="Source_20_Text">latitude</text:span>, <text:span text:style-name="Source_20_Text">longitude</text:span>, <text:span text:style-name="Source_20_Text">timestamp</text:span>.</text:p>
      <text:p text:style-name="P192"><text:bookmark-start text:name="__RefHeading___Toc15349_2024334449"/>Créer le stream de base<text:bookmark-end text:name="__RefHeading___Toc15349_2024334449"/></text:p>
      <text:p text:style-name="Text_20_body">Créer un stream <text:span text:style-name="Source_20_Text">positions</text:span> mappé sur le topic <text:span text:style-name="Source_20_Text">position</text:span> :</text:p>
      <text:p text:style-name="P123"><text:span text:style-name="Source_20_Text"><text:span text:style-name="T220">CREATE STREAM positions (</text:span></text:span></text:p>
      <text:p text:style-name="P123"><text:span text:style-name="Source_20_Text"><text:span text:style-name="T220"><text:s text:c="4"/>courierId VARCHAR,</text:span></text:span></text:p>
      <text:p text:style-name="P123"><text:span text:style-name="Source_20_Text"><text:span text:style-name="T220"><text:s text:c="4"/>latitude <text:s/>DOUBLE,</text:span></text:span></text:p>
      <text:p text:style-name="P123"><text:span text:style-name="Source_20_Text"><text:span text:style-name="T220"><text:s text:c="4"/>longitude DOUBLE</text:span></text:span></text:p>
      <text:p text:style-name="P123"><text:span text:style-name="Source_20_Text"><text:span text:style-name="T220">) WITH (</text:span></text:span></text:p>
      <text:p text:style-name="P123"><text:span text:style-name="Source_20_Text"><text:span text:style-name="T220"><text:s text:c="4"/>kafka_topic <text:s/>= 'position',</text:span></text:span></text:p>
      <text:p text:style-name="P123"><text:span text:style-name="Source_20_Text"><text:span text:style-name="T220"><text:s text:c="4"/>value_format = 'JSON'</text:span></text:span></text:p>
      <text:p text:style-name="P123"><text:span text:style-name="Source_20_Text"><text:span text:style-name="T220">);</text:span></text:span></text:p>
      <text:p text:style-name="P123"><text:span text:style-name="Source_20_Text"><text:span text:style-name="T220"/></text:span></text:p>
      <text:p text:style-name="Text_20_body">Vérifier la création :</text:p>
      <text:p text:style-name="P122"><text:span text:style-name="Source_20_Text"><text:span text:style-name="T219">DESCRIBE</text:span></text:span><text:span text:style-name="Source_20_Text"><text:span text:style-name="T217"> positions</text:span></text:span><text:span text:style-name="Source_20_Text"><text:span text:style-name="T220">;</text:span></text:span></text:p>
      <text:p text:style-name="Text_20_body"><text:soft-page-break/>Exécuter une première push query pour voir les messages en temps réel. <text:span text:style-name="Strong_20_Emphasis">Dans un autre terminal</text:span>, démarrer JMeter avec <text:span text:style-name="Source_20_Text">NB_COURSIERS=5</text:span>, <text:span text:style-name="Source_20_Text">NB_MESSAGES=100</text:span>, <text:span text:style-name="Source_20_Text">PAUSE_MS=200</text:span>.</text:p>
      <text:p text:style-name="P123"><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latitude</text:span></text:span><text:span text:style-name="Source_20_Text"><text:span text:style-name="T220">,</text:span></text:span><text:span text:style-name="Source_20_Text"><text:span text:style-name="T217"> longitude</text:span></text:span></text:p>
      <text:p text:style-name="P123"><text:span text:style-name="Source_20_Text"><text:span text:style-name="T219">FROM</text:span></text:span><text:span text:style-name="Source_20_Text"><text:span text:style-name="T217"> positions</text:span></text:span></text:p>
      <text:p text:style-name="P120"><text:span text:style-name="Source_20_Text"><text:span text:style-name="T217">EMIT CHANGES</text:span></text:span></text:p>
      <text:p text:style-name="P122"><text:span text:style-name="Source_20_Text"><text:span text:style-name="T219">LIMIT</text:span></text:span><text:span text:style-name="Source_20_Text"><text:span text:style-name="T217"> </text:span></text:span><text:span text:style-name="Source_20_Text"><text:span text:style-name="T223">10</text:span></text:span><text:span text:style-name="Source_20_Text"><text:span text:style-name="T220">;</text:span></text:span></text:p>
      <text:p text:style-name="Text_20_body">Observer les messages défiler. Appuyer sur <text:span text:style-name="Source_20_Text">Ctrl+C</text:span> pour arrêter.</text:p>
      <text:h text:style-name="Heading_20_2" text:outline-level="2"><text:bookmark-start text:name="__RefHeading___Toc15351_2024334449"/>8.2 Transformations et filtres<text:bookmark-end text:name="__RefHeading___Toc15351_2024334449"/></text:h>
      <text:p text:style-name="P192"><text:bookmark-start text:name="__RefHeading___Toc15353_2024334449"/>Stream dérivé — positions dans Paris<text:bookmark-end text:name="__RefHeading___Toc15353_2024334449"/></text:p>
      <text:p text:style-name="Text_20_body">Créer un stream ne contenant que les positions dans la zone parisienne (latitude entre 48.8 et 48.95, longitude entre 2.2 et 2.5) :</text:p>
      <text:p text:style-name="P236"/>
      <text:p text:style-name="P123"><text:span text:style-name="Source_20_Text"><text:span text:style-name="T220">CREATE STREAM positions_paris AS</text:span></text:span></text:p>
      <text:p text:style-name="P123"><text:span text:style-name="Source_20_Text"><text:span text:style-name="T220"><text:s text:c="4"/>SELECT courierId,</text:span></text:span></text:p>
      <text:p text:style-name="P123"><text:span text:style-name="Source_20_Text"><text:span text:style-name="T220"><text:s text:c="11"/>latitude,</text:span></text:span></text:p>
      <text:p text:style-name="P123"><text:span text:style-name="Source_20_Text"><text:span text:style-name="T220"><text:s text:c="11"/>longitude</text:span></text:span></text:p>
      <text:p text:style-name="P123"><text:span text:style-name="Source_20_Text"><text:span text:style-name="T220"><text:s text:c="4"/>FROM positions</text:span></text:span></text:p>
      <text:p text:style-name="P123"><text:span text:style-name="Source_20_Text"><text:span text:style-name="T220"><text:s text:c="4"/>WHERE latitude <text:s/>BETWEEN 48.80 AND 48.95</text:span></text:span></text:p>
      <text:p text:style-name="P123"><text:span text:style-name="Source_20_Text"><text:span text:style-name="T220"><text:s text:c="6"/>AND longitude BETWEEN 2.20 <text:s/>AND 2.50</text:span></text:span></text:p>
      <text:p text:style-name="P123"><text:span text:style-name="Source_20_Text"><text:span text:style-name="T220">EMIT CHANGES;</text:span></text:span></text:p>
      <text:p text:style-name="P123"><text:span text:style-name="Source_20_Text"><text:span text:style-name="T220"/></text:span></text:p>
      <text:p text:style-name="Text_20_body">Vérifier que le topic correspondant a été créé :</text:p>
      <text:p text:style-name="P122"><text:span text:style-name="Source_20_Text"><text:span text:style-name="T219">SHOW</text:span></text:span><text:span text:style-name="Source_20_Text"><text:span text:style-name="T217"> TOPICS</text:span></text:span><text:span text:style-name="Source_20_Text"><text:span text:style-name="T220">;</text:span></text:span></text:p>
      <text:p text:style-name="Text_20_body">Constater que ksqlDB a créé automatiquement le topic <text:span text:style-name="Source_20_Text">POSITIONS_PARIS</text:span>.</text:p>
      <text:p text:style-name="Text_20_body">Exécuter une push query sur ce stream filtré :</text:p>
      <text:p text:style-name="P122"><text:span text:style-name="Source_20_Text"><text:span text:style-name="T219">SELECT</text:span></text:span><text:span text:style-name="Source_20_Text"><text:span text:style-name="T217"> * </text:span></text:span><text:span text:style-name="Source_20_Text"><text:span text:style-name="T219">FROM</text:span></text:span><text:span text:style-name="Source_20_Text"><text:span text:style-name="T217"> positions_paris EMIT CHANGES </text:span></text:span><text:span text:style-name="Source_20_Text"><text:span text:style-name="T219">LIMIT</text:span></text:span><text:span text:style-name="Source_20_Text"><text:span text:style-name="T217"> </text:span></text:span><text:span text:style-name="Source_20_Text"><text:span text:style-name="T223">5</text:span></text:span><text:span text:style-name="Source_20_Text"><text:span text:style-name="T220">;</text:span></text:span></text:p>
      <text:p text:style-name="P192"><text:bookmark-start text:name="__RefHeading___Toc15355_2024334449"/>Table — dernière position connue par coursier<text:bookmark-end text:name="__RefHeading___Toc15355_2024334449"/></text:p>
      <text:p text:style-name="Text_20_body">Créer une table qui maintient en temps réel la <text:span text:style-name="Strong_20_Emphasis">dernière position connue</text:span> de chaque coursier :</text:p>
      <text:p text:style-name="P236"/>
      <text:p text:style-name="P123"><text:span text:style-name="Source_20_Text"><text:span text:style-name="T219">CREATE</text:span></text:span><text:span text:style-name="Source_20_Text"><text:span text:style-name="T217"> </text:span></text:span><text:span text:style-name="Source_20_Text"><text:span text:style-name="T219">TABLE</text:span></text:span><text:span text:style-name="Source_20_Text"><text:span text:style-name="T217"> last_position </text:span></text:span><text:span text:style-name="Source_20_Text"><text:span text:style-name="T219">AS</text:span></text:span></text:p>
      <text:p text:style-name="P123"><text:span text:style-name="Source_20_Text"><text:span text:style-name="T218"><text:s text:c="4"/></text:span></text:span><text:span text:style-name="Source_20_Text"><text:span text:style-name="T219">SELECT</text:span></text:span><text:span text:style-name="Source_20_Text"><text:span text:style-name="T217"> courierId</text:span></text:span><text:span text:style-name="Source_20_Text"><text:span text:style-name="T220">,</text:span></text:span></text:p>
      <text:p text:style-name="P123"><text:span text:style-name="Source_20_Text"><text:span text:style-name="T218"><text:s text:c="11"/></text:span></text:span><text:span text:style-name="Source_20_Text"><text:span text:style-name="T217">LATEST_BY_OFFSET</text:span></text:span><text:span text:style-name="Source_20_Text"><text:span text:style-name="T220">(</text:span></text:span><text:span text:style-name="Source_20_Text"><text:span text:style-name="T217">latitude</text:span></text:span><text:span text:style-name="Source_20_Text"><text:span text:style-name="T220">)</text:span></text:span><text:span text:style-name="Source_20_Text"><text:span text:style-name="T217"> <text:s/></text:span></text:span><text:span text:style-name="Source_20_Text"><text:span text:style-name="T219">AS</text:span></text:span><text:span text:style-name="Source_20_Text"><text:span text:style-name="T217"> last_lat</text:span></text:span><text:span text:style-name="Source_20_Text"><text:span text:style-name="T220">,</text:span></text:span></text:p>
      <text:p text:style-name="P123"><text:span text:style-name="Source_20_Text"><text:span text:style-name="T218"><text:s text:c="11"/></text:span></text:span><text:span text:style-name="Source_20_Text"><text:span text:style-name="T217">LATEST_BY_OFFSET</text:span></text:span><text:span text:style-name="Source_20_Text"><text:span text:style-name="T220">(</text:span></text:span><text:span text:style-name="Source_20_Text"><text:span text:style-name="T217">longitude</text:span></text:span><text:span text:style-name="Source_20_Text"><text:span text:style-name="T220">)</text:span></text:span><text:span text:style-name="Source_20_Text"><text:span text:style-name="T217"> </text:span></text:span><text:span text:style-name="Source_20_Text"><text:span text:style-name="T219">AS</text:span></text:span><text:span text:style-name="Source_20_Text"><text:span text:style-name="T217"> last_lon</text:span></text:span><text:span text:style-name="Source_20_Text"><text:span text:style-name="T220">,</text:span></text:span></text:p>
      <text:p text:style-name="P123"><text:span text:style-name="Source_20_Text"><text:span text:style-name="T218"><text:s text:c="11"/></text:span></text:span><text:span text:style-name="Source_20_Text"><text:span text:style-name="T206">COUNT</text:span></text:span><text:span text:style-name="Source_20_Text"><text:span text:style-name="T220">(</text:span></text:span><text:span text:style-name="Source_20_Text"><text:span text:style-name="T217">*</text:span></text:span><text:span text:style-name="Source_20_Text"><text:span text:style-name="T220">)</text:span></text:span><text:span text:style-name="Source_20_Text"><text:span text:style-name="T217"> </text:span></text:span><text:span text:style-name="Source_20_Text"><text:span text:style-name="T219">AS</text:span></text:span><text:span text:style-name="Source_20_Text"><text:span text:style-name="T217"> nb_messages</text:span></text:span></text:p>
      <text:p text:style-name="P123"><text:span text:style-name="Source_20_Text"><text:span text:style-name="T218"><text:s text:c="4"/></text:span></text:span><text:span text:style-name="Source_20_Text"><text:span text:style-name="T219">FROM</text:span></text:span><text:span text:style-name="Source_20_Text"><text:span text:style-name="T217"> positions</text:span></text:span></text:p>
      <text:p text:style-name="P123"><text:span text:style-name="Source_20_Text"><text:span text:style-name="T218"><text:s text:c="4"/></text:span></text:span><text:span text:style-name="Source_20_Text"><text:span text:style-name="T219">GROUP</text:span></text:span><text:span text:style-name="Source_20_Text"><text:span text:style-name="T217"> </text:span></text:span><text:span text:style-name="Source_20_Text"><text:span text:style-name="T219">BY</text:span></text:span><text:span text:style-name="Source_20_Text"><text:span text:style-name="T217"> courierId</text:span></text:span></text:p>
      <text:p text:style-name="P122"><text:span text:style-name="Source_20_Text"><text:span text:style-name="T217">EMIT CHANGES</text:span></text:span><text:span text:style-name="Source_20_Text"><text:span text:style-name="T220">;</text:span></text:span></text:p>
      <text:p text:style-name="P237">La table est mise à jour à chaque nouveau message reçu pour un coursier donné.</text:p>
      <text:p text:style-name="P192"><text:bookmark-start text:name="__RefHeading___Toc15357_2024334449"/>Agrégation par zone — coursiers par secteur<text:bookmark-end text:name="__RefHeading___Toc15357_2024334449"/></text:p>
      <text:p text:style-name="Text_20_body">Arrondir les coordonnées à 1 décimale pour créer des secteurs géographiques, et compter combien de coursiers différents ont été vus dans chaque secteur :</text:p>
      <text:p text:style-name="P236"/>
      <text:p text:style-name="P123"><text:span text:style-name="Source_20_Text"><text:span text:style-name="T220">CREATE TABLE positions_par_secteur AS</text:span></text:span></text:p>
      <text:p text:style-name="P123"><text:span text:style-name="Source_20_Text"><text:span text:style-name="T220"><text:s text:c="4"/>SELECT CAST(ROUND(last_lat, 1) AS VARCHAR) + '_' +</text:span></text:span></text:p>
      <text:p text:style-name="P123"><text:soft-page-break/><text:span text:style-name="Source_20_Text"><text:span text:style-name="T220"><text:s text:c="11"/>CAST(ROUND(last_lon, 1) AS VARCHAR) AS secteur,</text:span></text:span></text:p>
      <text:p text:style-name="P123"><text:span text:style-name="Source_20_Text"><text:span text:style-name="T220"><text:s text:c="11"/>COUNT(*) <text:s text:c="15"/>AS nb_coursiers,</text:span></text:span></text:p>
      <text:p text:style-name="P123"><text:span text:style-name="Source_20_Text"><text:span text:style-name="T220"><text:s text:c="11"/>COLLECT_LIST(courierId) AS coursiers</text:span></text:span></text:p>
      <text:p text:style-name="P123"><text:span text:style-name="Source_20_Text"><text:span text:style-name="T220"><text:s text:c="4"/>FROM last_position</text:span></text:span></text:p>
      <text:p text:style-name="P123"><text:span text:style-name="Source_20_Text"><text:span text:style-name="T220"><text:s text:c="4"/>GROUP BY CAST(ROUND(last_lat, 1) AS VARCHAR) + '_' +</text:span></text:span></text:p>
      <text:p text:style-name="P123"><text:span text:style-name="Source_20_Text"><text:span text:style-name="T220"><text:s text:c="13"/>CAST(ROUND(last_lon, 1) AS VARCHAR)</text:span></text:span></text:p>
      <text:p text:style-name="P123"><text:span text:style-name="Source_20_Text"><text:span text:style-name="T220">EMIT CHANGES;</text:span></text:span></text:p>
      <text:p text:style-name="P123"><text:span text:style-name="Source_20_Text"><text:span text:style-name="T220"/></text:span></text:p>
      <text:p text:style-name="Text_20_body"><text:span text:style-name="Source_20_Text"><text:span text:style-name="T62">Faire une sélection sur la table</text:span></text:span></text:p>
      <text:h text:style-name="Heading_20_2" text:outline-level="2"><text:bookmark-start text:name="__RefHeading___Toc15359_2024334449"/>8.3 Requêtes<text:bookmark-end text:name="__RefHeading___Toc15359_2024334449"/></text:h>
      <text:p text:style-name="P192"><text:bookmark-start text:name="__RefHeading___Toc15361_2024334449"/>Push Query — suivi en temps réel<text:bookmark-end text:name="__RefHeading___Toc15361_2024334449"/></text:p>
      <text:p text:style-name="Text_20_body"><text:span text:style-name="Strong_20_Emphasis">Lancer JMeter</text:span> avec <text:span text:style-name="Source_20_Text">NB_COURSIERS=10</text:span>, <text:span text:style-name="Source_20_Text">NB_MESSAGES=1000</text:span>, <text:span text:style-name="Source_20_Text">PAUSE_MS=100</text:span>.</text:p>
      <text:p text:style-name="Text_20_body">Dans la CLI, suivre en temps réel les mises à jour de la table <text:span text:style-name="Source_20_Text">last_position</text:span> :</text:p>
      <text:p text:style-name="P123"><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nb_messages</text:span></text:span></text:p>
      <text:p text:style-name="P123"><text:span text:style-name="Source_20_Text"><text:span text:style-name="T219">FROM</text:span></text:span><text:span text:style-name="Source_20_Text"><text:span text:style-name="T217"> last_position</text:span></text:span></text:p>
      <text:p text:style-name="P122"><text:span text:style-name="Source_20_Text"><text:span text:style-name="T217">EMIT CHANGES</text:span></text:span><text:span text:style-name="Source_20_Text"><text:span text:style-name="T220">;</text:span></text:span></text:p>
      <text:p text:style-name="Text_20_body">Observer les lignes se mettre à jour au fil des messages produits.</text:p>
      <text:p text:style-name="Text_20_body">Filtrer sur un seul coursier (remplacer <text:span text:style-name="Source_20_Text">courier-0</text:span> par un ID visible dans les logs) :</text:p>
      <text:p text:style-name="P123"><text:span text:style-name="Source_20_Text"><text:span text:style-name="T219">SELECT</text:span></text:span><text:span text:style-name="Source_20_Text"><text:span text:style-name="T217"> *</text:span></text:span></text:p>
      <text:p text:style-name="P123"><text:span text:style-name="Source_20_Text"><text:span text:style-name="T219">FROM</text:span></text:span><text:span text:style-name="Source_20_Text"><text:span text:style-name="T217"> last_position</text:span></text:span></text:p>
      <text:p text:style-name="P123"><text:span text:style-name="Source_20_Text"><text:span text:style-name="T219">WHERE</text:span></text:span><text:span text:style-name="Source_20_Text"><text:span text:style-name="T217"> courierId = </text:span></text:span><text:span text:style-name="Source_20_Text"><text:span text:style-name="T222">'courier-0'</text:span></text:span></text:p>
      <text:p text:style-name="P122"><text:span text:style-name="Source_20_Text"><text:span text:style-name="T217">EMIT CHANGES</text:span></text:span><text:span text:style-name="Source_20_Text"><text:span text:style-name="T220">;</text:span></text:span></text:p>
      <text:p text:style-name="P192"><text:bookmark-start text:name="__RefHeading___Toc15363_2024334449"/>Pull Query — snapshot à l'instant T<text:bookmark-end text:name="__RefHeading___Toc15363_2024334449"/></text:p>
      <text:p text:style-name="Text_20_body">Une fois JMeter arrêté, interroger la table pour obtenir l'état courant :</text:p>
      <text:p text:style-name="P123"><text:span text:style-name="Source_20_Text"><text:span text:style-name="T224">-- Dernière position de tous les coursiers</text:span></text:span></text:p>
      <text:p text:style-name="P123"><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nb_messages</text:span></text:span></text:p>
      <text:p text:style-name="P122"><text:span text:style-name="Source_20_Text"><text:span text:style-name="T219">FROM</text:span></text:span><text:span text:style-name="Source_20_Text"><text:span text:style-name="T217"> last_position</text:span></text:span><text:span text:style-name="Source_20_Text"><text:span text:style-name="T220">;</text:span></text:span></text:p>
      <text:p text:style-name="P123"><text:span text:style-name="Source_20_Text"><text:span text:style-name="T224">-- Coursier ayant envoyé le plus de messages</text:span></text:span></text:p>
      <text:p text:style-name="P123"><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nb_messages</text:span></text:span></text:p>
      <text:p text:style-name="P123"><text:span text:style-name="Source_20_Text"><text:span text:style-name="T219">FROM</text:span></text:span><text:span text:style-name="Source_20_Text"><text:span text:style-name="T217"> last_position</text:span></text:span></text:p>
      <text:p text:style-name="P122"><text:span text:style-name="Source_20_Text"><text:span text:style-name="T219">WHERE</text:span></text:span><text:span text:style-name="Source_20_Text"><text:span text:style-name="T217"> nb_messages &gt; </text:span></text:span><text:span text:style-name="Source_20_Text"><text:span text:style-name="T223">50</text:span></text:span><text:span text:style-name="Source_20_Text"><text:span text:style-name="T220">;</text:span></text:span></text:p>
      <text:p text:style-name="P237"><text:span text:style-name="Strong_20_Emphasis">Pull Query vs Push Query</text:span> : la pull query retourne un snapshot et se termine immédiatement. La push query reste ouverte et pousse les mises à jour en continu.</text:p>
      <text:p text:style-name="P192"><text:bookmark-start text:name="__RefHeading___Toc15365_2024334449"/>Push Query avec fenêtre temporelle<text:bookmark-end text:name="__RefHeading___Toc15365_2024334449"/></text:p>
      <text:p text:style-name="Text_20_body">Compter les messages par coursier sur des fenêtres glissantes de 1 minute :</text:p>
      <text:p text:style-name="P123"><text:span text:style-name="Source_20_Text"><text:span text:style-name="T219">SELECT</text:span></text:span><text:span text:style-name="Source_20_Text"><text:span text:style-name="T217"> courierId</text:span></text:span><text:span text:style-name="Source_20_Text"><text:span text:style-name="T220">,</text:span></text:span></text:p>
      <text:p text:style-name="P123"><text:span text:style-name="Source_20_Text"><text:span text:style-name="T218"><text:s text:c="7"/></text:span></text:span><text:span text:style-name="Source_20_Text"><text:span text:style-name="T217">WINDOWSTART </text:span></text:span><text:span text:style-name="Source_20_Text"><text:span text:style-name="T219">AS</text:span></text:span><text:span text:style-name="Source_20_Text"><text:span text:style-name="T217"> debut</text:span></text:span><text:span text:style-name="Source_20_Text"><text:span text:style-name="T220">,</text:span></text:span></text:p>
      <text:p text:style-name="P123"><text:span text:style-name="Source_20_Text"><text:span text:style-name="T218"><text:s text:c="7"/></text:span></text:span><text:span text:style-name="Source_20_Text"><text:span text:style-name="T217">WINDOWEND <text:s text:c="2"/></text:span></text:span><text:span text:style-name="Source_20_Text"><text:span text:style-name="T219">AS</text:span></text:span><text:span text:style-name="Source_20_Text"><text:span text:style-name="T217"> fin</text:span></text:span><text:span text:style-name="Source_20_Text"><text:span text:style-name="T220">,</text:span></text:span></text:p>
      <text:p text:style-name="P123"><text:span text:style-name="Source_20_Text"><text:span text:style-name="T218"><text:s text:c="7"/></text:span></text:span><text:span text:style-name="Source_20_Text"><text:span text:style-name="T206">COUNT</text:span></text:span><text:span text:style-name="Source_20_Text"><text:span text:style-name="T220">(</text:span></text:span><text:span text:style-name="Source_20_Text"><text:span text:style-name="T217">*</text:span></text:span><text:span text:style-name="Source_20_Text"><text:span text:style-name="T220">)</text:span></text:span><text:span text:style-name="Source_20_Text"><text:span text:style-name="T217"> <text:s text:c="3"/></text:span></text:span><text:span text:style-name="Source_20_Text"><text:span text:style-name="T219">AS</text:span></text:span><text:span text:style-name="Source_20_Text"><text:span text:style-name="T217"> nb</text:span></text:span></text:p>
      <text:p text:style-name="P123"><text:span text:style-name="Source_20_Text"><text:span text:style-name="T219">FROM</text:span></text:span><text:span text:style-name="Source_20_Text"><text:span text:style-name="T217"> positions</text:span></text:span></text:p>
      <text:p text:style-name="P123"><text:span text:style-name="Source_20_Text"><text:span text:style-name="T217">WINDOW TUMBLING </text:span></text:span><text:span text:style-name="Source_20_Text"><text:span text:style-name="T220">(</text:span></text:span><text:span text:style-name="Source_20_Text"><text:span text:style-name="T217">SIZE </text:span></text:span><text:span text:style-name="Source_20_Text"><text:span text:style-name="T223">1</text:span></text:span><text:span text:style-name="Source_20_Text"><text:span text:style-name="T217"> </text:span></text:span><text:span text:style-name="Source_20_Text"><text:span text:style-name="T219">MINUTE</text:span></text:span><text:span text:style-name="Source_20_Text"><text:span text:style-name="T220">)</text:span></text:span></text:p>
      <text:p text:style-name="P123"><text:span text:style-name="Source_20_Text"><text:span text:style-name="T219">GROUP</text:span></text:span><text:span text:style-name="Source_20_Text"><text:span text:style-name="T217"> </text:span></text:span><text:span text:style-name="Source_20_Text"><text:span text:style-name="T219">BY</text:span></text:span><text:span text:style-name="Source_20_Text"><text:span text:style-name="T217"> courierId</text:span></text:span></text:p>
      <text:p text:style-name="P122"><text:span text:style-name="Source_20_Text"><text:span text:style-name="T217">EMIT CHANGES</text:span></text:span><text:span text:style-name="Source_20_Text"><text:span text:style-name="T220">;</text:span></text:span></text:p>
      <text:p text:style-name="Text_20_body">Relancer JMeter et observer les compteurs se réinitialiser à chaque nouvelle fenêtre.</text:p>
      <text:h text:style-name="Heading_20_2" text:outline-level="2"><text:bookmark-start text:name="__RefHeading___Toc15367_2024334449"/><text:soft-page-break/>8.4 Pour aller plus loin (optionnel)<text:bookmark-end text:name="__RefHeading___Toc15367_2024334449"/></text:h>
      <text:p text:style-name="P192"><text:bookmark-start text:name="__RefHeading___Toc15369_2024334449"/>Requête de proximité avec GEO_DISTANCE<text:bookmark-end text:name="__RefHeading___Toc15369_2024334449"/></text:p>
      <text:p text:style-name="Text_20_body">Créer une table des coursiers proches de la Place de la République (48.8672, 2.3628) :</text:p>
      <text:p text:style-name="P123"><text:span text:style-name="Source_20_Text"><text:span text:style-name="T219">CREATE</text:span></text:span><text:span text:style-name="Source_20_Text"><text:span text:style-name="T217"> </text:span></text:span><text:span text:style-name="Source_20_Text"><text:span text:style-name="T219">TABLE</text:span></text:span><text:span text:style-name="Source_20_Text"><text:span text:style-name="T217"> coursiers_proche_republique </text:span></text:span><text:span text:style-name="Source_20_Text"><text:span text:style-name="T219">AS</text:span></text:span></text:p>
      <text:p text:style-name="P123"><text:span text:style-name="Source_20_Text"><text:span text:style-name="T218"><text:s text:c="4"/></text:span></text:span><text:span text:style-name="Source_20_Text"><text:span text:style-name="T219">SELECT</text:span></text:span><text:span text:style-name="Source_20_Text"><text:span text:style-name="T217"> courierId</text:span></text:span><text:span text:style-name="Source_20_Text"><text:span text:style-name="T220">,</text:span></text:span></text:p>
      <text:p text:style-name="P123"><text:span text:style-name="Source_20_Text"><text:span text:style-name="T218"><text:s text:c="11"/></text:span></text:span><text:span text:style-name="Source_20_Text"><text:span text:style-name="T217">last_lat</text:span></text:span><text:span text:style-name="Source_20_Text"><text:span text:style-name="T220">,</text:span></text:span></text:p>
      <text:p text:style-name="P123"><text:span text:style-name="Source_20_Text"><text:span text:style-name="T218"><text:s text:c="11"/></text:span></text:span><text:span text:style-name="Source_20_Text"><text:span text:style-name="T217">last_lon</text:span></text:span><text:span text:style-name="Source_20_Text"><text:span text:style-name="T220">,</text:span></text:span></text:p>
      <text:p text:style-name="P123"><text:span text:style-name="Source_20_Text"><text:span text:style-name="T218"><text:s text:c="11"/></text:span></text:span><text:span text:style-name="Source_20_Text"><text:span text:style-name="T206">ROUND</text:span></text:span><text:span text:style-name="Source_20_Text"><text:span text:style-name="T220">(</text:span></text:span><text:span text:style-name="Source_20_Text"><text:span text:style-name="T217">GEO_DISTANCE</text:span></text:span><text:span text:style-name="Source_20_Text"><text:span text:style-name="T220">(</text:span></text:span><text:span text:style-name="Source_20_Text"><text:span text:style-name="T217">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text:span></text:span><text:span text:style-name="Source_20_Text"><text:span text:style-name="T223">48.8672</text:span></text:span><text:span text:style-name="Source_20_Text"><text:span text:style-name="T220">,</text:span></text:span><text:span text:style-name="Source_20_Text"><text:span text:style-name="T217"> </text:span></text:span><text:span text:style-name="Source_20_Text"><text:span text:style-name="T223">2.3628</text:span></text:span><text:span text:style-name="Source_20_Text"><text:span text:style-name="T220">),</text:span></text:span><text:span text:style-name="Source_20_Text"><text:span text:style-name="T217"> </text:span></text:span><text:span text:style-name="Source_20_Text"><text:span text:style-name="T223">2</text:span></text:span><text:span text:style-name="Source_20_Text"><text:span text:style-name="T220">)</text:span></text:span><text:span text:style-name="Source_20_Text"><text:span text:style-name="T217"> </text:span></text:span><text:span text:style-name="Source_20_Text"><text:span text:style-name="T219">AS</text:span></text:span><text:span text:style-name="Source_20_Text"><text:span text:style-name="T217"> distance_km</text:span></text:span></text:p>
      <text:p text:style-name="P123"><text:span text:style-name="Source_20_Text"><text:span text:style-name="T218"><text:s text:c="4"/></text:span></text:span><text:span text:style-name="Source_20_Text"><text:span text:style-name="T219">FROM</text:span></text:span><text:span text:style-name="Source_20_Text"><text:span text:style-name="T217"> last_position</text:span></text:span></text:p>
      <text:p text:style-name="P123"><text:span text:style-name="Source_20_Text"><text:span text:style-name="T218"><text:s text:c="4"/></text:span></text:span><text:span text:style-name="Source_20_Text"><text:span text:style-name="T219">WHERE</text:span></text:span><text:span text:style-name="Source_20_Text"><text:span text:style-name="T217"> GEO_DISTANCE</text:span></text:span><text:span text:style-name="Source_20_Text"><text:span text:style-name="T220">(</text:span></text:span><text:span text:style-name="Source_20_Text"><text:span text:style-name="T217">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text:span></text:span><text:span text:style-name="Source_20_Text"><text:span text:style-name="T223">48.8672</text:span></text:span><text:span text:style-name="Source_20_Text"><text:span text:style-name="T220">,</text:span></text:span><text:span text:style-name="Source_20_Text"><text:span text:style-name="T217"> </text:span></text:span><text:span text:style-name="Source_20_Text"><text:span text:style-name="T223">2.3628</text:span></text:span><text:span text:style-name="Source_20_Text"><text:span text:style-name="T220">)</text:span></text:span><text:span text:style-name="Source_20_Text"><text:span text:style-name="T217"> &lt;= </text:span></text:span><text:span text:style-name="Source_20_Text"><text:span text:style-name="T223">5.0</text:span></text:span></text:p>
      <text:p text:style-name="P122"><text:span text:style-name="Source_20_Text"><text:span text:style-name="T217">EMIT CHANGES</text:span></text:span><text:span text:style-name="Source_20_Text"><text:span text:style-name="T220">;</text:span></text:span></text:p>
      <text:p text:style-name="Text_20_body">Pull query pour voir les coursiers actuellement proches :</text:p>
      <text:p text:style-name="P122"><text:span text:style-name="Source_20_Text"><text:span text:style-name="T219">SELECT</text:span></text:span><text:span text:style-name="Source_20_Text"><text:span text:style-name="T217"> * </text:span></text:span><text:span text:style-name="Source_20_Text"><text:span text:style-name="T219">FROM</text:span></text:span><text:span text:style-name="Source_20_Text"><text:span text:style-name="T217"> coursiers_proche_republique</text:span></text:span><text:span text:style-name="Source_20_Text"><text:span text:style-name="T220">;</text:span></text:span></text:p>
      <text:p text:style-name="P192"><text:bookmark-start text:name="__RefHeading___Toc15371_2024334449"/>Explorer les objets créés<text:bookmark-end text:name="__RefHeading___Toc15371_2024334449"/></text:p>
      <text:p text:style-name="P123"><text:span text:style-name="Source_20_Text"><text:span text:style-name="T219">DESCRIBE</text:span></text:span><text:span text:style-name="Source_20_Text"><text:span text:style-name="T217"> </text:span></text:span><text:span text:style-name="Source_20_Text"><text:span text:style-name="T219">EXTENDED</text:span></text:span><text:span text:style-name="Source_20_Text"><text:span text:style-name="T217"> last_position</text:span></text:span><text:span text:style-name="Source_20_Text"><text:span text:style-name="T220">;</text:span></text:span></text:p>
      <text:p text:style-name="P123"><text:span text:style-name="Source_20_Text"><text:span text:style-name="T219">SHOW</text:span></text:span><text:span text:style-name="Source_20_Text"><text:span text:style-name="T217"> QUERIES</text:span></text:span><text:span text:style-name="Source_20_Text"><text:span text:style-name="T220">;</text:span></text:span></text:p>
      <text:p text:style-name="P122"><text:span text:style-name="Source_20_Text"><text:span text:style-name="T219">EXPLAIN</text:span></text:span><text:span text:style-name="Source_20_Text"><text:span text:style-name="T217"> &lt;query_id&gt;</text:span></text:span><text:span text:style-name="Source_20_Text"><text:span text:style-name="T220">;</text:span></text:span></text:p>
      <text:p text:style-name="Text_20_body"><text:span text:style-name="Source_20_Text">DESCRIBE EXTENDED</text:span> affiche les statistiques d'exécution de la requête sous-jacente. <text:span text:style-name="Source_20_Text">SHOW QUERIES</text:span> liste toutes les requêtes persistantes en cours d'exécution.</text:p>
      <text:p text:style-name="P192"><text:bookmark-start text:name="__RefHeading___Toc15373_2024334449"/>Nettoyage<text:bookmark-end text:name="__RefHeading___Toc15373_2024334449"/></text:p>
      <text:p text:style-name="P123"><text:span text:style-name="Source_20_Text"><text:span text:style-name="T219">DROP</text:span></text:span><text:span text:style-name="Source_20_Text"><text:span text:style-name="T217"> </text:span></text:span><text:span text:style-name="Source_20_Text"><text:span text:style-name="T219">TABLE</text:span></text:span><text:span text:style-name="Source_20_Text"><text:span text:style-name="T217"> <text:s/>coursiers_proche_republique </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3"><text:span text:style-name="Source_20_Text"><text:span text:style-name="T219">DROP</text:span></text:span><text:span text:style-name="Source_20_Text"><text:span text:style-name="T217"> </text:span></text:span><text:span text:style-name="Source_20_Text"><text:span text:style-name="T219">TABLE</text:span></text:span><text:span text:style-name="Source_20_Text"><text:span text:style-name="T217"> <text:s/>positions_par_secteur <text:s text:c="6"/></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3"><text:span text:style-name="Source_20_Text"><text:span text:style-name="T219">DROP</text:span></text:span><text:span text:style-name="Source_20_Text"><text:span text:style-name="T217"> </text:span></text:span><text:span text:style-name="Source_20_Text"><text:span text:style-name="T219">TABLE</text:span></text:span><text:span text:style-name="Source_20_Text"><text:span text:style-name="T217"> <text:s/>last_position <text:s text:c="14"/></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3"><text:span text:style-name="Source_20_Text"><text:span text:style-name="T219">DROP</text:span></text:span><text:span text:style-name="Source_20_Text"><text:span text:style-name="T217"> STREAM positions_paris <text:s text:c="12"/></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2"><text:span text:style-name="Source_20_Text"><text:span text:style-name="T219">DROP</text:span></text:span><text:span text:style-name="Source_20_Text"><text:span text:style-name="T217"> STREAM positions</text:span></text:span><text:span text:style-name="Source_20_Text"><text:span text:style-name="T220">;</text:span></text:span></text:p>
      <text:p text:style-name="P231"/>
      <text:h text:style-name="P103" text:outline-level="1"><text:bookmark-start text:name="__RefHeading___Toc9828_38453672111"/><text:span text:style-name="T59">Atelier</text:span><text:span text:style-name="T60">s</text:span><text:span text:style-name="T59"> </text:span><text:span text:style-name="T61">9</text:span><text:span text:style-name="T59">: </text:span><text:span text:style-name="T60">Sécurité</text:span><text:bookmark-end text:name="__RefHeading___Toc9828_38453672111"/></text:h>
      <text:h text:style-name="P111" text:outline-level="2"><text:bookmark-start text:name="__RefHeading___Toc9834_3845367211"/><text:span text:style-name="T115">9</text:span><text:span text:style-name="T112">.</text:span><text:span text:style-name="T117">1</text:span><text:span text:style-name="T112"> </text:span><text:span text:style-name="T118">Mise en place de TLS</text:span><text:bookmark-end text:name="__RefHeading___Toc9834_3845367211"/></text:h>
      <text:p text:style-name="P37"/>
      <text:p text:style-name="Text_20_body">Redémarrer le cluster en utilisant la nouvelle version de docker-compose, le port EXTERNAL utilise dorénavant <text:span text:style-name="T176">SSL</text:span></text:p>
      <text:p text:style-name="Text_20_body">Récupérer le répertoire SSL qui contient un keystore et un trustore self-signed pour localhost</text:p>
      <text:p text:style-name="P73">Modifier <text:span text:style-name="T19">docker-compose.yml</text:span> afin que le répertoire <text:span text:style-name="T19">ssl/mount</text:span> soit correctement monté sur chaque broker.</text:p>
      <text:p text:style-name="P73">Démarrer le cluster et vérifier le certificat produit par le serveur :</text:p>
      <text:p text:style-name="commande">openssl s_client -debug -connect localhost:<text:span text:style-name="T181">1</text:span>9<text:span text:style-name="T181">0</text:span>92</text:p>
      <text:p text:style-name="Text_20_body"/>
      <text:p text:style-name="Text_20_body">Modifier les propriétés du <text:span text:style-name="T188">projet</text:span> <text:span text:style-name="T188">producer</text:span> afin qu’il utilise le protocle SSL pour communiquer</text:p>
      <text:p text:style-name="P78">kafkaProps.put("security.protocol","SSL");</text:p>
      <text:p text:style-name="P78">kafkaProps.put("ssl.truststore.location", "<text:span text:style-name="T188">path-to</text:span>/kafka.truststore.jks");</text:p>
      <text:p text:style-name="P78">kafkaProps.put("ssl.truststore.password","secret");</text:p>
      <text:p text:style-name="Standard"/>
      <text:p text:style-name="P53"/>
      <text:p text:style-name="P66">Vérifier la production de message<text:span text:style-name="T57"> </text:span></text:p>
      <text:p text:style-name="P53"/>
      <text:p text:style-name="P54"/>
      <text:h text:style-name="P111" text:outline-level="2"><text:bookmark-start text:name="__RefHeading___Toc9836_3845367211"/><text:span text:style-name="T177">9</text:span>.<text:span text:style-name="T187">2</text:span> Authentification <text:span text:style-name="T157">avec</text:span> SASL/PLAIN<text:span text:style-name="T124"> </text:span><text:bookmark-end text:name="__RefHeading___Toc9836_3845367211"/></text:h>
      <text:p text:style-name="P25"/>
      <text:h text:style-name="P117" text:outline-level="3"><text:bookmark-start text:name="__RefHeading___Toc14195_3893618287"/><text:span text:style-name="T177">9</text:span>.<text:span text:style-name="T230">2</text:span>.1 Authentification inter-broker<text:bookmark-end text:name="__RefHeading___Toc14195_3893618287"/></text:h>
      <text:p text:style-name="P59">Mettre au point un fichier <text:span text:style-name="T23">kafka_ja</text:span><text:span text:style-name="T26">a</text:span><text:span text:style-name="T23">s.conf</text:span><text:span text:style-name="T157"> </text:span><text:span text:style-name="T158">définissant 2 utilisateurs </text:span><text:span text:style-name="T9">admin </text:span><text:span text:style-name="T94">et</text:span><text:span text:style-name="T9"> alice</text:span><text:span text:style-name="T158"> et indiquant que le serveur utilise l’identité </text:span><text:span text:style-name="T9">admin</text:span><text:span text:style-name="T158"> </text:span>comme suit :</text:p>
      <text:p text:style-name="P147">KafkaServer {</text:p>
      <text:p text:style-name="P146">org.apache.kafka.common.security.plain.PlainLoginModule required</text:p>
      <text:p text:style-name="P146"><text:span text:style-name="T191">username</text:span>=<text:span text:style-name="T232">"admin"</text:span></text:p>
      <text:p text:style-name="P146"><text:span text:style-name="T191">password</text:span>=<text:span text:style-name="T232">"admin-secret"</text:span></text:p>
      <text:p text:style-name="P146"><text:span text:style-name="T191">user_admin</text:span>=<text:span text:style-name="T232">"admin-secret"</text:span></text:p>
      <text:p text:style-name="P146"><text:span text:style-name="T191">user_rest-proxy</text:span>=<text:span text:style-name="T232">"rest-proxy-secret"</text:span></text:p>
      <text:p text:style-name="P146"><text:span text:style-name="T191">user_alice</text:span>=<text:span text:style-name="T232">"alice-secret"</text:span></text:p>
      <text:p text:style-name="P146"><text:span text:style-name="T191">user_bob</text:span>=<text:span text:style-name="T232">"bob-secret"</text:span><text:span text:style-name="T221">;</text:span></text:p>
      <text:p text:style-name="P146">}<text:span text:style-name="T221">;</text:span></text:p>
      <text:p text:style-name="P27"/>
      <text:p text:style-name="P74">Récupérer la nouvelle version de docker-compose et vérifier le montage de volume vers votre fichier <text:span text:style-name="T19">kafka_jaas.conf</text:span> </text:p>
      <text:p text:style-name="P165">Vérifier également la configuration du <text:span text:style-name="T19">rest-proxy</text:span> </text:p>
      <text:p text:style-name="P58">Redémarrer le cluster <text:span text:style-name="T159">et vérifier son bon démarrage</text:span></text:p>
      <text:p text:style-name="P58"/>
      <text:h text:style-name="P117" text:outline-level="3"><text:bookmark-start text:name="__RefHeading___Toc14197_3893618287"/><text:soft-page-break/><text:span text:style-name="T177">9</text:span>.<text:span text:style-name="T230">2</text:span>.<text:span text:style-name="T159">2</text:span> Authentification client<text:bookmark-end text:name="__RefHeading___Toc14197_3893618287"/></text:h>
      <text:p text:style-name="P67"/>
      <text:p text:style-name="P61">Mettre à jour <text:span text:style-name="T177">un</text:span> fichier <text:span text:style-name="T19">client-ssl.properties</text:span> comme suit :</text:p>
      <text:p text:style-name="P49">security.protocol=SASL_SSL</text:p>
      <text:p text:style-name="P49">sasl.mechanism=PLAIN</text:p>
      <text:p text:style-name="P49">sasl.jaas.config=org.apache.kafka.common.security.plain.PlainLoginModule required \</text:p>
      <text:p text:style-name="P49"><text:s text:c="4"/>username="alice" \</text:p>
      <text:p text:style-name="P49"><text:s text:c="4"/>password="alice-secret";</text:p>
      <text:p text:style-name="P49"/>
      <text:p text:style-name="P58">Tester avec :</text:p>
      <text:p text:style-name="P83">docker exec -it kafka-<text:span text:style-name="T190">1</text:span> bash</text:p>
      <text:p text:style-name="P18"><text:span text:style-name="T95"/></text:p>
      <text:p text:style-name="P60">kafka-topics.sh --bootstrap-server localhost:19092 --list --command-config ssl/client-ssl.properties </text:p>
      <text:p text:style-name="P27"/>
      <text:p text:style-name="P26"><text:span text:style-name="T155">Configure</text:span><text:span text:style-name="T154">r</text:span><text:span text:style-name="T155"> le projet </text:span><text:span text:style-name="T190">producer</text:span><text:span text:style-name="T177"> pour qu’il s’authentifie avec l’utilisateur alice</text:span></text:p>
      <text:p text:style-name="P62"/>
      <text:p text:style-name="P176">Tester <text:span text:style-name="T177">l’</text:span>envoi de message, <text:span text:style-name="T156">vérifier la bonne configuration du </text:span><text:span text:style-name="T8">KafkaProducer</text:span><text:span text:style-name="T156"> et la production de message</text:span></text:p>
      <text:p text:style-name="P176"/>
      <text:h text:style-name="P111" text:outline-level="2"><text:bookmark-start text:name="__RefHeading___Toc9891_3845367211"/><text:span text:style-name="T177">9</text:span>.<text:span text:style-name="T187">3</text:span> ACL<text:bookmark-end text:name="__RefHeading___Toc9891_3845367211"/></text:h>
      <text:p text:style-name="P59"/>
      <text:p text:style-name="P75">Visualiser la nouvelle configuration des brokers dans le nouveau <text:span text:style-name="T19">docker-compose.yml</text:span></text:p>
      <text:p text:style-name="P75">Démarrer le cluster.</text:p>
      <text:p text:style-name="P75">Vérifier via Redpanda Console que le lien sécurité permet de créer des ACLs</text:p>
      <text:p text:style-name="P75">Interdire à Alice la production de message et tester</text:p>
      <text:p text:style-name="P75"/>
      <text:h text:style-name="Heading_20_2" text:outline-level="2"><text:bookmark-start text:name="__RefHeading___Toc7619_2982398481"/>9.<text:span text:style-name="T187">4</text:span> Quotas<text:bookmark-end text:name="__RefHeading___Toc7619_2982398481"/></text:h>
      <text:p text:style-name="P75">Définition d’un quota pour l’utilisateur <text:span text:style-name="T1">alice</text:span></text:p>
      <text:p text:style-name="P85">Tester avec :</text:p>
      <text:p text:style-name="P84"><text:span text:style-name="T1">docker exec -it kafka-</text:span><text:span text:style-name="T12">1</text:span><text:span text:style-name="T1"> bash</text:span></text:p>
      <text:p text:style-name="commande">kafka-configs.sh --bootstrap-server localhost:9094 --alter --add-config 'producer_byte_rate=1024,consumer_byte_rate=1024' --entity-type users --entity-name alice </text:p>
      <text:p text:style-name="P75">Relancer <text:span text:style-name="T190">producer</text:span> et observer les <text:span text:style-name="T190">ralentissements de débit</text:span></text:p>
      <text:p text:style-name="P75">Supprimer les quotas :</text:p>
      <text:p text:style-name="commande">kafka-configs.sh --bootstrap-server localhost:909<text:span text:style-name="T190">2</text:span> --alter --delete-config producer_byte_rate --entity-type users --entity-name alice </text:p>
      <text:p text:style-name="commande">kafka-configs.sh --bootstrap-server localhost:909<text:span text:style-name="T190">2</text:span> --alter --delete-config consumer_byte_rate --entity-type users --entity-name alice </text:p>
      <text:h text:style-name="P118" text:outline-level="3"/>
      <text:h text:style-name="P93" text:outline-level="1"><text:bookmark-start text:name="__RefHeading___Toc19194_2024334449"/>Atelier <text:span text:style-name="T231">10 - </text:span><text:s/>Monitoring — Confluent Control Center<text:bookmark-end text:name="__RefHeading___Toc19194_2024334449"/></text:h>
      <text:p text:style-name="P192">Objectifs</text:p>
      <text:list text:style-name="L41">
        <text:list-item>
          <text:p text:style-name="P246">Naviguer dans Confluent Control Center </text:p>
        </text:list-item>
        <text:list-item>
          <text:p text:style-name="P246">Observer le débit de production en temps réel </text:p>
        </text:list-item>
        <text:list-item>
          <text:p text:style-name="P246">Mesurer et interpréter le lag d'un consumer group </text:p>
        </text:list-item>
        <text:list-item>
          <text:p text:style-name="P245">Configurer une alerte et la déclencher </text:p>
        </text:list-item>
      </text:list>
      <text:p text:style-name="P192">Prérequis</text:p>
      <text:p text:style-name="Text_20_body">La stack avec Control Center doit être démarrée (<text:span text:style-name="Source_20_Text">docker-compose up -d</text:span>). Control Center est accessible sur <text:span text:style-name="Source_20_Text">http://localhost:9021</text:span>.</text:p>
      <text:p text:style-name="Text_20_body">Le topic <text:span text:style-name="Source_20_Text">position</text:span> doit exister avec 5 partitions (créé à l'atelier 2).</text:p>
      <text:h text:style-name="Heading_20_2" text:outline-level="2"><text:bookmark-start text:name="__RefHeading___Toc19196_2024334449"/>10.1 Explorer le cluster<text:bookmark-end text:name="__RefHeading___Toc19196_2024334449"/></text:h>
      <text:p text:style-name="Text_20_body">Accéder à <text:span text:style-name="Source_20_Text">http://localhost:9021</text:span> et naviguer vers <text:span text:style-name="Strong_20_Emphasis">Cluster → Overview</text:span>.</text:p>
      <text:p text:style-name="Text_20_body">Observer :</text:p>
      <text:list text:style-name="L42">
        <text:list-item>
          <text:p text:style-name="P248">Le nombre de brokers actifs </text:p>
        </text:list-item>
        <text:list-item>
          <text:p text:style-name="P248">Le graphique <text:span text:style-name="Strong_20_Emphasis">Messages/sec</text:span> (doit être à 0 pour l'instant) </text:p>
        </text:list-item>
        <text:list-item>
          <text:p text:style-name="P247">La valeur <text:span text:style-name="Strong_20_Emphasis">Under-Replicated Partitions</text:span> — doit être à 0 </text:p>
        </text:list-item>
      </text:list>
      <text:p text:style-name="Text_20_body">Naviguer vers <text:span text:style-name="Strong_20_Emphasis">Cluster → Brokers</text:span> et relever pour chaque broker :</text:p>
      <text:list text:style-name="L43">
        <text:list-item>
          <text:p text:style-name="P250">Le <text:span text:style-name="Strong_20_Emphasis">Network Request Rate</text:span> </text:p>
        </text:list-item>
        <text:list-item>
          <text:p text:style-name="P249">Les <text:span text:style-name="Strong_20_Emphasis">Bytes In/sec</text:span> et <text:span text:style-name="Strong_20_Emphasis">Bytes Out/sec</text:span> </text:p>
        </text:list-item>
      </text:list>
      <text:p text:style-name="Text_20_body">Naviguer vers <text:span text:style-name="Strong_20_Emphasis">Cluster → Topics → position</text:span> et noter :</text:p>
      <text:list text:style-name="L44">
        <text:list-item>
          <text:p text:style-name="P252">Le nombre de partitions </text:p>
        </text:list-item>
        <text:list-item>
          <text:p text:style-name="P252">Le facteur de réplication </text:p>
        </text:list-item>
        <text:list-item>
          <text:p text:style-name="P251">La répartition des leaders entre les brokers </text:p>
        </text:list-item>
      </text:list>
      <text:h text:style-name="Heading_20_2" text:outline-level="2"><text:bookmark-start text:name="__RefHeading___Toc19198_2024334449"/>10.2 Observer la production en temps réel<text:bookmark-end text:name="__RefHeading___Toc19198_2024334449"/></text:h>
      <text:p text:style-name="Text_20_body">Lancer JMeter avec les paramètres suivants :</text:p>
      <text:list text:style-name="L45">
        <text:list-item>
          <text:p text:style-name="P254"><text:span text:style-name="Source_20_Text">NB_COURSIERS</text:span> = 20 </text:p>
        </text:list-item>
        <text:list-item>
          <text:p text:style-name="P254"><text:span text:style-name="Source_20_Text">NB_MESSAGES</text:span> = 10000 </text:p>
        </text:list-item>
        <text:list-item>
          <text:p text:style-name="P254"><text:span text:style-name="Source_20_Text">PAUSE_MS</text:span> = 50 </text:p>
        </text:list-item>
        <text:list-item>
          <text:p text:style-name="P253"><text:span text:style-name="Source_20_Text">ACKS</text:span> = 1 </text:p>
        </text:list-item>
      </text:list>
      <text:p text:style-name="Text_20_body">Dans Control Center, naviguer vers <text:span text:style-name="Strong_20_Emphasis">Topics → position → Overview</text:span>.</text:p>
      <text:p text:style-name="Text_20_body">Observer en temps réel :</text:p>
      <text:list text:style-name="L46">
        <text:list-item>
          <text:p text:style-name="P256">Le graphique <text:span text:style-name="Strong_20_Emphasis">Messages/sec produits</text:span> </text:p>
        </text:list-item>
        <text:list-item>
          <text:p text:style-name="P255">La répartition des messages entre les 5 partitions </text:p>
        </text:list-item>
      </text:list>
      <text:p text:style-name="Text_20_body">Naviguer vers <text:span text:style-name="Strong_20_Emphasis">Cluster → Brokers → Metrics</text:span> et observer :</text:p>
      <text:list text:style-name="L47">
        <text:list-item>
          <text:p text:style-name="P258">Le <text:span text:style-name="Strong_20_Emphasis">Network Request Rate</text:span> augmenter </text:p>
        </text:list-item>
        <text:list-item>
          <text:p text:style-name="P257">Les <text:span text:style-name="Strong_20_Emphasis">Bytes In/sec</text:span> sur chaque broker </text:p>
        </text:list-item>
      </text:list>
      <text:p text:style-name="Quotations">Question : la charge est-elle équilibrée entre les 3 brokers ?</text:p>
      <text:p text:style-name="Horizontal_20_Line"/>
      <text:h text:style-name="Heading_20_2" text:outline-level="2"><text:bookmark-start text:name="__RefHeading___Toc19200_2024334449"/><text:soft-page-break/>10.3 Observer le lag consommateur<text:bookmark-end text:name="__RefHeading___Toc19200_2024334449"/></text:h>
      <text:p text:style-name="Text_20_body">Pendant que JMeter produit, démarrer le script consommateur dans un terminal :</text:p>
      <text:p text:style-name="P121"><text:span text:style-name="Source_20_Text">python3 consumer-rest.py --consumer-id consumer-1 --poll-interval 1000</text:span></text:p>
      <text:p text:style-name="Text_20_body">Dans Control Center, naviguer vers <text:span text:style-name="Strong_20_Emphasis">Cluster → Consumer Groups → position-group</text:span>.</text:p>
      <text:p text:style-name="Text_20_body">Observer :</text:p>
      <text:list text:style-name="L48">
        <text:list-item>
          <text:p text:style-name="P260">Le lag total du groupe </text:p>
        </text:list-item>
        <text:list-item>
          <text:p text:style-name="P260">Le lag par partition — est-il équilibré ? </text:p>
        </text:list-item>
        <text:list-item>
          <text:p text:style-name="P259">La colonne <text:span text:style-name="Strong_20_Emphasis">CONSUMER-ID</text:span> — quel membre est assigné à quelle partition </text:p>
        </text:list-item>
      </text:list>
      <text:p text:style-name="Text_20_body"><text:span text:style-name="Strong_20_Emphasis">Provoquer un lag croissant</text:span> en ralentissant le consommateur :</text:p>
      <text:p text:style-name="Text_20_body">Arrêter le script et le relancer avec un poll interval plus long :</text:p>
      <text:p text:style-name="P121"><text:span text:style-name="Source_20_Text">python3 consumer-rest.py --consumer-id consumer-1 --poll-interval 3000</text:span></text:p>
      <text:p text:style-name="Text_20_body">Observer dans Control Center le lag qui augmente sur le graphique d'évolution.</text:p>
      <text:p text:style-name="Text_20_body">Relancer JMeter si nécessaire pour maintenir la production.</text:p>
      <text:p text:style-name="Quotations">Question : à partir de quel délai le lag commence-t-il à croître ?</text:p>
      <text:h text:style-name="Heading_20_2" text:outline-level="2"><text:bookmark-start text:name="__RefHeading___Toc19202_2024334449"/>10.4 Simuler une panne broker<text:bookmark-end text:name="__RefHeading___Toc19202_2024334449"/></text:h>
      <text:p text:style-name="Text_20_body">Pendant que JMeter produit, arrêter un broker :</text:p>
      <text:p text:style-name="P121"><text:span text:style-name="Source_20_Text">docker stop kafka-2</text:span></text:p>
      <text:p text:style-name="Text_20_body">Dans Control Center, observer immédiatement :</text:p>
      <text:list text:style-name="L49">
        <text:list-item>
          <text:p text:style-name="P262"><text:span text:style-name="Strong_20_Emphasis">Under-Replicated Partitions</text:span> passe à une valeur &gt; 0 </text:p>
        </text:list-item>
        <text:list-item>
          <text:p text:style-name="P262"><text:span text:style-name="Strong_20_Emphasis">Broker Count</text:span> passe à 2 </text:p>
        </text:list-item>
        <text:list-item>
          <text:p text:style-name="P261">Les leaders de partitions sont réélus sur les brokers restants </text:p>
        </text:list-item>
      </text:list>
      <text:p text:style-name="Text_20_body">Relancer le broker :</text:p>
      <text:p text:style-name="P121"><text:span text:style-name="Source_20_Text">docker compose up -d kafka-2</text:span></text:p>
      <text:p text:style-name="Text_20_body">Observer la réintégration progressive du broker et le retour à 0 des Under-Replicated Partitions.</text:p>
      <text:h text:style-name="Heading_20_2" text:outline-level="2"><text:bookmark-start text:name="__RefHeading___Toc19204_2024334449"/>10.5 Configurer une alerte<text:bookmark-end text:name="__RefHeading___Toc19204_2024334449"/></text:h>
      <text:p text:style-name="Text_20_body">Dans Control Center, naviguer vers <text:span text:style-name="Strong_20_Emphasis">Menu → Alerts → + New alert</text:span>.</text:p>
      <text:p text:style-name="Text_20_body">Configurer l'alerte suivante :</text:p>
      <table:table table:name="Tableau2" table:style-name="Tableau2">
        <table:table-column table:style-name="Tableau2.A"/>
        <table:table-column table:style-name="Tableau2.B"/>
        <table:table-header-rows>
          <table:table-row>
            <table:table-cell table:style-name="Tableau2.A1" office:value-type="string">
              <text:p text:style-name="Table_20_Heading">Champ</text:p>
            </table:table-cell>
            <table:table-cell table:style-name="Tableau2.A1" office:value-type="string">
              <text:p text:style-name="Table_20_Heading">Valeur</text:p>
            </table:table-cell>
          </table:table-row>
        </table:table-header-rows>
        <table:table-row>
          <table:table-cell table:style-name="Tableau2.A1" office:value-type="string">
            <text:p text:style-name="Table_20_Contents">Metric</text:p>
          </table:table-cell>
          <table:table-cell table:style-name="Tableau2.A1" office:value-type="string">
            <text:p text:style-name="Table_20_Contents">Under-Replicated Partitions</text:p>
          </table:table-cell>
        </table:table-row>
        <table:table-row>
          <table:table-cell table:style-name="Tableau2.A1" office:value-type="string">
            <text:p text:style-name="Table_20_Contents">Condition</text:p>
          </table:table-cell>
          <table:table-cell table:style-name="Tableau2.A1" office:value-type="string">
            <text:p text:style-name="Table_20_Contents">&gt; 0</text:p>
          </table:table-cell>
        </table:table-row>
        <table:table-row>
          <table:table-cell table:style-name="Tableau2.A1" office:value-type="string">
            <text:p text:style-name="Table_20_Contents">Duration</text:p>
          </table:table-cell>
          <table:table-cell table:style-name="Tableau2.A1" office:value-type="string">
            <text:p text:style-name="Table_20_Contents">30 secondes</text:p>
          </table:table-cell>
        </table:table-row>
        <table:table-row>
          <table:table-cell table:style-name="Tableau2.A1" office:value-type="string">
            <text:p text:style-name="Table_20_Contents">Notification</text:p>
          </table:table-cell>
          <table:table-cell table:style-name="Tableau2.A1" office:value-type="string">
            <text:p text:style-name="Table_20_Contents">(email ou webhook si disponible)</text:p>
          </table:table-cell>
        </table:table-row>
      </table:table>
      <text:p text:style-name="Text_20_body">Déclencher l'alerte en arrêtant à nouveau un broker :</text:p>
      <text:p text:style-name="P121"><text:span text:style-name="Source_20_Text">docker stop kafka-2</text:span></text:p>
      <text:p text:style-name="Text_20_body">Vérifier dans <text:span text:style-name="Strong_20_Emphasis">Alerts → History</text:span> que l'alerte est bien déclenchée au bout de 30 secondes.</text:p>
      <text:p text:style-name="Text_20_body"><text:soft-page-break/>Relancer le broker et observer la résolution de l'alerte.</text:p>
      <text:p text:style-name="P2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style:font-face style:name="Droid Sans Mono1"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var font-mono" svg:font-family="'var font-mono'"/>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7e_LT_7e_Hintergrund" style:display-name="Vide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7e_LT_7e_Hintergrund" style:display-name="Vide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5f__7e_LT_7e_Hintergrund" style:display-name="Vide_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Courier New" fo:font-family="'Courier New'" style:font-family-generic="modern" style:font-pitch="fixed" officeooo:rsid="01fcfc09" fo:background-color="#ddddd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6-04-19T18:33:55.130986953</dc:date>
    <meta:editing-duration>P38DT3H33M46S</meta:editing-duration>
    <meta:editing-cycles>404</meta:editing-cycles>
    <meta:generator>LibreOffice/24.2.7.2$Linux_X86_64 LibreOffice_project/420$Build-2</meta:generator>
    <meta:print-date>2026-04-17T18:31:05.551959230</meta:print-date>
    <meta:printed-by>Fichiers PDF</meta:printed-by>
    <meta:document-statistic meta:table-count="2" meta:image-count="0" meta:object-count="0" meta:page-count="32" meta:paragraph-count="902" meta:word-count="6140" meta:character-count="41714" meta:non-whitespace-character-count="35993"/>
  </office:meta>
</office:document-meta>
</file>