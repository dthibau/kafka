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nsolas2" svg:font-family="Consolas, Monaco, 'Andale Mono', 'Ubuntu Mono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"/>
    <style:font-face style:name="Droid Sans Mono1" svg:font-family="'Droid Sans Mono', monospace, monospac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OpenSymbol4" svg:font-family="OpenSymbol, 'Arial Unicode MS'" style:font-family-generic="system" style:font-pitch="variable"/>
    <style:font-face style:name="RedHatText" svg:font-family="RedHatText, helvetica, arial, sans-serif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inconsolata" svg:font-family="inconsolata, sans-serif"/>
    <style:font-face style:name="var font-mono" svg:font-family="'var font-mono'"/>
    <style:font-face style:name="var font-mono1" svg:font-family="'var font-mono'" style:font-family-generic="roman" style:font-pitch="variable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3" style:family="paragraph" style:parent-style-name="Text_20_body">
      <style:text-properties fo:font-style="italic" officeooo:rsid="01a8bab4" officeooo:paragraph-rsid="01e526c1" style:font-style-asian="italic" style:font-style-complex="italic"/>
    </style:style>
    <style:style style:name="P4" style:family="paragraph" style:parent-style-name="Text_20_body">
      <style:text-properties fo:font-style="italic" style:text-underline-style="none" style:font-style-asian="italic" style:font-style-complex="italic"/>
    </style:style>
    <style:style style:name="P5" style:family="paragraph" style:parent-style-name="Text_20_body">
      <style:text-properties fo:font-style="italic" fo:font-weight="bold" officeooo:rsid="017c14fa" officeooo:paragraph-rsid="017c14fa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fo:font-weight="bold" officeooo:rsid="01beba6f" officeooo:paragraph-rsid="01beba6f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font-style="italic" fo:font-weight="bold" officeooo:rsid="01e600e1" officeooo:paragraph-rsid="01e600e1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style="italic" fo:font-weight="bold" officeooo:rsid="01c84eaa" officeooo:paragraph-rsid="01c84eaa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style="italic" fo:font-weight="normal" officeooo:rsid="00dd3f97" officeooo:paragraph-rsid="0182dce3" style:font-style-asian="italic" style:font-weight-asian="normal" style:font-style-complex="italic" style:font-weight-complex="normal"/>
    </style:style>
    <style:style style:name="P11" style:family="paragraph" style:parent-style-name="Text_20_body">
      <style:text-properties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11152ad" officeooo:paragraph-rsid="00ce615c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11152ad" officeooo:paragraph-rsid="0182dce3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cd76d4" officeooo:paragraph-rsid="017c14fa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17c63d6" officeooo:paragraph-rsid="017c63d6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17c63d6" officeooo:paragraph-rsid="0180917a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182dce3" officeooo:paragraph-rsid="0182dce3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dd3f97" officeooo:paragraph-rsid="0182dce3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15fbfae" officeooo:paragraph-rsid="01a4cc4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1a4cc4c" officeooo:paragraph-rsid="01a4cc4c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19a2dc4" officeooo:paragraph-rsid="019e1818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1beba6f" officeooo:paragraph-rsid="01beba6f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officeooo:rsid="00e5cefd" officeooo:paragraph-rsid="00e12903" style:font-style-asian="normal" style:font-style-complex="normal"/>
    </style:style>
    <style:style style:name="P25" style:family="paragraph" style:parent-style-name="Text_20_body">
      <style:text-properties fo:font-style="normal" officeooo:rsid="00e03516" officeooo:paragraph-rsid="019e1818" style:font-style-asian="normal" style:font-style-complex="normal"/>
    </style:style>
    <style:style style:name="P26" style:family="paragraph" style:parent-style-name="Text_20_body">
      <style:text-properties fo:font-style="normal" officeooo:rsid="019e1818" officeooo:paragraph-rsid="019e1818" style:font-style-asian="normal" style:font-style-complex="normal"/>
    </style:style>
    <style:style style:name="P27" style:family="paragraph" style:parent-style-name="Text_20_body">
      <style:text-properties fo:font-style="normal" style:text-underline-style="solid" style:text-underline-width="auto" style:text-underline-color="font-color" fo:font-weight="normal" officeooo:rsid="017c63d6" officeooo:paragraph-rsid="017c63d6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style:font-name="Times New Roman" fo:font-size="12pt" fo:font-style="normal" style:text-underline-style="none" fo:font-weight="normal" officeooo:rsid="017c14fa" officeooo:paragraph-rsid="017c14fa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style:font-name="Times New Roman" fo:font-size="12pt" fo:font-style="normal" style:text-underline-style="none" fo:font-weight="normal" officeooo:rsid="019e1818" officeooo:paragraph-rsid="019e181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0" style:family="paragraph" style:parent-style-name="Text_20_body">
      <style:text-properties style:font-name="Times New Roman" fo:font-size="12pt" fo:font-style="normal" fo:font-weight="normal" officeooo:rsid="01870321" officeooo:paragraph-rsid="01870321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text-properties style:font-name="Times New Roman" fo:font-size="12pt" fo:font-style="italic" fo:font-weight="normal" officeooo:rsid="00a5219a" officeooo:paragraph-rsid="0182e9eb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Text_20_body">
      <style:text-properties style:font-name="Times New Roman" fo:font-size="12pt" fo:font-style="italic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33" style:family="paragraph" style:parent-style-name="Text_20_body">
      <style:text-properties style:font-name="Times New Roman" fo:font-size="11.8000001907349pt" fo:font-weight="normal" officeooo:rsid="00fc47ef" officeooo:paragraph-rsid="01030653" style:font-size-asian="11.8000001907349pt" style:font-weight-asian="normal" style:font-size-complex="11.8000001907349pt" style:font-weight-complex="normal"/>
    </style:style>
    <style:style style:name="P34" style:family="paragraph" style:parent-style-name="Text_20_body">
      <style:text-properties style:font-name="Times New Roman" fo:font-size="11.8000001907349pt" fo:font-weight="normal" officeooo:rsid="01081e95" officeooo:paragraph-rsid="01081e95" style:font-size-asian="11.8000001907349pt" style:font-weight-asian="normal" style:font-size-complex="11.8000001907349pt" style:font-weight-complex="normal"/>
    </style:style>
    <style:style style:name="P35" style:family="paragraph" style:parent-style-name="Text_20_body">
      <style:text-properties style:font-name="Times New Roman" fo:font-size="11.8000001907349pt" fo:font-weight="normal" officeooo:rsid="01081e95" officeooo:paragraph-rsid="0225956e" style:font-size-asian="11.8000001907349pt" style:font-weight-asian="normal" style:font-size-complex="11.8000001907349pt" style:font-weight-complex="normal"/>
    </style:style>
    <style:style style:name="P36" style:family="paragraph" style:parent-style-name="Text_20_body">
      <style:text-properties style:font-name="Times New Roman" fo:font-size="11.8000001907349pt" fo:font-weight="normal" officeooo:rsid="01dd64d9" officeooo:paragraph-rsid="01dd64d9" style:font-size-asian="11.8000001907349pt" style:font-weight-asian="normal" style:font-size-complex="11.8000001907349pt" style:font-weight-complex="normal"/>
    </style:style>
    <style:style style:name="P37" style:family="paragraph" style:parent-style-name="Text_20_body">
      <style:text-properties style:font-name="Times New Roman" fo:font-size="11.8000001907349pt" fo:font-weight="normal" officeooo:rsid="00fc47ef" officeooo:paragraph-rsid="0103065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8" style:family="paragraph" style:parent-style-name="Text_20_body">
      <style:text-properties style:font-name="Times New Roman" fo:font-size="11.8000001907349pt" fo:font-weight="normal" officeooo:rsid="00fc47ef" officeooo:paragraph-rsid="0152128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9" style:family="paragraph" style:parent-style-name="Text_20_body">
      <style:text-properties style:font-name="Times New Roman" fo:font-size="11.8000001907349pt" fo:font-weight="normal" officeooo:rsid="01041c13" officeooo:paragraph-rsid="01041c1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0" style:family="paragraph" style:parent-style-name="Text_20_body">
      <style:text-properties style:font-name="Times New Roman" fo:font-size="11.8000001907349pt" fo:font-weight="normal" officeooo:rsid="010be942" officeooo:paragraph-rsid="010be94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1" style:family="paragraph" style:parent-style-name="Text_20_body">
      <style:text-properties style:font-name="Times New Roman" fo:font-size="11.8000001907349pt" fo:font-weight="normal" officeooo:rsid="017b0a72" officeooo:paragraph-rsid="017b0a7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2" style:family="paragraph" style:parent-style-name="Text_20_body">
      <style:text-properties style:font-name="Times New Roman" fo:font-size="11.8000001907349pt" fo:font-weight="normal" officeooo:rsid="01171120" officeooo:paragraph-rsid="01aec91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3" style:family="paragraph" style:parent-style-name="Text_20_body">
      <style:text-properties style:font-name="Times New Roman" fo:font-size="11.8000001907349pt" fo:font-weight="normal" officeooo:rsid="01b2b0c8" officeooo:paragraph-rsid="01b2b0c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4" style:family="paragraph" style:parent-style-name="Text_20_body">
      <style:text-properties style:font-name="Times New Roman" fo:font-size="11.8000001907349pt" fo:font-weight="normal" officeooo:rsid="01b2b0c8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5" style:family="paragraph" style:parent-style-name="Text_20_body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6" style:family="paragraph" style:parent-style-name="Text_20_body">
      <style:text-properties style:font-name="Times New Roman" fo:font-size="11.8000001907349pt" fo:font-weight="normal" officeooo:rsid="0106ea35" officeooo:paragraph-rsid="0106ea35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7" style:family="paragraph" style:parent-style-name="Text_20_body">
      <style:text-properties style:font-name="Times New Roman" fo:font-size="11.8000001907349pt" fo:font-weight="normal" officeooo:rsid="0225956e" officeooo:paragraph-rsid="0225956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8" style:family="paragraph" style:parent-style-name="Text_20_body">
      <style:text-properties style:font-name="Times New Roman" fo:font-size="11.8000001907349pt" style:text-underline-style="solid" style:text-underline-width="auto" style:text-underline-color="font-color" fo:font-weight="normal" officeooo:rsid="017b0a72" officeooo:paragraph-rsid="017b0a7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5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1e7f9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5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97bd3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52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a1c56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53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54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c1945" officeooo:paragraph-rsid="01cc1945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55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d9776" officeooo:paragraph-rsid="01cd9776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56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8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212d54e" officeooo:paragraph-rsid="0212d54e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9" style:family="paragraph" style:parent-style-name="Text_20_body">
      <style:text-properties style:font-name="Times New Roman" fo:font-weight="normal" officeooo:rsid="0106ea35" officeooo:paragraph-rsid="0106ea35" style:font-weight-asian="normal" style:font-weight-complex="normal"/>
    </style:style>
    <style:style style:name="P60" style:family="paragraph" style:parent-style-name="Text_20_body">
      <style:text-properties style:font-name="Times New Roman" fo:font-weight="normal" officeooo:paragraph-rsid="01e064eb"/>
    </style:style>
    <style:style style:name="P61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62" style:family="paragraph" style:parent-style-name="Text_20_body">
      <style:text-properties style:text-underline-style="solid" style:text-underline-width="auto" style:text-underline-color="font-color" fo:font-weight="bold" officeooo:paragraph-rsid="0182e9eb" style:font-weight-asian="bold" style:font-weight-complex="bold"/>
    </style:style>
    <style:style style:name="P63" style:family="paragraph" style:parent-style-name="Standard">
      <style:text-properties style:text-underline-style="solid" style:text-underline-width="auto" style:text-underline-color="font-color" officeooo:rsid="01e339e5" officeooo:paragraph-rsid="01e339e5"/>
    </style:style>
    <style:style style:name="P64" style:family="paragraph" style:parent-style-name="Text_20_body">
      <style:text-properties style:text-underline-style="solid" style:text-underline-width="auto" style:text-underline-color="font-color" officeooo:rsid="0214c47c" officeooo:paragraph-rsid="01f67752"/>
    </style:style>
    <style:style style:name="P65" style:family="paragraph" style:parent-style-name="Standard">
      <style:text-properties style:text-underline-style="solid" style:text-underline-width="auto" style:text-underline-color="font-color" officeooo:rsid="02327a09" officeooo:paragraph-rsid="02327a09"/>
    </style:style>
    <style:style style:name="P66" style:family="paragraph" style:parent-style-name="Text_20_body">
      <style:text-properties style:font-name="Courier New" fo:font-size="10pt" fo:font-weight="normal" officeooo:rsid="00f5df4e" officeooo:paragraph-rsid="015755a9" style:font-name-asian="WenQuanYi Micro Hei" style:font-size-asian="10pt" style:font-weight-asian="normal" style:font-name-complex="Lohit Hindi2" style:font-size-complex="10pt" style:font-weight-complex="normal"/>
    </style:style>
    <style:style style:name="P67" style:family="paragraph" style:parent-style-name="Standard">
      <style:text-properties style:font-name="Courier New" fo:font-size="10pt" officeooo:rsid="01e600e1" officeooo:paragraph-rsid="01e6888c"/>
    </style:style>
    <style:style style:name="P68" style:family="paragraph" style:parent-style-name="Standard">
      <style:text-properties style:font-name="Courier New" fo:font-size="10pt" officeooo:rsid="01e600e1" officeooo:paragraph-rsid="01e600e1"/>
    </style:style>
    <style:style style:name="P69" style:family="paragraph" style:parent-style-name="Text_20_body">
      <style:text-properties style:font-name="Courier New" officeooo:rsid="0106ea35" officeooo:paragraph-rsid="0106ea35"/>
    </style:style>
    <style:style style:name="P7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style:font-name="Courier New" fo:font-size="8pt" fo:font-style="normal" fo:font-weight="normal" officeooo:rsid="00ce615c" officeooo:paragraph-rsid="00dd3f97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style:font-name="Courier New" fo:font-size="8pt" fo:font-style="normal" fo:font-weight="normal" officeooo:rsid="00ce615c" style:font-style-asian="normal" style:font-weight-asian="normal" style:font-style-complex="normal" style:font-weight-complex="normal"/>
    </style:style>
    <style:style style:name="P7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1bcb8d3" officeooo:paragraph-rsid="01bcb8d3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style:font-name="Courier New" fo:font-size="8pt" fo:font-style="normal" fo:font-weight="normal" officeooo:rsid="0241a9a2" officeooo:paragraph-rsid="0241a9a2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style:font-name="Courier New" officeooo:paragraph-rsid="0182e9eb"/>
    </style:style>
    <style:style style:name="P77" style:family="paragraph" style:parent-style-name="Text_20_body">
      <style:text-properties style:font-name="Arial1" fo:font-size="11.8000001907349pt" fo:font-weight="bold" officeooo:rsid="0106ea35" officeooo:paragraph-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8" style:family="paragraph" style:parent-style-name="Text_20_body">
      <style:text-properties style:font-name="Arial1" fo:font-size="11.8000001907349pt" fo:font-weight="bold" officeooo:rsid="01030653" officeooo:paragraph-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9" style:family="paragraph" style:parent-style-name="Text_20_body">
      <style:text-properties style:font-name="Arial1" fo:font-size="11.8000001907349pt" fo:font-weight="bold" officeooo:rsid="0182e9eb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80" style:family="paragraph" style:parent-style-name="Text_20_body">
      <style:text-properties style:font-name="Arial1" fo:font-size="11.8000001907349pt" fo:font-weight="bold" officeooo:rsid="00a76619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81" style:family="paragraph" style:parent-style-name="Text_20_body">
      <style:text-properties style:font-name="Arial1" fo:font-size="11.8000001907349pt" fo:font-style="italic" fo:font-weight="bold" officeooo:rsid="0106ea35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P82" style:family="paragraph" style:parent-style-name="Text_20_body">
      <style:text-properties style:font-name="Arial1" fo:font-size="11.8999996185303pt" fo:font-style="italic" fo:font-weight="bold" officeooo:rsid="00cf3b2e" officeooo:paragraph-rsid="00705e42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83" style:family="paragraph" style:parent-style-name="Text_20_body">
      <style:text-properties style:font-name="Arial1" fo:font-weight="bold" officeooo:rsid="01afc20c" officeooo:paragraph-rsid="01afc20c" style:font-weight-asian="bold" style:font-weight-complex="bold"/>
    </style:style>
    <style:style style:name="P84" style:family="paragraph" style:parent-style-name="Text_20_body">
      <style:text-properties officeooo:rsid="00e03516" officeooo:paragraph-rsid="00e03516"/>
    </style:style>
    <style:style style:name="P85" style:family="paragraph" style:parent-style-name="Text_20_body">
      <style:text-properties officeooo:rsid="01030653" officeooo:paragraph-rsid="01030653"/>
    </style:style>
    <style:style style:name="P86" style:family="paragraph" style:parent-style-name="Text_20_body">
      <style:text-properties officeooo:rsid="0106ea35" officeooo:paragraph-rsid="0106ea35"/>
    </style:style>
    <style:style style:name="P87" style:family="paragraph" style:parent-style-name="Text_20_body">
      <style:text-properties officeooo:rsid="010714ca" officeooo:paragraph-rsid="010714ca"/>
    </style:style>
    <style:style style:name="P88" style:family="paragraph" style:parent-style-name="Text_20_body">
      <style:text-properties officeooo:paragraph-rsid="01081e95"/>
    </style:style>
    <style:style style:name="P89" style:family="paragraph" style:parent-style-name="Text_20_body">
      <style:text-properties fo:color="#000000" loext:opacity="100%" style:font-name="Times New Roman" fo:font-size="12pt" officeooo:rsid="0190248e" officeooo:paragraph-rsid="019127c0" fo:background-color="transparent" style:font-size-asian="12pt" style:font-size-complex="12pt"/>
    </style:style>
    <style:style style:name="P90" style:family="paragraph" style:parent-style-name="Text_20_body">
      <style:text-properties fo:color="#000000" loext:opacity="100%" style:font-name="Times New Roman" fo:font-size="12pt" officeooo:rsid="018e3abc" officeooo:paragraph-rsid="019127c0" fo:background-color="transparent" style:font-size-asian="12pt" style:font-size-complex="12pt"/>
    </style:style>
    <style:style style:name="P91" style:family="paragraph" style:parent-style-name="Text_20_body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92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127c0" fo:background-color="transparent" style:font-size-asian="12pt" style:font-style-asian="italic" style:font-weight-asian="bold" style:font-size-complex="12pt" style:font-style-complex="italic" style:font-weight-complex="bold"/>
    </style:style>
    <style:style style:name="P93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e1818" fo:background-color="transparent" style:font-size-asian="12pt" style:font-style-asian="italic" style:font-weight-asian="bold" style:font-size-complex="12pt" style:font-style-complex="italic" style:font-weight-complex="bold"/>
    </style:style>
    <style:style style:name="P94" style:family="paragraph" style:parent-style-name="Text_20_body">
      <style:text-properties fo:color="#000000" loext:opacity="100%" style:font-name="Times New Roman" fo:font-size="12pt" fo:font-style="italic" style:text-underline-style="none" fo:font-weight="bold" officeooo:rsid="0190248e" officeooo:paragraph-rsid="019fc817" fo:background-color="transparent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95" style:family="paragraph" style:parent-style-name="Standard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1738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ext_20_body">
      <style:text-properties fo:color="#000000" loext:opacity="100%" style:font-name="Times New Roman" fo:font-size="12pt" fo:font-style="normal" style:text-underline-style="solid" style:text-underline-width="auto" style:text-underline-color="font-color" fo:font-weight="normal" officeooo:rsid="017c63d6" officeooo:paragraph-rsid="017c63d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text-properties fo:color="#000000" loext:opacity="100%" style:font-name="Times New Roman" fo:font-size="11.8999996185303pt" fo:font-style="normal" fo:font-weight="normal" officeooo:rsid="01a49154" officeooo:paragraph-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01" style:family="paragraph" style:parent-style-name="Standard">
      <style:text-properties fo:color="#000000" loext:opacity="100%" style:font-name="Times New Roman" fo:font-size="11.8999996185303pt" fo:font-style="italic" fo:font-weight="bold" officeooo:rsid="01a49154" officeooo:paragraph-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02" style:family="paragraph" style:parent-style-name="Text_20_body">
      <style:text-properties fo:color="#000000" loext:opacity="100%" style:font-name="Times New Roman" fo:font-size="11.8999996185303pt" fo:font-style="italic" fo:font-weight="bold" officeooo:rsid="01a49154" officeooo:paragraph-rsid="0207dd43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03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d0aff0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04" style:family="paragraph" style:parent-style-name="Text_20_body">
      <style:text-properties fo:color="#000000" loext:opacity="100%" style:font-name="Arial1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105" style:family="paragraph" style:parent-style-name="Text_20_body">
      <style:text-properties fo:color="#000000" loext:opacity="100%" style:font-name="Arial1" fo:font-size="10.5pt" fo:font-style="italic" style:text-underline-style="none" fo:font-weight="normal" officeooo:rsid="015ccb1c" officeooo:paragraph-rsid="015ccb1c" style:font-name-asian="WenQuanYi Micro Hei" style:font-size-asian="14pt" style:font-style-asian="italic" style:font-weight-asian="normal" style:font-name-complex="Lohit Hindi2" style:font-size-complex="14pt" style:font-style-complex="italic" style:font-weight-complex="normal" style:text-overline-style="none" style:text-overline-color="font-color"/>
    </style:style>
    <style:style style:name="P106" style:family="paragraph" style:parent-style-name="Text_20_body">
      <style:text-properties fo:color="#000000" loext:opacity="100%" style:font-name="Arial1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07" style:family="paragraph" style:parent-style-name="Text_20_body">
      <style:text-properties fo:color="#000000" loext:opacity="100%" style:font-name="Arial1" fo:font-size="10.5pt" fo:font-style="normal" style:text-underline-style="none" fo:font-weight="normal" officeooo:rsid="02426d6a" officeooo:paragraph-rsid="02426d6a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08" style:family="paragraph" style:parent-style-name="Text_20_body">
      <style:text-properties fo:color="#000000" loext:opacity="100%" style:font-name="Courier New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1.8999996185303pt" style:font-name-asian="WenQuanYi Micro Hei" style:font-size-asian="11.8999996185303pt" style:font-name-complex="Lohit Hindi2" style:font-size-complex="11.8999996185303pt"/>
    </style:style>
    <style:style style:name="P110" style:family="paragraph" style:parent-style-name="Standard">
      <style:paragraph-properties style:line-height-at-least="0.503cm"/>
      <style:text-properties fo:color="#000000" loext:opacity="100%" style:font-name="Droid Sans Mono1" fo:font-size="10.5pt" fo:font-weight="normal" fo:background-color="#ffffff"/>
    </style:style>
    <style:style style:name="P111" style:family="paragraph" style:parent-style-name="Standard">
      <style:paragraph-properties style:line-height-at-least="0.503cm"/>
      <style:text-properties fo:color="#000000" loext:opacity="100%" style:font-name="Droid Sans Mono1" fo:font-size="10.5pt" fo:font-weight="normal" officeooo:rsid="0212d54e" officeooo:paragraph-rsid="0212d54e" fo:background-color="#ffffff"/>
    </style:style>
    <style:style style:name="P112" style:family="paragraph" style:parent-style-name="Standard">
      <style:text-properties officeooo:rsid="0002d88f" officeooo:paragraph-rsid="006f4cb2"/>
    </style:style>
    <style:style style:name="P113" style:family="paragraph" style:parent-style-name="Text_20_body">
      <style:text-properties fo:font-weight="bold" officeooo:rsid="018cbe8f" officeooo:paragraph-rsid="018dfa69" style:font-weight-asian="bold" style:font-weight-complex="bold"/>
    </style:style>
    <style:style style:name="P114" style:family="paragraph" style:parent-style-name="Standard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P115" style:family="paragraph" style:parent-style-name="Standard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P116" style:family="paragraph" style:parent-style-name="Standard">
      <style:text-properties fo:font-size="11.8999996185303pt" fo:font-style="normal" fo:font-weight="normal" officeooo:rsid="01c31d8c" officeooo:paragraph-rsid="01a4cc4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17" style:family="paragraph" style:parent-style-name="Standard">
      <style:text-properties officeooo:rsid="015fbfae" officeooo:paragraph-rsid="015fbfae"/>
    </style:style>
    <style:style style:name="P118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119" style:family="paragraph" style:parent-style-name="Text_20_body">
      <style:text-properties officeooo:paragraph-rsid="0182e9eb"/>
    </style:style>
    <style:style style:name="P120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21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22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paragraph-rsid="0182e9eb" style:font-size-asian="12pt" style:font-weight-asian="normal" style:font-size-complex="12pt" style:font-weight-complex="normal"/>
    </style:style>
    <style:style style:name="P123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24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25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style:text-underline-style="solid" style:text-underline-width="auto" style:text-underline-color="font-color" fo:font-weight="bold" officeooo:rsid="00a5219a" officeooo:paragraph-rsid="0182e9eb" style:font-name-asian="Droid Sans Fallback1" style:font-size-asian="12pt" style:font-weight-asian="bold" style:font-name-complex="FreeSans" style:font-size-complex="12pt" style:font-weight-complex="bold"/>
    </style:style>
    <style:style style:name="P126" style:family="paragraph" style:parent-style-name="Text_20_body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officeooo:paragraph-rsid="01081e95" style:text-blinking="false" style:font-size-asian="10pt" style:font-size-complex="10pt" loext:padding="0cm" loext:border="none"/>
    </style:style>
    <style:style style:name="P127" style:family="paragraph" style:parent-style-name="Text_20_body">
      <style:text-properties fo:font-size="12pt" fo:font-weight="normal" officeooo:rsid="00d311f0" officeooo:paragraph-rsid="0182e9eb" style:font-size-asian="12pt" style:font-weight-asian="normal" style:font-size-complex="12pt" style:font-weight-complex="normal"/>
    </style:style>
    <style:style style:name="P128" style:family="paragraph" style:parent-style-name="Text_20_body">
      <style:text-properties fo:font-size="12pt" fo:font-weight="normal" officeooo:rsid="00a5219a" officeooo:paragraph-rsid="0182e9eb" style:font-size-asian="12pt" style:font-weight-asian="normal" style:font-size-complex="12pt" style:font-weight-complex="normal"/>
    </style:style>
    <style:style style:name="P129" style:family="paragraph" style:parent-style-name="Text_20_body">
      <style:text-properties officeooo:rsid="00cd76d4" officeooo:paragraph-rsid="00cd76d4"/>
    </style:style>
    <style:style style:name="P130" style:family="paragraph" style:parent-style-name="Text_20_body">
      <style:text-properties officeooo:rsid="017c14fa" officeooo:paragraph-rsid="017c14fa"/>
    </style:style>
    <style:style style:name="P131" style:family="paragraph" style:parent-style-name="Text_20_body">
      <style:text-properties officeooo:rsid="00d311f0" officeooo:paragraph-rsid="0182e9eb"/>
    </style:style>
    <style:style style:name="P132" style:family="paragraph" style:parent-style-name="Text_20_body">
      <style:text-properties officeooo:rsid="00d4e481" officeooo:paragraph-rsid="0182e9eb"/>
    </style:style>
    <style:style style:name="P133" style:family="paragraph" style:parent-style-name="Text_20_body">
      <style:text-properties officeooo:rsid="00a76619" officeooo:paragraph-rsid="0182e9eb"/>
    </style:style>
    <style:style style:name="P134" style:family="paragraph" style:parent-style-name="Text_20_body">
      <style:text-properties officeooo:rsid="018cbe8f" officeooo:paragraph-rsid="018cbe8f"/>
    </style:style>
    <style:style style:name="P135" style:family="paragraph" style:parent-style-name="Text_20_body">
      <style:text-properties officeooo:rsid="018cbe8f" officeooo:paragraph-rsid="019838fd"/>
    </style:style>
    <style:style style:name="P136" style:family="paragraph" style:parent-style-name="Standard">
      <style:text-properties officeooo:paragraph-rsid="0080df97"/>
    </style:style>
    <style:style style:name="P137" style:family="paragraph" style:parent-style-name="Text_20_body">
      <style:text-properties officeooo:rsid="019127c0" officeooo:paragraph-rsid="019127c0"/>
    </style:style>
    <style:style style:name="P138" style:family="paragraph" style:parent-style-name="Text_20_body">
      <style:text-properties officeooo:rsid="019838fd" officeooo:paragraph-rsid="019838fd"/>
    </style:style>
    <style:style style:name="P139" style:family="paragraph" style:parent-style-name="Text_20_body">
      <style:text-properties officeooo:rsid="019838fd" officeooo:paragraph-rsid="019b665f"/>
    </style:style>
    <style:style style:name="P140" style:family="paragraph" style:parent-style-name="Standard">
      <style:text-properties officeooo:rsid="00ce615c" officeooo:paragraph-rsid="00ea8470"/>
    </style:style>
    <style:style style:name="P141" style:family="paragraph" style:parent-style-name="Standard">
      <style:text-properties officeooo:paragraph-rsid="01a3e481"/>
    </style:style>
    <style:style style:name="P142" style:family="paragraph" style:parent-style-name="Standard">
      <style:text-properties officeooo:rsid="01a3e481" officeooo:paragraph-rsid="01a4cc4c"/>
    </style:style>
    <style:style style:name="P143" style:family="paragraph" style:parent-style-name="Standard">
      <style:text-properties officeooo:rsid="01a49154" officeooo:paragraph-rsid="01a49154"/>
    </style:style>
    <style:style style:name="P144" style:family="paragraph" style:parent-style-name="Text_20_body">
      <style:text-properties officeooo:rsid="01a49154" officeooo:paragraph-rsid="02046e19"/>
    </style:style>
    <style:style style:name="P145" style:family="paragraph" style:parent-style-name="Standard">
      <style:text-properties officeooo:paragraph-rsid="01a4cc4c"/>
    </style:style>
    <style:style style:name="P146" style:family="paragraph" style:parent-style-name="Standard">
      <style:text-properties officeooo:rsid="01d00433" officeooo:paragraph-rsid="01d00433"/>
    </style:style>
    <style:style style:name="P147" style:family="paragraph" style:parent-style-name="Standard">
      <style:text-properties officeooo:rsid="01d0aff0" officeooo:paragraph-rsid="01d0aff0"/>
    </style:style>
    <style:style style:name="P148" style:family="paragraph" style:parent-style-name="Text_20_body">
      <style:text-properties officeooo:rsid="019e1818" officeooo:paragraph-rsid="019e1818"/>
    </style:style>
    <style:style style:name="P149" style:family="paragraph" style:parent-style-name="Text_20_body">
      <style:text-properties officeooo:paragraph-rsid="00e5cefd"/>
    </style:style>
    <style:style style:name="P150" style:family="paragraph" style:parent-style-name="Text_20_body">
      <style:text-properties officeooo:rsid="01a0b522" officeooo:paragraph-rsid="01a0b522"/>
    </style:style>
    <style:style style:name="P151" style:family="paragraph" style:parent-style-name="Text_20_body">
      <style:text-properties officeooo:rsid="01a251c9" officeooo:paragraph-rsid="01a251c9"/>
    </style:style>
    <style:style style:name="P152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53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20eae23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54" style:family="paragraph" style:parent-style-name="Text_20_body">
      <style:text-properties officeooo:rsid="01beba6f" officeooo:paragraph-rsid="01beba6f"/>
    </style:style>
    <style:style style:name="P155" style:family="paragraph" style:parent-style-name="Text_20_body">
      <style:text-properties officeooo:paragraph-rsid="01c0662b"/>
    </style:style>
    <style:style style:name="P156" style:family="paragraph" style:parent-style-name="Text_20_body">
      <style:text-properties officeooo:rsid="01d1e3ad" officeooo:paragraph-rsid="01d1e3ad"/>
    </style:style>
    <style:style style:name="P157" style:family="paragraph" style:parent-style-name="Code">
      <style:text-properties officeooo:rsid="01d1e3ad" officeooo:paragraph-rsid="0212d54e"/>
    </style:style>
    <style:style style:name="P158" style:family="paragraph" style:parent-style-name="Text_20_body">
      <style:text-properties officeooo:rsid="01d1e3ad" officeooo:paragraph-rsid="021449b3"/>
    </style:style>
    <style:style style:name="P159" style:family="paragraph" style:parent-style-name="Text_20_body">
      <style:text-properties officeooo:paragraph-rsid="01d1e3ad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1e526c1" style:font-size-asian="10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293182e" officeooo:paragraph-rsid="01e526c1" style:font-size-asian="10pt"/>
    </style:style>
    <style:style style:name="P162" style:family="paragraph" style:parent-style-name="Standard">
      <style:text-properties style:font-name="Monospace" fo:font-size="10pt" officeooo:paragraph-rsid="01e526c1" style:font-size-asian="10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e526c1"/>
    </style:style>
    <style:style style:name="P164" style:family="paragraph" style:parent-style-name="Standard">
      <style:text-properties officeooo:paragraph-rsid="01e526c1"/>
    </style:style>
    <style:style style:name="P165" style:family="paragraph" style:parent-style-name="Text_20_body">
      <style:text-properties officeooo:paragraph-rsid="01e526c1"/>
    </style:style>
    <style:style style:name="P166" style:family="paragraph" style:parent-style-name="Standard">
      <style:text-properties officeooo:rsid="01e600e1" officeooo:paragraph-rsid="01e600e1"/>
    </style:style>
    <style:style style:name="P167" style:family="paragraph" style:parent-style-name="Text_20_body">
      <style:text-properties officeooo:rsid="01e600e1" officeooo:paragraph-rsid="01e600e1"/>
    </style:style>
    <style:style style:name="P168" style:family="paragraph" style:parent-style-name="Standard">
      <style:text-properties officeooo:rsid="01e600e1" officeooo:paragraph-rsid="01e6888c"/>
    </style:style>
    <style:style style:name="P169" style:family="paragraph" style:parent-style-name="Text_20_body">
      <style:text-properties officeooo:rsid="01fe0912" officeooo:paragraph-rsid="01fe0912"/>
    </style:style>
    <style:style style:name="P170" style:family="paragraph" style:parent-style-name="Code">
      <style:text-properties officeooo:rsid="01fe0912" officeooo:paragraph-rsid="01ff3d8f"/>
    </style:style>
    <style:style style:name="P171" style:family="paragraph" style:parent-style-name="Code">
      <style:text-properties fo:font-size="10pt" style:font-size-asian="10pt" style:font-size-complex="10pt"/>
    </style:style>
    <style:style style:name="P172" style:family="paragraph" style:parent-style-name="Code">
      <style:text-properties officeooo:rsid="021b500d" officeooo:paragraph-rsid="025e9e4b"/>
    </style:style>
    <style:style style:name="P173" style:family="paragraph" style:parent-style-name="Text_20_body">
      <style:text-properties officeooo:rsid="021b500d" officeooo:paragraph-rsid="025e9e4b"/>
    </style:style>
    <style:style style:name="P174" style:family="paragraph" style:parent-style-name="Standard">
      <style:paragraph-properties style:line-height-at-least="0.503cm"/>
      <style:text-properties officeooo:paragraph-rsid="0212d54e"/>
    </style:style>
    <style:style style:name="P175" style:family="paragraph" style:parent-style-name="Text_20_body">
      <style:text-properties fo:font-weight="normal" officeooo:rsid="010efc1d" officeooo:paragraph-rsid="010efc1d" style:font-weight-asian="normal" style:font-weight-complex="normal"/>
    </style:style>
    <style:style style:name="P176" style:family="paragraph" style:parent-style-name="Text_20_body">
      <style:text-properties officeooo:rsid="021180ea" officeooo:paragraph-rsid="01f67752"/>
    </style:style>
    <style:style style:name="P177" style:family="paragraph" style:parent-style-name="Text_20_body">
      <style:text-properties officeooo:rsid="01fcfc09" officeooo:paragraph-rsid="01fcfc09"/>
    </style:style>
    <style:style style:name="P178" style:family="paragraph" style:parent-style-name="Text_20_body">
      <style:text-properties officeooo:paragraph-rsid="01f83c53"/>
    </style:style>
    <style:style style:name="P179" style:family="paragraph" style:parent-style-name="Text_20_body">
      <style:text-properties officeooo:paragraph-rsid="01fe0912"/>
    </style:style>
    <style:style style:name="P180" style:family="paragraph" style:parent-style-name="Text_20_body">
      <style:text-properties officeooo:rsid="01ff255d" officeooo:paragraph-rsid="01ff255d"/>
    </style:style>
    <style:style style:name="P181" style:family="paragraph" style:parent-style-name="Text_20_body">
      <style:text-properties officeooo:rsid="01ff3d8f" officeooo:paragraph-rsid="01ff3d8f"/>
    </style:style>
    <style:style style:name="P182" style:family="paragraph" style:parent-style-name="Text_20_body">
      <style:text-properties officeooo:rsid="02008497" officeooo:paragraph-rsid="02008497"/>
    </style:style>
    <style:style style:name="P183" style:family="paragraph" style:parent-style-name="Text_20_body">
      <style:text-properties officeooo:paragraph-rsid="0207dd43"/>
    </style:style>
    <style:style style:name="P184" style:family="paragraph" style:parent-style-name="Text_20_body">
      <style:text-properties officeooo:rsid="01c84eaa" officeooo:paragraph-rsid="01c84eaa"/>
    </style:style>
    <style:style style:name="P185" style:family="paragraph" style:parent-style-name="Text_20_body">
      <style:text-properties officeooo:rsid="020cedef" officeooo:paragraph-rsid="020cedef"/>
    </style:style>
    <style:style style:name="P186" style:family="paragraph" style:parent-style-name="Text_20_body">
      <style:paragraph-properties fo:margin-top="0cm" fo:margin-bottom="0.101cm" style:contextual-spacing="false"/>
      <style:text-properties officeooo:paragraph-rsid="01cd9776"/>
    </style:style>
    <style:style style:name="P187" style:family="paragraph" style:parent-style-name="Text_20_body">
      <style:text-properties officeooo:paragraph-rsid="021449b3"/>
    </style:style>
    <style:style style:name="P188" style:family="paragraph" style:parent-style-name="Text_20_body">
      <style:text-properties officeooo:rsid="01f83c53" officeooo:paragraph-rsid="01f83c53"/>
    </style:style>
    <style:style style:name="P189" style:family="paragraph" style:parent-style-name="Standard">
      <style:text-properties officeooo:rsid="01e339e5" officeooo:paragraph-rsid="01e339e5"/>
    </style:style>
    <style:style style:name="P190" style:family="paragraph" style:parent-style-name="Code">
      <style:text-properties officeooo:paragraph-rsid="025e9e4b"/>
    </style:style>
    <style:style style:name="P191" style:family="paragraph" style:parent-style-name="Standard">
      <style:text-properties officeooo:paragraph-rsid="025e9e4b"/>
    </style:style>
    <style:style style:name="P192" style:family="paragraph" style:parent-style-name="Text_20_body">
      <style:text-properties officeooo:rsid="001e5a7e" officeooo:paragraph-rsid="008a61ff"/>
    </style:style>
    <style:style style:name="P193" style:family="paragraph" style:parent-style-name="Standard_20__28_WW_29_" style:list-style-name="L2">
      <style:text-properties officeooo:paragraph-rsid="026013b4"/>
    </style:style>
    <style:style style:name="P194" style:family="paragraph" style:parent-style-name="Code">
      <style:text-properties officeooo:rsid="01fe0912" officeooo:paragraph-rsid="027ab65e"/>
    </style:style>
    <style:style style:name="P195" style:family="paragraph" style:parent-style-name="Code">
      <style:text-properties officeooo:paragraph-rsid="029a1e7c"/>
    </style:style>
    <style:style style:name="P196" style:family="paragraph" style:parent-style-name="Code">
      <style:text-properties fo:font-size="10pt" style:font-size-asian="10pt" style:font-size-complex="10pt"/>
    </style:style>
    <style:style style:name="P19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9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0" style:family="paragraph" style:parent-style-name="Heading_20_1" style:list-style-name=""/>
    <style:style style:name="P201" style:family="paragraph" style:parent-style-name="Heading_20_1" style:list-style-name="">
      <style:text-properties officeooo:paragraph-rsid="0076eb9f"/>
    </style:style>
    <style:style style:name="P202" style:family="paragraph" style:parent-style-name="Heading_20_1" style:list-style-name="">
      <style:text-properties officeooo:paragraph-rsid="026e8db5"/>
    </style:style>
    <style:style style:name="P203" style:family="paragraph" style:parent-style-name="Heading_20_1">
      <style:paragraph-properties fo:break-before="page"/>
      <style:text-properties officeooo:paragraph-rsid="01830471"/>
    </style:style>
    <style:style style:name="P204" style:family="paragraph" style:parent-style-name="Heading_20_1">
      <style:paragraph-properties fo:break-before="page"/>
      <style:text-properties officeooo:paragraph-rsid="0076eb9f"/>
    </style:style>
    <style:style style:name="P205" style:family="paragraph" style:parent-style-name="Heading_20_1">
      <style:paragraph-properties fo:break-before="page"/>
      <style:text-properties officeooo:paragraph-rsid="0080df97"/>
    </style:style>
    <style:style style:name="P206" style:family="paragraph" style:parent-style-name="Heading_20_1">
      <style:paragraph-properties fo:break-before="page"/>
      <style:text-properties officeooo:rsid="01f67752" officeooo:paragraph-rsid="01f67752"/>
    </style:style>
    <style:style style:name="P207" style:family="paragraph" style:parent-style-name="Heading_20_1">
      <style:paragraph-properties fo:break-before="page"/>
      <style:text-properties officeooo:paragraph-rsid="013a2b1b"/>
    </style:style>
    <style:style style:name="P208" style:family="paragraph" style:parent-style-name="Heading_20_1" style:list-style-name="">
      <style:text-properties officeooo:rsid="001e5a7e" officeooo:paragraph-rsid="008a61ff"/>
    </style:style>
    <style:style style:name="P209" style:family="paragraph" style:parent-style-name="Heading_20_1">
      <style:paragraph-properties fo:break-before="page"/>
      <style:text-properties style:font-name="Arial1" fo:font-size="16.1000003814697pt" fo:font-weight="bold" officeooo:rsid="00f469e8" officeooo:paragraph-rsid="01030653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210" style:family="paragraph" style:parent-style-name="Heading_20_1">
      <style:paragraph-properties fo:break-before="page"/>
    </style:style>
    <style:style style:name="P211" style:family="paragraph" style:parent-style-name="Heading_20_1">
      <style:paragraph-properties fo:margin-top="0cm" fo:margin-bottom="0.212cm" style:contextual-spacing="false" fo:break-before="page"/>
      <style:text-properties officeooo:paragraph-rsid="026c56ca"/>
    </style:style>
    <style:style style:name="P212" style:family="paragraph" style:parent-style-name="Heading_20_1">
      <style:paragraph-properties fo:break-before="page"/>
      <style:text-properties officeooo:paragraph-rsid="026e8db5"/>
    </style:style>
    <style:style style:name="P213" style:family="paragraph" style:parent-style-name="Heading_20_2">
      <style:text-properties officeooo:paragraph-rsid="018aa2c4"/>
    </style:style>
    <style:style style:name="P214" style:family="paragraph" style:parent-style-name="Heading_20_2">
      <style:text-properties officeooo:paragraph-rsid="01870321"/>
    </style:style>
    <style:style style:name="P215" style:family="paragraph" style:parent-style-name="Heading_20_2">
      <style:text-properties officeooo:paragraph-rsid="01ff255d"/>
    </style:style>
    <style:style style:name="P216" style:family="paragraph" style:parent-style-name="Heading_20_2">
      <style:text-properties officeooo:paragraph-rsid="01aefbe5"/>
    </style:style>
    <style:style style:name="P217" style:family="paragraph" style:parent-style-name="Heading_20_2">
      <style:text-properties officeooo:paragraph-rsid="01aec918"/>
    </style:style>
    <style:style style:name="P218" style:family="paragraph" style:parent-style-name="Heading_20_2">
      <style:text-properties officeooo:paragraph-rsid="025e9e4b"/>
    </style:style>
    <style:style style:name="P219" style:family="paragraph" style:parent-style-name="Heading_20_2">
      <style:text-properties officeooo:paragraph-rsid="0182e9eb"/>
    </style:style>
    <style:style style:name="P220" style:family="paragraph" style:parent-style-name="Heading_20_2">
      <style:text-properties officeooo:paragraph-rsid="026c56ca"/>
    </style:style>
    <style:style style:name="P221" style:family="paragraph" style:parent-style-name="Heading_20_2">
      <style:text-properties officeooo:paragraph-rsid="027445df"/>
    </style:style>
    <style:style style:name="P222" style:family="paragraph" style:parent-style-name="Heading_20_2">
      <style:paragraph-properties fo:margin-top="0.353cm" fo:margin-bottom="0.212cm" style:contextual-spacing="false"/>
      <style:text-properties officeooo:paragraph-rsid="0276adc7"/>
    </style:style>
    <style:style style:name="P223" style:family="paragraph" style:parent-style-name="Heading_20_2">
      <style:paragraph-properties fo:break-before="page"/>
    </style:style>
    <style:style style:name="P224" style:family="paragraph" style:parent-style-name="Heading_20_3">
      <style:text-properties officeooo:paragraph-rsid="01fcfc09"/>
    </style:style>
    <style:style style:name="P225" style:family="paragraph" style:parent-style-name="Heading_20_3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20eae23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26" style:family="paragraph" style:parent-style-name="Heading_20_3">
      <style:paragraph-properties fo:margin-top="0.282cm" fo:margin-bottom="0.176cm" style:contextual-spacing="false"/>
      <style:text-properties officeooo:paragraph-rsid="0276adc7"/>
    </style:style>
    <style:style style:name="P227" style:family="paragraph" style:parent-style-name="Heading_20_3">
      <style:text-properties officeooo:paragraph-rsid="029f525f"/>
    </style:style>
    <style:style style:name="P228" style:family="paragraph" style:parent-style-name="Heading_20_3">
      <style:text-properties officeooo:paragraph-rsid="02a2bca6"/>
    </style:style>
    <style:style style:name="P229" style:family="paragraph" style:parent-style-name="Heading_20_4" style:list-style-name="">
      <style:text-properties style:font-name="Arial1" fo:font-size="11.8000001907349pt" fo:font-weight="bold" officeooo:rsid="013bff24" officeooo:paragraph-rsid="01aec918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230" style:family="paragraph" style:parent-style-name="Heading_20_4" style:list-style-name="">
      <style:text-properties style:font-name="Arial1" fo:font-size="11.8000001907349pt" fo:font-weight="bold" officeooo:rsid="013bff24" officeooo:paragraph-rsid="0113287e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231" style:family="paragraph" style:parent-style-name="List_20_Paragraph" style:list-style-name="WWNum2">
      <style:paragraph-properties fo:margin-top="0cm" fo:margin-bottom="0.106cm" style:contextual-spacing="false"/>
      <style:text-properties officeooo:paragraph-rsid="026d45fc"/>
    </style:style>
    <style:style style:name="P232" style:family="paragraph" style:parent-style-name="List_20_Paragraph" style:list-style-name="WWNum2">
      <style:paragraph-properties fo:margin-top="0cm" fo:margin-bottom="0.141cm" style:contextual-spacing="false"/>
      <style:text-properties officeooo:paragraph-rsid="0276adc7"/>
    </style:style>
    <style:style style:name="P233" style:family="paragraph" style:parent-style-name="Preformatted_20_Text">
      <style:text-properties officeooo:paragraph-rsid="026e8db5"/>
    </style:style>
    <style:style style:name="P234" style:family="paragraph" style:parent-style-name="Preformatted_20_Text">
      <style:paragraph-properties fo:margin-top="0cm" fo:margin-bottom="0.499cm" style:contextual-spacing="false"/>
      <style:text-properties officeooo:paragraph-rsid="026e8db5"/>
    </style:style>
    <style:style style:name="P235" style:family="paragraph" style:parent-style-name="Standard" style:list-style-name="L1">
      <style:text-properties officeooo:rsid="00071684" officeooo:paragraph-rsid="006f4cb2"/>
    </style:style>
    <style:style style:name="P236" style:family="paragraph" style:parent-style-name="Standard" style:list-style-name="L1">
      <style:text-properties officeooo:rsid="0046be32" officeooo:paragraph-rsid="006f4cb2"/>
    </style:style>
    <style:style style:name="P237" style:family="paragraph" style:parent-style-name="Standard" style:list-style-name="L1">
      <style:text-properties officeooo:rsid="006f4cb2" officeooo:paragraph-rsid="006f4cb2"/>
    </style:style>
    <style:style style:name="P238" style:family="paragraph" style:parent-style-name="Standard" style:list-style-name="L1">
      <style:text-properties officeooo:rsid="016b81c2" officeooo:paragraph-rsid="006f4cb2"/>
    </style:style>
    <style:style style:name="P239" style:family="paragraph" style:parent-style-name="Standard" style:list-style-name="L1">
      <style:text-properties officeooo:rsid="00ce615c" officeooo:paragraph-rsid="00ea8470"/>
    </style:style>
    <style:style style:name="P240" style:family="paragraph" style:parent-style-name="Standard" style:list-style-name="L2">
      <style:text-properties officeooo:paragraph-rsid="026013b4"/>
    </style:style>
    <style:style style:name="P241" style:family="paragraph" style:parent-style-name="Standard" style:list-style-name="L2">
      <style:text-properties officeooo:rsid="02327a09" officeooo:paragraph-rsid="02327a09"/>
    </style:style>
    <style:style style:name="P242" style:family="paragraph" style:parent-style-name="Standard" style:list-style-name="L1">
      <style:text-properties officeooo:rsid="017278c8" officeooo:paragraph-rsid="006f4cb2"/>
    </style:style>
    <style:style style:name="P243" style:family="paragraph" style:parent-style-name="Standard" style:list-style-name="">
      <style:text-properties style:font-name="Times New Roman" fo:font-size="11.8999996185303pt" fo:font-style="normal" fo:font-weight="normal" officeooo:rsid="015ebe13" officeooo:paragraph-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44" style:family="paragraph" style:parent-style-name="Standard" style:list-style-name="">
      <style:text-properties fo:color="#000000" loext:opacity="100%" style:font-name="Times New Roman" fo:font-size="11.8999996185303pt" fo:font-style="normal" fo:font-weight="normal" officeooo:rsid="015ebe13" officeooo:paragraph-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45" style:family="paragraph" style:parent-style-name="Standard" style:list-style-name="">
      <style:text-properties fo:color="#000000" loext:opacity="100%" style:font-name="Monospace" fo:font-size="16pt" fo:font-style="normal" fo:font-weight="normal" officeooo:rsid="0140333d" officeooo:paragraph-rsid="0140333d" style:font-size-asian="16pt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24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48" style:family="paragraph" style:parent-style-name="Standard" style:list-style-name="L2">
      <style:text-properties fo:color="#0000ff" loext:opacity="100%" style:font-name="Droid Sans Mono" fo:font-size="10.5pt" fo:font-style="italic" fo:font-weight="normal" officeooo:paragraph-rsid="026013b4" fo:background-color="#ffffff" style:font-style-asian="italic" style:font-style-complex="italic"/>
    </style:style>
    <style:style style:name="P249" style:family="paragraph" style:parent-style-name="Standard" style:list-style-name="L2">
      <style:text-properties fo:color="#0000ff" loext:opacity="100%" style:font-name="Droid Sans Mono" fo:font-size="10.5pt" fo:font-weight="normal" officeooo:rsid="02327a09" officeooo:paragraph-rsid="02327a09" fo:background-color="#ffffff"/>
    </style:style>
    <style:style style:name="P250" style:family="paragraph" style:parent-style-name="Standard" style:list-style-name="L2">
      <style:text-properties fo:font-style="italic" officeooo:paragraph-rsid="026013b4" style:font-style-asian="italic" style:font-style-complex="italic"/>
    </style:style>
    <style:style style:name="P251" style:family="paragraph" style:parent-style-name="Standard">
      <style:text-properties officeooo:rsid="0089b706" officeooo:paragraph-rsid="026c56ca"/>
    </style:style>
    <style:style style:name="P252" style:family="paragraph" style:parent-style-name="Standard">
      <style:paragraph-properties fo:margin-top="0cm" fo:margin-bottom="0.353cm" style:contextual-spacing="false" fo:text-align="start" style:justify-single-word="false"/>
      <style:text-properties officeooo:paragraph-rsid="026d45fc"/>
    </style:style>
    <style:style style:name="P253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 fo:padding-left="0cm" fo:padding-right="0cm" fo:padding-top="0.141cm" fo:padding-bottom="0cm" fo:border-left="none" fo:border-right="none" fo:border-top="0.51pt solid #dddddd" fo:border-bottom="none"/>
      <style:text-properties officeooo:paragraph-rsid="026d45fc"/>
    </style:style>
    <style:style style:name="P254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/>
      <style:text-properties officeooo:paragraph-rsid="026d45fc"/>
    </style:style>
    <style:style style:name="P255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 fo:padding-left="0cm" fo:padding-right="0cm" fo:padding-top="0cm" fo:padding-bottom="0.141cm" fo:border-left="none" fo:border-right="none" fo:border-top="none" fo:border-bottom="0.51pt solid #dddddd"/>
      <style:text-properties officeooo:paragraph-rsid="026d45fc"/>
    </style:style>
    <style:style style:name="P256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/>
      <style:text-properties officeooo:paragraph-rsid="02875a1d"/>
    </style:style>
    <style:style style:name="P257" style:family="paragraph" style:parent-style-name="Standard">
      <style:paragraph-properties fo:margin-top="0cm" fo:margin-bottom="0.141cm" style:contextual-spacing="false"/>
      <style:text-properties officeooo:paragraph-rsid="026d45fc"/>
    </style:style>
    <style:style style:name="P258" style:family="paragraph" style:parent-style-name="Standard">
      <style:paragraph-properties fo:margin-top="0cm" fo:margin-bottom="0.176cm" style:contextual-spacing="false"/>
      <style:text-properties officeooo:paragraph-rsid="026d45fc"/>
    </style:style>
    <style:style style:name="P259" style:family="paragraph" style:parent-style-name="Standard">
      <style:text-properties officeooo:rsid="026e8db5" officeooo:paragraph-rsid="026e8db5"/>
    </style:style>
    <style:style style:name="P260" style:family="paragraph" style:parent-style-name="Standard">
      <style:paragraph-properties fo:margin-top="0cm" fo:margin-bottom="0.212cm" style:contextual-spacing="false"/>
      <style:text-properties officeooo:paragraph-rsid="0276adc7"/>
    </style:style>
    <style:style style:name="P261" style:family="paragraph" style:parent-style-name="Standard">
      <loext:graphic-properties draw:fill="solid" draw:fill-color="#f5f5f5"/>
      <style:paragraph-properties fo:margin-left="0.388cm" fo:margin-top="0cm" fo:margin-bottom="0cm" style:contextual-spacing="false" fo:background-color="#f5f5f5"/>
      <style:text-properties officeooo:paragraph-rsid="0276adc7"/>
    </style:style>
    <style:style style:name="P262" style:family="paragraph" style:parent-style-name="Standard">
      <loext:graphic-properties draw:fill="solid" draw:fill-color="#f5f5f5"/>
      <style:paragraph-properties fo:margin-left="0.388cm" fo:margin-top="0cm" fo:margin-bottom="0.282cm" style:contextual-spacing="false" fo:background-color="#f5f5f5"/>
      <style:text-properties officeooo:paragraph-rsid="0276adc7"/>
    </style:style>
    <style:style style:name="P263" style:family="paragraph" style:parent-style-name="Standard">
      <style:text-properties officeooo:paragraph-rsid="02855d4e"/>
    </style:style>
    <style:style style:name="P264" style:family="paragraph" style:parent-style-name="Standard">
      <style:text-properties officeooo:rsid="0288756e" officeooo:paragraph-rsid="0288756e"/>
    </style:style>
    <style:style style:name="P265" style:family="paragraph" style:parent-style-name="Standard">
      <style:paragraph-properties fo:margin-left="0.353cm" fo:margin-top="0cm" fo:margin-bottom="0cm" style:contextual-spacing="false" fo:line-height="0.459cm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66" style:family="paragraph" style:parent-style-name="Standard">
      <loext:graphic-properties draw:fill="solid" draw:fill-color="#dddddd"/>
      <style:paragraph-properties fo:margin-left="0.353cm" fo:margin-top="0cm" fo:margin-bottom="0cm" style:contextual-spacing="false" fo:line-height="0.459cm" fo:background-color="#dddddd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67" style:family="paragraph" style:parent-style-name="Standard">
      <style:paragraph-properties fo:margin-left="0.353cm" fo:margin-top="0cm" fo:margin-bottom="0cm" style:contextual-spacing="false" fo:line-height="0.459cm" fo:padding-left="0cm" fo:padding-right="0cm" fo:padding-top="0.141cm" fo:padding-bottom="0cm" fo:border-left="none" fo:border-right="none" fo:border-top="0.51pt solid #dddddd" fo:border-bottom="none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68" style:family="paragraph" style:parent-style-name="Standard">
      <loext:graphic-properties draw:fill="solid" draw:fill-color="#eeeeee"/>
      <style:paragraph-properties fo:margin-left="0.353cm" fo:margin-top="0cm" fo:margin-bottom="0cm" style:contextual-spacing="false" fo:line-height="0.459cm" fo:background-color="#eeeeee" fo:padding-left="0cm" fo:padding-right="0cm" fo:padding-top="0.141cm" fo:padding-bottom="0cm" fo:border-left="none" fo:border-right="none" fo:border-top="0.51pt solid #dddddd" fo:border-bottom="none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69" style:family="paragraph" style:parent-style-name="Standard">
      <style:paragraph-properties fo:margin-left="0.353cm" fo:margin-top="0cm" fo:margin-bottom="0cm" style:contextual-spacing="false" fo:line-height="0.459cm"/>
      <style:text-properties style:font-name="Consolas" fo:font-size="9pt" officeooo:rsid="028ab722" officeooo:paragraph-rsid="028ab722" style:font-name-asian="Consolas1" style:font-size-asian="9pt" style:font-name-complex="Consolas1" style:font-size-complex="9pt"/>
    </style:style>
    <style:style style:name="P270" style:family="paragraph" style:parent-style-name="Standard">
      <style:text-properties officeooo:paragraph-rsid="028ee0bd"/>
    </style:style>
    <style:style style:name="P271" style:family="paragraph" style:parent-style-name="Standard">
      <style:text-properties officeooo:rsid="02902f24" officeooo:paragraph-rsid="02902f24"/>
    </style:style>
    <style:style style:name="P272" style:family="paragraph" style:parent-style-name="Standard">
      <style:text-properties officeooo:rsid="02911176" officeooo:paragraph-rsid="02911176"/>
    </style:style>
    <style:style style:name="P273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Droid Sans Mono" fo:font-size="10.5pt" fo:font-weight="normal" fo:background-color="#ffffff"/>
    </style:style>
    <style:style style:name="P274" style:family="paragraph" style:parent-style-name="Standard">
      <style:paragraph-properties fo:margin-top="0cm" fo:margin-bottom="0.101cm" style:contextual-spacing="false"/>
      <style:text-properties fo:color="#008000" loext:opacity="100%" style:font-name="Droid Sans Mono" fo:font-size="10.5pt" fo:font-style="normal" fo:font-weight="normal" officeooo:rsid="02a11ee5" officeooo:paragraph-rsid="02a11ee5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75" style:family="paragraph" style:parent-style-name="Standard">
      <style:paragraph-properties style:line-height-at-least="0.503cm"/>
    </style:style>
    <style:style style:name="P276" style:family="paragraph" style:parent-style-name="Text_20_body" style:list-style-name="L3">
      <style:text-properties officeooo:paragraph-rsid="01811567"/>
    </style:style>
    <style:style style:name="P277" style:family="paragraph" style:parent-style-name="Text_20_body" style:list-style-name="L3">
      <style:text-properties fo:font-style="italic" fo:font-weight="bold" officeooo:rsid="0180917a" officeooo:paragraph-rsid="0180917a" style:font-style-asian="italic" style:font-weight-asian="bold" style:font-style-complex="italic" style:font-weight-complex="bold"/>
    </style:style>
    <style:style style:name="P278" style:family="paragraph" style:parent-style-name="Text_20_body" style:list-style-name="L3">
      <style:text-properties fo:font-style="italic" fo:font-weight="bold" officeooo:rsid="0180917a" officeooo:paragraph-rsid="01811567" style:font-style-asian="italic" style:font-weight-asian="bold" style:font-style-complex="italic" style:font-weight-complex="bold"/>
    </style:style>
    <style:style style:name="P279" style:family="paragraph" style:parent-style-name="Text_20_body">
      <style:text-properties fo:font-style="italic" fo:font-weight="bold" officeooo:rsid="017c14fa" officeooo:paragraph-rsid="0265d002" style:font-style-asian="italic" style:font-weight-asian="bold" style:font-style-complex="italic" style:font-weight-complex="bold"/>
    </style:style>
    <style:style style:name="P280" style:family="paragraph" style:parent-style-name="Text_20_body" style:list-style-name="L8">
      <style:text-properties fo:font-style="italic" officeooo:paragraph-rsid="01c0662b" style:font-style-asian="italic" style:font-style-complex="italic"/>
    </style:style>
    <style:style style:name="P281" style:family="paragraph" style:parent-style-name="Text_20_body" style:list-style-name="L18">
      <style:text-properties fo:font-style="italic" officeooo:rsid="00d4e481" officeooo:paragraph-rsid="0182e9eb" style:font-style-asian="italic" style:font-style-complex="italic"/>
    </style:style>
    <style:style style:name="P282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83" style:family="paragraph" style:parent-style-name="Text_20_body" style:list-style-name="L4">
      <style:text-properties fo:color="#000000" loext:opacity="100%" style:font-name="Times New Roman" fo:font-size="12pt" fo:font-style="italic" fo:font-weight="bold" officeooo:rsid="019556e0" officeooo:paragraph-rsid="01bd0c45" fo:background-color="transparent" style:font-size-asian="12pt" style:font-style-asian="italic" style:font-weight-asian="bold" style:font-size-complex="12pt" style:font-style-complex="italic" style:font-weight-complex="bold"/>
    </style:style>
    <style:style style:name="P284" style:family="paragraph" style:parent-style-name="Text_20_body" style:list-style-name="L4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285" style:family="paragraph" style:parent-style-name="Text_20_body" style:list-style-name="L4">
      <style:text-properties fo:color="#000000" loext:opacity="100%" style:font-name="Times New Roman" fo:font-size="12pt" officeooo:rsid="0196acba" officeooo:paragraph-rsid="0196acba" fo:background-color="transparent" style:font-size-asian="12pt" style:font-size-complex="12pt"/>
    </style:style>
    <style:style style:name="P286" style:family="paragraph" style:parent-style-name="Text_20_body">
      <style:text-properties fo:color="#000000" loext:opacity="100%" style:font-name="Arial1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287" style:family="paragraph" style:parent-style-name="Text_20_body">
      <style:text-properties fo:color="#000000" loext:opacity="100%" style:font-name="Courier New" fo:font-size="8pt" fo:font-style="normal" style:text-underline-style="none" fo:font-weight="normal" officeooo:rsid="00ce615c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288" style:family="paragraph" style:parent-style-name="Text_20_body" style:list-style-name="L5">
      <style:text-properties fo:font-style="normal" fo:font-weight="normal" officeooo:rsid="019e1818" officeooo:paragraph-rsid="019e1818" style:font-style-asian="normal" style:font-weight-asian="normal" style:font-style-complex="normal" style:font-weight-complex="normal"/>
    </style:style>
    <style:style style:name="P289" style:family="paragraph" style:parent-style-name="Text_20_body" style:list-style-name="L5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90" style:family="paragraph" style:parent-style-name="Text_20_body">
      <style:text-properties fo:font-style="normal" fo:font-weight="normal" officeooo:rsid="0265d002" officeooo:paragraph-rsid="0265d002" style:font-style-asian="normal" style:font-weight-asian="normal" style:font-style-complex="normal" style:font-weight-complex="normal"/>
    </style:style>
    <style:style style:name="P291" style:family="paragraph" style:parent-style-name="Text_20_body" style:list-style-name="L9">
      <style:text-properties fo:font-style="normal" officeooo:rsid="01fcfc09" officeooo:paragraph-rsid="01fcfc09" style:font-style-asian="normal" style:font-style-complex="normal"/>
    </style:style>
    <style:style style:name="P292" style:family="paragraph" style:parent-style-name="Text_20_body" style:list-style-name="L6"/>
    <style:style style:name="P293" style:family="paragraph" style:parent-style-name="Text_20_body" style:list-style-name="L7">
      <style:text-properties officeooo:rsid="019e1818" officeooo:paragraph-rsid="019e1818"/>
    </style:style>
    <style:style style:name="P294" style:family="paragraph" style:parent-style-name="Text_20_body" style:list-style-name="L9">
      <style:text-properties officeooo:rsid="0214c47c" officeooo:paragraph-rsid="01f67752"/>
    </style:style>
    <style:style style:name="P295" style:family="paragraph" style:parent-style-name="Text_20_body" style:list-style-name="L9">
      <style:text-properties officeooo:rsid="01fcfc09" officeooo:paragraph-rsid="01fcfc09"/>
    </style:style>
    <style:style style:name="P296" style:family="paragraph" style:parent-style-name="Text_20_body" style:list-style-name="L10">
      <style:text-properties officeooo:paragraph-rsid="02046e19"/>
    </style:style>
    <style:style style:name="P297" style:family="paragraph" style:parent-style-name="Text_20_body" style:list-style-name="L10">
      <style:text-properties officeooo:rsid="01a49154" officeooo:paragraph-rsid="02046e19"/>
    </style:style>
    <style:style style:name="P298" style:family="paragraph" style:parent-style-name="Text_20_body" style:list-style-name="L16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9" style:family="paragraph" style:parent-style-name="Text_20_body">
      <style:text-properties style:font-name="Times New Roman" fo:font-size="11.8000001907349pt" fo:font-weight="normal" officeooo:rsid="00fc47ef" officeooo:paragraph-rsid="027445d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00" style:family="paragraph" style:parent-style-name="Text_20_body">
      <style:text-properties style:font-name="Times New Roman" fo:font-size="11.8000001907349pt" fo:font-weight="normal" officeooo:rsid="00fc47ef" officeooo:paragraph-rsid="0152128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01" style:family="paragraph" style:parent-style-name="Text_20_body">
      <style:text-properties style:font-name="Times New Roman" fo:font-size="11.8000001907349pt" fo:font-weight="normal" officeooo:rsid="012ec90e" officeooo:paragraph-rsid="027445d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02" style:family="paragraph" style:parent-style-name="Text_20_body">
      <style:text-properties style:font-name="Times New Roman" fo:font-size="11.8000001907349pt" fo:font-weight="normal" officeooo:rsid="010be942" officeooo:paragraph-rsid="010be94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03" style:family="paragraph" style:parent-style-name="Text_20_body">
      <style:text-properties style:font-name="Times New Roman" fo:font-size="11.8000001907349pt" fo:font-weight="normal" officeooo:rsid="02975a52" officeooo:paragraph-rsid="02975a5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04" style:family="paragraph" style:parent-style-name="Text_20_body" style:list-style-name="L17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305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2a11ee5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306" style:family="paragraph" style:parent-style-name="Text_20_body">
      <style:text-properties style:font-name="Times New Roman" fo:font-size="11.8000001907349pt" style:text-underline-style="none" fo:font-weight="normal" officeooo:rsid="020d3f47" officeooo:paragraph-rsid="020d3f47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0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1e7f9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8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975a52" officeooo:paragraph-rsid="02975a52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1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a1c56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1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9b680e" officeooo:paragraph-rsid="029b680e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12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13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29f525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14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a11ee5" officeooo:paragraph-rsid="02a11ee5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15" style:family="paragraph" style:parent-style-name="Text_20_body" style:list-style-name="L18">
      <style:text-properties fo:font-size="12pt" fo:font-weight="normal" officeooo:rsid="00d4e481" officeooo:paragraph-rsid="0182e9eb" style:font-size-asian="12pt" style:font-weight-asian="normal" style:font-size-complex="12pt" style:font-weight-complex="normal"/>
    </style:style>
    <style:style style:name="P316" style:family="paragraph" style:parent-style-name="Text_20_body" style:list-style-name="L21"/>
    <style:style style:name="P317" style:family="paragraph" style:parent-style-name="Text_20_body" style:list-style-name="L21">
      <style:paragraph-properties fo:margin-top="0cm" fo:margin-bottom="0cm" style:contextual-spacing="false"/>
    </style:style>
    <style:style style:name="P318" style:family="paragraph" style:parent-style-name="Text_20_body">
      <style:text-properties style:text-underline-style="solid" style:text-underline-width="auto" style:text-underline-color="font-color"/>
    </style:style>
    <style:style style:name="P319" style:family="paragraph" style:parent-style-name="Text_20_body" style:list-style-name="L3">
      <style:text-properties officeooo:rsid="0265d002" officeooo:paragraph-rsid="0265d002"/>
    </style:style>
    <style:style style:name="P32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321" style:family="paragraph" style:parent-style-name="Text_20_body">
      <style:text-properties style:font-name="Courier New" fo:font-size="8pt" fo:font-style="normal" fo:font-weight="normal" officeooo:rsid="00ce615c" officeooo:paragraph-rsid="0267fe07" style:font-style-asian="normal" style:font-weight-asian="normal" style:font-style-complex="normal" style:font-weight-complex="normal"/>
    </style:style>
    <style:style style:name="P322" style:family="paragraph" style:parent-style-name="Text_20_body">
      <style:text-properties officeooo:paragraph-rsid="027445df"/>
    </style:style>
    <style:style style:name="P323" style:family="paragraph" style:parent-style-name="Text_20_body">
      <style:text-properties officeooo:paragraph-rsid="027ab65e"/>
    </style:style>
    <style:style style:name="P324" style:family="paragraph" style:parent-style-name="Text_20_body">
      <style:text-properties officeooo:paragraph-rsid="027f79fb"/>
    </style:style>
    <style:style style:name="P325" style:family="paragraph" style:parent-style-name="Text_20_body" style:list-style-name="L23">
      <style:text-properties officeooo:paragraph-rsid="027f79fb"/>
    </style:style>
    <style:style style:name="P326" style:family="paragraph" style:parent-style-name="Text_20_body">
      <style:text-properties officeooo:paragraph-rsid="02902f24"/>
    </style:style>
    <style:style style:name="P327" style:family="paragraph" style:parent-style-name="Text_20_body" style:list-style-name="L24"/>
    <style:style style:name="P328" style:family="paragraph" style:parent-style-name="Text_20_body" style:list-style-name="L25"/>
    <style:style style:name="P329" style:family="paragraph" style:parent-style-name="Text_20_body">
      <style:paragraph-properties fo:margin-top="0cm" fo:margin-bottom="0.101cm" style:contextual-spacing="false"/>
      <style:text-properties officeooo:paragraph-rsid="01cd9776"/>
    </style:style>
    <style:style style:name="P330" style:family="paragraph" style:parent-style-name="Text_20_body">
      <style:text-properties officeooo:rsid="02a2bca6" officeooo:paragraph-rsid="02a2bca6"/>
    </style:style>
    <style:style style:name="P331" style:family="paragraph" style:parent-style-name="Text_20_body">
      <style:text-properties officeooo:rsid="02a41fa7" officeooo:paragraph-rsid="02a41fa7"/>
    </style:style>
    <style:style style:name="P332" style:family="paragraph" style:parent-style-name="Text_20_body_20__28_WW_29_">
      <style:text-properties fo:color="#000000" loext:opacity="100%" style:font-name="Arial" fo:font-size="14pt" fo:font-style="italic" fo:font-weight="bold" officeooo:paragraph-rsid="02684f36" style:font-size-asian="14pt" style:font-style-asian="italic" style:font-weight-asian="bold" style:font-size-complex="14pt" style:font-style-complex="italic" style:font-weight-complex="bold"/>
    </style:style>
    <style:style style:name="P333" style:family="paragraph" style:parent-style-name="Text_20_body_20__28_WW_29_">
      <style:text-properties officeooo:paragraph-rsid="02684f36"/>
    </style:style>
    <style:style style:name="P334" style:family="paragraph" style:parent-style-name="Text_20_body_20__28_WW_29_">
      <style:text-properties officeooo:rsid="02684f36" officeooo:paragraph-rsid="02684f36"/>
    </style:style>
    <style:style style:name="P335" style:family="paragraph" style:parent-style-name="Text_20_body_20__28_WW_29_" style:list-style-name="WWNum4">
      <style:text-properties officeooo:paragraph-rsid="026c56ca"/>
    </style:style>
    <style:style style:name="P336" style:family="paragraph" style:parent-style-name="Text_20_body_20__28_WW_29_" style:list-style-name="WWNum7">
      <style:text-properties officeooo:paragraph-rsid="026c56ca"/>
    </style:style>
    <style:style style:name="P337" style:family="paragraph" style:parent-style-name="Text_20_body_20__28_WW_29_">
      <style:text-properties officeooo:paragraph-rsid="026c56ca"/>
    </style:style>
    <style:style style:name="P338" style:family="paragraph" style:parent-style-name="Text_20_body_20__28_WW_29_">
      <style:paragraph-properties fo:margin-top="0cm" fo:margin-bottom="0cm" style:contextual-spacing="false"/>
      <style:text-properties officeooo:paragraph-rsid="026c56ca"/>
    </style:style>
    <style:style style:name="P339" style:family="paragraph" style:parent-style-name="Text_20_body_20__28_WW_29_" style:list-style-name="WWNum10">
      <style:paragraph-properties fo:margin-top="0cm" fo:margin-bottom="0cm" style:contextual-spacing="false"/>
      <style:text-properties officeooo:paragraph-rsid="026e8db5"/>
    </style:style>
    <style:style style:name="P340" style:family="paragraph" style:parent-style-name="Text_20_body_20__28_WW_29_" style:list-style-name="WWNum10">
      <style:text-properties officeooo:paragraph-rsid="026e8db5"/>
    </style:style>
    <style:style style:name="P341" style:family="paragraph" style:parent-style-name="Text_20_body_20__28_WW_29_" style:list-style-name="WWNum11">
      <style:paragraph-properties fo:margin-top="0cm" fo:margin-bottom="0cm" style:contextual-spacing="false"/>
      <style:text-properties officeooo:paragraph-rsid="026e8db5"/>
    </style:style>
    <style:style style:name="P342" style:family="paragraph" style:parent-style-name="Text_20_body_20__28_WW_29_" style:list-style-name="WWNum11">
      <style:text-properties officeooo:paragraph-rsid="026e8db5"/>
    </style:style>
    <style:style style:name="P343" style:family="paragraph" style:parent-style-name="Text_20_body_20__28_WW_29_">
      <style:text-properties officeooo:paragraph-rsid="026e8db5"/>
    </style:style>
    <style:style style:name="P344" style:family="paragraph" style:parent-style-name="Text_20_body_20__28_WW_29_">
      <style:paragraph-properties fo:margin-left="1cm" fo:margin-right="1cm"/>
      <style:text-properties officeooo:paragraph-rsid="026e8db5"/>
    </style:style>
    <style:style style:name="P345" style:family="paragraph" style:parent-style-name="Text_20_body_20__28_WW_29_">
      <style:text-properties officeooo:paragraph-rsid="027c1844"/>
    </style:style>
    <style:style style:name="P346" style:family="paragraph" style:parent-style-name="Text_20_body_20__28_WW_29_" style:list-style-name="L22">
      <style:text-properties officeooo:paragraph-rsid="027c1844"/>
    </style:style>
    <style:style style:name="P347" style:family="paragraph" style:parent-style-name="commande">
      <style:text-properties officeooo:paragraph-rsid="02684f36"/>
    </style:style>
    <style:style style:name="P348" style:family="paragraph" style:parent-style-name="commande">
      <style:text-properties officeooo:paragraph-rsid="026c56ca"/>
    </style:style>
    <style:style style:name="P349" style:family="paragraph" style:parent-style-name="commande">
      <style:paragraph-properties fo:margin-top="0cm" fo:margin-bottom="0cm" style:contextual-spacing="false"/>
      <style:text-properties officeooo:paragraph-rsid="026c56ca"/>
    </style:style>
    <style:style style:name="P350" style:family="paragraph" style:parent-style-name="commande">
      <style:text-properties officeooo:paragraph-rsid="026e8d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7c14fa" style:font-style-asian="italic" style:font-style-complex="italic"/>
    </style:style>
    <style:style style:name="T3" style:family="text">
      <style:text-properties fo:font-style="italic" officeooo:rsid="01a2e720" style:font-style-asian="italic" style:font-style-complex="italic"/>
    </style:style>
    <style:style style:name="T4" style:family="text">
      <style:text-properties fo:font-style="italic" officeooo:rsid="01bb3ae7" style:font-style-asian="italic" style:font-style-complex="italic"/>
    </style:style>
    <style:style style:name="T5" style:family="text">
      <style:text-properties fo:font-style="italic" officeooo:rsid="01eb7f02" style:font-style-asian="italic" style:font-style-complex="italic"/>
    </style:style>
    <style:style style:name="T6" style:family="text">
      <style:text-properties fo:font-style="italic" officeooo:rsid="0214b925" style:font-style-asian="italic" style:font-style-complex="italic"/>
    </style:style>
    <style:style style:name="T7" style:family="text">
      <style:text-properties fo:font-style="italic" officeooo:rsid="01ddbda3" style:font-style-asian="italic" style:font-style-complex="italic"/>
    </style:style>
    <style:style style:name="T8" style:family="text">
      <style:text-properties fo:font-style="italic" officeooo:rsid="0265d002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17c14fa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7c63d6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8dfa69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1f178a6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23610ee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237e984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265d002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2902f24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style:font-name-asian="WenQuanYi Micro Hei" style:font-style-asian="italic" style:font-weight-asian="bold" style:font-style-complex="italic" style:font-weight-complex="bold"/>
    </style:style>
    <style:style style:name="T19" style:family="text">
      <style:text-properties fo:font-style="italic" style:font-name-asian="WenQuanYi Micro Hei" style:font-style-asian="italic" style:font-style-complex="italic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style:font-name="Times New Roman" fo:font-size="12pt" fo:font-style="normal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font-name="Times New Roman" fo:font-size="12pt" fo:font-weight="bold" officeooo:rsid="00d240a6" style:font-name-asian="WenQuanYi Micro Hei" style:font-size-asian="12pt" style:font-weight-asian="bold" style:font-name-complex="Lohit Hindi2" style:font-size-complex="12pt" style:font-weight-complex="bold" style:text-overline-style="none" style:text-overline-color="font-color"/>
    </style:style>
    <style:style style:name="T23" style:family="text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4" style:family="text">
      <style:text-properties fo:color="#000000" loext:opacity="100%" style:font-name="Times New Roman" fo:font-size="11.8999996185303pt" fo:font-style="normal" fo:font-weight="normal" officeooo: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5" style:family="text">
      <style:text-properties fo:color="#000000" loext:opacity="100%" style:font-name="Times New Roman" fo:font-size="11.8999996185303pt" fo:font-style="normal" fo:font-weight="normal" officeooo: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6" style:family="text">
      <style:text-properties fo:color="#000000" loext:opacity="100%" style:font-name="Times New Roman" fo:font-size="11.8999996185303pt" fo:font-style="normal" fo:font-weight="normal" officeooo: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7" style:family="text">
      <style:text-properties fo:color="#000000" loext:opacity="100%" style:font-name="Times New Roman" fo:font-size="11.8999996185303pt" fo:font-style="normal" fo:font-weight="normal" officeooo: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8" style:family="text">
      <style:text-properties fo:color="#000000" loext:opacity="100%" style:font-name="Times New Roman" fo:font-size="11.8999996185303pt" fo:font-style="normal" fo:font-weight="normal" officeooo:rsid="01c31d8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9" style:family="text">
      <style:text-properties fo:color="#000000" loext:opacity="100%" style:font-name="Times New Roman" fo:font-size="11.8999996185303pt" fo:font-style="normal" fo:font-weight="normal" officeooo:rsid="020606e7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0" style:family="text">
      <style:text-properties fo:color="#000000" loext:opacity="100%" style:font-name="Times New Roman"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31" style:family="text">
      <style:text-properties fo:color="#000000" loext:opacity="100%" style:font-name="Times New Roman" fo:font-size="11.8999996185303pt" fo:font-style="italic" fo:font-weight="bold" officeooo: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32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000000" loext:opacity="100%" fo:font-style="italic" fo:font-weight="bold" officeooo:rsid="02915030" style:font-style-asian="italic" style:font-weight-asian="bold" style:font-style-complex="italic" style:font-weight-complex="bold"/>
    </style:style>
    <style:style style:name="T34" style:family="text">
      <style:text-properties fo:color="#000000" loext:opacity="100%" fo:font-style="italic" fo:font-weight="bold" officeooo:rsid="02944c22" style:font-style-asian="italic" style:font-weight-asian="bold" style:font-style-complex="italic" style:font-weight-complex="bold"/>
    </style:style>
    <style:style style:name="T35" style:family="text">
      <style:text-properties fo:color="#000000" loext:opacity="100%" fo:font-style="italic" fo:font-weight="bold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36" style:family="text">
      <style:text-properties fo:color="#000000" loext:opacity="100%" fo:font-style="italic" fo:font-weight="bold" officeooo:rsid="0265d002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37" style:family="text">
      <style:text-properties fo:color="#000000" loext:opacity="100%" fo:font-style="italic" fo:font-weight="bold" style:font-name-asian="WenQuanYi Micro Hei" style:font-style-asian="italic" style:font-weight-asian="bold" style:font-style-complex="italic" style:font-weight-complex="bold"/>
    </style:style>
    <style:style style:name="T38" style:family="text">
      <style:text-properties fo:color="#000000" loext:opacity="100%" fo:font-style="italic" style:text-underline-style="none" fo:font-weight="bold" officeooo:rsid="02459518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39" style:family="text">
      <style:text-properties fo:color="#000000" loext:opacity="100%" style:font-name="Arial1" fo:font-size="10.5pt" fo:font-weight="bold" officeooo:rsid="015b0b2d" style:font-name-asian="WenQuanYi Micro Hei" style:font-size-asian="14pt" style:font-weight-asian="bold" style:font-name-complex="Lohit Hindi2" style:font-size-complex="14pt" style:font-weight-complex="bold" style:text-overline-style="none" style:text-overline-color="font-color"/>
    </style:style>
    <style:style style:name="T40" style:family="text">
      <style:text-properties fo:color="#000000" loext:opacity="100%" style:font-name-asian="WenQuanYi Micro Hei" style:font-name-complex="Lohit Hindi2" style:text-overline-style="none" style:text-overline-color="font-color"/>
    </style:style>
    <style:style style:name="T41" style:family="text">
      <style:text-properties fo:color="#000000" loext:opacity="100%" officeooo:rsid="01e7f05d" style:font-name-asian="WenQuanYi Micro Hei" style:font-name-complex="Lohit Hindi2" style:text-overline-style="none" style:text-overline-color="font-color"/>
    </style:style>
    <style:style style:name="T42" style:family="text">
      <style:text-properties fo:color="#000000" loext:opacity="100%" style:font-name-asian="WenQuanYi Micro Hei"/>
    </style:style>
    <style:style style:name="T43" style:family="text">
      <style:text-properties fo:color="#000000" loext:opacity="100%" style:text-underline-style="none" style:font-name-asian="WenQuanYi Micro Hei" style:font-name-complex="Lohit Hindi2" style:text-overline-style="none" style:text-overline-color="font-color"/>
    </style:style>
    <style:style style:name="T44" style:family="text">
      <style:text-properties fo:color="#000000" loext:opacity="100%" style:text-underline-style="none" officeooo:rsid="02426d6a" style:font-name-asian="WenQuanYi Micro Hei" style:font-name-complex="Lohit Hindi2" style:text-overline-style="none" style:text-overline-color="font-color"/>
    </style:style>
    <style:style style:name="T45" style:family="text">
      <style:text-properties fo:color="#000000" loext:opacity="100%" style:text-underline-style="none" officeooo:rsid="02459518" style:font-name-asian="WenQuanYi Micro Hei" style:font-name-complex="Lohit Hindi2" style:text-overline-style="none" style:text-overline-color="font-color"/>
    </style:style>
    <style:style style:name="T46" style:family="text">
      <style:text-properties fo:color="#000000" loext:opacity="100%" style:font-name="Droid Sans Mono1" fo:font-size="10.5pt" fo:font-weight="normal" officeooo:rsid="0212d54e" fo:background-color="#ffffff" loext:char-shading-value="0"/>
    </style:style>
    <style:style style:name="T47" style:family="text">
      <style:text-properties fo:color="#000000" loext:opacity="100%" officeooo:rsid="0156cb9f"/>
    </style:style>
    <style:style style:name="T48" style:family="text">
      <style:text-properties fo:color="#000000" loext:opacity="100%" officeooo:rsid="02915030"/>
    </style:style>
    <style:style style:name="T49" style:family="text">
      <style:text-properties fo:color="#000000" loext:opacity="100%" officeooo:rsid="02944c22"/>
    </style:style>
    <style:style style:name="T50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style:font-name="Times New Roman" fo:font-size="12pt" fo:font-style="italic" officeooo:rsid="00d240a6" style:font-size-asian="12pt" style:font-style-asian="italic" style:font-size-complex="12pt" style:font-style-complex="italic"/>
    </style:style>
    <style:style style:name="T53" style:family="text">
      <style:text-properties style:font-name="Times New Roman" fo:font-size="12pt" fo:font-style="italic" officeooo:rsid="01d3561b" style:font-size-asian="12pt" style:font-style-asian="italic" style:font-size-complex="12pt" style:font-style-complex="italic"/>
    </style:style>
    <style:style style:name="T54" style:family="text">
      <style:text-properties style:font-name="Times New Roman" fo:font-size="12pt" fo:font-style="italic" officeooo:rsid="00cd76d4" style:font-name-asian="WenQuanYi Micro Hei" style:font-size-asian="12pt" style:font-style-asian="italic" style:font-name-complex="Lohit Hindi2" style:font-size-complex="12pt" style:font-style-complex="italic"/>
    </style:style>
    <style:style style:name="T55" style:family="text">
      <style:text-properties style:font-name="Times New Roman" fo:font-size="12pt" fo:font-style="italic" officeooo:rsid="0127d61b" style:font-name-asian="WenQuanYi Micro Hei" style:font-size-asian="12pt" style:font-style-asian="italic" style:font-name-complex="Lohit Hindi2" style:font-size-complex="12pt" style:font-style-complex="italic"/>
    </style:style>
    <style:style style:name="T56" style:family="text">
      <style:text-properties style:font-name="Times New Roman" fo:font-size="12pt" fo:font-style="italic" officeooo:rsid="018dfa69" style:font-name-asian="WenQuanYi Micro Hei" style:font-size-asian="12pt" style:font-style-asian="italic" style:font-name-complex="Lohit Hindi2" style:font-size-complex="12pt" style:font-style-complex="italic"/>
    </style:style>
    <style:style style:name="T57" style:family="text">
      <style:text-properties style:font-name="Times New Roman" fo:font-size="12pt" fo:font-style="italic" officeooo:rsid="01f0ed49" style:font-name-asian="WenQuanYi Micro Hei" style:font-size-asian="12pt" style:font-style-asian="italic" style:font-name-complex="Lohit Hindi2" style:font-size-complex="12pt" style:font-style-complex="italic"/>
    </style:style>
    <style:style style:name="T58" style:family="text">
      <style:text-properties style:font-name="Times New Roman" fo:font-size="12pt" fo:font-style="italic" officeooo:rsid="02796218" style:font-name-asian="WenQuanYi Micro Hei" style:font-size-asian="12pt" style:font-style-asian="italic" style:font-name-complex="Lohit Hindi2" style:font-size-complex="12pt" style:font-style-complex="italic"/>
    </style:style>
    <style:style style:name="T59" style:family="text">
      <style:text-properties style:font-name="Times New Roman" fo:font-size="11.8000001907349pt" fo:font-weight="bold" officeooo:rsid="00fc47e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60" style:family="text">
      <style:text-properties style:font-name="Times New Roman" fo:font-size="11.8000001907349pt" fo:font-weight="normal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1" style:family="text">
      <style:text-properties style:font-name="Times New Roman" fo:font-size="11.8000001907349pt" fo:font-weight="normal" officeooo:rsid="00fc47e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2" style:family="text">
      <style:text-properties style:font-name="Times New Roman" fo:font-size="11.8000001907349pt" fo:font-weight="normal" officeooo:rsid="010ef496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3" style:family="text">
      <style:text-properties style:font-name="Times New Roman" fo:font-size="11.8000001907349pt" fo:font-weight="normal" officeooo:rsid="012ec90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4" style:family="text">
      <style:text-properties style:font-name="Times New Roman" fo:font-size="11.8000001907349pt" officeooo:rsid="010be942" style:font-name-asian="WenQuanYi Micro Hei" style:font-size-asian="11.8000001907349pt" style:font-name-complex="Lohit Hindi2" style:font-size-complex="11.8000001907349pt"/>
    </style:style>
    <style:style style:name="T65" style:family="text">
      <style:text-properties style:font-name="Times New Roman" fo:font-size="11.8000001907349pt" fo:font-style="italic" fo:font-weight="bold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66" style:family="text">
      <style:text-properties style:font-name="Times New Roman" fo:font-size="11.8000001907349pt" fo:font-style="italic" fo:font-weight="bold" officeooo:rsid="010be942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67" style:family="text">
      <style:text-properties style:font-name="Times New Roman" fo:font-size="11.8000001907349pt" fo:font-style="italic" fo:font-weight="bold" officeooo:rsid="00fc47ef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68" style:family="text">
      <style:text-properties style:font-name="Times New Roman" fo:font-size="11.8000001907349pt" fo:font-style="italic" fo:font-weight="normal" officeooo: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style:text-blinking="false" style:font-size-asian="10pt" style:font-size-complex="10pt" loext:padding="0cm" loext:border="none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224c6a5" style:text-blinking="false" style:font-size-asian="10pt" style:font-size-complex="10pt" loext:padding="0cm" loext:border="none"/>
    </style:style>
    <style:style style:name="T71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118147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72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1575f3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73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296504c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74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296504c" style:font-name-asian="Droid Sans Fallback" style:font-size-asian="11.8000001907349pt" style:font-style-asian="normal" style:font-weight-asian="normal" style:font-name-complex="Liberation Mono" style:font-size-complex="11.8000001907349pt" style:font-style-complex="normal" style:font-weight-complex="normal" loext:padding="0cm" loext:border="none"/>
    </style:style>
    <style:style style:name="T75" style:family="text">
      <style:text-properties fo:font-variant="normal" fo:text-transform="none" fo:color="#000000" loext:opacity="100%" style:font-name="Arial1" fo:font-size="11.8000001907349pt" fo:letter-spacing="normal" fo:font-style="normal" fo:font-weight="bold" officeooo:rsid="013bff24" fo:background-color="#ffffff" loext:char-shading-value="0" style:font-name-asian="WenQuanYi Micro Hei" style:font-size-asian="11.8000001907349pt" style:font-style-asian="normal" style:font-weight-asian="bold" style:font-name-complex="Lohit Hindi2" style:font-size-complex="11.8000001907349pt" style:font-style-complex="normal" style:font-weight-complex="bold" loext:padding="0cm" loext:border="none"/>
    </style:style>
    <style:style style:name="T76" style:family="text">
      <style:text-properties fo:font-variant="normal" fo:text-transform="none" fo:color="#000000" loext:opacity="100%" style:font-name="Calibri" fo:font-size="11pt" fo:letter-spacing="normal" fo:font-style="normal" fo:font-weight="normal" officeooo:rsid="0035ebb4" fo:background-color="#ffffff" loext:char-shading-value="0" style:font-name-asian="Calibri1" style:font-size-asian="11pt" style:font-style-asian="normal" style:font-weight-asian="normal" style:font-name-complex="Calibri1" style:font-size-complex="11pt" style:font-style-complex="normal" style:font-weight-complex="normal" loext:padding="0cm" loext:border="none"/>
    </style:style>
    <style:style style:name="T77" style:family="text">
      <style:text-properties officeooo:rsid="0080df97"/>
    </style:style>
    <style:style style:name="T78" style:family="text">
      <style:text-properties fo:font-size="12pt" fo:font-weight="normal" style:font-size-asian="12pt" style:font-weight-asian="normal" style:font-size-complex="12pt" style:font-weight-complex="normal"/>
    </style:style>
    <style:style style:name="T79" style:family="text">
      <style:text-properties fo:font-size="12pt" fo:font-weight="normal" officeooo:rsid="00a5219a" style:font-size-asian="12pt" style:font-weight-asian="normal" style:font-size-complex="12pt" style:font-weight-complex="normal"/>
    </style:style>
    <style:style style:name="T80" style:family="text">
      <style:text-properties fo:font-size="12pt" fo:font-weight="normal" officeooo:rsid="00d4e481" style:font-size-asian="12pt" style:font-weight-asian="normal" style:font-size-complex="12pt" style:font-weight-complex="normal"/>
    </style:style>
    <style:style style:name="T81" style:family="text">
      <style:text-properties fo:font-size="12pt" fo:font-weight="normal" officeooo:rsid="0134dbad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142ca69" style:font-size-asian="12pt" style:font-weight-asian="normal" style:font-size-complex="12pt" style:font-weight-complex="normal"/>
    </style:style>
    <style:style style:name="T8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fo:font-size="12pt" fo:font-style="italic" fo:font-weight="normal" officeooo:rsid="00a5219a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6" style:family="text">
      <style:text-properties fo:font-size="12pt" fo:font-style="italic" fo:font-weight="bold" officeooo:rsid="00d4e481" style:font-size-asian="12pt" style:font-style-asian="italic" style:font-weight-asian="bold" style:font-size-complex="12pt" style:font-style-complex="italic" style:font-weight-complex="bold"/>
    </style:style>
    <style:style style:name="T87" style:family="text">
      <style:text-properties fo:font-size="12pt" fo:font-style="italic" fo:font-weight="bold" officeooo:rsid="00a5219a" style:font-size-asian="12pt" style:font-style-asian="italic" style:font-weight-asian="bold" style:font-size-complex="12pt" style:font-style-complex="italic" style:font-weight-complex="bold"/>
    </style:style>
    <style:style style:name="T8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officeooo:rsid="00c7c8d0"/>
    </style:style>
    <style:style style:name="T90" style:family="text">
      <style:text-properties officeooo:rsid="00a5219a"/>
    </style:style>
    <style:style style:name="T91" style:family="text">
      <style:text-properties fo:font-style="normal" officeooo:rsid="01a0b522" style:font-style-asian="normal" style:font-style-complex="normal"/>
    </style:style>
    <style:style style:name="T92" style:family="text">
      <style:text-properties fo:font-style="normal" officeooo:rsid="01c0662b" style:font-style-asian="normal" style:font-style-complex="normal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17c63d6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196acba" style:font-style-asian="normal" style:font-weight-asian="normal" style:font-style-complex="normal" style:font-weight-complex="normal"/>
    </style:style>
    <style:style style:name="T96" style:family="text">
      <style:text-properties style:font-name-asian="WenQuanYi Micro Hei"/>
    </style:style>
    <style:style style:name="T97" style:family="text">
      <style:text-properties style:font-name-asian="WenQuanYi Micro Hei" style:font-name-complex="Lohit Hindi2"/>
    </style:style>
    <style:style style:name="T98" style:family="text">
      <style:text-properties officeooo:rsid="0105c941" style:font-name-asian="WenQuanYi Micro Hei" style:font-name-complex="Lohit Hindi2"/>
    </style:style>
    <style:style style:name="T99" style:family="text">
      <style:text-properties officeooo:rsid="00d311f0"/>
    </style:style>
    <style:style style:name="T100" style:family="text">
      <style:text-properties officeooo:rsid="00d4e481"/>
    </style:style>
    <style:style style:name="T101" style:family="text">
      <style:text-properties officeooo:rsid="00d84c6f"/>
    </style:style>
    <style:style style:name="T102" style:family="text">
      <style:text-properties officeooo:rsid="00d9af45"/>
    </style:style>
    <style:style style:name="T103" style:family="text">
      <style:text-properties officeooo:rsid="00dd3f97"/>
    </style:style>
    <style:style style:name="T104" style:family="text">
      <style:text-properties officeooo:rsid="00e03516"/>
    </style:style>
    <style:style style:name="T105" style:family="text">
      <style:text-properties officeooo:rsid="00e41927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officeooo:rsid="00ea8470"/>
    </style:style>
    <style:style style:name="T108" style:family="text">
      <style:text-properties style:font-name="Courier New"/>
    </style:style>
    <style:style style:name="T109" style:family="text">
      <style:text-properties style:font-name="Courier New" officeooo:rsid="01db0c5b"/>
    </style:style>
    <style:style style:name="T110" style:family="text">
      <style:text-properties style:font-name="Courier New" officeooo:rsid="02228c1d"/>
    </style:style>
    <style:style style:name="T111" style:family="text">
      <style:text-properties fo:font-size="11.8000001907349pt" style:font-name-asian="WenQuanYi Micro Hei" style:font-size-asian="11.8000001907349pt" style:font-name-complex="Lohit Hindi2" style:font-size-complex="11.8000001907349pt"/>
    </style:style>
    <style:style style:name="T112" style:family="text">
      <style:text-properties fo:font-size="11.8000001907349pt" fo:font-style="italic" fo:font-weight="bold" officeooo:rsid="01dc100b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13" style:family="text">
      <style:text-properties fo:font-size="11.8000001907349pt" officeooo:rsid="01081e95" style:font-size-asian="11.8000001907349pt" style:font-weight-asian="normal" style:font-size-complex="11.8000001907349pt" style:font-weight-complex="normal"/>
    </style:style>
    <style:style style:name="T114" style:family="text">
      <style:text-properties fo:font-size="11.8000001907349pt" officeooo:rsid="01e07616" style:font-size-asian="11.8000001907349pt" style:font-weight-asian="normal" style:font-size-complex="11.8000001907349pt" style:font-weight-complex="normal"/>
    </style:style>
    <style:style style:name="T115" style:family="text">
      <style:text-properties style:font-name="Arial1" fo:font-size="11.8000001907349pt" style:font-name-asian="WenQuanYi Micro Hei" style:font-size-asian="11.8000001907349pt" style:font-name-complex="Lohit Hindi2" style:font-size-complex="11.8000001907349pt"/>
    </style:style>
    <style:style style:name="T116" style:family="text">
      <style:text-properties style:font-name="Arial1" fo:font-weight="bold" officeooo:rsid="01030653" style:font-name-asian="WenQuanYi Micro Hei" style:font-weight-asian="bold" style:font-name-complex="Lohit Hindi2" style:font-weight-complex="bold"/>
    </style:style>
    <style:style style:name="T117" style:family="text">
      <style:text-properties style:font-name="Arial1" fo:font-weight="bold" officeooo:rsid="010be942" style:font-name-asian="WenQuanYi Micro Hei" style:font-weight-asian="bold" style:font-name-complex="Lohit Hindi2" style:font-weight-complex="bold"/>
    </style:style>
    <style:style style:name="T118" style:family="text">
      <style:text-properties style:font-name="Arial1" fo:font-weight="bold" officeooo:rsid="01d49512" style:font-name-asian="WenQuanYi Micro Hei" style:font-weight-asian="bold" style:font-name-complex="Lohit Hindi2" style:font-weight-complex="bold"/>
    </style:style>
    <style:style style:name="T119" style:family="text">
      <style:text-properties style:font-name="Arial1" fo:font-weight="bold" officeooo:rsid="025e9e4b" style:font-name-asian="WenQuanYi Micro Hei" style:font-weight-asian="bold" style:font-name-complex="Lohit Hindi2" style:font-weight-complex="bold"/>
    </style:style>
    <style:style style:name="T120" style:family="text">
      <style:text-properties style:font-name="Arial1" fo:font-weight="bold" officeooo:rsid="0275256c" style:font-name-asian="WenQuanYi Micro Hei" style:font-weight-asian="bold" style:font-name-complex="Lohit Hindi2" style:font-weight-complex="bold"/>
    </style:style>
    <style:style style:name="T121" style:family="text">
      <style:text-properties style:font-name="Arial1" fo:font-weight="bold" officeooo:rsid="01030653" style:font-weight-asian="bold" style:font-weight-complex="bold"/>
    </style:style>
    <style:style style:name="T122" style:family="text">
      <style:text-properties style:font-name="Arial1" fo:font-weight="bold" officeooo:rsid="0113287e" style:font-weight-asian="bold" style:font-weight-complex="bold"/>
    </style:style>
    <style:style style:name="T123" style:family="text">
      <style:text-properties style:font-name="Arial1" fo:font-weight="bold" officeooo:rsid="016e4cfb" style:font-weight-asian="bold" style:font-weight-complex="bold"/>
    </style:style>
    <style:style style:name="T124" style:family="text">
      <style:text-properties style:font-name="Arial1" fo:font-weight="bold" officeooo:rsid="01aefbe5" style:font-weight-asian="bold" style:font-weight-complex="bold"/>
    </style:style>
    <style:style style:name="T125" style:family="text">
      <style:text-properties style:font-name="Arial1" fo:font-weight="bold" officeooo:rsid="01b1765a" style:font-weight-asian="bold" style:font-weight-complex="bold"/>
    </style:style>
    <style:style style:name="T126" style:family="text">
      <style:text-properties style:font-name="Arial1" fo:font-weight="bold" officeooo:rsid="02700474" style:font-weight-asian="bold" style:font-weight-complex="bold"/>
    </style:style>
    <style:style style:name="T127" style:family="text">
      <style:text-properties style:font-name="Arial1" fo:font-size="16.1000003814697pt" fo:font-weight="bold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28" style:family="text">
      <style:text-properties style:font-name="Arial1" fo:font-size="16.1000003814697pt" fo:font-weight="bold" officeooo:rsid="013a2b1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29" style:family="text">
      <style:text-properties style:font-name="Arial1" fo:font-size="16.1000003814697pt" fo:font-weight="bold" officeooo:rsid="013bff24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0" style:family="text">
      <style:text-properties style:font-name="Arial1" fo:font-size="16.1000003814697pt" fo:font-weight="bold" officeooo:rsid="016e4cf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1" style:family="text">
      <style:text-properties style:font-name="Arial1" fo:font-size="16.1000003814697pt" fo:font-weight="bold" officeooo:rsid="01ff3d8f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2" style:family="text">
      <style:text-properties style:font-name="Arial1" fo:font-size="16.1000003814697pt" fo:font-weight="bold" officeooo:rsid="0200849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3" style:family="text">
      <style:text-properties style:font-name="Arial1" fo:font-size="16.1000003814697pt" fo:font-weight="bold" officeooo:rsid="026e8db5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4" style:family="text">
      <style:text-properties style:font-name="Arial1" fo:font-size="16.1000003814697pt" fo:font-weight="bold" officeooo:rsid="02700474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5" style:family="text">
      <style:text-properties style:font-name="Arial1" fo:font-size="16.1000003814697pt" fo:font-weight="bold" officeooo:rsid="027530f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6" style:family="text">
      <style:text-properties style:font-name="Arial1" fo:font-size="16.1000003814697pt" fo:font-style="italic" fo:font-weight="bold" officeooo:rsid="016f129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37" style:family="text">
      <style:text-properties style:font-name="Arial1" fo:font-size="16.1000003814697pt" fo:font-style="italic" fo:font-weight="bold" officeooo:rsid="01e5033a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38" style:family="text">
      <style:text-properties style:font-name="Arial1" fo:font-style="italic" fo:font-weight="bold" officeooo:rsid="016f129f" style:font-style-asian="italic" style:font-weight-asian="bold" style:font-style-complex="italic" style:font-weight-complex="bold"/>
    </style:style>
    <style:style style:name="T139" style:family="text">
      <style:text-properties officeooo:rsid="01081e95"/>
    </style:style>
    <style:style style:name="T140" style:family="text">
      <style:text-properties officeooo:rsid="0109ee0f"/>
    </style:style>
    <style:style style:name="T141" style:family="text">
      <style:text-properties officeooo:rsid="011152ad"/>
    </style:style>
    <style:style style:name="T142" style:family="text">
      <style:text-properties officeooo:rsid="01197bd3"/>
    </style:style>
    <style:style style:name="T143" style:family="text">
      <style:text-properties officeooo:rsid="011ba880"/>
    </style:style>
    <style:style style:name="T144" style:family="text">
      <style:text-properties officeooo:rsid="012747b8"/>
    </style:style>
    <style:style style:name="T145" style:family="text">
      <style:text-properties officeooo:rsid="01391e09"/>
    </style:style>
    <style:style style:name="T146" style:family="text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T147" style:family="text">
      <style:text-properties fo:font-size="11.8999996185303pt" officeooo:rsid="01a3ac4f" style:font-name-asian="WenQuanYi Micro Hei" style:font-size-asian="11.8999996185303pt" style:font-name-complex="Lohit Hindi2" style:font-size-complex="11.8999996185303pt"/>
    </style:style>
    <style:style style:name="T148" style:family="text">
      <style:text-properties fo:font-size="11.8999996185303pt" officeooo:rsid="01a3e481" style:font-name-asian="WenQuanYi Micro Hei" style:font-size-asian="11.8999996185303pt" style:font-name-complex="Lohit Hindi2" style:font-size-complex="11.8999996185303pt"/>
    </style:style>
    <style:style style:name="T149" style:family="text">
      <style:text-properties fo:font-size="11.8999996185303pt" officeooo:rsid="01c31d8c" style:font-name-asian="WenQuanYi Micro Hei" style:font-size-asian="11.8999996185303pt" style:font-name-complex="Lohit Hindi2" style:font-size-complex="11.8999996185303pt"/>
    </style:style>
    <style:style style:name="T150" style:family="text">
      <style:text-properties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51" style:family="text">
      <style:text-properties fo:font-size="11.8999996185303pt" fo:font-style="italic" fo:font-weight="bold" officeooo:rsid="01a3e481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52" style:family="text">
      <style:text-properties fo:font-size="11.8999996185303pt" fo:font-style="italic" fo:font-weight="bold" officeooo:rsid="01611fc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53" style:family="text">
      <style:text-properties fo:font-size="11.8999996185303pt" fo:font-style="italic" fo:font-weight="bold" officeooo:rsid="01c31d8c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54" style:family="text">
      <style:text-properties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55" style:family="text">
      <style:text-properties fo:font-size="11.8999996185303pt" fo:font-weight="bold" officeooo:rsid="015fbfae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56" style:family="text">
      <style:text-properties fo:font-size="11.8999996185303pt" fo:font-weight="bold" officeooo:rsid="01a3ac4f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57" style:family="text">
      <style:text-properties fo:font-size="11.8999996185303pt" fo:font-style="normal" fo:font-weight="normal" officeooo:rsid="01a3e481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158" style:family="text">
      <style:text-properties fo:font-size="11.8999996185303pt" fo:font-weight="normal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59" style:family="text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60" style:family="text">
      <style:text-properties officeooo:rsid="014639d4"/>
    </style:style>
    <style:style style:name="T161" style:family="text">
      <style:text-properties officeooo:rsid="01736b89"/>
    </style:style>
    <style:style style:name="T162" style:family="text">
      <style:text-properties officeooo:rsid="017c14fa"/>
    </style:style>
    <style:style style:name="T163" style:family="text">
      <style:text-properties officeooo:rsid="0180917a"/>
    </style:style>
    <style:style style:name="T164" style:family="text">
      <style:text-properties officeooo:rsid="0182dce3"/>
    </style:style>
    <style:style style:name="T165" style:family="text">
      <style:text-properties officeooo:rsid="01830471"/>
    </style:style>
    <style:style style:name="T166" style:family="text">
      <style:text-properties officeooo:rsid="01870321"/>
    </style:style>
    <style:style style:name="T167" style:family="text">
      <style:text-properties officeooo:rsid="018aa2c4"/>
    </style:style>
    <style:style style:name="T168" style:family="text">
      <style:text-properties officeooo:rsid="018cbe8f"/>
    </style:style>
    <style:style style:name="T169" style:family="text">
      <style:text-properties officeooo:rsid="018d353e"/>
    </style:style>
    <style:style style:name="T170" style:family="text">
      <style:text-properties officeooo:rsid="018dfa69"/>
    </style:style>
    <style:style style:name="T171" style:family="text">
      <style:text-properties officeooo:rsid="018e3abc"/>
    </style:style>
    <style:style style:name="T172" style:family="text">
      <style:text-properties officeooo:rsid="019127c0"/>
    </style:style>
    <style:style style:name="T173" style:family="text">
      <style:text-properties officeooo:rsid="0196acba"/>
    </style:style>
    <style:style style:name="T174" style:family="text">
      <style:text-properties officeooo:rsid="019838fd"/>
    </style:style>
    <style:style style:name="T175" style:family="text">
      <style:text-properties officeooo:rsid="019e1818"/>
    </style:style>
    <style:style style:name="T176" style:family="text">
      <style:text-properties officeooo:rsid="019fc817"/>
    </style:style>
    <style:style style:name="T177" style:family="text">
      <style:text-properties officeooo:rsid="01a0b522"/>
    </style:style>
    <style:style style:name="T178" style:family="text">
      <style:text-properties officeooo:rsid="01a49154"/>
    </style:style>
    <style:style style:name="T179" style:family="text">
      <style:text-properties officeooo:rsid="01a6fd45"/>
    </style:style>
    <style:style style:name="T180" style:family="text">
      <style:text-properties officeooo:rsid="01b1765a"/>
    </style:style>
    <style:style style:name="T181" style:family="text">
      <style:text-properties officeooo:rsid="01bd0c45"/>
    </style:style>
    <style:style style:name="T182" style:family="text">
      <style:text-properties officeooo:rsid="01c22379"/>
    </style:style>
    <style:style style:name="T183" style:family="text">
      <style:text-properties officeooo:rsid="01d1e3ad"/>
    </style:style>
    <style:style style:name="T184" style:family="text">
      <style:text-properties officeooo:rsid="01d349a4"/>
    </style:style>
    <style:style style:name="T185" style:family="text">
      <style:text-properties officeooo:rsid="01d3ad09"/>
    </style:style>
    <style:style style:name="T186" style:family="text">
      <style:text-properties officeooo:rsid="01d7546b"/>
    </style:style>
    <style:style style:name="T187" style:family="text">
      <style:text-properties officeooo:rsid="01d7c00f"/>
    </style:style>
    <style:style style:name="T188" style:family="text">
      <style:text-properties officeooo:rsid="01e07616"/>
    </style:style>
    <style:style style:name="T189" style:family="text">
      <style:text-properties officeooo:rsid="01e19ce1"/>
    </style:style>
    <style:style style:name="T190" style:family="text">
      <style:text-properties officeooo:rsid="02915030"/>
    </style:style>
    <style:style style:name="T191" style:family="text">
      <style:text-properties officeooo:rsid="0233990a"/>
    </style:style>
    <style:style style:name="T192" style:family="text">
      <style:text-properties style:font-name="Monospace" fo:font-size="10pt" style:font-size-asian="10pt"/>
    </style:style>
    <style:style style:name="T193" style:family="text">
      <style:text-properties officeooo:rsid="01e526c1"/>
    </style:style>
    <style:style style:name="T194" style:family="text">
      <style:text-properties officeooo:rsid="01e6888c"/>
    </style:style>
    <style:style style:name="T195" style:family="text">
      <style:text-properties officeooo:rsid="01e8c606"/>
    </style:style>
    <style:style style:name="T196" style:family="text">
      <style:text-properties officeooo:rsid="01ea6494"/>
    </style:style>
    <style:style style:name="T197" style:family="text">
      <style:text-properties officeooo:rsid="01eaf719"/>
    </style:style>
    <style:style style:name="T198" style:family="text">
      <style:text-properties officeooo:rsid="01eb7f02"/>
    </style:style>
    <style:style style:name="T199" style:family="text">
      <style:text-properties officeooo:rsid="01f0bd4a"/>
    </style:style>
    <style:style style:name="T200" style:family="text">
      <style:text-properties officeooo:rsid="01f178a6"/>
    </style:style>
    <style:style style:name="T201" style:family="text">
      <style:text-properties officeooo:rsid="01f3b5d6"/>
    </style:style>
    <style:style style:name="T202" style:family="text">
      <style:text-properties officeooo:rsid="01f5155f"/>
    </style:style>
    <style:style style:name="T203" style:family="text">
      <style:text-properties officeooo:rsid="021180ea"/>
    </style:style>
    <style:style style:name="T204" style:family="text">
      <style:text-properties officeooo:rsid="0217a75d"/>
    </style:style>
    <style:style style:name="T205" style:family="text">
      <style:text-properties officeooo:rsid="01f83c53"/>
    </style:style>
    <style:style style:name="T206" style:family="text">
      <style:text-properties officeooo:rsid="01fcfc09"/>
    </style:style>
    <style:style style:name="T207" style:family="text">
      <style:text-properties officeooo:rsid="01fe0912"/>
    </style:style>
    <style:style style:name="T208" style:family="text">
      <style:text-properties officeooo:rsid="01ff255d"/>
    </style:style>
    <style:style style:name="T209" style:family="text">
      <style:text-properties officeooo:rsid="02008497"/>
    </style:style>
    <style:style style:name="T210" style:family="text">
      <style:text-properties officeooo:rsid="02046e19"/>
    </style:style>
    <style:style style:name="T211" style:family="text">
      <style:text-properties officeooo:rsid="0207dd43"/>
    </style:style>
    <style:style style:name="T212" style:family="text">
      <style:text-properties officeooo:rsid="020cedef"/>
    </style:style>
    <style:style style:name="T213" style:family="text">
      <style:text-properties officeooo:rsid="020eae23"/>
    </style:style>
    <style:style style:name="T214" style:family="text">
      <style:text-properties officeooo:rsid="020ff3fb"/>
    </style:style>
    <style:style style:name="T215" style:family="text">
      <style:text-properties officeooo:rsid="02109e59"/>
    </style:style>
    <style:style style:name="T216" style:family="text">
      <style:text-properties officeooo:rsid="02111042"/>
    </style:style>
    <style:style style:name="T217" style:family="text">
      <style:text-properties officeooo:rsid="0212403b"/>
    </style:style>
    <style:style style:name="T218" style:family="text">
      <style:text-properties officeooo:rsid="0212d54e"/>
    </style:style>
    <style:style style:name="T219" style:family="text">
      <style:text-properties officeooo:rsid="0214b925"/>
    </style:style>
    <style:style style:name="T220" style:family="text">
      <style:text-properties officeooo:rsid="02196887"/>
    </style:style>
    <style:style style:name="T221" style:family="text">
      <style:text-properties officeooo:rsid="0225956e"/>
    </style:style>
    <style:style style:name="T222" style:family="text">
      <style:text-properties officeooo:rsid="02286eb7"/>
    </style:style>
    <style:style style:name="T223" style:family="text">
      <style:text-properties officeooo:rsid="022a6ec0"/>
    </style:style>
    <style:style style:name="T224" style:family="text">
      <style:text-properties officeooo:rsid="022f67c8"/>
    </style:style>
    <style:style style:name="T225" style:family="text">
      <style:text-properties officeooo:rsid="022f9e75"/>
    </style:style>
    <style:style style:name="T226" style:family="text">
      <style:text-properties officeooo:rsid="023276fa"/>
    </style:style>
    <style:style style:name="T227" style:family="text">
      <style:text-properties officeooo:rsid="0237e984"/>
    </style:style>
    <style:style style:name="T228" style:family="text">
      <style:text-properties officeooo:rsid="02394546"/>
    </style:style>
    <style:style style:name="T229" style:family="text">
      <style:text-properties officeooo:rsid="0241a9a2"/>
    </style:style>
    <style:style style:name="T230" style:family="text">
      <style:text-properties officeooo:rsid="02459518"/>
    </style:style>
    <style:style style:name="T231" style:family="text">
      <style:text-properties officeooo:rsid="0247bd8a"/>
    </style:style>
    <style:style style:name="T232" style:family="text">
      <style:text-properties officeooo:rsid="025e9e4b"/>
    </style:style>
    <style:style style:name="T233" style:family="text">
      <style:text-properties fo:color="#0000ff" loext:opacity="100%"/>
    </style:style>
    <style:style style:name="T234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235" style:family="text">
      <style:text-properties fo:color="#14181f" loext:opacity="100%" style:font-name="var font-mono1"/>
    </style:style>
    <style:style style:name="T236" style:family="text">
      <style:text-properties fo:color="#14181f" loext:opacity="100%"/>
    </style:style>
    <style:style style:name="T237" style:family="text">
      <style:text-properties fo:color="#2b303b" loext:opacity="100%" style:font-name="var font-mono1"/>
    </style:style>
    <style:style style:name="T238" style:family="text">
      <style:text-properties fo:color="#008080" loext:opacity="100%" style:font-name="var font-mono1"/>
    </style:style>
    <style:style style:name="T239" style:family="text">
      <style:text-properties officeooo:rsid="02607733"/>
    </style:style>
    <style:style style:name="T240" style:family="text">
      <style:text-properties officeooo:rsid="02641767"/>
    </style:style>
    <style:style style:name="T241" style:family="text">
      <style:text-properties officeooo:rsid="0265d002"/>
    </style:style>
    <style:style style:name="T242" style:family="text">
      <style:text-properties officeooo:rsid="0267fe07"/>
    </style:style>
    <style:style style:name="T243" style:family="text">
      <style:text-properties officeooo:rsid="02684f36"/>
    </style:style>
    <style:style style:name="T244" style:family="text">
      <style:text-properties style:font-name="Liberation Mono1" fo:font-size="10pt" fo:font-weight="bold" style:font-name-asian="Droid Sans Fallback1" style:font-size-asian="10pt" style:font-weight-asian="bold" style:font-name-complex="Liberation Mono2" style:font-size-complex="10pt"/>
    </style:style>
    <style:style style:name="T245" style:family="text">
      <style:text-properties style:font-name="Liberation Mono1" fo:font-size="10pt" fo:font-weight="bold" officeooo:rsid="02684f36" style:font-name-asian="Droid Sans Fallback1" style:font-size-asian="10pt" style:font-weight-asian="bold" style:font-name-complex="Liberation Mono2" style:font-size-complex="10pt"/>
    </style:style>
    <style:style style:name="T246" style:family="text">
      <style:text-properties officeooo:rsid="026c56ca"/>
    </style:style>
    <style:style style:name="T247" style:family="text">
      <style:text-properties style:font-name="Calibri" fo:font-size="11pt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48" style:family="text">
      <style:text-properties style:font-name="Calibri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T249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250" style:family="text">
      <style:text-properties style:font-name="Consolas" fo:font-size="9pt" style:font-name-asian="Consolas1" style:font-size-asian="9pt" style:font-name-complex="Consolas1" style:font-size-complex="9pt"/>
    </style:style>
    <style:style style:name="T251" style:family="text">
      <style:text-properties style:font-name="Consolas" fo:font-size="9pt" officeooo:rsid="02875a1d" style:font-name-asian="Consolas1" style:font-size-asian="9pt" style:font-name-complex="Consolas1" style:font-size-complex="9pt"/>
    </style:style>
    <style:style style:name="T252" style:family="text">
      <style:text-properties style:font-name="Consolas" fo:font-size="9.5pt" style:font-name-asian="Consolas1" style:font-size-asian="9.5pt" style:font-name-complex="Consolas1" style:font-size-complex="9.5pt"/>
    </style:style>
    <style:style style:name="T253" style:family="text">
      <style:text-properties officeooo:rsid="026e8db5"/>
    </style:style>
    <style:style style:name="T254" style:family="text">
      <style:text-properties fo:color="#8100c2" loext:opacity="100%" style:font-name="var font-mono1"/>
    </style:style>
    <style:style style:name="T255" style:family="text">
      <style:text-properties fo:color="#008000" loext:opacity="100%" style:font-name="var font-mono1"/>
    </style:style>
    <style:style style:name="T256" style:family="text">
      <style:text-properties fo:color="#0051c2" loext:opacity="100%" style:font-name="var font-mono1"/>
    </style:style>
    <style:style style:name="T257" style:family="text">
      <style:text-properties fo:color="#6e7687" loext:opacity="100%" style:font-name="var font-mono1"/>
    </style:style>
    <style:style style:name="T258" style:family="text">
      <style:text-properties officeooo:rsid="02700474"/>
    </style:style>
    <style:style style:name="T259" style:family="text">
      <style:text-properties officeooo:rsid="0272487e"/>
    </style:style>
    <style:style style:name="T260" style:family="text">
      <style:text-properties officeooo:rsid="027445df"/>
    </style:style>
    <style:style style:name="T261" style:family="text">
      <style:text-properties officeooo:rsid="027530f8"/>
    </style:style>
    <style:style style:name="T262" style:family="text">
      <style:text-properties officeooo:rsid="0276adc7"/>
    </style:style>
    <style:style style:name="T263" style:family="text">
      <style:text-properties officeooo:rsid="02774a40"/>
    </style:style>
    <style:style style:name="T264" style:family="text">
      <style:text-properties officeooo:rsid="027ab65e"/>
    </style:style>
    <style:style style:name="T265" style:family="text">
      <style:text-properties officeooo:rsid="027f79fb"/>
    </style:style>
    <style:style style:name="T266" style:family="text">
      <style:text-properties officeooo:rsid="028fc616"/>
    </style:style>
    <style:style style:name="T267" style:family="text">
      <style:text-properties officeooo:rsid="02902f24"/>
    </style:style>
    <style:style style:name="T268" style:family="text">
      <style:text-properties fo:color="#6a8759" loext:opacity="100%" style:font-name="JetBrains Mono" fo:font-size="15pt" fo:font-style="normal" fo:font-weight="normal" style:font-size-asian="15pt" style:font-style-asian="normal" style:font-weight-asian="normal"/>
    </style:style>
    <style:style style:name="T269" style:family="text">
      <style:text-properties officeooo:rsid="029255e9"/>
    </style:style>
    <style:style style:name="T270" style:family="text">
      <style:text-properties officeooo:rsid="0293171a"/>
    </style:style>
    <style:style style:name="T271" style:family="text">
      <style:text-properties officeooo:rsid="029474f3"/>
    </style:style>
    <style:style style:name="T272" style:family="text">
      <style:text-properties officeooo:rsid="02975a52"/>
    </style:style>
    <style:style style:name="T273" style:family="text">
      <style:text-properties officeooo:rsid="02982a9b"/>
    </style:style>
    <style:style style:name="T274" style:family="text">
      <style:text-properties officeooo:rsid="029f525f"/>
    </style:style>
    <style:style style:name="T275" style:family="text">
      <style:text-properties officeooo:rsid="029fb7ef"/>
    </style:style>
    <style:style style:name="T276" style:family="text">
      <style:text-properties officeooo:rsid="02a11ee5"/>
    </style:style>
    <style:style style:name="T277" style:family="text">
      <style:text-properties fo:color="#a31515" loext:opacity="100%"/>
    </style:style>
    <style:style style:name="T278" style:family="text">
      <style:text-properties officeooo:rsid="02a2bca6"/>
    </style:style>
    <style:style style:name="T279" style:family="text">
      <style:text-properties officeooo:rsid="02a41fa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27cm" fo:text-indent="-0.635cm" fo:margin-left="1.4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62cm" fo:text-indent="-0.635cm" fo:margin-left="2.06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97cm" fo:text-indent="-0.635cm" fo:margin-left="2.69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32cm" fo:text-indent="-0.635cm" fo:margin-left="3.33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67cm" fo:text-indent="-0.635cm" fo:margin-left="3.96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02cm" fo:text-indent="-0.635cm" fo:margin-left="4.60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37cm" fo:text-indent="-0.635cm" fo:margin-left="5.23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72cm" fo:text-indent="-0.635cm" fo:margin-left="5.87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07cm" fo:text-indent="-0.635cm" fo:margin-left="6.50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42cm" fo:text-indent="-0.635cm" fo:margin-left="7.142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Cahier de TP <text:line-break/>« <text:span text:style-name="T175">Administration Cluster Kafka</text:span><text:span text:style-name="T89"> </text:span>»</text:p>
      <text:p text:style-name="P112"/>
      <text:p text:style-name="P61">Pré-requis : </text:p>
      <text:list xml:id="list3665899728" text:style-name="L1">
        <text:list-item>
          <text:p text:style-name="P235">Bonne connexion Internet </text:p>
        </text:list-item>
        <text:list-item>
          <text:p text:style-name="P236">Linux</text:p>
        </text:list-item>
        <text:list-item>
          <text:p text:style-name="P237">JDK<text:span text:style-name="T199">2</text:span><text:span text:style-name="T145">1</text:span>+, <text:span text:style-name="T145">Maven</text:span></text:p>
        </text:list-item>
        <text:list-item>
          <text:p text:style-name="P238">IDE Recommandés : STS 4, IntelliJIDEA, VSCode</text:p>
        </text:list-item>
        <text:list-item>
          <text:p text:style-name="P239"><text:span text:style-name="T107">Docker, </text:span>Git</text:p>
        </text:list-item>
      </text:list>
      <text:p text:style-name="P140"/>
      <text:p text:style-name="P63">Solutions :</text:p>
      <text:p text:style-name="P189"><text:a xlink:type="simple" xlink:href="https://github.com/dthibau/kafka-admin-solutions" text:style-name="Internet_20_link" text:visited-style-name="Visited_20_Internet_20_Link">https://github.com/dthibau/kafka-admin-solutions</text:a></text:p>
      <text:p text:style-name="P189"/>
      <text:p text:style-name="P65">Images docker utilisées :</text:p>
      <text:list text:style-name="L2">
        <text:list-item>
          <text:p text:style-name="P193" loext:marker-style-name="T19"><text:span text:style-name="T19">apache/kafka:4.2.0</text:span></text:p>
        </text:list-item>
        <text:list-item>
          <text:p text:style-name="P241"><text:span text:style-name="T234">docker.redpanda.com/redpandadata/console:v3.2.1</text:span></text:p>
        </text:list-item>
        <text:list-item>
          <text:p text:style-name="P249">tchiotludo/akhq</text:p>
        </text:list-item>
        <text:list-item>
          <text:p text:style-name="P241"><text:span text:style-name="T234">digitsy/kafka-magic</text:span></text:p>
        </text:list-item>
        <text:list-item>
          <text:p text:style-name="P248">confluentinc/cp-kafka-rest:7.7.8</text:p>
        </text:list-item>
        <text:list-item>
          <text:p text:style-name="P248">confluentinc/cp-schema-registry:7.7.8</text:p>
        </text:list-item>
        <text:list-item>
          <text:p text:style-name="P250">postgres:15.1</text:p>
        </text:list-item>
        <text:list-item>
          <text:p text:style-name="P250">dpage/pgadmin4</text:p>
        </text:list-item>
        <text:list-item>
          <text:p text:style-name="P240"><text:span text:style-name="T7">docker.elastic.co/elasticsearch/elasticsearch:</text:span><text:span text:style-name="T234">8.13.0</text:span></text:p>
        </text:list-item>
        <text:list-item>
          <text:p text:style-name="P240"><text:span text:style-name="T7">docker.elastic.co/kibana/kibana:</text:span><text:span text:style-name="T234">8.13.0</text:span></text:p>
        </text:list-item>
        <text:list-item>
          <text:p text:style-name="P240"><text:span text:style-name="T234">quay.io/keycloak/keycloak:26.1</text:span></text:p>
        </text:list-item>
      </text:list>
      <text:list text:continue-list="list3665899728" text:style-name="L1">
        <text:list-header>
          <text:p text:style-name="P242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97"><text:a xlink:type="simple" xlink:href="#__RefHeading___Toc9766_3845367211" text:style-name="Index_20_Link" text:visited-style-name="Index_20_Link">Atelier 1: Mise en place<text:tab/>4</text:a></text:p>
          <text:p text:style-name="P198"><text:a xlink:type="simple" xlink:href="#__RefHeading___Toc2648_870239550" text:style-name="Index_20_Link" text:visited-style-name="Index_20_Link">1.1 Installation cluster<text:tab/>4</text:a></text:p>
          <text:p text:style-name="P199"><text:a xlink:type="simple" xlink:href="#__RefHeading___Toc2650_870239550" text:style-name="Index_20_Link" text:visited-style-name="Index_20_Link">1.1.1 Option archive<text:tab/>4</text:a></text:p>
          <text:p text:style-name="P199"><text:a xlink:type="simple" xlink:href="#__RefHeading___Toc9856_3845367211" text:style-name="Index_20_Link" text:visited-style-name="Index_20_Link">1.1.2 Option Docker<text:tab/>5</text:a></text:p>
          <text:p text:style-name="P199"><text:a xlink:type="simple" xlink:href="#__RefHeading___Toc20226_2913458575" text:style-name="Index_20_Link" text:visited-style-name="Index_20_Link">1.1.3 Vérifications<text:tab/>5</text:a></text:p>
          <text:p text:style-name="P198"><text:a xlink:type="simple" xlink:href="#__RefHeading___Toc14826_2913458575" text:style-name="Index_20_Link" text:visited-style-name="Index_20_Link">1.2 Utilitaires : Configuration dynamique et inspection du cluster<text:tab/>6</text:a></text:p>
          <text:p text:style-name="P199"><text:a xlink:type="simple" xlink:href="#__RefHeading___Toc14830_2913458575" text:style-name="Index_20_Link" text:visited-style-name="Index_20_Link">1.2.1 Inspection du quorum KRaft<text:tab/>6</text:a></text:p>
          <text:p text:style-name="P199"><text:a xlink:type="simple" xlink:href="#__RefHeading___Toc14832_2913458575" text:style-name="Index_20_Link" text:visited-style-name="Index_20_Link">1.2.2 Modifier la configuration d'un topic<text:tab/>6</text:a></text:p>
          <text:p text:style-name="P199"><text:a xlink:type="simple" xlink:href="#__RefHeading___Toc14834_2913458575" text:style-name="Index_20_Link" text:visited-style-name="Index_20_Link">1.2.3 Configuration dynamique du broker<text:tab/>7</text:a></text:p>
          <text:p text:style-name="P198"><text:a xlink:type="simple" xlink:href="#__RefHeading___Toc9858_3845367211" text:style-name="Index_20_Link" text:visited-style-name="Index_20_Link">1.3 Outils graphiques<text:tab/>7</text:a></text:p>
          <text:p text:style-name="P197"><text:a xlink:type="simple" xlink:href="#__RefHeading___Toc9782_3845367211" text:style-name="Index_20_Link" text:visited-style-name="Index_20_Link">Atelier 2: Production de messages<text:tab/>8</text:a></text:p>
          <text:p text:style-name="P197"><text:a xlink:type="simple" xlink:href="#__RefHeading___Toc9784_3845367211" text:style-name="Index_20_Link" text:visited-style-name="Index_20_Link">Atelier 3 : Consommation de messages<text:tab/>9</text:a></text:p>
          <text:p text:style-name="P198"><text:a xlink:type="simple" xlink:href="#__RefHeading___Toc9786_38453672111" text:style-name="Index_20_Link" text:visited-style-name="Index_20_Link">3.0 Mise en place BD<text:tab/>9</text:a></text:p>
          <text:p text:style-name="P198"><text:a xlink:type="simple" xlink:href="#__RefHeading___Toc9786_3845367211" text:style-name="Index_20_Link" text:visited-style-name="Index_20_Link">3.1 Performance<text:tab/>9</text:a></text:p>
          <text:p text:style-name="P198"><text:a xlink:type="simple" xlink:href="#__RefHeading___Toc9788_3845367211" text:style-name="Index_20_Link" text:visited-style-name="Index_20_Link">3.2 Rebalancing des consommateurs<text:tab/>10</text:a></text:p>
          <text:p text:style-name="P197"><text:a xlink:type="simple" xlink:href="#__RefHeading___Toc16950_1047798942" text:style-name="Index_20_Link" text:visited-style-name="Index_20_Link">Atelier 4 : Exactly Once et Transactions<text:tab/>11</text:a></text:p>
          <text:p text:style-name="P198"><text:a xlink:type="simple" xlink:href="#__RefHeading___Toc6412_3893618287" text:style-name="Index_20_Link" text:visited-style-name="Index_20_Link">4.1 Transaction et ISOLATION_LEVEL<text:tab/>11</text:a></text:p>
          <text:p text:style-name="P199"><text:a xlink:type="simple" xlink:href="#__RefHeading___Toc16952_1047798942" text:style-name="Index_20_Link" text:visited-style-name="Index_20_Link">4.1.1 Producteur transactionnel<text:tab/>11</text:a></text:p>
          <text:p text:style-name="P199"><text:a xlink:type="simple" xlink:href="#__RefHeading___Toc16954_1047798942" text:style-name="Index_20_Link" text:visited-style-name="Index_20_Link">4.1.2 Consommateur<text:tab/>11</text:a></text:p>
          <text:p text:style-name="P198"><text:a xlink:type="simple" xlink:href="#__RefHeading___Toc6412_38936182871" text:style-name="Index_20_Link" text:visited-style-name="Index_20_Link">4.2 Exactly Once<text:tab/>11</text:a></text:p>
          <text:p text:style-name="P197"><text:a xlink:type="simple" xlink:href="#__RefHeading___Toc9790_3845367211" text:style-name="Index_20_Link" text:visited-style-name="Index_20_Link">Atelier 5. Schema Registry et sérialisation Avro<text:tab/>12</text:a></text:p>
          <text:p text:style-name="P198"><text:a xlink:type="simple" xlink:href="#__RefHeading___Toc9792_3845367211" text:style-name="Index_20_Link" text:visited-style-name="Index_20_Link">5.1 Démarrage de Confuent Registry<text:tab/>12</text:a></text:p>
          <text:p text:style-name="P198"><text:a xlink:type="simple" xlink:href="#__RefHeading___Toc9794_3845367211" text:style-name="Index_20_Link" text:visited-style-name="Index_20_Link"><text:soft-page-break/>5.2 Producteur de message<text:tab/>12</text:a></text:p>
          <text:p text:style-name="P198"><text:a xlink:type="simple" xlink:href="#__RefHeading___Toc9796_3845367211" text:style-name="Index_20_Link" text:visited-style-name="Index_20_Link">5.3 Consommateur de message<text:tab/>12</text:a></text:p>
          <text:p text:style-name="P198"><text:a xlink:type="simple" xlink:href="#__RefHeading___Toc9798_38453672111" text:style-name="Index_20_Link" text:visited-style-name="Index_20_Link">5.4 Evolution du schéma compatible<text:tab/>13</text:a></text:p>
          <text:p text:style-name="P198"><text:a xlink:type="simple" xlink:href="#__RefHeading___Toc9798_38453672112" text:style-name="Index_20_Link" text:visited-style-name="Index_20_Link">5.5 Evolution du schéma incompatible<text:tab/>13</text:a></text:p>
          <text:p text:style-name="P197"><text:a xlink:type="simple" xlink:href="#__RefHeading___Toc20228_2913458575" text:style-name="Index_20_Link" text:visited-style-name="Index_20_Link">Atelier 6. Kafka Connect<text:tab/>14</text:a></text:p>
          <text:p text:style-name="P198"><text:a xlink:type="simple" xlink:href="#__RefHeading___Toc20230_2913458575" text:style-name="Index_20_Link" text:visited-style-name="Index_20_Link">6.1 Installation du plugin ElasticSearch dans kafka connect<text:tab/>14</text:a></text:p>
          <text:p text:style-name="P198"><text:a xlink:type="simple" xlink:href="#__RefHeading___Toc20232_2913458575" text:style-name="Index_20_Link" text:visited-style-name="Index_20_Link">6.2 Démarrage de la stack<text:tab/>14</text:a></text:p>
          <text:p text:style-name="P198"><text:a xlink:type="simple" xlink:href="#__RefHeading___Toc20234_2913458575" text:style-name="Index_20_Link" text:visited-style-name="Index_20_Link">6.3 Configuration du connecteur<text:tab/>14</text:a></text:p>
          <text:p text:style-name="P198"><text:a xlink:type="simple" xlink:href="#__RefHeading___Toc20236_2913458575" text:style-name="Index_20_Link" text:visited-style-name="Index_20_Link">6.4 Améliorations<text:tab/>15</text:a></text:p>
          <text:p text:style-name="P197"><text:a xlink:type="simple" xlink:href="#__RefHeading___Toc20238_2913458575" text:style-name="Index_20_Link" text:visited-style-name="Index_20_Link">Atelier 7. MirrorMaker 2<text:tab/>16</text:a></text:p>
          <text:p text:style-name="P198"><text:a xlink:type="simple" xlink:href="#__RefHeading___Toc20240_2913458575" text:style-name="Index_20_Link" text:visited-style-name="Index_20_Link">7.1 Démarrer le second cluster<text:tab/>16</text:a></text:p>
          <text:p text:style-name="P198"><text:a xlink:type="simple" xlink:href="#__RefHeading___Toc20242_2913458575" text:style-name="Index_20_Link" text:visited-style-name="Index_20_Link">7.2 Vérifier la disponibilité des connecteurs MM2<text:tab/>17</text:a></text:p>
          <text:p text:style-name="P198"><text:a xlink:type="simple" xlink:href="#__RefHeading___Toc20244_2913458575" text:style-name="Index_20_Link" text:visited-style-name="Index_20_Link">7.3 Créer le connecteur MirrorSource<text:tab/>17</text:a></text:p>
          <text:p text:style-name="P198"><text:a xlink:type="simple" xlink:href="#__RefHeading___Toc20246_2913458575" text:style-name="Index_20_Link" text:visited-style-name="Index_20_Link">7.4 Créer le connecteur MirrorCheckpoint<text:tab/>18</text:a></text:p>
          <text:p text:style-name="P198"><text:a xlink:type="simple" xlink:href="#__RefHeading___Toc20248_2913458575" text:style-name="Index_20_Link" text:visited-style-name="Index_20_Link">7.5 Créer le connecteur MirrorHeartbeat<text:tab/>18</text:a></text:p>
          <text:p text:style-name="P198"><text:a xlink:type="simple" xlink:href="#__RefHeading___Toc20250_2913458575" text:style-name="Index_20_Link" text:visited-style-name="Index_20_Link">7.6 Vérifier la réplication<text:tab/>18</text:a></text:p>
          <text:p text:style-name="P197"><text:a xlink:type="simple" xlink:href="#__RefHeading___Toc9889_3845367211" text:style-name="Index_20_Link" text:visited-style-name="Index_20_Link">Atelier 8 : kafkaStream et ksqlDB<text:tab/>20</text:a></text:p>
          <text:p text:style-name="P198"><text:a xlink:type="simple" xlink:href="#__RefHeading___Toc20252_2913458575" text:style-name="Index_20_Link" text:visited-style-name="Index_20_Link">8.1 Application KafkaStream<text:tab/>20</text:a></text:p>
          <text:p text:style-name="P198"><text:a xlink:type="simple" xlink:href="#__RefHeading___Toc20254_2913458575" text:style-name="Index_20_Link" text:visited-style-name="Index_20_Link">8.2 kSQLDb<text:tab/>20</text:a></text:p>
          <text:p text:style-name="P199"><text:a xlink:type="simple" xlink:href="#__RefHeading___Toc15343_2024334449" text:style-name="Index_20_Link" text:visited-style-name="Index_20_Link">8.2.1 Démarrage de la stack<text:tab/>20</text:a></text:p>
          <text:p text:style-name="P199"><text:a xlink:type="simple" xlink:href="#__RefHeading___Toc15345_2024334449" text:style-name="Index_20_Link" text:visited-style-name="Index_20_Link">8.2.1 Getting Started<text:tab/>20</text:a></text:p>
          <text:p text:style-name="P199"><text:a xlink:type="simple" xlink:href="#__RefHeading___Toc15351_2024334449" text:style-name="Index_20_Link" text:visited-style-name="Index_20_Link">8.2.2 Transformations et filtres<text:tab/>21</text:a></text:p>
          <text:p text:style-name="P199"><text:a xlink:type="simple" xlink:href="#__RefHeading___Toc15359_2024334449" text:style-name="Index_20_Link" text:visited-style-name="Index_20_Link">8.2.3 Requêtes<text:tab/>22</text:a></text:p>
          <text:p text:style-name="P199"><text:a xlink:type="simple" xlink:href="#__RefHeading___Toc15367_2024334449" text:style-name="Index_20_Link" text:visited-style-name="Index_20_Link">8.2.4 Pour aller plus loin<text:tab/>23</text:a></text:p>
          <text:p text:style-name="P197"><text:a xlink:type="simple" xlink:href="#__RefHeading___Toc20256_2913458575" text:style-name="Index_20_Link" text:visited-style-name="Index_20_Link">Atelier 9: Sécurité<text:tab/>24</text:a></text:p>
          <text:p text:style-name="P198"><text:a xlink:type="simple" xlink:href="#__RefHeading___Toc9834_38453672111" text:style-name="Index_20_Link" text:visited-style-name="Index_20_Link">9.1 Séparation des échanges réseaux<text:tab/>24</text:a></text:p>
          <text:p text:style-name="P198"><text:a xlink:type="simple" xlink:href="#__RefHeading___Toc9834_3845367211" text:style-name="Index_20_Link" text:visited-style-name="Index_20_Link">9.2 Mise en place de SSL pour crypter les données<text:tab/>24</text:a></text:p>
          <text:p text:style-name="P199"><text:a xlink:type="simple" xlink:href="#__RefHeading___Toc16956_1047798942" text:style-name="Index_20_Link" text:visited-style-name="Index_20_Link">9.2.1 SSL appliqué aux communications inter-broker<text:tab/>24</text:a></text:p>
          <text:p text:style-name="P199"><text:a xlink:type="simple" xlink:href="#__RefHeading___Toc16958_1047798942" text:style-name="Index_20_Link" text:visited-style-name="Index_20_Link">9.2.2 SSL appliqué aux communications externes<text:tab/>25</text:a></text:p>
          <text:p text:style-name="P198"><text:a xlink:type="simple" xlink:href="#__RefHeading___Toc9836_3845367211" text:style-name="Index_20_Link" text:visited-style-name="Index_20_Link">9.3 Authentification via SASL/PLAIN<text:tab/>25</text:a></text:p>
          <text:p text:style-name="P199"><text:a xlink:type="simple" xlink:href="#__RefHeading___Toc16960_1047798942" text:style-name="Index_20_Link" text:visited-style-name="Index_20_Link">9.3.1 Authentification inter-broker<text:tab/>25</text:a></text:p>
          <text:p text:style-name="P199"><text:a xlink:type="simple" xlink:href="#__RefHeading___Toc16962_1047798942" text:style-name="Index_20_Link" text:visited-style-name="Index_20_Link">9.3.2 Authentification client<text:tab/>26</text:a></text:p>
          <text:p text:style-name="P198"><text:a xlink:type="simple" xlink:href="#__RefHeading___Toc9891_3845367211" text:style-name="Index_20_Link" text:visited-style-name="Index_20_Link">9.4 ACL<text:tab/>27</text:a></text:p>
          <text:p text:style-name="P199"><text:a xlink:type="simple" xlink:href="#__RefHeading___Toc16964_1047798942" text:style-name="Index_20_Link" text:visited-style-name="Index_20_Link">9.4.1 Activation des ACLs<text:tab/>27</text:a></text:p>
          <text:p text:style-name="P199"><text:a xlink:type="simple" xlink:href="#__RefHeading___Toc16966_1047798942" text:style-name="Index_20_Link" text:visited-style-name="Index_20_Link">9.4.2 Définition ACLs<text:tab/>27</text:a></text:p>
          <text:p text:style-name="P198"><text:a xlink:type="simple" xlink:href="#__RefHeading___Toc16975_1047798942" text:style-name="Index_20_Link" text:visited-style-name="Index_20_Link">9.5 Quota<text:tab/>27</text:a></text:p>
          <text:p text:style-name="P197"><text:a xlink:type="simple" xlink:href="#__RefHeading___Toc9828_3845367211" text:style-name="Index_20_Link" text:visited-style-name="Index_20_Link">Atelier 10 : Exploitation<text:tab/>29</text:a></text:p>
          <text:p text:style-name="P198"><text:a xlink:type="simple" xlink:href="#__RefHeading___Toc5300_3700672249" text:style-name="Index_20_Link" text:visited-style-name="Index_20_Link">10.1 Rétention et segments<text:tab/>29</text:a></text:p>
          <text:p text:style-name="P198"><text:a xlink:type="simple" xlink:href="#__RefHeading___Toc20373_2913458575" text:style-name="Index_20_Link" text:visited-style-name="Index_20_Link">10.2 Extension du cluster et réassignement des partitions<text:tab/>29</text:a></text:p>
          <text:p text:style-name="P198"><text:a xlink:type="simple" xlink:href="#__RefHeading___Toc9832_3845367211" text:style-name="Index_20_Link" text:visited-style-name="Index_20_Link">10.3 Rolling restart<text:tab/>29</text:a></text:p>
          <text:p text:style-name="P198"><text:a xlink:type="simple" xlink:href="#__RefHeading___Toc20375_2913458575" text:style-name="Index_20_Link" text:visited-style-name="Index_20_Link">10.4 Bascule et reprise depuis le cluster B<text:tab/>29</text:a></text:p>
          <text:p text:style-name="P199"><text:a xlink:type="simple" xlink:href="#__RefHeading___Toc20377_2913458575" text:style-name="Index_20_Link" text:visited-style-name="Index_20_Link">10.4.1. Préparer un consumer group côté A<text:tab/>29</text:a></text:p>
          <text:p text:style-name="P199"><text:a xlink:type="simple" xlink:href="#__RefHeading___Toc20379_2913458575" text:style-name="Index_20_Link" text:visited-style-name="Index_20_Link">10.4.2. Inspecter les checkpoints côté B<text:tab/>30</text:a></text:p>
          <text:p text:style-name="P199"><text:a xlink:type="simple" xlink:href="#__RefHeading___Toc20381_2913458575" text:style-name="Index_20_Link" text:visited-style-name="Index_20_Link">10.4.3. Simuler la panne de A<text:tab/>30</text:a></text:p>
          <text:p text:style-name="P199"><text:a xlink:type="simple" xlink:href="#__RefHeading___Toc20383_2913458575" text:style-name="Index_20_Link" text:visited-style-name="Index_20_Link">10.4.4. Faire reprendre le consumer côté B<text:tab/>30</text:a></text:p>
          <text:p text:style-name="P199"><text:a xlink:type="simple" xlink:href="#__RefHeading___Toc20385_2913458575" text:style-name="Index_20_Link" text:visited-style-name="Index_20_Link">10.4.5. Mesurer le RPO<text:tab/>30</text:a></text:p>
          <text:p text:style-name="P199"><text:a xlink:type="simple" xlink:href="#__RefHeading___Toc20387_2913458575" text:style-name="Index_20_Link" text:visited-style-name="Index_20_Link">10.4.6. Failback<text:tab/>31</text:a></text:p>
          <text:p text:style-name="P197"><text:a xlink:type="simple" xlink:href="#__RefHeading___Toc9838_3845367211" text:style-name="Index_20_Link" text:visited-style-name="Index_20_Link">Atelier 11. <text:span text:style-name="T1">Monitoring </text:span><text:span text:style-name="T1">avec Prometheus/Grafana</text:span><text:tab/>32</text:a></text:p>
          <text:p text:style-name="P198"><text:a xlink:type="simple" xlink:href="#__RefHeading___Toc2654_1126617678" text:style-name="Index_20_Link" text:visited-style-name="Index_20_Link">11.1 Exporter les informations JMX au format Prometheus<text:tab/>32</text:a></text:p>
          <text:p text:style-name="P198"><text:a xlink:type="simple" xlink:href="#__RefHeading___Toc2656_1126617678" text:style-name="Index_20_Link" text:visited-style-name="Index_20_Link">9.3 Mise en place Prometheus Grafana<text:tab/>32</text:a></text:p>
          <text:p text:style-name="P197"><text:a xlink:type="simple" xlink:href="#__RefHeading___Toc2658_1126617678" text:style-name="Index_20_Link" text:visited-style-name="Index_20_Link">A. Annexes <text:tab/>34</text:a></text:p>
          <text:p text:style-name="P198"><text:a xlink:type="simple" xlink:href="#__RefHeading___Toc9768_3845367211" text:style-name="Index_20_Link" text:visited-style-name="Index_20_Link">A.1. Installation Ensemble Zookeeper<text:tab/>34</text:a></text:p>
        </text:index-body>
      </text:table-of-content>
      <text:h text:style-name="Heading_20_1" text:outline-level="1"><text:soft-page-break/></text:h>
      <text:h text:style-name="P200" text:outline-level="1"/>
      <text:h text:style-name="P203" text:outline-level="1"><text:bookmark-start text:name="__RefHeading___Toc9766_3845367211"/><text:span text:style-name="T77">Atelier 1</text:span>: Mise en place <text:bookmark-end text:name="__RefHeading___Toc9766_3845367211"/></text:h>
      <text:p text:style-name="Standard"/>
      <text:h text:style-name="P213" text:outline-level="2"><text:bookmark-start text:name="__RefHeading___Toc2648_870239550"/><text:span text:style-name="T161">1.</text:span><text:span text:style-name="T165">1</text:span> <text:span text:style-name="T167">Installation cluster </text:span><text:bookmark-end text:name="__RefHeading___Toc2648_870239550"/></text:h>
      <text:h text:style-name="Heading_20_3" text:outline-level="3"><text:bookmark-start text:name="__RefHeading___Toc2650_870239550"/><text:span text:style-name="T167">1.1.1 </text:span>Option archive<text:bookmark-end text:name="__RefHeading___Toc2650_870239550"/></text:h>
      <text:p text:style-name="Text_20_body"/>
      <text:p text:style-name="P99">Étape 1 : Création du cluster ID et formattage des répertoires de logs</text:p>
      <text:p text:style-name="P28"><text:span text:style-name="T40">Télécharger et dézipper la distribution de Kafka dans </text:span><text:span text:style-name="T41">un répertoire <text:s/></text:span><text:span text:style-name="T35">$KAFKA_</text:span><text:span text:style-name="T36">HOME</text:span><text:span text:style-name="T35"> </text:span></text:p>
      <text:p text:style-name="P130"><text:span text:style-name="T93">Créer un répertoire </text:span><text:span text:style-name="T9">$KAFKA_LOGS</text:span><text:span text:style-name="T93"> qui stockera les messages des 3 brokers</text:span></text:p>
      <text:p text:style-name="P129"><text:span text:style-name="T93">Créer un répertoire </text:span><text:span text:style-name="T10">$KAFKA_</text:span><text:span text:style-name="T16">CONFIG</text:span><text:span text:style-name="T93"> </text:span></text:p>
      <text:p text:style-name="P14">Copier le fichier <text:span text:style-name="T162">de la distribution </text:span><text:span text:style-name="T2">$KAFKA_</text:span><text:span text:style-name="T8">HOME</text:span><text:span text:style-name="T2">/config/</text:span><text:span text:style-name="T1">server.properties</text:span> dans <text:span text:style-name="T241">3 fichiers server1.properties, server2.properties, server3.properties placés dans le répertoire</text:span><text:span text:style-name="T141"> </text:span><text:span text:style-name="T162">$</text:span><text:span text:style-name="T10">KAFKA_C</text:span><text:span text:style-name="T16">ONFIG</text:span></text:p>
      <text:p text:style-name="P16">Éditer les 3 fichier <text:span text:style-name="T4">server</text:span><text:span text:style-name="T8">X</text:span><text:span text:style-name="T4">.</text:span><text:span text:style-name="T1">properties</text:span> afin de modifier l<text:span text:style-name="T163">es</text:span> propriété<text:span text:style-name="T163">s :</text:span></text:p>
      <text:list text:style-name="L3">
        <text:list-item>
          <text:p text:style-name="P277">node.id</text:p>
        </text:list-item>
        <text:list-item>
          <text:p text:style-name="P277">listeners <text:span text:style-name="T196">(utiliser les ports 9092,9192 et 9292 </text:span><text:span text:style-name="T241">ET 9093,9193 et 9293</text:span><text:span text:style-name="T196">)</text:span></text:p>
        </text:list-item>
        <text:list-item>
          <text:p text:style-name="P278">advertised.listeners</text:p>
        </text:list-item>
        <text:list-item>
          <text:p text:style-name="P278">controller.quorum.voters</text:p>
        </text:list-item>
        <text:list-item>
          <text:p text:style-name="P276"><text:span text:style-name="T11">log.dir</text:span><text:span text:style-name="T94"> à </text:span><text:span text:style-name="T11">$KAFKA_LOGS/broker-&lt;id&gt;</text:span></text:p>
        </text:list-item>
        <text:list-item>
          <text:p text:style-name="P319"><text:span text:style-name="T11">d</text:span><text:span text:style-name="T9">efault.replication.factor : 3</text:span></text:p>
        </text:list-item>
      </text:list>
      <text:p text:style-name="P290">Et d’autres propriétés de topic qui vous paraissent intéressantes</text:p>
      <text:p text:style-name="P14"/>
      <text:p text:style-name="P14">Générer un id de cluster :</text:p>
      <text:p text:style-name="P5">$KAFKA_<text:span text:style-name="T241">HOME</text:span>/bin/kafka-storage.sh random-uuid</text:p>
      <text:p text:style-name="P15">Utiliser l’ID du cluster pour formatter les 3 répertoires </text:p>
      <text:p text:style-name="P15"/>
      <text:p text:style-name="P15">Pour chaque broker, formatter son répertoire de log avec :</text:p>
      <text:p text:style-name="P279">$KAFKA_<text:span text:style-name="T241">HOME</text:span>/bin/kafka-storage.sh format -t &lt;cluster_id&gt; -c $KAFKA_<text:span text:style-name="T241">CONFIG</text:span>/server<text:span text:style-name="T241">X</text:span>.properties</text:p>
      <text:p text:style-name="P11"/>
      <text:p text:style-name="P27">Étape 2 : Mise au point d’un script de démarrage/<text:span text:style-name="T164">arrêt</text:span></text:p>
      <text:p text:style-name="P11">Mettre au point un script permettant de démarrer les 3 brokers <text:span text:style-name="T103">en mode daemon :</text:span></text:p>
      <text:p text:style-name="P17">Exemple :</text:p>
      <text:p text:style-name="P71">#!/bin/sh</text:p>
      <text:p text:style-name="P71"/>
      <text:p text:style-name="P74">export JAVA_HOME=/usr/lib/jvm/java-<text:span text:style-name="T229">2</text:span>1-openjdk-amd64/</text:p>
      <text:p text:style-name="P70">export KAFKA_<text:span text:style-name="T242">HOME</text:span>=&lt;<text:span text:style-name="T195">répertoire de la distribution&gt;</text:span></text:p>
      <text:p text:style-name="P70"/>
      <text:p text:style-name="P70"/>
      <text:p text:style-name="P70"/>
      <text:p text:style-name="P70"><text:soft-page-break/>$KAFKA_<text:span text:style-name="T242">HOME</text:span>/bin/kafka-server-start.sh -daemon <text:span text:style-name="T242">config</text:span>/server<text:span text:style-name="T242">1</text:span>.properties </text:p>
      <text:p text:style-name="P70">$KAFKA_DIST/bin/kafka-server-start.sh -daemon <text:span text:style-name="T242">config</text:span>/server<text:span text:style-name="T242">2</text:span>.properties </text:p>
      <text:p text:style-name="P70">$KAFKA_DIST/bin/kafka-server-start.sh -daemon <text:span text:style-name="T242">config</text:span>/server<text:span text:style-name="T242">3</text:span>.properties </text:p>
      <text:p text:style-name="P11"/>
      <text:p text:style-name="P12"/>
      <text:p text:style-name="P18">Visualiser les traces de démarrages :</text:p>
      <text:p text:style-name="P10">tail -f $KAFKA_<text:span text:style-name="T224">DIST</text:span>/logs/server.log</text:p>
      <text:p text:style-name="P10"/>
      <text:p text:style-name="P13">M<text:span text:style-name="T164">ettre au point un script d’arrêt</text:span></text:p>
      <text:p text:style-name="P72">#!/bin/sh</text:p>
      <text:p text:style-name="P72"/>
      <text:p text:style-name="P321">export KAFKA_<text:span text:style-name="T242">HOME</text:span>=&lt;<text:span text:style-name="T195">répertoire de la distribution&gt;</text:span></text:p>
      <text:p text:style-name="P321">$KAFKA_<text:span text:style-name="T242">HOME</text:span>/kafka-server-stop.sh</text:p>
      <text:p text:style-name="P82"/>
      <text:p text:style-name="P96">Effectuer les vérifications de création de topic et envoi/réception de messages</text:p>
      <text:p text:style-name="P75">export PATH=$KAFKA_DIST/bin:$PATH</text:p>
      <text:p text:style-name="P73">kafka-topics.sh --create --bootstrap-server localhost:9092 --replication-factor 1 --partitions 1 --topic test</text:p>
      <text:p text:style-name="P73">kafka-console-producer.sh --bootstrap-server localhost:9092 --topic test</text:p>
      <text:p text:style-name="P73">kafka-console-consumer.sh --bootstrap-server localhost:9092 --topic test --from-beginning</text:p>
      <text:p text:style-name="P95"/>
      <text:p text:style-name="P32"/>
      <text:h text:style-name="Heading_20_3" text:outline-level="3"><text:bookmark-start text:name="__RefHeading___Toc9856_3845367211"/>1.<text:span text:style-name="T167">1.</text:span>2 Option Docker<text:bookmark-end text:name="__RefHeading___Toc9856_3845367211"/></text:h>
      <text:p text:style-name="P4"><text:span text:style-name="T21">Visualiser le fichier </text:span><text:span text:style-name="T22">docker-compose.yml</text:span><text:span text:style-name="T39"> </text:span></text:p>
      <text:p text:style-name="P97">Démarrer la stack et observer les logs de démarrages</text:p>
      <text:p text:style-name="P287"/>
      <text:p text:style-name="P104"/>
      <text:h text:style-name="Heading_20_3" text:outline-level="3"><text:bookmark-start text:name="__RefHeading___Toc20226_2913458575"/><text:span text:style-name="T243">1.1.3 </text:span>Vérifications<text:bookmark-end text:name="__RefHeading___Toc20226_2913458575"/></text:h>
      <text:p text:style-name="P334"><text:span text:style-name="T96">Si docker :<text:line-break/>docker exec -it kafka-0 bash</text:span></text:p>
      <text:p text:style-name="P334"><text:span text:style-name="T96">KAFKA_HOME est alors dans /opt/kafka/bin</text:span></text:p>
      <text:p text:style-name="P333"><text:span text:style-name="T96"/></text:p>
      <text:p text:style-name="P333"><text:span text:style-name="T96">Créer un topic </text:span><text:span text:style-name="T18">testing</text:span><text:span text:style-name="T96"> avec 5 partitions et 2 répliques :</text:span></text:p>
      <text:p text:style-name="P347"><text:span text:style-name="T243">$KAFKA_HOME/</text:span>bin/kafka-topics.sh --create --bootstrap-server localhost:9092 --replication-factor 2 --partitions 5 --topic testing</text:p>
      <text:p text:style-name="P333"/>
      <text:p text:style-name="P333"><text:span text:style-name="T96">Lister les topics du cluster </text:span></text:p>
      <text:p text:style-name="P333"/>
      <text:p text:style-name="P333"><text:span text:style-name="T96">Accéder à la description détaillée du topic</text:span></text:p>
      <text:p text:style-name="P333"/>
      <text:p text:style-name="P333"><text:span text:style-name="T96">Démarrer un producteur de message</text:span></text:p>
      <text:p text:style-name="P333" loext:marker-style-name="T244"><text:span text:style-name="T245">$KAFKA_HOME/</text:span><text:span text:style-name="T244">bin/kafka-console-producer.sh -- bootstrap-server localhost:9092 --</text:span><text:soft-page-break/><text:span text:style-name="T244">topic testing --property "parse.key=true" --property "key.separator=:"</text:span></text:p>
      <text:p text:style-name="P333"><text:span text:style-name="T96">Saisir quelques messages</text:span></text:p>
      <text:p text:style-name="P333"><text:span text:style-name="T96">Consommer les messages depuis le début</text:span></text:p>
      <text:p text:style-name="P347"><text:span text:style-name="T243">$KAFKA_HOME/</text:span>bin/kafka-console-consumer.sh --bootstrap-server localhost:9092 --topic testing --from-beginning</text:p>
      <text:p text:style-name="P333" loext:marker-style-name="T20"><text:span text:style-name="T42">Dans une autre fenêtre, lister les groupes de consommateurs et accéder au détail du groupe de consommateur en lecture sur le topic </text:span><text:span text:style-name="T37">testing</text:span></text:p>
      <text:p text:style-name="P332"/>
      <text:h text:style-name="Heading_20_2" text:outline-level="2"><text:bookmark-start text:name="__RefHeading___Toc14826_2913458575"/>1.2 Utilitaires : Configuration dynamique et inspection du cluster<text:bookmark-end text:name="__RefHeading___Toc14826_2913458575"/></text:h>
      <text:p text:style-name="P282"><text:bookmark-start text:name="__RefHeading___Toc14828_2913458575"/>Objectifs<text:bookmark-end text:name="__RefHeading___Toc14828_2913458575"/></text:p>
      <text:p text:style-name="Text_20_body">Utiliser <text:span text:style-name="Source_20_Text">kafka-configs.sh</text:span> pour modifier la configuration sans redémarrer le cluster, et <text:span text:style-name="Source_20_Text">kafka-metadata-quorum.sh</text:span> pour inspecter l'état du quorum KRaft.</text:p>
      <text:h text:style-name="Heading_20_3" text:outline-level="3"><text:bookmark-start text:name="__RefHeading___Toc14830_2913458575"/>1.<text:span text:style-name="T239">2.1 </text:span>Inspection du quorum KRaft<text:bookmark-end text:name="__RefHeading___Toc14830_2913458575"/></text:h>
      <text:p text:style-name="Text_20_body">Afficher l'identifiant du cluster :</text:p>
      <text:p text:style-name="commande"><text:span text:style-name="Source_20_Text">bin/kafka-cluster.sh cluster-id --bootstrap-server localhost:9092</text:span></text:p>
      <text:p text:style-name="Text_20_body"/>
      <text:p text:style-name="Text_20_body">Afficher le statut du quorum de controllers :</text:p>
      <text:p text:style-name="commande"><text:span text:style-name="Source_20_Text">bin/kafka-metadata-quorum.sh --bootstrap-server localhost:9092 \<text:line-break/> <text:s/>describe --status</text:span></text:p>
      <text:p text:style-name="Text_20_body">Questions :</text:p>
      <text:list text:style-name="L21">
        <text:list-item>
          <text:p text:style-name="P317">Quel est le nœud leader du quorum ? </text:p>
        </text:list-item>
        <text:list-item>
          <text:p text:style-name="P317">Quel est le <text:span text:style-name="Source_20_Text">LeaderEpoch</text:span> actuel ? </text:p>
        </text:list-item>
        <text:list-item>
          <text:p text:style-name="P316">Que signifie le champ <text:span text:style-name="Source_20_Text">HighWatermark</text:span> ? </text:p>
        </text:list-item>
      </text:list>
      <text:p text:style-name="Text_20_body">Afficher la réplication entre controllers :</text:p>
      <text:p text:style-name="commande"><text:span text:style-name="Source_20_Text">bin/kafka-metadata-quorum.sh --bootstrap-server localhost:9092 \<text:line-break/> <text:s/>describe --replication</text:span></text:p>
      <text:p text:style-name="Text_20_body">Question : quel est le <text:span text:style-name="Source_20_Text">Lag</text:span> de chaque follower ? Que se passerait-il s'il devenait élevé ?</text:p>
      <text:h text:style-name="Heading_20_3" text:outline-level="3"><text:bookmark-start text:name="__RefHeading___Toc14832_2913458575"/><text:span text:style-name="T239">1.2.2 </text:span>Modifier la configuration d'un topic<text:bookmark-end text:name="__RefHeading___Toc14832_2913458575"/></text:h>
      <text:p text:style-name="Text_20_body">Afficher la configuration actuelle d<text:span text:style-name="T239">u topic </text:span><text:span text:style-name="Source_20_Text"><text:span text:style-name="T239">testing</text:span></text:span> :</text:p>
      <text:p text:style-name="commande"><text:span text:style-name="Source_20_Text">bin/kafka-configs.sh --bootstrap-server localhost:9092 \<text:line-break/> <text:s/>--entity-type topics --entity-name my-topic \<text:line-break/> <text:s/>--describe</text:span></text:p>
      <text:p text:style-name="Text_20_body">Question : la sortie est-elle vide ou contient-elle des paramètres ? Pourquoi ?</text:p>
      <text:p text:style-name="Text_20_body">Réduire la rétention à 1 heure (3 600 000 ms) sur ce topic uniquement :</text:p>
      <text:p text:style-name="commande"><text:span text:style-name="Source_20_Text">bin/kafka-configs.sh --bootstrap-server localhost:9092 \<text:line-break/> <text:s/>--entity-type topics --entity-name my-topic \<text:line-break/> <text:s/>--alter --add-config retention.ms=3600000</text:span></text:p>
      <text:p text:style-name="Text_20_body">Vérifier avec <text:span text:style-name="Source_20_Text">--describe</text:span> que la modification est prise en compte.</text:p>
      <text:p text:style-name="Text_20_body">Annuler cette surcharge (revenir à la valeur du broker) :</text:p>
      <text:p text:style-name="commande"><text:soft-page-break/><text:span text:style-name="Source_20_Text">bin/kafka-configs.sh --bootstrap-server localhost:9092 \<text:line-break/> <text:s/>--entity-type topics --entity-name my-topic \<text:line-break/> <text:s/>--alter --delete-config retention.ms</text:span></text:p>
      <text:p text:style-name="Text_20_body">Question : pourquoi est-il préférable de supprimer une surcharge plutôt que de la remettre à la valeur par défaut « manuellement » ?</text:p>
      <text:h text:style-name="Heading_20_3" text:outline-level="3"><text:bookmark-start text:name="__RefHeading___Toc14834_2913458575"/><text:span text:style-name="T239">1.2.3 </text:span>Configuration dynamique du broker<text:bookmark-end text:name="__RefHeading___Toc14834_2913458575"/></text:h>
      <text:p text:style-name="Text_20_body">Afficher les configurations dynamiques d'un broker :</text:p>
      <text:p text:style-name="commande"><text:span text:style-name="Source_20_Text">bin/kafka-configs.sh --bootstrap-server localhost:9092 \<text:line-break/> <text:s/>--entity-type brokers --entity-name 1 \<text:line-break/> <text:s/>--describe</text:span></text:p>
      <text:p text:style-name="Text_20_body">Modifier dynamiquement le niveau de log d'une classe Kafka, sans redémarrage :</text:p>
      <text:p text:style-name="commande"><text:span text:style-name="Source_20_Text">bin/kafka-configs.sh --bootstrap-server localhost:9092 \<text:line-break/> <text:s/>--entity-type broker-loggers --entity-name 1 \<text:line-break/> <text:s/>--alter --add-config kafka.controller.KafkaController=DEBUG</text:span></text:p>
      <text:p text:style-name="Text_20_body">Provoquer une activité (créer un topic, par exemple) puis observer les logs du broker. Les nouveaux messages DEBUG apparaissent.</text:p>
      <text:p text:style-name="Text_20_body">Revenir au niveau de log précédent :</text:p>
      <text:p text:style-name="commande"><text:span text:style-name="Source_20_Text">bin/kafka-configs.sh --bootstrap-server localhost:9092 \<text:line-break/> <text:s/>--entity-type broker-loggers --entity-name 1 \<text:line-break/> <text:s/>--alter --delete-config kafka.controller.KafkaController</text:span></text:p>
      <text:h text:style-name="P214" text:outline-level="2"><text:bookmark-start text:name="__RefHeading___Toc9858_3845367211"/>1.<text:span text:style-name="T167">3</text:span> <text:span text:style-name="T166">Outils graphique</text:span><text:span text:style-name="T240">s</text:span><text:bookmark-end text:name="__RefHeading___Toc9858_3845367211"/></text:h>
      <text:p text:style-name="P30"><text:span text:style-name="T44">Plusieurs </text:span><text:span text:style-name="T43">outil</text:span><text:span text:style-name="T44">s</text:span><text:span text:style-name="T43"> graphique </text:span><text:span text:style-name="T44">existent, </text:span><text:span text:style-name="T45">un docker compose est fourni pour démarrer </text:span><text:span text:style-name="T38">akhq, kafka-magic</text:span><text:span text:style-name="T45"> et </text:span><text:span text:style-name="T38">redpanda-console</text:span></text:p>
      <text:p text:style-name="P106"/>
      <text:p text:style-name="commande">cd $TP_Admin/1.3<text:span text:style-name="T230">_UI</text:span></text:p>
      <text:p text:style-name="commande">docker compose -f kafka-ui-docker-compose.yml up -d</text:p>
      <text:p text:style-name="P107"/>
      <text:p text:style-name="P108"/>
      <text:p text:style-name="P105"/>
      <text:p text:style-name="P105"/>
      <text:p text:style-name="P105"/>
      <text:p text:style-name="P98"/>
      <text:p text:style-name="P104"/>
      <text:h text:style-name="P201" text:outline-level="1"/>
      <text:h text:style-name="P204" text:outline-level="1"><text:bookmark-start text:name="__RefHeading___Toc9782_3845367211"/><text:span text:style-name="T77">Atelier 2</text:span>: <text:span text:style-name="T104">Produc</text:span><text:span text:style-name="T168">tion de messages</text:span><text:bookmark-end text:name="__RefHeading___Toc9782_3845367211"/></text:h>
      <text:p text:style-name="P1"/>
      <text:p text:style-name="P134">Le projet fourni est un projet développé avec le framework Spring. </text:p>
      <text:p text:style-name="P134">Il modélise une flotte de 10<text:span text:style-name="T169">0</text:span> coursiers qui envoient 10000 fois leur position (latitude/longitude) toutes les <text:span text:style-name="T171">10 millisecondes. </text:span><text:span text:style-name="T197">Les messages sont numérotés par Coursier</text:span></text:p>
      <text:p text:style-name="P137">Lors du démarrage du programme, le producteur affiche sa configuration sur la console et démarre la production de message après que l’on ait appuyé sur la touche Enter.</text:p>
      <text:p text:style-name="P90">Le producteur peut être configuré via la ligne de commande <text:span text:style-name="T200">par la propriété </text:span><text:span text:style-name="T13">async</text:span><text:span text:style-name="T200"> activant ou désactiva</text:span><text:span text:style-name="T231">n</text:span><text:span text:style-name="T200">t le mode asynchrone d’envoi et </text:span>en préfixant les propriétés Kafka par <text:span text:style-name="T1">spring.kafka.producer</text:span></text:p>
      <text:p text:style-name="P89">Exemple :</text:p>
      <text:p text:style-name="P92">java -jar <text:span text:style-name="T172">SpringProducer.jar --spring.kafka.producer.acks=0 --</text:span><text:span text:style-name="T200">async=</text:span><text:span text:style-name="T231">true</text:span></text:p>
      <text:p text:style-name="P89"/>
      <text:p text:style-name="P134"><text:span text:style-name="T170">Créer le topic </text:span><text:span text:style-name="T12">position</text:span><text:span text:style-name="T170"> avec </text:span><text:span text:style-name="T198">5</text:span><text:span text:style-name="T170"> partitions et le facteur de réplication </text:span><text:span text:style-name="T198">de 3 et un </text:span><text:span text:style-name="T5">min.insync.replica</text:span><text:span text:style-name="T198"> de 2</text:span><text:span text:style-name="T170"> :</text:span></text:p>
      <text:p text:style-name="P113"><text:span text:style-name="T54">./kafka-topics.sh --create --</text:span><text:span text:style-name="T55">bootstrap-server</text:span><text:span text:style-name="T54"> localhost:</text:span><text:span text:style-name="T55">9092</text:span><text:span text:style-name="T54"> --partitions </text:span><text:span text:style-name="T57">5</text:span><text:span text:style-name="T54"> --replication-factor </text:span><text:span text:style-name="T57">3 --config min.insync.replicas=</text:span><text:span text:style-name="T58">2</text:span><text:span text:style-name="T57"> </text:span><text:span text:style-name="T54">--topic </text:span><text:span text:style-name="T56">position</text:span></text:p>
      <text:p text:style-name="P84"/>
      <text:p text:style-name="P91">Faire plusieurs essais de production de message <text:span text:style-name="T173">en réinitialisant le topic et </text:span>en changeant les paramètres par défaut, <text:span text:style-name="T181">Vérifier la configuration à chaque fois</text:span></text:p>
      <text:list text:style-name="L4">
        <text:list-item>
          <text:p text:style-name="P283">acks<text:line-break/><text:span text:style-name="T95">Pour comparer les valeurs de débits</text:span></text:p>
        </text:list-item>
        <text:list-item>
          <text:p text:style-name="P284"><text:span text:style-name="T9">batch.size</text:span> et <text:span text:style-name="T9">linger.ms</text:span></text:p>
          <text:p text:style-name="P285">Pour comparer les valeurs de débits</text:p>
        </text:list-item>
        <text:list-item>
          <text:p text:style-name="P284"><text:span text:style-name="T9">retries</text:span> / <text:span text:style-name="T9">max.in.flights.requests.per.session</text:span> <text:line-break/><text:span text:style-name="T173">A</text:span>vec arrêt/redémarrage d<text:span text:style-name="T173">u cluster ou d</text:span>’un serveur durant les test<text:span text:style-name="T173">s.<text:line-break/>Vérifier le nombre de messages produits</text:span></text:p>
        </text:list-item>
      </text:list>
      <text:p text:style-name="P2"/>
      <text:p text:style-name="P24"/>
      <text:h text:style-name="P205" text:outline-level="1"><text:bookmark-start text:name="__RefHeading___Toc9784_3845367211"/><text:span text:style-name="T77">Atelier 3 </text:span>: <text:span text:style-name="T105">Cons</text:span><text:span text:style-name="T174">ommation de messages</text:span><text:bookmark-end text:name="__RefHeading___Toc9784_3845367211"/></text:h>
      <text:p text:style-name="P136"/>
      <text:p text:style-name="P135">Le projet fourni est <text:span text:style-name="T174">également </text:span>un projet développé avec le framework Spring.</text:p>
      <text:p text:style-name="P138">Il permet de consommer le topic <text:span text:style-name="T9">position</text:span>.</text:p>
      <text:p text:style-name="P154">Le nom du groupe est <text:span text:style-name="T9">consumer</text:span></text:p>
      <text:p text:style-name="P22">Il peut être surchargé via la ligne de commande :</text:p>
      <text:p text:style-name="P6">--spring.kafka.consumer.group-id</text:p>
      <text:p text:style-name="P138">La propriété de configuration <text:span text:style-name="T9">spring.kafka.listener.concurrency</text:span> fixe le nombre de consommateur<text:span text:style-name="T201">s</text:span> du groupe.</text:p>
      <text:p text:style-name="P139">Elle est fixée à 3 et peut être surchargée via la ligne de commande.</text:p>
      <text:p text:style-name="P139">--<text:span text:style-name="T9">spring.kafka.listener.concurrency</text:span></text:p>
      <text:p text:style-name="P21">Le programme consomme les messages <text:span text:style-name="T202">et stocke dans une base postgres l’id du coursier et l’id de l’index du message</text:span>:</text:p>
      <text:list text:style-name="L5">
        <text:list-item>
          <text:p text:style-name="P288">En permanence, <text:span text:style-name="T202">il affiche </text:span>des informations sur le débit de traitement</text:p>
        </text:list-item>
        <text:list-item>
          <text:p text:style-name="P289">Si la base est réinitialisée, il détecte les doublons de traitements</text:p>
        </text:list-item>
      </text:list>
      <text:p text:style-name="P23"/>
      <text:h text:style-name="Heading_20_2" text:outline-level="2"><text:bookmark-start text:name="__RefHeading___Toc9786_38453672111"/>3.0 Mise en place BD<text:bookmark-end text:name="__RefHeading___Toc9786_38453672111"/></text:h>
      <text:p text:style-name="Code"><text:span text:style-name="T108">docker compose -f postgres-docker-compose.yml up -d</text:span> </text:p>
      <text:p text:style-name="Standard"/>
      <text:p text:style-name="Standard">Accéder à <text:span text:style-name="T9">localhost:81</text:span> et se logger avec <text:span text:style-name="T9">admin@admin.com/admin</text:span></text:p>
      <text:p text:style-name="Text_20_body"/>
      <text:p text:style-name="Text_20_body">Enregistre un serveur avec comme paramètres de connexion :</text:p>
      <text:list text:style-name="L6">
        <text:list-item>
          <text:p text:style-name="P292">host : <text:span text:style-name="T9">consumer-postgresql</text:span></text:p>
        </text:list-item>
        <text:list-item>
          <text:p text:style-name="P292">user : <text:span text:style-name="T9">postgres</text:span></text:p>
        </text:list-item>
        <text:list-item>
          <text:p text:style-name="P292">password : <text:span text:style-name="T9">postgres</text:span></text:p>
        </text:list-item>
      </text:list>
      <text:h text:style-name="Heading_20_2" text:outline-level="2"><text:bookmark-start text:name="__RefHeading___Toc9786_3845367211"/><text:span text:style-name="T160">3</text:span>.1 <text:span text:style-name="T175">Performance</text:span> <text:bookmark-end text:name="__RefHeading___Toc9786_3845367211"/></text:h>
      <text:p text:style-name="P148">Démarrer le programme avec les valeurs de concurrence par défaut :</text:p>
      <text:p text:style-name="P93">java -jar <text:span text:style-name="T172">Spring</text:span><text:span text:style-name="T175">Consumer</text:span><text:span text:style-name="T172">.jar </text:span></text:p>
      <text:p text:style-name="P148">Visualiser les logs de démarrage de l’application qui affichent :</text:p>
      <text:list text:style-name="L7">
        <text:list-item>
          <text:p text:style-name="P293">La configuration du consommateur </text:p>
        </text:list-item>
        <text:list-item>
          <text:p text:style-name="P293">Les allocations de partition</text:p>
        </text:list-item>
      </text:list>
      <text:p text:style-name="P25"/>
      <text:p text:style-name="P26">Supprimer les informations du groupe dans Kafka afin que les consommateurs repartent à zéro.</text:p>
      <text:p text:style-name="P155"><text:span text:style-name="T91">Modifier des paramètres pouvant affecter la performance </text:span><text:span text:style-name="T92">et les commits d’offset :</text:span></text:p>
      <text:list text:style-name="L8">
        <text:list-item>
          <text:p text:style-name="P280">max.poll.records</text:p>
        </text:list-item>
      </text:list>
      <text:p text:style-name="P155"/>
      <text:h text:style-name="Heading_20_2" text:outline-level="2"><text:bookmark-start text:name="__RefHeading___Toc9788_3845367211"/><text:soft-page-break/><text:span text:style-name="T160">3</text:span>.2 <text:span text:style-name="T177">Rebalancing des consommateurs</text:span><text:bookmark-end text:name="__RefHeading___Toc9788_3845367211"/></text:h>
      <text:p text:style-name="P29">Démarrer 3 processus avec un degré de concurrence à 1</text:p>
      <text:p text:style-name="P94">java -jar <text:span text:style-name="T172">Spring</text:span><text:span text:style-name="T175">Consumer</text:span><text:span text:style-name="T172">.jar </text:span><text:span text:style-name="T174">--spring.kafka.listener.concurrency</text:span><text:span text:style-name="T176">=1</text:span></text:p>
      <text:p text:style-name="P149"/>
      <text:p text:style-name="P150">Arrêter un processus et observer la réaffectation de partition</text:p>
      <text:p text:style-name="P151">Redémarrer le processus</text:p>
      <text:h text:style-name="P206" text:outline-level="1"><text:bookmark-start text:name="__RefHeading___Toc16950_1047798942"/>Atelier 4 : Exactly Once et Transactions<text:bookmark-end text:name="__RefHeading___Toc16950_1047798942"/></text:h>
      <text:p text:style-name="P64">Objectifs :</text:p>
      <text:list text:style-name="L9">
        <text:list-item>
          <text:p text:style-name="P294"><text:span text:style-name="T206">Visualiser des </text:span>messages <text:span text:style-name="T206">committés et non-committés</text:span></text:p>
        </text:list-item>
        <text:list-item>
          <text:p text:style-name="P295">Voir les effets de la propriétés <text:span text:style-name="T1">ISOLATION_LEVEL</text:span></text:p>
        </text:list-item>
        <text:list-item>
          <text:p text:style-name="P291"><text:span text:style-name="T203">I</text:span>mplémenter un consommateur <text:span text:style-name="T1">ExactlyOnce</text:span></text:p>
        </text:list-item>
      </text:list>
      <text:p text:style-name="P176"/>
      <text:h text:style-name="Heading_20_2" text:outline-level="2"><text:bookmark-start text:name="__RefHeading___Toc6412_3893618287"/><text:span text:style-name="T206">4</text:span><text:span text:style-name="T204">.1 </text:span><text:span text:style-name="T206">Transaction et ISOLATION_LEVEL</text:span><text:bookmark-end text:name="__RefHeading___Toc6412_3893618287"/></text:h>
      <text:p text:style-name="P177"/>
      <text:h text:style-name="Heading_20_3" text:outline-level="3"><text:bookmark-start text:name="__RefHeading___Toc16952_1047798942"/>4.1.1 Producteur transactionnel<text:bookmark-end text:name="__RefHeading___Toc16952_1047798942"/></text:h>
      <text:p text:style-name="P177">Le producteur fournit englobe dans une transaction des batchs de messages de taille 10.</text:p>
      <text:p text:style-name="P177"/>
      <text:p text:style-name="P177">Lancer le programme avec :</text:p>
      <text:p text:style-name="Code">java -jar producer-tx.jar 1 105 100 0 </text:p>
      <text:p text:style-name="P177">Ce qui signifie que 1 threads envoie 105 messages, les 100 premiers messages font partie de 10 transactions validées. Les 5 derniers messages ne sont pas validés.</text:p>
      <text:p text:style-name="P177"/>
      <text:p text:style-name="P188">Visualiser les messages dans une console d’administration.</text:p>
      <text:p text:style-name="P178"><text:span text:style-name="T207">Noter le nombre et les offsets, </text:span><text:span text:style-name="T205">Visualiser le flag transactionnel</text:span></text:p>
      <text:h text:style-name="P224" text:outline-level="3"><text:bookmark-start text:name="__RefHeading___Toc16954_1047798942"/>4.1.<text:span text:style-name="T207">2</text:span> <text:span text:style-name="T206">Consommateur</text:span><text:bookmark-end text:name="__RefHeading___Toc16954_1047798942"/></text:h>
      <text:p text:style-name="P177">Le programme consommateur peut être démarré en mode READ_COMMITTED ou READ_UNCOMMITED</text:p>
      <text:p text:style-name="P177">Faire un premier démarrage en mode READ_UNCOMMITED</text:p>
      <text:p text:style-name="Code">java -jar consumer.jar 1 false <text:span text:style-name="T264">position-tx</text:span></text:p>
      <text:p text:style-name="P169">Noter le nombre de messages consommés</text:p>
      <text:p text:style-name="P169"><text:span text:style-name="T264">Supprimer le groupe de consommateur et d</text:span>émarrer le message en mode READ_COMMITTED</text:p>
      <text:p text:style-name="P194">java -jar consumer.jar 1 true <text:span text:style-name="T264">position-tx</text:span></text:p>
      <text:p text:style-name="P169">Noter le nombre de messages consommés</text:p>
      <text:p text:style-name="P179"/>
      <text:h text:style-name="P215" text:outline-level="2"><text:bookmark-start text:name="__RefHeading___Toc6412_38936182871"/><text:span text:style-name="T206">4</text:span><text:span text:style-name="T204">.</text:span><text:span text:style-name="T208">2</text:span><text:span text:style-name="T204"> </text:span><text:span text:style-name="T208">Exactly Once</text:span><text:bookmark-end text:name="__RefHeading___Toc6412_38936182871"/></text:h>
      <text:p text:style-name="P180">Reprendre le nouveau consommateur.</text:p>
      <text:p text:style-name="P181">Ce nouveau programme lit le topic <text:span text:style-name="T9">position-tx</text:span>, ajoute une information de distance à l’enregistrement et publie un message vers le topic <text:span text:style-name="T9">position_distance</text:span>.</text:p>
      <text:p text:style-name="P181">Exécuter le programme :</text:p>
      <text:p text:style-name="P170">java -jar consumer-exactly-once.jar 1</text:p>
      <text:p text:style-name="Text_20_body"/>
      <text:p text:style-name="P323"><text:soft-page-break/><text:span text:style-name="T264">Tuer le processus pendant la consommation puis relancer le programme</text:span></text:p>
      <text:p text:style-name="P323">Vérifier les messages produits <text:span text:style-name="T264">en utilisant le programme précédent en READ_COMMITTED</text:span></text:p>
      <text:p text:style-name="P194">java -jar consumer.jar 1 true <text:span text:style-name="T264">position_distance</text:span></text:p>
      <text:h text:style-name="P207" text:outline-level="1"><text:bookmark-start text:name="__RefHeading___Toc9790_3845367211"/><text:span text:style-name="T143">Atelier </text:span><text:span text:style-name="T131">5</text:span><text:span text:style-name="T143">. </text:span><text:span text:style-name="T128">S</text:span><text:span text:style-name="T132">chema Registry et sérialisation Avro</text:span><text:bookmark-end text:name="__RefHeading___Toc9790_3845367211"/></text:h>
      <text:h text:style-name="Heading_20_2" text:outline-level="2"><text:bookmark-start text:name="__RefHeading___Toc9792_3845367211"/>5.1 Démarrage de Confuent Registry<text:bookmark-end text:name="__RefHeading___Toc9792_3845367211"/></text:h>
      <text:p text:style-name="Text_20_body"><text:bookmark-start text:name="__RefHeading___Toc9865_3845367211"/>Visualiser le fichier <text:span text:style-name="T9">docker-compose.yml</text:span> fourni <text:span text:style-name="T182">qui démarre Redpanda Console, </text:span><text:span text:style-name="T209">akhq</text:span><text:span text:style-name="T182"> et SchemaRegistry de confluent</text:span><text:bookmark-end text:name="__RefHeading___Toc9865_3845367211"/></text:p>
      <text:p text:style-name="Text_20_body"/>
      <text:p text:style-name="Text_20_body"><text:bookmark-start text:name="__RefHeading___Toc9867_3845367211"/>Démarrer la stack <text:span text:style-name="T209">via :</text:span><text:bookmark-end text:name="__RefHeading___Toc9867_3845367211"/></text:p>
      <text:p text:style-name="Code">docker compose up -d</text:p>
      <text:p text:style-name="P182">Vérifier le bon démarrage des containers</text:p>
      <text:p text:style-name="Text_20_body"><text:bookmark-start text:name="__RefHeading___Toc9869_3845367211"/>Accéder à <text:span text:style-name="T1">localhost:808</text:span><text:span text:style-name="T3">5</text:span><text:span text:style-name="T1">/subjects</text:span><text:bookmark-end text:name="__RefHeading___Toc9869_3845367211"/></text:p>
      <text:h text:style-name="P243" text:outline-level="1"/>
      <text:h text:style-name="Heading_20_2" text:outline-level="2"><text:bookmark-start text:name="__RefHeading___Toc9794_3845367211"/><text:span text:style-name="T223">5</text:span>.2 Producteur de message<text:bookmark-end text:name="__RefHeading___Toc9794_3845367211"/></text:h>
      <text:p text:style-name="P117"><text:span text:style-name="T147">Récupérer le projet</text:span><text:span text:style-name="T146"> </text:span><text:span text:style-name="T150">producer-avro</text:span></text:p>
      <text:p text:style-name="P115"/>
      <text:p text:style-name="Standard"><text:span text:style-name="T159">Visualiser le </text:span><text:span text:style-name="T158">schéma Avro : </text:span><text:span text:style-name="T154"><text:line-break/></text:span><text:span text:style-name="T156">src/main/resources/</text:span><text:span text:style-name="T155">Courier.avsc</text:span></text:p>
      <text:p text:style-name="P114"/>
      <text:p text:style-name="P141"><text:span text:style-name="T148">Lancer la commande</text:span><text:span text:style-name="T146"> ./</text:span><text:span text:style-name="T150">mvn</text:span><text:span text:style-name="T151">w</text:span><text:span text:style-name="T150"> compile</text:span><text:span text:style-name="T146"> et regarder les classes générées par le plugin Avro</text:span></text:p>
      <text:p text:style-name="Standard"/>
      <text:p text:style-name="P142">Lancer ensuite .<text:span text:style-name="T9">/mvnw package</text:span> pour construire l’exécutable</text:p>
      <text:p text:style-name="Standard"/>
      <text:p text:style-name="P100">Démarrer l’exécutable par </text:p>
      <text:p text:style-name="P101">java -jar target/producer-avro-0.0.1-SNAPSHOT-jar-with-dependencies.jar 10 500 10 0</text:p>
      <text:p text:style-name="P100"/>
      <text:p text:style-name="P143"><text:span text:style-name="T24">L</text:span><text:span text:style-name="T23">e programme, après avoir enregistré le schéma, envoie </text:span><text:span text:style-name="T28">10*</text:span><text:span text:style-name="T23">500 messages qui sont sérialisés avec Avro sur le topic </text:span><text:span text:style-name="T30">avro-position</text:span></text:p>
      <text:p text:style-name="P100"/>
      <text:p text:style-name="P144"><text:bookmark-start text:name="__RefHeading___Toc9871_3845367211"/>Après un premier démarrage, le schéma doit être consultable :<text:bookmark-end text:name="__RefHeading___Toc9871_3845367211"/></text:p>
      <text:list text:style-name="L10">
        <text:list-item>
          <text:p text:style-name="P296"><text:span text:style-name="T178">sur </text:span><text:span text:style-name="T210">schema-registry</text:span><text:span text:style-name="T178"> (</text:span>localhost:808<text:span text:style-name="T178">5</text:span>/subjects<text:span text:style-name="T210">)</text:span></text:p>
        </text:list-item>
        <text:list-item>
          <text:p text:style-name="P297">ou via votre outil d’admin</text:p>
        </text:list-item>
      </text:list>
      <text:h text:style-name="P244" text:outline-level="1"/>
      <text:p text:style-name="Text_20_body"><text:bookmark-start text:name="__RefHeading___Toc9875_3845367211"/><text:span text:style-name="T26">V</text:span><text:span text:style-name="T25">érifier que </text:span><text:span text:style-name="T27">l’outil graphique</text:span><text:span text:style-name="T31"> </text:span><text:span text:style-name="T25">puisse lire les messages </text:span><text:span text:style-name="T29">Avro</text:span><text:bookmark-end text:name="__RefHeading___Toc9875_3845367211"/></text:p>
      <text:p text:style-name="Standard"/>
      <text:h text:style-name="Heading_20_2" text:outline-level="2"><text:bookmark-start text:name="__RefHeading___Toc9796_3845367211"/><text:span text:style-name="T223">5</text:span>.3 Consommateur de message<text:bookmark-end text:name="__RefHeading___Toc9796_3845367211"/></text:h>
      <text:p text:style-name="P19"><text:span text:style-name="T147">Récupérer le projet </text:span><text:span text:style-name="T153">consumer</text:span><text:span text:style-name="T152">-avro </text:span></text:p>
      <text:p text:style-name="P20"><text:span text:style-name="T146">Visualiser le code source </text:span><text:span text:style-name="T149">et en particulier la boucle de poll et l’utilisation de </text:span><text:span text:style-name="T153">GenericMessage</text:span></text:p>
      <text:p text:style-name="P116"/>
      <text:p text:style-name="P145"><text:span text:style-name="T157">Lancer ensuite </text:span><text:span text:style-name="T151">./mvnw package</text:span><text:span text:style-name="T157"> pour construire l’exécutable</text:span></text:p>
      <text:p text:style-name="Standard"/>
      <text:p text:style-name="Standard">Consommer les messages du topic précédent <text:span text:style-name="T179">avec la commande </text:span></text:p>
      <text:p text:style-name="P8">java -jar target/consumer-0.0.1-SNAPSHOT-jar-with-dependencies.jar 2 1</text:p>
      <text:p text:style-name="P109"/>
      <text:p text:style-name="Standard">Laisser le programme tourner</text:p>
      <text:h text:style-name="P245" text:outline-level="1"><text:soft-page-break/></text:h>
      <text:h text:style-name="Heading_20_2" text:outline-level="2"><text:bookmark-start text:name="__RefHeading___Toc9798_38453672111"/><text:span text:style-name="T223">5</text:span><text:span text:style-name="T193">.4</text:span> <text:span text:style-name="T190">Evolution</text:span> du schéma <text:span text:style-name="T191">compatible</text:span><text:bookmark-end text:name="__RefHeading___Toc9798_38453672111"/></text:h>
      <text:p text:style-name="P165"><text:bookmark-start text:name="__RefHeading___Toc9800_38453672111"/><text:span text:style-name="T47">Mettre</text:span><text:span text:style-name="T20"> à jour le schéma </text:span><text:span text:style-name="T48">en ajoutant les champs optionnels : </text:span><text:span text:style-name="T20"><text:s/></text:span><text:span text:style-name="T32">firstName</text:span><text:span text:style-name="T20"> dans la structure </text:span><text:span text:style-name="T32">Cour</text:span><text:span text:style-name="T33">s</text:span><text:span text:style-name="T32">ier</text:span><text:span text:style-name="T20"> </text:span><text:bookmark-end text:name="__RefHeading___Toc9800_38453672111"/></text:p>
      <text:p text:style-name="P160"><text:bookmark-start text:name="__DdeLink__13624_1047798942"/>{ </text:p>
      <text:p text:style-name="P160"><text:tab/>"name": "first_name",</text:p>
      <text:p text:style-name="P160"><text:tab/>"type": "string",</text:p>
      <text:p text:style-name="P160"><text:tab/>"default": "undefined"</text:p>
      <text:p text:style-name="P162">},<text:bookmark-end text:name="__DdeLink__13624_1047798942"/></text:p>
      <text:p text:style-name="P165"/>
      <text:p text:style-name="P164">Fixer les problèmes de compilation :</text:p>
      <text:p text:style-name="P166">Dans <text:tab/><text:span text:style-name="T9">src/main/java/org/formation/KafkaProducerThread.java</text:span><text:tab/></text:p>
      <text:p text:style-name="P166"/>
      <text:p text:style-name="P166">Changer la ligne 29 par :</text:p>
      <text:p text:style-name="P68">this.courier = new Courier(id, "David", new Position(Math.random() + 45, Math.random() + 2));</text:p>
      <text:p text:style-name="P161"/>
      <text:p text:style-name="P167">Reconstruire l’application via :</text:p>
      <text:p text:style-name="P7">./mvnw clean package</text:p>
      <text:p text:style-name="P183"><text:bookmark-start text:name="__RefHeading___Toc9802_38453672111"/>Relancer le programme de production <text:bookmark-end text:name="__RefHeading___Toc9802_38453672111"/></text:p>
      <text:p text:style-name="P102">java -jar target/producer-avro-0.0.1-SNAPSHOT-jar-with-dependencies.jar 10 500 10 0</text:p>
      <text:p text:style-name="P183"><text:span text:style-name="T211">V</text:span>isualiser <text:span text:style-name="T211">ensuite </text:span>la nouvelle version du schéma dans le registre</text:p>
      <text:p text:style-name="P165"><text:bookmark-start text:name="__RefHeading___Toc9804_38453672111"/>Consommer les messages sans modifications du programme consommateur<text:bookmark-end text:name="__RefHeading___Toc9804_38453672111"/></text:p>
      <text:p text:style-name="P165"/>
      <text:h text:style-name="Heading_20_2" text:outline-level="2"><text:bookmark-start text:name="__RefHeading___Toc9798_38453672112"/><text:span text:style-name="T223">5</text:span><text:span text:style-name="T194">.</text:span>5 Evolution du schéma incompatible<text:bookmark-end text:name="__RefHeading___Toc9798_38453672112"/></text:h>
      <text:p text:style-name="P165"><text:bookmark-start text:name="__RefHeading___Toc9800_38453672112"/><text:span text:style-name="T47">Mettre</text:span><text:span text:style-name="T20"> à jour le schéma </text:span><text:span text:style-name="T48">en ajoutant </text:span><text:span text:style-name="T49">un</text:span><text:span text:style-name="T48"> champs </text:span><text:span text:style-name="T49">obligatoire</text:span><text:span text:style-name="T48"> : </text:span><text:span text:style-name="T20"><text:s/></text:span><text:span text:style-name="T34">vehicle_id</text:span><text:span text:style-name="T20"> dans la structure </text:span><text:span text:style-name="T32">Cour</text:span><text:span text:style-name="T33">s</text:span><text:span text:style-name="T32">ier</text:span><text:span text:style-name="T20"> </text:span><text:bookmark-end text:name="__RefHeading___Toc9800_38453672112"/></text:p>
      <text:p text:style-name="P160"><text:bookmark-start text:name="__DdeLink__13629_1047798942"/><text:tab/>{ </text:p>
      <text:p text:style-name="P160"><text:s text:c="3"/><text:tab/><text:tab/>"name": "vehicle_id",</text:p>
      <text:p text:style-name="P163"><text:span text:style-name="T192"><text:s text:c="3"/><text:tab/><text:tab/>"type": "</text:span><text:span text:style-name="T50">int</text:span><text:span text:style-name="T192">"</text:span></text:p>
      <text:p text:style-name="P160"><text:tab/>},<text:bookmark-end text:name="__DdeLink__13629_1047798942"/></text:p>
      <text:p text:style-name="P165"/>
      <text:p text:style-name="P164">Fixer les problèmes de compilation</text:p>
      <text:p text:style-name="P168">Dans <text:tab/><text:span text:style-name="T9">src/main/java/org/formation/KafkaProducerThread.java</text:span><text:tab/></text:p>
      <text:p text:style-name="P168">Changer la ligne 29 par :</text:p>
      <text:p text:style-name="P67">this.courier = new Courier(id, "David", <text:span text:style-name="T194">1, </text:span>new Position(Math.random() + 45, Math.random() + 2));</text:p>
      <text:p text:style-name="P168"/>
      <text:p text:style-name="P165"><text:bookmark-start text:name="__RefHeading___Toc9802_38453672112"/>Relancer le programme de production et visualiser l’exception au moment de l’enregistrement du nouveau schéma. <text:bookmark-end text:name="__RefHeading___Toc9802_38453672112"/></text:p>
      <text:p text:style-name="P3"/>
      <text:h text:style-name="P211" text:outline-level="1"><text:bookmark-start text:name="_Toc228290164"/><text:bookmark-start text:name="__RefHeading___Toc20228_2913458575"/>Atelier <text:span text:style-name="T246">6</text:span>. Kafka Connect<text:bookmark-end text:name="_Toc228290164"/><text:bookmark-end text:name="__RefHeading___Toc20228_2913458575"/></text:h>
      <text:p text:style-name="P345"><text:span text:style-name="T106">Objectif</text:span> : </text:p>
      <text:list text:style-name="L22">
        <text:list-item>
          <text:p text:style-name="P346">Déverser le topic position dans un index ElasticSearch</text:p>
        </text:list-item>
      </text:list>
      <text:h text:style-name="P220" text:outline-level="2"><text:bookmark-start text:name="__RefHeading___Toc20230_2913458575"/><text:span text:style-name="T246">6</text:span><text:bookmark-start text:name="_Toc228290165"/>.1 Installation du plugin ElasticSearch dans kafka connect<text:bookmark-end text:name="__RefHeading___Toc20230_2913458575"/><text:bookmark-end text:name="_Toc228290165"/></text:h>
      <text:p text:style-name="P337">Visualiser le fichier Dockerfile fourni et construire une image <text:span text:style-name="T9">my-kafka-connect-with-elasticsearch</text:span> via :</text:p>
      <text:p text:style-name="P348">docker build -t my-kafka-connect-with-elasticsearch .</text:p>
      <text:h text:style-name="P220" text:outline-level="2"><text:bookmark-start text:name="__RefHeading___Toc20232_2913458575"/><text:span text:style-name="T246">6</text:span><text:bookmark-start text:name="_Toc228290166"/>.2 Démarrage de la stack<text:bookmark-end text:name="__RefHeading___Toc20232_2913458575"/><text:bookmark-end text:name="_Toc228290166"/></text:h>
      <text:p text:style-name="P337">Démarrer la nouvelle stack qui ajoute l’image précédemment construite, ElasticSearch et Kibana</text:p>
      <text:p text:style-name="P348">docker-compose up -d</text:p>
      <text:p text:style-name="P337">Vérifier l’installation du plugin via :</text:p>
      <text:p text:style-name="P337">http://localhost:8083/connector-plugins</text:p>
      <text:p text:style-name="P337">Se connecter à kibana localhost:5601 et dans la DevConsole exécuter :</text:p>
      <text:p text:style-name="P349">PUT /position </text:p>
      <text:p text:style-name="P349">{</text:p>
      <text:p text:style-name="P349"><text:s text:c="2"/>"mappings":{</text:p>
      <text:p text:style-name="P349"><text:s text:c="4"/>"properties": {</text:p>
      <text:p text:style-name="P349"><text:s text:c="6"/>"@timestamp": {</text:p>
      <text:p text:style-name="P349"><text:s text:c="8"/>"type": "date",</text:p>
      <text:p text:style-name="P349"><text:s text:c="9"/>"format": "epoch_millis"</text:p>
      <text:p text:style-name="P349"><text:s text:c="6"/>}</text:p>
      <text:p text:style-name="P349"><text:s text:c="4"/>}</text:p>
      <text:p text:style-name="P349"><text:s text:c="2"/>}</text:p>
      <text:p text:style-name="P338">}</text:p>
      <text:p text:style-name="P337">La commande crée un index elasticsearch <text:span text:style-name="T9">position</text:span> avec pour l’instant un seul champ <text:span text:style-name="T9">@timestamp</text:span></text:p>
      <text:h text:style-name="P220" text:outline-level="2"><text:bookmark-start text:name="__RefHeading___Toc20234_2913458575"/><text:span text:style-name="T246">6</text:span><text:bookmark-start text:name="_Toc228290167"/>.3 Configuration du connecteur<text:bookmark-end text:name="__RefHeading___Toc20234_2913458575"/><text:bookmark-end text:name="_Toc228290167"/></text:h>
      <text:p text:style-name="P337">Définir un connecteur <text:span text:style-name="T9">elasticsearch-sink</text:span> qui déverse le topic position dans l’index position :</text:p>
      <text:p text:style-name="P349">curl -X POST http://localhost:8083/connectors \</text:p>
      <text:p text:style-name="P349">-H "Content-Type: application/json" \</text:p>
      <text:p text:style-name="P349">-d '{</text:p>
      <text:p text:style-name="P349"><text:s text:c="2"/>"name": "elasticsearch-sink",</text:p>
      <text:p text:style-name="P349"><text:s text:c="2"/>"config": {</text:p>
      <text:p text:style-name="P349"><text:s text:c="4"/>"connector.class": "io.confluent.connect.elasticsearch.ElasticsearchSinkConnector",</text:p>
      <text:p text:style-name="P349"><text:s text:c="4"/>"tasks.max": "1",</text:p>
      <text:p text:style-name="P349"><text:s text:c="4"/>"topics": "position",</text:p>
      <text:p text:style-name="P349"><text:s text:c="4"/>"topic.index.map": "position:position_index",</text:p>
      <text:p text:style-name="P349"><text:s text:c="4"/>"connection.url": "http://elasticsearch:9200",</text:p>
      <text:p text:style-name="P349"><text:s text:c="4"/>"type.name": "log",</text:p>
      <text:p text:style-name="P349"><text:s text:c="4"/>"key.ignore": "true",</text:p>
      <text:p text:style-name="P349"><text:s text:c="4"/>"schema.ignore": "true",</text:p>
      <text:p text:style-name="P349"><text:s text:c="4"/>"key.converter": "org.apache.kafka.connect.json.JsonConverter",</text:p>
      <text:p text:style-name="P349"><text:s text:c="4"/>"key.converter.schemas.enable": "false",</text:p>
      <text:p text:style-name="P349"><text:s text:c="4"/>"value.converter": "org.apache.kafka.connect.json.JsonConverter",</text:p>
      <text:p text:style-name="P349"><text:s text:c="4"/>"value.converter.schemas.enable": "false"</text:p>
      <text:p text:style-name="P349"><text:s text:c="2"/>}</text:p>
      <text:p text:style-name="P349">}'</text:p>
      <text:p text:style-name="P337">Vous pouvez vérifier la bonne installation du connecteur :</text:p>
      <text:list xml:id="list1018713683" text:style-name="WWNum4">
        <text:list-item>
          <text:p text:style-name="P335"><text:soft-page-break/>Via les logs de KafkaConnect</text:p>
        </text:list-item>
        <text:list-item>
          <text:p text:style-name="P335">Via <text:span text:style-name="T1">http://localhost:8083/connectors</text:span> : Liste des connecteurs actifs</text:p>
        </text:list-item>
        <text:list-item>
          <text:p text:style-name="P335">Via l’interface de RedPanda</text:p>
        </text:list-item>
      </text:list>
      <text:p text:style-name="P337">Alimenter le topic position</text:p>
      <text:p text:style-name="P337">Vous pouvez visualiser les effets du connecteur</text:p>
      <text:list text:style-name="WWNum7">
        <text:list-item>
          <text:p text:style-name="P336">Via ElasticSearch : http://localhost:9200/position/_search</text:p>
        </text:list-item>
        <text:list-item>
          <text:p text:style-name="P336">Via Kibana : <text:a xlink:type="simple" xlink:href="http://localhost:5601/" text:style-name="Internet_20_link" text:visited-style-name="Visited_20_Internet_20_Link"><text:span text:style-name="Internet_20_link">http://localhost:5601</text:span></text:a></text:p>
        </text:list-item>
      </text:list>
      <text:p text:style-name="P337"/>
      <text:h text:style-name="P220" text:outline-level="2"><text:bookmark-start text:name="__RefHeading___Toc20236_2913458575"/><text:span text:style-name="T246">6</text:span><text:bookmark-start text:name="_Toc228290168"/>.<text:span text:style-name="T246">4</text:span> Améliorations<text:bookmark-end text:name="__RefHeading___Toc20236_2913458575"/><text:bookmark-end text:name="_Toc228290168"/></text:h>
      <text:list text:continue-list="list1018713683" text:style-name="WWNum4">
        <text:list-item>
          <text:p text:style-name="P335">Améliorer le fichier de configuration afin d’introduire que le timestamp Kafka soit renseigné dans le champ @timestamp de l’index position d’ElasticSearch</text:p>
        </text:list-item>
        <text:list-item>
          <text:p text:style-name="P335">Déverser le topic <text:span text:style-name="T9">position-avro</text:span> dans un index <text:span text:style-name="T9">position-avro</text:span></text:p>
        </text:list-item>
      </text:list>
      <text:p text:style-name="P251"/>
      <text:p text:style-name="P252"><text:span text:style-name="T248"/></text:p>
      <text:h text:style-name="P223" text:outline-level="2"><text:bookmark-start text:name="__RefHeading___Toc20238_2913458575"/>Atelier 7. MirrorMaker 2<text:bookmark-end text:name="__RefHeading___Toc20238_2913458575"/></text:h>
      <text:p text:style-name="P324"><text:span text:style-name="T106">Objectifs</text:span> : </text:p>
      <text:list text:style-name="L23">
        <text:list-item>
          <text:p text:style-name="P325"><text:span text:style-name="T265">R</text:span>épliquer le topic position du cluster Kafka existant vers un second cluster mono-broker en utilisant les connecteurs MirrorMaker 2 </text:p>
        </text:list-item>
      </text:list>
      <text:h text:style-name="Heading_20_3" text:outline-level="3"><text:bookmark-start text:name="__RefHeading___Toc20240_2913458575"/>7.1 Démarrer le second cluster<text:bookmark-end text:name="__RefHeading___Toc20240_2913458575"/></text:h>
      <text:p text:style-name="Standard">On ajoute un cluster cible kafka-b au déploiement existant via un fichier d’override docker-compose.mm2.yml. </text:p>
      <text:p text:style-name="Standard">Ce cluster est mono-broker pour rester simple ; il rejoint le réseau kafka-net afin d’être joignable depuis le service kafka-connect.</text:p>
      <text:p text:style-name="P258"><text:span text:style-name="T247"><text:s/></text:span></text:p>
      <text:p text:style-name="P257"><text:span text:style-name="T247">Démarrer le second cluster en complément de la stack existante :</text:span></text:p>
      <text:p text:style-name="P253"><text:span text:style-name="T250">docker-compose -f docker-compose.yml -f docker-compose.mm2.yml up -d kafka-b</text:span></text:p>
      <text:p text:style-name="P258"><text:span text:style-name="T247"><text:s/></text:span></text:p>
      <text:p text:style-name="P257"><text:span text:style-name="T247">Vérifier que le broker est up :</text:span></text:p>
      <text:p text:style-name="P253"><text:span text:style-name="T250">docker exec -it kafka-b /opt/kafka/bin/kafka-broker-api-versions.sh \</text:span></text:p>
      <text:p text:style-name="P255"><text:span text:style-name="T250"><text:s text:c="2"/>--bootstrap-server localhost:</text:span><text:span text:style-name="T251">2</text:span><text:span text:style-name="T250">9092</text:span></text:p>
      <text:h text:style-name="Heading_20_3" text:outline-level="3"><text:bookmark-start text:name="__RefHeading___Toc20242_2913458575"/>7.2 Vérifier la disponibilité des connecteurs MM2<text:bookmark-end text:name="__RefHeading___Toc20242_2913458575"/></text:h>
      <text:p text:style-name="Standard">Les trois connecteurs MirrorMaker 2 sont fournis avec Apache Kafka. Lister les plugins disponibles dans Kafka Connect :</text:p>
      <text:p text:style-name="P253"><text:span text:style-name="T250">curl -s http://localhost:8083/connector-plugins | jq '.[] | select(.class | contains("Mirror"))'</text:span></text:p>
      <text:p text:style-name="P258"><text:span text:style-name="T247"><text:s/></text:span></text:p>
      <text:p text:style-name="P257"><text:span text:style-name="T247">On doit voir les trois classes :</text:span></text:p>
      <text:list xml:id="list2471049742" text:style-name="WWNum2">
        <text:list-item text:start-value="1">
          <text:p text:style-name="P231"><text:span text:style-name="T249">org.apache.kafka.connect.mirror.MirrorSourceConnector</text:span></text:p>
        </text:list-item>
        <text:list-item>
          <text:p text:style-name="P231"><text:span text:style-name="T249">org.apache.kafka.connect.mirror.MirrorCheckpointConnector</text:span></text:p>
        </text:list-item>
        <text:list-item>
          <text:p text:style-name="P231"><text:span text:style-name="T249">org.apache.kafka.connect.mirror.MirrorHeartbeatConnector</text:span></text:p>
        </text:list-item>
      </text:list>
      <text:h text:style-name="Heading_20_3" text:outline-level="3"><text:bookmark-start text:name="__RefHeading___Toc20244_2913458575"/>7.3 Créer le connecteur MirrorSource<text:bookmark-end text:name="__RefHeading___Toc20244_2913458575"/></text:h>
      <text:p text:style-name="P263">Ce connecteur réplique le topic position du cluster A vers le cluster B. </text:p>
      <text:p text:style-name="P263">Le topic répliqué sera nommé A.position côté B (préfixe par alias source, défaut de DefaultReplicationPolicy).</text:p>
      <text:p text:style-name="P253"><text:span text:style-name="T250">curl -X POST http://localhost:8083/connectors \</text:span></text:p>
      <text:p text:style-name="P254"><text:span text:style-name="T250">-H "Content-Type: application/json" \</text:span></text:p>
      <text:p text:style-name="P254"><text:span text:style-name="T250">-d '{</text:span></text:p>
      <text:p text:style-name="P254"><text:span text:style-name="T250"><text:s text:c="2"/>"name": "mm2-source-A-to-B",</text:span></text:p>
      <text:p text:style-name="P254"><text:span text:style-name="T250"><text:s text:c="2"/>"config": {</text:span></text:p>
      <text:p text:style-name="P254"><text:span text:style-name="T250"><text:s text:c="4"/>"connector.class": "org.apache.kafka.connect.mirror.MirrorSourceConnector",</text:span></text:p>
      <text:p text:style-name="P254"><text:span text:style-name="T250"><text:s text:c="4"/>"tasks.max": "1",</text:span></text:p>
      <text:p text:style-name="P254"><text:span text:style-name="T250"><text:s text:c="4"/>"source.cluster.alias": "A",</text:span></text:p>
      <text:p text:style-name="P254"><text:span text:style-name="T250"><text:s text:c="4"/>"target.cluster.alias": "B",</text:span></text:p>
      <text:p text:style-name="P256"><text:span text:style-name="T250"><text:s text:c="4"/>"source.cluster.bootstrap.servers": "</text:span><text:span text:style-name="T251">localhost</text:span><text:span text:style-name="T250">:9092,</text:span><text:span text:style-name="T251">localhost</text:span><text:span text:style-name="T250">:9</text:span><text:span text:style-name="T251">1</text:span><text:span text:style-name="T250">92,</text:span><text:span text:style-name="T251">localhost</text:span><text:span text:style-name="T250">:9</text:span><text:span text:style-name="T251">2</text:span><text:span text:style-name="T250">92",</text:span></text:p>
      <text:p text:style-name="P254"><text:span text:style-name="T250"><text:s text:c="4"/>"target.cluster.bootstrap.servers": "</text:span><text:span text:style-name="T251">localhost</text:span><text:span text:style-name="T250">:</text:span><text:span text:style-name="T251">2</text:span><text:span text:style-name="T250">9092",</text:span></text:p>
      <text:p text:style-name="P254"><text:span text:style-name="T250"><text:s text:c="4"/>"producer.override.bootstrap.servers": "localhost:29092",</text:span></text:p>
      <text:p text:style-name="P254"><text:span text:style-name="T250"><text:s text:c="4"/>"topics": "position",</text:span></text:p>
      <text:p text:style-name="P254"><text:span text:style-name="T250"><text:s text:c="4"/>"replication.factor": "1",</text:span></text:p>
      <text:p text:style-name="P254"><text:span text:style-name="T250"><text:s text:c="4"/>"offset-syncs.topic.replication.factor": "1",</text:span></text:p>
      <text:p text:style-name="P254"><text:soft-page-break/><text:span text:style-name="T250"><text:s text:c="4"/>"key.converter": "org.apache.kafka.connect.converters.ByteArrayConverter",</text:span></text:p>
      <text:p text:style-name="P254"><text:span text:style-name="T250"><text:s text:c="4"/>"value.converter": "org.apache.kafka.connect.converters.ByteArrayConverter"</text:span></text:p>
      <text:p text:style-name="P254"><text:span text:style-name="T250"><text:s text:c="2"/>}</text:span></text:p>
      <text:p text:style-name="P255"><text:span text:style-name="T250">}'</text:span></text:p>
      <text:p text:style-name="P258"><text:span text:style-name="T247"><text:s/></text:span></text:p>
      <text:p text:style-name="Standard">Note : <text:span text:style-name="T1">ByteArrayConverter</text:span> est utilisé pour préserver le payload tel quel pendant la réplication, indépendamment du format métier.</text:p>
      <text:p text:style-name="Standard"/>
      <text:p text:style-name="P264">Vérifier avec :</text:p>
      <text:p text:style-name="P265">docker exec -it kafka-b /opt/kafka/bin/kafka-topics.sh <text:s text:c="2"/>--bootstrap-server localhost:29092 –list</text:p>
      <text:p text:style-name="P265"/>
      <text:p text:style-name="P264">Puis consommer avec :</text:p>
      <text:p text:style-name="P269">docker exec -it kafka-b /opt/kafka/bin/kafka-console-consumer.sh <text:s text:c="2"/>--bootstrap-server localhost:29092 --topic A.position --from-beginning</text:p>
      <text:p text:style-name="P269"/>
      <text:p text:style-name="P265"/>
      <text:h text:style-name="Heading_20_2" text:outline-level="2"><text:bookmark-start text:name="__RefHeading___Toc20246_2913458575"/>7.4 Créer le connecteur MirrorCheckpoint<text:bookmark-end text:name="__RefHeading___Toc20246_2913458575"/></text:h>
      <text:p text:style-name="Standard">Ce connecteur synchronise les offsets de consumer groups du cluster A vers le cluster B (utile pour le failover, mais pas indispensable pour la démo de réplication seule).</text:p>
      <text:p text:style-name="P253"><text:span text:style-name="T250">curl -X POST http://localhost:8083/connectors \</text:span></text:p>
      <text:p text:style-name="P254"><text:span text:style-name="T250">-H "Content-Type: application/json" \</text:span></text:p>
      <text:p text:style-name="P254"><text:span text:style-name="T250">-d '{</text:span></text:p>
      <text:p text:style-name="P254"><text:span text:style-name="T250"><text:s text:c="2"/>"name": "mm2-checkpoint-A-to-B",</text:span></text:p>
      <text:p text:style-name="P254"><text:span text:style-name="T250"><text:s text:c="2"/>"config": {</text:span></text:p>
      <text:p text:style-name="P254"><text:span text:style-name="T250"><text:s text:c="4"/>"connector.class": "org.apache.kafka.connect.mirror.MirrorCheckpointConnector",</text:span></text:p>
      <text:p text:style-name="P254"><text:span text:style-name="T250"><text:s text:c="4"/>"tasks.max": "1",</text:span></text:p>
      <text:p text:style-name="P254"><text:span text:style-name="T250"><text:s text:c="4"/>"source.cluster.alias": "A",</text:span></text:p>
      <text:p text:style-name="P254"><text:span text:style-name="T250"><text:s text:c="4"/>"target.cluster.alias": "B",</text:span></text:p>
      <text:p text:style-name="P254"><text:span text:style-name="T250"><text:s text:c="4"/>"source.cluster.bootstrap.servers": "localhost:9092,localhost:9192,localhost:9292", <text:s text:c="3"/><text:tab/>"target.cluster.bootstrap.servers": "localhost:29092", <text:tab/>"producer.override.bootstrap.servers": "localhost:29092",</text:span></text:p>
      <text:p text:style-name="P254"><text:span text:style-name="T250"><text:s text:c="4"/>"checkpoints.topic.replication.factor": "1",</text:span></text:p>
      <text:p text:style-name="P254"><text:span text:style-name="T250"><text:s text:c="4"/>"emit.checkpoints.interval.seconds": "5"</text:span></text:p>
      <text:p text:style-name="P254"><text:span text:style-name="T250"><text:s text:c="2"/>}</text:span></text:p>
      <text:p text:style-name="P255"><text:span text:style-name="T250">}'</text:span></text:p>
      <text:h text:style-name="Heading_20_2" text:outline-level="2"><text:bookmark-start text:name="__RefHeading___Toc20248_2913458575"/>7.5 Créer le connecteur MirrorHeartbeat<text:bookmark-end text:name="__RefHeading___Toc20248_2913458575"/></text:h>
      <text:p text:style-name="P270">Ce connecteur émet un heartbeat périodique sur le cluster source ; le MirrorSourceConnector répliquera ces heartbeats côté cible. </text:p>
      <text:p text:style-name="P270">Cela permet de mesurer la latence et la santé du lien.</text:p>
      <text:p text:style-name="P253"><text:span text:style-name="T250">curl -X POST http://localhost:8083/connectors \</text:span></text:p>
      <text:p text:style-name="P254"><text:span text:style-name="T250">-H "Content-Type: application/json" \</text:span></text:p>
      <text:p text:style-name="P254"><text:span text:style-name="T250">-d '{</text:span></text:p>
      <text:p text:style-name="P254"><text:span text:style-name="T250"><text:s text:c="2"/>"name": "mm2-heartbeat-A",</text:span></text:p>
      <text:p text:style-name="P254"><text:span text:style-name="T250"><text:s text:c="2"/>"config": {</text:span></text:p>
      <text:p text:style-name="P254"><text:span text:style-name="T250"><text:s text:c="4"/>"connector.class": "org.apache.kafka.connect.mirror.MirrorHeartbeatConnector",</text:span></text:p>
      <text:p text:style-name="P254"><text:span text:style-name="T250"><text:s text:c="4"/>"tasks.max": "1",</text:span></text:p>
      <text:p text:style-name="P254"><text:span text:style-name="T250"><text:s text:c="4"/>"source.cluster.alias": "A",</text:span></text:p>
      <text:p text:style-name="P254"><text:span text:style-name="T250"><text:s text:c="4"/>"target.cluster.alias": "B",</text:span></text:p>
      <text:p text:style-name="P254"><text:span text:style-name="T250"><text:s text:c="4"/>"source.cluster.bootstrap.servers": "localhost:9092,localhost:9192,localhost:9292", </text:span><text:soft-page-break/><text:span text:style-name="T250"><text:tab/>"target.cluster.bootstrap.servers": "localhost:29092", <text:s/>"producer.override.bootstrap.servers": "localhost:9092,localhost:9192,localhost:9292",</text:span></text:p>
      <text:p text:style-name="P254"><text:span text:style-name="T250"><text:s text:c="4"/>"heartbeats.topic.replication.factor": "1",</text:span></text:p>
      <text:p text:style-name="P254"><text:span text:style-name="T250"><text:s text:c="4"/>"emit.heartbeats.interval.seconds": "5"</text:span></text:p>
      <text:p text:style-name="P254"><text:span text:style-name="T250"><text:s text:c="2"/>}</text:span></text:p>
      <text:p text:style-name="P255"><text:span text:style-name="T250">}'</text:span></text:p>
      <text:p text:style-name="P258"><text:span text:style-name="T247"><text:s/></text:span></text:p>
      <text:p text:style-name="Standard">Mettre à jour le connecteur afin qu’il réplique le topic heartbeats</text:p>
      <text:p text:style-name="P266">curl -X PUT http://localhost:8083/connectors/mm2-source-A-to-B/config \</text:p>
      <text:p text:style-name="P266">-H "Content-Type: application/json" \</text:p>
      <text:p text:style-name="P266">-d '{</text:p>
      <text:p text:style-name="P266"><text:s text:c="2"/>"connector.class": "org.apache.kafka.connect.mirror.MirrorSourceConnector",</text:p>
      <text:p text:style-name="P266"><text:s text:c="2"/>"tasks.max": "1",</text:p>
      <text:p text:style-name="P266"><text:s text:c="2"/>"source.cluster.alias": "A",</text:p>
      <text:p text:style-name="P266"><text:s text:c="2"/>"target.cluster.alias": "B",</text:p>
      <text:p text:style-name="P266"><text:s text:c="2"/>"source.cluster.bootstrap.servers": "localhost:9092,localhost:9192,localhost:9292",</text:p>
      <text:p text:style-name="P266"><text:s text:c="2"/>"target.cluster.bootstrap.servers": "localhost:29092",</text:p>
      <text:p text:style-name="P266"><text:s text:c="2"/>"producer.override.bootstrap.servers": "localhost:29092",</text:p>
      <text:p text:style-name="P266"><text:s text:c="2"/>"topics": "position|heartbeats",</text:p>
      <text:p text:style-name="P266"><text:s text:c="2"/>"replication.factor": "1",</text:p>
      <text:p text:style-name="P266"><text:s text:c="2"/>"offset-syncs.topic.replication.factor": "1",</text:p>
      <text:p text:style-name="P266"><text:s text:c="2"/>"key.converter": "org.apache.kafka.connect.converters.ByteArrayConverter",</text:p>
      <text:p text:style-name="P266"><text:s text:c="2"/>"value.converter": "org.apache.kafka.connect.converters.ByteArrayConverter"</text:p>
      <text:p text:style-name="P266">}'</text:p>
      <text:p text:style-name="P257"><text:span text:style-name="T247"/></text:p>
      <text:p text:style-name="Standard">Vérifier l’état des trois connecteurs :</text:p>
      <text:p text:style-name="P253"><text:span text:style-name="T250">curl -s "http://localhost:8083/connectors?expand=status" | jq</text:span></text:p>
      <text:h text:style-name="Heading_20_2" text:outline-level="2"><text:bookmark-start text:name="__RefHeading___Toc20250_2913458575"/>7.6 Vérifier la réplication<text:bookmark-end text:name="__RefHeading___Toc20250_2913458575"/></text:h>
      <text:p text:style-name="Standard">Lister les topics côté cluster B — on doit y trouver <text:span text:style-name="T266">__consumer_offsets,</text:span>A.position, <text:span text:style-name="T266">A.</text:span>heartbeats, <text:span text:style-name="T266">heartbeats (pour le fail-over) </text:span>et le topic interne mm2-offset-syncs.B.internal :</text:p>
      <text:p text:style-name="P253"><text:span text:style-name="T250">docker exec -it kafka-b /opt/kafka/bin/kafka-topics.sh \</text:span></text:p>
      <text:p text:style-name="P255"><text:span text:style-name="T250"><text:s text:c="2"/>--bootstrap-server kafka-b:9092 --list</text:span></text:p>
      <text:p text:style-name="P258"><text:span text:style-name="T247"><text:s/></text:span></text:p>
      <text:p text:style-name="P257">Produire des messages sur position côté A <text:span text:style-name="T247">:</text:span></text:p>
      <text:p text:style-name="P253"><text:span text:style-name="T250">docker exec -it kafka-0 /opt/kafka/bin/kafka-console-producer.sh \</text:span></text:p>
      <text:p text:style-name="P255"><text:span text:style-name="T250"><text:s text:c="2"/>--bootstrap-server kafka-0:9092 --topic position</text:span></text:p>
      <text:p text:style-name="P258"><text:span text:style-name="T247"><text:s/></text:span></text:p>
      <text:p text:style-name="Standard">Et lire en parallèle sur A.position côté B pour observer la réplication en quasi temps réel :</text:p>
      <text:p text:style-name="P253"><text:span text:style-name="T250">docker exec -it kafka-b /opt/kafka/bin/kafka-console-consumer.sh \</text:span></text:p>
      <text:p text:style-name="P255"><text:span text:style-name="T250"><text:s text:c="2"/>--bootstrap-server kafka-b:9092 --topic A.position --from-beginning</text:span><text:span text:style-name="Source_20_Text"><text:span text:style-name="T76">.</text:span></text:span></text:p>
      <text:h text:style-name="P208" text:outline-level="1"/>
      <text:p text:style-name="P192"/>
      <text:h text:style-name="P212" text:outline-level="1"><text:bookmark-start text:name="__RefHeading___Toc9889_3845367211"/><text:span text:style-name="T133">Atelier 8 : kafkaStream et ksqlDB </text:span><text:bookmark-end text:name="__RefHeading___Toc9889_3845367211"/></text:h>
      <text:h text:style-name="Heading_20_2" text:outline-level="2"><text:bookmark-start text:name="__RefHeading___Toc20252_2913458575"/>8.1 Application KafkaStream <text:bookmark-end text:name="__RefHeading___Toc20252_2913458575"/></text:h>
      <text:p text:style-name="P326">L’application KafkaStream fourni<text:span text:style-name="T267">e travaille à partir du topic </text:span><text:span text:style-name="T17">avro-position</text:span><text:span text:style-name="T267"> et effectue plusieurs transformations en interne :</text:span></text:p>
      <text:list text:style-name="L24">
        <text:list-item>
          <text:p text:style-name="P327">Arrondi les valeurs de latitude et de longitude à une valeur entière</text:p>
        </text:list-item>
        <text:list-item>
          <text:p text:style-name="P327">Transforme le flux en KTable</text:p>
        </text:list-item>
        <text:list-item>
          <text:p text:style-name="P327">Groupe par la position, plutôt que l’id du coursier</text:p>
        </text:list-item>
        <text:list-item>
          <text:p text:style-name="P327">Effectue une agrégation pour maintenir à jour une liste de coursiers pour un position donnée.<text:line-break/>Obtient une table</text:p>
        </text:list-item>
        <text:list-item>
          <text:p text:style-name="P327">Déverse le changelog de cette table dans le topic <text:span text:style-name="T9">coursiersParPosition</text:span></text:p>
        </text:list-item>
      </text:list>
      <text:p text:style-name="Standard"/>
      <text:p text:style-name="P271">Pour démarrer l’application : </text:p>
      <text:p text:style-name="P268">java -jar streams.jar</text:p>
      <text:p text:style-name="P267"/>
      <text:p text:style-name="P272">S’assurer que l’application <text:s/>ne plante pas. </text:p>
      <text:p text:style-name="P272">Au bout d’un certain temps le topic de sortie devrait apparaître avec les dernières positions des coursiers.</text:p>
      <text:p text:style-name="P272"/>
      <text:p text:style-name="P272">Relancer une production sur avro et visualiser les mises à jour sur la table.</text:p>
      <text:p text:style-name="P272"/>
      <text:p text:style-name="P268">java -jar target/producer-avro-0.0.1-SNAPSHOT-jar-with-dependencies.jar 100 100000 1000 2</text:p>
      <text:h text:style-name="Heading_20_2" text:outline-level="2"><text:bookmark-start text:name="__RefHeading___Toc20254_2913458575"/>8.2 kSQLDb<text:bookmark-end text:name="__RefHeading___Toc20254_2913458575"/></text:h>
      <text:p text:style-name="P343" loext:marker-style-name="T106"><text:span text:style-name="T106">Objectifs</text:span></text:p>
      <text:list text:style-name="WWNum10">
        <text:list-item>
          <text:p text:style-name="P339">Découvrir l'interface CLI de ksqlDB</text:p>
        </text:list-item>
        <text:list-item>
          <text:p text:style-name="P339">Créer des streams et des tables à partir du topic <text:span text:style-name="Source_20_Text">position</text:span> produit aux ateliers précédents</text:p>
        </text:list-item>
        <text:list-item>
          <text:p text:style-name="P339">Écrire des requêtes dérivées pour filtrer et agréger les positions des coursiers</text:p>
        </text:list-item>
        <text:list-item>
          <text:p text:style-name="P340">Comprendre la différence entre Push Query (temps réel) et Pull Query (snapshot)</text:p>
        </text:list-item>
      </text:list>
      <text:p text:style-name="P343" loext:marker-style-name="T106"><text:span text:style-name="T106">Contexte</text:span></text:p>
      <text:p text:style-name="P343">Dans cet atelier, ksqlDB consomme directement le topic <text:span text:style-name="Source_20_Text">position</text:span> produit par JMeter (atelier 2). Aucun code Java n'est nécessaire — tout se fait en SQL depuis la CLI ou via l'API REST.</text:p>
      <text:h text:style-name="Heading_20_3" text:outline-level="3"><text:bookmark-start text:name="__RefHeading___Toc15343_2024334449"/>8.<text:span text:style-name="T253">2.1</text:span> Démarrage de la stack<text:bookmark-end text:name="__RefHeading___Toc15343_2024334449"/></text:h>
      <text:p text:style-name="P343">Un fichier <text:span text:style-name="Source_20_Text">docker-compose-ksqldb.yml</text:span> vous est fourni. Il étend la stack existante avec :</text:p>
      <text:list text:style-name="WWNum11">
        <text:list-item>
          <text:p text:style-name="P341"><text:span text:style-name="Strong_20_Emphasis_20__28_WW_29_">ksqlDB Server</text:span> (port 8088)</text:p>
        </text:list-item>
        <text:list-item>
          <text:p text:style-name="P342"><text:span text:style-name="Strong_20_Emphasis_20__28_WW_29_">ksqlDB CLI</text:span> (client interactif)</text:p>
        </text:list-item>
      </text:list>
      <text:p text:style-name="P343"/>
      <text:p text:style-name="P350"><text:span text:style-name="Source_20_Text">docker compose -f docker-compose-ksqldb.yml up -d</text:span></text:p>
      <text:p text:style-name="P343">Vérifier que le serveur est opérationnel :</text:p>
      <text:p text:style-name="P350"><text:span text:style-name="Source_20_Text">curl http://localhost:8088/info</text:span></text:p>
      <text:h text:style-name="Heading_20_3" text:outline-level="3"><text:bookmark-start text:name="__RefHeading___Toc15345_2024334449"/><text:soft-page-break/>8.<text:span text:style-name="T253">2.</text:span>1 Getting Started<text:bookmark-end text:name="__RefHeading___Toc15345_2024334449"/></text:h>
      <text:p text:style-name="P343" loext:marker-style-name="T106"><text:bookmark-start text:name="__RefHeading___Toc15347_2024334449"/><text:span text:style-name="T106">Connexion à la CLI</text:span><text:bookmark-end text:name="__RefHeading___Toc15347_2024334449"/></text:p>
      <text:p text:style-name="P350"><text:span text:style-name="Source_20_Text">docker exec -it ksqldb-cli ksql http://ksqldb-server:8088</text:span></text:p>
      <text:p text:style-name="P343">Explorer l'environnement :</text:p>
      <text:p text:style-name="P233"><text:span text:style-name="Source_20_Text"><text:span text:style-name="T254">SHOW</text:span></text:span><text:span text:style-name="Source_20_Text"><text:span text:style-name="T235"> TOPICS</text:span></text:span><text:span text:style-name="Source_20_Text"><text:span text:style-name="T237">;</text:span></text:span></text:p>
      <text:p text:style-name="P233"><text:span text:style-name="Source_20_Text"><text:span text:style-name="T254">SHOW</text:span></text:span><text:span text:style-name="Source_20_Text"><text:span text:style-name="T235"> STREAMS</text:span></text:span><text:span text:style-name="Source_20_Text"><text:span text:style-name="T237">;</text:span></text:span></text:p>
      <text:p text:style-name="P234"><text:span text:style-name="Source_20_Text"><text:span text:style-name="T254">SHOW</text:span></text:span><text:span text:style-name="Source_20_Text"><text:span text:style-name="T235"> </text:span></text:span><text:span text:style-name="Source_20_Text"><text:span text:style-name="T254">TABLES</text:span></text:span><text:span text:style-name="Source_20_Text"><text:span text:style-name="T237">;</text:span></text:span></text:p>
      <text:p text:style-name="P343">Inspecter le topic <text:span text:style-name="Source_20_Text">position</text:span> pour voir les messages existants :</text:p>
      <text:p text:style-name="P234"><text:span text:style-name="Source_20_Text"><text:span text:style-name="T254">PRINT</text:span></text:span><text:span text:style-name="Source_20_Text"><text:span text:style-name="T235"> </text:span></text:span><text:span text:style-name="Source_20_Text"><text:span text:style-name="T255">'position'</text:span></text:span><text:span text:style-name="Source_20_Text"><text:span text:style-name="T235"> </text:span></text:span><text:span text:style-name="Source_20_Text"><text:span text:style-name="T254">FROM</text:span></text:span><text:span text:style-name="Source_20_Text"><text:span text:style-name="T235"> BEGINNING </text:span></text:span><text:span text:style-name="Source_20_Text"><text:span text:style-name="T254">LIMIT</text:span></text:span><text:span text:style-name="Source_20_Text"><text:span text:style-name="T235"> </text:span></text:span><text:span text:style-name="Source_20_Text"><text:span text:style-name="T238">5</text:span></text:span><text:span text:style-name="Source_20_Text"><text:span text:style-name="T237">;</text:span></text:span></text:p>
      <text:p text:style-name="P343">Observer la structure d'un message : <text:span text:style-name="Source_20_Text">coursierId</text:span>, <text:span text:style-name="Source_20_Text">latitude</text:span>, <text:span text:style-name="Source_20_Text">longitude</text:span>, <text:span text:style-name="Source_20_Text">timestamp</text:span>.</text:p>
      <text:p text:style-name="P343" loext:marker-style-name="T106"><text:bookmark-start text:name="__RefHeading___Toc15349_2024334449"/><text:span text:style-name="T106">Créer le stream de base</text:span><text:bookmark-end text:name="__RefHeading___Toc15349_2024334449"/></text:p>
      <text:p text:style-name="P343">Créer un stream <text:span text:style-name="Source_20_Text">positions</text:span> mappé sur le topic <text:span text:style-name="Source_20_Text">position</text:span> :</text:p>
      <text:p text:style-name="P233"><text:span text:style-name="Source_20_Text"><text:span text:style-name="T237">CREATE STREAM positions (</text:span></text:span></text:p>
      <text:p text:style-name="P233"><text:span text:style-name="Source_20_Text"><text:span text:style-name="T237"><text:s text:c="4"/>courierId VARCHAR,</text:span></text:span></text:p>
      <text:p text:style-name="P233"><text:span text:style-name="Source_20_Text"><text:span text:style-name="T237"><text:s text:c="4"/>latitude <text:s/>DOUBLE,</text:span></text:span></text:p>
      <text:p text:style-name="P233"><text:span text:style-name="Source_20_Text"><text:span text:style-name="T237"><text:s text:c="4"/>longitude DOUBLE</text:span></text:span></text:p>
      <text:p text:style-name="P233"><text:span text:style-name="Source_20_Text"><text:span text:style-name="T237">) WITH (</text:span></text:span></text:p>
      <text:p text:style-name="P233"><text:span text:style-name="Source_20_Text"><text:span text:style-name="T237"><text:s text:c="4"/>kafka_topic <text:s/>= 'position',</text:span></text:span></text:p>
      <text:p text:style-name="P233"><text:span text:style-name="Source_20_Text"><text:span text:style-name="T237"><text:s text:c="4"/>value_format = 'JSON'</text:span></text:span></text:p>
      <text:p text:style-name="P233"><text:span text:style-name="Source_20_Text"><text:span text:style-name="T237">);</text:span></text:span></text:p>
      <text:p text:style-name="P233"/>
      <text:p text:style-name="P343">Vérifier la création :</text:p>
      <text:p text:style-name="P234"><text:span text:style-name="Source_20_Text"><text:span text:style-name="T254">DESCRIBE</text:span></text:span><text:span text:style-name="Source_20_Text"><text:span text:style-name="T235"> positions</text:span></text:span><text:span text:style-name="Source_20_Text"><text:span text:style-name="T237">;</text:span></text:span></text:p>
      <text:p text:style-name="P343">Exécuter une première push query pour voir les messages en temps réel. <text:span text:style-name="Strong_20_Emphasis_20__28_WW_29_">Dans un autre terminal</text:span>, démarrer la production de message dans le topic position</text:p>
      <text:p text:style-name="P233"><text:span text:style-name="Source_20_Text"><text:span text:style-name="T254">SELECT</text:span></text:span><text:span text:style-name="Source_20_Text"><text:span text:style-name="T235"> courierId</text:span></text:span><text:span text:style-name="Source_20_Text"><text:span text:style-name="T237">,</text:span></text:span><text:span text:style-name="Source_20_Text"><text:span text:style-name="T235"> latitude</text:span></text:span><text:span text:style-name="Source_20_Text"><text:span text:style-name="T237">,</text:span></text:span><text:span text:style-name="Source_20_Text"><text:span text:style-name="T235"> longitude</text:span></text:span></text:p>
      <text:p text:style-name="P233"><text:span text:style-name="Source_20_Text"><text:span text:style-name="T254">FROM</text:span></text:span><text:span text:style-name="Source_20_Text"><text:span text:style-name="T235"> positions</text:span></text:span></text:p>
      <text:p text:style-name="P233"><text:span text:style-name="Source_20_Text"><text:span text:style-name="T235">EMIT CHANGES</text:span></text:span></text:p>
      <text:p text:style-name="P234"><text:span text:style-name="Source_20_Text"><text:span text:style-name="T254">LIMIT</text:span></text:span><text:span text:style-name="Source_20_Text"><text:span text:style-name="T235"> </text:span></text:span><text:span text:style-name="Source_20_Text"><text:span text:style-name="T238">10</text:span></text:span><text:span text:style-name="Source_20_Text"><text:span text:style-name="T237">;</text:span></text:span></text:p>
      <text:p text:style-name="P343">Observer les messages défiler. Appuyer sur <text:span text:style-name="Source_20_Text">Ctrl+C</text:span> pour arrêter.</text:p>
      <text:h text:style-name="Heading_20_3" text:outline-level="3"><text:bookmark-start text:name="__RefHeading___Toc15351_2024334449"/>8.2.<text:span text:style-name="T253">2</text:span> Transformations et filtres<text:bookmark-end text:name="__RefHeading___Toc15351_2024334449"/></text:h>
      <text:p text:style-name="P343" loext:marker-style-name="T106"><text:bookmark-start text:name="__RefHeading___Toc15353_2024334449"/><text:span text:style-name="T106">Stream dérivé — positions dans Paris</text:span><text:bookmark-end text:name="__RefHeading___Toc15353_2024334449"/></text:p>
      <text:p text:style-name="P343">Créer un stream ne contenant que les positions dans la zone parisienne (latitude entre 48.8 et 48.95, longitude entre 2.2 et 2.5) :</text:p>
      <text:p text:style-name="P343"/>
      <text:p text:style-name="P233"><text:span text:style-name="Source_20_Text"><text:span text:style-name="T237">CREATE STREAM positions_paris AS</text:span></text:span></text:p>
      <text:p text:style-name="P233"><text:span text:style-name="Source_20_Text"><text:span text:style-name="T237"><text:s text:c="4"/>SELECT courierId,</text:span></text:span></text:p>
      <text:p text:style-name="P233"><text:span text:style-name="Source_20_Text"><text:span text:style-name="T237"><text:s text:c="11"/>latitude,</text:span></text:span></text:p>
      <text:p text:style-name="P233"><text:span text:style-name="Source_20_Text"><text:span text:style-name="T237"><text:s text:c="11"/>longitude</text:span></text:span></text:p>
      <text:p text:style-name="P233"><text:span text:style-name="Source_20_Text"><text:span text:style-name="T237"><text:s text:c="4"/>FROM positions</text:span></text:span></text:p>
      <text:p text:style-name="P233"><text:span text:style-name="Source_20_Text"><text:span text:style-name="T237"><text:s text:c="4"/>WHERE latitude <text:s/>BETWEEN 48.80 AND 48.95</text:span></text:span></text:p>
      <text:p text:style-name="P233"><text:span text:style-name="Source_20_Text"><text:span text:style-name="T237"><text:s text:c="6"/>AND longitude BETWEEN 2.20 <text:s/>AND 2.50</text:span></text:span></text:p>
      <text:p text:style-name="P233"><text:span text:style-name="Source_20_Text"><text:span text:style-name="T237">EMIT CHANGES;</text:span></text:span></text:p>
      <text:p text:style-name="P233"/>
      <text:p text:style-name="P343">Vérifier que le topic correspondant a été créé :</text:p>
      <text:p text:style-name="P234"><text:soft-page-break/><text:span text:style-name="Source_20_Text"><text:span text:style-name="T254">SHOW</text:span></text:span><text:span text:style-name="Source_20_Text"><text:span text:style-name="T235"> TOPICS</text:span></text:span><text:span text:style-name="Source_20_Text"><text:span text:style-name="T237">;</text:span></text:span></text:p>
      <text:p text:style-name="P343">Constater que ksqlDB a créé automatiquement le topic <text:span text:style-name="Source_20_Text">POSITIONS_PARIS</text:span>.</text:p>
      <text:p text:style-name="P343">Exécuter une push query sur ce stream filtré :</text:p>
      <text:p text:style-name="P234"><text:span text:style-name="Source_20_Text"><text:span text:style-name="T254">SELECT</text:span></text:span><text:span text:style-name="Source_20_Text"><text:span text:style-name="T235"> * </text:span></text:span><text:span text:style-name="Source_20_Text"><text:span text:style-name="T254">FROM</text:span></text:span><text:span text:style-name="Source_20_Text"><text:span text:style-name="T235"> positions_paris EMIT CHANGES </text:span></text:span><text:span text:style-name="Source_20_Text"><text:span text:style-name="T254">LIMIT</text:span></text:span><text:span text:style-name="Source_20_Text"><text:span text:style-name="T235"> </text:span></text:span><text:span text:style-name="Source_20_Text"><text:span text:style-name="T238">5</text:span></text:span><text:span text:style-name="Source_20_Text"><text:span text:style-name="T237">;</text:span></text:span></text:p>
      <text:p text:style-name="P343" loext:marker-style-name="T106"><text:bookmark-start text:name="__RefHeading___Toc15355_2024334449"/><text:span text:style-name="T106">Table — dernière position connue par coursier</text:span><text:bookmark-end text:name="__RefHeading___Toc15355_2024334449"/></text:p>
      <text:p text:style-name="P343">Créer une table qui maintient en temps réel la <text:span text:style-name="Strong_20_Emphasis_20__28_WW_29_">dernière position connue</text:span> de chaque coursier :</text:p>
      <text:p text:style-name="P343"/>
      <text:p text:style-name="P233"><text:span text:style-name="Source_20_Text"><text:span text:style-name="T254">CREATE</text:span></text:span><text:span text:style-name="Source_20_Text"><text:span text:style-name="T235"> </text:span></text:span><text:span text:style-name="Source_20_Text"><text:span text:style-name="T254">TABLE</text:span></text:span><text:span text:style-name="Source_20_Text"><text:span text:style-name="T235"> last_position </text:span></text:span><text:span text:style-name="Source_20_Text"><text:span text:style-name="T254">AS</text:span></text:span></text:p>
      <text:p text:style-name="P233"><text:span text:style-name="Source_20_Text"><text:span text:style-name="T236"><text:s text:c="4"/></text:span></text:span><text:span text:style-name="Source_20_Text"><text:span text:style-name="T254">SELECT</text:span></text:span><text:span text:style-name="Source_20_Text"><text:span text:style-name="T235"> courierId</text:span></text:span><text:span text:style-name="Source_20_Text"><text:span text:style-name="T237">,</text:span></text:span></text:p>
      <text:p text:style-name="P233"><text:span text:style-name="Source_20_Text"><text:span text:style-name="T236"><text:s text:c="11"/></text:span></text:span><text:span text:style-name="Source_20_Text"><text:span text:style-name="T235">LATEST_BY_OFFSET</text:span></text:span><text:span text:style-name="Source_20_Text"><text:span text:style-name="T237">(</text:span></text:span><text:span text:style-name="Source_20_Text"><text:span text:style-name="T235">latitude</text:span></text:span><text:span text:style-name="Source_20_Text"><text:span text:style-name="T237">)</text:span></text:span><text:span text:style-name="Source_20_Text"><text:span text:style-name="T235"> <text:s/></text:span></text:span><text:span text:style-name="Source_20_Text"><text:span text:style-name="T254">AS</text:span></text:span><text:span text:style-name="Source_20_Text"><text:span text:style-name="T235"> last_lat</text:span></text:span><text:span text:style-name="Source_20_Text"><text:span text:style-name="T237">,</text:span></text:span></text:p>
      <text:p text:style-name="P233"><text:span text:style-name="Source_20_Text"><text:span text:style-name="T236"><text:s text:c="11"/></text:span></text:span><text:span text:style-name="Source_20_Text"><text:span text:style-name="T235">LATEST_BY_OFFSET</text:span></text:span><text:span text:style-name="Source_20_Text"><text:span text:style-name="T237">(</text:span></text:span><text:span text:style-name="Source_20_Text"><text:span text:style-name="T235">longitude</text:span></text:span><text:span text:style-name="Source_20_Text"><text:span text:style-name="T237">)</text:span></text:span><text:span text:style-name="Source_20_Text"><text:span text:style-name="T235"> </text:span></text:span><text:span text:style-name="Source_20_Text"><text:span text:style-name="T254">AS</text:span></text:span><text:span text:style-name="Source_20_Text"><text:span text:style-name="T235"> last_lon</text:span></text:span><text:span text:style-name="Source_20_Text"><text:span text:style-name="T237">,</text:span></text:span></text:p>
      <text:p text:style-name="P233"><text:span text:style-name="Source_20_Text"><text:span text:style-name="T236"><text:s text:c="11"/></text:span></text:span><text:span text:style-name="Source_20_Text"><text:span text:style-name="T256">COUNT</text:span></text:span><text:span text:style-name="Source_20_Text"><text:span text:style-name="T237">(</text:span></text:span><text:span text:style-name="Source_20_Text"><text:span text:style-name="T235">*</text:span></text:span><text:span text:style-name="Source_20_Text"><text:span text:style-name="T237">)</text:span></text:span><text:span text:style-name="Source_20_Text"><text:span text:style-name="T235"> </text:span></text:span><text:span text:style-name="Source_20_Text"><text:span text:style-name="T254">AS</text:span></text:span><text:span text:style-name="Source_20_Text"><text:span text:style-name="T235"> nb_messages</text:span></text:span></text:p>
      <text:p text:style-name="P233"><text:span text:style-name="Source_20_Text"><text:span text:style-name="T236"><text:s text:c="4"/></text:span></text:span><text:span text:style-name="Source_20_Text"><text:span text:style-name="T254">FROM</text:span></text:span><text:span text:style-name="Source_20_Text"><text:span text:style-name="T235"> positions</text:span></text:span></text:p>
      <text:p text:style-name="P233"><text:span text:style-name="Source_20_Text"><text:span text:style-name="T236"><text:s text:c="4"/></text:span></text:span><text:span text:style-name="Source_20_Text"><text:span text:style-name="T254">GROUP</text:span></text:span><text:span text:style-name="Source_20_Text"><text:span text:style-name="T235"> </text:span></text:span><text:span text:style-name="Source_20_Text"><text:span text:style-name="T254">BY</text:span></text:span><text:span text:style-name="Source_20_Text"><text:span text:style-name="T235"> courierId</text:span></text:span></text:p>
      <text:p text:style-name="P234"><text:span text:style-name="Source_20_Text"><text:span text:style-name="T235">EMIT CHANGES</text:span></text:span><text:span text:style-name="Source_20_Text"><text:span text:style-name="T237">;</text:span></text:span></text:p>
      <text:p text:style-name="P344">La table est mise à jour à chaque nouveau message reçu pour un coursier donné.</text:p>
      <text:p text:style-name="P343" loext:marker-style-name="T106"><text:bookmark-start text:name="__RefHeading___Toc15357_2024334449"/><text:span text:style-name="T106">Agrégation par zone — coursiers par secteur</text:span><text:bookmark-end text:name="__RefHeading___Toc15357_2024334449"/></text:p>
      <text:p text:style-name="P343">Arrondir les coordonnées à 1 décimale pour créer des secteurs géographiques, et compter combien de coursiers différents ont été vus dans chaque secteur :</text:p>
      <text:p text:style-name="P343"/>
      <text:p text:style-name="P233"><text:span text:style-name="Source_20_Text"><text:span text:style-name="T237">CREATE TABLE positions_par_secteur AS</text:span></text:span></text:p>
      <text:p text:style-name="P233"><text:span text:style-name="Source_20_Text"><text:span text:style-name="T237"><text:s text:c="4"/>SELECT CAST(ROUND(last_lat, 1) AS VARCHAR) + '_' +</text:span></text:span></text:p>
      <text:p text:style-name="P233"><text:span text:style-name="Source_20_Text"><text:span text:style-name="T237"><text:s text:c="11"/>CAST(ROUND(last_lon, 1) AS VARCHAR) AS secteur,</text:span></text:span></text:p>
      <text:p text:style-name="P233"><text:span text:style-name="Source_20_Text"><text:span text:style-name="T237"><text:s text:c="11"/>COUNT(*) <text:s text:c="15"/>AS nb_coursiers,</text:span></text:span></text:p>
      <text:p text:style-name="P233"><text:span text:style-name="Source_20_Text"><text:span text:style-name="T237"><text:s text:c="11"/>COLLECT_LIST(courierId) AS coursiers</text:span></text:span></text:p>
      <text:p text:style-name="P233"><text:span text:style-name="Source_20_Text"><text:span text:style-name="T237"><text:s text:c="4"/>FROM last_position</text:span></text:span></text:p>
      <text:p text:style-name="P233"><text:span text:style-name="Source_20_Text"><text:span text:style-name="T237"><text:s text:c="4"/>GROUP BY CAST(ROUND(last_lat, 1) AS VARCHAR) + '_' +</text:span></text:span></text:p>
      <text:p text:style-name="P233"><text:span text:style-name="Source_20_Text"><text:span text:style-name="T237"><text:s text:c="13"/>CAST(ROUND(last_lon, 1) AS VARCHAR)</text:span></text:span></text:p>
      <text:p text:style-name="P233"><text:span text:style-name="Source_20_Text"><text:span text:style-name="T237">EMIT CHANGES;</text:span></text:span></text:p>
      <text:p text:style-name="P233"/>
      <text:p text:style-name="P343"><text:span text:style-name="Source_20_Text">Faire une sélection sur la table</text:span></text:p>
      <text:h text:style-name="Heading_20_3" text:outline-level="3"><text:bookmark-start text:name="__RefHeading___Toc15359_2024334449"/>8.<text:span text:style-name="T253">2.</text:span>3 Requêtes<text:bookmark-end text:name="__RefHeading___Toc15359_2024334449"/></text:h>
      <text:p text:style-name="P343" loext:marker-style-name="T106"><text:bookmark-start text:name="__RefHeading___Toc15361_2024334449"/><text:span text:style-name="T106">Push Query — suivi en temps réel</text:span><text:bookmark-end text:name="__RefHeading___Toc15361_2024334449"/></text:p>
      <text:p text:style-name="P343"><text:span text:style-name="Strong_20_Emphasis_20__28_WW_29_">Démarrer la production de messages</text:span></text:p>
      <text:p text:style-name="P343">Dans la CLI, suivre en temps réel les mises à jour de la table <text:span text:style-name="Source_20_Text">last_position</text:span> :</text:p>
      <text:p text:style-name="P233"><text:span text:style-name="Source_20_Text"><text:span text:style-name="T254">SELECT</text:span></text:span><text:span text:style-name="Source_20_Text"><text:span text:style-name="T235"> courierId</text:span></text:span><text:span text:style-name="Source_20_Text"><text:span text:style-name="T237">,</text:span></text:span><text:span text:style-name="Source_20_Text"><text:span text:style-name="T235"> last_lat</text:span></text:span><text:span text:style-name="Source_20_Text"><text:span text:style-name="T237">,</text:span></text:span><text:span text:style-name="Source_20_Text"><text:span text:style-name="T235"> last_lon</text:span></text:span><text:span text:style-name="Source_20_Text"><text:span text:style-name="T237">,</text:span></text:span><text:span text:style-name="Source_20_Text"><text:span text:style-name="T235"> nb_messages</text:span></text:span></text:p>
      <text:p text:style-name="P233"><text:span text:style-name="Source_20_Text"><text:span text:style-name="T254">FROM</text:span></text:span><text:span text:style-name="Source_20_Text"><text:span text:style-name="T235"> last_position</text:span></text:span></text:p>
      <text:p text:style-name="P234"><text:span text:style-name="Source_20_Text"><text:span text:style-name="T235">EMIT CHANGES</text:span></text:span><text:span text:style-name="Source_20_Text"><text:span text:style-name="T237">;</text:span></text:span></text:p>
      <text:p text:style-name="P343">Observer les lignes se mettre à jour au fil des messages produits.</text:p>
      <text:p text:style-name="P343">Filtrer sur un seul coursier (remplacer <text:span text:style-name="Source_20_Text">courier-0</text:span> par un ID visible dans les logs) :</text:p>
      <text:p text:style-name="P233"><text:span text:style-name="Source_20_Text"><text:span text:style-name="T254">SELECT</text:span></text:span><text:span text:style-name="Source_20_Text"><text:span text:style-name="T235"> *</text:span></text:span></text:p>
      <text:p text:style-name="P233"><text:span text:style-name="Source_20_Text"><text:span text:style-name="T254">FROM</text:span></text:span><text:span text:style-name="Source_20_Text"><text:span text:style-name="T235"> last_position</text:span></text:span></text:p>
      <text:p text:style-name="P233"><text:span text:style-name="Source_20_Text"><text:span text:style-name="T254">WHERE</text:span></text:span><text:span text:style-name="Source_20_Text"><text:span text:style-name="T235"> courierId = </text:span></text:span><text:span text:style-name="Source_20_Text"><text:span text:style-name="T255">'courier-0'</text:span></text:span></text:p>
      <text:p text:style-name="P234"><text:span text:style-name="Source_20_Text"><text:span text:style-name="T235">EMIT CHANGES</text:span></text:span><text:span text:style-name="Source_20_Text"><text:span text:style-name="T237">;</text:span></text:span></text:p>
      <text:p text:style-name="P343" loext:marker-style-name="T106"><text:bookmark-start text:name="__RefHeading___Toc15363_2024334449"/><text:soft-page-break/><text:span text:style-name="T106">Pull Query — snapshot à l'instant T</text:span><text:bookmark-end text:name="__RefHeading___Toc15363_2024334449"/></text:p>
      <text:p text:style-name="P343">Une fois JMeter arrêté, interroger la table pour obtenir l'état courant :</text:p>
      <text:p text:style-name="P233"><text:span text:style-name="Source_20_Text"><text:span text:style-name="T257">-- Dernière position de tous les coursiers</text:span></text:span></text:p>
      <text:p text:style-name="P233"><text:span text:style-name="Source_20_Text"><text:span text:style-name="T254">SELECT</text:span></text:span><text:span text:style-name="Source_20_Text"><text:span text:style-name="T235"> courierId</text:span></text:span><text:span text:style-name="Source_20_Text"><text:span text:style-name="T237">,</text:span></text:span><text:span text:style-name="Source_20_Text"><text:span text:style-name="T235"> last_lat</text:span></text:span><text:span text:style-name="Source_20_Text"><text:span text:style-name="T237">,</text:span></text:span><text:span text:style-name="Source_20_Text"><text:span text:style-name="T235"> last_lon</text:span></text:span><text:span text:style-name="Source_20_Text"><text:span text:style-name="T237">,</text:span></text:span><text:span text:style-name="Source_20_Text"><text:span text:style-name="T235"> nb_messages</text:span></text:span></text:p>
      <text:p text:style-name="P234"><text:span text:style-name="Source_20_Text"><text:span text:style-name="T254">FROM</text:span></text:span><text:span text:style-name="Source_20_Text"><text:span text:style-name="T235"> last_position</text:span></text:span><text:span text:style-name="Source_20_Text"><text:span text:style-name="T237">;</text:span></text:span></text:p>
      <text:p text:style-name="P233"><text:span text:style-name="Source_20_Text"><text:span text:style-name="T257">-- Coursier ayant envoyé le plus de messages</text:span></text:span></text:p>
      <text:p text:style-name="P233"><text:span text:style-name="Source_20_Text"><text:span text:style-name="T254">SELECT</text:span></text:span><text:span text:style-name="Source_20_Text"><text:span text:style-name="T235"> courierId</text:span></text:span><text:span text:style-name="Source_20_Text"><text:span text:style-name="T237">,</text:span></text:span><text:span text:style-name="Source_20_Text"><text:span text:style-name="T235"> nb_messages</text:span></text:span></text:p>
      <text:p text:style-name="P233"><text:span text:style-name="Source_20_Text"><text:span text:style-name="T254">FROM</text:span></text:span><text:span text:style-name="Source_20_Text"><text:span text:style-name="T235"> last_position</text:span></text:span></text:p>
      <text:p text:style-name="P234"><text:span text:style-name="Source_20_Text"><text:span text:style-name="T254">WHERE</text:span></text:span><text:span text:style-name="Source_20_Text"><text:span text:style-name="T235"> nb_messages &gt; </text:span></text:span><text:span text:style-name="Source_20_Text"><text:span text:style-name="T238">50</text:span></text:span><text:span text:style-name="Source_20_Text"><text:span text:style-name="T237">;</text:span></text:span></text:p>
      <text:p text:style-name="P344"><text:span text:style-name="Strong_20_Emphasis_20__28_WW_29_">Pull Query vs Push Query</text:span> : la pull query retourne un snapshot et se termine immédiatement. La push query reste ouverte et pousse les mises à jour en continu.</text:p>
      <text:p text:style-name="P343" loext:marker-style-name="T106"><text:bookmark-start text:name="__RefHeading___Toc15365_2024334449"/><text:span text:style-name="T106">Push Query avec fenêtre temporelle</text:span><text:bookmark-end text:name="__RefHeading___Toc15365_2024334449"/></text:p>
      <text:p text:style-name="P343">Compter les messages par coursier sur des fenêtres glissantes de 1 minute :</text:p>
      <text:p text:style-name="P233"><text:span text:style-name="Source_20_Text"><text:span text:style-name="T254">SELECT</text:span></text:span><text:span text:style-name="Source_20_Text"><text:span text:style-name="T235"> courierId</text:span></text:span><text:span text:style-name="Source_20_Text"><text:span text:style-name="T237">,</text:span></text:span></text:p>
      <text:p text:style-name="P233"><text:span text:style-name="Source_20_Text"><text:span text:style-name="T236"><text:s text:c="7"/></text:span></text:span><text:span text:style-name="Source_20_Text"><text:span text:style-name="T235">WINDOWSTART </text:span></text:span><text:span text:style-name="Source_20_Text"><text:span text:style-name="T254">AS</text:span></text:span><text:span text:style-name="Source_20_Text"><text:span text:style-name="T235"> debut</text:span></text:span><text:span text:style-name="Source_20_Text"><text:span text:style-name="T237">,</text:span></text:span></text:p>
      <text:p text:style-name="P233"><text:span text:style-name="Source_20_Text"><text:span text:style-name="T236"><text:s text:c="7"/></text:span></text:span><text:span text:style-name="Source_20_Text"><text:span text:style-name="T235">WINDOWEND <text:s text:c="2"/></text:span></text:span><text:span text:style-name="Source_20_Text"><text:span text:style-name="T254">AS</text:span></text:span><text:span text:style-name="Source_20_Text"><text:span text:style-name="T235"> fin</text:span></text:span><text:span text:style-name="Source_20_Text"><text:span text:style-name="T237">,</text:span></text:span></text:p>
      <text:p text:style-name="P233"><text:span text:style-name="Source_20_Text"><text:span text:style-name="T236"><text:s text:c="7"/></text:span></text:span><text:span text:style-name="Source_20_Text"><text:span text:style-name="T256">COUNT</text:span></text:span><text:span text:style-name="Source_20_Text"><text:span text:style-name="T237">(</text:span></text:span><text:span text:style-name="Source_20_Text"><text:span text:style-name="T235">*</text:span></text:span><text:span text:style-name="Source_20_Text"><text:span text:style-name="T237">)</text:span></text:span><text:span text:style-name="Source_20_Text"><text:span text:style-name="T235"> <text:s text:c="3"/></text:span></text:span><text:span text:style-name="Source_20_Text"><text:span text:style-name="T254">AS</text:span></text:span><text:span text:style-name="Source_20_Text"><text:span text:style-name="T235"> nb</text:span></text:span></text:p>
      <text:p text:style-name="P233"><text:span text:style-name="Source_20_Text"><text:span text:style-name="T254">FROM</text:span></text:span><text:span text:style-name="Source_20_Text"><text:span text:style-name="T235"> positions</text:span></text:span></text:p>
      <text:p text:style-name="P233"><text:span text:style-name="Source_20_Text"><text:span text:style-name="T235">WINDOW TUMBLING </text:span></text:span><text:span text:style-name="Source_20_Text"><text:span text:style-name="T237">(</text:span></text:span><text:span text:style-name="Source_20_Text"><text:span text:style-name="T235">SIZE </text:span></text:span><text:span text:style-name="Source_20_Text"><text:span text:style-name="T238">1</text:span></text:span><text:span text:style-name="Source_20_Text"><text:span text:style-name="T235"> </text:span></text:span><text:span text:style-name="Source_20_Text"><text:span text:style-name="T254">MINUTE</text:span></text:span><text:span text:style-name="Source_20_Text"><text:span text:style-name="T237">)</text:span></text:span></text:p>
      <text:p text:style-name="P233"><text:span text:style-name="Source_20_Text"><text:span text:style-name="T254">GROUP</text:span></text:span><text:span text:style-name="Source_20_Text"><text:span text:style-name="T235"> </text:span></text:span><text:span text:style-name="Source_20_Text"><text:span text:style-name="T254">BY</text:span></text:span><text:span text:style-name="Source_20_Text"><text:span text:style-name="T235"> courierId</text:span></text:span></text:p>
      <text:p text:style-name="P234"><text:span text:style-name="Source_20_Text"><text:span text:style-name="T235">EMIT CHANGES</text:span></text:span><text:span text:style-name="Source_20_Text"><text:span text:style-name="T237">;</text:span></text:span></text:p>
      <text:p text:style-name="P343">Relancer la production et observer les compteurs se réinitialiser à chaque nouvelle fenêtre.</text:p>
      <text:h text:style-name="Heading_20_3" text:outline-level="3"><text:bookmark-start text:name="__RefHeading___Toc15367_2024334449"/>8.<text:span text:style-name="T253">2.</text:span>4 Pour aller plus loin<text:bookmark-end text:name="__RefHeading___Toc15367_2024334449"/></text:h>
      <text:p text:style-name="P343" loext:marker-style-name="T106"><text:bookmark-start text:name="__RefHeading___Toc15369_2024334449"/><text:span text:style-name="T106">Requête de proximité avec GEO_DISTANCE</text:span><text:bookmark-end text:name="__RefHeading___Toc15369_2024334449"/></text:p>
      <text:p text:style-name="P343">Créer une table des coursiers proches de la Place de la République (48.8672, 2.3628) :</text:p>
      <text:p text:style-name="P233"><text:span text:style-name="Source_20_Text"><text:span text:style-name="T254">CREATE</text:span></text:span><text:span text:style-name="Source_20_Text"><text:span text:style-name="T235"> </text:span></text:span><text:span text:style-name="Source_20_Text"><text:span text:style-name="T254">TABLE</text:span></text:span><text:span text:style-name="Source_20_Text"><text:span text:style-name="T235"> coursiers_proche_republique </text:span></text:span><text:span text:style-name="Source_20_Text"><text:span text:style-name="T254">AS</text:span></text:span></text:p>
      <text:p text:style-name="P233"><text:span text:style-name="Source_20_Text"><text:span text:style-name="T236"><text:s text:c="4"/></text:span></text:span><text:span text:style-name="Source_20_Text"><text:span text:style-name="T254">SELECT</text:span></text:span><text:span text:style-name="Source_20_Text"><text:span text:style-name="T235"> courierId</text:span></text:span><text:span text:style-name="Source_20_Text"><text:span text:style-name="T237">,</text:span></text:span></text:p>
      <text:p text:style-name="P233"><text:span text:style-name="Source_20_Text"><text:span text:style-name="T236"><text:s text:c="11"/></text:span></text:span><text:span text:style-name="Source_20_Text"><text:span text:style-name="T235">last_lat</text:span></text:span><text:span text:style-name="Source_20_Text"><text:span text:style-name="T237">,</text:span></text:span></text:p>
      <text:p text:style-name="P233"><text:span text:style-name="Source_20_Text"><text:span text:style-name="T236"><text:s text:c="11"/></text:span></text:span><text:span text:style-name="Source_20_Text"><text:span text:style-name="T235">last_lon</text:span></text:span><text:span text:style-name="Source_20_Text"><text:span text:style-name="T237">,</text:span></text:span></text:p>
      <text:p text:style-name="P233"><text:span text:style-name="Source_20_Text"><text:span text:style-name="T236"><text:s text:c="11"/></text:span></text:span><text:span text:style-name="Source_20_Text"><text:span text:style-name="T256">ROUND</text:span></text:span><text:span text:style-name="Source_20_Text"><text:span text:style-name="T237">(</text:span></text:span><text:span text:style-name="Source_20_Text"><text:span text:style-name="T235">GEO_DISTANCE</text:span></text:span><text:span text:style-name="Source_20_Text"><text:span text:style-name="T237">(</text:span></text:span><text:span text:style-name="Source_20_Text"><text:span text:style-name="T235">last_lat</text:span></text:span><text:span text:style-name="Source_20_Text"><text:span text:style-name="T237">,</text:span></text:span><text:span text:style-name="Source_20_Text"><text:span text:style-name="T235"> last_lon</text:span></text:span><text:span text:style-name="Source_20_Text"><text:span text:style-name="T237">,</text:span></text:span><text:span text:style-name="Source_20_Text"><text:span text:style-name="T235"> </text:span></text:span><text:span text:style-name="Source_20_Text"><text:span text:style-name="T238">48.8672</text:span></text:span><text:span text:style-name="Source_20_Text"><text:span text:style-name="T237">,</text:span></text:span><text:span text:style-name="Source_20_Text"><text:span text:style-name="T235"> </text:span></text:span><text:span text:style-name="Source_20_Text"><text:span text:style-name="T238">2.3628</text:span></text:span><text:span text:style-name="Source_20_Text"><text:span text:style-name="T237">),</text:span></text:span><text:span text:style-name="Source_20_Text"><text:span text:style-name="T235"> </text:span></text:span><text:span text:style-name="Source_20_Text"><text:span text:style-name="T238">2</text:span></text:span><text:span text:style-name="Source_20_Text"><text:span text:style-name="T237">)</text:span></text:span><text:span text:style-name="Source_20_Text"><text:span text:style-name="T235"> </text:span></text:span><text:span text:style-name="Source_20_Text"><text:span text:style-name="T254">AS</text:span></text:span><text:span text:style-name="Source_20_Text"><text:span text:style-name="T235"> distance_km</text:span></text:span></text:p>
      <text:p text:style-name="P233"><text:span text:style-name="Source_20_Text"><text:span text:style-name="T236"><text:s text:c="4"/></text:span></text:span><text:span text:style-name="Source_20_Text"><text:span text:style-name="T254">FROM</text:span></text:span><text:span text:style-name="Source_20_Text"><text:span text:style-name="T235"> last_position</text:span></text:span></text:p>
      <text:p text:style-name="P233"><text:span text:style-name="Source_20_Text"><text:span text:style-name="T236"><text:s text:c="4"/></text:span></text:span><text:span text:style-name="Source_20_Text"><text:span text:style-name="T254">WHERE</text:span></text:span><text:span text:style-name="Source_20_Text"><text:span text:style-name="T235"> GEO_DISTANCE</text:span></text:span><text:span text:style-name="Source_20_Text"><text:span text:style-name="T237">(</text:span></text:span><text:span text:style-name="Source_20_Text"><text:span text:style-name="T235">last_lat</text:span></text:span><text:span text:style-name="Source_20_Text"><text:span text:style-name="T237">,</text:span></text:span><text:span text:style-name="Source_20_Text"><text:span text:style-name="T235"> last_lon</text:span></text:span><text:span text:style-name="Source_20_Text"><text:span text:style-name="T237">,</text:span></text:span><text:span text:style-name="Source_20_Text"><text:span text:style-name="T235"> </text:span></text:span><text:span text:style-name="Source_20_Text"><text:span text:style-name="T238">48.8672</text:span></text:span><text:span text:style-name="Source_20_Text"><text:span text:style-name="T237">,</text:span></text:span><text:span text:style-name="Source_20_Text"><text:span text:style-name="T235"> </text:span></text:span><text:span text:style-name="Source_20_Text"><text:span text:style-name="T238">2.3628</text:span></text:span><text:span text:style-name="Source_20_Text"><text:span text:style-name="T237">)</text:span></text:span><text:span text:style-name="Source_20_Text"><text:span text:style-name="T235"> &lt;= </text:span></text:span><text:span text:style-name="Source_20_Text"><text:span text:style-name="T238">5.0</text:span></text:span></text:p>
      <text:p text:style-name="P234"><text:span text:style-name="Source_20_Text"><text:span text:style-name="T235">EMIT CHANGES</text:span></text:span><text:span text:style-name="Source_20_Text"><text:span text:style-name="T237">;</text:span></text:span></text:p>
      <text:p text:style-name="P343">Pull query pour voir les coursiers actuellement proches :</text:p>
      <text:p text:style-name="P234"><text:span text:style-name="Source_20_Text"><text:span text:style-name="T254">SELECT</text:span></text:span><text:span text:style-name="Source_20_Text"><text:span text:style-name="T235"> * </text:span></text:span><text:span text:style-name="Source_20_Text"><text:span text:style-name="T254">FROM</text:span></text:span><text:span text:style-name="Source_20_Text"><text:span text:style-name="T235"> coursiers_proche_republique</text:span></text:span><text:span text:style-name="Source_20_Text"><text:span text:style-name="T237">;</text:span></text:span></text:p>
      <text:p text:style-name="P343" loext:marker-style-name="T106"><text:bookmark-start text:name="__RefHeading___Toc15371_2024334449"/><text:span text:style-name="T106">Explorer les objets créés</text:span><text:bookmark-end text:name="__RefHeading___Toc15371_2024334449"/></text:p>
      <text:p text:style-name="P233"><text:span text:style-name="Source_20_Text"><text:span text:style-name="T254">DESCRIBE</text:span></text:span><text:span text:style-name="Source_20_Text"><text:span text:style-name="T235"> </text:span></text:span><text:span text:style-name="Source_20_Text"><text:span text:style-name="T254">EXTENDED</text:span></text:span><text:span text:style-name="Source_20_Text"><text:span text:style-name="T235"> last_position</text:span></text:span><text:span text:style-name="Source_20_Text"><text:span text:style-name="T237">;</text:span></text:span></text:p>
      <text:p text:style-name="P233"><text:span text:style-name="Source_20_Text"><text:span text:style-name="T254">SHOW</text:span></text:span><text:span text:style-name="Source_20_Text"><text:span text:style-name="T235"> QUERIES</text:span></text:span><text:span text:style-name="Source_20_Text"><text:span text:style-name="T237">;</text:span></text:span></text:p>
      <text:p text:style-name="P234"><text:span text:style-name="Source_20_Text"><text:span text:style-name="T254">EXPLAIN</text:span></text:span><text:span text:style-name="Source_20_Text"><text:span text:style-name="T235"> &lt;query_id&gt;</text:span></text:span><text:span text:style-name="Source_20_Text"><text:span text:style-name="T237">;</text:span></text:span></text:p>
      <text:p text:style-name="P343"><text:span text:style-name="Source_20_Text">DESCRIBE EXTENDED</text:span> affiche les statistiques d'exécution de la requête sous-jacente.</text:p>
      <text:p text:style-name="P343"><text:span text:style-name="Source_20_Text">SHOW QUERIES</text:span> liste toutes les requêtes persistantes en cours d'exécution.</text:p>
      <text:p text:style-name="P343" loext:marker-style-name="T106"><text:bookmark-start text:name="__RefHeading___Toc15373_2024334449"/><text:span text:style-name="T106">Nettoyage</text:span><text:bookmark-end text:name="__RefHeading___Toc15373_2024334449"/></text:p>
      <text:p text:style-name="P233"><text:span text:style-name="Source_20_Text"><text:span text:style-name="T254">DROP</text:span></text:span><text:span text:style-name="Source_20_Text"><text:span text:style-name="T235"> </text:span></text:span><text:span text:style-name="Source_20_Text"><text:span text:style-name="T254">TABLE</text:span></text:span><text:span text:style-name="Source_20_Text"><text:span text:style-name="T235"> <text:s/>coursiers_proche_republique </text:span></text:span><text:span text:style-name="Source_20_Text"><text:span text:style-name="T254">DELETE</text:span></text:span><text:span text:style-name="Source_20_Text"><text:span text:style-name="T235"> TOPIC</text:span></text:span><text:span text:style-name="Source_20_Text"><text:span text:style-name="T237">;</text:span></text:span></text:p>
      <text:p text:style-name="P233"><text:span text:style-name="Source_20_Text"><text:span text:style-name="T254">DROP</text:span></text:span><text:span text:style-name="Source_20_Text"><text:span text:style-name="T235"> </text:span></text:span><text:span text:style-name="Source_20_Text"><text:span text:style-name="T254">TABLE</text:span></text:span><text:span text:style-name="Source_20_Text"><text:span text:style-name="T235"> <text:s/>positions_par_secteur <text:s text:c="6"/></text:span></text:span><text:span text:style-name="Source_20_Text"><text:span text:style-name="T254">DELETE</text:span></text:span><text:span text:style-name="Source_20_Text"><text:span text:style-name="T235"> TOPIC</text:span></text:span><text:span text:style-name="Source_20_Text"><text:span text:style-name="T237">;</text:span></text:span></text:p>
      <text:p text:style-name="P233"><text:soft-page-break/><text:span text:style-name="Source_20_Text"><text:span text:style-name="T254">DROP</text:span></text:span><text:span text:style-name="Source_20_Text"><text:span text:style-name="T235"> </text:span></text:span><text:span text:style-name="Source_20_Text"><text:span text:style-name="T254">TABLE</text:span></text:span><text:span text:style-name="Source_20_Text"><text:span text:style-name="T235"> <text:s/>last_position <text:s text:c="14"/></text:span></text:span><text:span text:style-name="Source_20_Text"><text:span text:style-name="T254">DELETE</text:span></text:span><text:span text:style-name="Source_20_Text"><text:span text:style-name="T235"> TOPIC</text:span></text:span><text:span text:style-name="Source_20_Text"><text:span text:style-name="T237">;</text:span></text:span></text:p>
      <text:p text:style-name="P233"><text:span text:style-name="Source_20_Text"><text:span text:style-name="T254">DROP</text:span></text:span><text:span text:style-name="Source_20_Text"><text:span text:style-name="T235"> STREAM positions_paris <text:s text:c="12"/></text:span></text:span><text:span text:style-name="Source_20_Text"><text:span text:style-name="T254">DELETE</text:span></text:span><text:span text:style-name="Source_20_Text"><text:span text:style-name="T235"> TOPIC</text:span></text:span><text:span text:style-name="Source_20_Text"><text:span text:style-name="T237">;</text:span></text:span></text:p>
      <text:p text:style-name="P234"><text:span text:style-name="Source_20_Text"><text:span text:style-name="T254">DROP</text:span></text:span><text:span text:style-name="Source_20_Text"><text:span text:style-name="T235"> STREAM positions</text:span></text:span><text:span text:style-name="Source_20_Text"><text:span text:style-name="T237">;</text:span></text:span></text:p>
      <text:p text:style-name="P259"><text:span text:style-name="T127"/></text:p>
      <text:h text:style-name="P202" text:outline-level="1"><text:span text:style-name="T129"/></text:h>
      <text:h text:style-name="P212" text:outline-level="1"><text:bookmark-start text:name="__RefHeading___Toc20256_2913458575"/><text:span text:style-name="T129">Atelier </text:span><text:span text:style-name="T134">9</text:span><text:span text:style-name="T129">: </text:span><text:span text:style-name="T130">Sécurité</text:span><text:bookmark-end text:name="__RefHeading___Toc20256_2913458575"/></text:h>
      <text:h text:style-name="P216" text:outline-level="2"><text:bookmark-start text:name="__RefHeading___Toc9834_38453672111"/><text:span text:style-name="T126">9</text:span><text:span text:style-name="T121">.</text:span><text:span text:style-name="T123">1</text:span><text:span text:style-name="T121"> </text:span><text:span text:style-name="T124">Séparation des échanges réseaux</text:span><text:bookmark-end text:name="__RefHeading___Toc9834_38453672111"/></text:h>
      <text:p text:style-name="Text_20_body">Créer 3 listeners plain text dénommé <text:span text:style-name="T269">BROKER</text:span>, CONTROLLER et EXTERNAL en leur affectant des ports différents</text:p>
      <text:p text:style-name="Text_20_body">Pour l’instant utiliser des communications en clair <text:span text:style-name="T180">pour les 3</text:span></text:p>
      <text:p text:style-name="P184">Avec un programme précédent utiliser le listener EXTERNAL. <text:span text:style-name="T212">Par exemple :</text:span></text:p>
      <text:p text:style-name="P9">java -jar SpringProducer.jar --spring.kafka.producer.bootstrap-servers=localhost:9094</text:p>
      <text:p text:style-name="P185">et </text:p>
      <text:p text:style-name="P9">java -jar SpringConsumer.jar --spring.kafka.consumer.bootstrap-servers=localhost:9094</text:p>
      <text:p text:style-name="P83"/>
      <text:h text:style-name="P217" text:outline-level="2"><text:bookmark-start text:name="__RefHeading___Toc9834_3845367211"/><text:span text:style-name="T126">9</text:span><text:span text:style-name="T121">.</text:span><text:span text:style-name="T125">2</text:span><text:span text:style-name="T121"> </text:span><text:span text:style-name="T122">Mise en place de SSL</text:span><text:span text:style-name="T123"> pour crypter les données</text:span><text:bookmark-end text:name="__RefHeading___Toc9834_3845367211"/></text:h>
      <text:p text:style-name="P306"><text:span text:style-name="T213">Récupérer le répertoire ssl, </text:span><text:span text:style-name="T270">il contient </text:span><text:span text:style-name="T213">des certificats pour localhost valable jusqu’en 2033</text:span></text:p>
      <text:p text:style-name="P43"/>
      <text:h text:style-name="Heading_20_3" text:outline-level="3"><text:bookmark-start text:name="__RefHeading___Toc16956_1047798942"/><text:span text:style-name="T258">9</text:span>.2.1 SSL appliqué aux communications inter-broker<text:bookmark-end text:name="__RefHeading___Toc16956_1047798942"/></text:h>
      <text:p text:style-name="P303">Arrêter les processus qui se connecter au listener PLAINTEXT</text:p>
      <text:p text:style-name="P45">Configurer <text:span text:style-name="T213">ensuite </text:span>les fichiers <text:span text:style-name="T1">server.properties</text:span></text:p>
      <text:list text:style-name="L16">
        <text:list-item>
          <text:p text:style-name="P298">Ajouter un listener <text:span text:style-name="T15">BROKER</text:span> et l’utiliser pour la communication inter-broker </text:p>
        </text:list-item>
      </text:list>
      <text:p text:style-name="P44"/>
      <text:p text:style-name="P42">Configurer le listener <text:span text:style-name="T228">BROKER (port, etc..)</text:span> et les propriétés SSL suivante dans <text:span text:style-name="T1">server.properties</text:span></text:p>
      <text:p text:style-name="P153">ssl.keystore.location=&lt;<text:span text:style-name="T213">path-to&gt;</text:span>//server.keystore.jks</text:p>
      <text:p text:style-name="P152">ssl.keystore.password=secret</text:p>
      <text:p text:style-name="P152">ssl.key.password=secret</text:p>
      <text:p text:style-name="P152">ssl.truststore.location=&lt;<text:span text:style-name="T213">path-to&gt;</text:span>/server.truststore.jks</text:p>
      <text:p text:style-name="P152">ssl.truststore.password=secret</text:p>
      <text:p text:style-name="P152">ssl.endpoint.identification.algorithm=</text:p>
      <text:p text:style-name="P152">ssl.client.auth=<text:span text:style-name="T271">requested</text:span></text:p>
      <text:p text:style-name="P152"/>
      <text:p text:style-name="P49">Démarrer le cluster kafka <text:span text:style-name="T142">et vérifier son bon démarrages</text:span></text:p>
      <text:p text:style-name="P50"/>
      <text:p text:style-name="P50"><text:span text:style-name="T272">V</text:span>érifier l’affichage du certificat avec :</text:p>
      <text:p text:style-name="Code"><text:span text:style-name="Source_20_Text"><text:span text:style-name="T71">openssl s_client -debug -connect localhost:9</text:span></text:span><text:span text:style-name="Source_20_Text"><text:span text:style-name="T74">0</text:span></text:span><text:span text:style-name="Source_20_Text"><text:span text:style-name="T71">9</text:span></text:span><text:span text:style-name="Source_20_Text"><text:span text:style-name="T72">2</text:span></text:span><text:span text:style-name="Source_20_Text"><text:span text:style-name="T71"> -tls1_</text:span></text:span><text:span text:style-name="Source_20_Text"><text:span text:style-name="T73">3</text:span></text:span></text:p>
      <text:p text:style-name="P49"/>
      <text:h text:style-name="P225" text:outline-level="3"><text:bookmark-start text:name="__RefHeading___Toc16958_1047798942"/><text:span text:style-name="T258">9</text:span>.2.<text:span text:style-name="T258">2</text:span> SSL appliqué aux communications <text:span text:style-name="T213">externes</text:span><text:bookmark-end text:name="__RefHeading___Toc16958_1047798942"/></text:h>
      <text:p text:style-name="P49"/>
      <text:p text:style-name="P49">Utiliser également <text:span text:style-name="T227">le protocole</text:span> SSL pour le listener EXTERNAL, il suffit de modifier la propriété <text:span text:style-name="T9">listener.security.protocol.map</text:span></text:p>
      <text:p text:style-name="P49"/>
      <text:p text:style-name="P309">Faire un démarrage du cluster</text:p>
      <text:p text:style-name="P49"/>
      <text:p text:style-name="P51">Mettre au point un fichier <text:span text:style-name="T9">client-ssl.properties</text:span> avec :</text:p>
      <text:p text:style-name="P56"><text:soft-page-break/>security.protocol=SSL</text:p>
      <text:p text:style-name="P56">ssl.truststore.location=&lt;<text:span text:style-name="T214">path-to&gt;</text:span>/<text:span text:style-name="T214">kafka</text:span>.truststore.jks</text:p>
      <text:p text:style-name="P56">ssl.truststore.password=secret</text:p>
      <text:p text:style-name="P152"/>
      <text:p text:style-name="P52">Vérifier la connexion cliente avec <text:span text:style-name="T215">les outils Kafka</text:span></text:p>
      <text:p text:style-name="Code">$KAFKA_HOME/bin/kafka-console-producer.sh --bootstrap-server localhost:9094 --topic ssl --command-config client-ssl.properties </text:p>
      <text:p text:style-name="P52"/>
      <text:p text:style-name="P195">$KAFKA_<text:span text:style-name="T273">HOME</text:span>/bin/kafka-console-consumer.sh --bootstrap-server localhost:9094 --topic ssl --command .config client-ssl.properties --from-beginning</text:p>
      <text:p text:style-name="P52"/>
      <text:p text:style-name="P54">Ou en utilisant un des programmes clients précédents</text:p>
      <text:p text:style-name="P52"/>
      <text:p text:style-name="P311"/>
      <text:h text:style-name="P217" text:outline-level="2"><text:bookmark-start text:name="__RefHeading___Toc9836_3845367211"/><text:span text:style-name="T258">9</text:span>.3 Authentification via SASL/<text:span text:style-name="T274">oAuth2</text:span><text:span text:style-name="T138"> </text:span><text:bookmark-end text:name="__RefHeading___Toc9836_3845367211"/></text:h>
      <text:p text:style-name="P53"/>
      <text:h text:style-name="P227" text:outline-level="3"><text:bookmark-start text:name="__RefHeading___Toc16960_1047798942 Copie 1"/><text:span text:style-name="T258">9</text:span>.3.1 <text:span text:style-name="T274">Démarrage Keycloak</text:span><text:bookmark-end text:name="__RefHeading___Toc16960_1047798942 Copie 1"/></text:h>
      <text:p text:style-name="Text_20_body">Le docker compose fourni démarre un serveur Keycloak ou est défini un realm kafka comprendant :</text:p>
      <text:list text:style-name="L25">
        <text:list-item>
          <text:p text:style-name="P328">Un client kafka-broker (mdp broker-secret) destiné à être utilisé par les brokers et par les clients d’administration (redpanda et schema-registry)</text:p>
        </text:list-item>
        <text:list-item>
          <text:p text:style-name="P328">Un client kafka-producer-client (mdp producer-secret) destiné à un client producteur </text:p>
        </text:list-item>
        <text:list-item>
          <text:p text:style-name="P328">Un client kafka-consumer-client (mdp consumer-secret) destiné à un client producteur </text:p>
        </text:list-item>
      </text:list>
      <text:p text:style-name="Text_20_body"/>
      <text:p text:style-name="Text_20_body">Démarrer via :</text:p>
      <text:p text:style-name="commande">docker compose -f docker-compose-keycloak.yml up -d</text:p>
      <text:p text:style-name="Text_20_body"/>
      <text:p text:style-name="Text_20_body">Accéder à l’interface d’administration <text:a xlink:type="simple" xlink:href="http://localhost:9090/" text:style-name="Internet_20_link" text:visited-style-name="Visited_20_Internet_20_Link">http://localhost:9090</text:a> admin/admin et visualiser le realm</text:p>
      <text:p text:style-name="P313"/>
      <text:h text:style-name="Heading_20_3" text:outline-level="3"><text:bookmark-start text:name="__RefHeading___Toc16960_1047798942"/><text:span text:style-name="T258">9</text:span>.3.<text:span text:style-name="T275">2</text:span> <text:span text:style-name="T275">Démarrage cluster</text:span><text:bookmark-end text:name="__RefHeading___Toc16960_1047798942"/></text:h>
      <text:p text:style-name="P53"/>
      <text:p text:style-name="P314">Ajouter dans la configuration des brokers la configuration oAuth :</text:p>
      <text:p text:style-name="P314"/>
      <text:p text:style-name="P274">############################# SASL Global #############################</text:p>
      <text:p text:style-name="P246">sasl.mechanism.inter.broker.protocol=<text:span text:style-name="T277">OAUTHBEARER</text:span></text:p>
      <text:p text:style-name="P246">sasl.enabled.mechanisms=<text:span text:style-name="T277">OAUTHBEARER</text:span></text:p>
      <text:p text:style-name="P275"/>
      <text:p text:style-name="P273">############################# OAUTHBEARER endpoints (global) #############################</text:p>
      <text:p text:style-name="P246">sasl.oauthbearer.token.endpoint.url=<text:span text:style-name="T277">http://localhost:9090/realms/kafka/protocol/openid-connect/token</text:span></text:p>
      <text:p text:style-name="P246"><text:soft-page-break/>sasl.oauthbearer.jwks.endpoint.url=<text:span text:style-name="T277">http://localhost:9090/realms/kafka/protocol/openid-connect/certs</text:span></text:p>
      <text:p text:style-name="P246">sasl.oauthbearer.expected.issuer=<text:span text:style-name="T277">http://localhost:9090/realms/kafka</text:span></text:p>
      <text:p text:style-name="P246">sasl.oauthbearer.expected.audience=<text:span text:style-name="T277">kafka-broker</text:span></text:p>
      <text:p text:style-name="P275"/>
      <text:p text:style-name="P273">############################# BROKER listener (inter-broker SASL/OAUTHBEARER) #############################</text:p>
      <text:p text:style-name="P246">listener.name.broker.oauthbearer.sasl.jaas.config=<text:span text:style-name="T277">org.apache.kafka.common.security.oauthbearer.OAuthBearerLoginModule required;</text:span></text:p>
      <text:p text:style-name="P246">listener.name.broker.oauthbearer.sasl.login.callback.handler.class=<text:span text:style-name="T277">org.apache.kafka.common.security.oauthbearer.OAuthBearerLoginCallbackHandler</text:span></text:p>
      <text:p text:style-name="P246">listener.name.broker.oauthbearer.sasl.server.callback.handler.class=<text:span text:style-name="T277">org.apache.kafka.common.security.oauthbearer.OAuthBearerValidatorCallbackHandler</text:span></text:p>
      <text:p text:style-name="P275"/>
      <text:p text:style-name="P273"># Credentials inter-broker (Kafka 4.x — remplace les options JAAS dépréciées)</text:p>
      <text:p text:style-name="P246">listener.name.broker.sasl.oauthbearer.client.credentials.client.id=<text:span text:style-name="T277">kafka-broker</text:span></text:p>
      <text:p text:style-name="P246">listener.name.broker.sasl.oauthbearer.client.credentials.client.secret=<text:span text:style-name="T277">broker-secret</text:span></text:p>
      <text:p text:style-name="P246">listener.name.broker.sasl.oauthbearer.scope=<text:span text:style-name="T277">openid</text:span></text:p>
      <text:p text:style-name="P275"/>
      <text:p text:style-name="P273">############################# EXTERNAL listener (clients SASL_SSL/OAUTHBEARER) #############################</text:p>
      <text:p text:style-name="P246">listener.name.external.oauthbearer.sasl.jaas.config=<text:span text:style-name="T277">org.apache.kafka.common.security.oauthbearer.OAuthBearerLoginModule required;</text:span></text:p>
      <text:p text:style-name="P246">listener.name.external.oauthbearer.sasl.server.callback.handler.class=<text:span text:style-name="T277">org.apache.kafka.common.security.oauthbearer.OAuthBearerValidatorCallbackHandler</text:span></text:p>
      <text:p text:style-name="P305"/>
      <text:p text:style-name="P55">Modifier le script de démarrage afin qu’il <text:span text:style-name="T276">autorise la connexion au serveur Keycloak </text:span>:</text:p>
      <text:p text:style-name="P171"><text:span text:style-name="T233">export</text:span> KAFKA_OPTS=<text:span text:style-name="T277">"-Dorg.apache.kafka.sasl.oauthbearer.allowed.urls=http://localhost:9090/realms/kafka/protocol/openid-connect/certs,http://localhost:9090/realms/kafka/protocol/openid-connect/token"</text:span> </text:p>
      <text:p text:style-name="P247"/>
      <text:p text:style-name="P55">Redémarrer le cluster et vérifier son bon démarrage</text:p>
      <text:p text:style-name="P186"/>
      <text:h text:style-name="P228" text:outline-level="3"><text:bookmark-start text:name="__RefHeading___Toc16960_1047798942 Copie 2"/><text:span text:style-name="T258">9</text:span>.3.<text:span text:style-name="T275">2</text:span> <text:span text:style-name="T275">Démarrage </text:span><text:span text:style-name="T278">outils connexes</text:span><text:bookmark-end text:name="__RefHeading___Toc16960_1047798942 Copie 2"/></text:h>
      <text:p text:style-name="P330">Visualiser le fichier <text:span text:style-name="T279">docker-compose-kafka-tools.yml et regarder la configuration.</text:span></text:p>
      <text:p text:style-name="P331">Démarre la stack via :</text:p>
      <text:p text:style-name="P331">docker compose -f </text:p>
      <text:h text:style-name="Heading_20_3" text:outline-level="3"><text:bookmark-start text:name="__RefHeading___Toc16962_1047798942"/><text:span text:style-name="T258">9</text:span>.3.2 Authentification client<text:bookmark-end text:name="__RefHeading___Toc16962_1047798942"/></text:h>
      <text:p text:style-name="Standard"/>
      <text:p text:style-name="P146">Configurer le listener EXTERNAL pour qu’il utilise également SASL_SSL comme protocole</text:p>
      <text:p text:style-name="P146"/>
      <text:p text:style-name="P147">Mettre à jour le fichier <text:span text:style-name="T9">client-ssl.properties</text:span> comme suit :</text:p>
      <text:p text:style-name="P103">security.protocol=SASL_SSL</text:p>
      <text:p text:style-name="P103">sasl.<text:bookmark-start text:name="__DdeLink__16933_1047798942"/>mechanism<text:bookmark-end text:name="__DdeLink__16933_1047798942"/>=PLAIN</text:p>
      <text:p text:style-name="P103">sasl.jaas.config=<text:bookmark-start text:name="__DdeLink__16935_1047798942"/>org.apache.kafka.common.security.plain.PlainLoginModule required \</text:p>
      <text:p text:style-name="P103"><text:s text:c="4"/>username="alice" \</text:p>
      <text:p text:style-name="P103"><text:s text:c="4"/>password="alice-secret"<text:bookmark-end text:name="__DdeLink__16935_1047798942"/>;</text:p>
      <text:p text:style-name="P103"/>
      <text:p text:style-name="Standard"><text:soft-page-break/>Tester avec :</text:p>
      <text:p text:style-name="Code"><text:span text:style-name="T216">$KAFKA_DIST</text:span>/<text:span text:style-name="T217">bin/</text:span>kafka-console-producer.sh --<text:span text:style-name="T217">bootstrap-server</text:span> localhost:<text:span text:style-name="T217">9094</text:span> --topic ssl --producer.config client-ssl.properties </text:p>
      <text:p text:style-name="P58"/>
      <text:h text:style-name="Heading_20_2" text:outline-level="2"><text:bookmark-start text:name="__RefHeading___Toc9891_3845367211"/><text:span text:style-name="T258">9</text:span>.4 ACL<text:bookmark-end text:name="__RefHeading___Toc9891_3845367211"/></text:h>
      <text:p text:style-name="Text_20_body"/>
      <text:h text:style-name="Heading_20_3" text:outline-level="3"><text:bookmark-start text:name="__RefHeading___Toc16964_1047798942"/><text:span text:style-name="T258">9</text:span>.4.1 Activation des ACLs<text:bookmark-end text:name="__RefHeading___Toc16964_1047798942"/></text:h>
      <text:p text:style-name="P159"><text:span text:style-name="T183">Activer les ACL avec la classe </text:span><text:span text:style-name="T9">org.apache.kafka.metadata.authorizer.StandardAuthorizer</text:span></text:p>
      <text:p text:style-name="P171">authorizer.class.name=org.apache.kafka.metadata.authorizer.StandardAuthorizer</text:p>
      <text:p text:style-name="P187"/>
      <text:p text:style-name="P158">Définir les super users et la règle </text:p>
      <text:p text:style-name="Code">allow.everyone.if.no.acl.found=true</text:p>
      <text:p text:style-name="Code">super.users=User:admin</text:p>
      <text:p text:style-name="P110"/>
      <text:p text:style-name="Standard">Modifier le protocole du listener CONTROLER à SASL_<text:span text:style-name="T226">SSL</text:span></text:p>
      <text:p text:style-name="P111"/>
      <text:p text:style-name="P174">Indiquer la propriété<text:span text:style-name="T46"> </text:span></text:p>
      <text:p text:style-name="Code">sasl.mechanism.controller.protocol=PLAIN</text:p>
      <text:p text:style-name="P111"/>
      <text:p text:style-name="Standard">Ajouter une section dans le fichier JAAS :</text:p>
      <text:p text:style-name="P111"/>
      <text:p text:style-name="P171">controller.KafkaServer {</text:p>
      <text:p text:style-name="P171"><text:s text:c="4"/>org.apache.kafka.common.security.plain.PlainLoginModule required</text:p>
      <text:p text:style-name="P171"><text:s text:c="4"/>username="admin"</text:p>
      <text:p text:style-name="P171"><text:s text:c="4"/>password="admin-secret"</text:p>
      <text:p text:style-name="P171"><text:s text:c="4"/>user_admin="admin-secret";</text:p>
      <text:p text:style-name="P171">};</text:p>
      <text:p text:style-name="P111"/>
      <text:p text:style-name="P156">Démarrer le cluster</text:p>
      <text:p text:style-name="P156"/>
      <text:h text:style-name="Heading_20_3" text:outline-level="3"><text:bookmark-start text:name="__RefHeading___Toc16966_1047798942"/><text:span text:style-name="T258">9</text:span><text:span text:style-name="T218">.4.2 </text:span>Définition ACLs<text:bookmark-end text:name="__RefHeading___Toc16966_1047798942"/></text:h>
      <text:p text:style-name="P156">Définir une ACL via Redpanda Console <text:span text:style-name="T219">ou via </text:span><text:span text:style-name="T6">$KAFKA_DIST/bin/kafka-acls.sh</text:span><text:span text:style-name="T219"> </text:span>interdisant à l'utilisateur <text:span text:style-name="T9">alice</text:span> d'écrire sur les topics.</text:p>
      <text:p text:style-name="P156"/>
      <text:p text:style-name="P156">Tester le refus d'envoi de message <text:span text:style-name="T218">avec :</text:span></text:p>
      <text:p text:style-name="P157"><text:span text:style-name="T216">$KAFKA_DIST</text:span>/<text:span text:style-name="T217">bin/</text:span>kafka-console-producer.sh --<text:span text:style-name="T217">bootstrap-server</text:span> localhost:<text:span text:style-name="T217">9094</text:span> --topic ssl --producer.config client-ssl.properties</text:p>
      <text:h text:style-name="P229" text:outline-level="4"><text:soft-page-break/><text:span text:style-name="Source_20_Text"><text:span text:style-name="T75"/></text:span></text:h>
      <text:h text:style-name="P218" text:outline-level="2"><text:bookmark-start text:name="__RefHeading___Toc16975_1047798942"/><text:span text:style-name="T258">9</text:span>.<text:span text:style-name="T232">5</text:span> Quota<text:bookmark-end text:name="__RefHeading___Toc16975_1047798942"/></text:h>
      <text:p text:style-name="P173">Définition d’un quota pour l’utilisateur <text:span text:style-name="T9">alice</text:span></text:p>
      <text:p text:style-name="P190">$KAFKA_DIST/bin/kafka-configs.sh --bootstrap-server localhost:9094 --alter --add-config 'producer_byte_rate=1024,consumer_byte_rate=1024' --entity-type users --entity-name alice --command-config client-admin-ssl.properties</text:p>
      <text:p text:style-name="P191">Relancer SpringProducer</text:p>
      <text:p text:style-name="P191"/>
      <text:p text:style-name="P172">$KAFKA_DIST/bin/kafka-configs.sh --bootstrap-server localhost:9094 --alter --delete-config producer_byte_rate --entity-type users --entity-name alice --command-config client-admin-ssl.properties</text:p>
      <text:p text:style-name="P172"/>
      <text:p text:style-name="P172">$KAFKA_DIST/bin/kafka-configs.sh --bootstrap-server localhost:9094 --alter --delete-config consumer_byte_rate --entity-type users --entity-name alice --command-config client-admin-ssl.properties</text:p>
      <text:p text:style-name="P172"/>
      <text:h text:style-name="P218" text:outline-level="2"><text:span text:style-name="T118"/></text:h>
      <text:h text:style-name="P209" text:outline-level="1"><text:bookmark-start text:name="__RefHeading___Toc9828_3845367211"/>Atelier <text:span text:style-name="T259">10</text:span> : <text:span text:style-name="T220">Exploitation</text:span><text:bookmark-end text:name="__RefHeading___Toc9828_3845367211"/></text:h>
      <text:p text:style-name="P85"><text:span text:style-name="T61">Exécuter les producteurs et les consommateurs</text:span><text:span text:style-name="T59"> </text:span><text:span text:style-name="T60">pendant les opérations </text:span><text:span text:style-name="T62">d’administration</text:span></text:p>
      <text:h text:style-name="P221" text:outline-level="2"><text:bookmark-start text:name="__RefHeading___Toc5300_3700672249"/><text:span text:style-name="T260">10</text:span><text:span text:style-name="T184">.</text:span><text:span text:style-name="T260">1</text:span><text:span text:style-name="T184"> </text:span>Rétention <text:span text:style-name="T260">et segments</text:span><text:bookmark-end text:name="__RefHeading___Toc5300_3700672249"/></text:h>
      <text:p text:style-name="P299">Visualiser les segments et apprécier la taille</text:p>
      <text:p text:style-name="P301">Pour le topic <text:span text:style-name="T9">position</text:span> modifier le <text:span text:style-name="T9">segment.bytes</text:span> à <text:span text:style-name="T186">512ko</text:span></text:p>
      <text:p text:style-name="P322"><text:span text:style-name="T61">Diminuer le </text:span><text:span text:style-name="T67">retention.bytes</text:span><text:span text:style-name="T61"> </text:span><text:span text:style-name="T63">afin de voir des segments disparaître</text:span></text:p>
      <text:h text:style-name="Heading_20_2" text:outline-level="2"><text:bookmark-start text:name="__RefHeading___Toc20373_2913458575"/>10.<text:span text:style-name="T260">2</text:span> Extension du cluster et réassignement des partitions<text:bookmark-end text:name="__RefHeading___Toc20373_2913458575"/></text:h>
      <text:p text:style-name="P38"/>
      <text:p text:style-name="P38">Modifier le nombre de partitions de position à 8</text:p>
      <text:p text:style-name="P39">Vérifier avec </text:p>
      <text:p text:style-name="P66">./kafka-topics.sh <text:span text:style-name="T52">--bootstrap-server localhost:909</text:span><text:span text:style-name="T53">2</text:span> --describe --topic position</text:p>
      <text:p text:style-name="P37"/>
      <text:p text:style-name="P37">Ajouter un nouveau broker dans le cluster. <text:span text:style-name="T185">(Ne pas l’inclure dans les contrôleurs possible)</text:span></text:p>
      <text:p text:style-name="P48"/>
      <text:p text:style-name="P41"><text:span text:style-name="T106">Option Docker</text:span> : un docker-compose est fourni</text:p>
      <text:p text:style-name="P39"/>
      <text:p text:style-name="P39">Réexécuter la commande</text:p>
      <text:p text:style-name="P66">./kafka-topics.sh <text:span text:style-name="T52">--bootstrap-server localhost:909</text:span> --describe --topic position</text:p>
      <text:p text:style-name="P37"/>
      <text:p text:style-name="P33"><text:span text:style-name="T97">Effectuer une réaffectation des partitions </text:span><text:span text:style-name="T98">en 3 étapes</text:span></text:p>
      <text:p text:style-name="P37"/>
      <text:h text:style-name="Heading_20_2" text:outline-level="2"><text:bookmark-start text:name="__RefHeading___Toc9832_3845367211"/><text:span text:style-name="T120">10</text:span><text:span text:style-name="T118">.</text:span><text:span text:style-name="T119">3</text:span><text:span text:style-name="T116"> R</text:span><text:span text:style-name="T117">olling restart</text:span><text:bookmark-end text:name="__RefHeading___Toc9832_3845367211"/></text:h>
      <text:p text:style-name="P40">Sous charge, effectuer un redémarrage d’un broker.</text:p>
      <text:p text:style-name="P40">Vérifier l’état de<text:span text:style-name="T187">s</text:span> ISR</text:p>
      <text:p text:style-name="P40"/>
      <text:h text:style-name="Heading_20_2" text:outline-level="2"><text:bookmark-start text:name="__RefHeading___Toc20375_2913458575"/>10.4 Bascule et reprise depuis le cluster B<text:bookmark-end text:name="__RefHeading___Toc20375_2913458575"/></text:h>
      <text:p text:style-name="P318">Objectifs</text:p>
      <text:list xml:id="list104240293218600" text:continue-list="list2471049742" text:style-name="WWNum2">
        <text:list-item text:start-value="1">
          <text:p text:style-name="P232">Simuler une indisponibilité du cluster A</text:p>
        </text:list-item>
        <text:list-item>
          <text:p text:style-name="P232">Faire reprendre un consumer côté B sans rejouer toute l'historique</text:p>
        </text:list-item>
        <text:list-item>
          <text:p text:style-name="P232">Mesurer le RPO observé et constater les limites</text:p>
        </text:list-item>
      </text:list>
      <text:h text:style-name="P226" text:outline-level="3"><text:bookmark-start text:name="__RefHeading___Toc20377_2913458575"/><text:span text:style-name="T262">10.4.</text:span>1. Préparer un consumer group côté A <text:bookmark-end text:name="__RefHeading___Toc20377_2913458575"/></text:h>
      <text:p text:style-name="P260">Côté A, lancer un consumer dans un groupe nommé <text:span text:style-name="T249">position-app</text:span> qui consomme une partie des messages puis s'arrête :</text:p>
      <text:p text:style-name="P261"><text:span text:style-name="T252">docker exec -it kafka-0 /opt/kafka/bin/kafka-console-consumer.sh \</text:span></text:p>
      <text:p text:style-name="P261"><text:soft-page-break/><text:span text:style-name="T252"><text:s text:c="2"/>--bootstrap-server kafka-0:9092 --topic position \</text:span></text:p>
      <text:p text:style-name="P262"><text:span text:style-name="T252"><text:s text:c="2"/>--group position-app --from-beginning --max-messages 10</text:span></text:p>
      <text:p text:style-name="P260">Vérifier l'offset committé :</text:p>
      <text:p text:style-name="P261"><text:span text:style-name="T252">docker exec -it kafka-0 /opt/kafka/bin/kafka-consumer-groups.sh \</text:span></text:p>
      <text:p text:style-name="P262"><text:span text:style-name="T252"><text:s text:c="2"/>--bootstrap-server kafka-0:9092 --describe --group position-app</text:span></text:p>
      <text:p text:style-name="P260">Attendre ~10 secondes que le <text:span text:style-name="T249">MirrorCheckpointConnector</text:span> propage les offsets vers B (intervalle configuré à 5s en 7.4).</text:p>
      <text:h text:style-name="P226" text:outline-level="3"><text:bookmark-start text:name="__RefHeading___Toc20379_2913458575"/><text:span text:style-name="T262">10.4.</text:span>2. Inspecter les checkpoints côté B <text:bookmark-end text:name="__RefHeading___Toc20379_2913458575"/></text:h>
      <text:p text:style-name="P260">Le connecteur Checkpoint écrit dans un topic dédié côté B. Le visualiser :</text:p>
      <text:p text:style-name="P261"><text:span text:style-name="T252">docker exec -it kafka-b /opt/kafka/bin/kafka-console-consumer.sh \</text:span></text:p>
      <text:p text:style-name="P261"><text:span text:style-name="T252"><text:s text:c="2"/>--bootstrap-server kafka-b:9092 \</text:span></text:p>
      <text:p text:style-name="P261"><text:span text:style-name="T252"><text:s text:c="2"/>--topic A.checkpoints.internal --from-beginning \</text:span></text:p>
      <text:p text:style-name="P262"><text:span text:style-name="T252"><text:s text:c="2"/>--formatter org.apache.kafka.connect.mirror.formatters.CheckpointFormatter</text:span></text:p>
      <text:p text:style-name="P260">On y voit pour chaque partition : l'offset upstream (côté A) et l'offset downstream traduit (côté B). C'est la base de la reprise.</text:p>
      <text:h text:style-name="P226" text:outline-level="3"><text:bookmark-start text:name="__RefHeading___Toc20381_2913458575"/><text:span text:style-name="T262">10.4.</text:span>3. Simuler la panne de A <text:bookmark-end text:name="__RefHeading___Toc20381_2913458575"/></text:h>
      <text:p text:style-name="P262"><text:span text:style-name="T252">docker stop kafka-0 kafka-1 kafka-2</text:span></text:p>
      <text:p text:style-name="P260">Le cluster A est injoignable. MirrorMaker s'arrête de répliquer (visible dans les logs Connect), mais B contient déjà les données.</text:p>
      <text:h text:style-name="P226" text:outline-level="3"><text:bookmark-start text:name="__RefHeading___Toc20383_2913458575"/><text:span text:style-name="T262">10.4.</text:span>4. Faire reprendre le consumer côté B<text:bookmark-end text:name="__RefHeading___Toc20383_2913458575"/></text:h>
      <text:p text:style-name="P260">MirrorMaker 2 ne pousse pas automatiquement les offsets dans <text:span text:style-name="T249">__consumer_offsets</text:span> côté B — il faut les <text:span text:style-name="T1">appliquer</text:span> au groupe avant de redémarrer le consumer. L'outil <text:span text:style-name="T249">RemoteClusterUtils</text:span> est exposé via la classe utilitaire <text:span text:style-name="T249">kafka-mirror-checkpoint.sh</text:span> (Kafka 3.5+). Sur des versions antérieures, on passe par un petit script Java/Python ou par <text:span text:style-name="T249">kafka-consumer-groups.sh --reset-offsets --to-offset</text:span> en lisant manuellement le topic checkpoints.</text:p>
      <text:p text:style-name="P260">Variante simple pour l'atelier — application manuelle :</text:p>
      <text:p text:style-name="P261"><text:span text:style-name="T252"># Lire le dernier checkpoint pour position-app</text:span></text:p>
      <text:p text:style-name="P261"><text:span text:style-name="T252"># (offset downstream côté B pour chaque partition)</text:span></text:p>
      <text:p text:style-name="P261"><text:span text:style-name="T252"><text:s/></text:span></text:p>
      <text:p text:style-name="P261"><text:span text:style-name="T252"># Appliquer cet offset au groupe côté B</text:span></text:p>
      <text:p text:style-name="P261"><text:span text:style-name="T252">docker exec -it kafka-b /opt/kafka/bin/kafka-consumer-groups.sh \</text:span></text:p>
      <text:p text:style-name="P261"><text:span text:style-name="T252"><text:s text:c="2"/>--bootstrap-server kafka-b:9092 \</text:span></text:p>
      <text:p text:style-name="P261"><text:span text:style-name="T252"><text:s text:c="2"/>--group position-app --topic A.position \</text:span></text:p>
      <text:p text:style-name="P262"><text:span text:style-name="T252"><text:s text:c="2"/>--reset-offsets --to-offset &lt;OFFSET_DOWNSTREAM&gt; --execute</text:span></text:p>
      <text:p text:style-name="P260">Puis relancer le consumer côté B :</text:p>
      <text:p text:style-name="P261"><text:span text:style-name="T252">docker exec -it kafka-b /opt/kafka/bin/kafka-console-consumer.sh \</text:span></text:p>
      <text:p text:style-name="P261"><text:span text:style-name="T252"><text:s text:c="2"/>--bootstrap-server kafka-b:9092 --topic A.position \</text:span></text:p>
      <text:p text:style-name="P262"><text:span text:style-name="T252"><text:s text:c="2"/>--group position-app</text:span></text:p>
      <text:p text:style-name="P260"><text:span text:style-name="T51">Constat clé</text:span> : il reprend à la suite de ce qu'il avait déjà traité côté A, <text:span text:style-name="T51">pas depuis le début</text:span>.</text:p>
      <text:h text:style-name="P226" text:outline-level="3"><text:bookmark-start text:name="__RefHeading___Toc20385_2913458575"/><text:span text:style-name="T262">10.4.</text:span>5. Mesurer le RPO<text:bookmark-end text:name="__RefHeading___Toc20385_2913458575"/></text:h>
      <text:p text:style-name="P260">Comparer :</text:p>
      <text:list text:continue-numbering="true" text:style-name="WWNum2">
        <text:list-item>
          <text:p text:style-name="P232">Le dernier offset produit côté A avant l'arrêt (visible dans les logs ou via <text:span text:style-name="T249">kafka-run-class kafka.tools.GetOffsetShell</text:span> avant <text:span text:style-name="T249">docker stop</text:span>)</text:p>
        </text:list-item>
        <text:list-item>
          <text:p text:style-name="P232">Le dernier offset présent côté B sur <text:span text:style-name="T249">A.position</text:span></text:p>
        </text:list-item>
      </text:list>
      <text:p text:style-name="P260">L'écart = <text:span text:style-name="T51">RPO observé</text:span> (messages perdus si A est définitivement perdu).</text:p>
      <text:p text:style-name="P260"><text:soft-page-break/><text:span text:style-name="T1">Discussion à animer :</text:span></text:p>
      <text:list xml:id="list104239596201457" text:continue-numbering="true" text:style-name="WWNum2">
        <text:list-item>
          <text:p text:style-name="P232">Pourquoi cet écart existe-t-il ? <text:s/>→ <text:s/>réplication asynchrone</text:p>
        </text:list-item>
        <text:list-item>
          <text:p text:style-name="P232">Pourquoi l'offset traduit n'est-il pas exact au message près ? <text:s/>→ <text:s/>la traduction se fait par échantillonnage périodique via <text:span text:style-name="T249">mm2-offset-syncs</text:span></text:p>
        </text:list-item>
        <text:list-item>
          <text:p text:style-name="P232">Comment réduire le RPO ? <text:s/>→ <text:s/>diminuer <text:span text:style-name="T249">emit.checkpoints.interval.seconds</text:span>, augmenter <text:span text:style-name="T249">tasks.max</text:span>, mais aucun moyen d'atteindre RPO=0 avec MM2</text:p>
        </text:list-item>
      </text:list>
      <text:h text:style-name="P226" text:outline-level="3"><text:bookmark-start text:name="__RefHeading___Toc20387_2913458575"/><text:span text:style-name="T262">10.4.</text:span>6. <text:span text:style-name="T263">F</text:span>ailback <text:bookmark-end text:name="__RefHeading___Toc20387_2913458575"/></text:h>
      <text:p text:style-name="P260">Redémarrer A (<text:span text:style-name="T249">docker start kafka-0 kafka-1 kafka-2</text:span>) et discuter :</text:p>
      <text:list text:continue-numbering="true" text:style-name="WWNum2">
        <text:list-item>
          <text:p text:style-name="P232">Faut-il rebasculer ? Quand ?</text:p>
        </text:list-item>
        <text:list-item>
          <text:p text:style-name="P232">Comment éviter la double-écriture pendant la transition ?</text:p>
        </text:list-item>
        <text:list-item>
          <text:p text:style-name="P232">Intérêt d'une réplication bidirectionnelle A↔B (et son piège : éviter les boucles avec <text:span text:style-name="T249">IdentityReplicationPolicy</text:span> ou les tags d'origine).</text:p>
        </text:list-item>
      </text:list>
      <text:h text:style-name="P222" text:outline-level="2" text:is-list-header="true"/>
      <text:h text:style-name="P230" text:outline-level="4"/>
      <text:h text:style-name="P210" text:outline-level="1"><text:bookmark-start text:name="__RefHeading___Toc9838_3845367211"/><text:span text:style-name="T129">Atelier </text:span><text:span text:style-name="T135">11.</text:span><text:span text:style-name="T129"> </text:span><text:span text:style-name="T136">Monitoring </text:span><text:span text:style-name="T137">avec Prometheus/Grafana</text:span><text:bookmark-end text:name="__RefHeading___Toc9838_3845367211"/></text:h>
      <text:p text:style-name="P81"/>
      <text:p text:style-name="P175"><text:span text:style-name="T64">Dans</text:span><text:span text:style-name="T115"> </text:span><text:span text:style-name="T64">un premier temps, démarré une </text:span><text:span text:style-name="T66">J</text:span><text:span text:style-name="T65">C</text:span><text:span text:style-name="T66">onsole</text:span><text:span text:style-name="T64"> et visualiser les Mbeans des brokers, consommateurs et producteurs</text:span></text:p>
      <text:p text:style-name="Code">$JAVA_HOME/bin/jconsole &amp;</text:p>
      <text:p text:style-name="P77"/>
      <text:p text:style-name="P46"/>
      <text:h text:style-name="Heading_20_2" text:outline-level="2"><text:bookmark-start text:name="__RefHeading___Toc2654_1126617678"/><text:span text:style-name="T261">11</text:span>.1 Exporter les informations JMX au format Prometheus<text:bookmark-end text:name="__RefHeading___Toc2654_1126617678"/></text:h>
      <text:p text:style-name="P59"><text:span text:style-name="T111">Dans un répertoire de travail </text:span><text:span text:style-name="T112">monitoring</text:span></text:p>
      <text:p text:style-name="P86"/>
      <text:p text:style-name="P86"><text:span text:style-name="T108">wget 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08">https://repo1.maven.org/maven2/io/prometheus/jmx/jmx_prometheus_javaagent/0.</text:span><text:span text:style-name="T110">2</text:span></text:a><text:span text:style-name="T110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09">.0</text:span></text:a><text:a xlink:type="simple" xlink:href="https://repo1.maven.org/maven2/io/prometheus/jmx/jmx_prometheus_javaagent/0.20.0/jmx_prometheus_javaagent-0.20.jar" text:style-name="Internet_20_link" text:visited-style-name="Visited_20_Internet_20_Link"><text:span text:style-name="T108">/jmx_prometheus_javaagent-0.</text:span><text:span text:style-name="T110">2</text:span></text:a><text:span text:style-name="T110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09">.0</text:span><text:span text:style-name="T108">.jar</text:span></text:a></text:p>
      <text:p text:style-name="P69">wget </text:p>
      <text:p text:style-name="P69">https://raw.githubusercontent.com/confluentinc/jmx-monitoring-stacks/main/shared-assets/jmx-exporter/kafka_broker.yml</text:p>
      <text:p text:style-name="P86"/>
      <text:p text:style-name="P86">Modifier le script de démarrage du cluster afin de positionner l’agent Prom<text:span text:style-name="T140">e</text:span>theus :</text:p>
      <text:p text:style-name="P69">KAFKA_OPTS="$KAFKA_OPTS -javaagent:$PWD/jmx_prometheus_javaagent-0.2.0.jar=<text:span text:style-name="T51">7071</text:span>:$PWD/kafka_<text:span text:style-name="T188">broker</text:span>.yml" \</text:p>
      <text:p text:style-name="P69"><text:s text:c="2"/></text:p>
      <text:p text:style-name="P87">Attention, Modifier le port pour chaque broker </text:p>
      <text:p text:style-name="P87"/>
      <text:p text:style-name="P88"><text:span text:style-name="T139">Redémarrer le cluster et vérifier </text:span><text:a xlink:type="simple" xlink:href="http://localhost:7071/metrics" text:style-name="Internet_20_link" text:visited-style-name="Visited_20_Internet_20_Link">http://localhost:7071/metrics</text:a><text:span text:style-name="T69"> </text:span><text:span text:style-name="T70">(Peut prendre du temps avant de s’afficher)</text:span></text:p>
      <text:p text:style-name="P126"/>
      <text:h text:style-name="Heading_20_2" text:outline-level="2"><text:bookmark-start text:name="__RefHeading___Toc2656_1126617678"/>9.3 Mise en place Prometheus Grafana<text:bookmark-end text:name="__RefHeading___Toc2656_1126617678"/></text:h>
      <text:p text:style-name="P47">Dans le répertoire grafana <text:span text:style-name="T222">des données du TP</text:span>, lancer la stack via :</text:p>
      <text:p text:style-name="Code">docker compose up -d</text:p>
      <text:p text:style-name="P35"/>
      <text:p text:style-name="P36">Se connecter sur <text:span text:style-name="T9">http ://localhost:9090</text:span></text:p>
      <text:p text:style-name="P36">Vérifier les cibles <text:span text:style-name="T189">de </text:span>prometheus </text:p>
      <text:p text:style-name="P36"/>
      <text:p text:style-name="P34">Accéder à <text:a xlink:type="simple" xlink:href="http://localhost:3000/" text:style-name="Internet_20_link" text:visited-style-name="Visited_20_Internet_20_Link">http://localhost:3000</text:a> avec <text:span text:style-name="T9">admin/admin</text:span></text:p>
      <text:p text:style-name="P34"/>
      <text:p text:style-name="P34"><text:span text:style-name="T221">Vérifier la datasource </text:span>Prometheus </text:p>
      <text:p text:style-name="P60"><text:span text:style-name="T113">Importer le tableau de bord </text:span><text:span text:style-name="T114">fourni (Provient de </text:span><text:a xlink:type="simple" xlink:href="https://github.com/confluentinc/jmx-monitoring-stacks/tree/6.0.1-post/jmxexporter-prometheus-grafana/assets/prometheus/grafana/provisioning/dashboards" text:style-name="Internet_20_link" text:visited-style-name="Visited_20_Internet_20_Link"><text:span text:style-name="T114">https://github.com/confluentinc/jmx-monitoring-</text:span></text:a><text:soft-page-break/><text:a xlink:type="simple" xlink:href="https://github.com/confluentinc/jmx-monitoring-stacks/tree/6.0.1-post/jmxexporter-prometheus-grafana/assets/prometheus/grafana/provisioning/dashboards" text:style-name="Internet_20_link" text:visited-style-name="Visited_20_Internet_20_Link"><text:span text:style-name="T114">stacks/tree/6.0.1-post/jmxexporter-prometheus-grafana/assets/prometheus/grafana/provisioning/dashboards</text:span></text:a><text:span text:style-name="T114">) </text:span></text:p>
      <text:p text:style-name="Text_20_body"><text:line-break/></text:p>
      <text:p text:style-name="P34">Les métriques des brokers <text:span text:style-name="T220">doivent</text:span> s’afficher</text:p>
      <text:p text:style-name="P78"/>
      <text:h text:style-name="P210" text:outline-level="1"><text:bookmark-start text:name="__RefHeading___Toc2658_1126617678"/><text:span text:style-name="T225">A. </text:span>Annexes <text:bookmark-end text:name="__RefHeading___Toc2658_1126617678"/></text:h>
      <text:p text:style-name="P79"/>
      <text:h text:style-name="P219" text:outline-level="2"><text:bookmark-start text:name="__RefHeading___Toc9768_3845367211"/><text:span text:style-name="T225">A</text:span><text:span text:style-name="T161">.</text:span>1. <text:span text:style-name="T89">Installation Ensemble Zookeeper </text:span><text:s/><text:bookmark-end text:name="__RefHeading___Toc9768_3845367211"/></text:h>
      <text:p text:style-name="P119"><text:bookmark-start text:name="__RefHeading___Toc9770_3845367211"/>Récupérer <text:span text:style-name="T99">une distribution de Zookeeper</text:span>.<text:bookmark-end text:name="__RefHeading___Toc9770_3845367211"/></text:p>
      <text:p text:style-name="P31"><text:tab/></text:p>
      <text:p text:style-name="P131"><text:span text:style-name="T79">C</text:span><text:span text:style-name="T78">réer un répertoire (</text:span><text:span text:style-name="T82">dans la suite nommé </text:span><text:span text:style-name="T83">ZK_ENSEMBLE</text:span><text:span text:style-name="T78">) pour stocker les fichiers de configuration des instance</text:span></text:p>
      <text:p text:style-name="P127">Y créer 3 sous-répertoire 1,2 et 3 </text:p>
      <text:p text:style-name="P132"><text:span text:style-name="T78">Dans chacun des répertoire créer un sous-répertoire </text:span><text:span text:style-name="T85">data</text:span><text:span text:style-name="T78"> y créer un fichier nommé </text:span><text:span text:style-name="T85">myid</text:span><text:span text:style-name="T78"> contenant l’identifiant de l’instance (1,2 et 3)</text:span></text:p>
      <text:p text:style-name="P131"><text:span text:style-name="T80">Copier dans chacun des répertoires le répertoire </text:span><text:span text:style-name="T86">conf</text:span><text:span text:style-name="T80"> de la distribution</text:span></text:p>
      <text:p text:style-name="P132"><text:span text:style-name="T78">Dans chacun des répertoire éditer le fichier </text:span><text:span text:style-name="T87">zoo.cfg </text:span><text:span text:style-name="T84">, </text:span><text:span text:style-name="T88">en particulier</text:span></text:p>
      <text:list text:style-name="L18">
        <text:list-item>
          <text:p text:style-name="P281"><text:span text:style-name="T79">d</text:span><text:span text:style-name="T78">ataDir</text:span></text:p>
        </text:list-item>
        <text:list-item>
          <text:p text:style-name="P315">Les ports TCP utilisés</text:p>
        </text:list-item>
      </text:list>
      <text:p text:style-name="P128"/>
      <text:p text:style-name="P119"><text:span text:style-name="T79">S</text:span><text:span text:style-name="T80">e mettre au point un </text:span><text:span text:style-name="T81">script</text:span><text:span text:style-name="T80"> sh permettant de démarrer les 3 instances</text:span></text:p>
      <text:p text:style-name="P76"><text:span text:style-name="T100">$ZK_HOME</text:span>/bin/zkServer.sh --<text:span text:style-name="T144">c</text:span>onfig $ZK_ENSEMBLE<text:span text:style-name="T100">CONF/1/conf</text:span> start &amp;&amp; </text:p>
      <text:p text:style-name="P76"><text:span text:style-name="T100">$ZK_HOME</text:span>/bin/zkServer.sh --config $ZK_ENSEMBLE<text:span text:style-name="T100">CONF/2/conf</text:span> start</text:p>
      <text:p text:style-name="P76">&amp;&amp; </text:p>
      <text:p text:style-name="P76"><text:span text:style-name="T100">$ZK_HOME</text:span>/bin/zkServer.sh --config $ZK_ENSEMBLE<text:span text:style-name="T100">CONF/3/conf</text:span> start</text:p>
      <text:p text:style-name="P76"/>
      <text:p text:style-name="P62">Données partagées :</text:p>
      <text:p text:style-name="P119"><text:bookmark-start text:name="__RefHeading___Toc9772_3845367211"/>Connecter à l’instance 1 via :<text:bookmark-end text:name="__RefHeading___Toc9772_3845367211"/></text:p>
      <text:p text:style-name="P120">./zookeeper-1/bin/zkCli.sh -server 127.0.0.1:2181</text:p>
      <text:p text:style-name="P119"><text:bookmark-start text:name="__RefHeading___Toc9774_3845367211"/>Créer une donnée et <text:span text:style-name="T101">enregistrer</text:span> un <text:span text:style-name="T1">watcher</text:span> :<text:bookmark-end text:name="__RefHeading___Toc9774_3845367211"/></text:p>
      <text:p text:style-name="P76">create /<text:span text:style-name="T90">dp</text:span> hello</text:p>
      <text:p text:style-name="P76">get -<text:span text:style-name="T101">w </text:span>/<text:span text:style-name="T90">dp</text:span></text:p>
      <text:p text:style-name="P123"/>
      <text:p text:style-name="P124">Dans un autre terminal, se connecter à l’instance 2 et <text:span text:style-name="T102">mettre</text:span> à jour la donnée partagée</text:p>
      <text:p text:style-name="P122">./zookeeper-2/bin/zkCli.sh -server 127.0.0.1:2182</text:p>
      <text:p text:style-name="P121">set /<text:span text:style-name="T101">dp</text:span> world</text:p>
      <text:p text:style-name="P121"/>
      <text:p text:style-name="P124">Vous devez observer une notification dans le terminal 1</text:p>
      <text:p text:style-name="P124"/>
      <text:p text:style-name="P125">Election et quorum</text:p>
      <text:p text:style-name="P124">Afficher les rôles des serveurs avec la commande :</text:p>
      <text:p text:style-name="P121">echo stat | nc localhost 2181 | grep Mode &amp;&amp; echo stat | nc localhost 2182 | grep Mode &amp;&amp; echo stat | nc localhost 2183 | grep Mode</text:p>
      <text:p text:style-name="P119"><text:line-break/><text:soft-page-break/><text:span text:style-name="T90">Stopper le serveur leader et observer la réélection</text:span></text:p>
      <text:p text:style-name="P133">Stopper encore un serveur et interroger le serveur restant. <text:span text:style-name="T102">L’ensemble</text:span> n’ayant plus de quorum ne doit pas répondre</text:p>
      <text:p text:style-name="P80">Redémarrer un serveur et observer la remise en service de le l’ensemb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nsolas2" svg:font-family="Consolas, Monaco, 'Andale Mono', 'Ubuntu Mono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"/>
    <style:font-face style:name="Droid Sans Mono1" svg:font-family="'Droid Sans Mono', monospace, monospac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OpenSymbol4" svg:font-family="OpenSymbol, 'Arial Unicode MS'" style:font-family-generic="system" style:font-pitch="variable"/>
    <style:font-face style:name="RedHatText" svg:font-family="RedHatText, helvetica, arial, sans-serif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inconsolata" svg:font-family="inconsolata, sans-serif"/>
    <style:font-face style:name="var font-mono" svg:font-family="'var font-mono'"/>
    <style:font-face style:name="var font-mono1" svg:font-family="'var font-mono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OpenSymbol4" style:font-family-complex="OpenSymbol, 'Arial Unicode M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OpenSymbol4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left="0cm" fo:margin-right="0cm"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left="0cm" fo:margin-right="0.199cm" fo:margin-top="0.101cm" fo:margin-bottom="0.101cm" style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3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1fcfc09" fo:background-color="#ddddd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Lohit Hindi2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_20__28_WW_29_" style:display-name="Text body (WW)" style:family="paragraph" style:parent-style-name="Standard_20__28_WW_29_">
      <style:paragraph-properties fo:margin-top="0cm" fo:margin-bottom="0.212cm" style:contextual-spacing="false"/>
    </style:style>
    <style:style style:name="List_20_Paragraph" style:display-name="List Paragraph" style:family="paragraph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3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3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3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3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3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3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3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3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3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3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3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3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3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3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3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3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3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3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3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3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3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3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3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3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6-05-07T10:42:37.443934957</dc:date>
    <meta:editing-duration>P32DT29M10S</meta:editing-duration>
    <meta:editing-cycles>464</meta:editing-cycles>
    <meta:generator>LibreOffice/24.2.7.2$Linux_X86_64 LibreOffice_project/420$Build-2</meta:generator>
    <meta:print-date>2026-05-07T10:40:38.380426386</meta:print-date>
    <meta:printed-by>Fichiers PDF</meta:printed-by>
    <meta:document-statistic meta:table-count="0" meta:image-count="0" meta:object-count="0" meta:page-count="36" meta:paragraph-count="884" meta:word-count="5653" meta:character-count="45401" meta:non-whitespace-character-count="40099"/>
  </office:meta>
</office:document-meta>
</file>