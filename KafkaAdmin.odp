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CFDA410BBD.png" manifest:media-type="image/png"/>
  <manifest:file-entry manifest:full-path="Pictures/100000010000038F000001D048BCFD06.png" manifest:media-type="image/png"/>
  <manifest:file-entry manifest:full-path="Pictures/10000001000001FD00000338D9B9BD2F.png" manifest:media-type="image/png"/>
  <manifest:file-entry manifest:full-path="Pictures/TablePreview2.svm" manifest:media-type=""/>
  <manifest:file-entry manifest:full-path="Pictures/100000010000062D00000362271446F0.png" manifest:media-type="image/png"/>
  <manifest:file-entry manifest:full-path="Pictures/TablePreview1.svm" manifest:media-type=""/>
  <manifest:file-entry manifest:full-path="Pictures/10000001000002C6000001F577A322C2.png" manifest:media-type="image/png"/>
  <manifest:file-entry manifest:full-path="Pictures/10000001000005E60000031D3D250AAF.png" manifest:media-type="image/png"/>
  <manifest:file-entry manifest:full-path="Pictures/1000000100000AD1000004AEF47DE572.png" manifest:media-type="image/png"/>
  <manifest:file-entry manifest:full-path="Pictures/10000001000004EC0000027A89CF54CB.png" manifest:media-type="image/png"/>
  <manifest:file-entry manifest:full-path="Pictures/100000010000024600000192222575E2.png" manifest:media-type="image/png"/>
  <manifest:file-entry manifest:full-path="Pictures/1000000000000500000002D00D415DCF.png" manifest:media-type="image/png"/>
  <manifest:file-entry manifest:full-path="Pictures/1000000000000300000001A10D151138.png" manifest:media-type="image/png"/>
  <manifest:file-entry manifest:full-path="Pictures/100000010000042D00000383E3AA16A6.png" manifest:media-type="image/png"/>
  <manifest:file-entry manifest:full-path="Pictures/10000001000003BD0000026C12AB267E.png" manifest:media-type="image/png"/>
  <manifest:file-entry manifest:full-path="Pictures/10000001000005270000007C23643E04.png" manifest:media-type="image/png"/>
  <manifest:file-entry manifest:full-path="Pictures/100000010000030000000215F4C6714B.png" manifest:media-type="image/png"/>
  <manifest:file-entry manifest:full-path="Pictures/10000001000005870000007C39CFC6ED.png" manifest:media-type="image/png"/>
  <manifest:file-entry manifest:full-path="Pictures/10000001000005950000029671B5A3BA.png" manifest:media-type="image/png"/>
  <manifest:file-entry manifest:full-path="Pictures/10000000000001A00000010B99E34F5B.png" manifest:media-type="image/png"/>
  <manifest:file-entry manifest:full-path="Pictures/1000000100000735000003090E6462D1.png" manifest:media-type="image/png"/>
  <manifest:file-entry manifest:full-path="Pictures/10000000000001DA000000FC8E08F9E1.png" manifest:media-type="image/png"/>
  <manifest:file-entry manifest:full-path="Pictures/10000001000002C6000001F5A5AA6B72.png" manifest:media-type="image/png"/>
  <manifest:file-entry manifest:full-path="Pictures/100000000000093E00000474937D8F7C.png" manifest:media-type="image/png"/>
  <manifest:file-entry manifest:full-path="Pictures/10000001000003D3000001E5F6382571.png" manifest:media-type="image/png"/>
  <manifest:file-entry manifest:full-path="Pictures/100000010000073500000375CAE94E07.png" manifest:media-type="image/png"/>
  <manifest:file-entry manifest:full-path="Pictures/10000001000007350000037587DA9EE3.png" manifest:media-type="image/png"/>
  <manifest:file-entry manifest:full-path="Pictures/10000001000004FB00000283DDBC7E5B.png" manifest:media-type="image/png"/>
  <manifest:file-entry manifest:full-path="Pictures/1000000100000468000004E0069CD733.png" manifest:media-type="image/png"/>
  <manifest:file-entry manifest:full-path="Pictures/10000000000003DE000001B0B0EE38E8.png" manifest:media-type="image/png"/>
  <manifest:file-entry manifest:full-path="Pictures/10000001000003000000024F09C46404.png" manifest:media-type="image/png"/>
  <manifest:file-entry manifest:full-path="Pictures/10000001000002C60000024EE140356B.png" manifest:media-type="image/png"/>
  <manifest:file-entry manifest:full-path="Pictures/10000001000003D2000001A6E9FDD1E2.png" manifest:media-type="image/png"/>
  <manifest:file-entry manifest:full-path="Pictures/1000000000000093000000916F5136A5.png" manifest:media-type="image/png"/>
  <manifest:file-entry manifest:full-path="Pictures/10000001000003E9000002360842F6F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Consolas" svg:font-family="Consolas" style:font-family-generic="swiss" style:font-pitch="variable"/>
    <style:font-face style:name="Consolas1" svg:font-family="Consolas" style:font-family-generic="modern" style:font-pitch="fixed"/>
    <style:font-face style:name="Consolas2"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swiss" style:font-pitch="variable"/>
    <style:font-face style:name="DejaVu Sans Mono1" svg:font-family="'DejaVu Sans Mono'" style:font-family-generic="modern" style:font-pitch="fixed"/>
    <style:font-face style:name="DejaVu Sans1" svg:font-family="'DejaVu Sans'"/>
    <style:font-face style:name="DejaVu Sans2" svg:font-family="'DejaVu Sans'" style:font-family-generic="modern" style:font-pitch="fixed"/>
    <style:font-face style:name="DejaVu Sans3" svg:font-family="'DejaVu Sans'" style:font-family-generic="system" style:font-pitch="variable"/>
    <style:font-face style:name="DejaVu Sans4" svg:font-family="'DejaVu Sans'"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face style:name="Lohit Hindi1" svg:font-family="'Lohit Hindi'" style:font-family-generic="roman" style:font-pitch="variable"/>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Lucida Sans Unicode3" svg:font-family="'Lucida Sans Unicode'" style:font-family-generic="modern" style:font-pitch="fixed"/>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ce style:name="Tahoma1" svg:font-family="Tahoma" style:font-family-generic="swiss" style:font-pitch="variable"/>
    <style:font-face style:name="Tahoma2"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dp9" style:family="drawing-page">
      <style:drawing-page-properties presentation:display-header="true" presentation:display-footer="false" presentation:display-page-number="false" presentation:display-date-time="false"/>
    </style:style>
    <style:style style:name="dp10" style:family="drawing-page">
      <style:drawing-page-properties presentation:background-visible="true" presentation:background-objects-visible="true" presentation:display-footer="true" presentation:display-page-number="true" presentation:display-date-time="true"/>
    </style:style>
    <style:style style:name="dp1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2" style:family="graphic">
      <style:graphic-properties style:protect="size" loext:decorative="fals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611cm" fo:min-width="20.686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644cm" fo:min-width="13.621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806cm" fo:min-width="14.311cm" loext:decorative="false"/>
      <style:paragraph-properties style:writing-mode="lr-tb"/>
    </style:style>
    <style:style style:name="gr8"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966cm" fo:min-width="18.062cm" loext:decorative="false"/>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cm, 0cm, 0cm, -1.61cm)" draw:image-opacity="100%" style:mirror="none" loext:decorative="fals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8.132cm, 0cm, 0cm, -1.014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4.421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46cm" fo:min-width="7.46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691cm" fo:min-width="22.164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966cm" fo:min-width="13.286cm" loext:decorative="false"/>
      <style:paragraph-properties style:writing-mode="lr-tb"/>
    </style:style>
    <style:style style:name="gr17" style:family="graphic" style:parent-style-name="Style_20_de_20_dessin_20_par_20_défaut_5f_2">
      <style:graphic-properties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846cm" fo:min-width="21.27cm" loext:decorative="false"/>
      <style:paragraph-properties style:writing-mode="lr-tb"/>
    </style:style>
    <style:style style:name="gr19" style:family="graphic" style:parent-style-name="Style_20_de_20_dessin_20_par_20_défaut_5f_2">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20"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966cm" fo:min-width="9.112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966cm" fo:min-width="14.184cm" loext:decorative="false"/>
      <style:paragraph-properties style:writing-mode="lr-tb"/>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4" style:family="graphic" style:parent-style-name="Style_20_de_20_dessin_20_par_20_défaut_5f_3">
      <style:graphic-properties draw:stroke="none" svg:stroke-width="0.026cm" svg:stroke-linecap="butt" draw:fill="solid" draw:fill-color="#444444" draw:textarea-horizontal-align="justify" draw:textarea-vertical-align="middle" draw:auto-grow-height="false" draw:fit-to-size="false" style:shrink-to-fit="false" fo:min-height="0cm" fo:min-width="26.824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5" style:family="graphic" style:parent-style-name="Style_20_de_20_dessin_20_par_20_défaut_5f_3">
      <style:graphic-properties draw:stroke="none" svg:stroke-width="0.026cm" svg:stroke-linecap="butt" draw:fill="solid" draw:fill-color="#cfcfcf" draw:textarea-horizontal-align="justify" draw:textarea-vertical-align="middle" draw:auto-grow-height="false" draw:fit-to-size="false" style:shrink-to-fit="false" fo:min-height="0cm" fo:min-width="21.77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6"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7"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28"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29"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0"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31"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32"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3"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34"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35"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6"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37"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38"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9"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40"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41"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42"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43"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44" style:family="graphic" style:parent-style-name="standard">
      <style:graphic-properties draw:stroke="none" svg:stroke-width="0.026cm" svg:stroke-linecap="butt" draw:fill="solid" draw:fill-color="#444444" draw:textarea-horizontal-align="justify" draw:textarea-vertical-align="middle" draw:auto-grow-height="false" draw:fit-to-size="false" style:shrink-to-fit="false" fo:min-height="0cm" fo:min-width="26.824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5" style:family="graphic" style:parent-style-name="standard">
      <style:graphic-properties draw:stroke="none" svg:stroke-width="0.026cm" svg:stroke-linecap="butt" draw:fill="solid" draw:fill-color="#cfcfcf" draw:textarea-horizontal-align="justify" draw:textarea-vertical-align="middle" draw:auto-grow-height="false" draw:fit-to-size="false" style:shrink-to-fit="false" fo:min-height="0cm" fo:min-width="21.77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6"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47"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48"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49"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0"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51"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52"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3"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54"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55"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6"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57"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966cm" fo:min-width="9.019cm" loext:decorative="false"/>
      <style:paragraph-properties style:writing-mode="lr-tb"/>
    </style:style>
    <style:style style:name="gr59" style:family="graphic" style:parent-style-name="Style_20_de_20_dessin_20_par_20_défaut_5f_1">
      <style:graphic-properties draw:stroke="none" svg:stroke-color="#000000" draw:fill="none" draw:fill-color="#ffffff" draw:textarea-horizontal-align="left" draw:auto-grow-height="true" draw:auto-grow-width="true" fo:min-height="0.966cm" fo:min-width="19.89cm" loext:decorative="false"/>
      <style:paragraph-properties style:writing-mode="lr-tb"/>
    </style:style>
    <style:style style:name="gr60" style:family="graphic" style:parent-style-name="Style_20_de_20_dessin_20_par_20_défaut_5f_1_5f_1"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966cm" fo:min-width="12.296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806cm" fo:min-width="14.933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966cm" fo:min-width="8.24cm" loext:decorative="false"/>
      <style:paragraph-properties style:writing-mode="lr-tb"/>
    </style:style>
    <style:style style:name="gr64"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5"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66"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67"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8"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69"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70"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1"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72"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73"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4"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75"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76"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7"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78"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79"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0"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81"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82"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3"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84"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85"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6"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87"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88"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9"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90"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91"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2"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loext:decorative="false"/>
      <style:paragraph-properties style:writing-mode="lr-tb"/>
    </style:style>
    <style:style style:name="gr93"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966cm" fo:min-width="14.442cm"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966cm" fo:min-width="11.233cm" loext:decorative="false"/>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966cm" fo:min-width="13.401cm" loext:decorative="false"/>
      <style:paragraph-properties style:writing-mode="lr-tb"/>
    </style:style>
    <style:style style:name="gr97" style:family="graphic" style:parent-style-name="Style_20_de_20_dessin_20_par_20_défaut_5f_3">
      <style:graphic-properties draw:stroke="none" svg:stroke-width="0cm" draw:fill="solid" draw:fill-color="#2a2d86" draw:textarea-vertical-align="top" draw:auto-grow-height="false" fo:min-height="0.646cm" fo:min-width="0.45cm" fo:padding-top="0.125cm" fo:padding-bottom="0.125cm" fo:padding-left="0.25cm" fo:padding-right="0.25cm" fo:wrap-option="wrap" loext:decorative="false"/>
    </style:style>
    <style:style style:name="gr98" style:family="graphic" style:parent-style-name="Style_20_de_20_dessin_20_par_20_défaut_5f_3">
      <style:graphic-properties draw:stroke="none" svg:stroke-width="0cm" draw:fill="solid" draw:fill-color="#8e9dd8" draw:textarea-vertical-align="top" draw:auto-grow-height="false" fo:min-height="0.646cm" fo:min-width="0.45cm" fo:padding-top="0.125cm" fo:padding-bottom="0.125cm" fo:padding-left="0.25cm" fo:padding-right="0.25cm" fo:wrap-option="wrap" loext:decorative="false"/>
    </style:style>
    <style:style style:name="gr99" style:family="graphic" style:parent-style-name="Style_20_de_20_dessin_20_par_20_défaut_5f_3">
      <style:graphic-properties draw:stroke="none" svg:stroke-width="0cm" draw:fill="solid" draw:fill-color="#e83c3c" draw:textarea-vertical-align="top" draw:auto-grow-height="false" fo:min-height="0.646cm" fo:min-width="0.45cm" fo:padding-top="0.125cm" fo:padding-bottom="0.125cm" fo:padding-left="0.25cm" fo:padding-right="0.25cm" fo:wrap-option="wrap" loext:decorative="false"/>
    </style:style>
    <style:style style:name="gr100" style:family="graphic" style:parent-style-name="Style_20_de_20_dessin_20_par_20_défaut_5f_3">
      <style:graphic-properties draw:stroke="none" svg:stroke-width="0cm" draw:fill="solid" draw:fill-color="#f2c84b" draw:textarea-vertical-align="top" draw:auto-grow-height="false" fo:min-height="0.646cm" fo:min-width="0.45cm" fo:padding-top="0.125cm" fo:padding-bottom="0.125cm" fo:padding-left="0.25cm" fo:padding-right="0.25cm" fo:wrap-option="wrap" loext:decorative="false"/>
    </style:style>
    <style:style style:name="gr101" style:family="graphic" style:parent-style-name="Style_20_de_20_dessin_20_par_20_défaut_5f_3">
      <style:graphic-properties draw:stroke="solid" svg:stroke-width="0.053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2" style:family="graphic" style:parent-style-name="Style_20_de_20_dessin_20_par_20_défaut_5f_3">
      <style:graphic-properties draw:stroke="solid" svg:stroke-width="0.071cm" svg:stroke-color="#d4d4d4"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3" style:family="graphic" style:parent-style-name="Style_20_de_20_dessin_20_par_20_défaut_5f_3">
      <style:graphic-properties draw:stroke="solid" svg:stroke-width="0.071cm" svg:stroke-color="#8c8c8c"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4" style:family="graphic" style:parent-style-name="Style_20_de_20_dessin_20_par_20_défaut_5f_3">
      <style:graphic-properties draw:stroke="solid" svg:stroke-width="0.106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5"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06" style:family="graphic" style:parent-style-name="Style_20_de_20_dessin_20_par_20_défaut_5f_3" style:list-style-name="L2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loext:decorative="false"/>
      <style:paragraph-properties style:writing-mode="lr-tb"/>
    </style:style>
    <style:style style:name="gr107"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08"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09"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10"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11"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12"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13"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14"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15"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16"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17"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18"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19"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20"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21"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22"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966cm" fo:min-width="10.695cm" loext:decorative="false"/>
      <style:paragraph-properties style:writing-mode="lr-tb"/>
    </style:style>
    <style:style style:name="gr124"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25"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loext:decorative="false"/>
      <style:paragraph-properties style:writing-mode="lr-tb"/>
    </style:style>
    <style:style style:name="gr126"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27"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28"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29"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30"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31"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loext:decorative="false"/>
      <style:paragraph-properties style:writing-mode="lr-tb"/>
    </style:style>
    <style:style style:name="gr132"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33"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34"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loext:decorative="false"/>
      <style:paragraph-properties style:writing-mode="lr-tb"/>
    </style:style>
    <style:style style:name="gr135"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36"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37"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38"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39"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40"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loext:decorative="false"/>
      <style:paragraph-properties style:writing-mode="lr-tb"/>
    </style:style>
    <style:style style:name="gr141"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42"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43"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44"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45"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46"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47"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48"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49"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loext:decorative="false"/>
      <style:paragraph-properties style:writing-mode="lr-tb"/>
    </style:style>
    <style:style style:name="gr150"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51"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52"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loext:decorative="false"/>
      <style:paragraph-properties style:writing-mode="lr-tb"/>
    </style:style>
    <style:style style:name="gr153"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54"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55"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loext:decorative="false"/>
      <style:paragraph-properties style:writing-mode="lr-tb"/>
    </style:style>
    <style:style style:name="gr156"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57"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58" style:family="graphic" style:parent-style-name="Style_20_de_20_dessin_20_par_20_défaut_5f_3"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59"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60" style:family="graphic" style:parent-style-name="standard">
      <style:graphic-properties draw:stroke="none" svg:stroke-width="0cm" draw:fill="solid" draw:fill-color="#2a2d86" draw:textarea-vertical-align="top" draw:auto-grow-height="false" fo:min-height="0.646cm" fo:min-width="0.45cm" fo:padding-top="0.125cm" fo:padding-bottom="0.125cm" fo:padding-left="0.25cm" fo:padding-right="0.25cm" fo:wrap-option="wrap" loext:decorative="false"/>
    </style:style>
    <style:style style:name="gr161" style:family="graphic" style:parent-style-name="standard">
      <style:graphic-properties draw:stroke="none" svg:stroke-width="0cm" draw:fill="solid" draw:fill-color="#8e9dd8" draw:textarea-vertical-align="top" draw:auto-grow-height="false" fo:min-height="0.646cm" fo:min-width="0.45cm" fo:padding-top="0.125cm" fo:padding-bottom="0.125cm" fo:padding-left="0.25cm" fo:padding-right="0.25cm" fo:wrap-option="wrap" loext:decorative="false"/>
    </style:style>
    <style:style style:name="gr162" style:family="graphic" style:parent-style-name="standard">
      <style:graphic-properties draw:stroke="none" svg:stroke-width="0cm" draw:fill="solid" draw:fill-color="#e83c3c" draw:textarea-vertical-align="top" draw:auto-grow-height="false" fo:min-height="0.646cm" fo:min-width="0.45cm" fo:padding-top="0.125cm" fo:padding-bottom="0.125cm" fo:padding-left="0.25cm" fo:padding-right="0.25cm" fo:wrap-option="wrap" loext:decorative="false"/>
    </style:style>
    <style:style style:name="gr163" style:family="graphic" style:parent-style-name="standard">
      <style:graphic-properties draw:stroke="none" svg:stroke-width="0cm" draw:fill="solid" draw:fill-color="#f2c84b" draw:textarea-vertical-align="top" draw:auto-grow-height="false" fo:min-height="0.646cm" fo:min-width="0.45cm" fo:padding-top="0.125cm" fo:padding-bottom="0.125cm" fo:padding-left="0.25cm" fo:padding-right="0.25cm" fo:wrap-option="wrap" loext:decorative="false"/>
    </style:style>
    <style:style style:name="gr164" style:family="graphic" style:parent-style-name="standard">
      <style:graphic-properties draw:stroke="solid" svg:stroke-width="0.053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5" style:family="graphic" style:parent-style-name="standard">
      <style:graphic-properties draw:stroke="solid" svg:stroke-width="0.071cm" svg:stroke-color="#d4d4d4"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6" style:family="graphic" style:parent-style-name="standard">
      <style:graphic-properties draw:stroke="solid" svg:stroke-width="0.071cm" svg:stroke-color="#8c8c8c"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7" style:family="graphic" style:parent-style-name="standard">
      <style:graphic-properties draw:stroke="solid" svg:stroke-width="0.106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8"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69"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loext:decorative="false"/>
      <style:paragraph-properties style:writing-mode="lr-tb"/>
    </style:style>
    <style:style style:name="gr170"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71"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72"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73"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74"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75"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5.07cm" fo:min-width="25.042cm" fo:padding-top="0.125cm" fo:padding-bottom="0.125cm" fo:padding-left="0.25cm" fo:padding-right="0.25cm" fo:wrap-option="wrap" loext:decorative="false"/>
      <style:paragraph-properties style:writing-mode="lr-tb"/>
    </style:style>
    <style:style style:name="gr176"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8.15cm" fo:min-width="26.23cm" fo:padding-top="0.125cm" fo:padding-bottom="0.125cm" fo:padding-left="0.25cm" fo:padding-right="0.25cm" fo:wrap-option="wrap" loext:decorative="false"/>
      <style:paragraph-properties style:writing-mode="lr-tb"/>
    </style:style>
    <style:style style:name="gr177"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78"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79"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80"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81"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82"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loext:decorative="false"/>
      <style:paragraph-properties style:writing-mode="lr-tb"/>
    </style:style>
    <style:style style:name="gr183"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84"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85"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86"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87"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88"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loext:decorative="false"/>
      <style:paragraph-properties style:writing-mode="lr-tb"/>
    </style:style>
    <style:style style:name="gr189"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90"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91"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92"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93"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94"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195"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96"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197"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loext:decorative="false"/>
      <style:paragraph-properties style:writing-mode="lr-tb"/>
    </style:style>
    <style:style style:name="gr198"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99"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200"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201"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02"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203"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204"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05"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206"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207"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08"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209"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loext:decorative="false"/>
      <style:paragraph-properties style:writing-mode="lr-tb"/>
    </style:style>
    <style:style style:name="gr210"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11"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212"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213"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14"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215"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216"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17"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218"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loext:decorative="false"/>
      <style:paragraph-properties style:writing-mode="lr-tb"/>
    </style:style>
    <style:style style:name="gr219"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20"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loext:decorative="false"/>
      <style:paragraph-properties style:writing-mode="lr-tb"/>
    </style:style>
    <style:style style:name="gr221" style:family="graphic" style:parent-style-name="standard" style:list-style-name="L2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loext:decorative="false"/>
      <style:paragraph-properties style:writing-mode="lr-tb"/>
    </style:style>
    <style:style style:name="gr222"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23" style:family="graphic" style:parent-style-name="Style_20_de_20_dessin_20_par_20_défaut_5f_3"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24"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4.23cm" fo:min-width="26.23cm" fo:padding-top="0.125cm" fo:padding-bottom="0.125cm" fo:padding-left="0.25cm" fo:padding-right="0.25cm" fo:wrap-option="wrap" loext:decorative="false"/>
      <style:paragraph-properties style:writing-mode="lr-tb"/>
    </style:style>
    <style:style style:name="gr225" style:family="graphic" style:parent-style-name="Style_20_de_20_dessin_20_par_20_défaut_5f_3" style:list-style-name="L29">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loext:decorative="false"/>
      <style:paragraph-properties style:writing-mode="lr-tb"/>
    </style:style>
    <style:style style:name="gr226" style:family="graphic" style:parent-style-name="Style_20_de_20_dessin_20_par_20_défaut_5f_3"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27"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28" style:family="graphic" style:parent-style-name="Style_20_de_20_dessin_20_par_20_défaut_5f_3"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29" style:family="graphic" style:parent-style-name="Style_20_de_20_dessin_20_par_20_défaut_5f_3"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30"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31" style:family="graphic" style:parent-style-name="Style_20_de_20_dessin_20_par_20_défaut_5f_3"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32" style:family="graphic" style:parent-style-name="Style_20_de_20_dessin_20_par_20_défaut_5f_3"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33"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34" style:family="graphic" style:parent-style-name="Style_20_de_20_dessin_20_par_20_défaut_5f_3"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35" style:family="graphic" style:parent-style-name="Style_20_de_20_dessin_20_par_20_défaut_5f_3"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36"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37" style:family="graphic" style:parent-style-name="Style_20_de_20_dessin_20_par_20_défaut_5f_3"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38" style:family="graphic" style:parent-style-name="Style_20_de_20_dessin_20_par_20_défaut_5f_3"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39"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40" style:family="graphic" style:parent-style-name="Style_20_de_20_dessin_20_par_20_défaut_5f_3"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41" style:family="graphic" style:parent-style-name="Style_20_de_20_dessin_20_par_20_défaut_5f_3"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42"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3.67cm" fo:min-width="26.23cm" fo:padding-top="0.125cm" fo:padding-bottom="0.125cm" fo:padding-left="0.25cm" fo:padding-right="0.25cm" fo:wrap-option="wrap" loext:decorative="false"/>
      <style:paragraph-properties style:writing-mode="lr-tb"/>
    </style:style>
    <style:style style:name="gr243" style:family="graphic" style:parent-style-name="Style_20_de_20_dessin_20_par_20_défaut_5f_3" style:list-style-name="L30">
      <style:graphic-properties draw:stroke="none" svg:stroke-width="0cm" draw:fill="none" loext:fill-use-slide-background="false" draw:textarea-horizontal-align="justify" draw:textarea-vertical-align="top" draw:auto-grow-height="false" draw:fit-to-size="false" style:shrink-to-fit="false" fo:min-height="5.35cm" fo:min-width="23.26cm" fo:padding-top="0.125cm" fo:padding-bottom="0.125cm" fo:padding-left="0.25cm" fo:padding-right="0.25cm" fo:wrap-option="wrap" loext:decorative="false"/>
      <style:paragraph-properties style:writing-mode="lr-tb"/>
    </style:style>
    <style:style style:name="gr244" style:family="graphic" style:parent-style-name="Style_20_de_20_dessin_20_par_20_défaut_5f_3"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45"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46" style:family="graphic" style:parent-style-name="Style_20_de_20_dessin_20_par_20_défaut_5f_3" style:list-style-name="L30">
      <style:graphic-properties draw:stroke="none" svg:stroke-width="0cm" draw:fill="none" loext:fill-use-slide-background="false" draw:textarea-horizontal-align="justify" draw:textarea-vertical-align="top" draw:auto-grow-height="false" draw:fit-to-size="false" style:shrink-to-fit="false" fo:min-height="3.39cm" fo:min-width="23.26cm" fo:padding-top="0.125cm" fo:padding-bottom="0.125cm" fo:padding-left="0.25cm" fo:padding-right="0.25cm" fo:wrap-option="wrap" loext:decorative="false"/>
      <style:paragraph-properties style:writing-mode="lr-tb"/>
    </style:style>
    <style:style style:name="gr247" style:family="graphic" style:parent-style-name="Style_20_de_20_dessin_20_par_20_défaut_5f_3">
      <style:graphic-properties draw:stroke="solid" svg:stroke-width="0.018cm" svg:stroke-color="#dddddd" draw:fill="solid" draw:fill-color="#f4f4f4" draw:textarea-vertical-align="top" draw:auto-grow-height="false" fo:min-height="5.35cm" fo:min-width="25.042cm" fo:padding-top="0.125cm" fo:padding-bottom="0.125cm" fo:padding-left="0.25cm" fo:padding-right="0.25cm" fo:wrap-option="wrap" loext:decorative="false"/>
    </style:style>
    <style:style style:name="gr248" style:family="graphic" style:parent-style-name="Style_20_de_20_dessin_20_par_20_défaut_5f_3" style:list-style-name="L29">
      <style:graphic-properties draw:stroke="none" svg:stroke-width="0cm" draw:fill="none" loext:fill-use-slide-background="false" draw:textarea-horizontal-align="justify" draw:textarea-vertical-align="top" draw:auto-grow-height="false" draw:fit-to-size="false" style:shrink-to-fit="false" fo:min-height="5.07cm" fo:min-width="24.448cm" fo:padding-top="0.125cm" fo:padding-bottom="0.125cm" fo:padding-left="0.25cm" fo:padding-right="0.25cm" fo:wrap-option="wrap" loext:decorative="false"/>
      <style:paragraph-properties style:writing-mode="lr-tb"/>
    </style:style>
    <style:style style:name="gr249" style:family="graphic" style:parent-style-name="Style_20_de_20_dessin_20_par_20_défaut_5f_3" style:list-style-name="L29">
      <style:graphic-properties draw:stroke="none" svg:stroke-width="0cm" draw:fill="none" loext:fill-use-slide-background="false" draw:textarea-horizontal-align="justify" draw:textarea-vertical-align="top" draw:auto-grow-height="false" draw:fit-to-size="false" style:shrink-to-fit="false" fo:min-height="1.43cm" fo:min-width="23.26cm" fo:padding-top="0.125cm" fo:padding-bottom="0.125cm" fo:padding-left="0.25cm" fo:padding-right="0.25cm" fo:wrap-option="wrap" loext:decorative="false"/>
      <style:paragraph-properties style:writing-mode="lr-tb"/>
    </style:style>
    <style:style style:name="gr250" style:family="graphic" style:parent-style-name="Style_20_de_20_dessin_20_par_20_défaut_5f_3"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51" style:family="graphic" style:parent-style-name="Style_20_de_20_dessin_20_par_20_défaut_5f_3"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52" style:family="graphic" style:parent-style-name="Style_20_de_20_dessin_20_par_20_défaut_5f_3" style:list-style-name="L30">
      <style:graphic-properties draw:stroke="none" svg:stroke-width="0cm" draw:fill="none" loext:fill-use-slide-background="false" draw:textarea-horizontal-align="justify" draw:textarea-vertical-align="top" draw:auto-grow-height="false" draw:fit-to-size="false" style:shrink-to-fit="false" fo:min-height="3.39cm" fo:min-width="23.26cm" fo:padding-top="0.125cm" fo:padding-bottom="0.125cm" fo:padding-left="0.25cm" fo:padding-right="0.25cm" fo:wrap-option="wrap" loext:decorative="false"/>
      <style:paragraph-properties style:writing-mode="lr-tb"/>
    </style:style>
    <style:style style:name="gr253" style:family="graphic" style:parent-style-name="Style_20_de_20_dessin_20_par_20_défaut_5f_3">
      <style:graphic-properties draw:stroke="solid" svg:stroke-width="0.018cm" svg:stroke-color="#dddddd" draw:fill="solid" draw:fill-color="#f4f4f4" draw:textarea-vertical-align="top" draw:auto-grow-height="false" fo:min-height="4.51cm" fo:min-width="25.042cm" fo:padding-top="0.125cm" fo:padding-bottom="0.125cm" fo:padding-left="0.25cm" fo:padding-right="0.25cm" fo:wrap-option="wrap" loext:decorative="false"/>
    </style:style>
    <style:style style:name="gr254" style:family="graphic" style:parent-style-name="Style_20_de_20_dessin_20_par_20_défaut_5f_3" style:list-style-name="L29">
      <style:graphic-properties draw:stroke="none" svg:stroke-width="0cm" draw:fill="none" loext:fill-use-slide-background="false" draw:textarea-horizontal-align="justify" draw:textarea-vertical-align="top" draw:auto-grow-height="false" draw:fit-to-size="false" style:shrink-to-fit="false" fo:min-height="4.23cm" fo:min-width="24.448cm" fo:padding-top="0.125cm" fo:padding-bottom="0.125cm" fo:padding-left="0.25cm" fo:padding-right="0.25cm" fo:wrap-option="wrap" loext:decorative="false"/>
      <style:paragraph-properties style:writing-mode="lr-tb"/>
    </style:style>
    <style:style style:name="gr255" style:family="graphic" style:parent-style-name="Style_20_de_20_dessin_20_par_20_défaut_5f_3" style:list-style-name="L30">
      <style:graphic-properties draw:stroke="none" svg:stroke-width="0cm" draw:fill="none" loext:fill-use-slide-background="false" draw:textarea-horizontal-align="justify" draw:textarea-vertical-align="top" draw:auto-grow-height="false" draw:fit-to-size="false" style:shrink-to-fit="false" fo:min-height="4.79cm" fo:min-width="23.26cm" fo:padding-top="0.125cm" fo:padding-bottom="0.125cm" fo:padding-left="0.25cm" fo:padding-right="0.25cm" fo:wrap-option="wrap" loext:decorative="false"/>
      <style:paragraph-properties style:writing-mode="lr-tb"/>
    </style:style>
    <style:style style:name="gr256" style:family="graphic" style:parent-style-name="standard"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57"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3.67cm" fo:min-width="26.23cm" fo:padding-top="0.125cm" fo:padding-bottom="0.125cm" fo:padding-left="0.25cm" fo:padding-right="0.25cm" fo:wrap-option="wrap" loext:decorative="false"/>
      <style:paragraph-properties style:writing-mode="lr-tb"/>
    </style:style>
    <style:style style:name="gr258" style:family="graphic" style:parent-style-name="standard" style:list-style-name="L30">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loext:decorative="false"/>
      <style:paragraph-properties style:writing-mode="lr-tb"/>
    </style:style>
    <style:style style:name="gr259" style:family="graphic" style:parent-style-name="standard"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60"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61" style:family="graphic" style:parent-style-name="standard"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62" style:family="graphic" style:parent-style-name="standard"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63"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64" style:family="graphic" style:parent-style-name="standard"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65" style:family="graphic" style:parent-style-name="standard"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66"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67" style:family="graphic" style:parent-style-name="standard"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68" style:family="graphic" style:parent-style-name="standard"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69"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70" style:family="graphic" style:parent-style-name="standard"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71" style:family="graphic" style:parent-style-name="standard"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72"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73" style:family="graphic" style:parent-style-name="standard"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74" style:family="graphic" style:parent-style-name="standard"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75"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76" style:family="graphic" style:parent-style-name="standard">
      <style:graphic-properties loext:decorative="false"/>
    </style:style>
    <style:style style:name="gr277" style:family="graphic" style:parent-style-name="standard" style:list-style-name="L30">
      <style:graphic-properties draw:stroke="none" svg:stroke-width="0cm" draw:fill="none" loext:fill-use-slide-background="false" draw:textarea-horizontal-align="justify" draw:textarea-vertical-align="top" draw:auto-grow-height="false" draw:fit-to-size="false" style:shrink-to-fit="false" fo:min-height="3.95cm" fo:min-width="23.26cm" fo:padding-top="0.125cm" fo:padding-bottom="0.125cm" fo:padding-left="0.25cm" fo:padding-right="0.25cm" fo:wrap-option="wrap" loext:decorative="false"/>
      <style:paragraph-properties style:writing-mode="lr-tb"/>
    </style:style>
    <style:style style:name="gr278" style:family="graphic" style:parent-style-name="standard" style:list-style-name="L28">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79"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80" style:family="graphic" style:parent-style-name="standard" style:list-style-name="L30">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81" style:family="graphic" style:parent-style-name="Style_20_de_20_dessin_20_par_20_défaut_5f_3">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282"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283" style:family="graphic" style:parent-style-name="standard" style:list-style-name="L4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4"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5" style:family="graphic" style:parent-style-name="standard">
      <style:graphic-properties draw:stroke="none" svg:stroke-color="#000000" draw:fill="none" draw:fill-color="#ffffff" draw:textarea-horizontal-align="left" draw:auto-grow-height="true" draw:auto-grow-width="true" fo:min-height="0.966cm" fo:min-width="10.471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0.966cm" fo:min-width="3.672cm" loext:decorative="false"/>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0.966cm" fo:min-width="1.839cm" loext:decorative="false"/>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966cm" fo:min-width="9.21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title">
      <style:graphic-properties fo:min-height="3.577cm" loext:decorative="false"/>
      <style:paragraph-properties style:writing-mode="lr-tb"/>
    </style:style>
    <style:style style:name="pr12" style:family="presentation" style:parent-style-name="Standard-title">
      <style:graphic-properties fo:min-height="6.064cm"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15" style:family="presentation" style:parent-style-name="Standard-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16" style:family="presentation" style:parent-style-name="Standard-notes">
      <style:graphic-properties draw:fill-color="#ffffff" fo:min-height="13.364cm"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outline1" style:list-style-name="L43">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0" style:family="presentation" style:parent-style-name="Vide-title" style:list-style-name="L22">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21" style:family="presentation" style:parent-style-name="Vide-subtitle" style:list-style-name="L22">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22" style:family="presentation" style:parent-style-name="Vide-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3" style:family="presentation" style:parent-style-name="Vide-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24" style:family="presentation" style:parent-style-name="Vide-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5" style:family="presentation" style:parent-style-name="Vide-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6" style:family="presentation" style:parent-style-name="Vide-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7" style:family="presentation" style:parent-style-name="Vide-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8" style:family="presentation" style:parent-style-name="Vide-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9" style:family="presentation" style:parent-style-name="Vide-outline1">
      <style:graphic-properties draw:stroke="none" svg:stroke-width="0cm" draw:fill="none" loext:fill-use-slide-background="false" draw:textarea-horizontal-align="justify" draw:textarea-vertical-align="top" draw:auto-grow-height="false" draw:fit-to-size="false" style:shrink-to-fit="false" fo:min-height="11.928cm" fo:padding-top="0cm" fo:padding-bottom="0cm" fo:padding-left="0cm" fo:padding-right="0cm" fo:wrap-option="wrap" loext:decorative="false"/>
      <style:paragraph-properties style:writing-mode="lr-tb"/>
    </style:style>
    <style:style style:name="pr30" style:family="presentation" style:parent-style-name="Vide-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1" style:family="presentation" style:parent-style-name="Vide-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2" style:family="presentation" style:parent-style-name="Vide-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4.226cm" fo:min-width="0cm" fo:padding-top="0cm" fo:padding-bottom="0cm" fo:padding-left="0cm" fo:padding-right="0cm" fo:wrap-option="wrap" draw:shadow-color="#808080" loext:decorative="false"/>
      <style:paragraph-properties style:writing-mode="lr-tb"/>
    </style:style>
    <style:style style:name="pr36"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3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3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39" style:family="presentation" style:parent-style-name="Blank-notes">
      <style:graphic-properties draw:fill-color="#ffffff" fo:min-height="13.364cm" loext:decorative="false"/>
      <style:paragraph-properties style:writing-mode="lr-tb"/>
    </style:style>
    <style:style style:name="pr40"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1" style:family="presentation" style:parent-style-name="Vide_5f_-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42" style:family="presentation" style:parent-style-name="Vide_5f_-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43" style:family="presentation" style:parent-style-name="Vide_5f_-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44" style:family="presentation" style:parent-style-name="Vide_5f_-notes" style:list-style-name="L44">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45"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6"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9"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0"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1"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2"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3"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4"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5"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6"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7" style:family="presentation" style:parent-style-name="DEFAULT-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8" style:family="presentation" style:parent-style-name="DEFAULT-backgroundobjects" style:list-style-name="L2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9" style:family="presentation" style:parent-style-name="Vide_5f_-title" style:list-style-name="L32">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160" style:family="presentation" style:parent-style-name="Vide_5f_-subtitle" style:list-style-name="L33">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161"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2"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3"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4"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5"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6"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7"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8" style:family="presentation" style:parent-style-name="Vide_5f_-title" style:list-style-name="L32">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169" style:family="presentation" style:parent-style-name="Vide_5f_-subtitle" style:list-style-name="L33">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170"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1"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2"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3"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4" style:family="presentation" style:parent-style-name="Vide_5f_-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5" style:family="presentation" style:parent-style-name="Standard-subtitle">
      <style:graphic-properties draw:fill-color="#ffffff" fo:min-height="12.18cm" loext:decorative="false"/>
      <style:paragraph-properties style:writing-mode="lr-tb"/>
    </style:style>
    <style:style style:name="pr17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co1" style:family="table-column">
      <style:table-column-properties style:column-width="5.842cm" style:use-optimal-column-width="false"/>
    </style:style>
    <style:style style:name="co2" style:family="table-column">
      <style:table-column-properties style:column-width="8.763cm" style:use-optimal-column-width="false"/>
    </style:style>
    <style:style style:name="co3" style:family="table-column">
      <style:table-column-properties style:column-width="6.533cm" style:use-optimal-column-width="false"/>
    </style:style>
    <style:style style:name="co4" style:family="table-column">
      <style:table-column-properties style:column-width="3.86cm" style:use-optimal-column-width="false"/>
    </style:style>
    <style:style style:name="co5" style:family="table-column">
      <style:table-column-properties style:column-width="4.454cm" style:use-optimal-column-width="false"/>
    </style:style>
    <style:style style:name="co6" style:family="table-column">
      <style:table-column-properties style:column-width="5.345cm" style:use-optimal-column-width="false"/>
    </style:style>
    <style:style style:name="co7" style:family="table-column">
      <style:table-column-properties style:column-width="6.537cm" style:use-optimal-column-width="false"/>
    </style:style>
    <style:style style:name="ro1" style:family="table-row">
      <style:table-row-properties style:row-height="1.017cm" style:use-optimal-row-height="false"/>
    </style:style>
    <style:style style:name="ro2" style:family="table-row">
      <style:table-row-properties style:row-height="1.525cm" style:use-optimal-row-height="false"/>
    </style:style>
    <style:style style:name="ro3" style:family="table-row">
      <style:table-row-properties style:row-height="1.341cm" style:use-optimal-row-height="false"/>
    </style:style>
    <style:style style:name="ro4" style:family="table-row">
      <style:table-row-properties style:row-height="1.34cm" style:use-optimal-row-height="false"/>
    </style:style>
    <style:style style:name="ro5" style:family="table-row">
      <style:table-row-properties style:row-height="1.54cm" style:use-optimal-row-height="false"/>
    </style:style>
    <style:style style:name="ce1" style:family="table-cell">
      <loext:graphic-properties draw:fill="solid" draw:fill-color="#1f3a93" draw:textarea-vertical-align="top" fo:padding-top="0.127cm" fo:padding-bottom="0.127cm" fo:padding-left="0.203cm" fo:padding-right="0.203cm"/>
      <style:paragraph-properties fo:border="0.48pt solid #000000"/>
    </style:style>
    <style:style style:name="ce2" style:family="table-cell">
      <loext:graphic-properties draw:fill="none" loext:fill-use-slide-background="false" draw:textarea-vertical-align="top" fo:padding-top="0.127cm" fo:padding-bottom="0.127cm" fo:padding-left="0.203cm" fo:padding-right="0.203cm"/>
      <style:paragraph-properties fo:border="0.48pt solid #000000"/>
    </style:style>
    <style:style style:name="ce3" style:family="table-cell">
      <loext:graphic-properties draw:fill="solid" draw:fill-color="#1a3060" draw:textarea-vertical-align="middle" fo:padding-top="0.127cm" fo:padding-bottom="0.127cm" fo:padding-left="0.254cm" fo:padding-right="0.254cm"/>
      <style:paragraph-properties fo:border="0.26pt solid #cccccc"/>
    </style:style>
    <style:style style:name="ce4" style:family="table-cell">
      <loext:graphic-properties draw:fill="none" loext:fill-use-slide-background="false" draw:textarea-vertical-align="middle" fo:padding-top="0.127cm" fo:padding-bottom="0.127cm" fo:padding-left="0.254cm" fo:padding-right="0.254cm"/>
      <style:paragraph-properties fo:border="0.26pt solid #cccccc"/>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style>
    <style:style style:name="P7" style:family="paragraph">
      <style:paragraph-properties fo:margin-top="0cm" fo:margin-bottom="0.2cm"/>
    </style:style>
    <style:style style:name="P8" style:family="paragraph">
      <style:paragraph-properties fo:margin-top="0cm" fo:margin-bottom="0.1cm"/>
    </style:style>
    <style:style style:name="P9" style:family="paragraph">
      <style:paragraph-properties fo:margin-left="0.952cm" fo:margin-right="0cm" fo:margin-top="0cm" fo:margin-bottom="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0" style:family="paragraph">
      <style:paragraph-properties fo:margin-left="2.063cm" fo:margin-right="0cm" fo:margin-top="0cm" fo:margin-bottom="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2" style:family="paragraph">
      <style:paragraph-properties fo:margin-top="0cm" fo:margin-bottom="0.1cm" fo:line-height="96%"/>
    </style:style>
    <style:style style:name="P13" style:family="paragraph">
      <loext:graphic-properties draw:fill-color="#ffffff"/>
    </style:style>
    <style:style style:name="P14" style:family="paragraph">
      <style:paragraph-properties fo:margin-left="0cm" fo:margin-right="0cm" fo:text-indent="0cm" style:line-break="strict"/>
    </style:style>
    <style:style style:name="P15" style:family="paragraph">
      <loext:graphic-properties draw:fill="none" draw:fill-color="#ffffff"/>
      <style:paragraph-properties fo:margin-left="0cm" fo:margin-right="0cm" fo:text-indent="0cm" style:line-break="strict" style:font-independent-line-spacing="true"/>
    </style:style>
    <style:style style:name="P16" style:family="paragraph">
      <loext:graphic-properties draw:fill="none" draw:fill-color="#ffffff"/>
      <style:paragraph-properties fo:margin-left="0.952cm" fo:margin-right="0cm" fo:line-height="95%" fo:text-indent="-0.864cm" style:line-break="strict" style:font-independent-line-spacing="true"/>
    </style:style>
    <style:style style:name="P17" style:family="paragraph">
      <loext:graphic-properties draw:fill="none" draw:fill-color="#ffffff"/>
      <style:text-properties fo:font-style="normal" style:font-style-asian="normal" style:font-style-complex="normal"/>
    </style:style>
    <style:style style:name="P18" style:family="paragraph">
      <loext:graphic-properties draw:fill-color="#ffffff"/>
      <style:text-properties fo:font-size="12pt"/>
    </style:style>
    <style:style style:name="P19" style:family="paragraph">
      <style:paragraph-properties fo:margin-left="0.952cm" fo:margin-right="0cm" fo:line-height="95%" fo:text-indent="-0.864cm"/>
    </style:style>
    <style:style style:name="P20" style:family="paragraph">
      <loext:graphic-properties draw:fill="none" draw:fill-color="#ffffff"/>
      <style:text-properties fo:font-style="italic" style:font-style-asian="italic" style:font-style-complex="italic"/>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3" style:family="paragraph">
      <loext:graphic-properties draw:fill="none"/>
    </style:style>
    <style:style style:name="P24"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5" style:family="paragraph">
      <style:paragraph-properties style:writing-mode="lr-tb"/>
    </style:style>
    <style:style style:name="P26" style:family="paragraph">
      <style:paragraph-properties fo:margin-left="0cm" fo:margin-right="0cm" fo:margin-top="0cm" fo:margin-bottom="0cm" fo:line-height="96%" fo:text-align="center" fo:text-indent="0cm" loext:tab-stop-distance="0cm">
        <style:tab-stops>
          <style:tab-stop style:position="0cm"/>
        </style:tab-stops>
      </style:paragraph-properties>
    </style:style>
    <style:style style:name="P27" style:family="paragraph">
      <loext:graphic-properties draw:fill="none"/>
      <style:paragraph-properties fo:text-align="center" style:font-independent-line-spacing="true"/>
      <style:text-properties fo:font-size="18pt"/>
    </style:style>
    <style:style style:name="P28" style:family="paragraph">
      <style:paragraph-properties fo:margin-left="0.952cm" fo:margin-right="0cm" fo:margin-top="0cm" fo:margin-bottom="0.502cm" fo:line-height="96%" fo:text-align="start" fo:text-indent="-0.952cm" loext:tab-stop-distance="0cm">
        <style:tab-stops>
          <style:tab-stop style:position="0cm"/>
        </style:tab-stops>
      </style:paragraph-properties>
    </style:style>
    <style:style style:name="P29" style:family="paragraph">
      <style:paragraph-properties fo:margin-left="0cm" fo:margin-right="0cm" fo:margin-top="0cm" fo:margin-bottom="0.401cm" fo:line-height="96%" fo:text-align="start" fo:text-indent="0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0" style:family="paragraph">
      <loext:graphic-properties draw:fill="none"/>
      <style:paragraph-properties fo:text-align="start" style:font-independent-line-spacing="true"/>
      <style:text-properties fo:font-size="18pt"/>
    </style:style>
    <style:style style:name="P31" style:family="paragraph">
      <style:paragraph-properties fo:margin-top="0cm" fo:margin-bottom="0.2cm" fo:line-height="100%"/>
    </style:style>
    <style:style style:name="P32" style:family="paragraph">
      <loext:graphic-properties draw:fill="none" draw:fill-color="#ffffff"/>
      <style:text-properties style:font-name="Tahoma2"/>
    </style:style>
    <style:style style:name="P33"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4" style:family="paragraph">
      <loext:graphic-properties draw:fill="none"/>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5" style:family="paragraph">
      <style:paragraph-properties fo:margin-left="0cm" fo:margin-right="0cm" fo:margin-top="0cm" fo:margin-bottom="0cm" fo:line-height="100%" fo:text-align="start" fo:text-indent="0cm"/>
    </style:style>
    <style:style style:name="P36" style:family="paragraph">
      <style:paragraph-properties fo:margin-left="1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7" style:family="paragraph">
      <style:paragraph-properties fo:margin-left="1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8" style:family="paragraph">
      <style:paragraph-properties fo:margin-left="1cm" fo:margin-right="0cm" fo:margin-top="0cm" fo:margin-bottom="0.299cm" fo:line-height="96%" fo:text-align="start" fo:text-indent="-0.635cm" style:punctuation-wrap="simple" style:line-break="strict" loext:tab-stop-distance="0cm">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39" style:family="paragraph">
      <style:paragraph-properties fo:margin-left="0cm" fo:margin-right="0cm" fo:margin-top="0cm" fo:margin-bottom="0cm" fo:line-height="96%" fo:text-align="center" fo:text-indent="0cm" loext:tab-stop-distance="0cm">
        <style:tab-stops>
          <style:tab-stop style:position="0cm"/>
        </style:tab-stops>
      </style:paragraph-properties>
    </style:style>
    <style:style style:name="P40" style:family="paragraph">
      <style:paragraph-properties fo:margin-left="0.952cm" fo:margin-right="0cm" fo:margin-top="0cm" fo:margin-bottom="0.502cm" fo:line-height="96%" fo:text-align="start" fo:text-indent="-0.952cm" loext:tab-stop-distance="0cm">
        <style:tab-stops>
          <style:tab-stop style:position="0cm"/>
        </style:tab-stops>
      </style:paragraph-properties>
    </style:style>
    <style:style style:name="P41" style:family="paragraph">
      <style:paragraph-properties fo:margin-left="0cm" fo:margin-right="0cm" fo:margin-top="0cm" fo:margin-bottom="0.401cm" fo:line-height="96%" fo:text-align="start" fo:text-indent="0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42" style:family="paragraph">
      <style:paragraph-properties fo:margin-left="0cm" fo:margin-right="0cm" fo:margin-top="0cm" fo:margin-bottom="0cm" fo:line-height="96%" fo:text-align="center" fo:text-indent="0cm" style:punctuation-wrap="simple" loext:tab-stop-distance="0cm" style:writing-mode="lr-tb">
        <style:tab-stops>
          <style:tab-stop style:position="0cm"/>
        </style:tab-stops>
      </style:paragraph-properties>
    </style:style>
    <style:style style:name="P43" style:family="paragraph">
      <loext:graphic-properties draw:fill="none"/>
      <style:paragraph-properties fo:margin-left="0cm" fo:margin-right="0cm" fo:margin-top="0cm" fo:margin-bottom="0cm" fo:line-height="96%" fo:text-align="center" fo:text-indent="0cm" style:punctuation-wrap="simple" loext:tab-stop-distance="0cm" style:font-independent-line-spacing="true">
        <style:tab-stops>
          <style:tab-stop style:position="0cm"/>
        </style:tab-stops>
      </style:paragraph-properties>
      <style:text-properties fo:font-size="44pt"/>
    </style:style>
    <style:style style:name="P44" style:family="paragraph">
      <style:paragraph-properties fo:margin-left="0.952cm" fo:margin-right="0cm" fo:margin-top="0cm" fo:margin-bottom="0cm" fo:line-height="95%" fo:text-align="center" fo:text-indent="-0.864cm" style:punctuation-wrap="simple" loext:tab-stop-distance="0cm" style:writing-mode="lr-tb">
        <style:tab-stops>
          <style:tab-stop style:position="0cm"/>
        </style:tab-stops>
      </style:paragraph-properties>
    </style:style>
    <style:style style:name="P45" style:family="paragraph">
      <loext:graphic-properties draw:fill="none" draw:fill-color="#ffffff"/>
      <style:paragraph-properties fo:margin-left="0.952cm" fo:margin-right="0cm" fo:margin-top="0cm" fo:margin-bottom="0cm" fo:line-height="95%" fo:text-align="center" fo:text-indent="-0.864cm" style:punctuation-wrap="simple" loext:tab-stop-distance="0cm" style:font-independent-line-spacing="true">
        <style:tab-stops>
          <style:tab-stop style:position="0cm"/>
        </style:tab-stops>
      </style:paragraph-properties>
      <style:text-properties fo:font-size="32pt"/>
    </style:style>
    <style:style style:name="P46" style:family="paragraph">
      <loext:graphic-properties draw:fill="solid" draw:fill-color="#ffffff"/>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P47"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8" style:family="paragraph">
      <loext:graphic-properties draw:fill="none"/>
      <style:paragraph-properties fo:text-align="start" style:font-independent-line-spacing="true"/>
      <style:text-properties fo:font-size="44pt"/>
    </style:style>
    <style:style style:name="P49" style:family="paragraph">
      <style:paragraph-properties fo:margin-left="0.952cm" fo:margin-right="0cm" fo:margin-top="0cm" fo:margin-bottom="0.502cm" fo:line-height="96%" fo:text-align="start" fo:text-indent="-0.952cm" style:punctuation-wrap="simple" loext:tab-stop-distance="0cm" style:writing-mode="lr-tb">
        <style:tab-stops>
          <style:tab-stop style:position="0cm"/>
        </style:tab-stops>
      </style:paragraph-properties>
    </style:style>
    <style:style style:name="P50" style:family="paragraph">
      <style:paragraph-properties fo:margin-left="0cm" fo:margin-right="0cm" fo:margin-top="0cm" fo:margin-bottom="0.502cm" fo:line-height="96%" fo:text-align="start" fo:text-indent="0cm" style:punctuation-wrap="simple" loext:tab-stop-distance="2.54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hyphenate="false"/>
    </style:style>
    <style:style style:name="P51" style:family="paragraph">
      <style:paragraph-properties fo:margin-left="0.952cm" fo:margin-right="0cm" fo:margin-top="0cm" fo:margin-bottom="0.502cm" fo:line-height="96%" fo:text-align="start" fo:text-indent="-0.952cm" style:punctuation-wrap="simple" loext:tab-stop-distance="2.54cm" style:writing-mode="lr-tb">
        <style:tab-stops>
          <style:tab-stop style:position="0cm"/>
        </style:tab-stops>
      </style:paragraph-properties>
      <style:text-properties fo:hyphenate="false"/>
    </style:style>
    <style:style style:name="P52" style:family="paragraph">
      <loext:graphic-properties draw:fill="none"/>
      <style:paragraph-properties fo:text-align="start" style:font-independent-line-spacing="true"/>
      <style:text-properties fo:font-size="32pt"/>
    </style:style>
    <style:style style:name="P53" style:family="paragraph">
      <style:paragraph-properties fo:margin-left="0.952cm" fo:margin-right="0cm" fo:margin-top="0cm" fo:margin-bottom="0.1cm" fo:line-height="100%" fo:text-align="start" fo:text-indent="-0.952cm" style:punctuation-wrap="simple" loext:tab-stop-distance="0cm" style:writing-mode="lr-tb">
        <style:tab-stops>
          <style:tab-stop style:position="0cm"/>
        </style:tab-stops>
      </style:paragraph-properties>
    </style:style>
    <style:style style:name="P54" style:family="paragraph">
      <style:paragraph-properties fo:margin-left="0cm" fo:margin-right="0cm" fo:margin-top="0cm" fo:margin-bottom="0.502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55" style:family="paragraph">
      <style:paragraph-properties fo:margin-left="0cm" fo:margin-right="0cm" fo:margin-top="0cm" fo:margin-bottom="0cm" fo:line-height="96%" fo:text-align="start" fo:text-indent="-0.952cm" style:punctuation-wrap="simple" loext:tab-stop-distance="0cm" style:writing-mode="lr-tb">
        <style:tab-stops>
          <style:tab-stop style:position="0cm"/>
        </style:tab-stops>
      </style:paragraph-properties>
    </style:style>
    <style:style style:name="P56" style:family="paragraph">
      <style:paragraph-properties fo:margin-left="0cm" fo:margin-right="0cm" fo:margin-top="0cm" fo:margin-bottom="0cm" fo:line-height="120%" fo:text-align="start" fo:text-indent="-0.952cm" style:punctuation-wrap="simple" loext:tab-stop-distance="0cm" style:writing-mode="lr-tb">
        <style:tab-stops>
          <style:tab-stop style:position="0cm"/>
        </style:tab-stops>
      </style:paragraph-properties>
    </style:style>
    <style:style style:name="P57" style:family="paragraph">
      <style:paragraph-properties fo:margin-left="0cm" fo:margin-right="0cm" fo:margin-top="0cm" fo:margin-bottom="0cm" fo:line-height="95%" fo:text-align="start" fo:text-indent="0cm" style:punctuation-wrap="simple" loext:tab-stop-distance="2.54cm" style:writing-mode="lr-tb">
        <style:tab-stops>
          <style:tab-stop style:position="0cm"/>
        </style:tab-stops>
      </style:paragraph-properties>
      <style:text-properties fo:font-size="18pt" fo:hyphenate="false"/>
    </style:style>
    <style:style style:name="P58" style:family="paragraph">
      <loext:graphic-properties draw:fill="none"/>
      <style:paragraph-properties fo:margin-left="0cm" fo:margin-right="0cm" fo:margin-top="0cm" fo:margin-bottom="0cm" fo:line-height="95%"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59" style:family="paragraph">
      <loext:graphic-properties draw:fill="none" draw:fill-color="#ffffff"/>
      <style:text-properties fo:color="#ce181e" loext:opacity="100%" fo:font-style="italic" fo:font-weight="bold" style:font-style-asian="italic" style:font-weight-asian="bold" style:font-style-complex="italic" style:font-weight-complex="bold"/>
    </style:style>
    <style:style style:name="P60" style:family="paragraph">
      <style:text-properties style:font-name="Courier New"/>
    </style:style>
    <style:style style:name="P61" style:family="paragraph">
      <style:paragraph-properties fo:margin-left="0.952cm" fo:margin-right="0cm" fo:margin-top="0cm" fo:margin-bottom="0.502cm"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62" style:family="paragraph">
      <style:paragraph-properties fo:margin-top="0cm" fo:margin-bottom="0.25cm" fo:line-height="100%" fo:text-align="start"/>
      <style:text-properties fo:font-size="10pt" style:font-size-asian="10pt" style:font-size-complex="10pt"/>
    </style:style>
    <style:style style:name="P63" style:family="paragraph">
      <style:paragraph-properties fo:margin-top="0cm" fo:margin-bottom="0.25cm" fo:line-height="100%"/>
    </style:style>
    <style:style style:name="P64"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65" style:family="paragraph">
      <style:paragraph-properties fo:margin-left="0cm" fo:margin-right="0cm" fo:margin-top="0cm" fo:margin-bottom="0.401cm" fo:line-height="96%" fo:text-align="start" fo:text-indent="0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66"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s>
      </style:paragraph-properties>
    </style:style>
    <style:style style:name="P67" style:family="paragraph">
      <loext:graphic-properties draw:fill="none"/>
      <style:paragraph-properties fo:text-align="start"/>
      <style:text-properties fo:font-size="18pt"/>
    </style:style>
    <style:style style:name="P68" style:family="paragraph">
      <loext:graphic-properties draw:fill="solid" draw:fill-color="#44444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9" style:family="paragraph">
      <loext:graphic-properties draw:fill="solid" draw:fill-color="#cfcfc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7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9.7999992370605pt" fo:hyphenate="false"/>
    </style:style>
    <style:style style:name="P71" style:family="paragraph">
      <loext:graphic-properties draw:fill="none"/>
      <style:paragraph-properties fo:margin-left="0cm" fo:margin-right="0cm" fo:margin-top="0cm" fo:margin-bottom="0cm" fo:line-height="100%" fo:text-align="end" fo:text-indent="0cm" style:punctuation-wrap="hanging" loext:tab-stop-distance="1.27cm" style:font-independent-line-spacing="true">
        <style:tab-stops/>
      </style:paragraph-properties>
      <style:text-properties fo:font-size="19.7999992370605pt" fo:hyphenate="false"/>
    </style:style>
    <style:style style:name="P72"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9.7999992370605pt" fo:hyphenate="false"/>
    </style:style>
    <style:style style:name="P73"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19.7999992370605pt" fo:hyphenate="false"/>
    </style:style>
    <style:style style:name="P74" style:family="paragraph">
      <style:paragraph-properties fo:margin-left="0cm" fo:margin-right="0cm" fo:margin-top="0.141cm" fo:margin-bottom="0.564cm" fo:line-height="100%" fo:text-align="start" fo:text-indent="0cm" style:punctuation-wrap="hanging" loext:tab-stop-distance="1.27cm" style:writing-mode="lr-tb">
        <style:tab-stops/>
      </style:paragraph-properties>
      <style:text-properties fo:font-size="19.7999992370605pt" fo:hyphenate="false"/>
    </style:style>
    <style:style style:name="P75" style:family="paragraph">
      <style:paragraph-properties fo:margin-left="0cm" fo:margin-right="0cm" fo:margin-top="0.141cm" fo:margin-bottom="0.353cm" fo:line-height="100%" fo:text-align="start" fo:text-indent="0cm" style:punctuation-wrap="hanging" loext:tab-stop-distance="1.27cm" style:writing-mode="lr-tb">
        <style:tab-stops/>
      </style:paragraph-properties>
      <style:text-properties fo:font-size="19.7999992370605pt" fo:hyphenate="false"/>
    </style:style>
    <style:style style:name="P76" style:family="paragraph">
      <style:paragraph-properties fo:margin-left="0cm" fo:margin-right="0cm" fo:margin-top="0.141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77" style:family="paragraph">
      <loext:graphic-properties draw:fill="none"/>
      <style:paragraph-properties fo:margin-left="0cm" fo:margin-right="0cm" fo:margin-top="0.141cm" fo:margin-bottom="0.564cm" fo:line-height="100%" fo:text-align="start" fo:text-indent="0cm" style:punctuation-wrap="hanging" loext:tab-stop-distance="1.27cm" style:font-independent-line-spacing="true">
        <style:tab-stops/>
      </style:paragraph-properties>
      <style:text-properties fo:font-size="19.7999992370605pt" fo:hyphenate="false"/>
    </style:style>
    <style:style style:name="P78" style:family="paragraph">
      <loext:graphic-properties draw:fill-color="#ffffff"/>
      <style:text-properties fo:font-size="20pt"/>
    </style:style>
    <style:style style:name="P79" style:family="paragraph">
      <style:paragraph-properties fo:margin-left="0cm" fo:margin-right="0cm" fo:margin-top="0.141cm" fo:margin-bottom="0.494cm" fo:line-height="100%" fo:text-align="start" fo:text-indent="0cm" style:punctuation-wrap="hanging" loext:tab-stop-distance="1.27cm" style:writing-mode="lr-tb">
        <style:tab-stops/>
      </style:paragraph-properties>
      <style:text-properties fo:font-size="19.7999992370605pt" fo:hyphenate="false"/>
    </style:style>
    <style:style style:name="P80" style:family="paragraph">
      <style:paragraph-properties fo:margin-left="0cm" fo:margin-right="0cm" fo:margin-top="0.353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81" style:family="paragraph">
      <style:paragraph-properties fo:margin-left="0cm" fo:margin-right="0cm" fo:margin-top="0.423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82" style:family="paragraph">
      <style:paragraph-properties fo:margin-left="0cm" fo:margin-right="0cm" fo:margin-top="0.141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83" style:family="paragraph">
      <style:paragraph-properties fo:margin-left="1.27cm" fo:margin-right="0cm" fo:margin-top="0.141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84" style:family="paragraph">
      <loext:graphic-properties draw:fill="none"/>
      <style:paragraph-properties fo:margin-left="0cm" fo:margin-right="0cm" fo:margin-top="0.141cm" fo:margin-bottom="0.494cm" fo:line-height="100%" fo:text-align="start" fo:text-indent="0cm" style:punctuation-wrap="hanging" loext:tab-stop-distance="1.27cm" style:font-independent-line-spacing="true">
        <style:tab-stops/>
      </style:paragraph-properties>
      <style:text-properties fo:font-size="19.7999992370605pt" fo:hyphenate="false"/>
    </style:style>
    <style:style style:name="P85" style:family="paragraph">
      <style:paragraph-properties fo:margin-left="1.27cm" fo:margin-right="0cm" fo:margin-top="0.141cm" fo:margin-bottom="0.353cm" fo:line-height="100%" fo:text-align="start" fo:text-indent="0cm" style:punctuation-wrap="hanging" loext:tab-stop-distance="1.27cm" style:writing-mode="lr-tb">
        <style:tab-stops/>
      </style:paragraph-properties>
      <style:text-properties fo:font-size="19.7999992370605pt" fo:hyphenate="false"/>
    </style:style>
    <style:style style:name="P86" style:family="paragraph">
      <style:paragraph-properties fo:margin-left="1.27cm" fo:margin-right="0cm" fo:margin-top="0.141cm" fo:margin-bottom="0.494cm" fo:line-height="100%" fo:text-align="start" fo:text-indent="0cm" style:punctuation-wrap="hanging" loext:tab-stop-distance="1.27cm" style:writing-mode="lr-tb">
        <style:tab-stops/>
      </style:paragraph-properties>
      <style:text-properties fo:font-size="19.7999992370605pt" fo:hyphenate="false"/>
    </style:style>
    <style:style style:name="P87" style:family="paragraph">
      <style:paragraph-properties fo:margin-left="0cm" fo:margin-right="0cm" fo:margin-top="0.141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88" style:family="paragraph">
      <style:paragraph-properties fo:margin-left="1.27cm" fo:margin-right="0cm" fo:margin-top="0.141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89" style:family="paragraph">
      <style:paragraph-properties fo:margin-left="0cm" fo:margin-right="0cm" fo:margin-top="0.282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90" style:family="paragraph">
      <style:paragraph-properties fo:margin-left="1.27cm" fo:margin-right="0cm" fo:margin-top="0.141cm" fo:margin-bottom="0.423cm" fo:line-height="100%" fo:text-align="start" fo:text-indent="0cm" style:punctuation-wrap="hanging" loext:tab-stop-distance="1.27cm" style:writing-mode="lr-tb">
        <style:tab-stops/>
      </style:paragraph-properties>
      <style:text-properties fo:font-size="19.7999992370605pt" fo:hyphenate="false"/>
    </style:style>
    <style:style style:name="P91" style:family="paragraph">
      <style:paragraph-properties fo:margin-left="0cm" fo:margin-right="0cm" fo:margin-top="0.282cm" fo:margin-bottom="0.564cm" fo:line-height="100%" fo:text-align="center" fo:text-indent="0cm" style:punctuation-wrap="hanging" loext:tab-stop-distance="1.27cm" style:writing-mode="lr-tb">
        <style:tab-stops/>
      </style:paragraph-properties>
      <style:text-properties fo:font-size="19.7999992370605pt" fo:hyphenate="false"/>
    </style:style>
    <style:style style:name="P92" style:family="paragraph">
      <style:paragraph-properties fo:margin-left="0cm" fo:margin-right="0cm" fo:margin-top="0.353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93" style:family="paragraph">
      <style:paragraph-properties fo:margin-left="0cm" fo:margin-right="0cm" fo:margin-top="0.141cm" fo:margin-bottom="0.423cm" fo:line-height="100%" fo:text-align="start" fo:text-indent="0cm" style:punctuation-wrap="hanging" loext:tab-stop-distance="1.27cm" style:writing-mode="lr-tb">
        <style:tab-stops/>
      </style:paragraph-properties>
      <style:text-properties fo:font-size="19.7999992370605pt" fo:hyphenate="false"/>
    </style:style>
    <style:style style:name="P94" style:family="paragraph">
      <style:paragraph-properties fo:margin-left="0cm" fo:margin-right="0cm" fo:margin-top="0.212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95" style:family="paragraph">
      <style:paragraph-properties fo:margin-left="1.27cm" fo:margin-right="0cm" fo:margin-top="0.141cm" fo:margin-bottom="0.564cm" fo:line-height="100%" fo:text-align="start" fo:text-indent="0cm" style:punctuation-wrap="hanging" loext:tab-stop-distance="1.27cm" style:writing-mode="lr-tb">
        <style:tab-stops/>
      </style:paragraph-properties>
      <style:text-properties fo:font-size="19.7999992370605pt" fo:hyphenate="false"/>
    </style:style>
    <style:style style:name="P96" style:family="paragraph">
      <style:paragraph-properties fo:margin-left="0cm" fo:margin-right="0cm" fo:margin-top="0.282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97" style:family="paragraph">
      <style:paragraph-properties fo:margin-left="0cm" fo:margin-right="0cm" fo:margin-top="0.282cm" fo:margin-bottom="0.423cm" fo:line-height="100%" fo:text-align="start" fo:text-indent="0cm" style:punctuation-wrap="hanging" loext:tab-stop-distance="1.27cm" style:writing-mode="lr-tb">
        <style:tab-stops/>
      </style:paragraph-properties>
      <style:text-properties fo:font-size="19.7999992370605pt" fo:hyphenate="false"/>
    </style:style>
    <style:style style:name="P98" style:family="paragraph">
      <style:paragraph-properties fo:margin-top="0cm" fo:margin-bottom="0.1cm" fo:line-height="100%"/>
    </style:style>
    <style:style style:name="P99" style:family="paragraph">
      <style:paragraph-properties fo:margin-left="0cm" fo:margin-right="0cm" fo:margin-top="0cm" fo:margin-bottom="0.502cm" fo:line-height="96%" fo:text-align="start" fo:text-indent="0cm" style:punctuation-wrap="simple" loext:tab-stop-distance="0cm" style:writing-mode="lr-tb">
        <style:tab-stops>
          <style:tab-stop style:position="0cm"/>
        </style:tab-stops>
      </style:paragraph-properties>
    </style:style>
    <style:style style:name="P10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0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2" style:family="paragraph">
      <style:paragraph-properties fo:margin-left="0.952cm" fo:margin-right="0cm" fo:margin-top="0cm" fo:margin-bottom="0.502cm" fo:line-height="120%" fo:text-align="start" fo:text-indent="-0.952cm" style:punctuation-wrap="simple" loext:tab-stop-distance="0cm" style:writing-mode="lr-tb">
        <style:tab-stops>
          <style:tab-stop style:position="0cm"/>
        </style:tab-stops>
      </style:paragraph-properties>
    </style:style>
    <style:style style:name="P103" style:family="paragraph">
      <style:paragraph-properties fo:margin-left="0cm" fo:margin-right="0cm" fo:margin-top="0cm" fo:margin-bottom="0.502cm" fo:line-height="120%"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104" style:family="paragraph">
      <style:paragraph-properties fo:margin-top="0cm" fo:margin-bottom="0.1cm" fo:line-height="100%"/>
      <style:text-properties style:font-name="Courier New"/>
    </style:style>
    <style:style style:name="P105" style:family="paragraph">
      <style:paragraph-properties fo:margin-top="0cm" fo:margin-bottom="0.1cm" fo:line-height="100%" style:text-autospace="none"/>
    </style:style>
    <style:style style:name="P106" style:family="paragraph">
      <style:paragraph-properties fo:margin-top="0cm" fo:margin-bottom="0.1cm" fo:line-height="100%"/>
      <style:text-properties style:font-name="Courier new"/>
    </style:style>
    <style:style style:name="P107" style:family="paragraph">
      <loext:graphic-properties draw:fill-color="#ffffff"/>
      <style:text-properties fo:font-size="28.1000003814697pt"/>
    </style:style>
    <style:style style:name="P108" style:family="paragraph">
      <style:paragraph-properties fo:margin-left="0cm" fo:margin-right="0cm" fo:margin-top="0.282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109" style:family="paragraph">
      <loext:graphic-properties draw:fill="none"/>
      <style:paragraph-properties fo:margin-left="0cm" fo:margin-right="0cm" fo:margin-top="0.141cm" fo:margin-bottom="0.423cm" fo:line-height="100%" fo:text-align="start" fo:text-indent="0cm" style:punctuation-wrap="hanging" loext:tab-stop-distance="1.27cm" style:font-independent-line-spacing="true">
        <style:tab-stops/>
      </style:paragraph-properties>
      <style:text-properties fo:font-size="19.7999992370605pt" fo:hyphenate="false"/>
    </style:style>
    <style:style style:name="P110" style:family="paragraph">
      <style:paragraph-properties fo:margin-left="1.27cm" fo:margin-right="0cm" fo:margin-top="0.141cm" fo:margin-bottom="0.071cm" fo:line-height="100%" fo:text-align="start" fo:text-indent="0cm" style:punctuation-wrap="hanging" loext:tab-stop-distance="1.27cm" style:writing-mode="lr-tb">
        <style:tab-stops/>
      </style:paragraph-properties>
      <style:text-properties fo:font-size="19.7999992370605pt" fo:hyphenate="false"/>
    </style:style>
    <style:style style:name="P111" style:family="paragraph">
      <style:paragraph-properties fo:margin-left="0cm" fo:margin-right="0cm" fo:margin-top="0.212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112" style:family="paragraph">
      <style:paragraph-properties fo:margin-left="0cm" fo:margin-right="0cm" fo:margin-top="0.141cm" fo:margin-bottom="0.071cm" fo:line-height="100%" fo:text-align="start" fo:text-indent="0cm" style:punctuation-wrap="hanging" loext:tab-stop-distance="1.27cm" style:writing-mode="lr-tb">
        <style:tab-stops/>
      </style:paragraph-properties>
      <style:text-properties fo:font-size="19.7999992370605pt" fo:hyphenate="false"/>
    </style:style>
    <style:style style:name="P113" style:family="paragraph">
      <loext:graphic-properties draw:fill="none"/>
      <style:paragraph-properties fo:margin-left="0cm" fo:margin-right="0cm" fo:margin-top="0.141cm" fo:margin-bottom="0.353cm" fo:line-height="100%" fo:text-align="start" fo:text-indent="0cm" style:punctuation-wrap="hanging" loext:tab-stop-distance="1.27cm" style:font-independent-line-spacing="true">
        <style:tab-stops/>
      </style:paragraph-properties>
      <style:text-properties fo:font-size="19.7999992370605pt" fo:hyphenate="false"/>
    </style:style>
    <style:style style:name="P114" style:family="paragraph">
      <loext:graphic-properties draw:fill="none"/>
      <style:paragraph-properties fo:margin-left="0cm" fo:margin-right="0cm" fo:margin-top="0.141cm" fo:margin-bottom="0.212cm" fo:line-height="100%" fo:text-align="start" fo:text-indent="0cm" style:punctuation-wrap="hanging" loext:tab-stop-distance="1.27cm" style:font-independent-line-spacing="true">
        <style:tab-stops/>
      </style:paragraph-properties>
      <style:text-properties fo:font-size="19.7999992370605pt" fo:hyphenate="false"/>
    </style:style>
    <style:style style:name="P115" style:family="paragraph">
      <style:paragraph-properties fo:margin-left="0cm" fo:margin-right="0cm" fo:margin-top="0.353cm" fo:margin-bottom="0.141cm" fo:line-height="100%" fo:text-align="center" fo:text-indent="0cm" style:punctuation-wrap="hanging" loext:tab-stop-distance="1.27cm" style:writing-mode="lr-tb">
        <style:tab-stops/>
      </style:paragraph-properties>
      <style:text-properties fo:font-size="19.7999992370605pt" fo:hyphenate="false"/>
    </style:style>
    <style:style style:name="P116" style:family="paragraph">
      <loext:graphic-properties draw:fill="none"/>
      <style:paragraph-properties fo:margin-left="0cm" fo:margin-right="0cm" fo:margin-top="0.141cm" fo:margin-bottom="0.282cm" fo:line-height="100%" fo:text-align="start" fo:text-indent="0cm" style:punctuation-wrap="hanging" loext:tab-stop-distance="1.27cm" style:font-independent-line-spacing="true">
        <style:tab-stops/>
      </style:paragraph-properties>
      <style:text-properties fo:font-size="19.7999992370605pt" fo:hyphenate="false"/>
    </style:style>
    <style:style style:name="P117" style:family="paragraph">
      <style:paragraph-properties fo:margin-top="0cm" fo:margin-bottom="0.2cm" fo:line-height="100%"/>
      <style:text-properties style:font-name="Courier New"/>
    </style:style>
    <style:style style:name="P118"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19" style:family="paragraph">
      <loext:graphic-properties draw:fill="solid" draw:fill-color="#2a2d86"/>
      <style:paragraph-properties fo:text-align="start"/>
      <style:text-properties fo:font-size="18pt"/>
    </style:style>
    <style:style style:name="P120" style:family="paragraph">
      <loext:graphic-properties draw:fill="solid" draw:fill-color="#8e9dd8"/>
      <style:paragraph-properties fo:text-align="start"/>
      <style:text-properties fo:font-size="18pt"/>
    </style:style>
    <style:style style:name="P121" style:family="paragraph">
      <loext:graphic-properties draw:fill="solid" draw:fill-color="#e83c3c"/>
      <style:paragraph-properties fo:text-align="start"/>
      <style:text-properties fo:font-size="18pt"/>
    </style:style>
    <style:style style:name="P122" style:family="paragraph">
      <loext:graphic-properties draw:fill="solid" draw:fill-color="#f2c84b"/>
      <style:paragraph-properties fo:text-align="start"/>
      <style:text-properties fo:font-size="18pt"/>
    </style:style>
    <style:style style:name="P12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9.7999992370605pt" fo:hyphenate="false"/>
    </style:style>
    <style:style style:name="P124"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9.7999992370605pt" fo:hyphenate="false"/>
    </style:style>
    <style:style style:name="P125" style:family="paragraph">
      <style:paragraph-properties fo:margin-left="0cm" fo:margin-right="0cm" fo:margin-top="0cm" fo:margin-bottom="0.282cm" fo:line-height="100%" fo:text-align="center" fo:text-indent="0cm" style:punctuation-wrap="hanging" loext:tab-stop-distance="2.54cm" style:writing-mode="lr-tb">
        <style:tab-stops>
          <style:tab-stop style:position="0cm"/>
        </style:tab-stops>
      </style:paragraph-properties>
      <style:text-properties fo:font-size="19.7999992370605pt" fo:hyphenate="false"/>
    </style:style>
    <style:style style:name="P126" style:family="paragraph">
      <loext:graphic-properties draw:fill="none"/>
      <style:paragraph-properties fo:margin-left="0cm" fo:margin-right="0cm" fo:margin-top="0cm" fo:margin-bottom="0.282cm" fo:line-height="100%" fo:text-align="center" fo:text-indent="0cm" style:punctuation-wrap="hanging" loext:tab-stop-distance="2.54cm" style:font-independent-line-spacing="true">
        <style:tab-stops>
          <style:tab-stop style:position="0cm"/>
        </style:tab-stops>
      </style:paragraph-properties>
      <style:text-properties fo:font-size="19.7999992370605pt" fo:hyphenate="false"/>
    </style:style>
    <style:style style:name="P127"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9.7999992370605pt" fo:hyphenate="false"/>
    </style:style>
    <style:style style:name="P128" style:family="paragraph">
      <loext:graphic-properties draw:fill="none"/>
      <style:paragraph-properties fo:margin-left="0cm" fo:margin-right="0cm" fo:margin-top="0cm" fo:margin-bottom="0cm" fo:line-height="100%" fo:text-align="end" fo:text-indent="0cm" style:punctuation-wrap="hanging" loext:tab-stop-distance="2.54cm" style:font-independent-line-spacing="true">
        <style:tab-stops>
          <style:tab-stop style:position="0cm"/>
        </style:tab-stops>
      </style:paragraph-properties>
      <style:text-properties fo:font-size="19.7999992370605pt" fo:hyphenate="false"/>
    </style:style>
    <style:style style:name="P129"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21pt" fo:letter-spacing="normal" fo:font-style="normal" style:text-underline-style="none" fo:font-weight="normal" fo:background-color="transparent" style:font-style-asian="normal" style:font-weight-asian="normal" style:font-style-complex="normal" style:font-weight-complex="normal"/>
    </style:style>
    <style:style style:name="P13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131"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4pt" style:font-size-asian="14pt" style:font-size-complex="14pt" fo:hyphenate="false"/>
    </style:style>
    <style:style style:name="P132" style:family="paragraph">
      <style:paragraph-properties fo:margin-left="0cm" fo:margin-right="0cm" fo:margin-top="0cm" fo:margin-bottom="0.212cm" fo:line-height="100%" fo:text-align="start" fo:text-indent="0cm" style:punctuation-wrap="hanging" loext:tab-stop-distance="2.54cm" style:writing-mode="lr-tb">
        <style:tab-stops/>
      </style:paragraph-properties>
      <style:text-properties fo:font-size="19.7999992370605pt" fo:hyphenate="false"/>
    </style:style>
    <style:style style:name="P133" style:family="paragraph">
      <style:paragraph-properties fo:margin-left="0cm" fo:margin-right="0cm" fo:margin-top="0cm" fo:margin-bottom="0.212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34" style:family="paragraph">
      <loext:graphic-properties draw:fill="none"/>
      <style:paragraph-properties fo:margin-left="0cm" fo:margin-right="0cm" fo:margin-top="0cm" fo:margin-bottom="0.212cm" fo:line-height="100%" fo:text-align="start" fo:text-indent="0cm" style:punctuation-wrap="hanging" loext:tab-stop-distance="2.54cm" style:font-independent-line-spacing="true">
        <style:tab-stops/>
      </style:paragraph-properties>
      <style:text-properties fo:font-size="19.7999992370605pt" fo:hyphenate="false"/>
    </style:style>
    <style:style style:name="P13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36"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9.7999992370605pt" fo:hyphenate="false"/>
    </style:style>
    <style:style style:name="P137" style:family="paragraph">
      <style:paragraph-properties fo:margin-left="0cm" fo:margin-right="0cm" fo:margin-top="0cm" fo:margin-bottom="0.141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38" style:family="paragraph">
      <loext:graphic-properties draw:fill="none"/>
      <style:paragraph-properties fo:margin-left="0cm" fo:margin-right="0cm" fo:margin-top="0cm" fo:margin-bottom="0.141cm" fo:line-height="100%" fo:text-align="start" fo:text-indent="0cm" style:punctuation-wrap="hanging" loext:tab-stop-distance="2.54cm" style:font-independent-line-spacing="true">
        <style:tab-stops>
          <style:tab-stop style:position="0cm"/>
        </style:tab-stops>
      </style:paragraph-properties>
      <style:text-properties fo:font-size="19.7999992370605pt" fo:hyphenate="false"/>
    </style:style>
    <style:style style:name="P139" style:family="paragraph">
      <style:paragraph-properties fo:margin-left="0cm" fo:margin-right="0cm" fo:margin-top="0cm" fo:margin-bottom="0.141cm" fo:line-height="100%" fo:text-align="center" fo:text-indent="0cm" style:punctuation-wrap="hanging" loext:tab-stop-distance="2.54cm" style:writing-mode="lr-tb">
        <style:tab-stops>
          <style:tab-stop style:position="0cm"/>
        </style:tab-stops>
      </style:paragraph-properties>
      <style:text-properties fo:font-size="19.7999992370605pt" fo:hyphenate="false"/>
    </style:style>
    <style:style style:name="P140" style:family="paragraph">
      <loext:graphic-properties draw:fill="none"/>
      <style:paragraph-properties fo:margin-left="0cm" fo:margin-right="0cm" fo:margin-top="0cm" fo:margin-bottom="0.141cm" fo:line-height="100%" fo:text-align="center" fo:text-indent="0cm" style:punctuation-wrap="hanging" loext:tab-stop-distance="2.54cm" style:font-independent-line-spacing="true">
        <style:tab-stops>
          <style:tab-stop style:position="0cm"/>
        </style:tab-stops>
      </style:paragraph-properties>
      <style:text-properties fo:font-size="19.7999992370605pt" fo:hyphenate="false"/>
    </style:style>
    <style:style style:name="P141" style:family="paragraph">
      <loext:graphic-properties draw:fill="solid" draw:fill-color="#f4f4f4"/>
      <style:paragraph-properties fo:text-align="start"/>
      <style:text-properties fo:font-size="18pt"/>
    </style:style>
    <style:style style:name="P14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26.3999996185303pt" fo:hyphenate="false"/>
    </style:style>
    <style:style style:name="P14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26.3999996185303pt" fo:hyphenate="false"/>
    </style:style>
    <style:style style:name="P144" style:family="paragraph">
      <style:paragraph-properties fo:margin-left="0cm" fo:margin-right="0cm" fo:margin-top="0cm" fo:margin-bottom="0cm" fo:line-height="96%" fo:text-align="center" fo:text-indent="0cm" style:punctuation-wrap="simple" loext:tab-stop-distance="0cm" style:writing-mode="lr-tb">
        <style:tab-stops>
          <style:tab-stop style:position="0cm"/>
        </style:tab-stops>
      </style:paragraph-properties>
    </style:style>
    <style:style style:name="P145" style:family="paragraph">
      <loext:graphic-properties draw:fill="none"/>
      <style:paragraph-properties fo:margin-left="0cm" fo:margin-right="0cm" fo:margin-top="0cm" fo:margin-bottom="0cm" fo:line-height="96%" fo:text-align="center" fo:text-indent="0cm" style:punctuation-wrap="simple" loext:tab-stop-distance="0cm" style:font-independent-line-spacing="true">
        <style:tab-stops>
          <style:tab-stop style:position="0cm"/>
        </style:tab-stops>
      </style:paragraph-properties>
      <style:text-properties fo:font-size="44pt"/>
    </style:style>
    <style:style style:name="P146" style:family="paragraph">
      <style:paragraph-properties fo:margin-left="0.952cm" fo:margin-right="0cm" fo:margin-top="0cm" fo:margin-bottom="0cm" fo:line-height="95%" fo:text-align="center" fo:text-indent="-0.864cm" style:punctuation-wrap="simple" loext:tab-stop-distance="0cm" style:writing-mode="lr-tb">
        <style:tab-stops>
          <style:tab-stop style:position="0cm"/>
        </style:tab-stops>
      </style:paragraph-properties>
      <style:text-properties fo:font-size="32pt"/>
    </style:style>
    <style:style style:name="P147" style:family="paragraph">
      <loext:graphic-properties draw:fill="none" draw:fill-color="#ffffff"/>
      <style:paragraph-properties fo:margin-left="0.952cm" fo:margin-right="0cm" fo:margin-top="0cm" fo:margin-bottom="0cm" fo:line-height="95%" fo:text-align="center" fo:text-indent="-0.864cm" style:punctuation-wrap="simple" loext:tab-stop-distance="0cm" style:font-independent-line-spacing="true">
        <style:tab-stops>
          <style:tab-stop style:position="0cm"/>
        </style:tab-stops>
      </style:paragraph-properties>
      <style:text-properties fo:font-size="32pt"/>
    </style:style>
    <style:style style:name="P148" style:family="paragraph">
      <loext:graphic-properties draw:fill="solid" draw:fill-color="#ffffff"/>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3" style:font-size-asian="24pt" style:font-style-asian="normal" style:font-weight-asian="normal" style:font-name-complex="Lucida Sans Unicode2" style:font-size-complex="24pt" style:font-style-complex="normal" style:font-weight-complex="normal"/>
    </style:style>
    <style:style style:name="P149" style:family="paragraph">
      <style:paragraph-properties fo:margin-left="0.952cm" fo:margin-right="0cm" fo:margin-top="0cm" fo:margin-bottom="0.502cm" fo:line-height="96%" fo:text-align="start" fo:text-indent="-0.952cm" style:punctuation-wrap="simple" loext:tab-stop-distance="0cm" style:writing-mode="lr-tb">
        <style:tab-stops>
          <style:tab-stop style:position="0cm"/>
        </style:tab-stops>
      </style:paragraph-properties>
    </style:style>
    <style:style style:name="P150" style:family="paragraph">
      <style:paragraph-properties fo:margin-left="0cm" fo:margin-right="0cm" fo:margin-top="0cm" fo:margin-bottom="0cm" fo:line-height="95%" fo:text-align="start" fo:text-indent="0cm" style:punctuation-wrap="simple" loext:tab-stop-distance="2.54cm" style:writing-mode="lr-tb">
        <style:tab-stops>
          <style:tab-stop style:position="0cm"/>
        </style:tab-stops>
      </style:paragraph-properties>
      <style:text-properties fo:font-size="18pt" fo:hyphenate="false"/>
    </style:style>
    <style:style style:name="P151" style:family="paragraph">
      <loext:graphic-properties draw:fill="none"/>
      <style:paragraph-properties fo:margin-left="0cm" fo:margin-right="0cm" fo:margin-top="0cm" fo:margin-bottom="0cm" fo:line-height="95%"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152"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53" style:family="paragraph">
      <style:paragraph-properties fo:margin-top="0cm" fo:margin-bottom="0.7cm"/>
    </style:style>
    <style:style style:name="P154" style:family="paragraph">
      <loext:graphic-properties draw:fill="none" draw:fill-color="#ffffff"/>
      <style:text-properties fo:color="#c9211e" loext:opacity="100%" fo:font-style="italic" fo:font-weight="bold" style:font-style-asian="italic" style:font-weight-asian="bold" style:font-style-complex="italic" style:font-weight-complex="bold"/>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42pt" fo:font-weight="bold" style:font-size-asian="42pt" style:font-weight-asian="bold" style:font-size-complex="42pt" style:font-weight-complex="bold"/>
    </style:style>
    <style:style style:name="T4" style:family="text">
      <style:text-properties fo:font-size="26pt" style:font-size-asian="26pt" style:font-size-complex="26pt"/>
    </style:style>
    <style:style style:name="T5" style:family="text">
      <style:text-properties fo:font-size="28pt" style:font-size-asian="28pt" style:font-size-complex="28pt"/>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2pt" style:font-size-asian="12pt" style:font-size-complex="12pt"/>
    </style:style>
    <style:style style:name="T9" style:family="text">
      <style:text-properties fo:font-size="9pt" style:font-size-asian="9pt" style:font-size-complex="9pt"/>
    </style:style>
    <style:style style:name="T10" style:family="text">
      <style:text-properties fo:font-size="11pt" style:font-size-asian="11pt" style:font-size-complex="11pt"/>
    </style:style>
    <style:style style:name="T11" style:family="text">
      <style:text-properties fo:font-size="48pt" fo:language="fr" fo:country="FR" style:font-size-asian="48pt" style:font-size-complex="48pt"/>
    </style:style>
    <style:style style:name="T12" style:family="text">
      <style:text-properties fo:color="#0d1f63" loext:opacity="100%" fo:language="fr" fo:country="FR" fo:font-weight="bold" style:font-weight-asian="bold" style:font-weight-complex="bold"/>
    </style:style>
    <style:style style:name="T13" style:family="text">
      <style:text-properties fo:language="fr" fo:country="FR"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style:text-position="super 58%" fo:font-size="28pt" style:font-size-asian="28pt" style:font-size-complex="28pt"/>
    </style:style>
    <style:style style:name="T16" style:family="text">
      <style:text-properties fo:font-size="20pt" fo:font-style="normal" style:font-size-asian="20pt" style:font-style-asian="normal" style:font-size-complex="20pt" style:font-style-complex="normal"/>
    </style:style>
    <style:style style:name="T17" style:family="text">
      <style:text-properties fo:font-size="20pt" fo:font-style="italic" style:font-size-asian="20pt" style:font-style-asian="italic" style:font-size-complex="20pt" style:font-style-complex="italic"/>
    </style:style>
    <style:style style:name="T18" style:family="text">
      <style:text-properties fo:color="#355269" loext:opacity="100%" fo:font-weight="bold" style:font-weight-asian="bold" style:font-weight-complex="bold"/>
    </style:style>
    <style:style style:name="T19" style:family="text">
      <style:text-properties fo:color="#2a6099" loext:opacity="100%" fo:font-style="italic" fo:font-weight="bold" style:font-style-asian="italic" style:font-weight-asian="bold" style:font-style-complex="italic" style:font-weight-complex="bold"/>
    </style:style>
    <style:style style:name="T20" style:family="text">
      <style:text-properties fo:color="#2a6099" loext:opacity="100%" style:text-position="super 58%"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color="#2a6099" loext:opacity="100%" fo:font-weight="bold" style:font-weight-asian="bold" style:font-weight-complex="bold"/>
    </style:style>
    <style:style style:name="T23" style:family="text">
      <style:text-properties fo:font-size="16pt" fo:font-style="italic" style:font-size-asian="16pt" style:font-style-asian="italic" style:font-size-complex="16pt" style:font-style-complex="italic"/>
    </style:style>
    <style:style style:name="T24" style:family="text">
      <style:text-properties fo:font-size="40pt" style:font-size-asian="40pt" style:font-size-complex="40pt"/>
    </style:style>
    <style:style style:name="T25" style:family="text">
      <style:text-properties fo:font-size="36pt" fo:font-style="italic" style:font-size-asian="36pt" style:font-style-asian="italic" style:font-size-complex="36pt" style:font-style-complex="italic"/>
    </style:style>
    <style:style style:name="T26" style:family="text">
      <style:text-properties fo:color="#000000" loext:opacity="100%" style:text-outline="false" style:text-line-through-style="none" style:text-line-through-type="none" style:text-position="0% 100%" style:font-name="Tahoma1"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27" style:family="text">
      <style:text-properties fo:font-size="24pt" style:font-size-asian="24pt" style:font-size-complex="24pt"/>
    </style:style>
    <style:style style:name="T28" style:family="text">
      <style:text-properties fo:font-size="24pt" fo:font-style="italic" style:font-size-asian="24pt" style:font-style-asian="italic" style:font-size-complex="24pt" style:font-style-complex="italic"/>
    </style:style>
    <style:style style:name="T29" style:family="text">
      <style:text-properties fo:font-size="36pt" style:font-size-asian="36pt" style:font-size-complex="36pt"/>
    </style:style>
    <style:style style:name="T30" style:family="text">
      <style:text-properties fo:font-variant="normal" fo:text-transform="none" fo:color="#000000" loext:opacity="100%" style:text-outline="false" style:text-line-through-style="none" style:text-line-through-type="none" style:text-position="0% 100%" style:font-name="Tahoma1" fo:font-size="28pt" fo:letter-spacing="normal" fo:language="fr" fo:country="FR" fo:font-style="normal" style:text-underline-style="none" fo:font-weight="normal" fo:background-color="transparent" style:font-size-asian="28pt" style:font-style-asian="normal" style:font-weight-asian="normal" style:font-name-complex="Lucida Sans Unicode2" style:font-size-complex="28pt" style:font-style-complex="normal" style:font-weight-complex="normal"/>
    </style:style>
    <style:style style:name="T31" style:family="text">
      <style:text-properties fo:color="#091c7b" loext:opacity="100%" fo:font-weight="bold" style:font-weight-asian="bold" style:font-weight-complex="bold"/>
    </style:style>
    <style:style style:name="T32" style:family="text">
      <style:text-properties fo:language="fr" fo:country="FR" fo:font-style="italic" style:font-style-asian="italic" style:font-style-complex="italic"/>
    </style:style>
    <style:style style:name="T33"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Tahoma"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6" style:family="text">
      <style:text-properties fo:color="#0d1f63" loext:opacity="100%" fo:font-style="italic" fo:font-weight="bold" style:font-style-asian="italic" style:font-weight-asian="bold" style:font-style-complex="italic" style:font-weight-complex="bold"/>
    </style:style>
    <style:style style:name="T37" style:family="text">
      <style:text-properties fo:color="#182f7c" loext:opacity="100%" fo:font-style="italic" fo:font-weight="bold" style:font-style-asian="italic" style:font-weight-asian="bold" style:font-style-complex="italic" style:font-weight-complex="bold"/>
    </style:style>
    <style:style style:name="T38" style:family="text">
      <style:text-properties fo:color="#000000" loext:opacity="100%" style:text-outline="false" style:text-line-through-style="none" style:text-line-through-type="none" style:text-position="super 58%" style:font-name="Tahoma1"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39" style:family="text">
      <style:text-properties fo:color="#000000" loext:opacity="100%" style:text-outline="false" style:text-line-through-style="none" style:text-line-through-type="none" style:text-position="0% 100%" style:font-name="Times New Roman" fo:font-size="24pt" fo:font-style="normal" fo:text-shadow="none" style:text-underline-style="none" fo:font-weight="normal" style:font-name-asian="Lucida Sans Unicode2" style:font-size-asian="24pt" style:font-style-asian="normal" style:font-weight-asian="normal" style:font-name-complex="Lucida Sans Unicode2" style:font-size-complex="24pt" style:font-style-complex="normal" style:font-weight-complex="normal" style:text-emphasize="none" style:font-relief="none" style:text-overline-style="none" style:text-overline-color="font-color"/>
    </style:style>
    <style:style style:name="T40" style:family="text">
      <style:text-properties fo:font-size="20pt" style:font-size-asian="20pt" style:font-size-complex="20pt"/>
    </style:style>
    <style:style style:name="T41" style:family="text">
      <style:text-properties fo:color="#0d1f63" loext:opacity="100%" fo:font-size="36pt" fo:font-weight="bold" style:font-size-asian="36pt" style:font-weight-asian="bold" style:font-size-complex="36pt" style:font-weight-complex="bold"/>
    </style:style>
    <style:style style:name="T42" style:family="text">
      <style:text-properties fo:font-size="21pt" style:font-size-asian="21pt" style:font-size-complex="21pt"/>
    </style:style>
    <style:style style:name="T43" style:family="text">
      <style:text-properties fo:color="#0d1f63" loext:opacity="100%" fo:font-weight="bold" style:font-weight-asian="bold" style:font-weight-complex="bold"/>
    </style:style>
    <style:style style:name="T44" style:family="text">
      <style:text-properties fo:color="#000000" loext:opacity="100%" fo:font-style="normal" fo:font-weight="normal" style:font-style-asian="normal" style:font-weight-asian="normal" style:font-style-complex="normal" style:font-weight-complex="normal"/>
    </style:style>
    <style:style style:name="T45" style:family="text">
      <style:text-properties fo:color="#182f7c" loext:opacity="100%" fo:font-weight="bold" style:font-weight-asian="bold" style:font-weight-complex="bold"/>
    </style:style>
    <style:style style:name="T46" style:family="text">
      <style:text-properties fo:color="#000099" loext:opacity="100%" fo:font-weight="bold" style:font-weight-asian="bold" style:font-weight-complex="bold"/>
    </style:style>
    <style:style style:name="T47" style:family="text">
      <style:text-properties style:font-name="Tahoma2" fo:font-size="22pt" style:font-size-asian="22pt" style:font-size-complex="22pt"/>
    </style:style>
    <style:style style:name="T48" style:family="text">
      <style:text-properties style:font-name="Tahoma2" fo:font-size="22pt" fo:font-style="italic" style:font-size-asian="22pt" style:font-style-asian="italic" style:font-size-complex="22pt" style:font-style-complex="italic"/>
    </style:style>
    <style:style style:name="T49" style:family="text">
      <style:text-properties fo:color="#182f7c" loext:opacity="100%" style:text-position="super 58%" fo:font-weight="bold" style:font-weight-asian="bold" style:font-weight-complex="bold"/>
    </style:style>
    <style:style style:name="T50" style:family="text">
      <style:text-properties fo:font-size="21pt" fo:font-style="italic" style:font-size-asian="21pt" style:font-style-asian="italic" style:font-size-complex="21pt" style:font-style-complex="italic"/>
    </style:style>
    <style:style style:name="T51" style:family="text">
      <style:text-properties fo:language="fr" fo:country="FR" fo:font-style="italic" fo:font-weight="normal" style:font-style-asian="italic" style:font-weight-asian="normal" style:font-style-complex="italic" style:font-weight-complex="normal"/>
    </style:style>
    <style:style style:name="T52" style:family="text">
      <style:text-properties fo:color="#000000" loext:opacity="100%" style:text-outline="false" style:text-line-through-style="none" style:text-line-through-type="none" style:text-position="0% 100%" style:font-name="Tahoma1"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53" style:family="text">
      <style:text-properties fo:color="#000099" loext:opacity="100%" style:text-position="super 58%" fo:font-weight="bold" style:font-weight-asian="bold" style:font-weight-complex="bold"/>
    </style:style>
    <style:style style:name="T54" style:family="text">
      <style:text-properties style:text-position="super 58%"/>
    </style:style>
    <style:style style:name="T55" style:family="text">
      <style:text-properties fo:color="#000099" loext:opacity="100%" fo:font-style="italic" fo:font-weight="bold" style:font-style-asian="italic" style:font-weight-asian="bold" style:font-style-complex="italic" style:font-weight-complex="bold"/>
    </style:style>
    <style:style style:name="T56" style:family="text">
      <style:text-properties fo:color="#0d1f63" loext:opacity="100%" style:font-name="Courier New" fo:font-style="normal" fo:font-weight="bold" style:font-style-asian="normal" style:font-weight-asian="bold" style:font-style-complex="normal" style:font-weight-complex="bold"/>
    </style:style>
    <style:style style:name="T57" style:family="text">
      <style:text-properties fo:color="#000099" loext:opacity="100%" style:text-position="super 58%" fo:font-style="italic" fo:font-weight="bold" style:font-style-asian="italic" style:font-weight-asian="bold" style:font-style-complex="italic" style:font-weight-complex="bold"/>
    </style:style>
    <style:style style:name="T58" style:family="text">
      <style:text-properties fo:font-variant="normal" fo:text-transform="none" fo:color="#ffffff" loext:opacity="100%" style:text-outline="false" style:text-line-through-style="none" style:text-line-through-type="none" style:text-position="0% 100%" style:font-name="Tahoma" fo:font-size="18pt" fo:letter-spacing="normal"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9" style:family="text">
      <style:text-properties fo:font-variant="normal" fo:text-transform="none" fo:color="#000000" loext:opacity="100%" style:text-outline="false" style:text-line-through-style="none" style:text-line-through-type="none" style:text-position="0% 100%" style:font-name="Tahoma" fo:font-size="15pt" fo:letter-spacing="normal" fo:font-style="normal" style:text-underline-style="none" fo:font-weight="bold" fo:background-color="transparent" style:font-size-asian="15pt" style:font-style-asian="normal" style:font-weight-asian="bold" style:font-size-complex="15pt" style:font-style-complex="normal" style:font-weight-complex="bold"/>
    </style:style>
    <style:style style:name="T60" style:family="text">
      <style:text-properties fo:font-variant="normal" fo:text-transform="none" fo:color="#000000" loext:opacity="100%" style:text-outline="false" style:text-line-through-style="none" style:text-line-through-type="none" style:text-position="0% 100%" style:font-name="Tahoma"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1" style:family="text">
      <style:text-properties fo:color="#1e6a39" loext:opacity="100%" fo:font-weight="bold" style:font-weight-asian="bold" style:font-weight-complex="bold"/>
    </style:style>
    <style:style style:name="T62" style:family="text">
      <style:text-properties fo:font-variant="normal" fo:text-transform="none" fo:color="#091c7b" loext:opacity="100%" style:text-outline="false" style:text-line-through-style="none" style:text-line-through-type="none" style:text-position="0% 100%" style:font-name="Tahoma"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63" style:family="text">
      <style:text-properties fo:font-variant="normal" fo:text-transform="none" fo:color="#091c7b" loext:opacity="100%" style:text-outline="false" style:text-line-through-style="none" style:text-line-through-type="none" style:text-position="0% 100%" style:font-name="Tahoma" fo:font-size="28pt" fo:letter-spacing="normal" fo:language="fr" fo:country="FR" fo:font-style="italic" style:text-underline-style="none" fo:font-weight="bold" fo:background-color="transparent" style:font-size-asian="28pt" style:font-style-asian="italic" style:font-weight-asian="bold" style:font-size-complex="28pt" style:font-style-complex="italic" style:font-weight-complex="bold"/>
    </style:style>
    <style:style style:name="T64" style:family="text">
      <style:text-properties fo:color="#0d1f63" loext:opacity="100%" style:text-outline="false" style:text-line-through-style="none" style:text-line-through-type="none" style:text-position="0% 100%" style:font-name="Tahoma1" fo:font-size="32pt" fo:font-style="italic" fo:text-shadow="none" style:text-underline-style="none" fo:font-weight="bold" style:font-name-asian="Lucida Sans Unicode2" style:font-size-asian="32pt" style:font-style-asian="italic" style:font-weight-asian="normal" style:font-name-complex="Lucida Sans Unicode2" style:font-size-complex="32pt" style:font-style-complex="italic" style:font-weight-complex="bold" style:text-emphasize="none" style:font-relief="none" style:text-overline-style="none" style:text-overline-color="font-color"/>
    </style:style>
    <style:style style:name="T65" style:family="text">
      <style:text-properties fo:color="#0d1f63" loext:opacity="100%" fo:font-style="italic" fo:font-weight="bold" style:font-style-asian="italic" style:font-style-complex="italic" style:font-weight-complex="bold"/>
    </style:style>
    <style:style style:name="T66" style:family="text">
      <style:text-properties fo:color="#000000" loext:opacity="100%" style:text-outline="false" style:text-line-through-style="none" style:text-line-through-type="none" style:text-position="0% 100%" style:font-name="Tahoma1" fo:font-size="32pt" fo:font-style="italic" fo:text-shadow="none" style:text-underline-style="none" fo:font-weight="normal" style:font-name-asian="Lucida Sans Unicode2" style:font-size-asian="32pt" style:font-style-asian="italic" style:font-weight-asian="normal" style:font-name-complex="Lucida Sans Unicode2" style:font-size-complex="32pt" style:font-style-complex="italic" style:font-weight-complex="normal" style:text-emphasize="none" style:font-relief="none" style:text-overline-style="none" style:text-overline-color="font-color"/>
    </style:style>
    <style:style style:name="T67" style:family="text">
      <style:text-properties fo:color="#0d1f63" loext:opacity="100%" style:text-outline="false" style:text-line-through-style="none" style:text-line-through-type="none" style:text-position="0% 100%" style:font-name="Tahoma1" fo:font-size="24pt" fo:font-style="italic" fo:text-shadow="none" style:text-underline-style="none" fo:font-weight="bold" style:font-name-asian="Lucida Sans Unicode2" style:font-size-asian="24pt" style:font-style-asian="italic" style:font-weight-asian="bold" style:font-name-complex="Lucida Sans Unicode2" style:font-size-complex="24pt" style:font-style-complex="italic" style:font-weight-complex="bold" style:text-emphasize="none" style:font-relief="none" style:text-overline-style="none" style:text-overline-color="font-color"/>
    </style:style>
    <style:style style:name="T68" style:family="text">
      <style:text-properties fo:color="#000000" loext:opacity="100%" style:text-outline="false" style:text-line-through-style="none" style:text-line-through-type="none" style:text-position="0% 100%" style:font-name="Tahoma1" fo:font-size="28pt" fo:font-style="italic" fo:text-shadow="none" style:text-underline-style="none" fo:font-weight="normal" style:font-name-asian="Lucida Sans Unicode2" style:font-size-asian="28pt" style:font-style-asian="italic" style:font-weight-asian="normal" style:font-name-complex="Lucida Sans Unicode2" style:font-size-complex="28pt" style:font-style-complex="italic" style:font-weight-complex="normal" style:text-emphasize="none" style:font-relief="none" style:text-overline-style="none" style:text-overline-color="font-color"/>
    </style:style>
    <style:style style:name="T69"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70" style:family="text">
      <style:text-properties fo:font-variant="normal" fo:text-transform="none" fo:color="#091c7b"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style:style>
    <style:style style:name="T71" style:family="text">
      <style:text-properties fo:font-variant="normal" fo:text-transform="none" fo:color="#000000" loext:opacity="100%" style:text-outline="false" style:text-line-through-style="none" style:text-line-through-type="none" style:text-position="0% 100%" style:font-name="Tahoma"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ahoma1" fo:font-size="48pt" fo:letter-spacing="normal" fo:language="fr" fo:country="FR" fo:font-style="normal" style:text-underline-style="none" fo:font-weight="normal" fo:background-color="transparent" style:font-size-asian="48pt" style:font-style-asian="normal" style:font-weight-asian="normal" style:font-name-complex="Lucida Sans Unicode2" style:font-size-complex="48pt" style:font-style-complex="normal" style:font-weight-complex="normal">
        <loext:char-complex-color loext:theme-type="dark1" loext:color-type="theme"/>
      </style:text-properties>
    </style:style>
    <style:style style:name="T74"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75" style:family="text">
      <style:text-properties fo:font-variant="normal" fo:text-transform="none" fo:color="#0d1f63" loext:opacity="100%" style:text-outline="false" style:text-line-through-style="none" style:text-line-through-type="none" style:text-position="0% 100%" style:font-name="Tahoma1"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76"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Tahoma1" fo:font-size="44pt" fo:letter-spacing="normal" fo:language="fr" fo:country="FR" fo:font-style="normal" style:text-underline-style="none" fo:font-weight="normal" fo:background-color="transparent" style:font-size-asian="44pt" style:font-style-asian="normal" style:font-weight-asian="normal" style:font-name-complex="Lucida Sans Unicode2" style:font-size-complex="44pt" style:font-style-complex="normal" style:font-weight-complex="normal">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urier new" fo:font-size="20pt" fo:letter-spacing="normal" fo:language="fr" fo:country="FR" fo:font-style="normal" style:text-underline-style="none" fo:font-weight="normal" fo:background-color="transparent" style:font-size-asian="20pt" style:font-style-asian="normal" style:font-weight-asian="normal" style:font-name-complex="Lucida Sans Unicode2" style:font-size-complex="20pt" style:font-style-complex="normal" style:font-weight-complex="normal"/>
    </style:style>
    <style:style style:name="T80" style:family="text">
      <style:text-properties fo:font-variant="normal" fo:text-transform="none" fo:color="#000099" loext:opacity="100%" style:text-outline="false" style:text-line-through-style="none" style:text-line-through-type="none" style:text-position="0% 100%" style:font-name="Courier new" fo:font-size="20pt" fo:letter-spacing="normal" fo:language="fr" fo:country="FR" fo:font-style="normal" style:text-underline-style="none" fo:font-weight="bold" fo:background-color="transparent" style:font-size-asian="20pt" style:font-style-asian="normal" style:font-weight-asian="bold" style:font-name-complex="Lucida Sans Unicode2" style:font-size-complex="20pt" style:font-style-complex="normal" style:font-weight-complex="bold"/>
    </style:style>
    <style:style style:name="T81" style:family="text">
      <style:text-properties fo:font-variant="normal" fo:text-transform="none" fo:color="#0d1f63" loext:opacity="100%" style:text-outline="false" style:text-line-through-style="none" style:text-line-through-type="none" style:text-position="0% 100%" style:font-name="Tahoma1"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82" style:family="text">
      <style:text-properties fo:font-variant="normal" fo:text-transform="none" fo:color="#569cd6" loext:opacity="100%" style:text-outline="false" style:text-line-through-style="none" style:text-line-through-type="none" style:text-position="0% 100%" style:font-name="Consolas1"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83" style:family="text">
      <style:text-properties fo:font-variant="normal" fo:text-transform="none" fo:color="#000099" loext:opacity="100%" style:text-outline="false" style:text-line-through-style="none" style:text-line-through-type="none" style:text-position="0% 100%" style:font-name="Tahoma1"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84" style:family="text">
      <style:text-properties fo:font-variant="normal" fo:text-transform="none" fo:color="#000000" loext:opacity="100%" style:text-outline="false" style:text-line-through-style="none" style:text-line-through-type="none" style:text-position="0% 100%" style:font-name="Courier New" fo:font-size="24pt" fo:letter-spacing="normal" fo:language="fr" fo:country="FR" fo:font-style="normal" style:text-underline-style="none" fo:font-weight="normal" fo:background-color="transparent" style:font-size-asian="24pt" style:font-style-asian="normal" style:font-weight-asian="normal" style:font-name-complex="Lucida Sans Unicode2" style:font-size-complex="24pt" style:font-style-complex="normal" style:font-weight-complex="normal"/>
    </style:style>
    <style:style style:name="T85"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loext:char-complex-color loext:theme-type="dark1" loext:color-type="theme"/>
      </style:text-properties>
    </style:style>
    <style:style style:name="T86" style:family="text">
      <style:text-properties fo:font-variant="normal" fo:text-transform="none" fo:color="#000099" loext:opacity="100%" style:text-outline="false" style:text-line-through-style="none" style:text-line-through-type="none" style:text-position="0% 100%" style:font-name="Courier New" fo:font-size="9pt" fo:letter-spacing="normal" fo:language="fr" fo:country="FR" fo:font-style="italic" style:text-underline-style="none" fo:font-weight="bold" fo:background-color="transparent" style:font-size-asian="9pt" style:font-style-asian="italic" style:font-weight-asian="bold" style:font-name-complex="Courier New" style:font-size-complex="9pt" style:font-style-complex="italic" style:font-weight-complex="bold"/>
    </style:style>
    <style:style style:name="T87"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normal" style:text-underline-style="solid" style:text-underline-width="auto" style:text-underline-color="font-color"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88"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fr" fo:country="FR" fo:font-style="normal" style:text-underline-style="none" fo:font-weight="normal" fo:background-color="transparent" style:font-size-asian="28pt" style:font-style-asian="normal" style:font-weight-asian="normal" style:font-name-complex="Lucida Sans Unicode2" style:font-size-complex="28pt" style:font-style-complex="normal" style:font-weight-complex="normal"/>
    </style:style>
    <style:style style:name="T89" style:family="text">
      <style:text-properties fo:font-variant="normal" fo:text-transform="none" fo:color="#064280" loext:opacity="100%" style:text-outline="false" style:text-line-through-style="none" style:text-line-through-type="none" style:text-position="0% 100%" style:font-name="Tahoma1"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90" style:family="text">
      <style:text-properties fo:font-variant="normal" fo:text-transform="none" fo:color="#064280" loext:opacity="100%" style:text-outline="false" style:text-line-through-style="none" style:text-line-through-type="none" style:text-position="0% 100%" style:font-name="Tahoma1"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91" style:family="text">
      <style:text-properties fo:font-variant="normal" fo:text-transform="none" fo:color="#064280" loext:opacity="100%" style:text-outline="false" style:text-line-through-style="none" style:text-line-through-type="none" style:text-position="0% 100%" style:font-name="Tahoma1"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loext:char-complex-color loext:theme-type="dark1" loext:color-type="theme"/>
      </style:text-properties>
    </style:style>
    <style:style style:name="T92" style:family="text">
      <style:text-properties fo:font-variant="normal" fo:text-transform="none" fo:color="#ce181e" loext:opacity="100%" style:text-outline="false" style:text-line-through-style="none" style:text-line-through-type="none" style:text-position="0% 100%" style:font-name="Times New Roman" fo:font-size="24pt" fo:letter-spacing="normal" fo:language="fr" fo:country="FR" fo:font-style="italic" style:text-underline-style="none" fo:font-weight="bold" fo:background-color="transparent" style:font-name-asian="Lucida Sans Unicode1" style:font-size-asian="24pt" style:font-style-asian="italic" style:font-weight-asian="bold" style:font-name-complex="Lucida Sans Unicode2" style:font-size-complex="24pt" style:font-style-complex="italic" style:font-weight-complex="bold"/>
    </style:style>
    <style:style style:name="T93" style:family="text">
      <style:text-properties fo:color="#355269" loext:opacity="100%" fo:font-style="italic" fo:font-weight="bold" style:font-style-asian="italic" style:font-weight-asian="bold" style:font-style-complex="italic" style:font-weight-complex="bold"/>
    </style:style>
    <style:style style:name="T94" style:family="text">
      <style:text-properties fo:color="#ce181e" loext:opacity="100%" fo:font-style="italic" fo:font-weight="bold" style:font-style-asian="italic" style:font-weight-asian="bold" style:font-style-complex="italic" style:font-weight-complex="bold"/>
    </style:style>
    <style:style style:name="T95" style:family="text">
      <style:text-properties style:font-name="Courier New" fo:font-size="28pt" style:font-size-asian="28pt" style:font-size-complex="28pt"/>
    </style:style>
    <style:style style:name="T96" style:family="text">
      <style:text-properties style:font-name="Courier New" fo:font-size="21pt" style:font-size-asian="21pt" style:font-size-complex="21pt"/>
    </style:style>
    <style:style style:name="T97" style:family="text">
      <style:text-properties style:font-name="Courier New"/>
    </style:style>
    <style:style style:name="T98" style:family="text">
      <style:text-properties fo:color="#000099" loext:opacity="100%" style:font-name="Courier New" fo:font-size="21pt" fo:font-weight="bold" style:font-size-asian="21pt" style:font-weight-asian="bold" style:font-size-complex="21pt" style:font-weight-complex="bold"/>
    </style:style>
    <style:style style:name="T99" style:family="text">
      <style:text-properties fo:color="#0d1f63" loext:opacity="100%" style:font-name="Courier new" fo:font-size="26pt" fo:font-style="italic" fo:font-weight="bold" style:font-size-asian="26pt" style:font-style-asian="italic" style:font-weight-asian="bold" style:font-size-complex="26pt" style:font-style-complex="italic" style:font-weight-complex="bold"/>
    </style:style>
    <style:style style:name="T100" style:family="text">
      <style:text-properties style:font-name="Courier new" fo:font-size="26pt" style:font-size-asian="26pt" style:font-size-complex="26pt"/>
    </style:style>
    <style:style style:name="T101"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102" style:family="text">
      <style:text-properties fo:color="#3465a4" loext:opacity="100%" fo:font-weight="bold" style:font-weight-asian="bold" style:font-weight-complex="bold"/>
    </style:style>
    <style:style style:name="T103" style:family="text">
      <style:text-properties fo:color="#0d1f63" loext:opacity="100%"/>
    </style:style>
    <style:style style:name="T104" style:family="text">
      <style:text-properties fo:color="#091c7b" loext:opacity="100%" fo:font-style="italic" fo:font-weight="bold" style:font-style-asian="italic" style:font-weight-asian="bold" style:font-style-complex="italic" style:font-weight-complex="bold"/>
    </style:style>
    <style:style style:name="T105" style:family="text">
      <style:text-properties fo:color="#0d1f63" loext:opacity="100%" fo:font-size="26pt" fo:font-style="italic" fo:font-weight="bold" style:font-size-asian="26pt" style:font-style-asian="italic" style:font-weight-asian="bold" style:font-size-complex="26pt" style:font-style-complex="italic" style:font-weight-complex="bold"/>
    </style:style>
    <style:style style:name="T106" style:family="text">
      <style:text-properties fo:font-size="26pt" fo:font-style="italic" style:font-size-asian="26pt" style:font-style-asian="italic" style:font-size-complex="26pt" style:font-style-complex="italic"/>
    </style:style>
    <style:style style:name="T107" style:family="text">
      <style:text-properties fo:font-size="32pt" fo:font-weight="bold" style:font-size-asian="32pt" style:font-weight-asian="bold" style:font-size-complex="32pt" style:font-weight-complex="bold"/>
    </style:style>
    <style:style style:name="T108" style:family="text">
      <style:text-properties fo:font-size="32pt" style:font-size-asian="32pt" style:font-size-complex="32pt"/>
    </style:style>
    <style:style style:name="T109" style:family="text">
      <style:text-properties fo:font-size="14pt" fo:font-weight="bold" style:font-size-asian="14pt" style:font-weight-asian="bold" style:font-size-complex="14pt" style:font-weight-complex="bold"/>
    </style:style>
    <style:style style:name="T110" style:family="text">
      <style:text-properties fo:font-size="40pt" fo:font-style="italic" style:font-size-asian="40pt" style:font-style-asian="italic" style:font-size-complex="40pt" style:font-style-complex="italic"/>
    </style:style>
    <style:style style:name="T111" style:family="text">
      <style:text-properties fo:color="#0d1f63" loext:opacity="100%" fo:font-size="28pt" fo:font-weight="bold" style:font-size-asian="28pt" style:font-weight-asian="bold" style:font-size-complex="28pt" style:font-weight-complex="bold"/>
    </style:style>
    <style:style style:name="T112" style:family="text">
      <style:text-properties fo:font-variant="normal" fo:text-transform="none" fo:color="#000000" loext:opacity="100%" style:text-outline="false" style:text-line-through-style="none" style:text-line-through-type="none" style:text-position="0% 100%" style:font-name="Tahoma"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113" style:family="text">
      <style:text-properties fo:font-size="28pt" fo:language="fr" fo:country="FR" style:font-size-asian="28pt" style:font-size-complex="28pt"/>
    </style:style>
    <style:style style:name="T114" style:family="text">
      <style:text-properties fo:font-variant="normal" fo:text-transform="none" fo:color="#000000" loext:opacity="100%" style:text-outline="false" style:text-line-through-style="none" style:text-line-through-type="none" style:text-position="0% 100%" style:font-name="Tahoma" fo:font-size="26pt" fo:letter-spacing="normal" fo:language="fr" fo:country="FR"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115" style:family="text">
      <style:text-properties fo:font-variant="normal" fo:text-transform="none" fo:color="#000000"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6"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17"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18"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9"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120" style:family="text">
      <style:text-properties fo:font-variant="normal" fo:text-transform="none" fo:color="#555555" loext:opacity="100%" style:text-outline="false" style:text-line-through-style="none" style:text-line-through-type="none" style:text-position="0% 100%" style:font-name="Calibri1"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12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2"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23" style:family="text">
      <style:text-properties fo:font-variant="normal" fo:text-transform="none" fo:color="#000000" loext:opacity="100%" style:text-outline="false" style:text-line-through-style="none" style:text-line-through-type="none" style:text-position="0% 100%" style:font-name="Calibri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24"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25"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126"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italic" style:text-underline-style="none" fo:font-weight="bold" fo:background-color="transparent" style:font-size-asian="22pt" style:font-style-asian="italic" style:font-weight-asian="bold" style:font-size-complex="22pt" style:font-style-complex="italic" style:font-weight-complex="bold"/>
    </style:style>
    <style:style style:name="T127" style:family="text">
      <style:text-properties fo:font-variant="normal" fo:text-transform="none" fo:color="#555555" loext:opacity="10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28"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italic" style:text-underline-style="none" fo:font-weight="bold" fo:background-color="transparent" style:font-size-asian="21pt" style:font-style-asian="italic" style:font-weight-asian="bold" style:font-size-complex="21pt" style:font-style-complex="italic" style:font-weight-complex="bold"/>
    </style:style>
    <style:style style:name="T129"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30" style:family="text">
      <style:text-properties fo:font-variant="normal" fo:text-transform="none" fo:color="#555555" loext:opacity="100%" style:text-outline="false" style:text-line-through-style="none" style:text-line-through-type="none" style:text-position="0% 100%" style:font-name="Calibri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31"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32" style:family="text">
      <style:text-properties fo:font-variant="normal" fo:text-transform="none" fo:color="#555555"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3"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34"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5"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36"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137"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3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40" style:family="text">
      <style:text-properties fo:font-variant="normal" fo:text-transform="none" fo:color="#555555"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41" style:family="text">
      <style:text-properties fo:font-variant="normal" fo:text-transform="none" fo:color="#000000" loext:opacity="100%" style:text-outline="false" style:text-line-through-style="none" style:text-line-through-type="none" style:text-position="0% 100%" style:font-name="Calibri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142" style:family="text">
      <style:text-properties fo:font-variant="normal" fo:text-transform="none" fo:color="#000000" loext:opacity="100%" style:text-outline="false" style:text-line-through-style="none" style:text-line-through-type="none" style:text-position="0% 100%" style:font-name="Calibri1" fo:font-size="26pt" fo:letter-spacing="normal" fo:language="en" fo:country="US" fo:font-style="italic" style:text-underline-style="none" fo:font-weight="bold" fo:background-color="transparent" style:font-size-asian="26pt" style:font-style-asian="italic" style:font-weight-asian="bold" style:font-size-complex="26pt" style:font-style-complex="italic" style:font-weight-complex="bold"/>
    </style:style>
    <style:style style:name="T143"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144"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45"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46"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style:style>
    <style:style style:name="T147" style:family="text">
      <style:text-properties fo:font-variant="normal" fo:text-transform="none" fo:color="#555555" loext:opacity="100%" style:text-outline="false" style:text-line-through-style="none" style:text-line-through-type="none" style:text-position="0% 100%" style:font-name="Calibri1" fo:font-size="15pt" fo:letter-spacing="normal" fo:language="en" fo:country="US"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148" style:family="text">
      <style:text-properties fo:font-variant="normal" fo:text-transform="none" fo:color="#555555"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49" style:family="text">
      <style:text-properties fo:font-variant="normal" fo:text-transform="none" fo:color="#000000" loext:opacity="100%" style:text-outline="false" style:text-line-through-style="none" style:text-line-through-type="none" style:text-position="0% 100%" style:font-name="Calibri1"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150"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51"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T152"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normal" style:text-underline-style="none" fo:font-weight="bold" fo:background-color="transparent" style:font-size-asian="17pt" style:font-style-asian="normal" style:font-weight-asian="bold" style:font-size-complex="17pt" style:font-style-complex="normal" style:font-weight-complex="bold"/>
    </style:style>
    <style:style style:name="T153"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54" style:family="text">
      <style:text-properties fo:font-variant="normal" fo:text-transform="none" fo:color="#555555" loext:opacity="100%" style:text-outline="false" style:text-line-through-style="none" style:text-line-through-type="none" style:text-position="0% 100%" style:font-name="Calibri1"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55" style:family="text">
      <style:text-properties fo:font-variant="normal" fo:text-transform="none" fo:color="#555555" loext:opacity="100%" style:text-outline="false" style:text-line-through-style="none" style:text-line-through-type="none" style:text-position="0% 100%" style:font-name="Calibri1"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style:style>
    <style:style style:name="T156" style:family="text">
      <style:text-properties fo:font-variant="normal" fo:text-transform="none" fo:color="#002060" loext:opacity="100%" style:text-outline="false" style:text-line-through-style="none" style:text-line-through-type="none" style:text-position="0% 100%" style:font-name="Tahoma1"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57"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158" style:family="text">
      <style:text-properties fo:color="#355269" loext:opacity="100%" style:font-name="Courier New" fo:font-weight="bold" style:font-weight-asian="bold" style:font-weight-complex="bold"/>
    </style:style>
    <style:style style:name="T159" style:family="text">
      <style:text-properties fo:font-size="44pt" style:font-size-asian="44pt" style:font-size-complex="44pt"/>
    </style:style>
    <style:style style:name="T160" style:family="text">
      <style:text-properties fo:font-size="44pt" fo:font-style="italic" style:font-size-asian="44pt" style:font-style-asian="italic" style:font-size-complex="44pt" style:font-style-complex="italic"/>
    </style:style>
    <style:style style:name="T161" style:family="text">
      <style:text-properties fo:color="#1e6a39" loext:opacity="100%" style:font-name="Monospace" fo:font-size="15pt" fo:font-weight="bold" style:font-name-asian="Monospace" style:font-size-asian="15pt" style:font-weight-asian="bold" style:font-name-complex="Monospace" style:font-size-complex="15pt" style:font-weight-complex="bold"/>
    </style:style>
    <style:style style:name="T162" style:family="text">
      <style:text-properties fo:color="#000000" loext:opacity="100%" style:font-name="Monospace" fo:font-size="15pt" style:font-name-asian="Monospace" style:font-size-asian="15pt" style:font-name-complex="Monospace" style:font-size-complex="15pt"/>
    </style:style>
    <style:style style:name="T163" style:family="text">
      <style:text-properties fo:color="#7f0055" loext:opacity="100%" style:font-name="Monospace" fo:font-size="15pt" fo:font-weight="bold" style:font-name-asian="Monospace" style:font-size-asian="15pt" style:font-weight-asian="bold" style:font-name-complex="Monospace" style:font-size-complex="15pt" style:font-weight-complex="bold"/>
    </style:style>
    <style:style style:name="T164" style:family="text">
      <style:text-properties fo:color="#000000" loext:opacity="100%" style:font-name="Monospace" fo:font-size="15pt" style:text-underline-style="none" style:font-name-asian="Monospace" style:font-size-asian="15pt" style:font-name-complex="Monospace" style:font-size-complex="15pt"/>
    </style:style>
    <style:style style:name="T165" style:family="text">
      <style:text-properties fo:color="#7f0055" loext:opacity="100%" style:text-outline="false" style:text-line-through-style="none" style:text-line-through-type="none" style:text-position="0% 100%" style:font-name="Monospace" fo:font-size="16pt" fo:font-style="normal" fo:text-shadow="none" style:text-underline-style="none" fo:font-weight="bold" style:font-name-asian="Monospace" style:font-size-asian="16pt" style:font-style-asian="normal" style:font-weight-asian="bold" style:font-name-complex="Monospace" style:font-size-complex="16pt" style:font-style-complex="normal" style:font-weight-complex="bold" style:text-emphasize="none" style:font-relief="none" style:text-overline-style="none" style:text-overline-color="font-color"/>
    </style:style>
    <style:style style:name="T166" style:family="text">
      <style:text-properties fo:color="#000000"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67" style:family="text">
      <style:text-properties fo:color="#6a3e3e"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68"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69"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70" style:family="text">
      <style:text-properties fo:color="#355269" loext:opacity="100%" style:font-name="Courier New" fo:font-size="18pt" fo:font-weight="bold" style:font-size-asian="18pt" style:font-weight-asian="bold" style:font-size-complex="18pt" style:font-weight-complex="bold"/>
    </style:style>
    <style:style style:name="T171" style:family="text">
      <style:text-properties style:font-name="Courier New" fo:font-size="18pt" style:font-size-asian="18pt" style:font-size-complex="18pt"/>
    </style:style>
    <style:style style:name="T172" style:family="text">
      <style:text-properties style:font-name="Courier new" fo:font-size="22pt" style:font-size-asian="22pt" style:font-size-complex="22pt"/>
    </style:style>
    <style:style style:name="T173" style:family="text">
      <style:text-properties style:font-name="Courier new" fo:font-size="24pt" style:font-size-asian="24pt" style:font-size-complex="24pt"/>
    </style:style>
    <style:style style:name="T174" style:family="text">
      <style:text-properties fo:font-size="24pt" fo:font-style="normal" style:font-size-asian="24pt" style:font-style-asian="normal" style:font-size-complex="24pt" style:font-style-complex="normal"/>
    </style:style>
    <style:style style:name="T175" style:family="text">
      <style:text-properties fo:font-size="26pt" fo:font-style="normal" style:font-size-asian="26pt" style:font-style-asian="normal" style:font-size-complex="26pt" style:font-style-complex="normal"/>
    </style:style>
    <style:style style:name="T176" style:family="text">
      <style:text-properties fo:color="#0d1f63" loext:opacity="100%" style:text-outline="false" style:text-line-through-style="none" style:text-line-through-type="none" style:text-position="0% 100%" style:font-name="Tahoma1" fo:font-size="28pt" fo:font-style="italic" fo:text-shadow="none" style:text-underline-style="none" fo:font-weight="bold" style:font-name-asian="Lucida Sans Unicode2" style:font-size-asian="28pt" style:font-style-asian="italic" style:font-weight-asian="bold" style:font-name-complex="Lucida Sans Unicode2" style:font-size-complex="28pt" style:font-style-complex="italic" style:font-weight-complex="bold" style:text-emphasize="none" style:font-relief="none" style:text-overline-style="none" style:text-overline-color="font-color"/>
    </style:style>
    <style:style style:name="T177" style:family="text">
      <style:text-properties style:text-position="super 58%" fo:font-size="32pt" style:font-size-asian="32pt" style:font-size-complex="32pt"/>
    </style:style>
    <style:style style:name="T178" style:family="text">
      <style:text-properties style:font-name="Courier new" fo:font-size="18pt" style:font-size-asian="18pt" style:font-size-complex="18pt"/>
    </style:style>
    <style:style style:name="T179" style:family="text">
      <style:text-properties fo:color="#006d6f" loext:opacity="100%" style:font-name="Courier new" fo:font-size="18pt" fo:font-weight="bold" style:font-size-asian="18pt" style:font-weight-asian="bold" style:font-size-complex="18pt" style:font-weight-complex="bold"/>
    </style:style>
    <style:style style:name="T180" style:family="text">
      <style:text-properties style:font-name="Courier new"/>
    </style:style>
    <style:style style:name="T181" style:family="text">
      <style:text-properties fo:color="#0d1f63" loext:opacity="100%" fo:font-size="32pt" fo:font-style="italic" fo:font-weight="bold" style:font-size-asian="32pt" style:font-style-asian="italic" style:font-weight-asian="bold" style:font-size-complex="32pt" style:font-style-complex="italic" style:font-weight-complex="bold"/>
    </style:style>
    <style:style style:name="T182" style:family="text">
      <style:text-properties style:font-name="Courier new" fo:font-size="13pt" style:font-size-asian="13pt" style:font-size-complex="13pt"/>
    </style:style>
    <style:style style:name="T183" style:family="text">
      <style:text-properties fo:color="#00a933" loext:opacity="100%" style:font-name="Courier new" fo:font-size="13pt" fo:font-weight="bold" style:font-size-asian="13pt" style:font-weight-asian="bold" style:font-size-complex="13pt" style:font-weight-complex="bold"/>
    </style:style>
    <style:style style:name="T184"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italic" style:text-underline-style="none" fo:font-weight="bold" fo:background-color="transparent" style:font-size-asian="17pt" style:font-style-asian="italic" style:font-weight-asian="bold" style:font-size-complex="17pt" style:font-style-complex="italic" style:font-weight-complex="bold"/>
    </style:style>
    <style:style style:name="T185"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italic" style:text-underline-style="none" fo:font-weight="normal" fo:background-color="transparent" style:font-size-asian="17pt" style:font-style-asian="italic" style:font-weight-asian="normal" style:font-size-complex="17pt" style:font-style-complex="italic" style:font-weight-complex="normal"/>
    </style:style>
    <style:style style:name="T186" style:family="text">
      <style:text-properties fo:font-variant="normal" fo:text-transform="none" fo:color="#555555"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7"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188"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89"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190" style:family="text">
      <style:text-properties fo:font-variant="normal" fo:text-transform="none" fo:color="#555555"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1" style:family="text">
      <style:text-properties fo:font-variant="normal" fo:text-transform="none" fo:color="#555555" loext:opacity="100%" style:text-outline="false" style:text-line-through-style="none" style:text-line-through-type="none" style:text-position="0% 100%" style:font-name="Calibri1" fo:font-size="14pt" fo:letter-spacing="normal" fo:language="en" fo:country="US"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193"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outline="false" style:text-line-through-style="none" style:text-line-through-type="none" style:text-position="0% 100%" style:font-name="Calibri1" fo:font-size="19pt" fo:letter-spacing="normal" fo:language="en" fo:country="US" fo:font-style="normal" style:text-underline-style="none" fo:font-weight="bold" fo:background-color="transparent" style:font-size-asian="19pt" style:font-style-asian="normal" style:font-weight-asian="bold" style:font-size-complex="19pt" style:font-style-complex="normal" style:font-weight-complex="bold"/>
    </style:style>
    <style:style style:name="T195"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96" style:family="text">
      <style:text-properties fo:font-variant="normal" fo:text-transform="none" fo:color="#555555" loext:opacity="100%" style:text-outline="false" style:text-line-through-style="none" style:text-line-through-type="none" style:text-position="0% 100%" style:font-name="Calibri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197" style:family="text">
      <style:text-properties fo:language="fr" fo:country="FR" fo:font-weight="bold" style:font-weight-asian="bold" style:font-weight-complex="bold"/>
    </style:style>
    <style:style style:name="T198" style:family="text">
      <style:text-properties fo:color="#064280" loext:opacity="100%" fo:language="fr" fo:country="FR" fo:font-weight="bold" style:font-weight-asian="bold" style:font-weight-complex="bold"/>
    </style:style>
    <style:style style:name="T199" style:family="text">
      <style:text-properties fo:color="#000000" loext:opacity="100%" fo:language="fr" fo:country="FR" fo:font-weight="normal" style:font-weight-asian="normal" style:font-weight-complex="normal"/>
    </style:style>
    <style:style style:name="T200" style:family="text">
      <style:text-properties fo:color="#064280" loext:opacity="100%" fo:font-style="italic" fo:font-weight="bold" style:font-style-asian="italic" style:font-weight-asian="bold" style:font-style-complex="italic" style:font-weight-complex="bold"/>
    </style:style>
    <style:style style:name="T201" style:family="text">
      <style:text-properties style:font-name="Courier New" fo:font-size="24pt" style:font-size-asian="24pt" style:font-size-complex="24pt"/>
    </style:style>
    <style:style style:name="T202" style:family="text">
      <style:text-properties style:font-name="Courier New" fo:font-size="16pt" style:font-size-asian="16pt" style:font-size-complex="16pt"/>
    </style:style>
    <style:style style:name="T203" style:family="text">
      <style:text-properties style:font-name="Courier New" fo:font-size="20pt" style:font-size-asian="20pt" style:font-size-complex="20pt"/>
    </style:style>
    <style:style style:name="T204" style:family="text">
      <style:text-properties fo:color="#3465a4" loext:opacity="100%" fo:font-style="italic" fo:font-weight="bold" style:font-style-asian="italic" style:font-weight-asian="bold" style:font-style-complex="italic" style:font-weight-complex="bold"/>
    </style:style>
    <style:style style:name="T205" style:family="text">
      <style:text-properties fo:color="#3465a4" loext:opacity="100%" fo:font-size="16pt" fo:font-weight="bold" style:font-size-asian="16pt" style:font-weight-asian="bold" style:font-size-complex="16pt" style:font-weight-complex="bold"/>
    </style:style>
    <style:style style:name="T206" style:family="text">
      <style:text-properties fo:color="#3465a4" loext:opacity="100%" style:font-name="Courier New" fo:font-size="18pt" fo:font-weight="bold" style:font-size-asian="18pt" style:font-weight-asian="bold" style:font-size-complex="18pt" style:font-weight-complex="bold"/>
    </style:style>
    <style:style style:name="T207" style:family="text">
      <style:text-properties style:font-name="Courier New" fo:font-size="22pt" style:font-size-asian="22pt" style:font-size-complex="22pt"/>
    </style:style>
    <style:style style:name="T208" style:family="text">
      <style:text-properties fo:color="#000000" loext:opacity="100%" style:text-outline="false" style:text-line-through-style="none" style:text-line-through-type="none" style:text-position="0% 100%" style:font-name="Courier New"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209" style:family="text">
      <style:text-properties style:font-name="Courier New" fo:font-size="26pt" style:font-size-asian="26pt" style:font-size-complex="26pt"/>
    </style:style>
    <style:style style:name="T210" style:family="text">
      <style:text-properties fo:color="#127622" loext:opacity="100%" style:font-name="Courier New" fo:font-size="24pt" fo:font-weight="bold" style:font-size-asian="24pt" style:font-weight-asian="bold" style:font-size-complex="24pt" style:font-weight-complex="bold"/>
    </style:style>
    <style:style style:name="T211" style:family="text">
      <style:text-properties fo:color="#000099" loext:opacity="100%" style:font-name="Courier New" fo:font-size="24pt" fo:font-weight="bold" style:font-size-asian="24pt" style:font-weight-asian="bold" style:font-size-complex="24pt" style:font-weight-complex="bold"/>
    </style:style>
    <style:style style:name="T212" style:family="text">
      <style:text-properties fo:color="#064280" loext:opacity="100%" fo:font-size="22pt" fo:font-style="italic" fo:font-weight="bold" style:font-size-asian="22pt" style:font-style-asian="italic" style:font-weight-asian="bold" style:font-size-complex="22pt" style:font-style-complex="italic" style:font-weight-complex="bold"/>
    </style:style>
    <style:style style:name="T213" style:family="text">
      <style:text-properties fo:color="#064280" loext:opacity="100%" fo:font-weight="bold" style:font-weight-asian="bold" style:font-weight-complex="bold"/>
    </style:style>
    <style:style style:name="T214" style:family="text">
      <style:text-properties fo:color="#064280" loext:opacity="100%" style:font-name="Courier New" fo:font-size="24pt" fo:font-weight="bold" style:font-size-asian="24pt" style:font-weight-asian="bold" style:font-size-complex="24pt" style:font-weight-complex="bold"/>
    </style:style>
    <style:style style:name="T215" style:family="text">
      <style:text-properties fo:font-variant="normal" fo:text-transform="none" fo:color="#000000" loext:opacity="100%" style:text-outline="false" style:text-line-through-style="none" style:text-line-through-type="none" style:text-position="0% 100%" style:font-name="DejaVu Sans" fo:font-size="36pt" fo:letter-spacing="normal" fo:language="en" fo:country="US" fo:font-style="normal" style:text-underline-style="none" fo:font-weight="normal" fo:background-color="transparent" style:font-name-asian="DejaVu Sans2" style:font-size-asian="36pt" style:font-style-asian="normal" style:font-weight-asian="normal" style:font-name-complex="DejaVu Sans" style:font-size-complex="36pt" style:font-style-complex="normal" style:font-weight-complex="normal"/>
    </style:style>
    <style:style style:name="T216" style:family="text">
      <style:text-properties fo:font-variant="normal" fo:text-transform="none" fo:color="#1f2d5c" loext:opacity="100%" style:text-outline="false" style:text-line-through-style="none" style:text-line-through-type="none" style:text-position="0% 100%" style:font-name="DejaVu Sans" fo:font-size="26pt" fo:letter-spacing="normal" fo:language="en" fo:country="US" fo:font-style="normal" style:text-underline-style="none" fo:font-weight="bold" fo:background-color="transparent" style:font-name-asian="DejaVu Sans2" style:font-size-asian="26pt" style:font-style-asian="normal" style:font-weight-asian="bold" style:font-name-complex="DejaVu Sans" style:font-size-complex="26pt" style:font-style-complex="normal" style:font-weight-complex="bold"/>
    </style:style>
    <style:style style:name="T217" style:family="text">
      <style:text-properties fo:font-variant="normal" fo:text-transform="none" fo:color="#000000" loext:opacity="100%" style:text-outline="false" style:text-line-through-style="none" style:text-line-through-type="none" style:text-position="0% 100%" style:font-name="DejaVu Sans" fo:font-size="26pt" fo:letter-spacing="normal" fo:language="en" fo:country="US" fo:font-style="normal" style:text-underline-style="none" fo:font-weight="normal" fo:background-color="transparent" style:font-name-asian="DejaVu Sans2" style:font-size-asian="26pt" style:font-style-asian="normal" style:font-weight-asian="normal" style:font-name-complex="DejaVu Sans" style:font-size-complex="26pt" style:font-style-complex="normal" style:font-weight-complex="normal"/>
    </style:style>
    <style:style style:name="T218" style:family="text">
      <style:text-properties fo:font-variant="normal" fo:text-transform="none" fo:color="#000000" loext:opacity="100%" style:text-outline="false" style:text-line-through-style="none" style:text-line-through-type="none" style:text-position="0% 100%" style:font-name="DejaVu Sans"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 style:font-size-complex="11pt" style:font-style-complex="normal" style:font-weight-complex="normal"/>
    </style:style>
    <style:style style:name="T219"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220"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 style:font-size-complex="18pt" style:font-style-complex="normal" style:font-weight-complex="normal"/>
    </style:style>
    <style:style style:name="T221" style:family="text">
      <style:text-properties fo:font-variant="normal" fo:text-transform="none" fo:color="#000000" loext:opacity="100%" style:text-outline="false" style:text-line-through-style="none" style:text-line-through-type="none" style:text-position="0% 100%" style:font-name="DejaVu Sans Mono" fo:font-size="16pt" fo:letter-spacing="normal" fo:language="en" fo:country="US" fo:font-style="normal" style:text-underline-style="none" fo:font-weight="normal" fo:background-color="transparent" style:font-name-asian="DejaVu Sans Mono1" style:font-size-asian="16pt" style:font-style-asian="normal" style:font-weight-asian="normal" style:font-name-complex="DejaVu Sans Mono" style:font-size-complex="16pt" style:font-style-complex="normal" style:font-weight-complex="normal"/>
    </style:style>
    <style:style style:name="T222"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name-asian="DejaVu Sans Mono1" style:font-size-asian="16pt" style:font-style-asian="normal" style:font-weight-asian="normal" style:font-name-complex="DejaVu Sans Mono" style:font-size-complex="16pt" style:font-style-complex="normal" style:font-weight-complex="normal">
        <loext:char-complex-color loext:theme-type="dark1" loext:color-type="theme"/>
      </style:text-properties>
    </style:style>
    <style:style style:name="T223" style:family="text">
      <style:text-properties fo:font-variant="normal" fo:text-transform="none" fo:color="#000000" loext:opacity="100%" style:text-outline="false" style:text-line-through-style="none" style:text-line-through-type="none" style:text-position="0% 100%" style:font-name="DejaVu Sans Mono" fo:font-size="14pt" fo:letter-spacing="normal" fo:language="en" fo:country="US" fo:font-style="normal" style:text-underline-style="none" fo:font-weight="normal" fo:background-color="transparent" style:font-name-asian="DejaVu Sans Mono1" style:font-size-asian="14pt" style:font-style-asian="normal" style:font-weight-asian="normal" style:font-name-complex="DejaVu Sans Mono" style:font-size-complex="14pt" style:font-style-complex="normal" style:font-weight-complex="normal"/>
    </style:style>
    <style:style style:name="T224"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name-asian="DejaVu Sans Mono1" style:font-size-asian="14pt" style:font-style-asian="normal" style:font-weight-asian="normal" style:font-name-complex="DejaVu Sans Mono" style:font-size-complex="14pt" style:font-style-complex="normal" style:font-weight-complex="normal">
        <loext:char-complex-color loext:theme-type="dark1" loext:color-type="theme"/>
      </style:text-properties>
    </style:style>
    <style:style style:name="T225" style:family="text">
      <style:text-properties fo:font-variant="normal" fo:text-transform="none" fo:color="#000000" loext:opacity="100%" style:text-outline="false" style:text-line-through-style="none" style:text-line-through-type="none" style:text-position="0% 100%" style:font-name="DejaVu Sans Mono" fo:font-size="12pt" fo:letter-spacing="normal" fo:language="en" fo:country="US" fo:font-style="normal" style:text-underline-style="none" fo:font-weight="normal" fo:background-color="transparent" style:font-name-asian="DejaVu Sans Mono1" style:font-size-asian="12pt" style:font-style-asian="normal" style:font-weight-asian="normal" style:font-name-complex="DejaVu Sans Mono" style:font-size-complex="12pt" style:font-style-complex="normal" style:font-weight-complex="normal"/>
    </style:style>
    <style:style style:name="T226"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name-asian="DejaVu Sans Mono1" style:font-size-asian="12pt" style:font-style-asian="normal" style:font-weight-asian="normal" style:font-name-complex="DejaVu Sans Mono" style:font-size-complex="12pt" style:font-style-complex="normal" style:font-weight-complex="normal">
        <loext:char-complex-color loext:theme-type="dark1" loext:color-type="theme"/>
      </style:text-properties>
    </style:style>
    <style:style style:name="T227" style:family="text">
      <style:text-properties fo:font-variant="normal" fo:text-transform="none" fo:color="#000000" loext:opacity="100%" style:text-outline="false" style:text-line-through-style="none" style:text-line-through-type="none" style:text-position="0% 100%" style:font-name="DejaVu Sans Mono" fo:font-size="13pt" fo:letter-spacing="normal" fo:language="en" fo:country="US" fo:font-style="normal" style:text-underline-style="none" fo:font-weight="normal" fo:background-color="transparent" style:font-name-asian="DejaVu Sans Mono1" style:font-size-asian="13pt" style:font-style-asian="normal" style:font-weight-asian="normal" style:font-name-complex="DejaVu Sans Mono" style:font-size-complex="13pt" style:font-style-complex="normal" style:font-weight-complex="normal"/>
    </style:style>
    <style:style style:name="T228" style:family="text">
      <style:text-properties fo:font-variant="normal" fo:text-transform="none" fo:color="#000000" loext:opacity="100%" style:text-outline="false" style:text-line-through-style="none" style:text-line-through-type="none" style:text-position="0% 100%" style:font-name="Calibri1" fo:font-size="13pt" fo:letter-spacing="normal" fo:language="en" fo:country="US" fo:font-style="normal" style:text-underline-style="none" fo:font-weight="normal" fo:background-color="transparent" style:font-name-asian="DejaVu Sans Mono1" style:font-size-asian="13pt" style:font-style-asian="normal" style:font-weight-asian="normal" style:font-name-complex="DejaVu Sans Mono" style:font-size-complex="13pt" style:font-style-complex="normal" style:font-weight-complex="normal">
        <loext:char-complex-color loext:theme-type="dark1" loext:color-type="theme"/>
      </style:text-properties>
    </style:style>
    <style:style style:name="T229" style:family="text">
      <style:text-properties fo:font-variant="normal" fo:text-transform="none" fo:color="#000000" loext:opacity="100%" style:text-outline="false" style:text-line-through-style="none" style:text-line-through-type="none" style:text-position="0% 100%" style:font-name="DejaVu Sans" fo:font-size="16pt" fo:letter-spacing="normal" fo:language="en" fo:country="US" fo:font-style="normal" style:text-underline-style="none" fo:font-weight="normal" fo:background-color="transparent" style:font-name-asian="DejaVu Sans2" style:font-size-asian="16pt" style:font-style-asian="normal" style:font-weight-asian="normal" style:font-name-complex="DejaVu Sans" style:font-size-complex="16pt" style:font-style-complex="normal" style:font-weight-complex="normal"/>
    </style:style>
    <style:style style:name="T230" style:family="text">
      <style:text-properties fo:font-variant="normal" fo:text-transform="none" fo:color="#000000" loext:opacity="100%" style:text-outline="false" style:text-line-through-style="none" style:text-line-through-type="none" style:text-position="0% 100%" style:font-name="DejaVu Sans Mono" fo:font-size="11pt" fo:letter-spacing="normal" fo:language="en" fo:country="US" fo:font-style="normal" style:text-underline-style="none" fo:font-weight="normal" fo:background-color="transparent" style:font-name-asian="DejaVu Sans Mono1" style:font-size-asian="11pt" style:font-style-asian="normal" style:font-weight-asian="normal" style:font-name-complex="DejaVu Sans Mono" style:font-size-complex="11pt" style:font-style-complex="normal" style:font-weight-complex="normal"/>
    </style:style>
    <style:style style:name="T231"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name-asian="DejaVu Sans Mono1" style:font-size-asian="11pt" style:font-style-asian="normal" style:font-weight-asian="normal" style:font-name-complex="DejaVu Sans Mono" style:font-size-complex="11pt" style:font-style-complex="normal" style:font-weight-complex="normal">
        <loext:char-complex-color loext:theme-type="dark1" loext:color-type="theme"/>
      </style:text-properties>
    </style:style>
    <style:style style:name="T232" style:family="text">
      <style:text-properties fo:font-variant="normal" fo:text-transform="none" fo:color="#666666"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 style:font-size-complex="12pt" style:font-style-complex="normal" style:font-weight-complex="normal"/>
    </style:style>
    <style:style style:name="T233" style:family="text">
      <style:text-properties fo:font-variant="normal" fo:text-transform="none" fo:color="#000000" loext:opacity="100%" style:text-outline="false" style:text-line-through-style="none" style:text-line-through-type="none" style:text-position="0% 100%" style:font-name="Calibri" fo:font-size="40pt" fo:letter-spacing="normal" fo:language="en" fo:country="US" fo:font-style="normal" style:text-underline-style="none" fo:font-weight="normal" fo:background-color="transparent" style:font-name-asian="Calibri2" style:font-size-asian="40pt" style:font-style-asian="normal" style:font-weight-asian="normal" style:font-name-complex="Calibri" style:font-size-complex="40pt" style:font-style-complex="normal" style:font-weight-complex="normal"/>
    </style:style>
    <style:style style:name="T234" style:family="text">
      <style:text-properties fo:font-variant="normal" fo:text-transform="none" fo:color="#0a0a0a"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Calibri2" style:font-size-asian="24pt" style:font-style-asian="normal" style:font-weight-asian="normal" style:font-name-complex="Calibri" style:font-size-complex="24pt" style:font-style-complex="normal" style:font-weight-complex="normal"/>
    </style:style>
    <style:style style:name="T235" style:family="text">
      <style:text-properties fo:font-variant="normal" fo:text-transform="none" fo:color="#1a306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Calibri2" style:font-size-asian="24pt" style:font-style-asian="normal" style:font-weight-asian="bold" style:font-name-complex="Calibri" style:font-size-complex="24pt" style:font-style-complex="normal" style:font-weight-complex="bold"/>
    </style:style>
    <style:style style:name="T236"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2" style:font-size-asian="32pt" style:font-style-asian="normal" style:font-weight-asian="normal" style:font-name-complex="Calibri" style:font-size-complex="32pt" style:font-style-complex="normal" style:font-weight-complex="normal"/>
    </style:style>
    <style:style style:name="T237" style:family="text">
      <style:text-properties fo:font-variant="normal" fo:text-transform="none" fo:color="#1a306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name-asian="Calibri2" style:font-size-asian="18pt" style:font-style-asian="normal" style:font-weight-asian="bold" style:font-name-complex="Calibri" style:font-size-complex="18pt" style:font-style-complex="normal" style:font-weight-complex="bold"/>
    </style:style>
    <style:style style:name="T238" style:family="text">
      <style:text-properties fo:font-variant="normal" fo:text-transform="none" fo:color="#0a0a0a"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Calibri2" style:font-size-asian="18pt" style:font-style-asian="normal" style:font-weight-asian="normal" style:font-name-complex="Calibri" style:font-size-complex="18pt" style:font-style-complex="normal" style:font-weight-complex="normal"/>
    </style:style>
    <style:style style:name="T239" style:family="text">
      <style:text-properties fo:font-variant="normal" fo:text-transform="none" fo:color="#000000" loext:opacity="100%" style:text-outline="false" style:text-line-through-style="none" style:text-line-through-type="none" style:text-position="0% 100%" style:font-name="Calibri" fo:font-size="8pt" fo:letter-spacing="normal" fo:language="en" fo:country="US" fo:font-style="normal" style:text-underline-style="none" fo:font-weight="normal" fo:background-color="transparent" style:font-name-asian="Calibri2" style:font-size-asian="8pt" style:font-style-asian="normal" style:font-weight-asian="normal" style:font-name-complex="Calibri" style:font-size-complex="8pt" style:font-style-complex="normal" style:font-weight-complex="normal"/>
    </style:style>
    <style:style style:name="T240"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name-asian="Calibri2" style:font-size-asian="44pt" style:font-style-asian="normal" style:font-weight-asian="normal" style:font-name-complex="Calibri" style:font-size-complex="44pt" style:font-style-complex="normal" style:font-weight-complex="normal"/>
    </style:style>
    <style:style style:name="T241" style:family="text">
      <style:text-properties fo:font-variant="normal" fo:text-transform="none" fo:color="#0a0a0a" loext:opacity="100%" style:text-outline="false" style:text-line-through-style="none" style:text-line-through-type="none" style:text-position="0% 100%" style:font-name="Consolas" fo:font-size="13pt" fo:letter-spacing="normal" fo:language="en" fo:country="US" fo:font-style="normal" style:text-underline-style="none" fo:font-weight="normal" fo:background-color="transparent" style:font-name-asian="Consolas2" style:font-size-asian="13pt" style:font-style-asian="normal" style:font-weight-asian="normal" style:font-name-complex="Consolas" style:font-size-complex="13pt" style:font-style-complex="normal" style:font-weight-complex="normal"/>
    </style:style>
    <style:style style:name="T242" style:family="text">
      <style:text-properties fo:font-variant="normal" fo:text-transform="none" fo:color="#0a0a0a" loext:opacity="100%" style:text-outline="false" style:text-line-through-style="none" style:text-line-through-type="none" style:text-position="0% 100%" style:font-name="Calibri" fo:font-size="16pt" fo:letter-spacing="normal" fo:language="en" fo:country="US" fo:font-style="italic" style:text-underline-style="none" fo:font-weight="normal" fo:background-color="transparent" style:font-name-asian="Calibri2" style:font-size-asian="16pt" style:font-style-asian="italic" style:font-weight-asian="normal" style:font-name-complex="Calibri" style:font-size-complex="16pt" style:font-style-complex="italic" style:font-weight-complex="normal"/>
    </style:style>
    <style:style style:name="T243" style:family="text">
      <style:text-properties fo:font-variant="normal" fo:text-transform="none" fo:color="#1a3060"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 style:font-size-complex="16pt" style:font-style-complex="normal" style:font-weight-complex="bold"/>
    </style:style>
    <style:style style:name="T244" style:family="text">
      <style:text-properties fo:font-variant="normal" fo:text-transform="none" fo:color="#0a0a0a"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245" style:family="text">
      <style:text-properties fo:font-variant="normal" fo:text-transform="none" fo:color="#ffffff"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 style:font-size-complex="15pt" style:font-style-complex="normal" style:font-weight-complex="bold"/>
    </style:style>
    <style:style style:name="T246" style:family="text">
      <style:text-properties fo:font-variant="normal" fo:text-transform="none" fo:color="#1a3060"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 style:font-size-complex="15pt" style:font-style-complex="normal" style:font-weight-complex="bold"/>
    </style:style>
    <style:style style:name="T247" style:family="text">
      <style:text-properties fo:font-variant="normal" fo:text-transform="none" fo:color="#0a0a0a"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name-asian="Calibri2" style:font-size-asian="15pt" style:font-style-asian="normal" style:font-weight-asian="normal" style:font-name-complex="Calibri" style:font-size-complex="15pt" style:font-style-complex="normal" style:font-weight-complex="normal"/>
    </style:style>
    <style:style style:name="T248" style:family="text">
      <style:text-properties fo:font-variant="normal" fo:text-transform="none" fo:color="#000000" loext:opacity="100%" style:text-outline="false" style:text-line-through-style="none" style:text-line-through-type="none" style:text-position="0% 100%" style:font-name="Tahoma1" fo:font-size="48pt" fo:letter-spacing="normal" fo:language="fr" fo:country="FR" fo:font-style="normal" style:text-underline-style="none" fo:font-weight="normal" fo:background-color="transparent" style:font-size-asian="48pt" style:font-style-asian="normal" style:font-weight-asian="normal" style:font-name-complex="Lucida Sans Unicode2" style:font-size-complex="48pt" style:font-style-complex="normal" style:font-weight-complex="normal"/>
    </style:style>
    <style:style style:name="T249"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250" style:family="text">
      <style:text-properties fo:font-variant="normal" fo:text-transform="none" fo:color="#0d1f63" loext:opacity="100%" style:text-outline="false" style:text-line-through-style="none" style:text-line-through-type="none" style:text-position="0% 100%" style:font-name="Tahoma1"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251"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252" style:family="text">
      <style:text-properties fo:font-variant="normal" fo:text-transform="none" fo:color="#000000" loext:opacity="100%" style:text-outline="false" style:text-line-through-style="none" style:text-line-through-type="none" style:text-position="0% 100%" style:font-name="Tahoma1" fo:font-size="44pt" fo:letter-spacing="normal" fo:language="fr" fo:country="FR" fo:font-style="normal" style:text-underline-style="none" fo:font-weight="normal" fo:background-color="transparent" style:font-size-asian="44pt" style:font-style-asian="normal" style:font-weight-asian="normal" style:font-name-complex="Lucida Sans Unicode2" style:font-size-complex="44pt" style:font-style-complex="normal" style:font-weight-complex="normal"/>
    </style:style>
    <style:style style:name="T253" style:family="text">
      <style:text-properties fo:font-variant="normal" fo:text-transform="none" fo:color="#0070c0" loext:opacity="100%" style:text-outline="false" style:text-line-through-style="none" style:text-line-through-type="none" style:text-position="0% 100%" style:font-name="Tahoma1"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254" style:family="text">
      <style:text-properties fo:font-variant="normal" fo:text-transform="none" fo:color="#000000" loext:opacity="100%" style:text-outline="false" style:text-line-through-style="none" style:text-line-through-type="none" style:text-position="0% 100%" style:font-name="Tahoma1" fo:font-size="29pt" fo:letter-spacing="normal" fo:language="fr" fo:country="FR" fo:font-style="normal" style:text-underline-style="none" fo:font-weight="normal" fo:background-color="transparent" style:font-size-asian="29pt" style:font-style-asian="normal" style:font-weight-asian="normal" style:font-name-complex="Lucida Sans Unicode2" style:font-size-complex="29pt" style:font-style-complex="normal" style:font-weight-complex="normal"/>
    </style:style>
    <style:style style:name="T255" style:family="text">
      <style:text-properties fo:font-variant="normal" fo:text-transform="none" fo:color="#0070c0" loext:opacity="100%" style:text-outline="false" style:text-line-through-style="none" style:text-line-through-type="none" style:text-position="0% 100%" style:font-name="Tahoma1" fo:font-size="29pt" fo:letter-spacing="normal" fo:language="fr" fo:country="FR" fo:font-style="normal" style:text-underline-style="none" fo:font-weight="normal" fo:background-color="transparent" style:font-size-asian="29pt" style:font-style-asian="normal" style:font-weight-asian="normal" style:font-name-complex="Lucida Sans Unicode2" style:font-size-complex="29pt" style:font-style-complex="normal" style:font-weight-complex="normal"/>
    </style:style>
    <style:style style:name="T256" style:family="text">
      <style:text-properties fo:font-variant="normal" fo:text-transform="none" fo:color="#c00000" loext:opacity="100%" style:text-outline="false" style:text-line-through-style="none" style:text-line-through-type="none" style:text-position="0% 100%" style:font-name="Tahoma1"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257" style:family="text">
      <style:text-properties fo:font-variant="normal" fo:text-transform="none" fo:color="#0070c0" loext:opacity="100%" style:text-outline="false" style:text-line-through-style="none" style:text-line-through-type="none" style:text-position="0% 100%" style:font-name="Tahoma1" fo:font-size="33pt" fo:letter-spacing="normal" fo:language="fr" fo:country="FR" fo:font-style="normal" style:text-underline-style="none" fo:font-weight="bold" fo:background-color="transparent" style:font-size-asian="33pt" style:font-style-asian="normal" style:font-weight-asian="bold" style:font-name-complex="Lucida Sans Unicode2" style:font-size-complex="33pt" style:font-style-complex="normal" style:font-weight-complex="bold"/>
    </style:style>
    <style:style style:name="T258" style:family="text">
      <style:text-properties fo:font-variant="normal" fo:text-transform="none" fo:color="#0070c0" loext:opacity="100%" style:text-outline="false" style:text-line-through-style="none" style:text-line-through-type="none" style:text-position="0% 100%" style:font-name="Tahoma1"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style:style>
    <style:style style:name="T259" style:family="text">
      <style:text-properties fo:font-variant="normal" fo:text-transform="none" fo:color="#0070c0" loext:opacity="100%" style:text-outline="false" style:text-line-through-style="none" style:text-line-through-type="none" style:text-position="0% 100%" style:font-name="Tahoma1"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260" style:family="text">
      <style:text-properties fo:font-variant="normal" fo:text-transform="none" fo:color="#000000" loext:opacity="100%" style:text-outline="false" style:text-line-through-style="none" style:text-line-through-type="none" style:text-position="0% 100%" style:font-name="DejaVu Sans1"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61" style:family="text">
      <style:text-properties fo:font-variant="normal" fo:text-transform="none" fo:color="#c00000" loext:opacity="100%" style:text-outline="false" style:text-line-through-style="none" style:text-line-through-type="none" style:text-position="0% 100%" style:font-name="Tahoma1"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262" style:family="text">
      <style:text-properties fo:font-variant="normal" fo:text-transform="none" fo:color="#000000" loext:opacity="100%" style:text-outline="false" style:text-line-through-style="none" style:text-line-through-type="none" style:text-position="0% 100%" style:font-name="DejaVu Sans1"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263" style:family="text">
      <style:text-properties fo:font-variant="normal" fo:text-transform="none" fo:color="#00566a" loext:opacity="100%" style:text-outline="false" style:text-line-through-style="none" style:text-line-through-type="none" style:text-position="0% 100%" style:font-name="DejaVu Sans1"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264" style:family="text">
      <style:text-properties fo:font-variant="normal" fo:text-transform="none" fo:color="#2d7c31" loext:opacity="100%" style:text-outline="false" style:text-line-through-style="none" style:text-line-through-type="none" style:text-position="0% 100%" style:font-name="DejaVu Sans1"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65" style:family="text">
      <style:text-properties fo:font-variant="normal" fo:text-transform="none" fo:color="#f57e16" loext:opacity="100%" style:text-outline="false" style:text-line-through-style="none" style:text-line-through-type="none" style:text-position="0% 100%" style:font-name="DejaVu Sans1"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66" style:family="text">
      <style:text-properties fo:font-variant="normal" fo:text-transform="none" fo:color="#cc0000" loext:opacity="100%" style:text-outline="false" style:text-line-through-style="none" style:text-line-through-type="none" style:text-position="0% 100%" style:font-name="DejaVu Sans1"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267" style:family="text">
      <style:text-properties fo:font-variant="normal" fo:text-transform="none" fo:color="#000000" loext:opacity="100%" style:text-outline="false" style:text-line-through-style="none" style:text-line-through-type="none" style:text-position="0% 100%" style:font-name="DejaVu Sans1" fo:font-size="18pt" fo:letter-spacing="normal" fo:language="en" fo:country="US"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68" style:family="text">
      <style:text-properties fo:font-variant="normal" fo:text-transform="none" fo:color="#1464c0" loext:opacity="100%" style:text-outline="false" style:text-line-through-style="none" style:text-line-through-type="none" style:text-position="0% 100%" style:font-name="DejaVu Sans1" fo:font-size="18pt" fo:letter-spacing="normal" fo:language="fr" fo:country="FR" fo:font-style="italic" style:text-underline-style="none" fo:font-weight="normal" fo:background-color="transparent" style:font-size-asian="18pt" style:font-style-asian="italic" style:font-weight-asian="normal" style:font-name-complex="Lucida Sans Unicode2" style:font-size-complex="18pt" style:font-style-complex="italic" style:font-weight-complex="normal"/>
    </style:style>
    <style:style style:name="T269" style:family="text">
      <style:text-properties fo:font-variant="normal" fo:text-transform="none" fo:color="#1464c0" loext:opacity="100%" style:text-outline="false" style:text-line-through-style="none" style:text-line-through-type="none" style:text-position="0% 100%" style:font-name="DejaVu Sans1"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70" style:family="text">
      <style:text-properties fo:font-variant="normal" fo:text-transform="none" fo:color="#0070c0" loext:opacity="100%" style:text-outline="false" style:text-line-through-style="none" style:text-line-through-type="none" style:text-position="0% 100%" style:font-name="Tahoma1" fo:font-size="21pt" fo:letter-spacing="normal" fo:language="fr" fo:country="FR" fo:font-style="normal" style:text-underline-style="none" fo:font-weight="bold" fo:background-color="transparent" style:font-size-asian="21pt" style:font-style-asian="normal" style:font-weight-asian="bold" style:font-name-complex="Lucida Sans Unicode2" style:font-size-complex="21pt" style:font-style-complex="normal" style:font-weight-complex="bold"/>
    </style:style>
    <style:style style:name="T271" style:family="text">
      <style:text-properties fo:font-variant="normal" fo:text-transform="none" fo:color="#000000" loext:opacity="100%" style:text-outline="false" style:text-line-through-style="none" style:text-line-through-type="none" style:text-position="0% 100%" fo:font-family="'Liberation Mono'"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72" style:family="text">
      <style:text-properties fo:font-variant="normal" fo:text-transform="none" fo:color="#000000" loext:opacity="100%" style:text-outline="false" style:text-line-through-style="none" style:text-line-through-type="none" style:text-position="0% 100%" fo:font-family="'Liberation Mono'" fo:font-size="18pt" fo:letter-spacing="normal" fo:language="en" fo:country="US"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73" style:family="text">
      <style:text-properties fo:font-variant="normal" fo:text-transform="none" fo:color="#000000" loext:opacity="100%" style:text-outline="false" style:text-line-through-style="none" style:text-line-through-type="none" style:text-position="0% 100%" style:font-name="DejaVu Sans1" fo:font-size="18pt" fo:letter-spacing="normal" fo:language="pt" fo:country="B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74" style:family="text">
      <style:text-properties fo:font-variant="normal" fo:text-transform="none" fo:color="#000000" loext:opacity="100%" style:text-outline="false" style:text-line-through-style="none" style:text-line-through-type="none" style:text-position="0% 100%" fo:font-family="'Liberation Mono'" fo:font-size="18pt" fo:letter-spacing="normal" fo:language="pt" fo:country="B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275" style:family="text">
      <style:text-properties fo:font-variant="normal" fo:text-transform="none" fo:color="#0070c0" loext:opacity="100%" style:text-outline="false" style:text-line-through-style="none" style:text-line-through-type="none" style:text-position="0% 100%" style:font-name="Tahoma1" fo:font-size="31pt" fo:letter-spacing="normal" fo:language="fr" fo:country="FR" fo:font-style="normal" style:text-underline-style="none" fo:font-weight="bold" fo:background-color="transparent" style:font-size-asian="31pt" style:font-style-asian="normal" style:font-weight-asian="bold" style:font-name-complex="Lucida Sans Unicode2" style:font-size-complex="31pt" style:font-style-complex="normal" style:font-weight-complex="bold"/>
    </style:style>
    <style:style style:name="T276" style:family="text">
      <style:text-properties fo:font-variant="normal" fo:text-transform="none" fo:color="#ce181e" loext:opacity="100%" style:text-outline="false" style:text-line-through-style="none" style:text-line-through-type="none" style:text-position="0% 100%" style:font-name="Times New Roman" fo:font-size="24pt" fo:letter-spacing="normal" fo:language="fr" fo:country="FR" fo:font-style="italic" style:text-underline-style="none" fo:font-weight="bold" fo:background-color="transparent" style:font-name-asian="Lucida Sans Unicode3" style:font-size-asian="24pt" style:font-style-asian="italic" style:font-weight-asian="bold" style:font-name-complex="Lucida Sans Unicode2" style:font-size-complex="24pt" style:font-style-complex="italic" style:font-weight-complex="bold"/>
    </style:style>
    <style:style style:name="T277" style:family="text">
      <style:text-properties style:font-name="Courier new" fo:font-style="italic" style:font-style-asian="italic" style:font-style-complex="italic"/>
    </style:style>
    <style:style style:name="T278" style:family="text">
      <style:text-properties fo:color="#390a5d" loext:opacity="100%" fo:font-style="italic" fo:font-weight="bold" style:font-style-asian="italic" style:font-weight-asian="bold" style:font-style-complex="italic" style:font-weight-complex="bold"/>
    </style:style>
    <style:style style:name="T279" style:family="text">
      <style:text-properties fo:font-size="22pt" style:font-size-asian="22pt" style:font-size-complex="22pt"/>
    </style:style>
    <style:style style:name="T280" style:family="text">
      <style:text-properties fo:color="#3465a4" loext:opacity="100%" style:font-name="Courier new" fo:font-size="22pt" fo:font-weight="bold" style:font-size-asian="22pt" style:font-weight-asian="bold" style:font-size-complex="22pt" style:font-weight-complex="bold"/>
    </style:style>
    <style:style style:name="T281" style:family="text">
      <style:text-properties fo:color="#2a6099" loext:opacity="100%" style:font-name="Courier new" fo:font-weight="bold" style:font-weight-asian="bold" style:font-weight-complex="bold"/>
    </style:style>
    <style:style style:name="T282" style:family="text">
      <style:text-properties style:font-name="Courier new" fo:font-size="20pt" style:font-size-asian="20pt" style:font-size-complex="20pt"/>
    </style:style>
    <style:style style:name="T283" style:family="text">
      <style:text-properties fo:color="#182f7c" loext:opacity="100%" fo:font-size="26pt" fo:font-style="italic" fo:font-weight="bold" style:font-size-asian="26pt" style:font-style-asian="italic" style:font-weight-asian="bold" style:font-size-complex="26pt" style:font-style-complex="italic" style:font-weight-complex="bold"/>
    </style:style>
    <style:style style:name="T284" style:family="text">
      <style:text-properties fo:language="fr" fo:country="FR" fo:font-style="normal" fo:font-weight="normal" style:font-style-asian="normal" style:font-weight-asian="normal" style:font-style-complex="normal" style:font-weight-complex="normal"/>
    </style:style>
    <style:style style:name="T285" style:family="text">
      <style:text-properties fo:color="#0d1f63" loext:opacity="100%" fo:language="fr" fo:country="FR" fo:font-style="normal" fo:font-weight="bold" style:font-style-asian="normal" style:font-weight-asian="bold" style:font-style-complex="normal" style:font-weight-complex="bold"/>
    </style:style>
    <style:style style:name="T286" style:family="text">
      <style:text-properties fo:color="#0d1f63" loext:opacity="100%" fo:language="fr" fo:country="FR" fo:font-style="italic" fo:font-weight="bold" style:font-style-asian="italic" style:font-weight-asian="bold" style:font-style-complex="italic" style:font-weight-complex="bold"/>
    </style:style>
    <style:style style:name="T287" style:family="text">
      <style:text-properties fo:color="#c9211e" loext:opacity="100%" fo:font-style="italic" fo:font-weight="bold" style:font-style-asian="italic" style:font-weight-asian="bold" style:font-style-complex="italic" style:font-weight-complex="bold"/>
    </style:style>
    <style:style style:name="T288" style:family="text">
      <style:text-properties style:font-name="Courier New" fo:font-style="italic" style:font-style-asian="italic" style:font-style-complex="italic"/>
    </style:style>
    <style:style style:name="T289" style:family="text">
      <style:text-properties style:text-underline-style="solid" style:text-underline-width="auto" style:text-und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space-before="1.27cm" text:min-label-width="0.793cm"/>
        <style:text-properties fo:font-family="'Times New Roman'"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space-before="1.27cm" text:min-label-width="0.793cm"/>
        <style:text-properties fo:font-family="'Times New Roman'"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min-label-width="0.952cm"/>
        <style:text-properties style:font-name="Times New Roman"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min-label-width="1.27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ce181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55555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fo:color="#555555"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6cm"/>
        <style:text-properties fo:font-family="OpenSymbol" fo:color="#555555" fo:font-size="100%"/>
      </text:list-level-style-bullet>
      <text:list-level-style-bullet text:level="2" text:bullet-char="●">
        <style:list-level-properties text:space-before="0.6cm" text:min-label-width="0.6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min-label-width="1.27cm"/>
        <style:text-properties style:font-name="Arial" fo:color="#00206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1f2d5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min-label-width="0.953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min-label-width="0.95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0a0a0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number text:level="1" style:num-format="">
        <style:list-level-properties text:min-label-width="0.6cm"/>
        <style:text-properties fo:color="#1a306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4">
      <text:list-level-style-bullet text:level="1" text:bullet-char="●">
        <style:list-level-properties text:min-label-width="0.6cm"/>
        <style:text-properties fo:font-family="OpenSymbol" fo:color="#0d1f6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5">
      <text:list-level-style-bullet text:level="1" text:bullet-char="●">
        <style:list-level-properties text:space-before="0.3cm" text:min-label-width="0.9cm"/>
        <style:text-properties fo:font-family="OpenSymbol" fo:color="#0070c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6">
      <text:list-level-style-bullet text:level="1" text:bullet-char="●">
        <style:list-level-properties text:space-before="0.3cm" text:min-label-width="0.9cm"/>
        <style:text-properties fo:font-family="OpenSymbol" fo:color="#c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7">
      <text:list-level-style-bullet text:level="1" text:bullet-char="●">
        <style:list-level-properties text:space-before="0.3cm" text:min-label-width="0.9cm"/>
        <style:text-properties fo:font-family="OpenSymbol" fo:color="#00566a"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8">
      <text:list-level-style-bullet text:level="1" text:bullet-char="●">
        <style:list-level-properties text:space-before="0.3cm" text:min-label-width="0.9cm"/>
        <style:text-properties fo:font-family="OpenSymbol" fo:color="#2d7c31"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9">
      <text:list-level-style-bullet text:level="1" text:bullet-char="●">
        <style:list-level-properties text:space-before="0.3cm" text:min-label-width="0.9cm"/>
        <style:text-properties fo:font-family="OpenSymbol" fo:color="#f57e16"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0">
      <text:list-level-style-bullet text:level="1" text:bullet-char="●">
        <style:list-level-properties text:space-before="0.3cm" text:min-label-width="0.9cm"/>
        <style:text-properties fo:font-family="OpenSymbol" fo:color="#cc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1">
      <text:list-level-style-bullet text:level="1" text:bullet-char="●">
        <style:list-level-properties text:space-before="0.3cm" text:min-label-width="0.9cm"/>
        <style:text-properties fo:font-family="OpenSymbol" fo:color="#1464c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2">
      <text:list-level-style-number text:level="1" style:num-format="">
        <style:list-level-properties text:min-label-width="0.6cm"/>
        <style:text-properties fo:color="#ce181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3">
      <text:list-level-style-bullet text:level="1" text:bullet-char="●">
        <style:list-level-properties text:space-before="-0.9cm" text:min-label-width="0.9cm"/>
        <style:text-properties fo:font-family="OpenSymbol" style:use-window-font-color="true"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4">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Kafka Administration</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6</text:span></text:p>
                <text:p text:style-name="P3"><text:span text:style-name="T2"/></text:p>
                <text:p text:style-name="P3"><text:span text:style-name="T2">david.thibau@gmail.com</text:span></text:p>
              </text:list-header>
            </text:list>
          </draw:text-box>
        </draw:frame>
        <presentation:notes draw:style-name="dp2">
          <draw:custom-shape draw:style-name="gr1" draw:text-style-name="P5" draw:layer="layout" svg:width="14.535cm" svg:height="10.279cm" svg:x="3.232cm" svg:y="2.853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3.847cm" svg:x="3.033cm" svg:y="6.283cm" presentation:class="outline" presentation:user-transformed="true">
          <draw:text-box>
            <text:list text:style-name="L2">
              <text:list-item>
                <text:p text:style-name="P7"><text:span text:style-name="T3">Introduction à Kafka</text:span></text:p>
              </text:list-item>
            </text:list>
            <text:list text:style-name="L3">
              <text:list-item>
                <text:list>
                  <text:list-item>
                    <text:p text:style-name="P8"><text:span text:style-name="T4">Le projet Kafka</text:span></text:p>
                  </text:list-item>
                  <text:list-item>
                    <text:p text:style-name="P8"><text:span text:style-name="T4">Cas d’usage</text:span></text:p>
                  </text:list-item>
                  <text:list-item>
                    <text:p text:style-name="P8"><text:span text:style-name="T4">Alternatives</text:span></text:p>
                  </text:list-item>
                  <text:list-item>
                    <text:p text:style-name="P8"><text:span text:style-name="T4">Concepts</text:span><text:span text:style-name="T4"><text:line-break/></text:span><text:span text:style-name="T4"/></text:p>
                  </text:list-item>
                </text:list>
              </text:list-item>
            </text:list>
            <text:list text:style-name="L2">
              <text:list-item>
                <text:p text:style-name="P9"><text:span text:style-name="T3">Cluster </text:span></text:p>
              </text:list-item>
            </text:list>
            <text:list text:style-name="L3">
              <text:list-item>
                <text:p text:style-name="P10"><text:span text:style-name="T4">Nœuds du cluster</text:span></text:p>
              </text:list-item>
              <text:list-item>
                <text:p text:style-name="P10"><text:span text:style-name="T4">Zookeeper vs Kraft</text:span></text:p>
              </text:list-item>
              <text:list-item>
                <text:p text:style-name="P10"><text:span text:style-name="T4">Distributions / Installation</text:span></text:p>
              </text:list-item>
              <text:list-item>
                <text:p text:style-name="P10"><text:span text:style-name="T4">Utilitaires Kafka</text:span></text:p>
              </text:list-item>
              <text:list-item>
                <text:p text:style-name="P10"><text:span text:style-name="T4">Outils graphiques</text:span></text:p>
              </text:list-item>
            </text:list>
            <text:list text:style-name="L2">
              <text:list-header>
                <text:p text:style-name="P11"><text:span text:style-name="T5"/></text:p>
              </text:list-header>
              <text:list-item>
                <text:p text:style-name="P9"><text:span text:style-name="T3">Production et Consommation </text:span></text:p>
              </text:list-item>
            </text:list>
            <text:list text:style-name="L3">
              <text:list-item>
                <text:p text:style-name="P10"><text:span text:style-name="T4">Anatomie d’un message</text:span></text:p>
              </text:list-item>
              <text:list-item>
                <text:p text:style-name="P10"><text:span text:style-name="T4">Production : mécanisme et configuration </text:span></text:p>
              </text:list-item>
              <text:list-item>
                <text:p text:style-name="P10"><text:span text:style-name="T4">Consommation : mécanisme et configuration </text:span></text:p>
              </text:list-item>
              <text:list-item>
                <text:p text:style-name="P10"><text:span text:style-name="T4">Sérialisation : formats et implication</text:span></text:p>
              </text:list-item>
              <text:list-item>
                <text:p text:style-name="P10"><text:span text:style-name="T4">Garanties Kafka</text:span></text:p>
                <text:p text:style-name="P10"><text:span text:style-name="T6"/></text:p>
              </text:list-item>
            </text:list>
            <text:p><text:span text:style-name="T3">Écosystème Kafka</text:span></text:p>
            <text:list text:continue-numbering="true" text:style-name="L3">
              <text:list-item>
                <text:p text:style-name="P10"><text:span text:style-name="T4">Schema Registry </text:span></text:p>
              </text:list-item>
              <text:list-item>
                <text:p text:style-name="P10"><text:span text:style-name="T4">Kafka Connect</text:span></text:p>
              </text:list-item>
              <text:list-item>
                <text:p text:style-name="P10"><text:span text:style-name="T4">MirrorMaker 2</text:span></text:p>
              </text:list-item>
              <text:list-item>
                <text:p text:style-name="P10"><text:span text:style-name="T4">Autres composants : Kafka Streams, ksqlDB et RestProxy </text:span></text:p>
              </text:list-item>
            </text:list>
          </draw:text-box>
        </draw:frame>
        <draw:frame presentation:style-name="pr5" draw:layer="layout" svg:width="11.467cm" svg:height="14.31cm" svg:x="15.074cm" svg:y="6.283cm" presentation:class="outline" presentation:user-transformed="true">
          <draw:text-box>
            <text:list text:style-name="L2">
              <text:list-item>
                <text:p text:style-name="P7"><text:span text:style-name="T7">Sécurité</text:span></text:p>
              </text:list-item>
            </text:list>
            <text:list text:style-name="L3">
              <text:list-item>
                <text:list>
                  <text:list-item>
                    <text:p text:style-name="P12"><text:span text:style-name="T8">Configuration des listeners</text:span></text:p>
                  </text:list-item>
                  <text:list-item>
                    <text:p text:style-name="P12"><text:span text:style-name="T8">SSL/TLS</text:span></text:p>
                  </text:list-item>
                  <text:list-item>
                    <text:p text:style-name="P12"><text:span text:style-name="T8">Authentification SASL</text:span></text:p>
                  </text:list-item>
                  <text:list-item>
                    <text:p text:style-name="P12"><text:span text:style-name="T8">ACL et Quotas </text:span></text:p>
                  </text:list-item>
                  <text:list-item>
                    <text:p text:style-name="P12"><text:span text:style-name="T8">Sécurisation composant annexe</text:span></text:p>
                    <text:p text:style-name="P12"><text:span text:style-name="T8"/></text:p>
                  </text:list-item>
                </text:list>
              </text:list-item>
            </text:list>
            <text:list text:style-name="L2">
              <text:list-item>
                <text:p text:style-name="P7"><text:span text:style-name="T7">Exploitation</text:span></text:p>
              </text:list-item>
            </text:list>
            <text:list text:style-name="L3">
              <text:list-item>
                <text:list>
                  <text:list-item>
                    <text:p text:style-name="P12"><text:span text:style-name="T8">Stockage et rétention</text:span><text:span text:style-name="T9"> </text:span><text:span text:style-name="T8">des partitions</text:span></text:p>
                  </text:list-item>
                  <text:list-item>
                    <text:p text:style-name="P12"><text:span text:style-name="T8">Gestion des topics, des partitions, des groupes </text:span></text:p>
                  </text:list-item>
                  <text:list-item>
                    <text:p text:style-name="P8"><text:span text:style-name="T8">Gestion du cluster, Mise à jour </text:span></text:p>
                  </text:list-item>
                  <text:list-item>
                    <text:p text:style-name="P8"><text:span text:style-name="T8">Sauvegarde et reprise</text:span></text:p>
                    <text:p text:style-name="P12"><text:span text:style-name="T10"/></text:p>
                  </text:list-item>
                </text:list>
              </text:list-item>
            </text:list>
            <text:p text:style-name="P7"><text:span text:style-name="T7">Dimensionnement et performance</text:span></text:p>
            <text:list text:continue-numbering="true" text:style-name="L3">
              <text:list-item>
                <text:p text:style-name="P10"><text:span text:style-name="T8">Dimensionnement</text:span></text:p>
              </text:list-item>
              <text:list-item>
                <text:p text:style-name="P10"><text:span text:style-name="T8">Réglages JVM et OS</text:span></text:p>
              </text:list-item>
              <text:list-item>
                <text:p text:style-name="P10"><text:span text:style-name="T8">Benchmarks </text:span></text:p>
              </text:list-item>
              <text:list-item>
                <text:p text:style-name="P10"><text:span text:style-name="T8">Pattern d’architecture</text:span></text:p>
                <text:p text:style-name="P10"><text:span text:style-name="T8"/></text:p>
              </text:list-item>
            </text:list>
            <text:p text:style-name="P7"><text:span text:style-name="T7">Monitoring et observabilité</text:span></text:p>
            <text:list text:continue-numbering="true" text:style-name="L3">
              <text:list-item>
                <text:p text:style-name="P10"><text:span text:style-name="T8">Métriques clés à surveiller </text:span></text:p>
              </text:list-item>
              <text:list-item>
                <text:p text:style-name="P10"><text:span text:style-name="T8">Exposition JMX et intégration Prometheus / Grafana</text:span></text:p>
              </text:list-item>
              <text:list-item>
                <text:p text:style-name="P10"><text:span text:style-name="T8">Dashboards de référence</text:span></text:p>
              </text:list-item>
              <text:list-item>
                <text:p text:style-name="P10"><text:span text:style-name="T8">Alerting : seuils pertinents </text:span></text:p>
              </text:list-item>
              <text:list-item>
                <text:p text:style-name="P10"><text:span text:style-name="T8">Logs Kafka : ce qu'on cherche, où, quand</text:span></text:p>
                <text:p text:style-name="P10"><text:span text:style-name="T8"/></text:p>
              </text:list-item>
            </text:list>
            <text:p text:style-name="P7"><text:span text:style-name="T7">Troubleshooting</text:span></text:p>
            <text:list text:continue-numbering="true" text:style-name="L3">
              <text:list-item>
                <text:p text:style-name="P10"><text:span text:style-name="T8">Méthodologie de diagnostic</text:span></text:p>
              </text:list-item>
              <text:list-item>
                <text:p text:style-name="P10"><text:span text:style-name="T8">Scénarios classiques </text:span></text:p>
              </text:list-item>
              <text:list-item>
                <text:p text:style-name="P10"><text:span text:style-name="T8">Lecture des logs et corrélation avec les métriques</text:span></text:p>
              </text:list-item>
              <text:list-item>
                <text:p text:style-name="P10"><text:span text:style-name="T8">Outils de diagnostic </text:span></text:p>
              </text:list-item>
            </text:list>
          </draw:text-box>
        </draw:frame>
        <presentation:notes draw:style-name="dp4">
          <draw:page-thumbnail draw:style-name="gr2" draw:layer="layout" svg:width="15.597cm" svg:height="10.985cm" svg:x="2.623cm" svg:y="2.258cm" draw:page-number="2" presentation:class="page"/>
          <draw:frame presentation:style-name="pr6" draw:text-style-name="P13"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8"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2">Le projet Kafka</text:span></text:p>
              </text:list-item>
              <text:list-item>
                <text:p text:style-name="P3"><text:span text:style-name="T13">Cas d’usage</text:span></text:p>
              </text:list-item>
              <text:list-item>
                <text:p text:style-name="P3"><text:span text:style-name="T13">Alternatives</text:span></text:p>
              </text:list-item>
              <text:list-item>
                <text:p text:style-name="P3"><text:span text:style-name="T13">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igine</text:p>
          </draw:text-box>
        </draw:frame>
        <draw:frame presentation:style-name="pr5" draw:layer="layout" svg:width="23.499cm" svg:height="12.18cm" svg:x="3.033cm" svg:y="6.383cm" presentation:class="outline" presentation:user-transformed="true">
          <draw:text-box>
            <text:list text:style-name="L2">
              <text:list-item>
                <text:p>Initié par <text:span text:style-name="T14">LinkedIn,</text:span> mis en OpenSource en 2011</text:p>
              </text:list-item>
              <text:list-item>
                <text:p>Écrit en <text:span text:style-name="T14">Scala</text:span> et <text:span text:style-name="T14">Java</text:span></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text:span text:style-name="T14">Confluent</text:span> depuis 2014</text:p>
              </text:list-item>
            </text:list>
          </draw:text-box>
        </draw:frame>
        <presentation:notes draw:style-name="dp5">
          <draw:page-thumbnail draw:style-name="gr2" draw:layer="layout" svg:width="15.597cm" svg:height="10.985cm" svg:x="2.623cm" svg:y="2.258cm" draw:page-number="4" presentation:class="page"/>
          <draw:frame presentation:style-name="pr6" draw:text-style-name="P13"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jectifs et Points forts</text:p>
          </draw:text-box>
        </draw:frame>
        <draw:frame presentation:style-name="pr5" draw:layer="layout" svg:width="23.499cm" svg:height="12.18cm" svg:x="3.033cm" svg:y="6.483cm" presentation:class="outline" presentation:user-transformed="true">
          <draw:text-box>
            <text:list text:style-name="L4">
              <text:list-item>
                <text:p><text:s/>Découpler producteurs et consommateurs de messages</text:p>
              </text:list-item>
              <text:list-item>
                <text:p><text:s/>Persister les messages afin qu’ils puissent être consommés par de nombreux consommateurs, (éventuellement à posteriori)</text:p>
              </text:list-item>
              <text:list-item>
                <text:p><text:s/>Atteindre de très haut débit et une latence faible</text:p>
              </text:list-item>
              <text:list-item>
                <text:p><text:s/>Scaling horizontal flexible</text:p>
              </text:list-item>
              <text:list-item>
                <text:p><text:s/>Offrir des garanties de fiabilité de la livraison de messages, malgré des défaillances !</text:p>
              </text:list-item>
            </text:list>
          </draw:text-box>
        </draw:frame>
        <presentation:notes draw:style-name="dp5">
          <draw:page-thumbnail draw:style-name="gr2" draw:layer="layout" svg:width="15.597cm" svg:height="10.985cm" svg:x="2.623cm" svg:y="2.258cm" draw:page-number="5" presentation:class="page"/>
          <draw:frame presentation:style-name="pr6" draw:text-style-name="P13"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Kafka fournit trois capacités clés:</text:p>
                <text:list>
                  <text:list-item>
                    <text:p>Publier et s’abonner à des flux de messages<text:span text:style-name="T15">1</text:span> avec certaines garanties de fiabilité malgré des défaillances.</text:p>
                  </text:list-item>
                  <text:list-item>
                    <text:p>Stocker les flux de messages de manière durable malgré des défaillances.</text:p>
                  </text:list-item>
                  <text:list-item>
                    <text:p>Traiter, transformer les flux de messages au fur et à mesure qu'ils se produisent (KafkaStream).</text:p>
                  </text:list-item>
                </text:list>
              </text:list-item>
            </text:list>
          </draw:text-box>
        </draw:frame>
        <draw:frame draw:style-name="gr4" draw:text-style-name="P17" draw:layer="layout" svg:width="21.186cm" svg:height="1.861cm" svg:x="1.428cm" svg:y="18.388cm">
          <draw:text-box>
            <text:p><text:span text:style-name="T16">1. Dans la suite des slides on utilise de façon non-différenciés les termes </text:span></text:p>
            <text:p><text:span text:style-name="T17">message</text:span><text:span text:style-name="T16">, </text:span><text:span text:style-name="T17">événement</text:span><text:span text:style-name="T16">, </text:span><text:span text:style-name="T17">enregistrement</text:span></text:p>
          </draw:text-box>
        </draw:frame>
        <presentation:notes draw:style-name="dp5">
          <draw:page-thumbnail draw:style-name="gr2" draw:layer="layout" svg:width="15.597cm" svg:height="10.985cm" svg:x="2.623cm" svg:y="2.258cm" draw:page-number="6" presentation:class="page"/>
          <draw:frame presentation:style-name="pr6" draw:text-style-name="P18"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luent</text:p>
          </draw:text-box>
        </draw:frame>
        <draw:frame presentation:style-name="pr5" draw:layer="layout" svg:width="23.499cm" svg:height="12.18cm" svg:x="3.033cm" svg:y="6.283cm" presentation:class="outline">
          <draw:text-box>
            <text:list text:style-name="L2">
              <text:list-item>
                <text:p>Créé en 2014 par <text:span text:style-name="T14">Jay Kreps, Neha Narkhede</text:span>, et <text:span text:style-name="T14">Jun Rao</text:span></text:p>
              </text:list-item>
              <text:list-item>
                <text:p>Mainteneur principal d’Apache Kafka</text:p>
              </text:list-item>
              <text:list-item>
                <text:p><text:span text:style-name="T14">Confluent</text:span> offre:</text:p>
                <text:list>
                  <text:list-item>
                    <text:p>Une distribution de Kafka et d’outils connexes avec des fonctionnalités commerciales additionnelles </text:p>
                  </text:list-item>
                  <text:list-item>
                    <text:p>Solution Cloud</text:p>
                  </text:list-item>
                  <text:list-item>
                    <text:p>Support</text:p>
                  </text:list-item>
                </text:list>
              </text:list-item>
              <text:list-item>
                <text:p/>
              </text:list-item>
            </text:list>
          </draw:text-box>
        </draw:frame>
        <presentation:notes draw:style-name="dp5">
          <draw:page-thumbnail draw:style-name="gr2" draw:layer="layout" svg:width="15.597cm" svg:height="10.985cm" svg:x="2.623cm" svg:y="2.258cm" draw:page-number="7" presentation:class="page"/>
          <draw:frame presentation:style-name="pr6" draw:text-style-name="P13" draw:layer="layout" svg:width="14.362cm" svg:height="11.254cm" svg:x="3.25cm" svg:y="14.128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10"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Kafkfa</text:span></text:p>
              </text:list-item>
              <text:list-item>
                <text:p text:style-name="P19"><text:span text:style-name="T12">Cas d’usage</text:span></text:p>
              </text:list-item>
              <text:list-item>
                <text:p text:style-name="P3"><text:span text:style-name="T13">Alternatives</text:span></text:p>
              </text:list-item>
              <text:list-item>
                <text:p text:style-name="P3"><text:span text:style-name="T13">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Kafka vs<text:line-break/>Message broker traditionnel</text:p>
          </draw:text-box>
        </draw:frame>
        <draw:frame presentation:style-name="pr5" draw:layer="layout" svg:width="23.499cm" svg:height="12.18cm" svg:x="3.033cm" svg:y="6.283cm" presentation:class="outline">
          <draw:text-box>
            <text:list text:style-name="L2">
              <text:list-item>
                <text:p>Kafka peut être utilisé comme <text:span text:style-name="T18">message broker</text:span> permettant de découpler un service producteur des services consommateurs</text:p>
                <text:list>
                  <text:list-item>
                    <text:p>Kafka privilégie le modèle <text:span text:style-name="T19">PubSub</text:span><text:span text:style-name="T20">1</text:span><text:span text:style-name="T14">.</text:span></text:p>
                  </text:list-item>
                  <text:list-item>
                    <text:p><text:span text:style-name="T21">G</text:span>râce au concept de <text:span text:style-name="T22">groupe de consommateur</text:span>, ce modèle est scalable</text:p>
                  </text:list-item>
                  <text:list-item>
                    <text:p>Kafka offre une <text:span text:style-name="T22">garantie plus forte</text:span> sur la livraison et le traitement des messages malgré des défaillances</text:p>
                  </text:list-item>
                  <text:list-item>
                    <text:p>Kafka ne supprime pas les messages après consommation. Ils peuvent être <text:span text:style-name="T22">consommés à posteriori</text:span></text:p>
                  </text:list-item>
                </text:list>
              </text:list-item>
              <text:list-item>
                <text:p>=&gt; Idéal comme plate-forme d’intégration entre services : Architecture micro-services, ESB</text:p>
              </text:list-item>
            </text:list>
          </draw:text-box>
        </draw:frame>
        <draw:frame draw:style-name="gr5" draw:text-style-name="P20" draw:layer="layout" svg:width="14.121cm" svg:height="0.894cm" svg:x="1.604cm" svg:y="19.59cm">
          <draw:text-box>
            <text:p><text:span text:style-name="T23">1. Dans la version 4.x, le modèle Point2Point est en preview</text:span></text:p>
          </draw:text-box>
        </draw:frame>
        <presentation:notes draw:style-name="dp5">
          <draw:page-thumbnail draw:style-name="gr2" draw:layer="layout" svg:width="15.597cm" svg:height="10.985cm" svg:x="2.623cm" svg:y="2.258cm" draw:page-number="9" presentation:class="page"/>
          <draw:frame presentation:style-name="pr6" draw:text-style-name="P13"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4">Exemple ESB (New York Times)</text:span><text:line-break/><text:span text:style-name="T25">Avant</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15.081cm" svg:height="11.605cm" svg:x="7.169cm" svg:y="6.954cm">
          <draw:image xlink:href="Pictures/10000001000003000000024F09C46404.png" xlink:type="simple" xlink:show="embed" xlink:actuate="onLoad" draw:mime-type="image/png">
            <text:p/>
          </draw:image>
        </draw:frame>
        <presentation:notes draw:style-name="dp5">
          <draw:page-thumbnail draw:style-name="gr2" draw:layer="layout" svg:width="15.597cm" svg:height="10.985cm" svg:x="2.623cm" svg:y="2.258cm" draw:page-number="10" presentation:class="page"/>
          <draw:frame presentation:style-name="pr6" draw:text-style-name="P13"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text:span text:style-name="T24">Exemple ESB (New York Times)</text:span><text:line-break/><text:span text:style-name="T25">Après</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17.144cm" svg:height="11.898cm" svg:x="6.615cm" svg:y="7.323cm">
          <draw:image xlink:href="Pictures/100000010000030000000215F4C6714B.png" xlink:type="simple" xlink:show="embed" xlink:actuate="onLoad" draw:mime-type="image/png">
            <text:p/>
          </draw:image>
        </draw:frame>
        <presentation:notes draw:style-name="dp5">
          <draw:page-thumbnail draw:style-name="gr2" draw:layer="layout" svg:width="15.597cm" svg:height="10.985cm" svg:x="2.623cm" svg:y="2.258cm" draw:page-number="11" presentation:class="page"/>
          <draw:frame presentation:style-name="pr6" draw:text-style-name="P13"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micro-services</text:p>
          </draw:text-box>
        </draw:frame>
        <draw:frame presentation:style-name="pr5" draw:layer="layout" svg:width="23.499cm" svg:height="12.18cm" svg:x="3.033cm" svg:y="6.283cm" presentation:class="outline">
          <draw:text-box>
            <text:list text:style-name="L2">
              <text:list-item>
                <text:p>Un message broker est souvent central aux architectures micro-services</text:p>
                <text:list>
                  <text:list-item>
                    <text:p><text:span text:style-name="T26">Permet tous les styles d’interaction : </text:span><text:span text:style-name="T26"><text:line-break/></text:span><text:span text:style-name="T27">Requête/Réponse synchrone ou asynchrone, </text:span><text:span text:style-name="T27"><text:line-break/></text:span><text:span text:style-name="T27">One way notification, </text:span><text:span text:style-name="T27"><text:line-break/></text:span><text:span text:style-name="T28">PubAndSub</text:span><text:span text:style-name="T27"> synchrone ou asynchrone</text:span></text:p>
                  </text:list-item>
                  <text:list-item>
                    <text:p>Certains patterns micro-services sont implémentés via un message broker (exemple SAGA<text:span text:style-name="T15">1</text:span>) </text:p>
                  </text:list-item>
                </text:list>
              </text:list-item>
            </text:list>
          </draw:text-box>
        </draw:frame>
        <draw:frame draw:style-name="gr7" draw:text-style-name="P20" draw:layer="layout" svg:width="14.811cm" svg:height="1.056cm" svg:x="1.402cm" svg:y="19.262cm">
          <draw:text-box>
            <text:p><text:span text:style-name="T17">1. https://microservices.io/patterns/data/saga.html</text:span></text:p>
          </draw:text-box>
        </draw:frame>
        <presentation:notes draw:style-name="dp5">
          <draw:page-thumbnail draw:style-name="gr2" draw:layer="layout" svg:width="15.597cm" svg:height="10.985cm" svg:x="2.623cm" svg:y="2.258cm" draw:page-number="12" presentation:class="page"/>
          <draw:frame presentation:style-name="pr6" draw:text-style-name="P13"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12" draw:layer="layout" svg:width="23.499cm" svg:height="6.064cm" svg:x="3.35cm" svg:y="0.074cm" presentation:class="title" presentation:user-transformed="true">
          <draw:text-box>
            <text:p><text:span text:style-name="T29">Exemple SAGA</text:span><text:span text:style-name="T29"><text:line-break/></text:span><text:span text:style-name="T29">Transaction distribuée </text:span></text:p>
          </draw:text-box>
        </draw:frame>
        <draw:frame presentation:style-name="pr5" draw:layer="layout" svg:width="23.499cm" svg:height="12.18cm" svg:x="3.033cm" svg:y="6.283cm" presentation:class="outline" presentation:placeholder="true" presentation:user-transformed="true">
          <draw:text-box/>
        </draw:frame>
        <draw:frame draw:style-name="gr8" draw:text-style-name="P21" draw:layer="layout" svg:width="19.794cm" svg:height="12.823cm" svg:x="4.2cm" svg:y="6.4cm">
          <draw:image xlink:href="Pictures/10000001000003BD0000026C12AB267E.png" xlink:type="simple" xlink:show="embed" xlink:actuate="onLoad" draw:mime-type="image/png">
            <text:p/>
          </draw:image>
        </draw:frame>
        <presentation:notes draw:style-name="dp5">
          <draw:page-thumbnail draw:style-name="gr2" draw:layer="layout" svg:width="15.597cm" svg:height="10.985cm" svg:x="2.623cm" svg:y="2.258cm" draw:page-number="13" presentation:class="page"/>
          <draw:frame presentation:style-name="pr6" draw:text-style-name="P18"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 Data Buffering</text:p>
          </draw:text-box>
        </draw:frame>
        <draw:frame presentation:style-name="pr5" draw:layer="layout" svg:width="23.499cm" svg:height="12.18cm" svg:x="3.033cm" svg:y="6.283cm" presentation:class="outline">
          <draw:text-box>
            <text:list text:style-name="L2">
              <text:list-item>
                <text:p>Les <text:span text:style-name="T14">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item>
                    <text:p><text:span text:style-name="T30">Les topics permettent d’absorber les pics de charge</text:span></text:p>
                  </text:list-item>
                </text:list>
              </text:list-item>
            </text:list>
          </draw:text-box>
        </draw:frame>
        <presentation:notes draw:style-name="dp5">
          <draw:page-thumbnail draw:style-name="gr2" draw:layer="layout" svg:width="15.597cm" svg:height="10.985cm" svg:x="2.623cm" svg:y="2.258cm" draw:page-number="14" presentation:class="page"/>
          <draw:frame presentation:style-name="pr6" draw:text-style-name="P13"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4">Exemple Architecture ELK</text:span><text:span text:style-name="T24"><text:line-break/></text:span><text:span text:style-name="T24">Bufferisation des événements</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094cm" svg:height="12.572cm" svg:x="2.196cm" svg:y="6.885cm">
          <draw:image xlink:href="Pictures/100000000000093E00000474937D8F7C.png" xlink:type="simple" xlink:show="embed" xlink:actuate="onLoad" draw:mime-type="image/png">
            <text:p/>
          </draw:image>
        </draw:frame>
        <presentation:notes draw:style-name="dp5">
          <draw:page-thumbnail draw:style-name="gr2" draw:layer="layout" svg:width="15.597cm" svg:height="10.985cm" svg:x="2.623cm" svg:y="2.258cm" draw:page-number="15" presentation:class="page"/>
          <draw:frame presentation:style-name="pr6" draw:text-style-name="P13"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4">Ingestion massive de données</text:span><text:span text:style-name="T24"><text:line-break/></text:span><text:span text:style-name="T24">Exemple Uber</text:span></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2.057cm" svg:height="11.975cm" svg:x="3.693cm" svg:y="6.494cm">
          <draw:image xlink:href="Pictures/1000000000000300000001A10D151138.png" xlink:type="simple" xlink:show="embed" xlink:actuate="onLoad" draw:mime-type="image/png">
            <text:p/>
          </draw:image>
        </draw:frame>
        <presentation:notes draw:style-name="dp5">
          <draw:page-thumbnail draw:style-name="gr2" draw:layer="layout" svg:width="15.597cm" svg:height="10.985cm" svg:x="2.623cm" svg:y="2.258cm" draw:page-number="16" presentation:class="page"/>
          <draw:frame presentation:style-name="pr6" draw:text-style-name="P18"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s Event-driven</text:p>
          </draw:text-box>
        </draw:frame>
        <draw:frame presentation:style-name="pr5" draw:layer="layout" svg:width="23.499cm" svg:height="12.18cm" svg:x="3.033cm" svg:y="6.283cm" presentation:class="outline">
          <draw:text-box>
            <text:list text:style-name="L2">
              <text:list-item>
                <text:p>Les architectures <text:span text:style-name="T14">event-driven</text:span> sont des architectures constituées de micro-services consommant en continu des événements.</text:p>
              </text:list-item>
              <text:list-item>
                <text:p>Chaque micro-service :</text:p>
                <text:list>
                  <text:list-item>
                    <text:p>Lit un ou plusieurs topics Kafka en entrée</text:p>
                  </text:list-item>
                  <text:list-item>
                    <text:p>Effectue un traitement</text:p>
                  </text:list-item>
                  <text:list-item>
                    <text:p>Écrit vers un ou plusieurs topics de sortie </text:p>
                  </text:list-item>
                </text:list>
              </text:list-item>
            </text:list>
            <text:p/>
            <text:p>Cela produit généralement des architectures évolutives, scalables et réactives.</text:p>
            <text:list text:continue-numbering="true" text:style-name="L2">
              <text:list-item>
                <text:p>Les micro-services ont un périmètre réduit et peuvent être déployés rapidement</text:p>
              </text:list-item>
              <text:list-item>
                <text:p><text:s/></text:p>
              </text:list-item>
            </text:list>
          </draw:text-box>
        </draw:frame>
        <presentation:notes draw:style-name="dp5">
          <draw:page-thumbnail draw:style-name="gr2" draw:layer="layout" svg:width="15.597cm" svg:height="10.985cm" svg:x="2.623cm" svg:y="2.258cm" draw:page-number="17" presentation:class="page"/>
          <draw:frame presentation:style-name="pr6" draw:text-style-name="P18"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vent-driven architecture</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193cm" svg:height="11.429cm" svg:x="1.308cm" svg:y="7.968cm">
          <draw:image xlink:href="Pictures/10000000000003DE000001B0B0EE38E8.png" xlink:type="simple" xlink:show="embed" xlink:actuate="onLoad" draw:mime-type="image/png">
            <text:p/>
          </draw:image>
        </draw:frame>
        <presentation:notes draw:style-name="dp5">
          <draw:page-thumbnail draw:style-name="gr2" draw:layer="layout" svg:width="15.597cm" svg:height="10.985cm" svg:x="2.623cm" svg:y="2.258cm" draw:page-number="18" presentation:class="page"/>
          <draw:frame presentation:style-name="pr6" draw:text-style-name="P13"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ort pour l’event-driven</text:p>
          </draw:text-box>
        </draw:frame>
        <draw:frame presentation:style-name="pr5" draw:layer="layout" svg:width="23.499cm" svg:height="6.946cm" svg:x="3.033cm" svg:y="6.283cm" presentation:class="outline" presentation:user-transformed="true">
          <draw:text-box>
            <text:list text:style-name="L2">
              <text:list-item>
                <text:p text:style-name="P24"><text:span text:style-name="T31">KafkaStream</text:span> est une API Kafka permettant de construire des applications de traitement de flux </text:p>
              </text:list-item>
              <text:list-item>
                <text:p text:style-name="P24"/>
              </text:list-item>
              <text:list-item>
                <text:p text:style-name="P24"><text:span text:style-name="T31">ksqlDB</text:span> est une abstraction au dessus de KafkaStream permettant de créer ces applications à partir d’instructions SQL</text:p>
              </text:list-item>
            </text:list>
          </draw:text-box>
        </draw:frame>
        <draw:frame draw:style-name="gr6" draw:text-style-name="P21" draw:layer="layout" svg:width="16.103cm" svg:height="6.966cm" svg:x="5.425cm" svg:y="13.702cm">
          <draw:image xlink:href="Pictures/1000000100000AD1000004AEF47DE572.png" xlink:type="simple" xlink:show="embed" xlink:actuate="onLoad" draw:mime-type="image/png">
            <text:p/>
          </draw:image>
        </draw:frame>
        <presentation:notes draw:style-name="dp5">
          <draw:page-thumbnail draw:style-name="gr2" draw:layer="layout" svg:width="15.597cm" svg:height="10.985cm" svg:x="2.623cm" svg:y="2.258cm" draw:page-number="19" presentation:class="page"/>
          <draw:frame presentation:style-name="pr6" draw:text-style-name="P13"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5">Architecture ksqlDB</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0.61cm" svg:height="11.593cm" svg:x="4.766cm" svg:y="6.493cm">
          <draw:image xlink:href="Pictures/1000000000000500000002D00D415DCF.png" xlink:type="simple" xlink:show="embed" xlink:actuate="onLoad" draw:mime-type="image/png">
            <text:p/>
          </draw:image>
        </draw:frame>
        <presentation:notes draw:style-name="dp5">
          <draw:page-thumbnail draw:style-name="gr2" draw:layer="layout" svg:width="15.597cm" svg:height="10.985cm" svg:x="2.623cm" svg:y="2.258cm" draw:page-number="20" presentation:class="page"/>
          <draw:frame presentation:style-name="pr6" draw:text-style-name="P13" draw:layer="layout" svg:width="14.362cm" svg:height="11.254cm" svg:x="3.25cm" svg:y="14.128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13"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text:span><text:span text:style-name="T32">Kafka</text:span></text:p>
              </text:list-item>
              <text:list-item>
                <text:p text:style-name="P19"><text:span text:style-name="T2">Cas d’usage</text:span></text:p>
              </text:list-item>
              <text:list-item>
                <text:p text:style-name="P19"><text:span text:style-name="T12">Alternatives</text:span></text:p>
              </text:list-item>
              <text:list-item>
                <text:p text:style-name="P19"><text:span text:style-name="T2">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norama des alternatives" draw:style-name="dp6" draw:master-page-name="Standard" presentation:presentation-page-layout-name="AL3T1">
        <office:forms form:automatic-focus="false" form:apply-design-mode="false"/>
        <draw:frame draw:name="PlaceHolder 1" presentation:style-name="pr14" draw:text-style-name="P27" draw:layer="layout" svg:width="23.499cm" svg:height="3.574cm" svg:x="3.033cm" svg:y="2.367cm" presentation:class="title" presentation:user-transformed="true">
          <draw:text-box>
            <text:p text:style-name="P26"><text:span text:style-name="T33">Panorama des alternatives</text:span></text:p>
          </draw:text-box>
        </draw:frame>
        <draw:frame draw:name="PlaceHolder 3" presentation:style-name="pr15" draw:text-style-name="P30" draw:layer="layout" svg:width="23.499cm" svg:height="13.002cm" svg:x="3.033cm" svg:y="6.283cm" presentation:class="outline" presentation:user-transformed="true">
          <draw:text-box>
            <text:p text:style-name="P28"><text:span text:style-name="T34">Message brokers traditionnels</text:span></text:p>
            <text:list text:style-name="L6">
              <text:list-item>
                <text:list>
                  <text:list-item>
                    <text:p text:style-name="P29"><text:span text:style-name="T35">RabbitMQ, ActiveMQ : modèle file, routage riche, faible débit</text:span></text:p>
                  </text:list-item>
                </text:list>
              </text:list-item>
            </text:list>
            <text:p text:style-name="P28"><text:span text:style-name="T34">Streaming platforms concurrentes</text:span></text:p>
            <text:list text:continue-numbering="true" text:style-name="L6">
              <text:list-item>
                <text:list>
                  <text:list-item>
                    <text:p text:style-name="P29"><text:span text:style-name="T35">Apache Pulsar : compute/storage séparés, multi-tenancy native</text:span></text:p>
                  </text:list-item>
                </text:list>
              </text:list-item>
            </text:list>
            <text:p text:style-name="P28"><text:span text:style-name="T34">Implémentations Kafka-compatible</text:span></text:p>
            <text:list text:continue-numbering="true" text:style-name="L6">
              <text:list-item>
                <text:list>
                  <text:list-item>
                    <text:p text:style-name="P29"><text:span text:style-name="T35">Redpanda : clone C++, sans JVM ni ZooKeeper, mêmes clients </text:span><text:span text:style-name="T35">Kafka</text:span></text:p>
                  </text:list-item>
                  <text:list-item>
                    <text:p text:style-name="P29"><text:span text:style-name="T35">WarpStream, AutoMQ : stockage S3, optimisé coût cloud</text:span></text:p>
                  </text:list-item>
                </text:list>
              </text:list-item>
            </text:list>
            <text:p text:style-name="P28"><text:span text:style-name="T34">Services managés</text:span></text:p>
            <text:list text:continue-numbering="true" text:style-name="L6">
              <text:list-item>
                <text:list>
                  <text:list-item>
                    <text:p text:style-name="P29"><text:span text:style-name="T35">Confluent Cloud, MSK, Aiven, Azure Event Hubs</text:span></text:p>
                  </text:list-item>
                </text:list>
              </text:list-item>
            </text:list>
          </draw:text-box>
        </draw:frame>
        <presentation:notes draw:style-name="dp4">
          <draw:page-thumbnail draw:style-name="gr2" draw:layer="layout" svg:width="19.798cm" svg:height="11.136cm" svg:x="0.6cm" svg:y="2.257cm" draw:page-number="22" presentation:class="page"/>
          <draw:frame presentation:style-name="pr16" draw:text-style-name="P18" draw:layer="layout" svg:width="16.799cm" svg:height="13.364cm" svg:x="2.1cm" svg:y="14.107cm" presentation:class="notes" presentation:placeholder="true">
            <draw:text-box/>
          </draw:frame>
        </presentation:notes>
      </draw:page>
      <draw:page draw:name="Quand choisir quoi ?" draw:style-name="dp6" draw:master-page-name="Standard" presentation:presentation-page-layout-name="AL3T1">
        <office:forms form:automatic-focus="false" form:apply-design-mode="false"/>
        <draw:frame draw:name="PlaceHolder 4" presentation:style-name="pr14" draw:text-style-name="P27" draw:layer="layout" svg:width="23.499cm" svg:height="3.574cm" svg:x="3.033cm" svg:y="2.367cm" presentation:class="title" presentation:user-transformed="true">
          <draw:text-box>
            <text:p text:style-name="P26"><text:span text:style-name="T33">Quand choisir quoi ?</text:span></text:p>
          </draw:text-box>
        </draw:frame>
        <draw:frame draw:name="PlaceHolder 2" presentation:style-name="pr15" draw:text-style-name="P30" draw:layer="layout" svg:width="23.499cm" svg:height="12.18cm" svg:x="3.033cm" svg:y="6.283cm" presentation:class="outline" presentation:user-transformed="true">
          <draw:text-box>
            <text:p text:style-name="P28"><text:span text:style-name="T34">Questions à se poser :</text:span></text:p>
            <text:list text:style-name="L6">
              <text:list-item>
                <text:list>
                  <text:list-item>
                    <text:p text:style-name="P29"><text:span text:style-name="T35">Volume et débit attendus ? Faible → RabbitMQ envisageable</text:span></text:p>
                  </text:list-item>
                  <text:list-item>
                    <text:p text:style-name="P29"><text:span text:style-name="T35">Besoin de relecture / event sourcing ? → Kafka ou Pulsar</text:span></text:p>
                  </text:list-item>
                  <text:list-item>
                    <text:p text:style-name="P29"><text:span text:style-name="T35">Sensibilité à la latence tail ? → Redpanda, RabbitMQ</text:span></text:p>
                  </text:list-item>
                  <text:list-item>
                    <text:p text:style-name="P29"><text:span text:style-name="T35">Optimisation des coûts à grande échelle ? → WarpStream, </text:span><text:span text:style-name="T35">AutoMQ</text:span></text:p>
                  </text:list-item>
                </text:list>
              </text:list-item>
            </text:list>
            <text:p text:style-name="P28"><text:span text:style-name="T34">En pratique, Kafka reste le choix par défaut :</text:span></text:p>
            <text:list text:continue-numbering="true" text:style-name="L6">
              <text:list-item>
                <text:list>
                  <text:list-item>
                    <text:p text:style-name="P29"><text:span text:style-name="T35">Écosystème mature, communauté, recrutement</text:span></text:p>
                  </text:list-item>
                  <text:list-item>
                    <text:p text:style-name="P29"><text:span text:style-name="T35">Disponible en managé chez tous les hyperscalers</text:span></text:p>
                  </text:list-item>
                  <text:list-item>
                    <text:p text:style-name="P29"><text:span text:style-name="T35">Les alternatives répondent à des besoins spécifiques</text:span></text:p>
                  </text:list-item>
                </text:list>
              </text:list-item>
            </text:list>
          </draw:text-box>
        </draw:frame>
        <presentation:notes draw:style-name="dp4">
          <draw:page-thumbnail draw:style-name="gr2" draw:layer="layout" svg:width="19.798cm" svg:height="11.136cm" svg:x="0.6cm" svg:y="2.257cm" draw:page-number="23" presentation:class="page"/>
          <draw:frame presentation:style-name="pr16" draw:text-style-name="P18"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troduction à Kafka</text:span></text:p>
              </text:list-header>
            </text:list>
          </draw:text-box>
        </draw:frame>
        <draw:frame presentation:style-name="pr17"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text:span><text:span text:style-name="T32">Kafka</text:span></text:p>
              </text:list-item>
              <text:list-item>
                <text:p text:style-name="P19"><text:span text:style-name="T2">Cas d’usage</text:span></text:p>
              </text:list-item>
              <text:list-item>
                <text:p text:style-name="P19"><text:span text:style-name="T2">Alternatives</text:span></text:p>
              </text:list-item>
              <text:list-item>
                <text:p text:style-name="P3"><text:span text:style-name="T12">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cepts de base</text:p>
          </draw:text-box>
        </draw:frame>
        <draw:frame presentation:style-name="pr5" draw:layer="layout" svg:width="23.499cm" svg:height="12.18cm" svg:x="3.033cm" svg:y="6.283cm" presentation:class="outline" presentation:user-transformed="true">
          <draw:text-box>
            <text:list text:style-name="L2">
              <text:list-item>
                <text:p>Kafka s’exécute en <text:span text:style-name="T36">cluster</text:span> sur un ou plusieurs serveurs (<text:span text:style-name="T36">brokers</text:span>) pouvant être déployés dans différents data-center. </text:p>
              </text:list-item>
              <text:list-item>
                <text:p/>
              </text:list-item>
              <text:list-item>
                <text:p>Le cluster Kafka <text:line-break/>stocke des flux d'enregistrements : les <text:span text:style-name="T36">records</text:span> <text:line-break/>dans des rubriques : les <text:span text:style-name="T36">topics</text:span> .</text:p>
              </text:list-item>
              <text:list-item>
                <text:p/>
              </text:list-item>
              <text:list-item>
                <text:p>Chaque enregistrement se compose d'une clé éventuelle, d'une valeur, d'un horodatage et éventuellement d’entêtes</text:p>
                <text:p/>
              </text:list-item>
            </text:list>
          </draw:text-box>
        </draw:frame>
        <presentation:notes draw:style-name="dp5">
          <draw:page-thumbnail draw:style-name="gr2" draw:layer="layout" svg:width="15.597cm" svg:height="10.985cm" svg:x="2.623cm" svg:y="2.258cm" draw:page-number="25" presentation:class="page"/>
          <draw:frame presentation:style-name="pr6" draw:text-style-name="P13"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user-transformed="true">
          <draw:text-box>
            <text:list text:style-name="L2">
              <text:list-item>
                <text:p>Kafka propose 5 principales APIs :</text:p>
                <text:list>
                  <text:list-item>
                    <text:p>L'API <text:span text:style-name="T37">Producer</text:span> permet à une application de publier un flux sur un ou plusieurs topics Kafka.</text:p>
                  </text:list-item>
                  <text:list-item>
                    <text:p>L'API <text:span text:style-name="T37">Consumer</text:span> permet à une application de s'abonner à un ou plusieurs topics et de traiter le flux d'enregistrements associé.</text:p>
                  </text:list-item>
                  <text:list-item>
                    <text:p>L'API <text:span text:style-name="T37">Streams</text:span> permet à une application d'agir comme un processeur de flux, consommant un ou plusieurs topic d'entrée et produisant un flux de sortie vers un ou plusieurs topics.</text:p>
                  </text:list-item>
                  <text:list-item>
                    <text:p>L'API <text:span text:style-name="T37">Connector</text:span> permet de créer et d'exécuter des producteurs/consommateurs à partir de système tierces (BD, fichiers, STDOUT, …) </text:p>
                  </text:list-item>
                  <text:list-item>
                    <text:p>L’API <text:span text:style-name="T37">Admin</text:span> permet de gérer les topics et le cluster</text:p>
                  </text:list-item>
                </text:list>
              </text:list-item>
            </text:list>
          </draw:text-box>
        </draw:frame>
        <presentation:notes draw:style-name="dp5">
          <draw:page-thumbnail draw:style-name="gr2" draw:layer="layout" svg:width="15.597cm" svg:height="10.985cm" svg:x="2.623cm" svg:y="2.258cm" draw:page-number="26" presentation:class="page"/>
          <draw:frame presentation:style-name="pr6" draw:text-style-name="P13"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s de Kafka</text:p>
          </draw:text-box>
        </draw:frame>
        <draw:frame presentation:style-name="pr5" draw:layer="layout" svg:width="23.499cm" svg:height="12.18cm" svg:x="3.033cm" svg:y="6.283cm" presentation:class="outline" presentation:placeholder="true" presentation:user-transformed="true">
          <draw:text-box/>
        </draw:frame>
        <draw:frame draw:style-name="gr9" draw:text-style-name="P23" draw:layer="layout" svg:width="17.819cm" svg:height="14.985cm" svg:x="4.8cm" svg:y="6.215cm">
          <draw:image xlink:href="Pictures/100000010000042D00000383E3AA16A6.png" xlink:type="simple" xlink:show="embed" xlink:actuate="onLoad" draw:mime-type="image/png">
            <text:p/>
          </draw:image>
        </draw:frame>
        <presentation:notes draw:style-name="dp5">
          <draw:page-thumbnail draw:style-name="gr2" draw:layer="layout" svg:width="15.597cm" svg:height="10.985cm" svg:x="2.623cm" svg:y="2.258cm" draw:page-number="27" presentation:class="page"/>
          <draw:frame presentation:style-name="pr6" draw:text-style-name="P13"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 Client/Serveur</text:p>
          </draw:text-box>
        </draw:frame>
        <draw:frame presentation:style-name="pr5"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24"><text:span text:style-name="T26">Apache fournit un client Java, mais les clients sont </text:span><text:span text:style-name="T26">disponibles dans de nombreuses langages.</text:span><text:span text:style-name="T38">1</text:span><text:span text:style-name="T26"><text:line-break/></text:span><text:span text:style-name="T26"/></text:p>
              </text:list-item>
            </text:list>
          </draw:text-box>
        </draw:frame>
        <draw:frame draw:style-name="gr10" draw:text-style-name="P6" draw:layer="layout" svg:width="18.562cm" svg:height="1.216cm" svg:x="2.011cm" svg:y="19.685cm">
          <draw:text-box>
            <text:p><text:span text:style-name="T39">1. </text:span><text:span text:style-name="T17"><text:a xlink:href="https://cwiki.apache.org/confluence/display/KAFKA/Clients" xlink:type="simple">https://cwiki.apache.org/confluence/display/KAFKA/Clients</text:a></text:span><text:s/></text:p>
          </draw:text-box>
        </draw:frame>
        <presentation:notes draw:style-name="dp5">
          <draw:page-thumbnail draw:style-name="gr2" draw:layer="layout" svg:width="15.597cm" svg:height="10.985cm" svg:x="2.623cm" svg:y="2.258cm" draw:page-number="28" presentation:class="page"/>
          <draw:frame presentation:style-name="pr6" draw:text-style-name="P18"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opic</text:p>
          </draw:text-box>
        </draw:frame>
        <draw:frame presentation:style-name="pr5" draw:layer="layout" svg:width="23.499cm" svg:height="5.917cm" svg:x="3.033cm" svg:y="6.283cm" presentation:class="outline" presentation:user-transformed="true">
          <draw:text-box>
            <text:list text:style-name="L2">
              <text:list-item>
                <text:p>Les <text:span text:style-name="T14">records</text:span> sont publiés vers des <text:span text:style-name="T37">topics</text:span>.</text:p>
              </text:list-item>
              <text:list-item>
                <text:p>Les <text:span text:style-name="T14">topics</text:span> de Kafka peuvent avoir Zéro, Un ou de multiples abonnés</text:p>
              </text:list-item>
              <text:list-item>
                <text:p>Les topics stockés dans le cluster peuvent être <text:span text:style-name="T37">partitionnés.</text:span> </text:p>
              </text:list-item>
            </text:list>
          </draw:text-box>
        </draw:frame>
        <draw:frame draw:style-name="gr9" draw:text-style-name="P23" draw:layer="layout" svg:width="11.006cm" svg:height="7.063cm" svg:x="8.794cm" svg:y="13cm">
          <draw:image xlink:href="Pictures/10000000000001A00000010B99E34F5B.png" xlink:type="simple" xlink:show="embed" xlink:actuate="onLoad" draw:mime-type="image/png">
            <text:p/>
          </draw:image>
        </draw:frame>
        <presentation:notes draw:style-name="dp5">
          <draw:page-thumbnail draw:style-name="gr2" draw:layer="layout" svg:width="15.597cm" svg:height="10.985cm" svg:x="2.623cm" svg:y="2.258cm" draw:page-number="29" presentation:class="page"/>
          <draw:frame presentation:style-name="pr6" draw:text-style-name="P13"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ort des partitions</text:p>
          </draw:text-box>
        </draw:frame>
        <draw:frame presentation:style-name="pr5" draw:text-style-name="P31" draw:layer="layout" svg:width="23.499cm" svg:height="7.935cm" svg:x="3.033cm" svg:y="6.283cm" presentation:class="outline" presentation:user-transformed="true">
          <draw:text-box>
            <text:list text:style-name="L2">
              <text:list-item>
                <text:p text:style-name="P31"><text:span text:style-name="T40">Les partitions : </text:span></text:p>
                <text:list>
                  <text:list-item>
                    <text:p><text:span text:style-name="T40">autorisent le parallélisme de la consommation. (scalabilité) </text:span></text:p>
                  </text:list-item>
                  <text:list-item>
                    <text:p><text:span text:style-name="T40">augmentent la capacité de stockage en utilisant les capacités disque de </text:span><text:span text:style-name="T40">plusieurs nœuds.</text:span></text:p>
                  </text:list-item>
                </text:list>
              </text:list-item>
              <text:list-item>
                <text:p text:style-name="P31"><text:span text:style-name="T40">L’ordre des messages n’est garanti qu’à l’intérieur d’une partition</text:span></text:p>
              </text:list-item>
              <text:list-item>
                <text:p text:style-name="P31"><text:span text:style-name="T40">Le nombre de partition est fixé à la création du </text:span><text:span text:style-name="T17">topic</text:span></text:p>
              </text:list-item>
            </text:list>
          </draw:text-box>
        </draw:frame>
        <draw:frame draw:style-name="gr11" draw:text-style-name="P23" draw:layer="layout" svg:width="19.095cm" svg:height="5.407cm" svg:x="3.769cm" svg:y="14.993cm">
          <draw:image xlink:href="Pictures/10000001000005950000029671B5A3BA.png" xlink:type="simple" xlink:show="embed" xlink:actuate="onLoad" draw:mime-type="image/png">
            <text:p/>
          </draw:image>
        </draw:frame>
        <presentation:notes draw:style-name="dp5">
          <draw:page-thumbnail draw:style-name="gr2" draw:layer="layout" svg:width="15.597cm" svg:height="10.985cm" svg:x="2.623cm" svg:y="2.258cm" draw:page-number="30" presentation:class="page"/>
          <draw:frame presentation:style-name="pr6" draw:text-style-name="P13"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plication</text:p>
          </draw:text-box>
        </draw:frame>
        <draw:frame presentation:style-name="pr5" draw:layer="layout" svg:width="23.499cm" svg:height="5.77cm" svg:x="3.033cm" svg:y="6.283cm" presentation:class="outline" presentation:user-transformed="true">
          <draw:text-box>
            <text:list text:style-name="L2">
              <text:list-item>
                <text:p><text:span text:style-name="T29">Les partitions peuvent être </text:span><text:span text:style-name="T41">répliquées</text:span><text:span text:style-name="T29"> </text:span></text:p>
                <text:list>
                  <text:list-item>
                    <text:p><text:span text:style-name="T42">=&gt; durabilité des données malgré les défaillances</text:span></text:p>
                  </text:list-item>
                </text:list>
              </text:list-item>
            </text:list>
          </draw:text-box>
        </draw:frame>
        <draw:frame draw:style-name="gr12" draw:text-style-name="P23" draw:layer="layout" svg:width="22.328cm" svg:height="7.059cm" svg:x="3.207cm" svg:y="13.843cm">
          <draw:image xlink:href="Pictures/10000001000005E60000031D3D250AAF.png" xlink:type="simple" xlink:show="embed" xlink:actuate="onLoad" draw:mime-type="image/png">
            <text:p/>
          </draw:image>
        </draw:frame>
        <presentation:notes draw:style-name="dp5">
          <draw:page-thumbnail draw:style-name="gr2" draw:layer="layout" svg:width="15.597cm" svg:height="10.985cm" svg:x="2.623cm" svg:y="2.258cm" draw:page-number="31" presentation:class="page"/>
          <draw:frame presentation:style-name="pr6" draw:text-style-name="P13"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Distribution des partitions<text:line-break/>Leader / Follower</text:p>
          </draw:text-box>
        </draw:frame>
        <draw:frame presentation:style-name="pr5" draw:layer="layout" svg:width="23.499cm" svg:height="12.18cm" svg:x="3.033cm" svg:y="6.283cm" presentation:class="outline">
          <draw:text-box>
            <text:list text:style-name="L2">
              <text:list-item>
                <text:p>Les partitions d’un topic sont réparties sur les instances du cluster. </text:p>
              </text:list-item>
              <text:list-item>
                <text:p>Les répliques sont distribuées sur des instances différentes</text:p>
              </text:list-item>
              <text:list-item>
                <text:p>Pour chaque partition répliquée, une des instances agit comme <text:span text:style-name="T43">maître (leader)</text:span>. Les autres comme <text:span text:style-name="T43">suiveurs </text:span><text:span text:style-name="T43">(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2" draw:layer="layout" svg:width="15.597cm" svg:height="10.985cm" svg:x="2.623cm" svg:y="2.258cm" draw:page-number="32" presentation:class="page"/>
          <draw:frame presentation:style-name="pr6" draw:text-style-name="P18"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 et offset</text:p>
          </draw:text-box>
        </draw:frame>
        <draw:frame presentation:style-name="pr5" draw:layer="layout" svg:width="23.499cm" svg:height="12.18cm" svg:x="3.033cm" svg:y="6.283cm" presentation:class="outline">
          <draw:text-box>
            <text:list text:style-name="L2">
              <text:list-item>
                <text:p>Chaque <text:span text:style-name="T44">partition</text:span> est une séquence <text:span text:style-name="T45">ordonnée</text:span><text:span text:style-name="T46"> </text:span><text:span text:style-name="T45">et immuable</text:span> d'enregistrements. </text:p>
              </text:list-item>
              <text:list-item>
                <text:p>Un numéro d’identification séquentiel nommé <text:span text:style-name="T37">offset</text:span> est attribué à chaque enregistrement.</text:p>
              </text:list-item>
              <text:list-item>
                <text:p>Le cluster Kafka conserve durablement tous les enregistrements publiés, qu'ils aient ou non été consommés, en utilisant une <text:span text:style-name="T37">période</text:span> <text:span text:style-name="T37">de</text:span> <text:span text:style-name="T37">rétention</text:span> configurable.</text:p>
              </text:list-item>
            </text:list>
          </draw:text-box>
        </draw:frame>
        <presentation:notes draw:style-name="dp5">
          <draw:page-thumbnail draw:style-name="gr2" draw:layer="layout" svg:width="15.597cm" svg:height="10.985cm" svg:x="2.623cm" svg:y="2.258cm" draw:page-number="33" presentation:class="page"/>
          <draw:frame presentation:style-name="pr6" draw:text-style-name="P18"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s du cluster</text:p>
          </draw:text-box>
        </draw:frame>
        <draw:frame draw:style-name="gr9" draw:text-style-name="P23" draw:layer="layout" svg:width="24.381cm" svg:height="13.354cm" svg:x="3.123cm" svg:y="6.543cm">
          <draw:image xlink:href="Pictures/100000010000062D00000362271446F0.png" xlink:type="simple" xlink:show="embed" xlink:actuate="onLoad" draw:mime-type="image/png">
            <text:p/>
          </draw:image>
        </draw:frame>
        <draw:frame draw:style-name="gr13" draw:text-style-name="P32" draw:layer="layout" svg:width="10.272cm" svg:height="4.671cm" svg:x="2.734cm" svg:y="6.699cm">
          <draw:text-box>
            <text:p><text:span text:style-name="T47">Les producteurs et consommateurs sont connectés à tous les brokers détenant le </text:span><text:span text:style-name="T48">topic</text:span></text:p>
          </draw:text-box>
        </draw:frame>
        <presentation:notes draw:style-name="dp5">
          <draw:page-thumbnail draw:style-name="gr2" draw:layer="layout" svg:width="15.597cm" svg:height="10.985cm" svg:x="2.623cm" svg:y="2.258cm" draw:page-number="34" presentation:class="page"/>
          <draw:frame presentation:style-name="pr6" draw:text-style-name="P13"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outing des messages</text:p>
          </draw:text-box>
        </draw:frame>
        <draw:frame presentation:style-name="pr5"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2" draw:layer="layout" svg:width="15.597cm" svg:height="10.985cm" svg:x="2.623cm" svg:y="2.258cm" draw:page-number="35" presentation:class="page"/>
          <draw:frame presentation:style-name="pr6" draw:text-style-name="P18"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 de consommateurs</text:p>
          </draw:text-box>
        </draw:frame>
        <draw:frame presentation:style-name="pr5" draw:layer="layout" svg:width="23.499cm" svg:height="12.18cm" svg:x="3.033cm" svg:y="6.283cm" presentation:class="outline">
          <draw:text-box>
            <text:list text:style-name="L2">
              <text:list-item>
                <text:p>Les consommateurs sont identifiés avec un nom de <text:span text:style-name="T43">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line-break/>=&gt; Scalabilité</text:p>
                  </text:list-item>
                </text:list>
              </text:list-item>
            </text:list>
          </draw:text-box>
        </draw:frame>
        <presentation:notes draw:style-name="dp5">
          <draw:page-thumbnail draw:style-name="gr2" draw:layer="layout" svg:width="15.597cm" svg:height="10.985cm" svg:x="2.623cm" svg:y="2.258cm" draw:page-number="36" presentation:class="page"/>
          <draw:frame presentation:style-name="pr6" draw:text-style-name="P18"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ffset consommateur</text:p>
          </draw:text-box>
        </draw:frame>
        <draw:frame presentation:style-name="pr5" draw:layer="layout" svg:width="23.499cm" svg:height="12.18cm" svg:x="3.033cm" svg:y="6.283cm" presentation:class="outline" presentation:user-transformed="true">
          <draw:text-box>
            <text:list text:style-name="L2">
              <text:list-item>
                <text:p>Pour chaque groupe de consommateurs, Kafka conserve son <text:span text:style-name="T45">offset</text:span><text:span text:style-name="T49">1</text:span> du journal.</text:p>
              </text:list-item>
              <text:list-item>
                <text:p>Cet offset est contrôlé par le consommateur:</text:p>
                <text:list>
                  <text:list-item>
                    <text:p>normalement, le consommateur fait avancer son offset au fur et à mesure des traitements des enregistrements.</text:p>
                  </text:list-item>
                  <text:list-item>
                    <text:p>mais, il peut consommer dans l'ordre qu'il souhaite.<text:line-break/>Par exemple, retraiter les données les plus anciennes ou repartir d’un offset particulier.</text:p>
                  </text:list-item>
                </text:list>
              </text:list-item>
            </text:list>
          </draw:text-box>
        </draw:frame>
        <draw:frame draw:style-name="gr14" draw:text-style-name="P20" draw:layer="layout" svg:width="7.965cm" svg:height="1.096cm" svg:x="1.402cm" svg:y="19.552cm">
          <draw:text-box>
            <text:p><text:span text:style-name="T50">1. Un offset par partition</text:span></text:p>
          </draw:text-box>
        </draw:frame>
        <presentation:notes draw:style-name="dp5">
          <draw:page-thumbnail draw:style-name="gr2" draw:layer="layout" svg:width="15.597cm" svg:height="10.985cm" svg:x="2.623cm" svg:y="2.258cm" draw:page-number="37" presentation:class="page"/>
          <draw:frame presentation:style-name="pr6" draw:text-style-name="P13"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9">Consommateur vs Partition</text:span><text:span text:style-name="T29"><text:line-break/></text:span><text:span text:style-name="T29">Rééquilibrage dynamique</text:span></text:p>
          </draw:text-box>
        </draw:frame>
        <draw:frame presentation:style-name="pr5" draw:layer="layout" svg:width="23.499cm" svg:height="12.18cm" svg:x="3.033cm" svg:y="6.283cm" presentation:class="outline">
          <draw:text-box>
            <text:list text:style-name="L2">
              <text:list-item>
                <text:p>Kafka assigne les partitions à des instances de consommateur d’un même groupe.</text:p>
                <text:list>
                  <text:list-item>
                    <text:p>A tout moment, une partition est exclusivement affectée à une consommateur <text:s/></text:p>
                  </text:list-item>
                </text:list>
              </text:list-item>
              <text:list-item>
                <text:p>L’affectation des partitions est gérée dynamiquement par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2" draw:layer="layout" svg:width="15.597cm" svg:height="10.985cm" svg:x="2.623cm" svg:y="2.258cm" draw:page-number="38" presentation:class="page"/>
          <draw:frame presentation:style-name="pr6" draw:text-style-name="P13" draw:layer="layout" svg:width="14.362cm" svg:height="11.254cm" svg:x="3.25cm" svg:y="14.128cm" presentation:class="notes" presentation:placeholder="true">
            <draw:text-box/>
          </draw:frame>
        </presentation:notes>
      </draw:page>
      <draw:page draw:name="page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4 partitions</text:p>
          </draw:text-box>
        </draw:frame>
        <draw:frame draw:style-name="gr9" draw:text-style-name="P23" draw:layer="layout" svg:width="21cm" svg:height="11.165cm" svg:x="4.43cm" svg:y="6.986cm">
          <draw:image xlink:href="Pictures/10000000000001DA000000FC8E08F9E1.png" xlink:type="simple" xlink:show="embed" xlink:actuate="onLoad" draw:mime-type="image/png">
            <text:p/>
          </draw:image>
        </draw:frame>
        <presentation:notes draw:style-name="dp5">
          <draw:page-thumbnail draw:style-name="gr2" draw:layer="layout" svg:width="15.597cm" svg:height="10.985cm" svg:x="2.623cm" svg:y="2.258cm" draw:page-number="39" presentation:class="page"/>
          <draw:frame presentation:style-name="pr6" draw:text-style-name="P13" draw:layer="layout" svg:width="14.362cm" svg:height="11.254cm" svg:x="3.25cm" svg:y="14.128cm" presentation:class="notes" presentation:placeholder="true">
            <draw:text-box/>
          </draw:frame>
        </presentation:notes>
      </draw:page>
      <draw:page draw:name="page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dre des enregistrements</text:p>
          </draw:text-box>
        </draw:frame>
        <draw:frame presentation:style-name="pr5" draw:layer="layout" svg:width="23.499cm" svg:height="12.18cm" svg:x="3.033cm" svg:y="6.283cm" presentation:class="outline">
          <draw:text-box>
            <text:list text:style-name="L2">
              <text:list-item>
                <text:p text:style-name="P24">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presentation:notes draw:style-name="dp5">
          <draw:page-thumbnail draw:style-name="gr2" draw:layer="layout" svg:width="15.597cm" svg:height="10.985cm" svg:x="2.623cm" svg:y="2.258cm" draw:page-number="40" presentation:class="page"/>
          <draw:frame presentation:style-name="pr6" draw:text-style-name="P13" draw:layer="layout" svg:width="14.362cm" svg:height="11.254cm" svg:x="3.25cm" svg:y="14.128cm" presentation:class="notes" presentation:placeholder="true">
            <draw:text-box/>
          </draw:frame>
        </presentation:notes>
      </draw:page>
      <draw:page draw:name="page41"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Cluster</text:span></text:p>
              </text:list-header>
            </text:list>
          </draw:text-box>
        </draw:frame>
        <draw:frame presentation:style-name="pr18"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3"><text:span text:style-name="T12">Nœuds du cluster</text:span></text:p>
              </text:list-item>
              <text:list-item>
                <text:p text:style-name="P3"><text:span text:style-name="T13">Distributions / Installation</text:span></text:p>
              </text:list-item>
              <text:list-item>
                <text:p text:style-name="P3"><text:span text:style-name="T13">Utilitaires</text:span><text:span text:style-name="T12"> </text:span><text:span text:style-name="T51">Kafka</text:span></text:p>
              </text:list-item>
              <text:list-item>
                <text:p text:style-name="P33"><text:span text:style-name="T13">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Kafka est exécuté comme un cluster d'un ou plusieurs <text:span text:style-name="T46">serveurs</text:span> pouvant s'étendre sur plusieurs centres de données. </text:p>
                <text:list>
                  <text:list-item>
                    <text:p><text:span text:style-name="T52">Certains de ces serveurs </text:span>appelés les <text:span text:style-name="T46">brokers </text:span>forment la couche de stockage.</text:p>
                  </text:list-item>
                  <text:list-item>
                    <text:p>Un serveur est désigné <text:span text:style-name="T46">contrôleur</text:span><text:span text:style-name="T53">1</text:span>. <text:line-break/>Son rôle est de prendre des décisions concernant le cluster comme l’affectation de partitions</text:p>
                  </text:list-item>
                </text:list>
              </text:list-item>
            </text:list>
            <text:p/>
            <text:p>Avant la version 3.x, un cluster Kafka nécessitait également un ensemble Zookeeper<text:span text:style-name="T54">2</text:span> permettant de stocker les méta-données nécessaires au contrôleur</text:p>
          </draw:text-box>
        </draw:frame>
        <draw:frame draw:style-name="gr15" draw:text-style-name="P20" draw:layer="layout" svg:width="22.664cm" svg:height="1.941cm" svg:x="1.363cm" svg:y="18.746cm">
          <draw:text-box>
            <text:p><text:span text:style-name="T50">1. Lors de la présence d’un contrôleur, le cluster s’exécute en mode Kraft </text:span></text:p>
            <text:p><text:span text:style-name="T50">2. Voir annexe Zookeeper</text:span></text:p>
          </draw:text-box>
        </draw:frame>
        <presentation:notes draw:style-name="dp5">
          <draw:page-thumbnail draw:style-name="gr2" draw:layer="layout" svg:width="15.597cm" svg:height="10.985cm" svg:x="2.623cm" svg:y="2.258cm" draw:page-number="42" presentation:class="page"/>
          <draw:frame presentation:style-name="pr6" draw:text-style-name="P13" draw:layer="layout" svg:width="14.362cm" svg:height="11.254cm" svg:x="3.25cm" svg:y="14.128cm" presentation:class="notes" presentation:placeholder="true">
            <draw:text-box/>
          </draw:frame>
        </presentation:notes>
      </draw:page>
      <draw:page draw:name="page43"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4">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43" presentation:class="page"/>
          <draw:frame presentation:style-name="pr6" draw:text-style-name="P13"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et démarrage d’un nœud</text:p>
          </draw:text-box>
        </draw:frame>
        <draw:frame presentation:style-name="pr5" draw:layer="layout" svg:width="23.499cm" svg:height="12.18cm" svg:x="3.033cm" svg:y="6.283cm" presentation:class="outline" presentation:user-transformed="true">
          <draw:text-box>
            <text:list text:style-name="L2">
              <text:list-item>
                <text:p>Kafka fournit un script de démarrage :<text:line-break/><text:span text:style-name="T55">kafka-server-start.sh</text:span></text:p>
              </text:list-item>
              <text:list-item>
                <text:p>Chaque nœud est démarré via ce script qui lit sa configuration :</text:p>
                <text:list>
                  <text:list-item>
                    <text:p>Dans un fichier <text:span text:style-name="T55">server.properties</text:span></text:p>
                  </text:list-item>
                  <text:list-item>
                    <text:p>Des propriétés peuvent être surchargées par la commande en ligne via l’option –<text:span text:style-name="T55">override</text:span></text:p>
                  </text:list-item>
                </text:list>
              </text:list-item>
              <text:list-item>
                <text:p/>
              </text:list-item>
              <text:list-item>
                <text:p>La distribution propose également un script d’arrêt <text:span text:style-name="T56">kafka-</text:span><text:span text:style-name="T56">server-stop.sh</text:span></text:p>
              </text:list-item>
            </text:list>
          </draw:text-box>
        </draw:frame>
        <presentation:notes draw:style-name="dp5">
          <draw:page-thumbnail draw:style-name="gr2" draw:layer="layout" svg:width="15.597cm" svg:height="10.985cm" svg:x="2.623cm" svg:y="2.258cm" draw:page-number="44" presentation:class="page"/>
          <draw:frame presentation:style-name="pr6" draw:text-style-name="P13" draw:layer="layout" svg:width="14.362cm" svg:height="11.254cm" svg:x="3.25cm" svg:y="14.128cm" presentation:class="notes" presentation:placeholder="true">
            <draw:text-box/>
          </draw:frame>
        </presentation:notes>
      </draw:page>
      <draw:page draw:name="page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incipales configuration</text:p>
          </draw:text-box>
        </draw:frame>
        <draw:frame presentation:style-name="pr5" draw:layer="layout" svg:width="23.499cm" svg:height="12.18cm" svg:x="3.033cm" svg:y="6.283cm" presentation:class="outline">
          <draw:text-box>
            <text:list text:style-name="L2">
              <text:list-item>
                <text:p>Les configurations principales sont :</text:p>
                <text:list>
                  <text:list-item>
                    <text:p><text:span text:style-name="T55">cluster.id</text:span> : Identique pour chaque serveur. </text:p>
                  </text:list-item>
                  <text:list-item>
                    <text:p><text:span text:style-name="T55">node.id</text:span><text:span text:style-name="T57">1</text:span> : Différent pour chaque broker</text:p>
                  </text:list-item>
                  <text:list-item>
                    <text:p><text:span text:style-name="T55">log.dirs</text:span> : Ensemble de répertoires de stockage des enregistrements</text:p>
                  </text:list-item>
                  <text:list-item>
                    <text:p><text:span text:style-name="T55">listeners</text:span> : Ports TCP ouverts </text:p>
                  </text:list-item>
                </text:list>
              </text:list-item>
            </text:list>
          </draw:text-box>
        </draw:frame>
        <draw:frame draw:style-name="gr16" draw:text-style-name="P20" draw:layer="layout" svg:width="13.786cm" svg:height="1.216cm" svg:x="0.982cm" svg:y="19.557cm">
          <draw:text-box>
            <text:p><text:span text:style-name="T14">1. broker.id avec la version ZooKeeper</text:span></text:p>
          </draw:text-box>
        </draw:frame>
        <presentation:notes draw:style-name="dp5">
          <draw:page-thumbnail draw:style-name="gr2" draw:layer="layout" svg:width="15.597cm" svg:height="10.985cm" svg:x="2.623cm" svg:y="2.258cm" draw:page-number="45" presentation:class="page"/>
          <draw:frame presentation:style-name="pr6" draw:text-style-name="P13" draw:layer="layout" svg:width="14.362cm" svg:height="11.254cm" svg:x="3.25cm" svg:y="14.128cm" presentation:class="notes" presentation:placeholder="true">
            <draw:text-box/>
          </draw:frame>
        </presentation:notes>
      </draw:page>
      <draw:page draw:name="page46" draw:style-name="dp7"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par défaut des topics</text:p>
          </draw:text-box>
        </draw:frame>
        <draw:frame presentation:style-name="pr5" draw:layer="layout" svg:width="23.499cm" svg:height="12.18cm" svg:x="3.033cm" svg:y="6.283cm" presentation:class="outline" presentation:user-transformed="true">
          <draw:text-box>
            <text:list text:style-name="L2">
              <text:list-item>
                <text:p><text:span text:style-name="T55">num.partitions</text:span> : Par défaut 1</text:p>
              </text:list-item>
              <text:list-item>
                <text:p><text:span text:style-name="T55">default.replication.factor</text:span> : Par défaut 1</text:p>
              </text:list-item>
              <text:list-item>
                <text:p><text:span text:style-name="T55">min.insync.replicas</text:span> : Joue sur les garanties de message. Par défaut 1</text:p>
              </text:list-item>
              <text:list-item>
                <text:p><text:span text:style-name="T55">log.retention.ms</text:span> : Durée de rétention de messages. Par défaut 7J </text:p>
              </text:list-item>
              <text:list-item>
                <text:p><text:span text:style-name="T55">log.segment.bytes</text:span> : Taille d’un segment. 1Go par défaut</text:p>
              </text:list-item>
              <text:list-item>
                <text:p><text:span text:style-name="T55">message.max.bytes</text:span> : Taille max d’un message. 1Go par défaut</text:p>
              </text:list-item>
            </text:list>
          </draw:text-box>
        </draw:frame>
        <presentation:notes draw:style-name="dp4">
          <draw:page-thumbnail draw:style-name="gr2" draw:layer="layout" svg:width="15.597cm" svg:height="10.985cm" svg:x="2.623cm" svg:y="2.258cm" draw:page-number="46" presentation:class="page"/>
          <draw:frame presentation:style-name="pr6" draw:text-style-name="P18" draw:layer="layout" svg:width="14.362cm" svg:height="11.254cm" svg:x="3.25cm" svg:y="14.128cm" presentation:class="notes" presentation:placeholder="true">
            <draw:text-box/>
          </draw:frame>
        </presentation:notes>
      </draw:page>
      <draw:page draw:name="Le rôle du controller" draw:style-name="dp6" draw:master-page-name="Standard" presentation:presentation-page-layout-name="AL3T1">
        <office:forms form:automatic-focus="false" form:apply-design-mode="false"/>
        <draw:frame draw:name="PlaceHolder 5" presentation:style-name="pr14" draw:text-style-name="P27" draw:layer="layout" svg:width="23.499cm" svg:height="3.574cm" svg:x="3.033cm" svg:y="2.367cm" presentation:class="title" presentation:user-transformed="true">
          <draw:text-box>
            <text:p text:style-name="P26"><text:span text:style-name="T33">Le rôle du controller</text:span></text:p>
          </draw:text-box>
        </draw:frame>
        <draw:frame draw:name="PlaceHolder 7" presentation:style-name="pr15" draw:text-style-name="P30" draw:layer="layout" svg:width="23.499cm" svg:height="12.18cm" svg:x="3.033cm" svg:y="6.283cm" presentation:class="outline" presentation:user-transformed="true">
          <draw:text-box>
            <text:p text:style-name="P28"><text:span text:style-name="T34">Un broker du cluster joue le rôle de controller</text:span></text:p>
            <text:list text:style-name="L6">
              <text:list-item>
                <text:list>
                  <text:list-item>
                    <text:p text:style-name="P29"><text:span text:style-name="T35">Élu parmi les brokers, un seul actif à la fois</text:span></text:p>
                  </text:list-item>
                </text:list>
              </text:list-item>
            </text:list>
            <text:p text:style-name="P28"><text:span text:style-name="T34">Responsable des décisions globales du cluster :</text:span></text:p>
            <text:list text:continue-numbering="true" text:style-name="L6">
              <text:list-item>
                <text:list>
                  <text:list-item>
                    <text:p text:style-name="P29"><text:span text:style-name="T35">Élection des leaders de partitions</text:span></text:p>
                  </text:list-item>
                  <text:list-item>
                    <text:p text:style-name="P29"><text:span text:style-name="T35">Gestion des ISR (In-Sync Replicas)</text:span></text:p>
                  </text:list-item>
                  <text:list-item>
                    <text:p text:style-name="P29"><text:span text:style-name="T35">Détection des brokers défaillants</text:span></text:p>
                  </text:list-item>
                  <text:list-item>
                    <text:p text:style-name="P29"><text:span text:style-name="T35">Création, suppression, modification des topics</text:span></text:p>
                  </text:list-item>
                  <text:list-item>
                    <text:p text:style-name="P29"><text:span text:style-name="T35">Réassignation des partitions</text:span></text:p>
                  </text:list-item>
                </text:list>
              </text:list-item>
            </text:list>
            <text:p text:style-name="P28"><text:span text:style-name="T34">Si le controller tombe, un nouveau est élu automatiquement</text:span></text:p>
            <text:p text:style-name="P28"><text:span text:style-name="T34">Question clé : où stocker l'état du cluster et comment </text:span><text:span text:style-name="T34">garantir la cohérence de l'élection ?</text:span></text:p>
          </draw:text-box>
        </draw:frame>
        <presentation:notes draw:style-name="dp4">
          <draw:page-thumbnail draw:style-name="gr2" draw:layer="layout" svg:width="19.798cm" svg:height="11.136cm" svg:x="0.6cm" svg:y="2.257cm" draw:page-number="47" presentation:class="page"/>
          <draw:frame presentation:style-name="pr16" draw:text-style-name="P18" draw:layer="layout" svg:width="16.799cm" svg:height="13.364cm" svg:x="2.1cm" svg:y="14.107cm" presentation:class="notes" presentation:placeholder="true">
            <draw:text-box/>
          </draw:frame>
        </presentation:notes>
      </draw:page>
      <draw:page draw:name="ZooKeeper vs KRaft" draw:style-name="dp6" draw:master-page-name="Standard" presentation:presentation-page-layout-name="AL3T1">
        <office:forms form:automatic-focus="false" form:apply-design-mode="false"/>
        <draw:frame draw:name="PlaceHolder 6" presentation:style-name="pr14" draw:text-style-name="P27" draw:layer="layout" svg:width="23.499cm" svg:height="3.574cm" svg:x="3.033cm" svg:y="2.367cm" presentation:class="title" presentation:user-transformed="true">
          <draw:text-box>
            <text:p text:style-name="P26"><text:span text:style-name="T33">ZooKeeper vs KRaft</text:span></text:p>
          </draw:text-box>
        </draw:frame>
        <draw:frame draw:name="PlaceHolder 9" presentation:style-name="pr19" draw:text-style-name="P34" draw:layer="layout" svg:width="23.499cm" svg:height="12.18cm" svg:x="3.033cm" svg:y="6.283cm" presentation:class="outline" presentation:placeholder="true" presentation:user-transformed="true">
          <draw:text-box/>
        </draw:frame>
        <draw:frame draw:name="Table 1" draw:style-name="gr17" draw:layer="layout" svg:width="23.367cm" svg:height="11.138cm" svg:x="1.016cm" svg:y="6.477cm">
          <table:table>
            <table:table-column table:style-name="co1"/>
            <table:table-column table:style-name="co2"/>
            <table:table-column table:style-name="co2"/>
            <table:table-row table:style-name="ro1" table:default-cell-style-name="ce1">
              <table:table-cell>
                <text:p text:style-name="P35"><text:span text:style-name="T58">Critère</text:span></text:p>
              </table:table-cell>
              <table:table-cell>
                <text:p text:style-name="P35"><text:span text:style-name="T58">ZooKeeper</text:span></text:p>
              </table:table-cell>
              <table:table-cell>
                <text:p text:style-name="P35"><text:span text:style-name="T58">KRaft</text:span></text:p>
              </table:table-cell>
            </table:table-row>
            <table:table-row table:style-name="ro2" table:default-cell-style-name="ce2">
              <table:table-cell>
                <text:p text:style-name="P35"><text:span text:style-name="T59">Stockage métadonnées</text:span></text:p>
              </table:table-cell>
              <table:table-cell>
                <text:p text:style-name="P35"><text:span text:style-name="T60">Cluster ZK séparé</text:span></text:p>
              </table:table-cell>
              <table:table-cell>
                <text:p text:style-name="P35"><text:span text:style-name="T60">Topic interne __cluster_metadata</text:span></text:p>
              </table:table-cell>
            </table:table-row>
            <table:table-row table:style-name="ro2" table:default-cell-style-name="ce2">
              <table:table-cell>
                <text:p text:style-name="P35"><text:span text:style-name="T59">Composants à opérer</text:span></text:p>
              </table:table-cell>
              <table:table-cell>
                <text:p text:style-name="P35"><text:span text:style-name="T60">Kafka + ZooKeeper</text:span></text:p>
              </table:table-cell>
              <table:table-cell>
                <text:p text:style-name="P35"><text:span text:style-name="T60">Kafka uniquement</text:span></text:p>
              </table:table-cell>
            </table:table-row>
            <table:table-row table:style-name="ro3" table:default-cell-style-name="ce2">
              <table:table-cell>
                <text:p text:style-name="P35"><text:span text:style-name="T59">Consensus</text:span></text:p>
              </table:table-cell>
              <table:table-cell>
                <text:p text:style-name="P35"><text:span text:style-name="T60">ZAB (ZK) + controller</text:span></text:p>
              </table:table-cell>
              <table:table-cell>
                <text:p text:style-name="P35"><text:span text:style-name="T60">Raft natif intégré</text:span></text:p>
              </table:table-cell>
            </table:table-row>
            <table:table-row table:style-name="ro2" table:default-cell-style-name="ce2">
              <table:table-cell>
                <text:p text:style-name="P35"><text:span text:style-name="T59">Limite de scalabilité</text:span></text:p>
              </table:table-cell>
              <table:table-cell>
                <text:p text:style-name="P35"><text:span text:style-name="T60">≈ </text:span><text:span text:style-name="T60">200 000 partitions</text:span></text:p>
              </table:table-cell>
              <table:table-cell>
                <text:p text:style-name="P35"><text:span text:style-name="T60">Millions de partitions</text:span></text:p>
              </table:table-cell>
            </table:table-row>
            <table:table-row table:style-name="ro2" table:default-cell-style-name="ce2">
              <table:table-cell>
                <text:p text:style-name="P35"><text:span text:style-name="T59">Temps de bascule controller</text:span></text:p>
              </table:table-cell>
              <table:table-cell>
                <text:p text:style-name="P35"><text:span text:style-name="T60">Plusieurs secondes à minutes</text:span></text:p>
              </table:table-cell>
              <table:table-cell>
                <text:p text:style-name="P35"><text:span text:style-name="T60">Quelques secondes</text:span></text:p>
              </table:table-cell>
            </table:table-row>
            <table:table-row table:style-name="ro3" table:default-cell-style-name="ce2">
              <table:table-cell>
                <text:p text:style-name="P35"><text:span text:style-name="T59">Statut</text:span></text:p>
              </table:table-cell>
              <table:table-cell>
                <text:p text:style-name="P35"><text:span text:style-name="T60">Déprécié (3.5+), retiré en 4.0</text:span></text:p>
              </table:table-cell>
              <table:table-cell>
                <text:p text:style-name="P35"><text:span text:style-name="T60">Standard depuis Kafka 3.3</text:span></text:p>
              </table:table-cell>
            </table:table-row>
            <table:table-row table:style-name="ro4" table:default-cell-style-name="ce2">
              <table:table-cell>
                <text:p text:style-name="P35"><text:span text:style-name="T59">Migration</text:span></text:p>
              </table:table-cell>
              <table:table-cell>
                <text:p text:style-name="P35"><text:span text:style-name="T60">—</text:span></text:p>
              </table:table-cell>
              <table:table-cell>
                <text:p text:style-name="P35"><text:span text:style-name="T60">Migration ZK → KRaft outillée</text:span></text:p>
              </table:table-cell>
            </table:table-row>
          </table:table>
          <draw:image xlink:href="Pictures/TablePreview1.svm" xlink:type="simple" xlink:show="embed" xlink:actuate="onLoad"/>
        </draw:frame>
        <presentation:notes draw:style-name="dp4">
          <draw:page-thumbnail draw:style-name="gr2" draw:layer="layout" svg:width="19.798cm" svg:height="11.136cm" svg:x="0.6cm" svg:y="2.257cm" draw:page-number="48" presentation:class="page"/>
          <draw:frame presentation:style-name="pr16" draw:text-style-name="P18" draw:layer="layout" svg:width="16.799cm" svg:height="13.364cm" svg:x="2.1cm" svg:y="14.107cm" presentation:class="notes" presentation:placeholder="true">
            <draw:text-box/>
          </draw:frame>
        </presentation:notes>
      </draw:page>
      <draw:page draw:name="Configuration ZooKeeper" draw:style-name="dp6" draw:master-page-name="Standard" presentation:presentation-page-layout-name="AL3T1">
        <office:forms form:automatic-focus="false" form:apply-design-mode="false"/>
        <draw:frame draw:name="PlaceHolder 8" presentation:style-name="pr14" draw:text-style-name="P27" draw:layer="layout" svg:width="23.499cm" svg:height="3.574cm" svg:x="3.033cm" svg:y="2.367cm" presentation:class="title" presentation:user-transformed="true">
          <draw:text-box>
            <text:p text:style-name="P26"><text:span text:style-name="T33">Configuration ZooKeeper</text:span></text:p>
          </draw:text-box>
        </draw:frame>
        <draw:frame draw:name="PlaceHolder 11" presentation:style-name="pr15" draw:text-style-name="P30" draw:layer="layout" svg:width="23.499cm" svg:height="12.18cm" svg:x="3.033cm" svg:y="6.283cm" presentation:class="outline" presentation:user-transformed="true">
          <draw:text-box>
            <text:p text:style-name="P28"><text:span text:style-name="T34">Cluster ZooKeeper séparé (3 ou 5 nœuds)</text:span></text:p>
            <text:list text:style-name="L6">
              <text:list-item>
                <text:list>
                  <text:list-item>
                    <text:p text:style-name="P29"><text:span text:style-name="T35">zoo.cfg sur chaque nœud ZK :</text:span></text:p>
                  </text:list-item>
                  <text:list-item>
                    <text:p text:style-name="P29"><text:span text:style-name="T35">server.1=zk1:2888:3888</text:span></text:p>
                  </text:list-item>
                  <text:list-item>
                    <text:p text:style-name="P29"><text:span text:style-name="T35">server.2=zk2:2888:3888</text:span></text:p>
                  </text:list-item>
                  <text:list-item>
                    <text:p text:style-name="P29"><text:span text:style-name="T35">dataDir=/var/lib/zookeeper</text:span></text:p>
                  </text:list-item>
                </text:list>
              </text:list-item>
            </text:list>
            <text:p text:style-name="P28"><text:span text:style-name="T34">server.properties côté broker Kafka :</text:span></text:p>
            <text:list text:continue-numbering="true" text:style-name="L6">
              <text:list-item>
                <text:list>
                  <text:list-item>
                    <text:p text:style-name="P29"><text:span text:style-name="T35">broker.id=0 <text:s/>(unique par broker)</text:span></text:p>
                  </text:list-item>
                  <text:list-item>
                    <text:p text:style-name="P29"><text:span text:style-name="T35">zookeeper.connect=zk1:2181,zk2:2181,zk3:2181</text:span></text:p>
                    <text:p text:style-name="P29"><text:span text:style-name="T35"/></text:p>
                  </text:list-item>
                </text:list>
              </text:list-item>
            </text:list>
            <text:p text:style-name="P28"><text:span text:style-name="T34">Démarrage : ZooKeeper d'abord, puis les brokers</text:span></text:p>
          </draw:text-box>
        </draw:frame>
        <presentation:notes draw:style-name="dp4">
          <draw:page-thumbnail draw:style-name="gr2" draw:layer="layout" svg:width="19.798cm" svg:height="11.136cm" svg:x="0.6cm" svg:y="2.257cm" draw:page-number="49" presentation:class="page"/>
          <draw:frame presentation:style-name="pr16" draw:text-style-name="P18" draw:layer="layout" svg:width="16.799cm" svg:height="13.364cm" svg:x="2.1cm" svg:y="14.107cm" presentation:class="notes" presentation:placeholder="true">
            <draw:text-box/>
          </draw:frame>
        </presentation:notes>
      </draw:page>
      <draw:page draw:name="page50"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zoo.cfg</text:p>
          </draw:text-box>
        </draw:frame>
        <draw:frame presentation:style-name="pr5" draw:text-style-name="P31" draw:layer="layout" svg:width="23.499cm" svg:height="12.18cm" svg:x="3.033cm" svg:y="6.283cm" presentation:class="outline" presentation:user-transformed="true">
          <draw:text-box>
            <text:list text:style-name="L2">
              <text:list-item>
                <text:p text:style-name="P31"><text:span text:style-name="T61"># Synchronisation du cluster</text:span></text:p>
              </text:list-item>
              <text:list-item>
                <text:p text:style-name="P31">tickTime=2000</text:p>
              </text:list-item>
              <text:list-item>
                <text:p text:style-name="P31">initLimit=10</text:p>
              </text:list-item>
              <text:list-item>
                <text:p text:style-name="P31">syncLimit=5</text:p>
              </text:list-item>
              <text:list-item>
                <text:p text:style-name="P31"/>
              </text:list-item>
              <text:list-item>
                <text:p text:style-name="P31"><text:span text:style-name="T61"># ----- Stockage -----</text:span></text:p>
              </text:list-item>
              <text:list-item>
                <text:p text:style-name="P31">dataDir=/var/lib/zookeeper/data</text:p>
              </text:list-item>
              <text:list-item>
                <text:p text:style-name="P31">dataLogDir=/var/lib/zookeeper/logs</text:p>
              </text:list-item>
              <text:list-item>
                <text:p text:style-name="P31"/>
              </text:list-item>
              <text:list-item>
                <text:p text:style-name="P31"><text:span text:style-name="T61"># ----- Réseau -----</text:span></text:p>
              </text:list-item>
              <text:list-item>
                <text:p text:style-name="P31">clientPort=2181</text:p>
              </text:list-item>
              <text:list-item>
                <text:p text:style-name="P31"/>
              </text:list-item>
              <text:list-item>
                <text:p text:style-name="P31"><text:span text:style-name="T61"># ----- Membres du quorum (ensemble ZK) -----</text:span></text:p>
              </text:list-item>
              <text:list-item>
                <text:p text:style-name="P31">server.1=zk1.example.com:2888:3888</text:p>
              </text:list-item>
              <text:list-item>
                <text:p text:style-name="P31">server.2=zk2.example.com:2888:3888</text:p>
              </text:list-item>
              <text:list-item>
                <text:p text:style-name="P31">server.3=zk3.example.com:2888:3888</text:p>
              </text:list-item>
              <text:list-item>
                <text:p text:style-name="P31"/>
              </text:list-item>
              <text:list-item>
                <text:p text:style-name="P31"><text:span text:style-name="T61"># ----- Maintenance des snapshots -----</text:span></text:p>
              </text:list-item>
              <text:list-item>
                <text:p text:style-name="P31">autopurge.snapRetainCount=5</text:p>
              </text:list-item>
              <text:list-item>
                <text:p text:style-name="P31">autopurge.purgeInterval=24</text:p>
              </text:list-item>
              <text:list-item>
                <text:p text:style-name="P31"/>
              </text:list-item>
            </text:list>
          </draw:text-box>
        </draw:frame>
        <presentation:notes draw:style-name="dp4">
          <draw:page-thumbnail draw:style-name="gr2" draw:layer="layout" svg:width="15.597cm" svg:height="10.985cm" svg:x="2.623cm" svg:y="2.258cm" draw:page-number="50" presentation:class="page"/>
          <draw:frame presentation:style-name="pr6" draw:text-style-name="P13" draw:layer="layout" svg:width="14.362cm" svg:height="11.254cm" svg:x="3.25cm" svg:y="14.128cm" presentation:class="notes" presentation:placeholder="true">
            <draw:text-box/>
          </draw:frame>
        </presentation:notes>
      </draw:page>
      <draw:page draw:name="Configuration KRaft" draw:style-name="dp6" draw:master-page-name="Standard" presentation:presentation-page-layout-name="AL3T1">
        <office:forms form:automatic-focus="false" form:apply-design-mode="false"/>
        <draw:frame draw:name="PlaceHolder 10" presentation:style-name="pr14" draw:text-style-name="P27" draw:layer="layout" svg:width="23.499cm" svg:height="3.574cm" svg:x="3.033cm" svg:y="2.367cm" presentation:class="title" presentation:user-transformed="true">
          <draw:text-box>
            <text:p text:style-name="P26"><text:span text:style-name="T33">Configuration KRaft</text:span></text:p>
          </draw:text-box>
        </draw:frame>
        <draw:frame draw:name="PlaceHolder 13" presentation:style-name="pr15" draw:text-style-name="P30" draw:layer="layout" svg:width="23.499cm" svg:height="12.18cm" svg:x="3.033cm" svg:y="6.283cm" presentation:class="outline" presentation:user-transformed="true">
          <draw:text-box>
            <text:p text:style-name="P28"><text:span text:style-name="T34">Pas de cluster externe, tout dans Kafka</text:span></text:p>
            <text:p text:style-name="P28"><text:span text:style-name="T34">server.properties côté broker/controller :</text:span></text:p>
            <text:list text:style-name="L6">
              <text:list-item>
                <text:list>
                  <text:list-item>
                    <text:p text:style-name="P29"><text:span text:style-name="T62">process.roles=broker,controller <text:s/>(ou un seul)</text:span></text:p>
                  </text:list-item>
                  <text:list-item>
                    <text:p text:style-name="P29"><text:span text:style-name="T35">node.id=1 <text:s/>(unique, remplace broker.id)</text:span></text:p>
                  </text:list-item>
                  <text:list-item>
                    <text:p text:style-name="P29"><text:span text:style-name="T35">controller.quorum.voters=1@host1:9093,2@host2:9093,3@host</text:span><text:span text:style-name="T35">3:9093</text:span></text:p>
                  </text:list-item>
                  <text:list-item>
                    <text:p text:style-name="P29"><text:span text:style-name="T35">listeners=PLAINTEXT://:9092,CONTROLLER://:9093</text:span></text:p>
                  </text:list-item>
                  <text:list-item>
                    <text:p text:style-name="P29"><text:span text:style-name="T35">controller.listener.names=CONTROLLER</text:span></text:p>
                    <text:p text:style-name="P29"><text:span text:style-name="T35"/></text:p>
                  </text:list-item>
                </text:list>
              </text:list-item>
            </text:list>
            <text:p text:style-name="P28"><text:span text:style-name="T34">Étape supplémentaire : formater le storage</text:span></text:p>
            <text:list text:continue-numbering="true" text:style-name="L6">
              <text:list-item>
                <text:list>
                  <text:list-item>
                    <text:p text:style-name="P29"><text:span text:style-name="T63">kafka-storage.sh format -t &lt;cluster-id&gt; -c </text:span><text:span text:style-name="T63">server.properties</text:span></text:p>
                  </text:list-item>
                  <text:list-item>
                    <text:p text:style-name="P29"><text:span text:style-name="T35">Génère un cluster.id partagé par tous les nœuds</text:span></text:p>
                  </text:list-item>
                </text:list>
              </text:list-item>
            </text:list>
          </draw:text-box>
        </draw:frame>
        <presentation:notes draw:style-name="dp4">
          <draw:page-thumbnail draw:style-name="gr2" draw:layer="layout" svg:width="19.798cm" svg:height="11.136cm" svg:x="0.6cm" svg:y="2.257cm" draw:page-number="51" presentation:class="page"/>
          <draw:frame presentation:style-name="pr16" draw:text-style-name="P18" draw:layer="layout" svg:width="16.799cm" svg:height="13.364cm" svg:x="2.1cm" svg:y="14.107cm" presentation:class="notes" presentation:placeholder="true">
            <draw:text-box/>
          </draw:frame>
        </presentation:notes>
      </draw:page>
      <draw:page draw:name="page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 ID</text:p>
          </draw:text-box>
        </draw:frame>
        <draw:frame presentation:style-name="pr5" draw:layer="layout" svg:width="23.499cm" svg:height="12.18cm" svg:x="3.033cm" svg:y="6.283cm" presentation:class="outline" presentation:user-transformed="true">
          <draw:text-box>
            <text:list text:style-name="L2">
              <text:list-item>
                <text:p>Chaque cluster a un <text:span text:style-name="T55">ID</text:span> qui doit être présent dans les données de configurations des répertoires de stockage<text:span text:style-name="T54">1</text:span></text:p>
              </text:list-item>
              <text:list-item>
                <text:p/>
              </text:list-item>
              <text:list-item>
                <text:p>L’outil <text:span text:style-name="T14">kafka-storage.sh </text:span><text:s/>permet de générer un ID aléatoire :</text:p>
              </text:list-item>
              <text:list-item>
                <text:p text:style-name="P24"><text:span text:style-name="T64">bin/kafka-storage.sh </text:span><text:span text:style-name="T65">random-uuid</text:span></text:p>
              </text:list-item>
            </text:list>
          </draw:text-box>
        </draw:frame>
        <draw:frame draw:style-name="gr18" draw:text-style-name="P20" draw:layer="layout" svg:width="21.77cm" svg:height="1.096cm" svg:x="1.657cm" svg:y="19.349cm">
          <draw:text-box>
            <text:p><text:span text:style-name="T50">1. Dans le mode zookeeper cluster.id est présent dans server.properties</text:span></text:p>
          </draw:text-box>
        </draw:frame>
        <presentation:notes draw:style-name="dp5">
          <draw:page-thumbnail draw:style-name="gr2" draw:layer="layout" svg:width="15.597cm" svg:height="10.985cm" svg:x="2.623cm" svg:y="2.258cm" draw:page-number="52" presentation:class="page"/>
          <draw:frame presentation:style-name="pr6" draw:text-style-name="P13"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Formatting des répertoires de log</text:p>
          </draw:text-box>
        </draw:frame>
        <draw:frame presentation:style-name="pr5" draw:layer="layout" svg:width="23.499cm" svg:height="12.18cm" svg:x="3.033cm" svg:y="6.283cm" presentation:class="outline">
          <draw:text-box>
            <text:list text:style-name="L2">
              <text:list-item>
                <text:p text:style-name="P36"><text:span text:style-name="T26">Les répertoires des logs doivent être </text:span><text:span text:style-name="T66">formattés</text:span><text:span text:style-name="T26"> avec l’ID du </text:span><text:span text:style-name="T26">cluster</text:span></text:p>
                <text:list>
                  <text:list-item>
                    <text:p text:style-name="P37"><text:span text:style-name="T52">Le formatting consiste à créer 1 fichier de méta-données :</text:span></text:p>
                    <text:list>
                      <text:list-item>
                        <text:p text:style-name="P38"><text:span text:style-name="T67">meta.properties</text:span></text:p>
                      </text:list-item>
                    </text:list>
                  </text:list-item>
                  <text:list-item>
                    <text:p text:style-name="P37"><text:span text:style-name="T52">Ce fichier est dépendant des propriétés </text:span><text:span text:style-name="T68">cluster.id</text:span><text:span text:style-name="T52"> et </text:span><text:span text:style-name="T68">node.id</text:span></text:p>
                  </text:list-item>
                </text:list>
              </text:list-item>
              <text:list-item>
                <text:p><text:span text:style-name="T21"/></text:p>
              </text:list-item>
              <text:list-item>
                <text:p><text:span text:style-name="T21">Pour créer les fichiers :</text:span><text:span text:style-name="T14"><text:line-break/></text:span><text:span text:style-name="T65">bin/kafka-storage.sh format -t &lt;cluster_id&gt; -c </text:span><text:span text:style-name="T65">server.properties</text:span></text:p>
              </text:list-item>
              <text:list-item>
                <text:p text:style-name="P36"><text:span text:style-name="T26"/></text:p>
              </text:list-item>
            </text:list>
          </draw:text-box>
        </draw:frame>
        <presentation:notes draw:style-name="dp5">
          <draw:page-thumbnail draw:style-name="gr2" draw:layer="layout" svg:width="15.597cm" svg:height="10.985cm" svg:x="2.623cm" svg:y="2.258cm" draw:page-number="53" presentation:class="page"/>
          <draw:frame presentation:style-name="pr6" draw:text-style-name="P13" draw:layer="layout" svg:width="14.362cm" svg:height="11.254cm" svg:x="3.25cm" svg:y="14.128cm" presentation:class="notes" presentation:placeholder="true">
            <draw:text-box/>
          </draw:frame>
        </presentation:notes>
      </draw:page>
      <draw:page draw:name="page54" draw:style-name="dp6" draw:master-page-name="Standard" presentation:presentation-page-layout-name="AL3T1">
        <office:forms form:automatic-focus="false" form:apply-design-mode="false"/>
        <draw:frame draw:name="PlaceHolder 21" presentation:style-name="pr14" draw:text-style-name="P27" draw:layer="layout" svg:width="23.499cm" svg:height="3.574cm" svg:x="3.033cm" svg:y="2.367cm" presentation:class="title" presentation:user-transformed="true">
          <draw:text-box>
            <text:p text:style-name="P39"><text:span text:style-name="T69">Configuration du quorum</text:span></text:p>
          </draw:text-box>
        </draw:frame>
        <draw:frame draw:name="PlaceHolder 22" presentation:style-name="pr15" draw:text-style-name="P30" draw:layer="layout" svg:width="23.499cm" svg:height="12.18cm" svg:x="3.033cm" svg:y="6.283cm" presentation:class="outline" presentation:user-transformed="true">
          <draw:text-box>
            <text:p text:style-name="P40"><text:span text:style-name="T70">controller.quorum.voters <text:s/>(Kafka 3.x)</text:span></text:p>
            <text:list text:style-name="L9">
              <text:list-item>
                <text:list>
                  <text:list-item>
                    <text:p text:style-name="P41"><text:span text:style-name="T71">Liste statique : 1@host1:9093,2@host2:9093,3@host3:9093</text:span></text:p>
                  </text:list-item>
                  <text:list-item>
                    <text:p text:style-name="P41"><text:span text:style-name="T71">Composition figée, redémarrage requis pour modifier</text:span></text:p>
                  </text:list-item>
                  <text:list-item>
                    <text:p text:style-name="P41"><text:span text:style-name="T71">Mode historique de KRaft, le plus répandu en mission</text:span></text:p>
                  </text:list-item>
                </text:list>
              </text:list-item>
            </text:list>
            <text:p text:style-name="P40"><text:span text:style-name="T70">controller.quorum.bootstrap.servers <text:s/>(Kafka 3.9 </text:span><text:span text:style-name="T70">preview, 4.0 GA)</text:span></text:p>
            <text:list text:continue-numbering="true" text:style-name="L9">
              <text:list-item>
                <text:list>
                  <text:list-item>
                    <text:p text:style-name="P41"><text:span text:style-name="T71">Liste de points d'entrée : host1:9093,host2:9093,host3:9093</text:span></text:p>
                  </text:list-item>
                  <text:list-item>
                    <text:p text:style-name="P41"><text:span text:style-name="T71">Quorum découvert dynamiquement, sans node.id</text:span></text:p>
                  </text:list-item>
                  <text:list-item>
                    <text:p text:style-name="P41"><text:span text:style-name="T71">Permet l'ajout/retrait de controllers à chaud (KIP-853)</text:span></text:p>
                  </text:list-item>
                </text:list>
              </text:list-item>
            </text:list>
            <text:p text:style-name="P40"><text:span text:style-name="T72">Conséquences sur kafka-storage format :</text:span></text:p>
            <text:list text:continue-numbering="true" text:style-name="L9">
              <text:list-item>
                <text:list>
                  <text:list-item>
                    <text:p text:style-name="P41"><text:span text:style-name="T71">Avec voters : format classique, rien à ajouter</text:span></text:p>
                  </text:list-item>
                  <text:list-item>
                    <text:p text:style-name="P41"><text:span text:style-name="T71">Avec bootstrap.servers : --standalone (mono-noeud), --initial-</text:span><text:span text:style-name="T71">controllers (mise en place)</text:span></text:p>
                  </text:list-item>
                  <text:list-item>
                    <text:p text:style-name="P41"><text:span text:style-name="T71">ou --no-initial-controllers (ajout de nœud sur un cluster existant)</text:span></text:p>
                  </text:list-item>
                </text:list>
              </text:list-item>
            </text:list>
            <text:p text:style-name="P40"><text:span text:style-name="T72">Les deux propriétés sont mutuellement exclusives</text:span></text:p>
          </draw:text-box>
        </draw:frame>
        <presentation:notes draw:style-name="dp8">
          <office:forms form:automatic-focus="false" form:apply-design-mode="false"/>
          <draw:page-thumbnail draw:style-name="gr2" draw:layer="layout" svg:width="19.798cm" svg:height="11.136cm" svg:x="0.6cm" svg:y="2.257cm" draw:page-number="54" presentation:class="page"/>
          <draw:frame presentation:style-name="pr16" draw:text-style-name="P18" draw:layer="layout" svg:width="16.799cm" svg:height="13.364cm" svg:x="2.1cm" svg:y="14.107cm" presentation:class="notes" presentation:placeholder="true">
            <draw:text-box/>
          </draw:frame>
        </presentation:notes>
      </draw:page>
      <draw:page draw:name="Cluster Kafka" draw:style-name="dp6" draw:master-page-name="Vide">
        <office:forms form:automatic-focus="false" form:apply-design-mode="false"/>
        <draw:frame draw:name="Titre 1" presentation:style-name="pr20" draw:text-style-name="P43" draw:layer="layout" svg:width="23.499cm" svg:height="3.506cm" svg:x="3.033cm" svg:y="2.401cm" presentation:class="title" presentation:user-transformed="true">
          <draw:text-box>
            <text:p text:style-name="P42"><text:span text:style-name="T73">Cluster Kafka</text:span></text:p>
          </draw:text-box>
        </draw:frame>
        <draw:frame draw:name="Sous-titre 1" presentation:style-name="pr21" draw:text-style-name="P45" draw:layer="layout" svg:width="23.499cm" svg:height="12.18cm" svg:x="3.033cm" svg:y="6.283cm" presentation:class="subtitle" presentation:user-transformed="true">
          <draw:text-box>
            <text:p text:style-name="P44"><text:span text:style-name="T74"/></text:p>
            <text:p text:style-name="P44"><text:span text:style-name="T74"/></text:p>
            <text:p text:style-name="P44"><text:span text:style-name="T74"/></text:p>
            <text:p text:style-name="P44"><text:span text:style-name="T74">Cluster</text:span></text:p>
            <text:p text:style-name="P44"><text:span text:style-name="T75">Distributions / Installation</text:span></text:p>
            <text:p text:style-name="P44"><text:span text:style-name="T74">Utilitaires</text:span><text:span text:style-name="T75"> </text:span><text:span text:style-name="T76">Kafka</text:span></text:p>
            <text:p text:style-name="P44"><text:span text:style-name="T74">Outils graphiques</text:span></text:p>
            <text:p text:style-name="P44"><text:span text:style-name="T74"/></text:p>
          </draw:text-box>
        </draw:frame>
        <presentation:notes draw:style-name="dp9">
          <draw:custom-shape draw:name="Forme libre 1" draw:style-name="gr19" draw:text-style-name="P46"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 presentation:style-name="pr22" draw:text-style-name="P47" draw:layer="layout" svg:width="14.367cm" svg:height="11.259cm" svg:x="3.249cm" svg:y="14.129cm" presentation:class="notes" presentation:placeholder="true" presentation:user-transformed="true">
            <draw:text-box/>
          </draw:frame>
        </presentation:notes>
      </draw:page>
      <draw:page draw:name="Introduction" draw:style-name="dp6" draw:master-page-name="Vide">
        <office:forms form:automatic-focus="false" form:apply-design-mode="false"/>
        <draw:frame draw:name="Titre 4" presentation:style-name="pr23" draw:text-style-name="P48" draw:layer="layout" svg:width="23.499cm" svg:height="3.574cm" svg:x="3.033cm" svg:y="2.367cm" presentation:class="title" presentation:user-transformed="true">
          <draw:text-box>
            <text:p text:style-name="P42"><text:span text:style-name="T77">Introduction</text:span></text:p>
          </draw:text-box>
        </draw:frame>
        <draw:frame draw:name="Espace réservé du texte 1" presentation:style-name="pr24" draw:text-style-name="P52" draw:layer="layout" svg:width="23.499cm" svg:height="12.18cm" svg:x="3.033cm" svg:y="6.54cm" presentation:class="outline" presentation:user-transformed="true">
          <draw:text-box>
            <text:p text:style-name="P49"><text:span text:style-name="T74">Kafka peut être déployé</text:span></text:p>
            <text:list text:style-name="L12">
              <text:list-item>
                <text:list>
                  <text:list-item>
                    <text:p text:style-name="P50"><text:span text:style-name="T78">sur des serveurs physiques, des machines virtuelles ou </text:span><text:span text:style-name="T78">des conteneurs</text:span></text:p>
                  </text:list-item>
                  <text:list-item>
                    <text:p text:style-name="P50"><text:span text:style-name="T78">sur site ou dans le cloud</text:span></text:p>
                  </text:list-item>
                </text:list>
              </text:list-item>
            </text:list>
            <text:p text:style-name="P51"><text:span text:style-name="T74">Différentes distributions peuvent être récupérées :</text:span></text:p>
            <text:list text:continue-numbering="true" text:style-name="L12">
              <text:list-item>
                <text:list>
                  <text:list-item>
                    <text:p text:style-name="P50"><text:span text:style-name="T78">Binaire chez Apache. </text:span><text:span text:style-name="T78"><text:line-break/></text:span><text:span text:style-name="T78">OS recommandé Linux + pré-installation de Java (Support </text:span><text:span text:style-name="T78">de Java 17 pour 3.x)</text:span></text:p>
                  </text:list-item>
                  <text:list-item>
                    <text:p text:style-name="P50"><text:span text:style-name="T78">Images docker : (Apache depuis peu dont une image </text:span><text:span text:style-name="T78">native, editeurs tierces)</text:span></text:p>
                  </text:list-item>
                  <text:list-item>
                    <text:p text:style-name="P50"><text:span text:style-name="T78">Environnement Cloud, Packages Helm : Bitnami, </text:span><text:span text:style-name="T78">Operateur Strimzi, Confluent</text:span></text:p>
                  </text:list-item>
                  <text:list-item>
                    <text:p text:style-name="P50"><text:span text:style-name="T78">Confluent Platform (Téléchargement ou cloud)</text:span></text:p>
                  </text:list-item>
                </text:list>
              </text:list-item>
            </text:list>
            <text:p text:style-name="P51"><text:span text:style-name="T74"/></text:p>
          </draw:text-box>
        </draw:frame>
        <presentation:notes draw:style-name="dp9">
          <draw:page-thumbnail draw:name="Espace réservé de l'image des diapositives 1" draw:style-name="gr2" draw:layer="layout" svg:width="15.535cm" svg:height="10.984cm" svg:x="2.655cm" svg:y="2.258cm" draw:page-number="56" presentation:class="page"/>
          <draw:frame draw:name="Espace réservé des notes 2" presentation:style-name="pr25" draw:text-style-name="P47" draw:layer="layout" svg:width="14.362cm" svg:height="11.253cm" svg:x="3.25cm" svg:y="14.128cm" presentation:class="notes" presentation:placeholder="true" presentation:user-transformed="true">
            <draw:text-box/>
          </draw:frame>
        </presentation:notes>
      </draw:page>
      <draw:page draw:name="Installation à partir de l’archive" draw:style-name="dp6" draw:master-page-name="Vide">
        <office:forms form:automatic-focus="false" form:apply-design-mode="false"/>
        <draw:frame draw:name="Titre 6" presentation:style-name="pr23" draw:text-style-name="P48" draw:layer="layout" svg:width="23.499cm" svg:height="3.574cm" svg:x="3.033cm" svg:y="2.367cm" presentation:class="title" presentation:user-transformed="true">
          <draw:text-box>
            <text:p text:style-name="P42"><text:span text:style-name="T77">Installation à partir de l’archive</text:span></text:p>
          </draw:text-box>
        </draw:frame>
        <draw:frame draw:name="Espace réservé du texte 2" presentation:style-name="pr24" draw:text-style-name="P52" draw:layer="layout" svg:width="23.499cm" svg:height="12.18cm" svg:x="3.033cm" svg:y="6.283cm" presentation:class="outline" presentation:user-transformed="true">
          <draw:text-box>
            <text:p text:style-name="P49"><text:span text:style-name="T74">Téléchargement, puis</text:span></text:p>
            <text:p text:style-name="P53"><text:span text:style-name="T79"># tar -zxf kafka_&lt;version&gt;.tgz</text:span></text:p>
            <text:p text:style-name="P53"><text:span text:style-name="T79"># mv kafka_&lt;version&gt; /usr/local/kafka</text:span></text:p>
            <text:p text:style-name="P53"><text:span text:style-name="T79"># mkdir /tmp/kafka-logs</text:span></text:p>
            <text:p text:style-name="P53"><text:span text:style-name="T79"># export JAVA_HOME=/usr/java/jdk17</text:span></text:p>
            <text:p text:style-name="P53"><text:span text:style-name="T79"># cd /usr/local/kafka/bin</text:span></text:p>
            <text:p text:style-name="P53"><text:span text:style-name="T79"># </text:span><text:span text:style-name="T80">./kafka-server-start.sh -daemon ../config/server.properties</text:span></text:p>
            <text:p text:style-name="P49"><text:span text:style-name="T74"/></text:p>
            <text:p text:style-name="P49"><text:span text:style-name="T74">Les</text:span><text:span text:style-name="T79"> </text:span><text:span text:style-name="T74">configuration définies dans </text:span><text:span text:style-name="T81">server.properties</text:span><text:span text:style-name="T74"> peuvent </text:span><text:span text:style-name="T74">être surchargées en ligne de commande par l’option </text:span><text:span text:style-name="T76">--</text:span><text:span text:style-name="T76">override</text:span></text:p>
          </draw:text-box>
        </draw:frame>
        <presentation:notes draw:style-name="dp9">
          <draw:page-thumbnail draw:name="Espace réservé de l'image des diapositives 5" draw:style-name="gr2" draw:layer="layout" svg:width="15.535cm" svg:height="10.984cm" svg:x="2.655cm" svg:y="2.258cm" draw:page-number="57" presentation:class="page"/>
          <draw:frame draw:name="Espace réservé des notes 3" presentation:style-name="pr26" draw:text-style-name="P47" draw:layer="layout" svg:width="14.362cm" svg:height="11.253cm" svg:x="3.25cm" svg:y="14.128cm" presentation:class="notes" presentation:placeholder="true" presentation:user-transformed="true">
            <draw:text-box/>
          </draw:frame>
        </presentation:notes>
      </draw:page>
      <draw:page draw:name="Images Docker" draw:style-name="dp6" draw:master-page-name="Vide">
        <office:forms form:automatic-focus="false" form:apply-design-mode="false"/>
        <draw:frame draw:name="Titre 7" presentation:style-name="pr23" draw:text-style-name="P48" draw:layer="layout" svg:width="23.499cm" svg:height="3.574cm" svg:x="3.033cm" svg:y="2.367cm" presentation:class="title" presentation:user-transformed="true">
          <draw:text-box>
            <text:p text:style-name="P42"><text:span text:style-name="T77">Images Docker</text:span></text:p>
          </draw:text-box>
        </draw:frame>
        <draw:frame draw:name="Espace réservé du texte 3" presentation:style-name="pr24" draw:text-style-name="P52" draw:layer="layout" svg:width="23.499cm" svg:height="12.18cm" svg:x="3.033cm" svg:y="6.508cm" presentation:class="outline" presentation:user-transformed="true">
          <draw:text-box>
            <text:p text:style-name="P49"><text:span text:style-name="T74"><text:s/></text:span><text:span text:style-name="T74">L’image docker officielle contient un mécanisme permettant </text:span><text:span text:style-name="T74">de sujrcharger les valeurs de configuration </text:span><text:span text:style-name="T74">(</text:span><text:span text:style-name="T76">server.properties</text:span><text:span text:style-name="T74">) par des variables d’environnement.</text:span></text:p>
            <text:p text:style-name="P49"><text:span text:style-name="T74">Les variables d’environnement doivent respecter une règle </text:span><text:span text:style-name="T74">de nommage :</text:span></text:p>
            <text:list text:style-name="L13">
              <text:list-item>
                <text:p text:style-name="P54"><text:span text:style-name="T74">Préfixe KAFKA</text:span></text:p>
              </text:list-item>
              <text:list-item>
                <text:p text:style-name="P54"><text:span text:style-name="T74">Nom de la propriété en majuscule</text:span></text:p>
              </text:list-item>
              <text:list-item>
                <text:p text:style-name="P54"><text:span text:style-name="T74">Remplacer les . par des _</text:span><text:span text:style-name="T74"><text:line-break/></text:span><text:span text:style-name="T74"><text:line-break/></text:span><text:span text:style-name="T74">Par exemple : </text:span><text:span text:style-name="T82">KAFKA_AUTO_CREATE_TOPICS_ENABLE</text:span></text:p>
              </text:list-item>
            </text:list>
            <text:p text:style-name="P49"><text:span text:style-name="T74"/></text:p>
            <text:p text:style-name="P49"><text:span text:style-name="T74">Au démarrage de l’image, un script lit les variables </text:span><text:span text:style-name="T74">d’environnement et met à jour un </text:span><text:span text:style-name="T76">server.properties</text:span><text:span text:style-name="T74"> avant </text:span><text:span text:style-name="T74">le démarrage du broker</text:span></text:p>
          </draw:text-box>
        </draw:frame>
        <presentation:notes draw:style-name="dp9">
          <draw:page-thumbnail draw:name="Espace réservé de l'image des diapositives 6" draw:style-name="gr2" draw:layer="layout" svg:width="15.535cm" svg:height="10.984cm" svg:x="2.655cm" svg:y="2.258cm" draw:page-number="58" presentation:class="page"/>
          <draw:frame draw:name="Espace réservé des notes 4" presentation:style-name="pr27" draw:text-style-name="P47" draw:layer="layout" svg:width="14.362cm" svg:height="11.253cm" svg:x="3.25cm" svg:y="14.128cm" presentation:class="notes" presentation:placeholder="true" presentation:user-transformed="true">
            <draw:text-box/>
          </draw:frame>
        </presentation:notes>
      </draw:page>
      <draw:page draw:name="Kubernetes" draw:style-name="dp6" draw:master-page-name="Vide">
        <office:forms form:automatic-focus="false" form:apply-design-mode="false"/>
        <draw:frame draw:name="Titre 8" presentation:style-name="pr23" draw:text-style-name="P48" draw:layer="layout" svg:width="23.499cm" svg:height="3.574cm" svg:x="3.033cm" svg:y="2.367cm" presentation:class="title" presentation:user-transformed="true">
          <draw:text-box>
            <text:p text:style-name="P42"><text:span text:style-name="T77">Kubernetes</text:span></text:p>
          </draw:text-box>
        </draw:frame>
        <draw:frame draw:name="Espace réservé du texte 4" presentation:style-name="pr24" draw:text-style-name="P52" draw:layer="layout" svg:width="23.499cm" svg:height="12.18cm" svg:x="3.033cm" svg:y="6.448cm" presentation:class="outline" presentation:user-transformed="true">
          <draw:text-box>
            <text:p text:style-name="P49"><text:span text:style-name="T83">Bitnami</text:span><text:span text:style-name="T74"> propose des packages Helm pour déployer vers </text:span><text:span text:style-name="T74">Kubernetes ou des clouds</text:span></text:p>
            <text:p text:style-name="P49"><text:span text:style-name="T84">helm install my-release oci://registry-1.docker.io/bitnamicharts/kafka</text:span></text:p>
            <text:p text:style-name="P49"><text:span text:style-name="T74">De nombreux paramètres sont disponibles :</text:span></text:p>
            <text:list text:style-name="L12">
              <text:list-item>
                <text:list>
                  <text:list-item>
                    <text:p text:style-name="P50"><text:span text:style-name="T85">replicaCount </text:span><text:span text:style-name="T78">: Nombre de répliques</text:span></text:p>
                  </text:list-item>
                  <text:list-item>
                    <text:p text:style-name="P50"><text:span text:style-name="T85">config </text:span><text:span text:style-name="T78">: Fichier de configuration</text:span></text:p>
                  </text:list-item>
                  <text:list-item>
                    <text:p text:style-name="P50"><text:span text:style-name="T85">existingConfigmap </text:span><text:span text:style-name="T78">: Pour utiliser les ConfigMap</text:span></text:p>
                  </text:list-item>
                  <text:list-item>
                    <text:p text:style-name="P50"><text:span text:style-name="T78">…</text:span></text:p>
                  </text:list-item>
                </text:list>
              </text:list-item>
            </text:list>
            <text:p text:style-name="P51"><text:span text:style-name="T83">Strimzi</text:span><text:span text:style-name="T74"> est un opérateur Kubernetes, il s’appuie sur des </text:span><text:span text:style-name="T74">CRD</text:span></text:p>
          </draw:text-box>
        </draw:frame>
        <presentation:notes draw:style-name="dp9">
          <draw:page-thumbnail draw:name="Espace réservé de l'image des diapositives 7" draw:style-name="gr2" draw:layer="layout" svg:width="15.535cm" svg:height="10.984cm" svg:x="2.655cm" svg:y="2.258cm" draw:page-number="59" presentation:class="page"/>
          <draw:frame draw:name="Espace réservé des notes 5" presentation:style-name="pr28" draw:text-style-name="P47" draw:layer="layout" svg:width="14.362cm" svg:height="11.253cm" svg:x="3.25cm" svg:y="14.128cm" presentation:class="notes" presentation:placeholder="true" presentation:user-transformed="true">
            <draw:text-box/>
          </draw:frame>
        </presentation:notes>
      </draw:page>
      <draw:page draw:name="Exemple CRD Strimzi" draw:style-name="dp6" draw:master-page-name="Vide">
        <office:forms form:automatic-focus="false" form:apply-design-mode="false"/>
        <draw:frame draw:name="Titre 9" presentation:style-name="pr23" draw:text-style-name="P48" draw:layer="layout" svg:width="23.499cm" svg:height="3.574cm" svg:x="3.033cm" svg:y="2.367cm" presentation:class="title" presentation:user-transformed="true">
          <draw:text-box>
            <text:p text:style-name="P42"><text:span text:style-name="T77">Exemple CRD Strimzi</text:span></text:p>
          </draw:text-box>
        </draw:frame>
        <draw:frame draw:name="Espace réservé du texte 5" presentation:style-name="pr29" draw:text-style-name="P52" draw:layer="layout" svg:width="23.499cm" svg:height="12.18cm" svg:x="3.033cm" svg:y="6.448cm" presentation:class="outline" presentation:user-transformed="true">
          <draw:text-box>
            <text:p text:style-name="P55"><text:span text:style-name="T86">apiVersion: kafka.strimzi.io/v1beta2</text:span></text:p>
            <text:p text:style-name="P55"><text:span text:style-name="T86">kind: Kafka</text:span></text:p>
            <text:p text:style-name="P55"><text:span text:style-name="T86">metadata:</text:span></text:p>
            <text:p text:style-name="P55"><text:span text:style-name="T86"><text:s text:c="2"/></text:span><text:span text:style-name="T86">name: mon-cluster-kafka</text:span></text:p>
            <text:p text:style-name="P55"><text:span text:style-name="T86"><text:s text:c="2"/></text:span><text:span text:style-name="T86">namespace: kafka</text:span></text:p>
            <text:p text:style-name="P55"><text:span text:style-name="T86">spec:</text:span></text:p>
            <text:p text:style-name="P55"><text:span text:style-name="T86"><text:s text:c="2"/></text:span><text:span text:style-name="T86">kafka:</text:span></text:p>
            <text:p text:style-name="P55"><text:span text:style-name="T86"><text:s text:c="4"/></text:span><text:span text:style-name="T86">version: 3.9.0 <text:s/># Version de Kafka</text:span></text:p>
            <text:p text:style-name="P55"><text:span text:style-name="T86"><text:s text:c="4"/></text:span><text:span text:style-name="T86">replicas: 3 <text:s text:c="5"/># Nombre de brokers</text:span></text:p>
            <text:p text:style-name="P55"><text:span text:style-name="T86"><text:s text:c="4"/></text:span><text:span text:style-name="T86">listeners:</text:span></text:p>
            <text:p text:style-name="P55"><text:span text:style-name="T86"><text:s text:c="6"/></text:span><text:span text:style-name="T86">- name: plain</text:span></text:p>
            <text:p text:style-name="P55"><text:span text:style-name="T86"><text:s text:c="8"/></text:span><text:span text:style-name="T86">port: 9092</text:span></text:p>
            <text:p text:style-name="P55"><text:span text:style-name="T86"><text:s text:c="8"/></text:span><text:span text:style-name="T86">type: internal</text:span></text:p>
            <text:p text:style-name="P55"><text:span text:style-name="T86"><text:s text:c="8"/></text:span><text:span text:style-name="T86">tls: false</text:span></text:p>
            <text:p text:style-name="P55"><text:span text:style-name="T86"><text:s text:c="6"/></text:span><text:span text:style-name="T86">- name: tls</text:span></text:p>
            <text:p text:style-name="P56"><text:span text:style-name="T86"><text:s text:c="8"/></text:span><text:span text:style-name="T86">port: 9093</text:span></text:p>
            <text:p text:style-name="P55"><text:span text:style-name="T86"><text:s text:c="8"/></text:span><text:span text:style-name="T86">type: internal</text:span></text:p>
            <text:p text:style-name="P55"><text:span text:style-name="T86"><text:s text:c="8"/></text:span><text:span text:style-name="T86">tls: true</text:span></text:p>
            <text:p text:style-name="P55"><text:span text:style-name="T86"><text:s text:c="4"/></text:span><text:span text:style-name="T86"># Ici, on surcharge les propriétés de server.properties</text:span></text:p>
            <text:p text:style-name="P55"><text:span text:style-name="T86"><text:s text:c="4"/></text:span><text:span text:style-name="T86">config:</text:span></text:p>
            <text:p text:style-name="P55"><text:span text:style-name="T86"><text:s text:c="6"/></text:span><text:span text:style-name="T86">offsets.topic.replication.factor: 3</text:span></text:p>
            <text:p text:style-name="P55"><text:span text:style-name="T86"><text:s text:c="6"/></text:span><text:span text:style-name="T86">default.replication.factor: 3</text:span></text:p>
            <text:p text:style-name="P55"><text:span text:style-name="T86"><text:s text:c="6"/></text:span><text:span text:style-name="T86">min.insync.replicas: 2</text:span></text:p>
            <text:p text:style-name="P55"><text:span text:style-name="T86"><text:s text:c="6"/></text:span><text:span text:style-name="T86">inter.broker.protocol.version: "3.9"</text:span></text:p>
            <text:p text:style-name="P55"><text:span text:style-name="T86"><text:s text:c="4"/></text:span><text:span text:style-name="T86">storage:</text:span></text:p>
            <text:p text:style-name="P55"><text:span text:style-name="T86"><text:s text:c="6"/></text:span><text:span text:style-name="T86">type: jbod</text:span></text:p>
            <text:p text:style-name="P55"><text:span text:style-name="T86"><text:s text:c="6"/></text:span><text:span text:style-name="T86">volumes:</text:span></text:p>
            <text:p text:style-name="P55"><text:span text:style-name="T86"><text:s text:c="8"/></text:span><text:span text:style-name="T86">- id: 0</text:span></text:p>
            <text:p text:style-name="P55"><text:span text:style-name="T86"><text:s text:c="10"/></text:span><text:span text:style-name="T86">type: persistent-claim</text:span></text:p>
            <text:p text:style-name="P55"><text:span text:style-name="T86"><text:s text:c="10"/></text:span><text:span text:style-name="T86">size: 100Gi</text:span></text:p>
            <text:p text:style-name="P55"><text:span text:style-name="T86"><text:s text:c="10"/></text:span><text:span text:style-name="T86">deleteClaim: false</text:span></text:p>
            <text:p text:style-name="P55"><text:span text:style-name="T86"><text:s text:c="2"/></text:span><text:span text:style-name="T86"># Configuration KRaft (Remplace ZooKeeper)</text:span></text:p>
            <text:p text:style-name="P55"><text:span text:style-name="T86"><text:s text:c="2"/></text:span><text:span text:style-name="T86">entityOperator:</text:span></text:p>
            <text:p text:style-name="P55"><text:span text:style-name="T86"><text:s text:c="4"/></text:span><text:span text:style-name="T86">topicOperator: {}</text:span></text:p>
            <text:p text:style-name="P55"><text:span text:style-name="T86"><text:s text:c="4"/></text:span><text:span text:style-name="T86">userOperator: {}</text:span></text:p>
          </draw:text-box>
        </draw:frame>
        <presentation:notes draw:style-name="dp9">
          <draw:page-thumbnail draw:name="Espace réservé de l'image des diapositives 8" draw:style-name="gr2" draw:layer="layout" svg:width="15.535cm" svg:height="10.984cm" svg:x="2.655cm" svg:y="2.258cm" draw:page-number="60" presentation:class="page"/>
          <draw:frame draw:name="Espace réservé des notes 6" presentation:style-name="pr30" draw:text-style-name="P47" draw:layer="layout" svg:width="14.362cm" svg:height="11.253cm" svg:x="3.25cm" svg:y="14.128cm" presentation:class="notes" presentation:placeholder="true" presentation:user-transformed="true">
            <draw:text-box/>
          </draw:frame>
        </presentation:notes>
      </draw:page>
      <draw:page draw:name="Vérifications de l’installation" draw:style-name="dp6" draw:master-page-name="Vide">
        <office:forms form:automatic-focus="false" form:apply-design-mode="false"/>
        <draw:frame draw:name="Titre 10" presentation:style-name="pr23" draw:text-style-name="P48" draw:layer="layout" svg:width="23.499cm" svg:height="3.574cm" svg:x="3.033cm" svg:y="2.367cm" presentation:class="title" presentation:user-transformed="true">
          <draw:text-box>
            <text:p text:style-name="P42"><text:span text:style-name="T77">Vérifications de l’installation</text:span></text:p>
          </draw:text-box>
        </draw:frame>
        <draw:frame draw:name="Espace réservé du texte 6" presentation:style-name="pr24" draw:text-style-name="P52" draw:layer="layout" svg:width="23.499cm" svg:height="12.18cm" svg:x="3.033cm" svg:y="6.508cm" presentation:class="outline" presentation:user-transformed="true">
          <draw:text-box>
            <text:p text:style-name="P49"><text:span text:style-name="T87">Création de topic </text:span><text:span text:style-name="T74">:</text:span><text:span text:style-name="T74"><text:line-break/></text:span><text:span text:style-name="T88">bin/kafka-topics.sh --create --bootstrap-server </text:span><text:span text:style-name="T88">localhost:9092 --replication-factor 1 --partitions 1 --</text:span><text:span text:style-name="T88">topic test</text:span></text:p>
            <text:p text:style-name="P53"><text:span text:style-name="T87">Envois de messages</text:span><text:span text:style-name="T74"> :</text:span><text:span text:style-name="T74"><text:line-break/></text:span><text:span text:style-name="T88">bin/kafka-console-producer.sh --bootstrap-server </text:span><text:span text:style-name="T88">localhost:9092 --topic test</text:span><text:span text:style-name="T88"><text:line-break/></text:span><text:span text:style-name="T88">This is a message</text:span><text:span text:style-name="T88"><text:line-break/></text:span><text:span text:style-name="T88">This is another message</text:span><text:span text:style-name="T88"><text:line-break/></text:span><text:span text:style-name="T88">^D</text:span></text:p>
            <text:p text:style-name="P53"><text:span text:style-name="T87">Consommation de messages</text:span><text:span text:style-name="T74"> :</text:span><text:span text:style-name="T74"><text:line-break/></text:span><text:span text:style-name="T88">bin/kafka-console-consumer.sh --bootstrap-server </text:span><text:span text:style-name="T88">localhost:9092 --topic test --from-beginning</text:span><text:span text:style-name="T88"><text:line-break/></text:span><text:span text:style-name="T88">This is a message</text:span><text:span text:style-name="T88"><text:line-break/></text:span><text:span text:style-name="T88">This is another message</text:span></text:p>
          </draw:text-box>
        </draw:frame>
        <presentation:notes draw:style-name="dp9">
          <draw:page-thumbnail draw:name="Espace réservé de l'image des diapositives 9" draw:style-name="gr2" draw:layer="layout" svg:width="15.535cm" svg:height="10.984cm" svg:x="2.655cm" svg:y="2.258cm" draw:page-number="61" presentation:class="page"/>
          <draw:frame draw:name="Espace réservé des notes 7" presentation:style-name="pr31" draw:text-style-name="P47" draw:layer="layout" svg:width="14.362cm" svg:height="11.253cm" svg:x="3.25cm" svg:y="14.128cm" presentation:class="notes" presentation:placeholder="true" presentation:user-transformed="true">
            <draw:text-box/>
          </draw:frame>
        </presentation:notes>
      </draw:page>
      <draw:page draw:name="Fichiers de trace" draw:style-name="dp6" draw:master-page-name="Vide">
        <office:forms form:automatic-focus="false" form:apply-design-mode="false"/>
        <draw:frame draw:name="Titre 11" presentation:style-name="pr23" draw:text-style-name="P48" draw:layer="layout" svg:width="23.499cm" svg:height="3.574cm" svg:x="3.033cm" svg:y="2.367cm" presentation:class="title" presentation:user-transformed="true">
          <draw:text-box>
            <text:p text:style-name="P42"><text:span text:style-name="T77">Fichiers de trace</text:span></text:p>
          </draw:text-box>
        </draw:frame>
        <draw:frame draw:name="Espace réservé du texte 7" presentation:style-name="pr24" draw:text-style-name="P52" draw:layer="layout" svg:width="23.499cm" svg:height="12.18cm" svg:x="3.033cm" svg:y="6.508cm" presentation:class="outline" presentation:user-transformed="true">
          <draw:text-box>
            <text:p text:style-name="P49"><text:span text:style-name="T74">La configuration des fichiers de trace est définie soit dans </text:span><text:span text:style-name="T89">conf/log4j.properties </text:span><text:span text:style-name="T90">soit dans </text:span><text:span text:style-name="T89">conf/log4j2.yaml</text:span></text:p>
            <text:p text:style-name="P49"><text:span text:style-name="T74">Par défaut sont générés :</text:span></text:p>
            <text:list text:style-name="L12">
              <text:list-item>
                <text:list>
                  <text:list-item>
                    <text:p text:style-name="P50"><text:span text:style-name="T91">server.log</text:span><text:span text:style-name="T78"> : Traces générales</text:span></text:p>
                  </text:list-item>
                  <text:list-item>
                    <text:p text:style-name="P50"><text:span text:style-name="T91">state-change.log</text:span><text:span text:style-name="T78"> : Traces des changements d’état </text:span><text:span text:style-name="T78">(topics, partition, brokers, répliques)</text:span></text:p>
                  </text:list-item>
                  <text:list-item>
                    <text:p text:style-name="P50"><text:span text:style-name="T91">kafka-request.log</text:span><text:span text:style-name="T78"> : Traces des requêtes clients et inter-</text:span><text:span text:style-name="T78">broker</text:span></text:p>
                  </text:list-item>
                  <text:list-item>
                    <text:p text:style-name="P50"><text:span text:style-name="T91">log-cleaner.log</text:span><text:span text:style-name="T78"> : Suppression des messages expirés</text:span></text:p>
                  </text:list-item>
                  <text:list-item>
                    <text:p text:style-name="P50"><text:span text:style-name="T91">controller.log</text:span><text:span text:style-name="T78"> : Logs du contrôleur</text:span></text:p>
                  </text:list-item>
                  <text:list-item>
                    <text:p text:style-name="P50"><text:span text:style-name="T91">kafka-authorizer.log</text:span><text:span text:style-name="T78"> : Traces sur les ACLs</text:span></text:p>
                  </text:list-item>
                </text:list>
              </text:list-item>
            </text:list>
          </draw:text-box>
        </draw:frame>
        <draw:custom-shape draw:name="ZoneTexte 1" draw:style-name="gr20" draw:text-style-name="P58" draw:layer="layout" svg:width="12.183cm" svg:height="1.216cm" svg:x="1.244cm" svg:y="19.4cm">
          <text:p text:style-name="P57"><text:span text:style-name="T92">Atelier 1.1 : Mise en place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9">
          <draw:page-thumbnail draw:name="Espace réservé de l'image des diapositives 10" draw:style-name="gr2" draw:layer="layout" svg:width="15.535cm" svg:height="10.984cm" svg:x="2.655cm" svg:y="2.258cm" draw:page-number="62" presentation:class="page"/>
          <draw:frame draw:name="Espace réservé des notes 8" presentation:style-name="pr32" draw:text-style-name="P47" draw:layer="layout" svg:width="14.362cm" svg:height="11.253cm" svg:x="3.25cm" svg:y="14.128cm" presentation:class="notes" presentation:placeholder="true" presentation:user-transformed="true">
            <draw:text-box/>
          </draw:frame>
        </presentation:notes>
      </draw:page>
      <draw:page draw:name="page6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Cluster Kafka</text:span></text:p>
              </text:list-header>
            </text:list>
          </draw:text-box>
        </draw:frame>
        <draw:frame presentation:style-name="pr33" draw:text-style-name="P16"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Cluster</text:span></text:p>
              </text:list-item>
              <text:list-item>
                <text:p text:style-name="P19"><text:span text:style-name="T2">Distributions / Installation</text:span></text:p>
              </text:list-item>
              <text:list-item>
                <text:p text:style-name="P19"><text:span text:style-name="T12">Utilitaires Kafka</text:span></text:p>
              </text:list-item>
              <text:list-item>
                <text:p text:style-name="P33"><text:span text:style-name="T13">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 répertoire <text:span text:style-name="T93">$KAFKA_HOME/bin</text:span> contient de nombreux scripts utilitaires dédiés à l’exploitation du cluster.</text:p>
              </text:list-item>
              <text:list-item>
                <text:p>Les scripts utilisent l’API Java de Kafka</text:p>
              </text:list-item>
              <text:list-item>
                <text:p>Une aide est disponible pour chaque script décrivant les paramètres requis ou optionnels</text:p>
              </text:list-item>
            </text:list>
          </draw:text-box>
        </draw:frame>
        <presentation:notes draw:style-name="dp5">
          <draw:page-thumbnail draw:style-name="gr2" draw:layer="layout" svg:width="15.597cm" svg:height="10.985cm" svg:x="2.623cm" svg:y="2.258cm" draw:page-number="64" presentation:class="page"/>
          <draw:frame presentation:style-name="pr6" draw:text-style-name="P18" draw:layer="layout" svg:width="14.362cm" svg:height="11.254cm" svg:x="3.25cm" svg:y="14.128cm" presentation:class="notes" presentation:placeholder="true">
            <draw:text-box/>
          </draw:frame>
        </presentation:notes>
      </draw:page>
      <draw:page draw:name="Principe général" draw:style-name="dp6" draw:master-page-name="Standard" presentation:presentation-page-layout-name="AL3T1">
        <office:forms form:automatic-focus="false" form:apply-design-mode="false"/>
        <draw:frame draw:name="PlaceHolder 12" presentation:style-name="pr14" draw:text-style-name="P27" draw:layer="layout" svg:width="23.499cm" svg:height="3.574cm" svg:x="3.033cm" svg:y="2.367cm" presentation:class="title" presentation:user-transformed="true">
          <draw:text-box>
            <text:p text:style-name="P26"><text:span text:style-name="T33">Principe général</text:span></text:p>
          </draw:text-box>
        </draw:frame>
        <draw:frame draw:name="PlaceHolder 14" presentation:style-name="pr15" draw:text-style-name="P30" draw:layer="layout" svg:width="23.499cm" svg:height="13.083cm" svg:x="3.033cm" svg:y="6.283cm" presentation:class="outline" presentation:user-transformed="true">
          <draw:text-box>
            <text:p text:style-name="P28"><text:span text:style-name="T34">Tous les scripts dans $KAFKA_HOME/bin</text:span></text:p>
            <text:list text:style-name="L6">
              <text:list-item>
                <text:list>
                  <text:list-item>
                    <text:p text:style-name="P29"><text:span text:style-name="T35">Wrappers shell (.sh) sur des classes Java</text:span></text:p>
                  </text:list-item>
                  <text:list-item>
                    <text:p text:style-name="P29"><text:span text:style-name="T35">.bat équivalents sous Windows</text:span></text:p>
                  </text:list-item>
                  <text:list-item>
                    <text:p text:style-name="P29"><text:span text:style-name="T35">Utilisent les mêmes API Java que les clients</text:span></text:p>
                  </text:list-item>
                </text:list>
              </text:list-item>
            </text:list>
            <text:p text:style-name="P28"><text:span text:style-name="T34">Aide intégrée :</text:span></text:p>
            <text:list text:continue-numbering="true" text:style-name="L6">
              <text:list-item>
                <text:list>
                  <text:list-item>
                    <text:p text:style-name="P29"><text:span text:style-name="T35">kafka-xxx.sh sans argument → affiche les options</text:span></text:p>
                  </text:list-item>
                  <text:list-item>
                    <text:p text:style-name="P29"><text:span text:style-name="T35">--help détaille chaque paramètre</text:span></text:p>
                  </text:list-item>
                </text:list>
              </text:list-item>
            </text:list>
            <text:p text:style-name="P28"><text:span text:style-name="T34">Connexion au cluster :</text:span></text:p>
            <text:list text:continue-numbering="true" text:style-name="L6">
              <text:list-item>
                <text:list>
                  <text:list-item>
                    <text:p text:style-name="P29"><text:span text:style-name="T35">--bootstrap-server host:port <text:s/>(presque tous)</text:span></text:p>
                  </text:list-item>
                  <text:list-item>
                    <text:p text:style-name="P29"><text:span text:style-name="T35">En SASL/SSL : --command-config client.properties</text:span></text:p>
                  </text:list-item>
                </text:list>
              </text:list-item>
            </text:list>
            <text:p text:style-name="P28"><text:span text:style-name="T34">Conventions :</text:span></text:p>
            <text:list text:continue-numbering="true" text:style-name="L6">
              <text:list-item>
                <text:list>
                  <text:list-item>
                    <text:p text:style-name="P29"><text:span text:style-name="T35">--create / --list / --describe / --delete</text:span></text:p>
                  </text:list-item>
                  <text:list-item>
                    <text:p text:style-name="P29"><text:span text:style-name="T35">Sortie texte parsable, exploitable en scripts</text:span></text:p>
                  </text:list-item>
                </text:list>
              </text:list-item>
            </text:list>
          </draw:text-box>
        </draw:frame>
        <presentation:notes draw:style-name="dp4">
          <draw:page-thumbnail draw:style-name="gr2" draw:layer="layout" svg:width="19.798cm" svg:height="11.136cm" svg:x="0.6cm" svg:y="2.257cm" draw:page-number="65" presentation:class="page"/>
          <draw:frame presentation:style-name="pr16" draw:text-style-name="P18" draw:layer="layout" svg:width="16.799cm" svg:height="13.364cm" svg:x="2.1cm" svg:y="14.107cm" presentation:class="notes" presentation:placeholder="true">
            <draw:text-box/>
          </draw:frame>
        </presentation:notes>
      </draw:page>
      <draw:page draw:name="Cluster et configuration" draw:style-name="dp6" draw:master-page-name="Standard" presentation:presentation-page-layout-name="AL3T1">
        <office:forms form:automatic-focus="false" form:apply-design-mode="false"/>
        <draw:frame draw:name="PlaceHolder 15" presentation:style-name="pr14" draw:text-style-name="P27" draw:layer="layout" svg:width="23.499cm" svg:height="3.574cm" svg:x="3.033cm" svg:y="2.367cm" presentation:class="title" presentation:user-transformed="true">
          <draw:text-box>
            <text:p text:style-name="P26"><text:span text:style-name="T33">Cluster et configuration</text:span></text:p>
          </draw:text-box>
        </draw:frame>
        <draw:frame draw:name="PlaceHolder 16" presentation:style-name="pr15" draw:text-style-name="P30" draw:layer="layout" svg:width="23.499cm" svg:height="12.18cm" svg:x="3.033cm" svg:y="6.283cm" presentation:class="outline" presentation:user-transformed="true">
          <draw:text-box>
            <text:p text:style-name="P28"><text:span text:style-name="T70">kafka-configs.sh</text:span></text:p>
            <text:list text:style-name="L6">
              <text:list-item>
                <text:list>
                  <text:list-item>
                    <text:p text:style-name="P29"><text:span text:style-name="T35">Modifier dynamiquement les configs broker, topic, user, client</text:span></text:p>
                  </text:list-item>
                  <text:list-item>
                    <text:p text:style-name="P29"><text:span text:style-name="T35">Indispensable pour quotas et tuning sans redémarrage</text:span></text:p>
                  </text:list-item>
                </text:list>
              </text:list-item>
            </text:list>
            <text:p text:style-name="P28"><text:span text:style-name="T70">kafka-cluster.sh</text:span></text:p>
            <text:list text:continue-numbering="true" text:style-name="L6">
              <text:list-item>
                <text:list>
                  <text:list-item>
                    <text:p text:style-name="P29"><text:span text:style-name="T35">cluster-id : identifiant unique du cluster</text:span></text:p>
                  </text:list-item>
                  <text:list-item>
                    <text:p text:style-name="P29"><text:span text:style-name="T35">unregister : retirer un broker mort des métadonnées (KRaft)</text:span></text:p>
                  </text:list-item>
                </text:list>
              </text:list-item>
            </text:list>
            <text:p text:style-name="P28"><text:span text:style-name="T70">kafka-metadata-quorum.sh </text:span><text:span text:style-name="T34"><text:s text:c="2"/>(KRaft uniquement)</text:span></text:p>
            <text:list text:continue-numbering="true" text:style-name="L6">
              <text:list-item>
                <text:list>
                  <text:list-item>
                    <text:p text:style-name="P29"><text:span text:style-name="T35">describe --status : état du quorum de controllers</text:span></text:p>
                  </text:list-item>
                  <text:list-item>
                    <text:p text:style-name="P29"><text:span text:style-name="T35">describe --replication : retard de réplication des controllers</text:span></text:p>
                  </text:list-item>
                </text:list>
              </text:list-item>
            </text:list>
            <text:p text:style-name="P28"><text:span text:style-name="T70">kafka-leader-election.sh</text:span></text:p>
            <text:list text:continue-numbering="true" text:style-name="L6">
              <text:list-item>
                <text:list>
                  <text:list-item>
                    <text:p text:style-name="P29"><text:span text:style-name="T35">Forcer une élection préférentielle ou unclean</text:span></text:p>
                  </text:list-item>
                  <text:list-item>
                    <text:p text:style-name="P29"><text:span text:style-name="T35">Utile après un incident pour rééquilibrer les leaders</text:span></text:p>
                  </text:list-item>
                </text:list>
              </text:list-item>
            </text:list>
          </draw:text-box>
        </draw:frame>
        <presentation:notes draw:style-name="dp4">
          <draw:page-thumbnail draw:style-name="gr2" draw:layer="layout" svg:width="19.798cm" svg:height="11.136cm" svg:x="0.6cm" svg:y="2.257cm" draw:page-number="66" presentation:class="page"/>
          <draw:frame presentation:style-name="pr16" draw:text-style-name="P18" draw:layer="layout" svg:width="16.799cm" svg:height="13.364cm" svg:x="2.1cm" svg:y="14.107cm" presentation:class="notes" presentation:placeholder="true">
            <draw:text-box/>
          </draw:frame>
        </presentation:notes>
      </draw:page>
      <draw:page draw:name="Données et diagnostic" draw:style-name="dp6" draw:master-page-name="Standard" presentation:presentation-page-layout-name="AL3T1">
        <office:forms form:automatic-focus="false" form:apply-design-mode="false"/>
        <draw:frame draw:name="PlaceHolder 17" presentation:style-name="pr14" draw:text-style-name="P27" draw:layer="layout" svg:width="23.499cm" svg:height="3.574cm" svg:x="3.033cm" svg:y="2.367cm" presentation:class="title" presentation:user-transformed="true">
          <draw:text-box>
            <text:p text:style-name="P26"><text:span text:style-name="T33">Données et diagnostic</text:span></text:p>
          </draw:text-box>
        </draw:frame>
        <draw:frame draw:name="PlaceHolder 18" presentation:style-name="pr15" draw:text-style-name="P30" draw:layer="layout" svg:width="23.499cm" svg:height="12.18cm" svg:x="3.033cm" svg:y="6.283cm" presentation:class="outline" presentation:user-transformed="true">
          <draw:text-box>
            <text:p text:style-name="P28"><text:span text:style-name="T70">kafka-reassign-partitions.sh</text:span></text:p>
            <text:list text:style-name="L6">
              <text:list-item>
                <text:list>
                  <text:list-item>
                    <text:p text:style-name="P29"><text:span text:style-name="T35">Déplacer des partitions entre brokers</text:span></text:p>
                  </text:list-item>
                  <text:list-item>
                    <text:p text:style-name="P29"><text:span text:style-name="T35">Ajout/retrait de broker, rééquilibrage du cluster</text:span></text:p>
                  </text:list-item>
                  <text:list-item>
                    <text:p text:style-name="P29"><text:span text:style-name="T35">Le couteau suisse de l'exploitation</text:span></text:p>
                  </text:list-item>
                </text:list>
              </text:list-item>
            </text:list>
            <text:p text:style-name="P28"><text:span text:style-name="T70">kafka-log-dirs.sh</text:span></text:p>
            <text:list text:continue-numbering="true" text:style-name="L6">
              <text:list-item>
                <text:list>
                  <text:list-item>
                    <text:p text:style-name="P29"><text:span text:style-name="T35">Vue des log dirs : taille, partitions, offsets par broker</text:span></text:p>
                  </text:list-item>
                  <text:list-item>
                    <text:p text:style-name="P29"><text:span text:style-name="T35">Premier réflexe en cas de souci de stockage</text:span></text:p>
                  </text:list-item>
                </text:list>
              </text:list-item>
            </text:list>
            <text:p text:style-name="P28"><text:span text:style-name="T70">kafka-dump-log.sh</text:span></text:p>
            <text:list text:continue-numbering="true" text:style-name="L6">
              <text:list-item>
                <text:list>
                  <text:list-item>
                    <text:p text:style-name="P29"><text:span text:style-name="T35">Lire le contenu binaire des segments .log et .index</text:span></text:p>
                  </text:list-item>
                  <text:list-item>
                    <text:p text:style-name="P29"><text:span text:style-name="T35">Outil de dernier recours pour diagnostiquer</text:span></text:p>
                  </text:list-item>
                </text:list>
              </text:list-item>
            </text:list>
            <text:p text:style-name="P28"><text:span text:style-name="T70">kafka-delete-records.sh</text:span></text:p>
            <text:list text:continue-numbering="true" text:style-name="L6">
              <text:list-item>
                <text:list>
                  <text:list-item>
                    <text:p text:style-name="P29"><text:span text:style-name="T35">Supprimer des messages jusqu'à un offset donné (irréversible)</text:span></text:p>
                  </text:list-item>
                </text:list>
              </text:list-item>
            </text:list>
            <text:p text:style-name="P28"><text:span text:style-name="T70">kafka-acls.sh</text:span></text:p>
            <text:list text:continue-numbering="true" text:style-name="L6">
              <text:list-item>
                <text:list>
                  <text:list-item>
                    <text:p text:style-name="P29"><text:span text:style-name="T35">Gérer les permissions sur topics, groupes... (cf. Sécurité)</text:span></text:p>
                  </text:list-item>
                </text:list>
              </text:list-item>
            </text:list>
          </draw:text-box>
        </draw:frame>
        <presentation:notes draw:style-name="dp4">
          <draw:page-thumbnail draw:style-name="gr2" draw:layer="layout" svg:width="19.798cm" svg:height="11.136cm" svg:x="0.6cm" svg:y="2.257cm" draw:page-number="67" presentation:class="page"/>
          <draw:frame presentation:style-name="pr16" draw:text-style-name="P18" draw:layer="layout" svg:width="16.799cm" svg:height="13.364cm" svg:x="2.1cm" svg:y="14.107cm" presentation:class="notes" presentation:placeholder="true">
            <draw:text-box/>
          </draw:frame>
        </presentation:notes>
      </draw:page>
      <draw:page draw:name="Outils de test et benchmark" draw:style-name="dp6" draw:master-page-name="Standard" presentation:presentation-page-layout-name="AL3T1">
        <office:forms form:automatic-focus="false" form:apply-design-mode="false"/>
        <draw:frame draw:name="PlaceHolder 19" presentation:style-name="pr14" draw:text-style-name="P27" draw:layer="layout" svg:width="23.499cm" svg:height="3.574cm" svg:x="3.033cm" svg:y="2.367cm" presentation:class="title" presentation:user-transformed="true">
          <draw:text-box>
            <text:p text:style-name="P26"><text:span text:style-name="T33">Outils de test et benchmark</text:span></text:p>
          </draw:text-box>
        </draw:frame>
        <draw:frame draw:name="PlaceHolder 20" presentation:style-name="pr15" draw:text-style-name="P30" draw:layer="layout" svg:width="23.499cm" svg:height="12.18cm" svg:x="3.033cm" svg:y="6.283cm" presentation:class="outline" presentation:user-transformed="true">
          <draw:text-box>
            <text:p text:style-name="P28"><text:span text:style-name="T70">kafka-producer-perf-test.sh</text:span></text:p>
            <text:list text:style-name="L6">
              <text:list-item>
                <text:list>
                  <text:list-item>
                    <text:p text:style-name="P29"><text:span text:style-name="T35">Mesurer le débit en production</text:span></text:p>
                  </text:list-item>
                  <text:list-item>
                    <text:p text:style-name="P29"><text:span text:style-name="T35">Paramétrable : taille des messages, nombre, throughput cible</text:span></text:p>
                  </text:list-item>
                </text:list>
              </text:list-item>
            </text:list>
            <text:p text:style-name="P28"><text:span text:style-name="T70">kafka-consumer-perf-test.sh</text:span></text:p>
            <text:list text:continue-numbering="true" text:style-name="L6">
              <text:list-item>
                <text:list>
                  <text:list-item>
                    <text:p text:style-name="P29"><text:span text:style-name="T35">Mesurer le débit en consommation</text:span></text:p>
                  </text:list-item>
                </text:list>
              </text:list-item>
            </text:list>
            <text:p text:style-name="P28"><text:span text:style-name="T70">kafka-verifiable-producer.sh / kafka-verifiable-</text:span><text:span text:style-name="T70">consumer.sh</text:span></text:p>
            <text:list text:continue-numbering="true" text:style-name="L6">
              <text:list-item>
                <text:list>
                  <text:list-item>
                    <text:p text:style-name="P29"><text:span text:style-name="T35">Produire/consommer en sortant du JSON sur stdout</text:span></text:p>
                  </text:list-item>
                  <text:list-item>
                    <text:p text:style-name="P29"><text:span text:style-name="T35">Utile pour valider une chaîne de traitement</text:span></text:p>
                  </text:list-item>
                  <text:list-item>
                    <text:p text:style-name="P29"><text:span text:style-name="T35">Idéal pour les tests d'intégration scriptés</text:span></text:p>
                  </text:list-item>
                </text:list>
              </text:list-item>
            </text:list>
            <text:p text:style-name="P28"><text:span text:style-name="T70">trogdor.sh</text:span></text:p>
            <text:list text:continue-numbering="true" text:style-name="L6">
              <text:list-item>
                <text:list>
                  <text:list-item>
                    <text:p text:style-name="P29"><text:span text:style-name="T35">Framework de tests de charge et d'injection de pannes</text:span></text:p>
                  </text:list-item>
                  <text:list-item>
                    <text:p text:style-name="P29"><text:span text:style-name="T35">Plus complet mais nécessite un setup dédié</text:span></text:p>
                  </text:list-item>
                </text:list>
              </text:list-item>
            </text:list>
          </draw:text-box>
        </draw:frame>
        <draw:frame draw:style-name="gr21" draw:text-style-name="P59" draw:layer="layout" svg:width="9.612cm" svg:height="1.216cm" svg:x="1.603cm" svg:y="19.4cm">
          <draw:text-box>
            <text:p><text:span text:style-name="T94">Atelier 1.2 : Utilitaires</text:span></text:p>
          </draw:text-box>
        </draw:frame>
        <presentation:notes draw:style-name="dp4">
          <draw:page-thumbnail draw:style-name="gr2" draw:layer="layout" svg:width="19.798cm" svg:height="11.136cm" svg:x="0.6cm" svg:y="2.257cm" draw:page-number="68" presentation:class="page"/>
          <draw:frame presentation:style-name="pr16" draw:text-style-name="P18" draw:layer="layout" svg:width="16.799cm" svg:height="13.364cm" svg:x="2.1cm" svg:y="14.107cm" presentation:class="notes" presentation:placeholder="true">
            <draw:text-box/>
          </draw:frame>
        </presentation:notes>
      </draw:page>
      <draw:page draw:name="page69"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Cluster Kafka</text:span></text:p>
              </text:list-header>
            </text:list>
          </draw:text-box>
        </draw:frame>
        <draw:frame presentation:style-name="pr34" draw:text-style-name="P16"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Cluster</text:span></text:p>
              </text:list-item>
              <text:list-item>
                <text:p text:style-name="P19"><text:span text:style-name="T2">Distributions / Installation</text:span></text:p>
              </text:list-item>
              <text:list-item>
                <text:p text:style-name="P19"><text:span text:style-name="T2">Utilitaires</text:span><text:span text:style-name="T12"> </text:span><text:span text:style-name="T2">Kafka</text:span></text:p>
              </text:list-item>
              <text:list-item>
                <text:p text:style-name="P19"><text:span text:style-name="T12">Outils graphiques</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utils graphiques </text:p>
          </draw:text-box>
        </draw:frame>
        <draw:frame presentation:style-name="pr5" draw:layer="layout" svg:width="23.499cm" svg:height="12.18cm" svg:x="3.033cm" svg:y="6.283cm" presentation:class="outline" presentation:user-transformed="true">
          <draw:text-box>
            <text:list text:style-name="L2">
              <text:list-item>
                <text:p><text:span text:style-name="T21">Il peut être intéressant de s’équiper d’outils graphiques </text:span><text:span text:style-name="T21">aidant à l’exploitation du cluster.</text:span></text:p>
              </text:list-item>
              <text:list-item>
                <text:p><text:span text:style-name="T21">Comme produit gratuit, semi-commerciaux citons :</text:span></text:p>
              </text:list-item>
            </text:list>
            <text:list text:style-name="L3">
              <text:list-item>
                <text:list>
                  <text:list-item>
                    <text:p><text:span text:style-name="T93">Akhq</text:span><text:span text:style-name="T14"> (https://akhq.io/)</text:span></text:p>
                  </text:list-item>
                  <text:list-item>
                    <text:p><text:span text:style-name="T93">Kafka</text:span><text:span text:style-name="T66"> </text:span><text:span text:style-name="T93">Magic</text:span><text:span text:style-name="T26"> (</text:span><text:span text:style-name="T66">https://www.kafkamagic.com/</text:span><text:span text:style-name="T14"> )</text:span></text:p>
                  </text:list-item>
                  <text:list-item>
                    <text:p><text:span text:style-name="T93">Redpanda</text:span><text:span text:style-name="T14"> </text:span><text:span text:style-name="T93">Console</text:span><text:span text:style-name="T14"> </text:span><text:span text:style-name="T14">(https://docs.redpanda.com/docs/manage/console/)</text:span></text:p>
                  </text:list-item>
                </text:list>
              </text:list-item>
            </text:list>
            <text:list text:style-name="L2">
              <text:list-item>
                <text:p>Ils proposent une interface graphique permettant :</text:p>
                <text:list>
                  <text:list-item>
                    <text:p>De rechercher et afficher des messages,</text:p>
                  </text:list-item>
                  <text:list-item>
                    <text:p>Transformer et déplacer des messages entre des topics</text:p>
                  </text:list-item>
                  <text:list-item>
                    <text:p>Gérer les topics</text:p>
                  </text:list-item>
                  <text:list-item>
                    <text:p>Automatiser des tâches.</text:p>
                  </text:list-item>
                </text:list>
              </text:list-item>
              <text:list-item>
                <text:p>La distribution commerciale de Confluent a naturellement un outil graphique d’exploitation</text:p>
              </text:list-item>
            </text:list>
          </draw:text-box>
        </draw:frame>
        <presentation:notes draw:style-name="dp5">
          <draw:page-thumbnail draw:style-name="gr2" draw:layer="layout" svg:width="15.597cm" svg:height="10.985cm" svg:x="2.623cm" svg:y="2.258cm" draw:page-number="70" presentation:class="page"/>
          <draw:frame presentation:style-name="pr6" draw:text-style-name="P13" draw:layer="layout" svg:width="14.362cm" svg:height="11.254cm" svg:x="3.25cm" svg:y="14.128cm" presentation:class="notes" presentation:placeholder="true">
            <draw:text-box/>
          </draw:frame>
        </presentation:notes>
      </draw:page>
      <draw:page draw:name="page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Magic</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749cm" svg:height="12.83cm" svg:x="1.561cm" svg:y="6.439cm">
          <draw:image xlink:href="Pictures/100000010000073500000375CAE94E07.png" xlink:type="simple" xlink:show="embed" xlink:actuate="onLoad" draw:mime-type="image/png">
            <text:p/>
          </draw:image>
        </draw:frame>
        <presentation:notes draw:style-name="dp5">
          <draw:page-thumbnail draw:style-name="gr2" draw:layer="layout" svg:width="15.597cm" svg:height="10.985cm" svg:x="2.623cm" svg:y="2.258cm" draw:page-number="71" presentation:class="page"/>
          <draw:frame presentation:style-name="pr6" draw:text-style-name="P13" draw:layer="layout" svg:width="14.362cm" svg:height="11.254cm" svg:x="3.25cm" svg:y="14.128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khq</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9.699cm" svg:height="14.245cm" svg:x="-0.191cm" svg:y="6.369cm">
          <draw:image xlink:href="Pictures/10000001000007350000037587DA9EE3.png" xlink:type="simple" xlink:show="embed" xlink:actuate="onLoad" draw:mime-type="image/png">
            <text:p/>
          </draw:image>
        </draw:frame>
        <presentation:notes draw:style-name="dp5">
          <draw:page-thumbnail draw:style-name="gr2" draw:layer="layout" svg:width="15.597cm" svg:height="10.985cm" svg:x="2.623cm" svg:y="2.258cm" draw:page-number="72" presentation:class="page"/>
          <draw:frame presentation:style-name="pr6" draw:text-style-name="P13"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dpanda Console</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9.699cm" svg:height="12.506cm" svg:x="-0.033cm" svg:y="6.42cm">
          <draw:image xlink:href="Pictures/1000000100000735000003090E6462D1.png" xlink:type="simple" xlink:show="embed" xlink:actuate="onLoad" draw:mime-type="image/png">
            <text:p/>
          </draw:image>
        </draw:frame>
        <draw:frame draw:style-name="gr22" draw:text-style-name="P59" draw:layer="layout" svg:width="14.684cm" svg:height="1.216cm" svg:x="1.603cm" svg:y="19.4cm">
          <draw:text-box>
            <text:p><text:span text:style-name="T94">Atelier 1.3 : Outils graphiques</text:span></text:p>
          </draw:text-box>
        </draw:frame>
        <presentation:notes draw:style-name="dp5">
          <draw:page-thumbnail draw:style-name="gr2" draw:layer="layout" svg:width="15.597cm" svg:height="10.985cm" svg:x="2.623cm" svg:y="2.258cm" draw:page-number="73" presentation:class="page"/>
          <draw:frame presentation:style-name="pr6" draw:text-style-name="P13" draw:layer="layout" svg:width="14.362cm" svg:height="11.254cm" svg:x="3.25cm" svg:y="14.128cm" presentation:class="notes" presentation:placeholder="true">
            <draw:text-box/>
          </draw:frame>
        </presentation:notes>
      </draw:page>
      <draw:page draw:name="page74" draw:style-name="dp1" draw:master-page-name="Standard" presentation:presentation-page-layout-name="AL1T0">
        <office:forms form:automatic-focus="false" form:apply-design-mode="false"/>
        <draw:frame presentation:style-name="pr7" draw:text-style-name="P15" draw:layer="layout" svg:width="23.499cm" svg:height="3.903cm" svg:x="3.033cm" svg:y="2.203cm" presentation:class="title" presentation:user-transformed="true">
          <draw:text-box>
            <text:list text:style-name="L1">
              <text:list-header>
                <text:p text:style-name="P14"><text:span text:style-name="T11">Production/Consommation de messages</text:span></text:p>
              </text:list-header>
            </text:list>
          </draw:text-box>
        </draw:frame>
        <draw:frame presentation:style-name="pr35" draw:text-style-name="P16" draw:layer="layout" svg:width="23.499cm" svg:height="14.226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12">Types de clients</text:span></text:p>
              </text:list-item>
              <text:list-item>
                <text:p text:style-name="P19"><text:span text:style-name="T2">Production de messages</text:span></text:p>
              </text:list-item>
              <text:list-item>
                <text:p text:style-name="P19"><text:span text:style-name="T2">Consommation de messages</text:span></text:p>
              </text:list-item>
              <text:list-item>
                <text:p text:style-name="P33"><text:span text:style-name="T2">Garanties Kafka</text:span></text:p>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client</text:p>
          </draw:text-box>
        </draw:frame>
        <draw:frame presentation:style-name="pr5" draw:layer="layout" svg:width="23.499cm" svg:height="12.18cm" svg:x="3.033cm" svg:y="6.283cm" presentation:class="outline">
          <draw:text-box>
            <text:list text:style-name="L2">
              <text:list-item>
                <text:p>Un serveur Kafka a différents types de clients :</text:p>
                <text:list>
                  <text:list-item>
                    <text:p>Les autres serveurs (brokers ou contrôleurs)</text:p>
                  </text:list-item>
                  <text:list-item>
                    <text:p>Les outils d’administration (Admin API)</text:p>
                  </text:list-item>
                  <text:list-item>
                    <text:p>Les producteurs et les consommateurs de message (Client API)</text:p>
                  </text:list-item>
                  <text:list-item>
                    <text:p>KafkaConnect, KafkaMirrors </text:p>
                  </text:list-item>
                  <text:list-item>
                    <text:p>Les applications KafkaStream</text:p>
                  </text:list-item>
                </text:list>
              </text:list-item>
              <text:list-item>
                <text:p>Dans un environnement de production, les flux d’échanges applicatifs et d’exploitation sont généralement séparés en définissant différents listeners (ports différents)</text:p>
              </text:list-item>
            </text:list>
          </draw:text-box>
        </draw:frame>
        <presentation:notes draw:style-name="dp5">
          <draw:page-thumbnail draw:style-name="gr2" draw:layer="layout" svg:width="15.597cm" svg:height="10.985cm" svg:x="2.623cm" svg:y="2.258cm" draw:page-number="75" presentation:class="page"/>
          <draw:frame presentation:style-name="pr6" draw:text-style-name="P13"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presentation:user-transformed="true">
          <draw:text-box>
            <text:list text:style-name="L2">
              <text:list-item>
                <text:p>Les ports ouverts sont déclarés via la propriété <text:span text:style-name="T36">listeners </text:span>:</text:p>
              </text:list-item>
              <text:list-item>
                <text:p><text:span text:style-name="T95">{LISTENER_NAME}://:{port}</text:span></text:p>
              </text:list-item>
              <text:list-item>
                <text:p>Ou LISTENER_NAME est un nom descriptif</text:p>
              </text:list-item>
              <text:list-item>
                <text:p text:style-name="P24"><text:span text:style-name="T36">advertised.listeners</text:span> doit spécifier l’adresse externe (hôte/IP) utilisé par les clients.</text:p>
              </text:list-item>
              <text:list-item>
                <text:p/>
              </text:list-item>
              <text:list-item>
                <text:p>Exemple :</text:p>
              </text:list-item>
              <text:list-item>
                <text:p><text:span text:style-name="T95"><text:s text:c="2"/></text:span><text:span text:style-name="T95">listeners=CLIENT://:9092,BROKER://:9095</text:span></text:p>
              </text:list-item>
              <text:list-item>
                <text:p><text:span text:style-name="T95"><text:s text:c="2"/></text:span><text:span text:style-name="T95">advertised.listeners=CLIENT://kafka-0.myorg.fr:9092</text:span></text:p>
              </text:list-item>
              <text:list-item>
                <text:p><text:line-break/></text:p>
              </text:list-item>
              <text:list-item>
                <text:p/>
              </text:list-item>
            </text:list>
          </draw:text-box>
        </draw:frame>
        <presentation:notes draw:style-name="dp5">
          <draw:page-thumbnail draw:style-name="gr2" draw:layer="layout" svg:width="15.597cm" svg:height="10.985cm" svg:x="2.623cm" svg:y="2.258cm" draw:page-number="76" presentation:class="page"/>
          <draw:frame presentation:style-name="pr6" draw:text-style-name="P13"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Listeners inter-brokers</text:p>
          </draw:text-box>
        </draw:frame>
        <draw:frame presentation:style-name="pr5" draw:layer="layout" svg:width="23.499cm" svg:height="12.18cm" svg:x="3.033cm" svg:y="6.283cm" presentation:class="outline" presentation:user-transformed="true">
          <draw:text-box>
            <text:list text:style-name="L2">
              <text:list-item>
                <text:p><text:span text:style-name="T44">2 propriétés permettent d’identifier les ports utilisés pour le </text:span><text:span text:style-name="T44">fonctionnement du cluster :</text:span></text:p>
              </text:list-item>
            </text:list>
            <text:list text:style-name="L5">
              <text:list-item>
                <text:list>
                  <text:list-item>
                    <text:p><text:span text:style-name="T36">inter.broker.listener.name</text:span> : Nom du listener utilisé pour la communication inter-broker. </text:p>
                  </text:list-item>
                  <text:list-item>
                    <text:p><text:span text:style-name="T36">controller.listener.names</text:span><text:span text:style-name="T14"> : </text:span><text:span text:style-name="T21">Une liste de listeners utilisés </text:span><text:span text:style-name="T21">pour la communication inter contrôleur </text:span><text:span text:style-name="T14"><text:s/></text:span></text:p>
                  </text:list-item>
                </text:list>
              </text:list-item>
            </text:list>
            <text:list text:style-name="L2">
              <text:list-item>
                <text:p/>
              </text:list-item>
            </text:list>
          </draw:text-box>
        </draw:frame>
        <presentation:notes draw:style-name="dp5">
          <draw:page-thumbnail draw:style-name="gr2" draw:layer="layout" svg:width="15.597cm" svg:height="10.985cm" svg:x="2.623cm" svg:y="2.258cm" draw:page-number="77" presentation:class="page"/>
          <draw:frame presentation:style-name="pr6" draw:text-style-name="P13"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60" draw:layer="layout" svg:width="23.499cm" svg:height="12.18cm" svg:x="3.033cm" svg:y="6.283cm" presentation:class="outline" presentation:user-transformed="true">
          <draw:text-box>
            <text:list text:style-name="L2">
              <text:list-item>
                <text:p><text:span text:style-name="T96">listeners=PLAINTEXT://:9292,CONTROLLER://:9293</text:span></text:p>
              </text:list-item>
              <text:list-item>
                <text:p><text:span text:style-name="T97"/></text:p>
              </text:list-item>
              <text:list-item>
                <text:p><text:span text:style-name="T98">inter.broker.listener.name=PLAINTEXT</text:span></text:p>
              </text:list-item>
              <text:list-item>
                <text:p><text:span text:style-name="T97"/></text:p>
              </text:list-item>
              <text:list-item>
                <text:p><text:span text:style-name="T97"/></text:p>
              </text:list-item>
              <text:list-item>
                <text:p><text:span text:style-name="T97"/></text:p>
              </text:list-item>
              <text:list-item>
                <text:p><text:span text:style-name="T96"/></text:p>
              </text:list-item>
              <text:list-item>
                <text:p><text:span text:style-name="T96"># If no explicit mapping set in `listener.security.protocol.map`,</text:span></text:p>
              </text:list-item>
              <text:list-item>
                <text:p><text:span text:style-name="T96"># default will be using PLAINTEXT protocol</text:span></text:p>
              </text:list-item>
              <text:list-item>
                <text:p><text:span text:style-name="T96"># This is required if running in KRaft mode.</text:span></text:p>
              </text:list-item>
              <text:list-item>
                <text:p><text:span text:style-name="T98">controller.listener.names=CONTROLLER</text:span></text:p>
              </text:list-item>
            </text:list>
          </draw:text-box>
        </draw:frame>
        <presentation:notes draw:style-name="dp5">
          <draw:page-thumbnail draw:style-name="gr2" draw:layer="layout" svg:width="15.597cm" svg:height="10.985cm" svg:x="2.623cm" svg:y="2.258cm" draw:page-number="78" presentation:class="page"/>
          <draw:frame presentation:style-name="pr6" draw:text-style-name="P13" draw:layer="layout" svg:width="14.362cm" svg:height="11.254cm" svg:x="3.25cm" svg:y="14.128cm" presentation:class="notes" presentation:placeholder="true">
            <draw:text-box/>
          </draw:frame>
        </presentation:notes>
      </draw:page>
      <draw:page draw:name="page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s</text:p>
          </draw:text-box>
        </draw:frame>
        <draw:frame presentation:style-name="pr5" draw:layer="layout" svg:width="23.499cm" svg:height="12.18cm" svg:x="3.033cm" svg:y="6.283cm" presentation:class="outline" presentation:user-transformed="true">
          <draw:text-box>
            <text:list text:style-name="L2">
              <text:list-item>
                <text:p text:style-name="P24">Le protocole utilisé pour chaque listener est spécifié dans la propriété <text:span text:style-name="T36">listener.security.protocol.map</text:span></text:p>
              </text:list-item>
              <text:list-item>
                <text:p text:style-name="P24">Exemple : <text:span text:style-name="T95">listener.security.protocol.map=CLIENT:SSL,BROKER:PLAINTE</text:span><text:span text:style-name="T95">XT</text:span></text:p>
              </text:list-item>
              <text:list-item>
                <text:p text:style-name="P24">Les protocoles supportés sont :</text:p>
                <text:list>
                  <text:list-item>
                    <text:p><text:span text:style-name="T36">PLAINTEXT </text:span><text:span text:style-name="T14">: </text:span><text:span text:style-name="T21">Transport en clair</text:span></text:p>
                  </text:list-item>
                  <text:list-item>
                    <text:p><text:span text:style-name="T36">SSL</text:span><text:span text:style-name="T14"> : </text:span><text:span text:style-name="T21">Transport crypté (TLS 1.2 et 1.3)</text:span></text:p>
                  </text:list-item>
                  <text:list-item>
                    <text:p><text:span text:style-name="T36">SASL_PLAINTEXT</text:span><text:span text:style-name="T14"> : </text:span><text:span text:style-name="T21">Authentification + transport en clair</text:span></text:p>
                  </text:list-item>
                  <text:list-item>
                    <text:p><text:span text:style-name="T36">SASL_SSL</text:span><text:span text:style-name="T14"> :</text:span><text:span text:style-name="T21"> Authentification + crypté</text:span></text:p>
                  </text:list-item>
                </text:list>
              </text:list-item>
            </text:list>
          </draw:text-box>
        </draw:frame>
        <presentation:notes draw:style-name="dp5">
          <draw:page-thumbnail draw:style-name="gr2" draw:layer="layout" svg:width="15.597cm" svg:height="10.985cm" svg:x="2.623cm" svg:y="2.258cm" draw:page-number="79" presentation:class="page"/>
          <draw:frame presentation:style-name="pr6" draw:text-style-name="P13" draw:layer="layout" svg:width="14.362cm" svg:height="11.254cm" svg:x="3.25cm" svg:y="14.128cm" presentation:class="notes" presentation:placeholder="true">
            <draw:text-box/>
          </draw:frame>
        </presentation:notes>
      </draw:page>
      <draw:page draw:name="page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brairies clientes</text:p>
          </draw:text-box>
        </draw:frame>
        <draw:frame presentation:style-name="pr5" draw:layer="layout" svg:width="23.499cm" svg:height="12.18cm" svg:x="3.033cm" svg:y="6.283cm" presentation:class="outline" presentation:user-transformed="true">
          <draw:text-box>
            <text:list text:style-name="L2">
              <text:list-item>
                <text:p>Apache fournit  :</text:p>
                <text:list>
                  <text:list-item>
                    <text:p><text:span text:style-name="T52">Une librairie Java </text:span><text:span text:style-name="T99">kafka-clients</text:span><text:span text:style-name="T100"> : </text:span>Envoi/Consommation de messages + administration cluster</text:p>
                  </text:list-item>
                  <text:list-item>
                    <text:p>Une<text:span text:style-name="T100"> </text:span>librairie java<text:span text:style-name="T100"> </text:span><text:span text:style-name="T99">kafka-stream</text:span><text:span text:style-name="T100"> </text:span>permettant<text:span text:style-name="T100"> </text:span>de<text:span text:style-name="T100"> </text:span>consruire des applications event-stream</text:p>
                  </text:list-item>
                  <text:list-item>
                    <text:p>Une distribution de <text:span text:style-name="T99">KafkaConnect</text:span>, un serveur permettant de s’intégrer avec des systèmes externes</text:p>
                  </text:list-item>
                </text:list>
              </text:list-item>
              <text:list-item>
                <text:p>Confluent fournit des librairies pour les autres technologies (Python, .NET, …)</text:p>
              </text:list-item>
              <text:list-item>
                <text:p>Des tiers fournissent également des librairies en nodejs, php, ...</text:p>
              </text:list-item>
            </text:list>
          </draw:text-box>
        </draw:frame>
        <presentation:notes draw:style-name="dp5">
          <draw:page-thumbnail draw:style-name="gr2" draw:layer="layout" svg:width="15.597cm" svg:height="10.985cm" svg:x="2.623cm" svg:y="2.258cm" draw:page-number="80" presentation:class="page"/>
          <draw:frame presentation:style-name="pr6" draw:text-style-name="P18" draw:layer="layout" svg:width="14.362cm" svg:height="11.254cm" svg:x="3.25cm" svg:y="14.128cm" presentation:class="notes" presentation:placeholder="true">
            <draw:text-box/>
          </draw:frame>
        </presentation:notes>
      </draw:page>
      <draw:page draw:name="page81"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commune aux clients</text:p>
          </draw:text-box>
        </draw:frame>
        <draw:frame presentation:style-name="pr5" draw:layer="layout" svg:width="23.499cm" svg:height="12.18cm" svg:x="3.033cm" svg:y="6.283cm" presentation:class="outline">
          <draw:text-box>
            <text:list text:style-name="L2">
              <text:list-item>
                <text:p>Quelque-soit l’API utilisée, un client doit fournir la propriété <text:span text:style-name="T36">bootstrap.servers</text:span></text:p>
                <text:list>
                  <text:list-item>
                    <text:p>Cette propriété est renseignée avec 1 ou plusieurs adresses des serveurs.</text:p>
                  </text:list-item>
                  <text:list-item>
                    <text:p>Il suffit que le client en contacte un pour qu’il découvre l’intégralité du cluster. <text:s text:c="2"/></text:p>
                  </text:list-item>
                </text:list>
              </text:list-item>
            </text:list>
          </draw:text-box>
        </draw:frame>
        <presentation:notes draw:style-name="dp5">
          <draw:page-thumbnail draw:style-name="gr2" draw:layer="layout" svg:width="15.597cm" svg:height="10.985cm" svg:x="2.623cm" svg:y="2.258cm" draw:page-number="81" presentation:class="page"/>
          <draw:frame presentation:style-name="pr6" draw:text-style-name="P13" draw:layer="layout" svg:width="14.362cm" svg:height="11.254cm" svg:x="3.25cm" svg:y="14.128cm" presentation:class="notes" presentation:placeholder="true">
            <draw:text-box/>
          </draw:frame>
        </presentation:notes>
      </draw:page>
      <draw:page draw:name="page82"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36"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Types de clients</text:span></text:p>
              </text:list-item>
              <text:list-item>
                <text:p text:style-name="P19"><text:span text:style-name="T12">Production de messages</text:span></text:p>
              </text:list-item>
              <text:list-item>
                <text:p text:style-name="P19"><text:span text:style-name="T2">Consommation de messages</text:span></text:p>
              </text:list-item>
              <text:list-item>
                <text:p text:style-name="P19"><text:span text:style-name="T2">Garanties Kafka</text:span></text:p>
                <text:p text:style-name="P3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83"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4">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2" draw:layer="layout" svg:width="15.597cm" svg:height="10.985cm" svg:x="2.623cm" svg:y="2.258cm" draw:page-number="83" presentation:class="page"/>
          <draw:frame presentation:style-name="pr6" draw:text-style-name="P18" draw:layer="layout" svg:width="14.362cm" svg:height="11.254cm" svg:x="3.25cm" svg:y="14.128cm" presentation:class="notes" presentation:placeholder="true">
            <draw:text-box/>
          </draw:frame>
        </presentation:notes>
      </draw:page>
      <draw:page draw:name="page84"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Producteur</text:p>
          </draw:text-box>
        </draw:frame>
        <draw:frame presentation:style-name="pr5" draw:layer="layout" svg:width="23.499cm" svg:height="12.18cm" svg:x="3.033cm" svg:y="6.283cm" presentation:class="outline" presentation:user-transformed="true">
          <draw:text-box>
            <text:list text:style-name="L2">
              <text:list-item>
                <text:p>En dehors de <text:span text:style-name="T36">bootstrap.servers,</text:span> le producteur configure 2 sérialiseurs</text:p>
                <text:list>
                  <text:list-item>
                    <text:p><text:span text:style-name="T36">key.serializer </text:span>: La classe utilisée pour la sérialisation de la clé</text:p>
                  </text:list-item>
                  <text:list-item>
                    <text:p><text:span text:style-name="T36">value.serializer</text:span><text:span text:style-name="T52"> : La classe </text:span>utilisée pour la sérialisation du corps du message …</text:p>
                  </text:list-item>
                </text:list>
              </text:list-item>
              <text:list-item>
                <text:p>Les sérialiseurs typiques sont Json, Avro, Protobuf</text:p>
              </text:list-item>
              <text:list-item>
                <text:p>Un producteur peut également préciser <text:span text:style-name="T36">client.id.</text:span> Une chaîne de caractère utilisé pour le monitoring. </text:p>
                <text:p/>
              </text:list-item>
            </text:list>
          </draw:text-box>
        </draw:frame>
        <presentation:notes draw:style-name="dp4">
          <draw:page-thumbnail draw:style-name="gr2" draw:layer="layout" svg:width="15.597cm" svg:height="10.985cm" svg:x="2.623cm" svg:y="2.258cm" draw:page-number="84" presentation:class="page"/>
          <draw:frame presentation:style-name="pr6" draw:text-style-name="P18" draw:layer="layout" svg:width="14.362cm" svg:height="11.254cm" svg:x="3.25cm" svg:y="14.128cm" presentation:class="notes" presentation:placeholder="true">
            <draw:text-box/>
          </draw:frame>
        </presentation:notes>
      </draw:page>
      <draw:page draw:name="page85" draw:style-name="dp7" draw:master-page-name="Standard" presentation:presentation-page-layout-name="AL3T1">
        <office:forms form:automatic-focus="false" form:apply-design-mode="false"/>
        <draw:frame presentation:style-name="pr11" draw:layer="layout" svg:width="23.499cm" svg:height="3.577cm" svg:x="3.033cm" svg:y="2.366cm" presentation:class="title">
          <draw:text-box>
            <text:p>Étapes lors de l’envoi d’un message</text:p>
          </draw:text-box>
        </draw:frame>
        <draw:frame presentation:style-name="pr5"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6">ProducerRecord</text:span> encapsulant les données (clé + valeur, topis)</text:p>
                  </text:list-item>
                  <text:list-item>
                    <text:p>L’objet est <text:span text:style-name="T43">sérialisé</text:span> pour préparer sa transmission sur le réseau</text:p>
                  </text:list-item>
                  <text:list-item>
                    <text:p>Les données sont ensuite fournies à un <text:span text:style-name="T43">partitionneur</text:span> qui détermine la partition de destination, (typiquement à partir de la clé du message)</text:p>
                  </text:list-item>
                  <text:list-item>
                    <text:p>Le message est ensuite ajouté à un <text:span text:style-name="T43">lot de messages</text:span> destinés à la même partition. <text:line-break/>Une thread séparée envoie le lot de messages.</text:p>
                  </text:list-item>
                  <text:list-item>
                    <text:p>Lorsque le broker reçoit le message, il renvoie une réponse sous le forme d’un objet <text:span text:style-name="T36">RecordMetadata</text:span> encapsulant le <text:span text:style-name="T14">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2" draw:layer="layout" svg:width="15.597cm" svg:height="10.985cm" svg:x="2.623cm" svg:y="2.258cm" draw:page-number="85" presentation:class="page"/>
          <draw:frame presentation:style-name="pr6" draw:text-style-name="P13" draw:layer="layout" svg:width="14.362cm" svg:height="11.254cm" svg:x="3.25cm" svg:y="14.128cm" presentation:class="notes" presentation:placeholder="true">
            <draw:text-box/>
          </draw:frame>
        </presentation:notes>
      </draw:page>
      <draw:page draw:name="page86"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13.223cm" svg:height="14.63cm" svg:x="6.377cm" svg:y="6.17cm">
          <draw:image xlink:href="Pictures/1000000100000468000004E0069CD733.png" xlink:type="simple" xlink:show="embed" xlink:actuate="onLoad" draw:mime-type="image/png">
            <text:p/>
          </draw:image>
        </draw:frame>
        <presentation:notes draw:style-name="dp4">
          <draw:page-thumbnail draw:style-name="gr2" draw:layer="layout" svg:width="15.597cm" svg:height="10.985cm" svg:x="2.623cm" svg:y="2.258cm" draw:page-number="86" presentation:class="page"/>
          <draw:frame presentation:style-name="pr6" draw:text-style-name="P13" draw:layer="layout" svg:width="14.362cm" svg:height="11.254cm" svg:x="3.25cm" svg:y="14.128cm" presentation:class="notes" presentation:placeholder="true">
            <draw:text-box/>
          </draw:frame>
        </presentation:notes>
      </draw:page>
      <draw:page draw:name="page87" draw:style-name="dp7" draw:master-page-name="Standard" presentation:presentation-page-layout-name="AL3T1">
        <office:forms form:automatic-focus="false" form:apply-design-mode="false"/>
        <draw:frame presentation:style-name="pr11" draw:layer="layout" svg:width="23.499cm" svg:height="3.577cm" svg:x="3.033cm" svg:y="2.366cm" presentation:class="title">
          <draw:text-box>
            <text:p>Méthodes d’envoi des messages </text:p>
          </draw:text-box>
        </draw:frame>
        <draw:frame presentation:style-name="pr5" draw:layer="layout" svg:width="23.499cm" svg:height="12.18cm" svg:x="3.033cm" svg:y="6.283cm" presentation:class="outline">
          <draw:text-box>
            <text:list text:style-name="L2">
              <text:list-item>
                <text:p><text:span text:style-name="T5">3 façons pour un producteur d’envoyer des messages :</text:span></text:p>
                <text:list>
                  <text:list-item>
                    <text:p><text:span text:style-name="T101">Fire-and-forget</text:span><text:span text:style-name="T5"> : Pas d’acquittement, on s’autorise à </text:span><text:span text:style-name="T5">perdre quelques messages (même si c’est très rare)</text:span></text:p>
                  </text:list-item>
                  <text:list-item>
                    <text:p><text:span text:style-name="T36">Envoi</text:span><text:span text:style-name="T5"> </text:span><text:span text:style-name="T36">synchrone</text:span><text:span text:style-name="T5"> : Le producteur attend l’acquittement de </text:span><text:span text:style-name="T5">l’écriture du message. <text:s/></text:span><text:span text:style-name="T5"><text:line-break/></text:span><text:span text:style-name="T5">On traite éventuellement les cas d’erreurs</text:span></text:p>
                  </text:list-item>
                  <text:list-item>
                    <text:p><text:span text:style-name="T36">Envoi</text:span><text:span text:style-name="T5"> </text:span><text:span text:style-name="T36">asynchrone</text:span><text:span text:style-name="T5"> : Le producteur précise une fonction de </text:span><text:span text:style-name="T5">call-back qui sera appelée lorsque la réponse est </text:span><text:span text:style-name="T5">retournée.</text:span></text:p>
                  </text:list-item>
                </text:list>
              </text:list-item>
            </text:list>
          </draw:text-box>
        </draw:frame>
        <presentation:notes draw:style-name="dp4">
          <draw:page-thumbnail draw:style-name="gr2" draw:layer="layout" svg:width="15.597cm" svg:height="10.985cm" svg:x="2.623cm" svg:y="2.258cm" draw:page-number="87" presentation:class="page"/>
          <draw:frame presentation:style-name="pr6" draw:text-style-name="P18"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Ecriture sur une partition</text:span></text:p>
          </draw:text-box>
        </draw:frame>
        <draw:frame presentation:style-name="pr5" draw:layer="layout" svg:width="23.499cm" svg:height="12.18cm" svg:x="3.033cm" svg:y="6.283cm" presentation:class="outline">
          <draw:text-box>
            <text:list text:style-name="L2">
              <text:list-item>
                <text:p>Différents brokers participent à l’écriture d’un message.</text:p>
                <text:list>
                  <text:list-item>
                    <text:p><text:span text:style-name="T102">1 broker leader</text:span> : Détient la partition leader responsable de la validation des écritures</text:p>
                  </text:list-item>
                  <text:list-item>
                    <text:p><text:span text:style-name="T102">N followers</text:span> : Suivent les écritures effectuées par le leader. <text:line-break/>Un décalage est permis mais si il n’arrive plus à suivre la cadence d’écriture, ils sont éliminés</text:p>
                  </text:list-item>
                </text:list>
                <text:p/>
              </text:list-item>
            </text:list>
          </draw:text-box>
        </draw:frame>
        <presentation:notes draw:style-name="dp5">
          <draw:page-thumbnail draw:style-name="gr2" draw:layer="layout" svg:width="15.597cm" svg:height="10.985cm" svg:x="2.623cm" svg:y="2.258cm" draw:page-number="88" presentation:class="page"/>
          <draw:frame presentation:style-name="pr6" draw:text-style-name="P18"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 Sync Replica (ISR) </text:p>
          </draw:text-box>
        </draw:frame>
        <draw:frame presentation:style-name="pr5" draw:layer="layout" svg:width="23.499cm" svg:height="12.18cm" svg:x="3.033cm" svg:y="6.483cm" presentation:class="outline" presentation:user-transformed="true">
          <draw:text-box>
            <text:list text:style-name="L2">
              <text:list-item>
                <text:p>La liste des répliques synchronisées est contrôlée par la propriété : <text:span text:style-name="T36">replica.lag.time.max.ms</text:span> (défaut 30s)</text:p>
              </text:list-item>
              <text:list-item>
                <text:p>Si pendant ce délai, le follower</text:p>
                <text:list>
                  <text:list-item>
                    <text:p>N’envoie pas de requêtes fetch </text:p>
                  </text:list-item>
                  <text:list-item>
                    <text:p>N’atteint pas l’offset de fin du leader</text:p>
                  </text:list-item>
                </text:list>
              </text:list-item>
              <text:list-item>
                <text:p>Alors, le follower est considéré comme désynchronisé</text:p>
                <text:list>
                  <text:list-item>
                    <text:p text:style-name="P61">Il est supprimé de la liste des <text:span text:style-name="T43">ISR</text:span><text:span text:style-name="T103"> </text:span><text:span text:style-name="T43">(In Sync Replica)</text:span></text:p>
                  </text:list-item>
                  <text:list-item>
                    <text:p text:style-name="P61">Il peut ensuite rattraper son retard et être réintégré aux ISRs</text:p>
                  </text:list-item>
                </text:list>
              </text:list-item>
              <text:list-item>
                <text:p><text:span text:style-name="T14"/></text:p>
              </text:list-item>
              <text:list-item>
                <text:p><text:span text:style-name="T14">kafka-topics.sh --describe</text:span> : permet de voir les ISR pour chaque partition d’un topic</text:p>
              </text:list-item>
            </text:list>
          </draw:text-box>
        </draw:frame>
        <presentation:notes draw:style-name="dp5">
          <draw:page-thumbnail draw:style-name="gr2" draw:layer="layout" svg:width="15.597cm" svg:height="10.985cm" svg:x="2.623cm" svg:y="2.258cm" draw:page-number="89" presentation:class="page"/>
          <draw:frame presentation:style-name="pr6" draw:text-style-name="P18"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Contrôle de la durabilité par le producteur </text:p>
          </draw:text-box>
        </draw:frame>
        <draw:frame presentation:style-name="pr5" draw:layer="layout" svg:width="23.499cm" svg:height="12.18cm" svg:x="3.033cm" svg:y="6.283cm" presentation:class="outline" presentation:user-transformed="true">
          <draw:text-box>
            <text:list text:style-name="L2">
              <text:list-item>
                <text:p>Le producteur de message peut contrôler quand l’acquittement d’écriture est envoyé par le leader via la propriété <text:span text:style-name="T104">ack </text:span>:</text:p>
                <text:list>
                  <text:list-item>
                    <text:p><text:span text:style-name="T36">acks=0</text:span> : On n’attend pas l’acquittement du broker. Perte de messages pas important</text:p>
                  </text:list-item>
                  <text:list-item>
                    <text:p><text:span text:style-name="T101">acks=1</text:span><text:span text:style-name="T5"> : Le producteur considère le message écrit lorsque </text:span><text:span text:style-name="T5">le leader a acquitté l’écriture. Perte de messages </text:span><text:span text:style-name="T5">possibles mais risque réduit</text:span></text:p>
                  </text:list-item>
                  <text:list-item>
                    <text:p><text:span text:style-name="T105">acks=all</text:span><text:span text:style-name="T4"> (défaut): Le producteur considère le message </text:span><text:span text:style-name="T4">comme écrit lorsque il a été répliqué par un minimum de </text:span><text:span text:style-name="T4">répliques des ISR : </text:span><text:span text:style-name="T106">min.insync.replica</text:span><text:span text:style-name="T4"> </text:span><text:span text:style-name="T4"><text:line-break/></text:span><text:span text:style-name="T4">=&gt; Assure le maximum de durabilité du message</text:span></text:p>
                  </text:list-item>
                </text:list>
              </text:list-item>
            </text:list>
          </draw:text-box>
        </draw:frame>
        <presentation:notes draw:style-name="dp10">
          <office:forms form:automatic-focus="false" form:apply-design-mode="false"/>
          <draw:page-thumbnail draw:style-name="gr2" draw:layer="layout" svg:width="15.597cm" svg:height="10.985cm" svg:x="2.623cm" svg:y="2.258cm" draw:page-number="90" presentation:class="page"/>
          <draw:frame presentation:style-name="pr6" draw:text-style-name="P13"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ks : 0, 1, all</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list-item>
            </text:list>
          </draw:text-box>
        </draw:frame>
        <draw:frame draw:style-name="gr6" draw:text-style-name="P21" draw:layer="layout" svg:width="25.101cm" svg:height="2.359cm" svg:x="1.732cm" svg:y="6.456cm">
          <draw:image xlink:href="Pictures/10000001000005270000007C23643E04.png" xlink:type="simple" xlink:show="embed" xlink:actuate="onLoad" draw:mime-type="image/png">
            <text:p/>
          </draw:image>
        </draw:frame>
        <draw:frame draw:style-name="gr6" draw:text-style-name="P21" draw:layer="layout" svg:width="26.572cm" svg:height="2.327cm" svg:x="1.697cm" svg:y="8.764cm">
          <draw:image xlink:href="Pictures/10000001000005870000007C39CFC6ED.png" xlink:type="simple" xlink:show="embed" xlink:actuate="onLoad" draw:mime-type="image/png">
            <text:p/>
          </draw:image>
        </draw:frame>
        <draw:frame draw:style-name="gr6" draw:text-style-name="P21" draw:layer="layout" svg:width="18.5cm" svg:height="9.308cm" svg:x="4.604cm" svg:y="11.71cm">
          <draw:image xlink:href="Pictures/10000001000004EC0000027A89CF54CB.png" xlink:type="simple" xlink:show="embed" xlink:actuate="onLoad" draw:mime-type="image/png">
            <text:p/>
          </draw:image>
        </draw:frame>
        <presentation:notes draw:style-name="dp10">
          <office:forms form:automatic-focus="false" form:apply-design-mode="false"/>
          <draw:page-thumbnail draw:style-name="gr2" draw:layer="layout" svg:width="15.597cm" svg:height="10.985cm" svg:x="2.623cm" svg:y="2.258cm" draw:page-number="91" presentation:class="page"/>
          <draw:frame presentation:style-name="pr6" draw:text-style-name="P13"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text:span text:style-name="T14">min.insync.replica</text:span></text:p>
          </draw:text-box>
        </draw:frame>
        <draw:frame presentation:style-name="pr5" draw:layer="layout" svg:width="23.499cm" svg:height="12.18cm" svg:x="3.033cm" svg:y="6.283cm" presentation:class="outline" presentation:user-transformed="true">
          <draw:text-box>
            <text:list text:style-name="L2">
              <text:list-item>
                <text:p>La propriété <text:span text:style-name="T36">min.insync.replica,</text:span> configurée au niveau cluster ou topic, spécifie le degré minimum de réplication d’un message pour que la production réussisse (si acks=all)</text:p>
                <text:list>
                  <text:list-item>
                    <text:p>A la réception d’un message, le leader vérifie si il y a assez d’ISR pour écrire le message, sinon il envoie une <text:span text:style-name="T14">NotEnoughReplicasException</text:span></text:p>
                    <text:p/>
                  </text:list-item>
                </text:list>
              </text:list-item>
            </text:list>
          </draw:text-box>
        </draw:frame>
        <presentation:notes draw:style-name="dp5">
          <draw:page-thumbnail draw:style-name="gr2" draw:layer="layout" svg:width="15.597cm" svg:height="10.985cm" svg:x="2.623cm" svg:y="2.258cm" draw:page-number="92" presentation:class="page"/>
          <draw:frame presentation:style-name="pr6" draw:text-style-name="P13"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équences et arbitrage</text:p>
          </draw:text-box>
        </draw:frame>
        <draw:frame presentation:style-name="pr5" draw:text-style-name="P63" draw:layer="layout" svg:width="23.499cm" svg:height="12.18cm" svg:x="3.033cm" svg:y="6.283cm" presentation:class="outline">
          <draw:text-box>
            <text:list text:style-name="L2">
              <text:list-item>
                <text:p text:style-name="P62"><text:span text:style-name="T107">Côté performance</text:span></text:p>
              </text:list-item>
            </text:list>
            <text:list text:style-name="L5">
              <text:list-item>
                <text:p text:style-name="P62"><text:span text:style-name="T108">Une réplique synchronisée légèrement en retard ralentit </text:span><text:span text:style-name="T108">l'acquittement et donc le débit</text:span></text:p>
              </text:list-item>
              <text:list-item>
                <text:p text:style-name="P62"><text:span text:style-name="T108">Une réplique désynchronisée n'impacte plus les </text:span><text:span text:style-name="T108">performances mais augmente le risque de perte de </text:span><text:span text:style-name="T108">données</text:span></text:p>
              </text:list-item>
            </text:list>
            <text:list text:style-name="L2">
              <text:list-item>
                <text:p text:style-name="P62"><text:span text:style-name="T109"/></text:p>
              </text:list-item>
              <text:list-item>
                <text:p text:style-name="P62"><text:span text:style-name="T107">Côté production (acks=all)</text:span></text:p>
              </text:list-item>
            </text:list>
            <text:list text:style-name="L5">
              <text:list-item>
                <text:p text:style-name="P62"><text:span text:style-name="T108">Si nombre d'ISR &lt; min.insync.replicas : Kafka rejette le </text:span><text:span text:style-name="T108">message avec NotEnoughReplicasException</text:span></text:p>
              </text:list-item>
              <text:list-item>
                <text:p text:style-name="P62"><text:span text:style-name="T108">Si nombre de répliques disponibles &lt; min.insync.replicas : </text:span><text:span text:style-name="T108">configuration incohérente, blocage des émissions</text:span></text:p>
              </text:list-item>
            </text:list>
            <text:list text:style-name="L2">
              <text:list-item>
                <text:p text:style-name="P62"><text:span text:style-name="T109"/></text:p>
              </text:list-item>
              <text:list-item>
                <text:p text:style-name="P62"><text:span text:style-name="T107">Tolérance aux pannes — règles à retenir</text:span></text:p>
              </text:list-item>
            </text:list>
            <text:list text:style-name="L5">
              <text:list-item>
                <text:p text:style-name="P62"><text:span text:style-name="T108">N répliques → tolère N-1 pannes pour la consommation</text:span></text:p>
              </text:list-item>
              <text:list-item>
                <text:p text:style-name="P62"><text:span text:style-name="T108">N répliques, min.insync.replicas = M → tolère N-M pannes </text:span><text:span text:style-name="T108">pour les écritures</text:span></text:p>
              </text:list-item>
            </text:list>
            <text:list text:style-name="L2">
              <text:list-item>
                <text:p text:style-name="P62"><text:span text:style-name="T108">Exemple : 3 répliques, min.insync.replicas=2 → 1 panne </text:span><text:span text:style-name="T108">tolérée en écriture, 2 en lecture</text:span></text:p>
              </text:list-item>
              <text:list-item>
                <text:p text:style-name="P62"/>
              </text:list-item>
            </text:list>
          </draw:text-box>
        </draw:frame>
        <presentation:notes draw:style-name="dp5">
          <draw:page-thumbnail draw:style-name="gr2" draw:layer="layout" svg:width="15.597cm" svg:height="10.985cm" svg:x="2.623cm" svg:y="2.258cm" draw:page-number="93" presentation:class="page"/>
          <draw:frame presentation:style-name="pr6" draw:text-style-name="P18" draw:layer="layout" svg:width="14.362cm" svg:height="11.254cm" svg:x="3.25cm" svg:y="14.128cm" presentation:class="notes" presentation:placeholder="true">
            <draw:text-box/>
          </draw:frame>
        </presentation:notes>
      </draw:page>
      <draw:page draw:name="page94"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4">Configuration des producteurs </text:span><text:span text:style-name="T24"><text:line-break/></text:span><text:span text:style-name="T110">fiabilité</text:span></text:p>
          </draw:text-box>
        </draw:frame>
        <draw:frame presentation:style-name="pr5" draw:layer="layout" svg:width="23.499cm" svg:height="12.18cm" svg:x="3.033cm" svg:y="6.283cm" presentation:class="outline" presentation:user-transformed="true">
          <draw:text-box>
            <text:list text:style-name="L2">
              <text:list-item>
                <text:p>D’autre paramètres jouent sur la fiabilité du producteur de message :</text:p>
                <text:list>
                  <text:list-item>
                    <text:p><text:span text:style-name="T37">retries : </text:span>Si l’erreur renvoyée est de type <text:span text:style-name="T14">Retriable</text:span>, le nombre de tentative de renvoi.<text:line-break/>Par défaut : MAX_LONG <text:line-break/>Si &gt; 0 possibilité d’envoi en doublon</text:p>
                  </text:list-item>
                  <text:list-item>
                    <text:p text:style-name="P64"><text:span text:style-name="T37">max.in.flight.requests.per.connection</text:span> : Maximum de message en cours de transmission (sans réponse obtenu) </text:p>
                  </text:list-item>
                  <text:list-item>
                    <text:p><text:span text:style-name="T37">enable.idempotence</text:span> : Livraison unique de message</text:p>
                  </text:list-item>
                  <text:list-item>
                    <text:p><text:span text:style-name="T36">transactional.id : </text:span>Mode<text:span text:style-name="T36"> </text:span>transactionnel</text:p>
                  </text:list-item>
                </text:list>
              </text:list-item>
              <text:list-item>
                <text:p/>
              </text:list-item>
            </text:list>
          </draw:text-box>
        </draw:frame>
        <presentation:notes draw:style-name="dp9">
          <draw:page-thumbnail draw:style-name="gr2" draw:layer="layout" svg:width="15.597cm" svg:height="10.985cm" svg:x="2.623cm" svg:y="2.258cm" draw:page-number="94" presentation:class="page"/>
          <draw:frame presentation:style-name="pr6" draw:text-style-name="P13" draw:layer="layout" svg:width="14.362cm" svg:height="11.254cm" svg:x="3.25cm" svg:y="14.128cm" presentation:class="notes" presentation:placeholder="true">
            <draw:text-box/>
          </draw:frame>
        </presentation:notes>
      </draw:page>
      <draw:page draw:name="page95"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4">Configuration des producteurs </text:span><text:span text:style-name="T24"><text:line-break/></text:span><text:span text:style-name="T110">performance</text:span></text:p>
          </draw:text-box>
        </draw:frame>
        <draw:frame presentation:style-name="pr5" draw:layer="layout" svg:width="23.499cm" svg:height="12.18cm" svg:x="3.033cm" svg:y="6.283cm" presentation:class="outline" presentation:user-transformed="true">
          <draw:text-box>
            <text:list text:style-name="L2">
              <text:list-item>
                <text:p><text:span text:style-name="T44">D’autre paramètres jouent sur la performance et en </text:span><text:span text:style-name="T44">particulier le débit de messages, principalement :</text:span></text:p>
                <text:list>
                  <text:list-item>
                    <text:p><text:span text:style-name="T37">batch.size</text:span> : La taille du batch en mémoire pour envoyer les messages. Défaut 16ko</text:p>
                  </text:list-item>
                  <text:list-item>
                    <text:p><text:span text:style-name="T37">linger.ms</text:span> : la durée d'attente de messages supplémentaires avant d'envoyer le batch courant. Défaut 0ms</text:p>
                  </text:list-item>
                  <text:list-item>
                    <text:p><text:span text:style-name="T37">compression.type</text:span> : Par défaut, les messages ne sont pas compressés. Valeurs possibles : <text:span text:style-name="T14">snappy</text:span> , <text:span text:style-name="T14">gzip</text:span> , ou <text:span text:style-name="T14">lz4</text:span></text:p>
                  </text:list-item>
                </text:list>
              </text:list-item>
            </text:list>
            <text:p>Et<text:span text:style-name="T37"> </text:span>aussi</text:p>
            <text:list text:continue-numbering="true" text:style-name="L2">
              <text:list-item>
                <text:list>
                  <text:list-item>
                    <text:p text:style-name="P64"><text:span text:style-name="T37">request.timeout.ms</text:span><text:span text:style-name="T52">, </text:span><text:span text:style-name="T37">metadata.fetch.timeout.ms</text:span><text:span text:style-name="T52"> et </text:span><text:span text:style-name="T37">timeout.ms</text:span><text:span text:style-name="T14">: </text:span><text:span text:style-name="T21">Timeouts pour la réception d’une réponse à </text:span><text:span text:style-name="T21">un message, pour obtenir des méta-données (leader, </text:span><text:span text:style-name="T21">etc..) pour obtenir le ack des répliques.</text:span></text:p>
                  </text:list-item>
                  <text:list-item>
                    <text:p text:style-name="P64"><text:span text:style-name="T37">max.block.ms</text:span><text:span text:style-name="T14"> : </text:span><text:span text:style-name="T21">Temps maximum d’attente pour la </text:span><text:span text:style-name="T21">méthode send(). Dans le cas ou le buffer est rempli</text:span></text:p>
                  </text:list-item>
                  <text:list-item>
                    <text:p text:style-name="P64"><text:span text:style-name="T37">max.request.size</text:span><text:span text:style-name="T14"> : </text:span><text:span text:style-name="T21">Taille max d’un message</text:span></text:p>
                  </text:list-item>
                  <text:list-item>
                    <text:p text:style-name="P64"><text:span text:style-name="T37">receive.buffer.bytes</text:span><text:span text:style-name="T14"> et </text:span><text:span text:style-name="T37">send.buffer.bytes</text:span><text:span text:style-name="T14">: </text:span><text:span text:style-name="T21">Taille des </text:span><text:span text:style-name="T21">buffers TCP</text:span></text:p>
                  </text:list-item>
                </text:list>
              </text:list-item>
            </text:list>
          </draw:text-box>
        </draw:frame>
        <draw:frame draw:style-name="gr22" draw:text-style-name="P59" draw:layer="layout" svg:width="14.684cm" svg:height="1.216cm" svg:x="1.603cm" svg:y="19.4cm">
          <draw:text-box>
            <text:p><text:span text:style-name="T94">Atelier 2 : Production de messages</text:span></text:p>
          </draw:text-box>
        </draw:frame>
        <presentation:notes draw:style-name="dp9">
          <draw:page-thumbnail draw:style-name="gr2" draw:layer="layout" svg:width="15.597cm" svg:height="10.985cm" svg:x="2.623cm" svg:y="2.258cm" draw:page-number="95" presentation:class="page"/>
          <draw:frame presentation:style-name="pr6" draw:text-style-name="P13" draw:layer="layout" svg:width="14.362cm" svg:height="11.254cm" svg:x="3.25cm" svg:y="14.128cm" presentation:class="notes" presentation:placeholder="true">
            <draw:text-box/>
          </draw:frame>
        </presentation:notes>
      </draw:page>
      <draw:page draw:name="page96"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37"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Types de clients</text:span></text:p>
              </text:list-item>
              <text:list-item>
                <text:p text:style-name="P19"><text:span text:style-name="T2">Production</text:span><text:span text:style-name="T12"> </text:span><text:span text:style-name="T2">de</text:span><text:span text:style-name="T12"> </text:span><text:span text:style-name="T2">messages</text:span></text:p>
              </text:list-item>
              <text:list-item>
                <text:p text:style-name="P19"><text:span text:style-name="T12">Consommation de messages</text:span></text:p>
              </text:list-item>
              <text:list-item>
                <text:p text:style-name="P33"><text:span text:style-name="T2">Garanties Kafka</text:span></text:p>
                <text:p text:style-name="P33"><text:span text:style-name="T2"/></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draw:text-box>
            <text:list text:style-name="L2">
              <text:list-item>
                <text:p><text:span text:style-name="T5">Les consommateurs font partie d'un </text:span><text:span text:style-name="T111">groupe de consommateurs</text:span><text:span text:style-name="T5">.</text:span></text:p>
                <text:list>
                  <text:list-item>
                    <text:p text:style-name="P65"><text:span text:style-name="T35">Identifié par la propriété </text:span><text:span text:style-name="T112">group.id</text:span></text:p>
                  </text:list-item>
                </text:list>
              </text:list-item>
              <text:list-item>
                <text:p><text:span text:style-name="T5"/></text:p>
              </text:list-item>
              <text:list-item>
                <text:p><text:span text:style-name="T5">Chaque instance d’un groupe reçoit un sous-ensemble des partitions à </text:span><text:span text:style-name="T5">un instant T.</text:span></text:p>
                <text:list>
                  <text:list-item>
                    <text:p text:style-name="P65"><text:span text:style-name="T35">1 partition = 1 seul consommateur du groupe à un instant T</text:span></text:p>
                  </text:list-item>
                </text:list>
              </text:list-item>
              <text:list-item>
                <text:p><text:span text:style-name="T113"/></text:p>
              </text:list-item>
              <text:list-item>
                <text:p><text:span text:style-name="T113">Plusieurs groupes peuvent consommer le même topic</text:span></text:p>
                <text:list>
                  <text:list-item>
                    <text:p><text:span text:style-name="T35">Chaque groupe progresse à son rythme, indépendamment</text:span></text:p>
                  </text:list-item>
                </text:list>
              </text:list-item>
            </text:list>
          </draw:text-box>
        </draw:frame>
        <presentation:notes draw:style-name="dp2">
          <draw:page-thumbnail draw:style-name="gr2" draw:layer="layout" svg:width="15.597cm" svg:height="10.985cm" svg:x="2.623cm" svg:y="2.258cm" draw:page-number="97" presentation:class="page"/>
          <draw:frame presentation:style-name="pr6" draw:text-style-name="P13"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presentation:user-transformed="true">
          <draw:text-box>
            <text:list text:style-name="L2">
              <text:list-item>
                <text:p text:style-name="P66"><text:span text:style-name="T114">Trois cas typiques :</text:span></text:p>
              </text:list-item>
            </text:list>
            <text:list text:style-name="L5">
              <text:list-item>
                <text:list>
                  <text:list-item>
                    <text:p><text:span text:style-name="T115">1 consommateur → reçoit toutes les partitions</text:span></text:p>
                  </text:list-item>
                  <text:list-item>
                    <text:p><text:span text:style-name="T115">N consommateurs (N ≤ partitions) → répartition équilibrée</text:span></text:p>
                  </text:list-item>
                  <text:list-item>
                    <text:p><text:span text:style-name="T115">N consommateurs &gt; partitions → certains restent inactifs</text:span></text:p>
                  </text:list-item>
                </text:list>
              </text:list-item>
            </text:list>
          </draw:text-box>
        </draw:frame>
        <draw:frame draw:style-name="gr9" draw:text-style-name="P23" draw:layer="layout" svg:width="7.631cm" svg:height="5.385cm" svg:x="0.569cm" svg:y="14.8cm">
          <draw:image xlink:href="Pictures/10000001000002C6000001F5A5AA6B72.png" xlink:type="simple" xlink:show="embed" xlink:actuate="onLoad" draw:mime-type="image/png">
            <text:p/>
          </draw:image>
        </draw:frame>
        <draw:frame draw:style-name="gr9" draw:text-style-name="P23" draw:layer="layout" svg:width="7.652cm" svg:height="5.4cm" svg:x="8.8cm" svg:y="14.8cm">
          <draw:image xlink:href="Pictures/10000001000002C6000001F577A322C2.png" xlink:type="simple" xlink:show="embed" xlink:actuate="onLoad" draw:mime-type="image/png">
            <text:p/>
          </draw:image>
        </draw:frame>
        <draw:frame draw:style-name="gr9" draw:text-style-name="P23" draw:layer="layout" svg:width="7.526cm" svg:height="6.254cm" svg:x="18.2cm" svg:y="14.8cm">
          <draw:image xlink:href="Pictures/10000001000002C60000024EE140356B.png" xlink:type="simple" xlink:show="embed" xlink:actuate="onLoad" draw:mime-type="image/png">
            <text:p/>
          </draw:image>
        </draw:frame>
        <presentation:notes draw:style-name="dp6">
          <office:forms form:automatic-focus="false" form:apply-design-mode="false"/>
          <draw:page-thumbnail draw:style-name="gr2" draw:layer="layout" svg:width="15.597cm" svg:height="10.985cm" svg:x="2.623cm" svg:y="2.258cm" draw:page-number="98" presentation:class="page"/>
          <draw:frame presentation:style-name="pr6" draw:text-style-name="P13" draw:layer="layout" svg:width="14.362cm" svg:height="11.254cm" svg:x="3.25cm" svg:y="14.128cm" presentation:class="notes" presentation:placeholder="true">
            <draw:text-box/>
          </draw:frame>
        </presentation:notes>
      </draw:page>
      <draw:page draw:name="Configuration de base" draw:style-name="dp6" draw:master-page-name="Standard" presentation:presentation-page-layout-name="AL3T1">
        <office:forms form:automatic-focus="false" form:apply-design-mode="false"/>
        <draw:frame draw:name="PlaceHolder 23" presentation:style-name="pr14" draw:text-style-name="P27" draw:layer="layout" svg:width="23.499cm" svg:height="3.574cm" svg:x="3.033cm" svg:y="2.367cm" presentation:class="title" presentation:user-transformed="true">
          <draw:text-box>
            <text:p text:style-name="P39"><text:span text:style-name="T69">Configuration de base</text:span></text:p>
          </draw:text-box>
        </draw:frame>
        <draw:frame draw:name="PlaceHolder 24" presentation:style-name="pr15" draw:text-style-name="P30" draw:layer="layout" svg:width="23.499cm" svg:height="12.18cm" svg:x="3.033cm" svg:y="6.283cm" presentation:class="outline" presentation:user-transformed="true">
          <draw:text-box>
            <text:p text:style-name="P40"><text:span text:style-name="T72">Propriétés essentielles d'un consommateur :</text:span></text:p>
            <text:list text:style-name="L9">
              <text:list-item>
                <text:list>
                  <text:list-item>
                    <text:p text:style-name="P41"><text:span text:style-name="T71">bootstrap.servers : points d'entrée du cluster</text:span></text:p>
                  </text:list-item>
                  <text:list-item>
                    <text:p text:style-name="P41"><text:span text:style-name="T71">group.id : identifiant du groupe de consommateurs</text:span></text:p>
                  </text:list-item>
                  <text:list-item>
                    <text:p text:style-name="P41"><text:span text:style-name="T71">key.deserializer / value.deserializer : conversion des messages</text:span></text:p>
                  </text:list-item>
                </text:list>
              </text:list-item>
            </text:list>
            <text:p text:style-name="P40"><text:span text:style-name="T72">Comportement au premier démarrage :</text:span></text:p>
            <text:list text:continue-numbering="true" text:style-name="L9">
              <text:list-item>
                <text:list>
                  <text:list-item>
                    <text:p text:style-name="P41"><text:span text:style-name="T71">auto.offset.reset = latest (défaut) → ne lit que les nouveaux </text:span><text:span text:style-name="T71">messages</text:span></text:p>
                  </text:list-item>
                  <text:list-item>
                    <text:p text:style-name="P41"><text:span text:style-name="T71">auto.offset.reset = earliest → lit depuis le début disponible</text:span></text:p>
                  </text:list-item>
                  <text:list-item>
                    <text:p text:style-name="P41"><text:span text:style-name="T71">auto.offset.reset = none → exception si pas d'offset</text:span></text:p>
                  </text:list-item>
                </text:list>
              </text:list-item>
            </text:list>
            <text:p text:style-name="P40"><text:span text:style-name="T72">S'applique uniquement si aucun offset n'est commité pour le </text:span><text:span text:style-name="T72">groupe</text:span></text:p>
          </draw:text-box>
        </draw:frame>
        <presentation:notes draw:style-name="dp8">
          <office:forms form:automatic-focus="false" form:apply-design-mode="false"/>
          <draw:page-thumbnail draw:style-name="gr2" draw:layer="layout" svg:width="19.798cm" svg:height="11.136cm" svg:x="0.6cm" svg:y="2.257cm" draw:page-number="99" presentation:class="page"/>
          <draw:frame presentation:style-name="pr16" draw:text-style-name="P18" draw:layer="layout" svg:width="16.799cm" svg:height="13.364cm" svg:x="2.1cm" svg:y="14.107cm" presentation:class="notes" presentation:placeholder="true">
            <draw:text-box/>
          </draw:frame>
        </presentation:notes>
      </draw:page>
      <draw:page draw:name="Boucle de polling" draw:style-name="dp6" draw:master-page-name="Standard" presentation:presentation-page-layout-name="AL3T1">
        <office:forms form:automatic-focus="false" form:apply-design-mode="false"/>
        <draw:frame draw:name="PlaceHolder 25" presentation:style-name="pr14" draw:text-style-name="P27" draw:layer="layout" svg:width="23.499cm" svg:height="3.574cm" svg:x="3.033cm" svg:y="2.367cm" presentation:class="title" presentation:user-transformed="true">
          <draw:text-box>
            <text:p text:style-name="P39"><text:span text:style-name="T69">Boucle de polling</text:span></text:p>
          </draw:text-box>
        </draw:frame>
        <draw:frame draw:name="PlaceHolder 26" presentation:style-name="pr15" draw:text-style-name="P30" draw:layer="layout" svg:width="23.499cm" svg:height="12.18cm" svg:x="3.033cm" svg:y="6.283cm" presentation:class="outline" presentation:user-transformed="true">
          <draw:text-box>
            <text:p text:style-name="P40"><text:span text:style-name="T72">Les consommateurs poll() en continu les topics abonnés</text:span></text:p>
            <text:list text:style-name="L9">
              <text:list-item>
                <text:list>
                  <text:list-item>
                    <text:p text:style-name="P41"><text:span text:style-name="T71">Récupèrent un lot d'enregistrements à chaque appel</text:span></text:p>
                  </text:list-item>
                </text:list>
              </text:list-item>
            </text:list>
            <text:p text:style-name="P40"><text:span text:style-name="T72">Chaque enregistrement (ConsumerRecord) contient :</text:span></text:p>
            <text:list text:continue-numbering="true" text:style-name="L9">
              <text:list-item>
                <text:list>
                  <text:list-item>
                    <text:p text:style-name="P41"><text:span text:style-name="T71">Le message (clé, valeur, headers)</text:span></text:p>
                  </text:list-item>
                  <text:list-item>
                    <text:p text:style-name="P41"><text:span text:style-name="T71">Le topic et la partition</text:span></text:p>
                  </text:list-item>
                  <text:list-item>
                    <text:p text:style-name="P41"><text:span text:style-name="T71">L'offset</text:span></text:p>
                  </text:list-item>
                  <text:list-item>
                    <text:p text:style-name="P41"><text:span text:style-name="T71">Le timestamp</text:span></text:p>
                  </text:list-item>
                </text:list>
              </text:list-item>
            </text:list>
            <text:p text:style-name="P40"><text:span text:style-name="T72">Le polling porte aussi les heartbeats vers le coordinateur</text:span></text:p>
            <text:list text:continue-numbering="true" text:style-name="L9">
              <text:list-item>
                <text:list>
                  <text:list-item>
                    <text:p text:style-name="P41"><text:span text:style-name="T71">Un consumer qui ne polle plus est considéré mort</text:span></text:p>
                  </text:list-item>
                </text:list>
              </text:list-item>
            </text:list>
          </draw:text-box>
        </draw:frame>
        <presentation:notes draw:style-name="dp8">
          <office:forms form:automatic-focus="false" form:apply-design-mode="false"/>
          <draw:page-thumbnail draw:style-name="gr2" draw:layer="layout" svg:width="19.798cm" svg:height="11.136cm" svg:x="0.6cm" svg:y="2.257cm" draw:page-number="100" presentation:class="page"/>
          <draw:frame presentation:style-name="pr16" draw:text-style-name="P18" draw:layer="layout" svg:width="16.799cm" svg:height="13.364cm" svg:x="2.1cm" svg:y="14.107cm" presentation:class="notes" presentation:placeholder="true">
            <draw:text-box/>
          </draw:frame>
        </presentation:notes>
      </draw:page>
      <draw:page draw:name="Exemple de code consumer" draw:style-name="dp6" draw:master-page-name="Standard" presentation:presentation-page-layout-name="AL3T1">
        <office:forms form:automatic-focus="false" form:apply-design-mode="false"/>
        <draw:frame draw:name="PlaceHolder 27" presentation:style-name="pr14" draw:text-style-name="P27" draw:layer="layout" svg:width="23.499cm" svg:height="3.574cm" svg:x="3.033cm" svg:y="2.367cm" presentation:class="title" presentation:user-transformed="true">
          <draw:text-box>
            <text:p text:style-name="P39"><text:span text:style-name="T69">Exemple de code consumer</text:span></text:p>
          </draw:text-box>
        </draw:frame>
        <draw:frame draw:name="PlaceHolder 28" presentation:style-name="pr15" draw:text-style-name="P30" draw:layer="layout" svg:width="23.499cm" svg:height="12.18cm" svg:x="3.033cm" svg:y="6.283cm" presentation:class="outline" presentation:user-transformed="true">
          <draw:text-box>
            <text:p text:style-name="P40"><text:span text:style-name="T72">Schéma classique d'une boucle de consommation :</text:span></text:p>
            <text:list text:style-name="L9">
              <text:list-item>
                <text:list>
                  <text:list-item>
                    <text:p text:style-name="P41"><text:span text:style-name="T71">while (running) {</text:span></text:p>
                  </text:list-item>
                  <text:list-item>
                    <text:p text:style-name="P41"><text:span text:style-name="T71"><text:s text:c="4"/></text:span><text:span text:style-name="T71">records = consumer.poll(Duration.ofMillis(100))</text:span></text:p>
                  </text:list-item>
                  <text:list-item>
                    <text:p text:style-name="P41"><text:span text:style-name="T71"><text:s text:c="4"/></text:span><text:span text:style-name="T71">for (record in records) {</text:span></text:p>
                  </text:list-item>
                  <text:list-item>
                    <text:p text:style-name="P41"><text:span text:style-name="T71"><text:s text:c="8"/></text:span><text:span text:style-name="T71">traiter(record.key(), record.value())</text:span></text:p>
                  </text:list-item>
                  <text:list-item>
                    <text:p text:style-name="P41"><text:span text:style-name="T71"><text:s text:c="4"/></text:span><text:span text:style-name="T71">}</text:span></text:p>
                  </text:list-item>
                  <text:list-item>
                    <text:p text:style-name="P41"><text:span text:style-name="T71"><text:s text:c="4"/></text:span><text:span text:style-name="T71">consumer.commitSync() <text:s/>// si commit manuel</text:span></text:p>
                  </text:list-item>
                  <text:list-item>
                    <text:p text:style-name="P41"><text:span text:style-name="T71">}</text:span></text:p>
                  </text:list-item>
                  <text:list-item>
                    <text:p text:style-name="P41"><text:span text:style-name="T71">consumer.close() <text:s/>// libère les partitions, déclenche un </text:span><text:span text:style-name="T71">rebalance</text:span></text:p>
                  </text:list-item>
                </text:list>
              </text:list-item>
            </text:list>
            <text:p text:style-name="P40"><text:span text:style-name="T72">Le timeout de poll() est l'attente max si aucun message </text:span><text:span text:style-name="T72">disponible</text:span></text:p>
          </draw:text-box>
        </draw:frame>
        <presentation:notes draw:style-name="dp8">
          <office:forms form:automatic-focus="false" form:apply-design-mode="false"/>
          <draw:page-thumbnail draw:style-name="gr2" draw:layer="layout" svg:width="19.798cm" svg:height="11.136cm" svg:x="0.6cm" svg:y="2.257cm" draw:page-number="101" presentation:class="page"/>
          <draw:frame presentation:style-name="pr16" draw:text-style-name="P18" draw:layer="layout" svg:width="16.799cm" svg:height="13.364cm" svg:x="2.1cm" svg:y="14.107cm" presentation:class="notes" presentation:placeholder="true">
            <draw:text-box/>
          </draw:frame>
        </presentation:notes>
      </draw:page>
      <draw:page draw:name="Membership et heartbeats" draw:style-name="dp6" draw:master-page-name="Standard" presentation:presentation-page-layout-name="AL3T1">
        <office:forms form:automatic-focus="false" form:apply-design-mode="false"/>
        <draw:frame draw:name="PlaceHolder 29" presentation:style-name="pr14" draw:text-style-name="P27" draw:layer="layout" svg:width="23.499cm" svg:height="3.574cm" svg:x="3.033cm" svg:y="2.367cm" presentation:class="title" presentation:user-transformed="true">
          <draw:text-box>
            <text:p text:style-name="P39"><text:span text:style-name="T69">Membership et heartbeats</text:span></text:p>
          </draw:text-box>
        </draw:frame>
        <draw:frame draw:name="PlaceHolder 30" presentation:style-name="pr15" draw:text-style-name="P30" draw:layer="layout" svg:width="23.499cm" svg:height="12.18cm" svg:x="3.033cm" svg:y="6.283cm" presentation:class="outline" presentation:user-transformed="true">
          <draw:text-box>
            <text:p text:style-name="P40"><text:span text:style-name="T72">Chaque groupe a un broker coordinateur (variable selon le </text:span><text:span text:style-name="T72">groupe)</text:span></text:p>
            <text:p text:style-name="P40"><text:span text:style-name="T72">Maintien du membership via heartbeats périodiques</text:span></text:p>
            <text:list text:style-name="L9">
              <text:list-item>
                <text:list>
                  <text:list-item>
                    <text:p text:style-name="P41"><text:span text:style-name="T71">heartbeat.interval.ms (défaut 3s) : fréquence d'envoi</text:span></text:p>
                  </text:list-item>
                  <text:list-item>
                    <text:p text:style-name="P41"><text:span text:style-name="T71">session.timeout.ms (défaut 45s) : délai avant éviction</text:span></text:p>
                  </text:list-item>
                  <text:list-item>
                    <text:p text:style-name="P41"><text:span text:style-name="T71">max.poll.interval.ms (défaut 5min) : délai max entre 2 poll()</text:span></text:p>
                  </text:list-item>
                </text:list>
              </text:list-item>
            </text:list>
            <text:p text:style-name="P40"><text:span text:style-name="T72">Si un consommateur ne polle plus ou ne ping plus :</text:span></text:p>
            <text:list text:continue-numbering="true" text:style-name="L9">
              <text:list-item>
                <text:list>
                  <text:list-item>
                    <text:p text:style-name="P41"><text:span text:style-name="T71">Sa session expire côté coordinateur</text:span></text:p>
                  </text:list-item>
                  <text:list-item>
                    <text:p text:style-name="P41"><text:span text:style-name="T71">Le coordinateur déclenche une réaffectation des partitions</text:span></text:p>
                  </text:list-item>
                </text:list>
              </text:list-item>
            </text:list>
            <text:p text:style-name="P40"><text:span text:style-name="T72">Inspection en CLI :</text:span></text:p>
            <text:list text:continue-numbering="true" text:style-name="L9">
              <text:list-item>
                <text:list>
                  <text:list-item>
                    <text:p text:style-name="P41"><text:span text:style-name="T71">kafka-consumer-groups.sh --describe --state --group &lt;id&gt;</text:span></text:p>
                  </text:list-item>
                </text:list>
              </text:list-item>
            </text:list>
          </draw:text-box>
        </draw:frame>
        <presentation:notes draw:style-name="dp8">
          <office:forms form:automatic-focus="false" form:apply-design-mode="false"/>
          <draw:page-thumbnail draw:style-name="gr2" draw:layer="layout" svg:width="19.798cm" svg:height="11.136cm" svg:x="0.6cm" svg:y="2.257cm" draw:page-number="102" presentation:class="page"/>
          <draw:frame presentation:style-name="pr16" draw:text-style-name="P18" draw:layer="layout" svg:width="16.799cm" svg:height="13.364cm" svg:x="2.1cm" svg:y="14.107cm" presentation:class="notes" presentation:placeholder="true">
            <draw:text-box/>
          </draw:frame>
        </presentation:notes>
      </draw:page>
      <draw:page draw:name="Rééquilibrage dynamique" draw:style-name="dp6" draw:master-page-name="Standard" presentation:presentation-page-layout-name="AL3T1">
        <office:forms form:automatic-focus="false" form:apply-design-mode="false"/>
        <draw:frame draw:name="PlaceHolder 31" presentation:style-name="pr14" draw:text-style-name="P27" draw:layer="layout" svg:width="23.499cm" svg:height="3.574cm" svg:x="3.033cm" svg:y="2.367cm" presentation:class="title" presentation:user-transformed="true">
          <draw:text-box>
            <text:p text:style-name="P39"><text:span text:style-name="T69">Rééquilibrage dynamique</text:span></text:p>
          </draw:text-box>
        </draw:frame>
        <draw:frame draw:name="PlaceHolder 32" presentation:style-name="pr15" draw:text-style-name="P30" draw:layer="layout" svg:width="23.499cm" svg:height="12.18cm" svg:x="3.033cm" svg:y="6.283cm" presentation:class="outline" presentation:user-transformed="true">
          <draw:text-box>
            <text:p text:style-name="P40"><text:span text:style-name="T72">Déclenché à chaque changement de composition du </text:span><text:span text:style-name="T72">groupe :</text:span></text:p>
            <text:list text:style-name="L9">
              <text:list-item>
                <text:list>
                  <text:list-item>
                    <text:p text:style-name="P41"><text:span text:style-name="T71">Ajout d'un consommateur → des partitions lui sont affectées</text:span></text:p>
                  </text:list-item>
                  <text:list-item>
                    <text:p text:style-name="P41"><text:span text:style-name="T71">Arrêt d'un consommateur → ses partitions sont redistribuées</text:span></text:p>
                  </text:list-item>
                </text:list>
              </text:list-item>
            </text:list>
            <text:p text:style-name="P40"><text:span text:style-name="T72">Bénéfices :</text:span></text:p>
            <text:list text:continue-numbering="true" text:style-name="L9">
              <text:list-item>
                <text:list>
                  <text:list-item>
                    <text:p text:style-name="P41"><text:span text:style-name="T71">Scalabilité horizontale et tolérance aux défaillances</text:span></text:p>
                  </text:list-item>
                </text:list>
              </text:list-item>
            </text:list>
            <text:p text:style-name="P40"><text:span text:style-name="T72">Mais coûts à connaître :</text:span></text:p>
            <text:list text:continue-numbering="true" text:style-name="L9">
              <text:list-item>
                <text:list>
                  <text:list-item>
                    <text:p text:style-name="P41"><text:span text:style-name="T71">Pendant le rebalance, plus aucun message n'est consommé</text:span></text:p>
                  </text:list-item>
                  <text:list-item>
                    <text:p text:style-name="P41"><text:span text:style-name="T71">Les caches applicatifs doivent être reconstruits</text:span></text:p>
                  </text:list-item>
                  <text:list-item>
                    <text:p text:style-name="P41"><text:span text:style-name="T71">Risque de doublons ou de pertes selon la stratégie de commit</text:span></text:p>
                  </text:list-item>
                </text:list>
              </text:list-item>
            </text:list>
            <text:p text:style-name="P40"><text:span text:style-name="T72">À éviter en cas de redémarrages fréquents → membership </text:span><text:span text:style-name="T72">statique</text:span></text:p>
          </draw:text-box>
        </draw:frame>
        <presentation:notes draw:style-name="dp8">
          <office:forms form:automatic-focus="false" form:apply-design-mode="false"/>
          <draw:page-thumbnail draw:style-name="gr2" draw:layer="layout" svg:width="19.798cm" svg:height="11.136cm" svg:x="0.6cm" svg:y="2.257cm" draw:page-number="103" presentation:class="page"/>
          <draw:frame presentation:style-name="pr16" draw:text-style-name="P18" draw:layer="layout" svg:width="16.799cm" svg:height="13.364cm" svg:x="2.1cm" svg:y="14.107cm" presentation:class="notes" presentation:placeholder="true">
            <draw:text-box/>
          </draw:frame>
        </presentation:notes>
      </draw:page>
      <draw:page draw:name="Membership statique" draw:style-name="dp6" draw:master-page-name="Standard" presentation:presentation-page-layout-name="AL3T1">
        <office:forms form:automatic-focus="false" form:apply-design-mode="false"/>
        <draw:frame draw:name="PlaceHolder 33" presentation:style-name="pr14" draw:text-style-name="P27" draw:layer="layout" svg:width="23.499cm" svg:height="3.574cm" svg:x="3.033cm" svg:y="2.367cm" presentation:class="title" presentation:user-transformed="true">
          <draw:text-box>
            <text:p text:style-name="P39"><text:span text:style-name="T69">Membership statique</text:span></text:p>
          </draw:text-box>
        </draw:frame>
        <draw:frame draw:name="PlaceHolder 34" presentation:style-name="pr15" draw:text-style-name="P30" draw:layer="layout" svg:width="23.499cm" svg:height="12.18cm" svg:x="3.033cm" svg:y="6.283cm" presentation:class="outline" presentation:user-transformed="true">
          <draw:text-box>
            <text:p text:style-name="P40"><text:span text:style-name="T72">Permet de conserver les partitions lors d'un redémarrage </text:span><text:span text:style-name="T72">rapide</text:span></text:p>
            <text:list text:style-name="L9">
              <text:list-item>
                <text:list>
                  <text:list-item>
                    <text:p text:style-name="P41"><text:span text:style-name="T71">Configuration : group.instance.id sur chaque consommateur</text:span></text:p>
                  </text:list-item>
                  <text:list-item>
                    <text:p text:style-name="P41"><text:span text:style-name="T71">Identifiant unique et stable par instance</text:span></text:p>
                  </text:list-item>
                </text:list>
              </text:list-item>
            </text:list>
            <text:p text:style-name="P40"><text:span text:style-name="T72">Comportement :</text:span></text:p>
            <text:list text:continue-numbering="true" text:style-name="L9">
              <text:list-item>
                <text:list>
                  <text:list-item>
                    <text:p text:style-name="P41"><text:span text:style-name="T71">Au redémarrage rapide, le consommateur retrouve ses </text:span><text:span text:style-name="T71">partitions</text:span></text:p>
                  </text:list-item>
                  <text:list-item>
                    <text:p text:style-name="P41"><text:span text:style-name="T71">Pas de rebalance déclenché tant que session.timeout.ms </text:span><text:span text:style-name="T71">n'expire pas</text:span></text:p>
                  </text:list-item>
                </text:list>
              </text:list-item>
            </text:list>
            <text:p text:style-name="P40"><text:span text:style-name="T72">Cas d'usage typiques :</text:span></text:p>
            <text:list text:continue-numbering="true" text:style-name="L9">
              <text:list-item>
                <text:list>
                  <text:list-item>
                    <text:p text:style-name="P41"><text:span text:style-name="T71">Consommateurs avec gros caches (Kafka Streams, applis </text:span><text:span text:style-name="T71">stateful)</text:span></text:p>
                  </text:list-item>
                  <text:list-item>
                    <text:p text:style-name="P41"><text:span text:style-name="T71">Rolling restarts en production</text:span></text:p>
                  </text:list-item>
                </text:list>
              </text:list-item>
            </text:list>
            <text:p text:style-name="P40"><text:span text:style-name="T72">Attention : un consommateur réellement mort attendra le </text:span><text:span text:style-name="T72">timeout</text:span></text:p>
          </draw:text-box>
        </draw:frame>
        <presentation:notes draw:style-name="dp8">
          <office:forms form:automatic-focus="false" form:apply-design-mode="false"/>
          <draw:page-thumbnail draw:style-name="gr2" draw:layer="layout" svg:width="19.798cm" svg:height="11.136cm" svg:x="0.6cm" svg:y="2.257cm" draw:page-number="104" presentation:class="page"/>
          <draw:frame presentation:style-name="pr16" draw:text-style-name="P18" draw:layer="layout" svg:width="16.799cm" svg:height="13.364cm" svg:x="2.1cm" svg:y="14.107cm" presentation:class="notes" presentation:placeholder="true">
            <draw:text-box/>
          </draw:frame>
        </presentation:notes>
      </draw:page>
      <draw:page draw:name="Offsets et commits" draw:style-name="dp6" draw:master-page-name="Standard" presentation:presentation-page-layout-name="AL3T1">
        <office:forms form:automatic-focus="false" form:apply-design-mode="false"/>
        <draw:frame draw:name="PlaceHolder 35" presentation:style-name="pr14" draw:text-style-name="P27" draw:layer="layout" svg:width="23.499cm" svg:height="3.574cm" svg:x="3.033cm" svg:y="2.367cm" presentation:class="title" presentation:user-transformed="true">
          <draw:text-box>
            <text:p text:style-name="P39"><text:span text:style-name="T69">Offsets et commits</text:span></text:p>
          </draw:text-box>
        </draw:frame>
        <draw:frame draw:name="PlaceHolder 36" presentation:style-name="pr15" draw:text-style-name="P30" draw:layer="layout" svg:width="23.499cm" svg:height="12.18cm" svg:x="3.033cm" svg:y="6.283cm" presentation:class="outline" presentation:user-transformed="true">
          <draw:text-box>
            <text:p text:style-name="P40"><text:span text:style-name="T72">Les consommateurs synchronisent leur progression avec </text:span><text:span text:style-name="T72">Kafka</text:span></text:p>
            <text:list text:style-name="L9">
              <text:list-item>
                <text:list>
                  <text:list-item>
                    <text:p text:style-name="P41"><text:span text:style-name="T71">Indique le dernier offset traité par partition</text:span></text:p>
                  </text:list-item>
                  <text:list-item>
                    <text:p text:style-name="P41"><text:span text:style-name="T71">L'opération s'appelle un commit</text:span></text:p>
                  </text:list-item>
                </text:list>
              </text:list-item>
            </text:list>
            <text:p text:style-name="P40"><text:span text:style-name="T72">Stockage : topic interne __consumer_offsets</text:span></text:p>
            <text:list text:continue-numbering="true" text:style-name="L9">
              <text:list-item>
                <text:list>
                  <text:list-item>
                    <text:p text:style-name="P41"><text:span text:style-name="T71">Compacté, gardé indéfiniment (offsets.retention.minutes par </text:span><text:span text:style-name="T71">défaut 7j)</text:span></text:p>
                  </text:list-item>
                  <text:list-item>
                    <text:p text:style-name="P41"><text:span text:style-name="T71">Réplique entre brokers comme tout topic Kafka</text:span></text:p>
                  </text:list-item>
                </text:list>
              </text:list-item>
            </text:list>
            <text:p text:style-name="P40"><text:span text:style-name="T72">Lors d'une réaffectation de partitions, deux risques :</text:span></text:p>
            <text:list text:continue-numbering="true" text:style-name="L9">
              <text:list-item>
                <text:list>
                  <text:list-item>
                    <text:p text:style-name="P41"><text:span text:style-name="T71">Traiter deux fois le même message (doublons)</text:span></text:p>
                  </text:list-item>
                  <text:list-item>
                    <text:p text:style-name="P41"><text:span text:style-name="T71">Louper des messages (pertes)</text:span></text:p>
                  </text:list-item>
                </text:list>
              </text:list-item>
            </text:list>
          </draw:text-box>
        </draw:frame>
        <presentation:notes draw:style-name="dp8">
          <office:forms form:automatic-focus="false" form:apply-design-mode="false"/>
          <draw:page-thumbnail draw:style-name="gr2" draw:layer="layout" svg:width="19.798cm" svg:height="11.136cm" svg:x="0.6cm" svg:y="2.257cm" draw:page-number="105" presentation:class="page"/>
          <draw:frame presentation:style-name="pr16" draw:text-style-name="P18" draw:layer="layout" svg:width="16.799cm" svg:height="13.364cm" svg:x="2.1cm" svg:y="14.107cm" presentation:class="notes" presentation:placeholder="true">
            <draw:text-box/>
          </draw:frame>
        </presentation:notes>
      </draw:page>
      <draw:page draw:name="page106"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Risques lors d’une réaffectation</text:p>
          </draw:text-box>
        </draw:frame>
        <draw:frame presentation:style-name="pr5" draw:layer="layout" svg:width="23.499cm" svg:height="4.463cm" svg:x="3.033cm" svg:y="14cm" presentation:class="outline" presentation:user-transformed="true">
          <draw:text-box>
            <text:list text:style-name="L2">
              <text:list-item>
                <text:p>Kafka propose plusieurs façons de gérer les commits via la propriété <text:span text:style-name="T14">enable.auto.commit </text:span><text:span text:style-name="T21">et l’API</text:span></text:p>
              </text:list-item>
            </text:list>
          </draw:text-box>
        </draw:frame>
        <draw:frame draw:style-name="gr9" draw:text-style-name="P23" draw:layer="layout" svg:width="14.089cm" svg:height="6.079cm" svg:x="0.511cm" svg:y="6.576cm">
          <draw:image xlink:href="Pictures/10000001000003D2000001A6E9FDD1E2.png" xlink:type="simple" xlink:show="embed" xlink:actuate="onLoad" draw:mime-type="image/png">
            <text:p/>
          </draw:image>
        </draw:frame>
        <draw:frame draw:style-name="gr9" draw:text-style-name="P23" draw:layer="layout" svg:width="13.6cm" svg:height="6.737cm" svg:x="15.4cm" svg:y="6.463cm">
          <draw:image xlink:href="Pictures/10000001000003D3000001E5F6382571.png" xlink:type="simple" xlink:show="embed" xlink:actuate="onLoad" draw:mime-type="image/png">
            <text:p/>
          </draw:image>
        </draw:frame>
        <presentation:notes draw:style-name="dp6">
          <office:forms form:automatic-focus="false" form:apply-design-mode="false"/>
          <draw:page-thumbnail draw:style-name="gr2" draw:layer="layout" svg:width="15.597cm" svg:height="10.985cm" svg:x="2.623cm" svg:y="2.258cm" draw:page-number="106" presentation:class="page"/>
          <draw:frame presentation:style-name="pr6" draw:text-style-name="P18" draw:layer="layout" svg:width="14.362cm" svg:height="11.254cm" svg:x="3.25cm" svg:y="14.128cm" presentation:class="notes" presentation:placeholder="true">
            <draw:text-box/>
          </draw:frame>
        </presentation:notes>
      </draw:page>
      <draw:page draw:name="Risques de réaffectation" draw:style-name="dp6" draw:master-page-name="Standard" presentation:presentation-page-layout-name="AL3T1">
        <office:forms form:automatic-focus="false" form:apply-design-mode="false"/>
        <draw:frame draw:name="PlaceHolder 37" presentation:style-name="pr14" draw:text-style-name="P27" draw:layer="layout" svg:width="23.499cm" svg:height="3.574cm" svg:x="3.033cm" svg:y="2.367cm" presentation:class="title" presentation:user-transformed="true">
          <draw:text-box>
            <text:p text:style-name="P39"><text:span text:style-name="T69">Risques de réaffectation</text:span></text:p>
          </draw:text-box>
        </draw:frame>
        <draw:frame draw:name="PlaceHolder 38" presentation:style-name="pr15" draw:text-style-name="P30" draw:layer="layout" svg:width="23.499cm" svg:height="12.18cm" svg:x="3.033cm" svg:y="6.283cm" presentation:class="outline" presentation:user-transformed="true">
          <draw:text-box>
            <text:p text:style-name="P40"><text:span text:style-name="T72">Cas doublons (commit après poll, avant traitement) :</text:span></text:p>
            <text:list text:style-name="L9">
              <text:list-item>
                <text:list>
                  <text:list-item>
                    <text:p text:style-name="P41"><text:span text:style-name="T71">Les messages entre last_committed_offset et l'offset courant</text:span></text:p>
                  </text:list-item>
                  <text:list-item>
                    <text:p text:style-name="P41"><text:span text:style-name="T71">seront retraités par le nouveau consommateur</text:span></text:p>
                  </text:list-item>
                </text:list>
              </text:list-item>
            </text:list>
            <text:p text:style-name="P40"><text:span text:style-name="T72">Cas pertes (commit avant traitement complet) :</text:span></text:p>
            <text:list text:continue-numbering="true" text:style-name="L9">
              <text:list-item>
                <text:list>
                  <text:list-item>
                    <text:p text:style-name="P41"><text:span text:style-name="T71">Les messages déjà commités mais non traités sont perdus</text:span></text:p>
                  </text:list-item>
                  <text:list-item>
                    <text:p text:style-name="P41"><text:span text:style-name="T71">car le nouveau consommateur reprend après l'offset commité</text:span></text:p>
                  </text:list-item>
                </text:list>
              </text:list-item>
            </text:list>
            <text:p text:style-name="P40"><text:span text:style-name="T72">Le bon moment pour committer :</text:span></text:p>
            <text:list text:continue-numbering="true" text:style-name="L9">
              <text:list-item>
                <text:list>
                  <text:list-item>
                    <text:p text:style-name="P41"><text:span text:style-name="T71">Après le traitement réussi du message</text:span></text:p>
                  </text:list-item>
                  <text:list-item>
                    <text:p text:style-name="P41"><text:span text:style-name="T71">Mais pas trop souvent (coût réseau)</text:span></text:p>
                  </text:list-item>
                </text:list>
              </text:list-item>
            </text:list>
            <text:p text:style-name="P40"><text:span text:style-name="T72">Schéma de référence : voir illustration</text:span></text:p>
          </draw:text-box>
        </draw:frame>
        <presentation:notes draw:style-name="dp8">
          <office:forms form:automatic-focus="false" form:apply-design-mode="false"/>
          <draw:page-thumbnail draw:style-name="gr2" draw:layer="layout" svg:width="19.798cm" svg:height="11.136cm" svg:x="0.6cm" svg:y="2.257cm" draw:page-number="107" presentation:class="page"/>
          <draw:frame presentation:style-name="pr16" draw:text-style-name="P18" draw:layer="layout" svg:width="16.799cm" svg:height="13.364cm" svg:x="2.1cm" svg:y="14.107cm" presentation:class="notes" presentation:placeholder="true">
            <draw:text-box/>
          </draw:frame>
        </presentation:notes>
      </draw:page>
      <draw:page draw:name="Commit auto vs contrôlé" draw:style-name="dp6" draw:master-page-name="Standard" presentation:presentation-page-layout-name="AL3T1">
        <office:forms form:automatic-focus="false" form:apply-design-mode="false"/>
        <draw:frame draw:name="PlaceHolder 39" presentation:style-name="pr14" draw:text-style-name="P27" draw:layer="layout" svg:width="23.499cm" svg:height="3.574cm" svg:x="3.033cm" svg:y="2.367cm" presentation:class="title" presentation:user-transformed="true">
          <draw:text-box>
            <text:p text:style-name="P39"><text:span text:style-name="T69">Commit auto vs contrôlé</text:span></text:p>
          </draw:text-box>
        </draw:frame>
        <draw:frame draw:name="PlaceHolder 40" presentation:style-name="pr15" draw:text-style-name="P30" draw:layer="layout" svg:width="23.499cm" svg:height="12.18cm" svg:x="3.033cm" svg:y="6.283cm" presentation:class="outline" presentation:user-transformed="true">
          <draw:text-box>
            <text:p text:style-name="P40"><text:span text:style-name="T72">Commit automatique <text:s/>(enable.auto.commit = true)</text:span></text:p>
            <text:list text:style-name="L9">
              <text:list-item>
                <text:list>
                  <text:list-item>
                    <text:p text:style-name="P41"><text:span text:style-name="T71">Validation périodique selon auto.commit.interval.ms (défaut 5s)</text:span></text:p>
                  </text:list-item>
                  <text:list-item>
                    <text:p text:style-name="P41"><text:span text:style-name="T71">Plus grand offset reçu par poll()</text:span></text:p>
                  </text:list-item>
                  <text:list-item>
                    <text:p text:style-name="P41"><text:span text:style-name="T71">Simple, mais ne protège ni des doublons ni des pertes</text:span></text:p>
                  </text:list-item>
                </text:list>
              </text:list-item>
            </text:list>
            <text:p text:style-name="P40"><text:span text:style-name="T72">Commit contrôlé <text:s/>(enable.auto.commit = false)</text:span></text:p>
            <text:list text:continue-numbering="true" text:style-name="L9">
              <text:list-item>
                <text:list>
                  <text:list-item>
                    <text:p text:style-name="P41"><text:span text:style-name="T71">commitSync() : bloquant, garanties fortes, plus lent</text:span></text:p>
                  </text:list-item>
                  <text:list-item>
                    <text:p text:style-name="P41"><text:span text:style-name="T71">commitAsync() : non bloquant, débit élevé, gestion d'erreur à </text:span><text:span text:style-name="T71">coder</text:span></text:p>
                  </text:list-item>
                  <text:list-item>
                    <text:p text:style-name="P41"><text:span text:style-name="T71">Possibilité de committer une Map&lt;TopicPartition, Offset&gt; </text:span><text:span text:style-name="T71">précise</text:span></text:p>
                  </text:list-item>
                </text:list>
              </text:list-item>
            </text:list>
            <text:p text:style-name="P40"><text:span text:style-name="T72">Recommandation : commit contrôlé en production</text:span></text:p>
          </draw:text-box>
        </draw:frame>
        <presentation:notes draw:style-name="dp8">
          <office:forms form:automatic-focus="false" form:apply-design-mode="false"/>
          <draw:page-thumbnail draw:style-name="gr2" draw:layer="layout" svg:width="19.798cm" svg:height="11.136cm" svg:x="0.6cm" svg:y="2.257cm" draw:page-number="108" presentation:class="page"/>
          <draw:frame presentation:style-name="pr16" draw:text-style-name="P18" draw:layer="layout" svg:width="16.799cm" svg:height="13.364cm" svg:x="2.1cm" svg:y="14.107cm" presentation:class="notes" presentation:placeholder="true">
            <draw:text-box/>
          </draw:frame>
        </presentation:notes>
      </draw:page>
      <draw:page draw:name="Réagir aux réaffectations" draw:style-name="dp6" draw:master-page-name="Standard" presentation:presentation-page-layout-name="AL3T1">
        <office:forms form:automatic-focus="false" form:apply-design-mode="false"/>
        <draw:frame draw:name="PlaceHolder 41" presentation:style-name="pr14" draw:text-style-name="P27" draw:layer="layout" svg:width="23.499cm" svg:height="3.574cm" svg:x="3.033cm" svg:y="2.367cm" presentation:class="title" presentation:user-transformed="true">
          <draw:text-box>
            <text:p text:style-name="P39"><text:span text:style-name="T69">Réagir aux réaffectations</text:span></text:p>
          </draw:text-box>
        </draw:frame>
        <draw:frame draw:name="PlaceHolder 42" presentation:style-name="pr15" draw:text-style-name="P30" draw:layer="layout" svg:width="23.499cm" svg:height="12.18cm" svg:x="3.033cm" svg:y="6.283cm" presentation:class="outline" presentation:user-transformed="true">
          <draw:text-box>
            <text:p text:style-name="P40"><text:span text:style-name="T72">L'application peut s'enregistrer comme listener de rebalance</text:span></text:p>
            <text:list text:style-name="L9">
              <text:list-item>
                <text:list>
                  <text:list-item>
                    <text:p text:style-name="P41"><text:span text:style-name="T71">ConsumerRebalanceListener avec 3 callbacks :</text:span></text:p>
                  </text:list-item>
                  <text:list-item>
                    <text:p text:style-name="P41"><text:span text:style-name="T71">onPartitionsRevoked : avant qu'on perde les partitions</text:span></text:p>
                  </text:list-item>
                  <text:list-item>
                    <text:p text:style-name="P41"><text:span text:style-name="T71">onPartitionsAssigned : après réception de nouvelles partitions</text:span></text:p>
                  </text:list-item>
                  <text:list-item>
                    <text:p text:style-name="P41"><text:span text:style-name="T71">onPartitionsLost : perte non gracieuse (timeout)</text:span></text:p>
                  </text:list-item>
                </text:list>
              </text:list-item>
            </text:list>
            <text:p text:style-name="P40"><text:span text:style-name="T72">Cas d'usage :</text:span></text:p>
            <text:list text:continue-numbering="true" text:style-name="L9">
              <text:list-item>
                <text:list>
                  <text:list-item>
                    <text:p text:style-name="P41"><text:span text:style-name="T71">Committer les offsets en cours avant de perdre la partition</text:span></text:p>
                  </text:list-item>
                  <text:list-item>
                    <text:p text:style-name="P41"><text:span text:style-name="T71">Fermer des ressources, vider des caches</text:span></text:p>
                  </text:list-item>
                  <text:list-item>
                    <text:p text:style-name="P41"><text:span text:style-name="T71">Stocker les offsets hors de Kafka (BDD, fichier...)</text:span></text:p>
                  </text:list-item>
                </text:list>
              </text:list-item>
            </text:list>
            <text:p text:style-name="P40"><text:span text:style-name="T72">Pattern offsets externes : base de l'exactly-once consumer-</text:span><text:span text:style-name="T72">side</text:span></text:p>
          </draw:text-box>
        </draw:frame>
        <presentation:notes draw:style-name="dp8">
          <office:forms form:automatic-focus="false" form:apply-design-mode="false"/>
          <draw:page-thumbnail draw:style-name="gr2" draw:layer="layout" svg:width="19.798cm" svg:height="11.136cm" svg:x="0.6cm" svg:y="2.257cm" draw:page-number="109" presentation:class="page"/>
          <draw:frame presentation:style-name="pr16" draw:text-style-name="P18" draw:layer="layout" svg:width="16.799cm" svg:height="13.364cm" svg:x="2.1cm" svg:y="14.107cm" presentation:class="notes" presentation:placeholder="true">
            <draw:text-box/>
          </draw:frame>
        </presentation:notes>
      </draw:page>
      <draw:page draw:name="Affectation explicite" draw:style-name="dp6" draw:master-page-name="Standard" presentation:presentation-page-layout-name="AL3T1">
        <office:forms form:automatic-focus="false" form:apply-design-mode="false"/>
        <draw:frame draw:name="PlaceHolder 43" presentation:style-name="pr14" draw:text-style-name="P27" draw:layer="layout" svg:width="23.499cm" svg:height="3.574cm" svg:x="3.033cm" svg:y="2.367cm" presentation:class="title" presentation:user-transformed="true">
          <draw:text-box>
            <text:p text:style-name="P39"><text:span text:style-name="T69">Affectation explicite</text:span></text:p>
          </draw:text-box>
        </draw:frame>
        <draw:frame draw:name="PlaceHolder 44" presentation:style-name="pr15" draw:text-style-name="P30" draw:layer="layout" svg:width="23.499cm" svg:height="12.18cm" svg:x="3.033cm" svg:y="6.283cm" presentation:class="outline" presentation:user-transformed="true">
          <draw:text-box>
            <text:p text:style-name="P40"><text:span text:style-name="T72">Alternative au modèle de groupe : assignment manuel</text:span></text:p>
            <text:list text:style-name="L9">
              <text:list-item>
                <text:list>
                  <text:list-item>
                    <text:p text:style-name="P41"><text:span text:style-name="T71">L'application appelle consumer.assign(partitions)</text:span></text:p>
                  </text:list-item>
                  <text:list-item>
                    <text:p text:style-name="P41"><text:span text:style-name="T71">Plus de group.id ni de coordinateur</text:span></text:p>
                  </text:list-item>
                </text:list>
              </text:list-item>
            </text:list>
            <text:p text:style-name="P40"><text:span text:style-name="T72">Conséquences :</text:span></text:p>
            <text:list text:continue-numbering="true" text:style-name="L9">
              <text:list-item>
                <text:list>
                  <text:list-item>
                    <text:p text:style-name="P41"><text:span text:style-name="T71">Pas de rebalance, pas de heartbeats, pas de membership</text:span></text:p>
                  </text:list-item>
                  <text:list-item>
                    <text:p text:style-name="P41"><text:span text:style-name="T71">L'application gère seule la répartition entre instances</text:span></text:p>
                  </text:list-item>
                  <text:list-item>
                    <text:p text:style-name="P41"><text:span text:style-name="T71">Les commits restent possibles mais sont à la charge de l'appli</text:span></text:p>
                  </text:list-item>
                </text:list>
              </text:list-item>
            </text:list>
            <text:p text:style-name="P40"><text:span text:style-name="T72">Cas d'usage :</text:span></text:p>
            <text:list text:continue-numbering="true" text:style-name="L9">
              <text:list-item>
                <text:list>
                  <text:list-item>
                    <text:p text:style-name="P41"><text:span text:style-name="T71">Consommateur unique sur des partitions précises</text:span></text:p>
                  </text:list-item>
                  <text:list-item>
                    <text:p text:style-name="P41"><text:span text:style-name="T71">Outils de monitoring, replays ciblés, audit</text:span></text:p>
                  </text:list-item>
                </text:list>
              </text:list-item>
            </text:list>
          </draw:text-box>
        </draw:frame>
        <presentation:notes draw:style-name="dp8">
          <office:forms form:automatic-focus="false" form:apply-design-mode="false"/>
          <draw:page-thumbnail draw:style-name="gr2" draw:layer="layout" svg:width="19.798cm" svg:height="11.136cm" svg:x="0.6cm" svg:y="2.257cm" draw:page-number="110" presentation:class="page"/>
          <draw:frame presentation:style-name="pr16" draw:text-style-name="P18" draw:layer="layout" svg:width="16.799cm" svg:height="13.364cm" svg:x="2.1cm" svg:y="14.107cm" presentation:class="notes" presentation:placeholder="true">
            <draw:text-box/>
          </draw:frame>
        </presentation:notes>
      </draw:page>
      <draw:page draw:name="Configuration avancée" draw:style-name="dp6" draw:master-page-name="Standard" presentation:presentation-page-layout-name="AL3T1">
        <office:forms form:automatic-focus="false" form:apply-design-mode="false"/>
        <draw:frame draw:name="PlaceHolder 45" presentation:style-name="pr14" draw:text-style-name="P27" draw:layer="layout" svg:width="23.499cm" svg:height="3.574cm" svg:x="3.033cm" svg:y="2.367cm" presentation:class="title" presentation:user-transformed="true">
          <draw:text-box>
            <text:p text:style-name="P39"><text:span text:style-name="T69">Configuration avancée</text:span></text:p>
          </draw:text-box>
        </draw:frame>
        <draw:frame draw:name="PlaceHolder 46" presentation:style-name="pr15" draw:text-style-name="P30" draw:layer="layout" svg:width="23.499cm" svg:height="12.18cm" svg:x="3.033cm" svg:y="6.283cm" presentation:class="outline" presentation:user-transformed="true">
          <draw:text-box>
            <text:p text:style-name="P40"><text:span text:style-name="T72">Réglages de fetch :</text:span></text:p>
            <text:list text:style-name="L9">
              <text:list-item>
                <text:list>
                  <text:list-item>
                    <text:p text:style-name="P41"><text:span text:style-name="T63">fetch.min.bytes</text:span><text:span text:style-name="T71"> : volume minimum pour répondre (charge </text:span><text:span text:style-name="T71">réduite)</text:span></text:p>
                  </text:list-item>
                  <text:list-item>
                    <text:p text:style-name="P41"><text:span text:style-name="T63">fetch.max.wait.ms </text:span><text:span text:style-name="T71">: attente max si fetch.min.bytes non </text:span><text:span text:style-name="T71">atteint</text:span></text:p>
                  </text:list-item>
                  <text:list-item>
                    <text:p text:style-name="P41"><text:span text:style-name="T63">max.partition.fetch.bytes</text:span><text:span text:style-name="T71"> : volume max par partition (défaut </text:span><text:span text:style-name="T71">1 Mo)</text:span></text:p>
                  </text:list-item>
                </text:list>
              </text:list-item>
            </text:list>
            <text:p text:style-name="P40"><text:span text:style-name="T72">Réglages de poll :</text:span></text:p>
            <text:list text:continue-numbering="true" text:style-name="L9">
              <text:list-item>
                <text:list>
                  <text:list-item>
                    <text:p text:style-name="P41"><text:span text:style-name="T63">max.poll.records</text:span><text:span text:style-name="T71"> : nombre max d'enregistrements par poll()</text:span></text:p>
                  </text:list-item>
                  <text:list-item>
                    <text:p text:style-name="P41"><text:span text:style-name="T63">max.poll.interval.ms</text:span><text:span text:style-name="T71"> : délai max entre 2 poll() avant éviction</text:span></text:p>
                  </text:list-item>
                </text:list>
              </text:list-item>
            </text:list>
            <text:p text:style-name="P40"><text:span text:style-name="T72">Stratégie d'affectation :</text:span></text:p>
            <text:list text:continue-numbering="true" text:style-name="L9">
              <text:list-item>
                <text:list>
                  <text:list-item>
                    <text:p text:style-name="P41"><text:span text:style-name="T63">partition.assignment.strategy</text:span><text:span text:style-name="T71"> : Range (défaut), </text:span><text:span text:style-name="T71">RoundRobin, Sticky, CooperativeSticky</text:span></text:p>
                  </text:list-item>
                </text:list>
              </text:list-item>
            </text:list>
            <text:p text:style-name="P40"><text:span text:style-name="T72">Identification et réseau :</text:span></text:p>
            <text:list text:continue-numbering="true" text:style-name="L9">
              <text:list-item>
                <text:list>
                  <text:list-item>
                    <text:p text:style-name="P41"><text:span text:style-name="T63">client.id</text:span><text:span text:style-name="T71"> : identifiant pour métriques et logs</text:span></text:p>
                  </text:list-item>
                  <text:list-item>
                    <text:p text:style-name="P41"><text:span text:style-name="T63">receive.buffer.bytes / send.buffer.bytes</text:span><text:span text:style-name="T71"> : buffers TCP</text:span></text:p>
                  </text:list-item>
                </text:list>
              </text:list-item>
            </text:list>
          </draw:text-box>
        </draw:frame>
        <draw:frame draw:style-name="gr22" draw:text-style-name="P59" draw:layer="layout" svg:width="14.684cm" svg:height="1.216cm" svg:x="1.603cm" svg:y="19.4cm">
          <draw:text-box>
            <text:p><text:span text:style-name="T94">Atelier 2 : Consommation de messages</text:span></text:p>
          </draw:text-box>
        </draw:frame>
        <presentation:notes draw:style-name="dp8">
          <office:forms form:automatic-focus="false" form:apply-design-mode="false"/>
          <draw:page-thumbnail draw:style-name="gr2" draw:layer="layout" svg:width="19.798cm" svg:height="11.136cm" svg:x="0.6cm" svg:y="2.257cm" draw:page-number="111" presentation:class="page"/>
          <draw:frame presentation:style-name="pr16" draw:text-style-name="P18" draw:layer="layout" svg:width="16.799cm" svg:height="13.364cm" svg:x="2.1cm" svg:y="14.107cm" presentation:class="notes" presentation:placeholder="true">
            <draw:text-box/>
          </draw:frame>
        </presentation:notes>
      </draw:page>
      <draw:page draw:name="page112"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Clients</text:span></text:p>
              </text:list-header>
            </text:list>
          </draw:text-box>
        </draw:frame>
        <draw:frame presentation:style-name="pr38"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3"/></text:p>
              </text:list-item>
              <text:list-item>
                <text:p text:style-name="P19"><text:span text:style-name="T2">Types de clients</text:span></text:p>
              </text:list-item>
              <text:list-item>
                <text:p text:style-name="P19"><text:span text:style-name="T2">Production</text:span><text:span text:style-name="T12"> </text:span><text:span text:style-name="T2">de</text:span><text:span text:style-name="T12"> </text:span><text:span text:style-name="T2">messages</text:span></text:p>
              </text:list-item>
              <text:list-item>
                <text:p text:style-name="P19"><text:span text:style-name="T2">Consommation de messages</text:span></text:p>
              </text:list-item>
              <text:list-item>
                <text:p text:style-name="P33"><text:span text:style-name="T12">Garanties Kafka</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13" draw:style-name="dp6" draw:master-page-name="Blank">
        <office:forms form:automatic-focus="false" form:apply-design-mode="false"/>
        <draw:frame draw:name="Picture 1"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6" draw:text-style-name="P71" draw:layer="layout" svg:width="0.249cm" svg:height="0.467cm" svg:x="28.386cm" svg:y="19.739cm">
          <text:p text:style-name="P70"><text:span text:style-name="T11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7" draw:text-style-name="P73" draw:layer="layout" svg:width="26.729cm" svg:height="1.65cm" svg:x="1.484cm" svg:y="0.98cm">
          <text:p text:style-name="P72"><text:span text:style-name="T117">Garanties de livra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8" draw:text-style-name="P77" draw:layer="layout" svg:width="25.541cm" svg:height="13.496cm" svg:x="2.078cm" svg:y="4.759cm">
          <text:p text:style-name="P74"><text:span text:style-name="T118">Selon la configuration des producteurs et des consommateurs, Kafka garantit l’une des trois sémantiques suivantes :</text:span></text:p>
          <text:p text:style-name="P75"><text:span text:style-name="T119">– </text:span><text:span text:style-name="T119">At Most Once</text:span><text:span text:style-name="T118"> : un message est livré au plus une fois. On tolère les pertes.</text:span></text:p>
          <text:p text:style-name="P75"><text:span text:style-name="T119">– </text:span><text:span text:style-name="T119">At Least Once</text:span><text:span text:style-name="T118"> : un message est livré au moins une fois. On tolère les doublons.</text:span></text:p>
          <text:p text:style-name="P74"><text:span text:style-name="T119">– </text:span><text:span text:style-name="T119">Exactly Once</text:span><text:span text:style-name="T118"> : un message est livré une et une seule fois.</text:span></text:p>
          <text:p text:style-name="P76"><text:span text:style-name="T120">Tout ceci avec des défaillances possibles côté producteur, broker ou consomma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9.798cm" svg:height="11.136cm" svg:x="0.6cm" svg:y="2.257cm" draw:page-number="113" presentation:class="page"/>
          <draw:frame presentation:style-name="pr39" draw:text-style-name="P78" draw:layer="layout" svg:width="16.799cm" svg:height="13.364cm" svg:x="2.1cm" svg:y="14.107cm" presentation:class="notes" presentation:placeholder="true">
            <draw:text-box/>
          </draw:frame>
        </presentation:notes>
      </draw:page>
      <draw:page draw:name="page114" draw:style-name="dp6" draw:master-page-name="Blank">
        <office:forms form:automatic-focus="false" form:apply-design-mode="false"/>
        <draw:frame draw:name="Picture 2"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9" draw:text-style-name="P71" draw:layer="layout" svg:width="0.249cm" svg:height="0.467cm" svg:x="28.386cm" svg:y="19.739cm">
          <text:p text:style-name="P70"><text:span text:style-name="T11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0" draw:text-style-name="P73" draw:layer="layout" svg:width="26.729cm" svg:height="1.65cm" svg:x="1.484cm" svg:y="0.98cm">
          <text:p text:style-name="P72"><text:span text:style-name="T117">Garantie sur l’ord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1" draw:text-style-name="P84" draw:layer="layout" svg:width="25.541cm" svg:height="15.616cm" svg:x="2.078cm" svg:y="4.759cm">
          <text:p text:style-name="P79"><text:span text:style-name="T118">Kafka préserve l’ordre des messages </text:span><text:span text:style-name="T121">au sein d’une partition</text:span><text:span text:style-name="T118">, tant qu’il n’y a pas de défaillance avec retry.</text:span></text:p>
          <text:p text:style-name="P80"><text:span text:style-name="T122"/></text:p>
          <text:p text:style-name="P80"><text:span text:style-name="T123">En cas de retry</text:span></text:p>
          <text:p text:style-name="P79"><text:span text:style-name="T124">– </text:span><text:span text:style-name="T124">Avec </text:span><text:span text:style-name="T125">retries &gt; 0</text:span><text:span text:style-name="T124"> et </text:span><text:span text:style-name="T125">max.in.flight.requests.per.connection &gt; 1</text:span><text:span text:style-name="T124">, l’ordre initial peut être inversé lors d’un renvoi.</text:span></text:p>
          <text:p text:style-name="P81"><text:span text:style-name="T122"/></text:p>
          <text:p text:style-name="P81"><text:span text:style-name="T123">Pour garantir l’ordre malgré les fautes</text:span></text:p>
          <text:p text:style-name="P82"><text:span text:style-name="T124">– </text:span><text:span text:style-name="T124">Configurer </text:span><text:span text:style-name="T126">retries &gt; 0</text:span><text:span text:style-name="T124"> et </text:span><text:span text:style-name="T126">max.in.flight.requests.per.connection = 1</text:span></text:p>
          <text:p text:style-name="P83"><text:span text:style-name="T127">au prix du débit glob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14" presentation:class="page"/>
          <draw:frame presentation:style-name="pr39" draw:text-style-name="P78" draw:layer="layout" svg:width="16.799cm" svg:height="13.364cm" svg:x="2.1cm" svg:y="14.107cm" presentation:class="notes" presentation:placeholder="true">
            <draw:text-box/>
          </draw:frame>
        </presentation:notes>
      </draw:page>
      <draw:page draw:name="page115" draw:style-name="dp6" draw:master-page-name="Blank">
        <office:forms form:automatic-focus="false" form:apply-design-mode="false"/>
        <draw:frame draw:name="Picture 3"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5"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2" draw:text-style-name="P71" draw:layer="layout" svg:width="0.249cm" svg:height="0.467cm" svg:x="28.386cm" svg:y="19.739cm">
          <text:p text:style-name="P70"><text:span text:style-name="T11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3" draw:text-style-name="P73" draw:layer="layout" svg:width="26.729cm" svg:height="1.65cm" svg:x="1.484cm" svg:y="0.98cm">
          <text:p text:style-name="P72"><text:span text:style-name="T117">Producteur : acks et durabi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4" draw:text-style-name="P84" draw:layer="layout" svg:width="25.541cm" svg:height="9.634cm" svg:x="2.078cm" svg:y="4.759cm">
          <text:p text:style-name="P79"><text:span text:style-name="T124">La fiabilité de l’émission dépend de </text:span><text:span text:style-name="T126">acks</text:span><text:span text:style-name="T124"> (côté producteur) et de </text:span><text:span text:style-name="T126">min.insync.replicas</text:span><text:span text:style-name="T124"> (côté topic).</text:span></text:p>
          <text:p text:style-name="P76"><text:span text:style-name="T128">– </text:span><text:span text:style-name="T128">acks = 0</text:span><text:span text:style-name="T129"> <text:s/>: <text:s/>le producteur n’attend aucune confirmation</text:span></text:p>
          <text:p text:style-name="P85"><text:span text:style-name="T130">→ </text:span><text:span text:style-name="T130">At Most Once, latence minimale, perte si crash leader</text:span></text:p>
          <text:p text:style-name="P76"><text:span text:style-name="T128">– </text:span><text:span text:style-name="T128">acks = 1</text:span><text:span text:style-name="T129"> <text:s/>: <text:s/>le leader confirme l’écriture</text:span></text:p>
          <text:p text:style-name="P85"><text:span text:style-name="T130">→ </text:span><text:span text:style-name="T130">At Most Once, perte si le leader crashe avant réplication</text:span></text:p>
          <text:p text:style-name="P76"><text:span text:style-name="T128">– </text:span><text:span text:style-name="T128">acks = all</text:span><text:span text:style-name="T129"> <text:s/>: <text:s/>les ISR (≥ </text:span><text:span text:style-name="T131">min.insync.replicas</text:span><text:span text:style-name="T129">) confirment</text:span></text:p>
          <text:p text:style-name="P83"><text:span text:style-name="T132">→ </text:span><text:span text:style-name="T130">At Least Once</text:span><text:span text:style-name="T132"> avec </text:span><text:span text:style-name="T130">retries &gt; 0</text:span><text:span text:style-name="T132">, late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15" presentation:class="page"/>
          <draw:frame presentation:style-name="pr39" draw:text-style-name="P78" draw:layer="layout" svg:width="16.799cm" svg:height="13.364cm" svg:x="2.1cm" svg:y="14.107cm" presentation:class="notes" presentation:placeholder="true">
            <draw:text-box/>
          </draw:frame>
        </presentation:notes>
      </draw:page>
      <draw:page draw:name="page116" draw:style-name="dp6" draw:master-page-name="Blank">
        <office:forms form:automatic-focus="false" form:apply-design-mode="false"/>
        <draw:frame draw:name="Picture 4"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7"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5" draw:text-style-name="P71" draw:layer="layout" svg:width="0.249cm" svg:height="0.467cm" svg:x="28.386cm" svg:y="19.739cm">
          <text:p text:style-name="P70"><text:span text:style-name="T11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6" draw:text-style-name="P73" draw:layer="layout" svg:width="26.729cm" svg:height="1.65cm" svg:x="1.484cm" svg:y="0.98cm">
          <text:p text:style-name="P72"><text:span text:style-name="T117">Gestion des err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7" draw:text-style-name="P84" draw:layer="layout" svg:width="25.541cm" svg:height="11.566cm" svg:x="2.078cm" svg:y="4.759cm">
          <text:p text:style-name="P79"><text:span text:style-name="T118">Le producteur est soumis à deux familles d’erreurs :</text:span></text:p>
          <text:p text:style-name="P82"><text:span text:style-name="T133">– </text:span><text:span text:style-name="T133">Erreurs ré-essayables — gérées automatiquement</text:span></text:p>
          <text:p text:style-name="P83"><text:span text:style-name="T129">Nombre d’essais configurable via </text:span><text:span text:style-name="T131">retries</text:span><text:span text:style-name="T129"> <text:s/>⇒ <text:s/>attention, peut générer des doublons</text:span></text:p>
          <text:p text:style-name="P86"><text:span text:style-name="T132">Exemples : </text:span><text:span text:style-name="T130">LEADER_NOT_AVAILABLE</text:span><text:span text:style-name="T132">, </text:span><text:span text:style-name="T130">NOT_ENOUGH_REPLICAS</text:span><text:span text:style-name="T132">, </text:span><text:span text:style-name="T130">NETWORK_EXCEPTION</text:span></text:p>
          <text:p text:style-name="P82"><text:span text:style-name="T133">– </text:span><text:span text:style-name="T133">Erreurs non ré-essayables — à traiter dans le code</text:span></text:p>
          <text:p text:style-name="P83"><text:span text:style-name="T129">Échec définitif : logguer, envoyer en DLQ ou arrêter</text:span></text:p>
          <text:p text:style-name="P83"><text:span text:style-name="T132">Exemples : </text:span><text:span text:style-name="T130">INVALID_CONFIG</text:span><text:span text:style-name="T132">, </text:span><text:span text:style-name="T130">SERIALIZATION_EXCEPTION</text:span><text:span text:style-name="T132">, </text:span><text:span text:style-name="T130">MESSAGE_TOO_LA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16" presentation:class="page"/>
          <draw:frame presentation:style-name="pr39" draw:text-style-name="P78" draw:layer="layout" svg:width="16.799cm" svg:height="13.364cm" svg:x="2.1cm" svg:y="14.107cm" presentation:class="notes" presentation:placeholder="true">
            <draw:text-box/>
          </draw:frame>
        </presentation:notes>
      </draw:page>
      <draw:page draw:name="page117" draw:style-name="dp6" draw:master-page-name="Blank">
        <office:forms form:automatic-focus="false" form:apply-design-mode="false"/>
        <draw:frame draw:name="Picture 5"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9"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8" draw:text-style-name="P71" draw:layer="layout" svg:width="0.249cm" svg:height="0.467cm" svg:x="28.386cm" svg:y="19.739cm">
          <text:p text:style-name="P70"><text:span text:style-name="T1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9" draw:text-style-name="P73" draw:layer="layout" svg:width="26.729cm" svg:height="1.65cm" svg:x="1.484cm" svg:y="0.98cm">
          <text:p text:style-name="P72"><text:span text:style-name="T117">Producteur idempo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0" draw:text-style-name="P84" draw:layer="layout" svg:width="25.541cm" svg:height="12.385cm" svg:x="2.078cm" svg:y="4.759cm">
          <text:p text:style-name="P79"><text:span text:style-name="T129">Sans idempotence, les </text:span><text:span text:style-name="T131">retries</text:span><text:span text:style-name="T129"> peuvent générer des doublons. L’idempotence permet au broker de détecter et ignorer les renvois.</text:span></text:p>
          <text:p text:style-name="P87"><text:span text:style-name="T134">– </text:span><text:span text:style-name="T134">Le producteur ajoute un </text:span><text:span text:style-name="T135">(producerId, sequenceNumber)</text:span><text:span text:style-name="T134"> à chaque message</text:span></text:p>
          <text:p text:style-name="P79"><text:span text:style-name="T134">– </text:span><text:span text:style-name="T134">Le broker détecte les doublons → renvoie un </text:span><text:span text:style-name="T135">ack</text:span><text:span text:style-name="T134"> sans recommit</text:span></text:p>
          <text:p text:style-name="P80"><text:span text:style-name="T133">Configuration</text:span></text:p>
          <text:p text:style-name="P76"><text:span text:style-name="T136">– </text:span><text:span text:style-name="T136">enable.idempotence = true</text:span><text:span text:style-name="T134"> <text:s/>active automatiquement :</text:span></text:p>
          <text:p text:style-name="P88"><text:span text:style-name="T137">acks = all</text:span><text:span text:style-name="T138"> <text:s text:c="2"/>· <text:s text:c="2"/></text:span><text:span text:style-name="T137">retries &gt; 0</text:span><text:span text:style-name="T138"> <text:s text:c="2"/>· <text:s text:c="2"/></text:span><text:span text:style-name="T137">max.in.flight ≤ 5</text:span></text:p>
          <text:p text:style-name="P79"><text:span text:style-name="T134">– </text:span><text:span text:style-name="T134">Toute valeur incompatible → </text:span><text:span text:style-name="T136">ConfigException</text:span></text:p>
          <text:p text:style-name="P89"><text:span text:style-name="T134">⇒ <text:s/></text:span><text:span text:style-name="T136">Exactly Once à l’écriture</text:span><text:span text:style-name="T134"> sur une partition donn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17" presentation:class="page"/>
          <draw:frame presentation:style-name="pr39" draw:text-style-name="P78" draw:layer="layout" svg:width="16.799cm" svg:height="13.364cm" svg:x="2.1cm" svg:y="14.107cm" presentation:class="notes" presentation:placeholder="true">
            <draw:text-box/>
          </draw:frame>
        </presentation:notes>
      </draw:page>
      <draw:page draw:name="page118" draw:style-name="dp6" draw:master-page-name="Blank">
        <office:forms form:automatic-focus="false" form:apply-design-mode="false"/>
        <draw:frame draw:name="Picture 6"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1"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1" draw:text-style-name="P71" draw:layer="layout" svg:width="0.249cm" svg:height="0.467cm" svg:x="28.386cm" svg:y="19.739cm">
          <text:p text:style-name="P70"><text:span text:style-name="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2" draw:text-style-name="P73" draw:layer="layout" svg:width="26.729cm" svg:height="1.481cm" svg:x="1.484cm" svg:y="0.979cm">
          <text:p text:style-name="P72"><text:span text:style-name="T139">Consommateur : où placer le comm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3" draw:text-style-name="P84" draw:layer="layout" svg:width="25.541cm" svg:height="11.526cm" svg:x="2.078cm" svg:y="4.759cm">
          <text:p text:style-name="P79"><text:span text:style-name="T129">Lors d’un rebalancing, le consommateur reprend depuis le dernier offset commité. La sémantique dépend du moment où l’offset est commité par rapport au traitement.</text:span></text:p>
          <text:p text:style-name="P76"><text:span text:style-name="T124">– </text:span><text:span text:style-name="T124">Commit </text:span><text:span text:style-name="T126">avant</text:span><text:span text:style-name="T124"> traitement → </text:span><text:span text:style-name="T126">At Most Once</text:span></text:p>
          <text:p text:style-name="P83"><text:span text:style-name="T140">auto-commit avec traitement asynchrone, ou commit manuel avant le traitement</text:span></text:p>
          <text:p text:style-name="P90"><text:span text:style-name="T140">→ </text:span><text:span text:style-name="T140">messages perdus si crash en cours de traitement</text:span></text:p>
          <text:p text:style-name="P76"><text:span text:style-name="T124">– </text:span><text:span text:style-name="T124">Commit </text:span><text:span text:style-name="T126">après</text:span><text:span text:style-name="T124"> traitement → </text:span><text:span text:style-name="T126">At Least Once</text:span></text:p>
          <text:p text:style-name="P83"><text:span text:style-name="T140">auto-commit synchrone (défaut), ou enable.auto.commit = false avec commit explicite</text:span></text:p>
          <text:p text:style-name="P83"><text:span text:style-name="T140">→ </text:span><text:span text:style-name="T140">messages rejoués si crash, à dédupliquer en a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18" presentation:class="page"/>
          <draw:frame presentation:style-name="pr39" draw:text-style-name="P78" draw:layer="layout" svg:width="16.799cm" svg:height="13.364cm" svg:x="2.1cm" svg:y="14.107cm" presentation:class="notes" presentation:placeholder="true">
            <draw:text-box/>
          </draw:frame>
        </presentation:notes>
      </draw:page>
      <draw:page draw:name="page119" draw:style-name="dp6" draw:master-page-name="Blank">
        <office:forms form:automatic-focus="false" form:apply-design-mode="false"/>
        <draw:frame draw:name="Picture 7"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3" draw:style-name="gr4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6" draw:text-style-name="P71" draw:layer="layout" svg:width="0.249cm" svg:height="0.467cm" svg:x="28.386cm" svg:y="19.739cm">
          <text:p text:style-name="P70"><text:span text:style-name="T11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47" draw:text-style-name="P73" draw:layer="layout" svg:width="26.729cm" svg:height="1.65cm" svg:x="1.484cm" svg:y="0.98cm">
          <text:p text:style-name="P72"><text:span text:style-name="T117">Exactly Once : pourquoi c’est d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8" draw:text-style-name="P84" draw:layer="layout" svg:width="25.541cm" svg:height="12.186cm" svg:x="2.078cm" svg:y="4.759cm">
          <text:p text:style-name="P79"><text:span text:style-name="T141">Idempotence du producteur + At Least Once côté consommateur ne suffisent pas dès qu’on chaîne :</text:span></text:p>
          <text:p text:style-name="P91"><text:span text:style-name="T142">consume</text:span><text:span text:style-name="T141"> <text:s/>→ <text:s/></text:span><text:span text:style-name="T142">process</text:span><text:span text:style-name="T141"> <text:s/>→ <text:s/></text:span><text:span text:style-name="T142">produce</text:span><text:span text:style-name="T141"> <text:s/>→ <text:s/></text:span><text:span text:style-name="T142">commit d’offset</text:span></text:p>
          <text:p text:style-name="P76"><text:span text:style-name="T118">Si l’on plante </text:span><text:span text:style-name="T119">entre</text:span><text:span text:style-name="T118"> le </text:span><text:span text:style-name="T143">produce</text:span><text:span text:style-name="T118"> et le </text:span><text:span text:style-name="T143">commit d’offset</text:span><text:span text:style-name="T118"> : au redémarrage on rejoue le message,</text:span></text:p>
          <text:p text:style-name="P79"><text:span text:style-name="T118">et on republie une seconde fois sur le topic de sortie.</text:span></text:p>
          <text:p text:style-name="P92"><text:span text:style-name="T118">⇒ <text:s/></text:span><text:span text:style-name="T118">Il faut rendre les deux écritures </text:span><text:span text:style-name="T119">atomiques</text:span><text:span text:style-name="T118"> : c’est le rôle des </text:span><text:span text:style-name="T121">transactions Kafka</text:span><text:span text:style-name="T1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19" presentation:class="page"/>
          <draw:frame presentation:style-name="pr39" draw:text-style-name="P78" draw:layer="layout" svg:width="16.799cm" svg:height="13.364cm" svg:x="2.1cm" svg:y="14.107cm" presentation:class="notes" presentation:placeholder="true">
            <draw:text-box/>
          </draw:frame>
        </presentation:notes>
      </draw:page>
      <draw:page draw:name="page120" draw:style-name="dp6" draw:master-page-name="Blank">
        <office:forms form:automatic-focus="false" form:apply-design-mode="false"/>
        <draw:frame draw:name="Picture 8"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5" draw:style-name="gr4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9" draw:text-style-name="P71" draw:layer="layout" svg:width="0.249cm" svg:height="0.467cm" svg:x="28.386cm" svg:y="19.739cm">
          <text:p text:style-name="P70"><text:span text:style-name="T11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0" draw:text-style-name="P73" draw:layer="layout" svg:width="26.729cm" svg:height="1.65cm" svg:x="1.484cm" svg:y="0.98cm">
          <text:p text:style-name="P72"><text:span text:style-name="T117">Transactions Kaf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1" draw:text-style-name="P84" draw:layer="layout" svg:width="25.541cm" svg:height="10.699cm" svg:x="2.078cm" svg:y="4.759cm">
          <text:p text:style-name="P79"><text:span text:style-name="T138">Une transaction rend </text:span><text:span text:style-name="T144">atomique</text:span><text:span text:style-name="T138"> l’envoi de plusieurs messages vers plusieurs topics ou partitions.</text:span></text:p>
          <text:p text:style-name="P93"><text:span text:style-name="T145">– </text:span><text:span text:style-name="T145">Préalable : positionner </text:span><text:span text:style-name="T146">transactional.id</text:span><text:span text:style-name="T145"> à une chaîne unique par producteur.</text:span></text:p>
          <text:p text:style-name="P94"><text:span text:style-name="T144">API producteur</text:span></text:p>
          <text:p text:style-name="P83"><text:span text:style-name="T145">1. <text:s/></text:span><text:span text:style-name="T146">initTransactions()</text:span><text:span text:style-name="T145"> <text:s text:c="6"/>2. <text:s/></text:span><text:span text:style-name="T146">beginTransaction()</text:span></text:p>
          <text:p text:style-name="P83"><text:span text:style-name="T145">3. <text:s/>Plusieurs </text:span><text:span text:style-name="T146">send(...)</text:span><text:span text:style-name="T145"> vers différents topics</text:span></text:p>
          <text:p text:style-name="P86"><text:span text:style-name="T145">4. <text:s/></text:span><text:span text:style-name="T146">commitTransaction()</text:span><text:span text:style-name="T145"> <text:s/>ou <text:s/></text:span><text:span text:style-name="T146">abortTransaction()</text:span></text:p>
          <text:p text:style-name="P94"><text:span text:style-name="T144">Côté consommateur</text:span></text:p>
          <text:p text:style-name="P76"><text:span text:style-name="T146">– </text:span><text:span text:style-name="T146">isolation.level = read_committed</text:span><text:span text:style-name="T145"> <text:s/>→ <text:s/>ne lit que les transactions validées</text:span></text:p>
          <text:p text:style-name="P76"><text:span text:style-name="T147">– </text:span><text:span text:style-name="T147">isolation.level = read_uncommitted</text:span><text:span text:style-name="T148"> <text:s/>(défaut) <text:s/>→ <text:s/>lit aussi les non valid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20" presentation:class="page"/>
          <draw:frame presentation:style-name="pr39" draw:text-style-name="P78" draw:layer="layout" svg:width="16.799cm" svg:height="13.364cm" svg:x="2.1cm" svg:y="14.107cm" presentation:class="notes" presentation:placeholder="true">
            <draw:text-box/>
          </draw:frame>
        </presentation:notes>
      </draw:page>
      <draw:page draw:name="page121" draw:style-name="dp6" draw:master-page-name="Blank">
        <office:forms form:automatic-focus="false" form:apply-design-mode="false"/>
        <draw:frame draw:name="Picture 9"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7" draw:style-name="gr4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71" draw:layer="layout" svg:width="0.249cm" svg:height="0.467cm" svg:x="28.386cm" svg:y="19.739cm">
          <text:p text:style-name="P70"><text:span text:style-name="T11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3" draw:text-style-name="P73" draw:layer="layout" svg:width="26.729cm" svg:height="1.396cm" svg:x="1.484cm" svg:y="0.98cm">
          <text:p text:style-name="P72"><text:span text:style-name="T149">Le commit d’offset est un message Kaf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4" draw:text-style-name="P84" draw:layer="layout" svg:width="25.541cm" svg:height="12.9cm" svg:x="2.078cm" svg:y="4.76cm">
          <text:p text:style-name="P79"><text:span text:style-name="T138">Quand un consommateur commite un offset, il écrit en réalité un message dans le topic interne </text:span><text:span text:style-name="T150">__consumer_offsets</text:span><text:span text:style-name="T138">.</text:span></text:p>
          <text:p text:style-name="P87"><text:span text:style-name="T151">– </text:span><text:span text:style-name="T151">Faire avancer un offset = produire un message Kafka.</text:span></text:p>
          <text:p text:style-name="P82"><text:span text:style-name="T151">– </text:span><text:span text:style-name="T151">Donc on peut inclure le commit d’offset </text:span><text:span text:style-name="T152">dans la même transaction</text:span><text:span text:style-name="T151"> que les messages de sortie :</text:span></text:p>
          <text:p text:style-name="P95"><text:span text:style-name="T146">sendOffsetsToTransaction(offsets, consumerGroupId)</text:span></text:p>
          <text:p text:style-name="P96"><text:span text:style-name="T153">Conséquences</text:span></text:p>
          <text:p text:style-name="P82"><text:span text:style-name="T145">– </text:span><text:span text:style-name="T145">Si la transaction est validée : messages de sortie ET progression du consommateur sont visibles ensemble.</text:span></text:p>
          <text:p text:style-name="P75"><text:span text:style-name="T145">– </text:span><text:span text:style-name="T145">Si la transaction est abortée : rien n’est visible et l’offset ne bouge pas → on rejoue proprement.</text:span></text:p>
          <text:p text:style-name="P76"><text:span text:style-name="T154">⇒ <text:s/></text:span><text:span text:style-name="T154">C’est le mécanisme utilisé par </text:span><text:span text:style-name="T155">Kafka Streams</text:span><text:span text:style-name="T154"> avec processing.guarantee = exactly_once_v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21" presentation:class="page"/>
          <draw:frame presentation:style-name="pr39" draw:text-style-name="P78" draw:layer="layout" svg:width="16.799cm" svg:height="13.364cm" svg:x="2.1cm" svg:y="14.107cm" presentation:class="notes" presentation:placeholder="true">
            <draw:text-box/>
          </draw:frame>
        </presentation:notes>
      </draw:page>
      <draw:page draw:name="page122" draw:style-name="dp6" draw:master-page-name="Blank">
        <office:forms form:automatic-focus="false" form:apply-design-mode="false"/>
        <draw:frame draw:name="Picture 10"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9" draw:style-name="gr4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5" draw:text-style-name="P71" draw:layer="layout" svg:width="0.498cm" svg:height="0.467cm" svg:x="28.261cm" svg:y="19.739cm">
          <text:p text:style-name="P70"><text:span text:style-name="T116">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6" draw:text-style-name="P73" draw:layer="layout" svg:width="26.729cm" svg:height="1.65cm" svg:x="1.484cm" svg:y="0.98cm">
          <text:p text:style-name="P72"><text:span text:style-name="T117">Et pour les autres applic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7" draw:text-style-name="P84" draw:layer="layout" svg:width="25.541cm" svg:height="13.849cm" svg:x="2.078cm" svg:y="4.759cm">
          <text:p text:style-name="P79"><text:span text:style-name="T124">Les transactions Kafka ne couvrent que le scénario </text:span><text:span text:style-name="T133">Kafka → Kafka</text:span><text:span text:style-name="T124">.</text:span></text:p>
          <text:p text:style-name="P79"><text:span text:style-name="T129">Dès qu’un consommateur écrit ailleurs — base de données, API, fichier, autre broker — l’EOS sort du périmètre des transactions Kafka.</text:span></text:p>
          <text:p text:style-name="P97"><text:span text:style-name="T124">⇒ <text:s/></text:span><text:span text:style-name="T124">L’</text:span><text:span text:style-name="T133">Exactly Once devient une responsabilité applicative</text:span><text:span text:style-name="T124">.</text:span></text:p>
          <text:p text:style-name="P82"><text:span text:style-name="T129"/></text:p>
          <text:p text:style-name="P82"><text:span text:style-name="T129">Approches typiques :</text:span></text:p>
          <text:list text:style-name="L16">
            <text:list-item>
              <text:list>
                <text:list-item>
                  <text:p text:style-name="P76"><text:span text:style-name="T129">rendre le traitement idempotent (clé naturelle, upsert, opération idempotente)</text:span></text:p>
                </text:list-item>
                <text:list-item>
                  <text:p text:style-name="P76"><text:span text:style-name="T129"><text:s/></text:span><text:span text:style-name="T129">stocker l’offset dans le système cible, dans la même transaction que l’écriture métie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59" draw:layer="layout" svg:width="9.519cm" svg:height="1.216cm" svg:x="1.606cm" svg:y="19.4cm">
          <draw:text-box>
            <text:p><text:span text:style-name="T94">Atelier 4.2 : Exactly Once</text:span></text:p>
          </draw:text-box>
        </draw:frame>
        <presentation:notes draw:style-name="dp8">
          <office:forms form:automatic-focus="false" form:apply-design-mode="false"/>
          <draw:page-thumbnail draw:style-name="gr2" draw:layer="layout" svg:width="14.848cm" svg:height="11.136cm" svg:x="3.075cm" svg:y="2.257cm" draw:page-number="122" presentation:class="page"/>
          <draw:frame presentation:style-name="pr39" draw:text-style-name="P78" draw:layer="layout" svg:width="16.799cm" svg:height="13.364cm" svg:x="2.1cm" svg:y="14.107cm" presentation:class="notes" presentation:placeholder="true">
            <draw:text-box/>
          </draw:frame>
        </presentation:notes>
      </draw:page>
      <draw:page draw:name="page12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Eco-système Kafka</text:span></text:p>
              </text:list-header>
            </text:list>
          </draw:text-box>
        </draw:frame>
        <draw:frame presentation:style-name="pr40"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12">Schema registry</text:span></text:p>
              </text:list-item>
              <text:list-item>
                <text:p text:style-name="P19"><text:span text:style-name="T2">Kafka Connect</text:span></text:p>
              </text:list-item>
              <text:list-item>
                <text:p text:style-name="P19"><text:span text:style-name="T2">MirrorMaker 2</text:span></text:p>
              </text:list-item>
              <text:list-item>
                <text:p text:style-name="P33"><text:span text:style-name="T2">KafkaStream et kSqlDb</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55">Schema Confluent Registry</text:span> qui supporte les formats de sérialisation JSON, Avro et ProtoBuf</text:p>
              </text:list-item>
              <text:list-item>
                <text:p/>
              </text:list-item>
            </text:list>
          </draw:text-box>
        </draw:frame>
        <presentation:notes draw:style-name="dp5">
          <draw:page-thumbnail draw:style-name="gr2" draw:layer="layout" svg:width="15.597cm" svg:height="10.985cm" svg:x="2.623cm" svg:y="2.258cm" draw:page-number="124" presentation:class="page"/>
          <draw:frame presentation:style-name="pr6" draw:text-style-name="P13"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ache Avro</text:p>
          </draw:text-box>
        </draw:frame>
        <draw:frame presentation:style-name="pr5" draw:layer="layout" svg:width="23.499cm" svg:height="12.18cm" svg:x="3.033cm" svg:y="6.283cm" presentation:class="outline" presentation:user-transformed="true">
          <draw:text-box>
            <text:list text:style-name="L2">
              <text:list-item>
                <text:p><text:span text:style-name="T14">Apache Avro</text:span> est un système de sérialisation de données.</text:p>
                <text:list>
                  <text:list-item>
                    <text:p>Il utilise une structure JSON pour définir le <text:span text:style-name="T18">schéma</text:span>, permettant la sérialisation entre les octets et les données structurées.</text:p>
                  </text:list-item>
                  <text:list-item>
                    <text:p>Les outils associés à Avro sont capables de générer les classes Java<text:span text:style-name="T15">1</text:span> <text:s/>correspondantes au schéma.</text:p>
                  </text:list-item>
                </text:list>
              </text:list-item>
            </text:list>
          </draw:text-box>
        </draw:frame>
        <draw:frame draw:style-name="gr59" draw:text-style-name="P20" draw:layer="layout" svg:width="20.39cm" svg:height="1.216cm" svg:x="1.111cm" svg:y="19.447cm">
          <draw:text-box>
            <text:p><text:span text:style-name="T14">1. Avro supporte C, C++, C#, Java, PHP, Python, et Ruby</text:span></text:p>
          </draw:text-box>
        </draw:frame>
        <presentation:notes draw:style-name="dp5">
          <draw:page-thumbnail draw:style-name="gr2" draw:layer="layout" svg:width="15.597cm" svg:height="10.985cm" svg:x="2.623cm" svg:y="2.258cm" draw:page-number="125" presentation:class="page"/>
          <draw:frame presentation:style-name="pr6" draw:text-style-name="P13"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héma Avro</text:p>
          </draw:text-box>
        </draw:frame>
        <draw:frame presentation:style-name="pr5" draw:text-style-name="P98" draw:layer="layout" svg:width="23.499cm" svg:height="12.18cm" svg:x="3.033cm" svg:y="6.283cm" presentation:class="outline">
          <draw:text-box>
            <text:list text:style-name="L2">
              <text:list-item>
                <text:p text:style-name="P98"><text:span text:style-name="T24">{</text:span></text:p>
              </text:list-item>
              <text:list-item>
                <text:p text:style-name="P98"><text:span text:style-name="T24"><text:s text:c="4"/></text:span><text:span text:style-name="T24">"type": "record",</text:span></text:p>
              </text:list-item>
              <text:list-item>
                <text:p text:style-name="P98"><text:span text:style-name="T24"><text:s text:c="4"/></text:span><text:span text:style-name="T24">"name": "Courier",</text:span></text:p>
              </text:list-item>
              <text:list-item>
                <text:p text:style-name="P98"><text:span text:style-name="T24"><text:s text:c="4"/></text:span><text:span text:style-name="T24">"namespace": "org.formation.model",</text:span></text:p>
              </text:list-item>
              <text:list-item>
                <text:p text:style-name="P98"><text:span text:style-name="T24"><text:s text:c="4"/></text:span><text:span text:style-name="T24">"fields": [</text:span></text:p>
              </text:list-item>
              <text:list-item>
                <text:p text:style-name="P98"><text:span text:style-name="T24"><text:s text:c="4"/></text:span><text:span text:style-name="T24">{</text:span></text:p>
              </text:list-item>
              <text:list-item>
                <text:p text:style-name="P98"><text:span text:style-name="T24"><text:s text:c="8"/></text:span><text:span text:style-name="T24">"name": "id",</text:span></text:p>
              </text:list-item>
              <text:list-item>
                <text:p text:style-name="P98"><text:span text:style-name="T24"><text:s text:c="8"/></text:span><text:span text:style-name="T24">"type": "int" },</text:span></text:p>
              </text:list-item>
              <text:list-item>
                <text:p text:style-name="P98"><text:span text:style-name="T24"><text:s text:c="4"/></text:span><text:span text:style-name="T24">{</text:span></text:p>
              </text:list-item>
              <text:list-item>
                <text:p text:style-name="P98"><text:span text:style-name="T24"><text:s text:c="8"/></text:span><text:span text:style-name="T24">"name": "firstName",</text:span></text:p>
              </text:list-item>
              <text:list-item>
                <text:p text:style-name="P98"><text:span text:style-name="T24"><text:s text:c="8"/></text:span><text:span text:style-name="T24">"type": "string" },</text:span></text:p>
              </text:list-item>
              <text:list-item>
                <text:p text:style-name="P98"><text:span text:style-name="T24"><text:s text:c="4"/></text:span><text:span text:style-name="T24">{</text:span></text:p>
              </text:list-item>
              <text:list-item>
                <text:p text:style-name="P98"><text:span text:style-name="T24"><text:s text:c="8"/></text:span><text:span text:style-name="T24">"name": "lastName",</text:span></text:p>
              </text:list-item>
              <text:list-item>
                <text:p text:style-name="P98"><text:span text:style-name="T24"><text:s text:c="8"/></text:span><text:span text:style-name="T24">"type": "string" },</text:span></text:p>
              </text:list-item>
            </text:list>
            <text:p text:style-name="P98"><text:span text:style-name="T24"><text:s text:c="4"/></text:span><text:span text:style-name="T24">{</text:span></text:p>
            <text:p text:style-name="P98"><text:span text:style-name="T24"><text:s text:c="4"/></text:span><text:span text:style-name="T24"><text:tab/></text:span><text:span text:style-name="T24">"name": "position",</text:span></text:p>
            <text:p text:style-name="P98"><text:span text:style-name="T24"><text:s text:c="4"/></text:span><text:span text:style-name="T24"><text:tab/></text:span><text:span text:style-name="T24">"type": [</text:span></text:p>
            <text:p text:style-name="P98"><text:span text:style-name="T24"><text:s text:c="4"/></text:span><text:span text:style-name="T24"><text:tab/></text:span><text:span text:style-name="T24"><text:tab/></text:span><text:span text:style-name="T24">{</text:span></text:p>
            <text:p text:style-name="P98"><text:span text:style-name="T24"><text:s text:c="4"/></text:span><text:span text:style-name="T24"><text:tab/></text:span><text:span text:style-name="T24"><text:tab/></text:span><text:span text:style-name="T24"><text:tab/></text:span><text:span text:style-name="T24"> <text:s/></text:span><text:span text:style-name="T24">"type":</text:span><text:span text:style-name="T24"><text:tab/></text:span><text:span text:style-name="T24">"record",</text:span></text:p>
            <text:p text:style-name="P98"><text:span text:style-name="T24"><text:s text:c="4"/></text:span><text:span text:style-name="T24"><text:tab/></text:span><text:span text:style-name="T24"><text:tab/></text:span><text:span text:style-name="T24"> <text:s/></text:span><text:span text:style-name="T24">"name": "Position",</text:span></text:p>
            <text:p text:style-name="P98"><text:span text:style-name="T24"><text:s text:c="4"/></text:span><text:span text:style-name="T24"><text:tab/></text:span><text:span text:style-name="T24"><text:tab/></text:span><text:span text:style-name="T24"> <text:s/></text:span><text:span text:style-name="T24">"namespace": <text:s/>"org.formation.model",</text:span></text:p>
            <text:p text:style-name="P98"><text:span text:style-name="T24"><text:s text:c="4"/></text:span><text:span text:style-name="T24"><text:tab/></text:span><text:span text:style-name="T24"><text:tab/></text:span><text:span text:style-name="T24"> <text:s/></text:span><text:span text:style-name="T24">"fields": <text:s/>[</text:span></text:p>
            <text:p text:style-name="P98"><text:span text:style-name="T24"><text:s text:c="4"/></text:span><text:span text:style-name="T24"><text:tab/></text:span><text:span text:style-name="T24"><text:tab/></text:span><text:span text:style-name="T24"> <text:s/></text:span><text:span text:style-name="T24">{</text:span></text:p>
            <text:p text:style-name="P98"><text:span text:style-name="T24"><text:s text:c="4"/></text:span><text:span text:style-name="T24"><text:tab/></text:span><text:span text:style-name="T24"><text:tab/></text:span><text:span text:style-name="T24"><text:tab/></text:span><text:span text:style-name="T24"> <text:s text:c="3"/></text:span><text:span text:style-name="T24">"name": "latitude", </text:span></text:p>
            <text:p text:style-name="P98"><text:span text:style-name="T24"><text:s text:c="4"/></text:span><text:span text:style-name="T24"><text:tab/></text:span><text:span text:style-name="T24"><text:tab/></text:span><text:span text:style-name="T24"><text:tab/></text:span><text:span text:style-name="T24"> <text:s text:c="3"/></text:span><text:span text:style-name="T24">"type":</text:span><text:span text:style-name="T24"><text:tab/></text:span><text:span text:style-name="T24">"double" </text:span><text:span text:style-name="T24"><text:tab/></text:span><text:span text:style-name="T24"><text:tab/></text:span><text:span text:style-name="T24">},</text:span></text:p>
            <text:p text:style-name="P98"><text:span text:style-name="T24"><text:s text:c="4"/></text:span><text:span text:style-name="T24"><text:tab/></text:span><text:span text:style-name="T24"><text:tab/></text:span><text:span text:style-name="T24"> <text:s/></text:span><text:span text:style-name="T24">{</text:span></text:p>
            <text:p text:style-name="P98"><text:span text:style-name="T24"><text:s text:c="4"/></text:span><text:span text:style-name="T24"><text:tab/></text:span><text:span text:style-name="T24"><text:tab/></text:span><text:span text:style-name="T24"><text:tab/></text:span><text:span text:style-name="T24"> <text:s text:c="3"/></text:span><text:span text:style-name="T24">"name": "longitude",</text:span></text:p>
            <text:p text:style-name="P98"><text:span text:style-name="T24"><text:s text:c="4"/></text:span><text:span text:style-name="T24"><text:tab/></text:span><text:span text:style-name="T24"><text:tab/></text:span><text:span text:style-name="T24"><text:tab/></text:span><text:span text:style-name="T24"> <text:s text:c="3"/></text:span><text:span text:style-name="T24">"type": "double" </text:span><text:span text:style-name="T24"><text:tab/></text:span><text:span text:style-name="T24"><text:tab/></text:span><text:span text:style-name="T24">} <text:s text:c="4"/></text:span><text:span text:style-name="T24"><text:tab/></text:span><text:span text:style-name="T24"><text:tab/></text:span><text:span text:style-name="T24">] <text:s text:c="4"/></text:span><text:span text:style-name="T24"><text:tab/></text:span><text:span text:style-name="T24"><text:tab/></text:span><text:span text:style-name="T24">} <text:s text:c="4"/></text:span><text:span text:style-name="T24"><text:tab/></text:span><text:span text:style-name="T24">] <text:s text:c="4"/>}] }</text:span></text:p>
          </draw:text-box>
        </draw:frame>
        <presentation:notes draw:style-name="dp9">
          <draw:page-thumbnail draw:style-name="gr2" draw:layer="layout" svg:width="15.597cm" svg:height="10.985cm" svg:x="2.623cm" svg:y="2.258cm" draw:page-number="126" presentation:class="page"/>
          <draw:frame presentation:style-name="pr6" draw:text-style-name="P18"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tilisation du schéma</text:p>
          </draw:text-box>
        </draw:frame>
        <draw:frame presentation:style-name="pr5" draw:layer="layout" svg:width="23.499cm" svg:height="12.18cm" svg:x="3.033cm" svg:y="6.283cm" presentation:class="outline" presentation:user-transformed="true">
          <draw:text-box>
            <text:list text:style-name="L2">
              <text:list-item>
                <text:p><text:span text:style-name="T46">Confluent Schema Registry</text:span> offre une API Rest </text:p>
                <text:list>
                  <text:list-item>
                    <text:p><text:span text:style-name="T2">Permettant</text:span><text:span text:style-name="T74"> de configurer le mode de compatibilité</text:span></text:p>
                  </text:list-item>
                  <text:list-item>
                    <text:p>Permettant de stocker des Schema</text:p>
                  </text:list-item>
                  <text:list-item>
                    <text:p>De détecter les incompatibilités entre schémas<text:line-break/>=&gt; Si le schéma est incompatible, le producteur est empêché de produire vers le topic<text:line-break/>Le nouveau format de message devra être publié vers un autre topic</text:p>
                  </text:list-item>
                </text:list>
              </text:list-item>
              <text:list-item>
                <text:p>Les sérialiseurs inclut l’id du schéma dans les messages et font appel à l’API </text:p>
              </text:list-item>
            </text:list>
          </draw:text-box>
        </draw:frame>
        <presentation:notes draw:style-name="dp9">
          <draw:page-thumbnail draw:style-name="gr2" draw:layer="layout" svg:width="15.597cm" svg:height="10.985cm" svg:x="2.623cm" svg:y="2.258cm" draw:page-number="127" presentation:class="page"/>
          <draw:frame presentation:style-name="pr6" draw:text-style-name="P13" draw:layer="layout" svg:width="14.362cm" svg:height="11.254cm" svg:x="3.25cm" svg:y="14.128cm" presentation:class="notes" presentation:placeholder="true">
            <draw:text-box/>
          </draw:frame>
        </presentation:notes>
      </draw:page>
      <draw:page draw:name="page1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hema Registry</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2.502cm" svg:height="12.723cm" svg:x="3.036cm" svg:y="6.694cm">
          <draw:image xlink:href="Pictures/10000001000003E9000002360842F6F0.png" xlink:type="simple" xlink:show="embed" xlink:actuate="onLoad" draw:mime-type="image/png">
            <text:p/>
          </draw:image>
        </draw:frame>
        <presentation:notes draw:style-name="dp9">
          <draw:page-thumbnail draw:style-name="gr2" draw:layer="layout" svg:width="15.597cm" svg:height="10.985cm" svg:x="2.623cm" svg:y="2.258cm" draw:page-number="128" presentation:class="page"/>
          <draw:frame presentation:style-name="pr6" draw:text-style-name="P13" draw:layer="layout" svg:width="14.362cm" svg:height="11.254cm" svg:x="3.25cm" svg:y="14.128cm" presentation:class="notes" presentation:placeholder="true">
            <draw:text-box/>
          </draw:frame>
        </presentation:notes>
      </draw:page>
      <draw:page draw:name="Modes de compatibilité" draw:style-name="dp6" draw:master-page-name="Vide_5f_">
        <office:forms form:automatic-focus="false" form:apply-design-mode="false"/>
        <draw:frame draw:name="Titre 2" presentation:style-name="pr41" draw:text-style-name="P48" draw:layer="layout" svg:width="23.499cm" svg:height="3.574cm" svg:x="3.033cm" svg:y="2.367cm" presentation:class="title" presentation:user-transformed="true">
          <draw:text-box>
            <text:p text:style-name="P42"><text:span text:style-name="T77">Modes de compatibilité</text:span></text:p>
          </draw:text-box>
        </draw:frame>
        <draw:frame draw:name="Espace réservé du texte 8" presentation:style-name="pr42" draw:text-style-name="P52" draw:layer="layout" svg:width="23.499cm" svg:height="12.18cm" svg:x="3.033cm" svg:y="6.508cm" presentation:class="outline" presentation:user-transformed="true">
          <draw:text-box>
            <text:p text:style-name="P49"><text:span text:style-name="T78">Trois niveaux de compatibilité sont pris en charge par </text:span><text:span text:style-name="T85">Schema Registr</text:span><text:span text:style-name="T78">y :</text:span></text:p>
            <text:list text:style-name="L21">
              <text:list-item>
                <text:p text:style-name="P54"><text:span text:style-name="T156">Compatibilité backward</text:span><text:span text:style-name="T78"> : Tous les messages de la </text:span><text:span text:style-name="T78">version précédente du schéma sont également valides </text:span><text:span text:style-name="T78">selon la nouvelle version</text:span></text:p>
              </text:list-item>
              <text:list-item>
                <text:p text:style-name="P54"><text:span text:style-name="T156">Compatibilité forward</text:span><text:span text:style-name="T78"> : Tous les messages de la </text:span><text:span text:style-name="T78">nouvelle version sont également valides selon la version </text:span><text:span text:style-name="T78">précédente du schéma</text:span></text:p>
              </text:list-item>
              <text:list-item>
                <text:p text:style-name="P54"><text:span text:style-name="T156">Compatibilité full</text:span><text:span text:style-name="T78"> : La version précédente du schéma et </text:span><text:span text:style-name="T78">la nouvelle version sont toutes deux compatibles </text:span><text:span text:style-name="T78">ascendante et descendante</text:span></text:p>
              </text:list-item>
            </text:list>
            <text:p text:style-name="P99"><text:span text:style-name="T78">Les vérifications de compatibilité s’effectuent soit juste avec </text:span><text:span text:style-name="T78">la précédente version, soit avec toutes les versions </text:span><text:span text:style-name="T78">précédentes.</text:span></text:p>
          </draw:text-box>
        </draw:frame>
        <draw:custom-shape draw:name="ZoneTexte 3" draw:style-name="gr60" draw:text-style-name="P101" draw:layer="layout" svg:width="24.405cm" svg:height="0.844cm" svg:x="0.809cm" svg:y="19.581cm">
          <text:p text:style-name="P100"><text:span text:style-name="T157">https://docs.confluent.io/platform/current/schema-registry/fundamentals/schema-evolution.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9">
          <draw:page-thumbnail draw:name="Espace réservé de l'image des diapositives 2" draw:style-name="gr2" draw:layer="layout" svg:width="15.535cm" svg:height="10.984cm" svg:x="2.655cm" svg:y="2.258cm" draw:page-number="129" presentation:class="page"/>
          <draw:frame draw:name="Espace réservé des notes 9" presentation:style-name="pr43" draw:text-style-name="P47" draw:layer="layout" svg:width="14.362cm" svg:height="11.253cm" svg:x="3.25cm" svg:y="14.128cm" presentation:class="notes" presentation:placeholder="true" presentation:user-transformed="true">
            <draw:text-box/>
          </draw:frame>
        </presentation:notes>
      </draw:page>
      <draw:page draw:name="Choix du mode" draw:style-name="dp6" draw:master-page-name="Vide_5f_">
        <office:forms form:automatic-focus="false" form:apply-design-mode="false"/>
        <draw:frame draw:name="Titre 3" presentation:style-name="pr41" draw:text-style-name="P48" draw:layer="layout" svg:width="23.499cm" svg:height="3.574cm" svg:x="3.033cm" svg:y="2.367cm" presentation:class="title" presentation:user-transformed="true">
          <draw:text-box>
            <text:p text:style-name="P42"><text:span text:style-name="T77">Choix du mode</text:span></text:p>
          </draw:text-box>
        </draw:frame>
        <draw:frame draw:name="Espace réservé du texte 9" presentation:style-name="pr42" draw:text-style-name="P52" draw:layer="layout" svg:width="23.499cm" svg:height="12.18cm" svg:x="3.033cm" svg:y="6.283cm" presentation:class="outline" presentation:user-transformed="true">
          <draw:text-box>
            <text:p text:style-name="P102"><text:span text:style-name="T78">La compatibilité backward, configuration par défaut, est à </text:span><text:span text:style-name="T78">privilégier. </text:span></text:p>
            <text:list text:style-name="L13">
              <text:list-item>
                <text:p text:style-name="P103"><text:span text:style-name="T78">Elle permet à un consommateur de lire les anciens </text:span><text:span text:style-name="T78">messages, ce qui est compatible avec la possibilité de </text:span><text:span text:style-name="T78">Kafka de s’abonner à posteriori.</text:span></text:p>
              </text:list-item>
              <text:list-item>
                <text:p text:style-name="P103"><text:span text:style-name="T78">Cependant, cela oblige à upgrader les consommateurs </text:span><text:span text:style-name="T78">en premier afin qu’il s’adapte à la nouvelle version du </text:span><text:span text:style-name="T78">message.</text:span></text:p>
              </text:list-item>
            </text:list>
            <text:p text:style-name="P102"><text:span text:style-name="T78">Avec la compatibilité forward, ce sont les producteurs qui </text:span><text:span text:style-name="T78">sont mis à jour en premier. Par contre, les possibilités de </text:span><text:span text:style-name="T78">mises à jour sont très restrictives pour le producteur.</text:span></text:p>
          </draw:text-box>
        </draw:frame>
        <presentation:notes draw:style-name="dp9">
          <draw:page-thumbnail draw:name="Espace réservé de l'image des diapositives 3" draw:style-name="gr2" draw:layer="layout" svg:width="15.535cm" svg:height="10.984cm" svg:x="2.655cm" svg:y="2.258cm" draw:page-number="130" presentation:class="page"/>
          <draw:frame draw:name="Espace réservé des notes 10" presentation:style-name="pr44" draw:text-style-name="P47" draw:layer="layout" svg:width="14.362cm" svg:height="11.253cm" svg:x="3.25cm" svg:y="14.128cm" presentation:class="notes" presentation:placeholder="true" presentation:user-transformed="true">
            <draw:text-box/>
          </draw:frame>
        </presentation:notes>
      </draw:page>
      <draw:page draw:name="page1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endances Confluent</text:p>
          </draw:text-box>
        </draw:frame>
        <draw:frame presentation:style-name="pr5" draw:text-style-name="P104" draw:layer="layout" svg:width="23.499cm" svg:height="12.18cm" svg:x="3.033cm" svg:y="6.283cm" presentation:class="outline">
          <draw:text-box>
            <text:list text:style-name="L2">
              <text:list-item>
                <text:p text:style-name="P98"><text:span text:style-name="T97">&lt;dependencies&gt;</text:span></text:p>
              </text:list-item>
              <text:list-item>
                <text:p text:style-name="P98"><text:span text:style-name="T97"><text:s text:c="2"/></text:span><text:span text:style-name="T97">&lt;dependency&gt;</text:span></text:p>
              </text:list-item>
              <text:list-item>
                <text:p text:style-name="P98"><text:span text:style-name="T97"><text:s text:c="4"/></text:span><text:span text:style-name="T97">&lt;groupId&gt;io.confluent&lt;/groupId&gt;</text:span></text:p>
              </text:list-item>
              <text:list-item>
                <text:p text:style-name="P98"><text:span text:style-name="T158"><text:s text:c="4"/></text:span><text:span text:style-name="T158">&lt;artifactId&gt;kafka-schema-registry&lt;/artifactId&gt;</text:span></text:p>
              </text:list-item>
              <text:list-item>
                <text:p text:style-name="P98"><text:span text:style-name="T97"><text:s text:c="4"/></text:span><text:span text:style-name="T97">&lt;version&gt;7.2.1&lt;/version&gt;</text:span></text:p>
              </text:list-item>
              <text:list-item>
                <text:p text:style-name="P98"><text:span text:style-name="T97"><text:s text:c="2"/></text:span><text:span text:style-name="T97">&lt;/dependency&gt;</text:span></text:p>
              </text:list-item>
              <text:list-item>
                <text:p text:style-name="P98"><text:span text:style-name="T97"><text:s text:c="2"/></text:span><text:span text:style-name="T97">&lt;dependency&gt;</text:span></text:p>
              </text:list-item>
              <text:list-item>
                <text:p text:style-name="P98"><text:span text:style-name="T97"><text:s text:c="4"/></text:span><text:span text:style-name="T97">&lt;groupId&gt;io.confluent&lt;/groupId&gt;</text:span></text:p>
              </text:list-item>
              <text:list-item>
                <text:p text:style-name="P98"><text:span text:style-name="T158"><text:s text:c="4"/></text:span><text:span text:style-name="T158">&lt;artifactId&gt;kafka-avro-serializer&lt;/artifactId&gt;</text:span></text:p>
              </text:list-item>
              <text:list-item>
                <text:p text:style-name="P98"><text:span text:style-name="T97"><text:s text:c="4"/></text:span><text:span text:style-name="T97">&lt;version&gt;7.2.1&lt;/version&gt;</text:span></text:p>
              </text:list-item>
              <text:list-item>
                <text:p text:style-name="P98"><text:span text:style-name="T97"><text:s text:c="2"/></text:span><text:span text:style-name="T97">&lt;/dependency&gt;</text:span></text:p>
              </text:list-item>
              <text:list-item>
                <text:p text:style-name="P98"><text:span text:style-name="T97">&lt;/dependencies&gt;</text:span></text:p>
              </text:list-item>
              <text:list-item>
                <text:p text:style-name="P98"><text:span text:style-name="T97">&lt;repositories&gt;</text:span></text:p>
              </text:list-item>
              <text:list-item>
                <text:p text:style-name="P98"><text:span text:style-name="T97"><text:s text:c="2"/></text:span><text:span text:style-name="T97">&lt;repository&gt;</text:span></text:p>
              </text:list-item>
              <text:list-item>
                <text:p text:style-name="P98"><text:span text:style-name="T97"><text:s text:c="4"/></text:span><text:span text:style-name="T97">&lt;id&gt;confluent&lt;/id&gt;</text:span></text:p>
              </text:list-item>
              <text:list-item>
                <text:p text:style-name="P98"><text:span text:style-name="T158"><text:s text:c="4"/></text:span><text:span text:style-name="T158">&lt;url&gt;https://packages.confluent.io/maven/&lt;/url&gt;</text:span></text:p>
              </text:list-item>
              <text:list-item>
                <text:p text:style-name="P98"><text:span text:style-name="T97"><text:s text:c="2"/></text:span><text:span text:style-name="T97">&lt;/repository&gt;</text:span></text:p>
              </text:list-item>
              <text:list-item>
                <text:p text:style-name="P98"><text:span text:style-name="T97">&lt;/repositories&gt;</text:span></text:p>
              </text:list-item>
            </text:list>
          </draw:text-box>
        </draw:frame>
        <presentation:notes draw:style-name="dp9">
          <draw:page-thumbnail draw:style-name="gr2" draw:layer="layout" svg:width="15.597cm" svg:height="10.985cm" svg:x="2.623cm" svg:y="2.258cm" draw:page-number="131" presentation:class="page"/>
          <draw:frame presentation:style-name="pr6" draw:text-style-name="P13"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aven plug-in Avro</text:p>
          </draw:text-box>
        </draw:frame>
        <draw:frame presentation:style-name="pr5" draw:layer="layout" svg:width="23.499cm" svg:height="12.18cm" svg:x="3.033cm" svg:y="6.283cm" presentation:class="outline">
          <draw:text-box>
            <text:list text:style-name="L2">
              <text:list-item>
                <text:p text:style-name="P98"><text:span text:style-name="T97"><text:s text:c="5"/></text:span><text:span text:style-name="T97">&lt;plugin&gt;</text:span></text:p>
              </text:list-item>
              <text:list-item>
                <text:p text:style-name="P98"><text:span text:style-name="T97"><text:s text:c="12"/></text:span><text:span text:style-name="T97">&lt;groupId&gt;org.apache.avro&lt;/groupId&gt;</text:span></text:p>
              </text:list-item>
              <text:list-item>
                <text:p text:style-name="P98"><text:span text:style-name="T158"><text:s text:c="12"/></text:span><text:span text:style-name="T158">&lt;artifactId&gt;avro-maven-plugin&lt;/artifactId&gt;</text:span></text:p>
              </text:list-item>
              <text:list-item>
                <text:p text:style-name="P98"><text:span text:style-name="T97"><text:s text:c="12"/></text:span><text:span text:style-name="T97">&lt;version&gt;1.8.2&lt;/version&gt;</text:span></text:p>
              </text:list-item>
              <text:list-item>
                <text:p text:style-name="P98"><text:span text:style-name="T97"><text:s text:c="12"/></text:span><text:span text:style-name="T97">&lt;executions&gt;</text:span></text:p>
              </text:list-item>
              <text:list-item>
                <text:p text:style-name="P98"><text:span text:style-name="T97"><text:s text:c="16"/></text:span><text:span text:style-name="T97">&lt;execution&gt;</text:span></text:p>
              </text:list-item>
              <text:list-item>
                <text:p text:style-name="P98"><text:span text:style-name="T97"><text:s text:c="20"/></text:span><text:span text:style-name="T97">&lt;id&gt;schemas&lt;/id&gt;</text:span></text:p>
              </text:list-item>
              <text:list-item>
                <text:p text:style-name="P98"><text:span text:style-name="T97"><text:s text:c="20"/></text:span><text:span text:style-name="T97">&lt;phase&gt;generate-sources&lt;/phase&gt;</text:span></text:p>
              </text:list-item>
              <text:list-item>
                <text:p text:style-name="P98"><text:span text:style-name="T97"><text:s text:c="20"/></text:span><text:span text:style-name="T97">&lt;goals&gt;</text:span></text:p>
              </text:list-item>
              <text:list-item>
                <text:p text:style-name="P98"><text:span text:style-name="T158"><text:s text:c="24"/></text:span><text:span text:style-name="T158">&lt;goal&gt;schema&lt;/goal&gt;</text:span></text:p>
              </text:list-item>
              <text:list-item>
                <text:p text:style-name="P98"><text:span text:style-name="T97"><text:s text:c="24"/></text:span><text:span text:style-name="T97">&lt;goal&gt;protocol&lt;/goal&gt;</text:span></text:p>
              </text:list-item>
              <text:list-item>
                <text:p text:style-name="P98"><text:span text:style-name="T97"><text:s text:c="24"/></text:span><text:span text:style-name="T97">&lt;goal&gt;idl-protocol&lt;/goal&gt;</text:span></text:p>
              </text:list-item>
              <text:list-item>
                <text:p text:style-name="P98"><text:span text:style-name="T97"><text:s text:c="20"/></text:span><text:span text:style-name="T97">&lt;/goals&gt;</text:span></text:p>
              </text:list-item>
              <text:list-item>
                <text:p text:style-name="P98"><text:span text:style-name="T97"><text:s text:c="20"/></text:span><text:span text:style-name="T97">&lt;configuration&gt; <text:s text:c="16"/></text:span><text:span text:style-name="T97"><text:s text:c="7"/></text:span></text:p>
              </text:list-item>
              <text:list-item>
                <text:p text:style-name="P98"><text:span text:style-name="T97"><text:s text:c="21"/></text:span><text:span text:style-name="T97">&lt;sourceDirectory&gt;./src/main/resources/&lt;/sourceDir</text:span><text:span text:style-name="T97">ectory&gt;</text:span></text:p>
              </text:list-item>
              <text:list-item>
                <text:p text:style-name="P98"><text:span text:style-name="T97"><text:s text:c="24"/></text:span><text:span text:style-name="T97">&lt;outputDirectory&gt;./src/main/java/&lt;/outputDirector</text:span><text:span text:style-name="T97">y&gt;</text:span></text:p>
              </text:list-item>
              <text:list-item>
                <text:p text:style-name="P98"><text:span text:style-name="T97"><text:s text:c="20"/></text:span><text:span text:style-name="T97">&lt;/configuration&gt;</text:span></text:p>
              </text:list-item>
              <text:list-item>
                <text:p text:style-name="P98"><text:span text:style-name="T97"><text:s text:c="16"/></text:span><text:span text:style-name="T97">&lt;/execution&gt;</text:span></text:p>
              </text:list-item>
              <text:list-item>
                <text:p text:style-name="P98"><text:span text:style-name="T97"><text:s text:c="12"/></text:span><text:span text:style-name="T97">&lt;/executions&gt;</text:span></text:p>
              </text:list-item>
              <text:list-item>
                <text:p text:style-name="P98"><text:span text:style-name="T97"><text:s text:c="8"/></text:span><text:span text:style-name="T97">&lt;/plugin&gt;</text:span></text:p>
              </text:list-item>
              <text:list-item>
                <text:p text:style-name="P98"><text:span text:style-name="T97"/></text:p>
              </text:list-item>
              <text:list-item>
                <text:p><text:span text:style-name="T159">=&gt; </text:span><text:span text:style-name="T160">mvn compile</text:span><text:span text:style-name="T159"> génère les classes du </text:span><text:span text:style-name="T159">modèle</text:span></text:p>
              </text:list-item>
            </text:list>
          </draw:text-box>
        </draw:frame>
        <presentation:notes draw:style-name="dp9">
          <draw:page-thumbnail draw:style-name="gr2" draw:layer="layout" svg:width="15.597cm" svg:height="10.985cm" svg:x="2.623cm" svg:y="2.258cm" draw:page-number="132" presentation:class="page"/>
          <draw:frame presentation:style-name="pr6" draw:text-style-name="P13"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1)</text:p>
          </draw:text-box>
        </draw:frame>
        <draw:frame presentation:style-name="pr5" draw:layer="layout" svg:width="23.499cm" svg:height="12.18cm" svg:x="3.033cm" svg:y="6.283cm" presentation:class="outline" presentation:user-transformed="true">
          <draw:text-box>
            <text:list text:style-name="L2">
              <text:list-item>
                <text:p>Le producteur de message peut contenir du code permettant d’enregistrer le schéma en utilisant la librairie cliente de <text:span text:style-name="T14">Schema Registry</text:span></text:p>
              </text:list-item>
              <text:list-item>
                <text:p/>
              </text:list-item>
            </text:list>
            <text:p text:style-name="P105"><text:span text:style-name="T161">// Lecture du schéma</text:span></text:p>
            <text:p text:style-name="P105"><text:span text:style-name="T162">Schema avroSchema = </text:span><text:span text:style-name="T163">new</text:span><text:span text:style-name="T162"> Schema.Parser().parse(inputStream);</text:span></text:p>
            <text:p text:style-name="P105"><text:span text:style-name="T161">// Instanciation du client</text:span></text:p>
            <text:p text:style-name="P105"><text:span text:style-name="T162">CachedSchemaRegistryClient client = </text:span><text:span text:style-name="T163">new</text:span><text:span text:style-name="T162"> CachedSchemaRegistryClient(REGISTRY_URL, 20);</text:span></text:p>
            <text:p text:style-name="P105"><text:span text:style-name="T161">// Enregistrement du sujet, le nom correspond au nom du topic + suffixe </text:span></text:p>
            <text:p><text:span text:style-name="T164">client.register(topicName +"-value", </text:span><text:span text:style-name="T165">new</text:span><text:span text:style-name="T166"> AvroSchema(</text:span><text:span text:style-name="T167">avroSchema</text:span><text:span text:style-name="T164">);</text:span></text:p>
          </draw:text-box>
        </draw:frame>
        <presentation:notes draw:style-name="dp9">
          <draw:page-thumbnail draw:style-name="gr2" draw:layer="layout" svg:width="15.597cm" svg:height="10.985cm" svg:x="2.623cm" svg:y="2.258cm" draw:page-number="133" presentation:class="page"/>
          <draw:frame presentation:style-name="pr6" draw:text-style-name="P13"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2)</text:p>
          </draw:text-box>
        </draw:frame>
        <draw:frame presentation:style-name="pr5" draw:layer="layout" svg:width="23.499cm" svg:height="12.18cm" svg:x="3.033cm" svg:y="6.283cm" presentation:class="outline">
          <draw:text-box>
            <text:list text:style-name="L2">
              <text:list-item>
                <text:p>Les propriétés du <text:span text:style-name="T14">KafkaProducer</text:span> doivent contenir :</text:p>
                <text:list>
                  <text:list-item>
                    <text:p><text:span text:style-name="T93">schema.registry.url</text:span> :<text:line-break/> L’adresse du serveur de registry</text:p>
                  </text:list-item>
                  <text:list-item>
                    <text:p>Le sérialiseur de valeur :<text:line-break/><text:span text:style-name="T168">io.confluent.kafka.serializers.KafkaAvroSerializer</text:span></text:p>
                  </text:list-item>
                </text:list>
              </text:list-item>
            </text:list>
          </draw:text-box>
        </draw:frame>
        <presentation:notes draw:style-name="dp9">
          <draw:page-thumbnail draw:style-name="gr2" draw:layer="layout" svg:width="15.597cm" svg:height="10.985cm" svg:x="2.623cm" svg:y="2.258cm" draw:page-number="134" presentation:class="page"/>
          <draw:frame presentation:style-name="pr6" draw:text-style-name="P13" draw:layer="layout" svg:width="14.362cm" svg:height="11.254cm" svg:x="3.25cm" svg:y="14.128cm" presentation:class="notes" presentation:placeholder="true">
            <draw:text-box/>
          </draw:frame>
        </presentation:notes>
      </draw:page>
      <draw:page draw:name="page1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text:span text:style-name="T14">KafkaConsumer</text:span> doit également préciser l’URL et le désérialiseur à <text:line-break/><text:span text:style-name="T169">io.confluent.kafka.serializers.KafkaAvroDeserializer</text:span></text:p>
              </text:list-item>
              <text:list-item>
                <text:p>Il peut récupérer les messages sous la forme de <text:span text:style-name="T93">GenericRecord</text:span> plutôt que des classes spécialisés.</text:p>
              </text:list-item>
              <text:list-item>
                <text:p text:style-name="P98"><text:span text:style-name="T170">ConsumerRecords&lt;String, GenericRecord&gt; records</text:span><text:span text:style-name="T171"> = consumer.poll(Duration.ofMillis(sleep));</text:span></text:p>
              </text:list-item>
              <text:list-item>
                <text:p text:style-name="P98"><text:span text:style-name="T171">for (ConsumerRecord&lt;String, GenericRecord&gt; record : records) {</text:span></text:p>
              </text:list-item>
              <text:list-item>
                <text:p text:style-name="P98"><text:span text:style-name="T171"><text:s text:c="2"/></text:span><text:span text:style-name="T171">System.out.println("Value is " + </text:span><text:span text:style-name="T170">record.value()</text:span><text:span text:style-name="T171">);</text:span></text:p>
              </text:list-item>
            </text:list>
          </draw:text-box>
        </draw:frame>
        <draw:frame draw:style-name="gr61" draw:text-style-name="P59" draw:layer="layout" svg:width="12.796cm" svg:height="1.216cm" svg:x="1.603cm" svg:y="19.4cm">
          <draw:text-box>
            <text:p><text:span text:style-name="T94">Atelier 5 : Schema Registry et Avro</text:span></text:p>
          </draw:text-box>
        </draw:frame>
        <presentation:notes draw:style-name="dp9">
          <draw:page-thumbnail draw:style-name="gr2" draw:layer="layout" svg:width="15.597cm" svg:height="10.985cm" svg:x="2.623cm" svg:y="2.258cm" draw:page-number="135" presentation:class="page"/>
          <draw:frame presentation:style-name="pr6" draw:text-style-name="P13" draw:layer="layout" svg:width="14.362cm" svg:height="11.254cm" svg:x="3.25cm" svg:y="14.128cm" presentation:class="notes" presentation:placeholder="true">
            <draw:text-box/>
          </draw:frame>
        </presentation:notes>
      </draw:page>
      <draw:page draw:name="page136"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Eco-système Kafka</text:span></text:p>
              </text:list-header>
            </text:list>
          </draw:text-box>
        </draw:frame>
        <draw:frame presentation:style-name="pr45"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Schema registry</text:span></text:p>
              </text:list-item>
              <text:list-item>
                <text:p text:style-name="P19"><text:span text:style-name="T12">Kafka Connect</text:span></text:p>
              </text:list-item>
              <text:list-item>
                <text:p text:style-name="P19"><text:span text:style-name="T2">MirrorMaker 2</text:span></text:p>
              </text:list-item>
              <text:list-item>
                <text:p text:style-name="P33"><text:span text:style-name="T2">KafkaStream et kSqlDb</text:span></text:p>
              </text:list-item>
              <text:list-item>
                <text:p text:style-name="P3"><text:span text:style-name="T13"/></text:p>
              </text:list-item>
            </text:list>
          </draw:text-box>
        </draw:frame>
        <presentation:notes draw:style-name="dp10">
          <office:forms form:automatic-focus="false" form:apply-design-mode="false"/>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36">Kafka Connect</text:span> permet d’intégrer Apache Kafka avec d’autres systèmes en utilisant des connecteurs. </text:p>
                <text:list>
                  <text:list-header>
                    <text:p>=&gt; Ingérer des bases de données volumineuses, des données de monitoring dans des topics avec des latences minimales</text:p>
                    <text:p>=&gt; Exporter des topics vers des supports persistants</text:p>
                  </text:list-header>
                </text:list>
              </text:list-item>
              <text:list-item>
                <text:p>Kafka Connect est également utilisé dans <text:span text:style-name="T55">Kafka Mirrors 2</text:span> pour répliquer les données d’un cluster vers un autre cluster</text:p>
              </text:list-item>
            </text:list>
          </draw:text-box>
        </draw:frame>
        <presentation:notes draw:style-name="dp5">
          <draw:page-thumbnail draw:style-name="gr2" draw:layer="layout" svg:width="15.597cm" svg:height="10.985cm" svg:x="2.623cm" svg:y="2.258cm" draw:page-number="137" presentation:class="page"/>
          <draw:frame presentation:style-name="pr6" draw:text-style-name="P13"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draw:text-box>
            <text:list text:style-name="L3">
              <text:list-item>
                <text:p>Un cadre commun pour les connecteurs qui standardisent l’intégration</text:p>
              </text:list-item>
              <text:list-item>
                <text:p>Mode distribué ou standalone</text:p>
              </text:list-item>
              <text:list-item>
                <text:p>Une interface REST permettant de gérer facilement les connecteurs</text:p>
              </text:list-item>
              <text:list-item>
                <text:p>Gestion automatique des offsets</text:p>
              </text:list-item>
              <text:list-item>
                <text:p>Distribué et scalable : Possibilité de scaler les workers, basé sur la gestion de groupe <text:s/></text:p>
              </text:list-item>
              <text:list-item>
                <text:p>Intégration vers les systèmes de streaming ou batch</text:p>
              </text:list-item>
            </text:list>
          </draw:text-box>
        </draw:frame>
        <presentation:notes draw:style-name="dp5">
          <draw:page-thumbnail draw:style-name="gr2" draw:layer="layout" svg:width="15.597cm" svg:height="10.985cm" svg:x="2.623cm" svg:y="2.258cm" draw:page-number="138" presentation:class="page"/>
          <draw:frame presentation:style-name="pr6" draw:text-style-name="P13"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standalone</text:p>
          </draw:text-box>
        </draw:frame>
        <draw:frame presentation:style-name="pr5" draw:layer="layout" svg:width="23.499cm" svg:height="12.18cm" svg:x="3.033cm" svg:y="6.283cm" presentation:class="outline">
          <draw:text-box>
            <text:list text:style-name="L2">
              <text:list-item>
                <text:p>Pour démarrer <text:span text:style-name="T14">Kafka Connect</text:span> en mode standalone </text:p>
              </text:list-item>
              <text:list-item>
                <text:p><text:span text:style-name="T172">&gt; bin/connect-standalone.sh config/connect-standalone.properties </text:span><text:span text:style-name="T172">connector1.properties [connector2.properties …]</text:span></text:p>
              </text:list-item>
              <text:list-item>
                <text:p text:style-name="P61"/>
              </text:list-item>
              <text:list-item>
                <text:p text:style-name="P61">Le premier paramètre contient la configuration pour le worker. Il inclut entre autres :</text:p>
                <text:list>
                  <text:list-item>
                    <text:p text:style-name="P61"><text:span text:style-name="T36">bootstrap.servers</text:span></text:p>
                  </text:list-item>
                  <text:list-item>
                    <text:p text:style-name="P61"><text:span text:style-name="T36">key.converter, value.converter</text:span></text:p>
                  </text:list-item>
                  <text:list-item>
                    <text:p text:style-name="P61"><text:span text:style-name="T36">offset.storage.file.filename</text:span> : Fichier pour stocker les offsets</text:p>
                  </text:list-item>
                  <text:list-item>
                    <text:p text:style-name="P61"><text:span text:style-name="T36">plugin.path : </text:span><text:span text:style-name="T44">Une liste de chemins qui contiennent les plugins </text:span><text:span text:style-name="T44">KafkaConnect (connecteurs, convertisseurs, </text:span><text:span text:style-name="T44">transformations).</text:span></text:p>
                  </text:list-item>
                </text:list>
              </text:list-item>
              <text:list-item>
                <text:p text:style-name="P61">Les autres paramètres définissent les configurations des différents connecteurs</text:p>
              </text:list-item>
              <text:list-item>
                <text:p/>
              </text:list-item>
              <text:list-item>
                <text:p/>
              </text:list-item>
            </text:list>
          </draw:text-box>
        </draw:frame>
        <presentation:notes draw:style-name="dp5">
          <draw:page-thumbnail draw:style-name="gr2" draw:layer="layout" svg:width="15.597cm" svg:height="10.985cm" svg:x="2.623cm" svg:y="2.258cm" draw:page-number="139" presentation:class="page"/>
          <draw:frame presentation:style-name="pr6" draw:text-style-name="P13"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distribué</text:p>
          </draw:text-box>
        </draw:frame>
        <draw:frame presentation:style-name="pr5" draw:layer="layout" svg:width="23.499cm" svg:height="12.18cm" svg:x="3.033cm" svg:y="6.283cm" presentation:class="outline">
          <draw:text-box>
            <text:list text:style-name="L2">
              <text:list-item>
                <text:p>Le mode distribué gère le scaling dynamique et offre la tolérance aux pannes </text:p>
              </text:list-item>
              <text:list-item>
                <text:p>Pour démarrer en mode distribué :</text:p>
              </text:list-item>
              <text:list-item>
                <text:p><text:span text:style-name="T173">&gt; bin/connect-distributed.sh </text:span><text:span text:style-name="T173"><text:line-break/></text:span><text:span text:style-name="T173"> <text:s/>config/connect-distributed.properties</text:span></text:p>
              </text:list-item>
              <text:list-item>
                <text:p>En mode distribué, <text:span text:style-name="T14">Kafka Connect</text:span> stocke les offsets, les configuration et les statuts des taches dans des topics.</text:p>
                <text:list>
                  <text:list-item>
                    <text:p>Pour contrôler, le nombre de partitions et le facteur de réplication utilisés, il est recommandé de créer manuellement ces topics</text:p>
                  </text:list-item>
                </text:list>
              </text:list-item>
            </text:list>
          </draw:text-box>
        </draw:frame>
        <presentation:notes draw:style-name="dp5">
          <draw:page-thumbnail draw:style-name="gr2" draw:layer="layout" svg:width="15.597cm" svg:height="10.985cm" svg:x="2.623cm" svg:y="2.258cm" draw:page-number="140" presentation:class="page"/>
          <draw:frame presentation:style-name="pr6" draw:text-style-name="P13"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4">Configurations supplémentaires en mode distribué</text:span></text:p>
          </draw:text-box>
        </draw:frame>
        <draw:frame presentation:style-name="pr5" draw:layer="layout" svg:width="23.499cm" svg:height="12.18cm" svg:x="3.033cm" svg:y="6.283cm" presentation:class="outline" presentation:user-transformed="true">
          <draw:text-box>
            <text:list text:style-name="L2">
              <text:list-item>
                <text:p><text:span text:style-name="T36">group.id</text:span> (<text:span text:style-name="T14">connect-cluster</text:span> par défaut) : nom unique pour former le groupe </text:p>
              </text:list-item>
              <text:list-item>
                <text:p><text:span text:style-name="T36">config.storage.topic</text:span> (<text:span text:style-name="T14">connect-configs</text:span> par défaut) : <text:span text:style-name="T14">topic</text:span> utilisé pour stocker la configuration. <text:line-break/><text:span text:style-name="T174">Doit s'agir d'une rubrique à partition unique, hautement répliquée et </text:span><text:span text:style-name="T174">compactée</text:span><text:span text:style-name="T175">.</text:span><text:span text:style-name="T175"><text:line-break/></text:span> </text:p>
              </text:list-item>
              <text:list-item>
                <text:p><text:span text:style-name="T36">offset.storage.topic</text:span> (<text:span text:style-name="T14">connect-offsets</text:span> par défaut) : <text:span text:style-name="T14">topic</text:span> utilisé pour stocker les offsets; <text:line-break/><text:span text:style-name="T27">Doit avoir de nombreuses partitions, être répliquée et être configurée pour le </text:span><text:span text:style-name="T27">compactage</text:span><text:span text:style-name="T27"><text:line-break/></text:span><text:span text:style-name="T27"/></text:p>
              </text:list-item>
              <text:list-item>
                <text:p><text:span text:style-name="T36">status.storage.topic</text:span> (<text:span text:style-name="T14">connect-status</text:span> par défaut) : topic utilisé pour stocker les états; <text:line-break/><text:span text:style-name="T27">Peut</text:span><text:span text:style-name="T5"> </text:span><text:span text:style-name="T27">avoir plusieurs partitions et doit être répliquée et configurée pour le </text:span><text:span text:style-name="T27">compactage</text:span></text:p>
              </text:list-item>
            </text:list>
          </draw:text-box>
        </draw:frame>
        <presentation:notes draw:style-name="dp5">
          <draw:page-thumbnail draw:style-name="gr2" draw:layer="layout" svg:width="15.597cm" svg:height="10.985cm" svg:x="2.623cm" svg:y="2.258cm" draw:page-number="141" presentation:class="page"/>
          <draw:frame presentation:style-name="pr6" draw:text-style-name="P13"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des connecteurs</text:p>
          </draw:text-box>
        </draw:frame>
        <draw:frame presentation:style-name="pr5" draw:layer="layout" svg:width="23.499cm" svg:height="12.18cm" svg:x="3.033cm" svg:y="6.283cm" presentation:class="outline">
          <draw:text-box>
            <text:list text:style-name="L2">
              <text:list-header>
                <text:p>Configuration :</text:p>
                <text:list>
                  <text:list-item>
                    <text:p>En mode standalone, via un fichier <text:span text:style-name="T14">.properties</text:span></text:p>
                  </text:list-item>
                  <text:list-item>
                    <text:p>En mode distribué, via une API Rest .</text:p>
                  </text:list-item>
                </text:list>
              </text:list-header>
              <text:list-item>
                <text:p>Les valeurs sont très dépendantes du type de connecteur. </text:p>
              </text:list-item>
              <text:list-item>
                <text:p>Comme valeur communes, on peut citer :</text:p>
                <text:list>
                  <text:list-item>
                    <text:p><text:span text:style-name="T36">name </text:span>: Nom unique.</text:p>
                  </text:list-item>
                  <text:list-item>
                    <text:p><text:span text:style-name="T36">connector.class</text:span> : Classe Java du connecteur</text:p>
                  </text:list-item>
                  <text:list-item>
                    <text:p><text:span text:style-name="T36">tasks.max</text:span> : Maximum de tâches créés pour le connecteur. (degré de parallélisme)</text:p>
                  </text:list-item>
                  <text:list-item>
                    <text:p><text:span text:style-name="T36">key.converter</text:span>, <text:span text:style-name="T36">value.converter</text:span></text:p>
                  </text:list-item>
                  <text:list-item>
                    <text:p><text:span text:style-name="T176">topics, </text:span><text:span text:style-name="T36">topics.regex, topic.prefix : </text:span><text:span text:style-name="T44">Liste, expression </text:span><text:span text:style-name="T44">régulière ou gabarit spécifiant les topics </text:span></text:p>
                  </text:list-item>
                </text:list>
              </text:list-item>
            </text:list>
          </draw:text-box>
        </draw:frame>
        <presentation:notes draw:style-name="dp5">
          <draw:page-thumbnail draw:style-name="gr2" draw:layer="layout" svg:width="15.597cm" svg:height="10.985cm" svg:x="2.623cm" svg:y="2.258cm" draw:page-number="142" presentation:class="page"/>
          <draw:frame presentation:style-name="pr6" draw:text-style-name="P13"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necteurs</text:p>
          </draw:text-box>
        </draw:frame>
        <draw:frame presentation:style-name="pr5" draw:layer="layout" svg:width="23.499cm" svg:height="12.18cm" svg:x="3.033cm" svg:y="6.283cm" presentation:class="outline">
          <draw:text-box>
            <text:list text:style-name="L2">
              <text:list-item>
                <text:p><text:span text:style-name="T14">Confluent</text:span> offre de nombreux connecteurs<text:span text:style-name="T177">1</text:span> :</text:p>
                <text:list>
                  <text:list-item>
                    <text:p>Active MQ Source Connector</text:p>
                  </text:list-item>
                  <text:list-item>
                    <text:p>Amazon S3 Sink Connector</text:p>
                  </text:list-item>
                  <text:list-item>
                    <text:p>Elasticsearch Sink Connector</text:p>
                  </text:list-item>
                  <text:list-item>
                    <text:p>FileStream Connector (Development and Testing)</text:p>
                  </text:list-item>
                  <text:list-item>
                    <text:p>IBM MQ Source Connector</text:p>
                  </text:list-item>
                  <text:list-item>
                    <text:p>JDBC Connector (Source et Sink)</text:p>
                  </text:list-item>
                  <text:list-item>
                    <text:p>JMS Source Connector</text:p>
                  </text:list-item>
                  <text:list-item>
                    <text:p>...</text:p>
                  </text:list-item>
                </text:list>
              </text:list-item>
              <text:list-item>
                <text:p>De nombreux éditeurs fournissent également leur connecteurs Kafka (Amazon, Azure, Google, Salesforce, TIBCO, MongoDB, ...)</text:p>
              </text:list-item>
            </text:list>
          </draw:text-box>
        </draw:frame>
        <draw:frame draw:style-name="gr62" draw:text-style-name="P20" draw:layer="layout" svg:width="15.433cm" svg:height="1.056cm" svg:x="1.455cm" svg:y="19.446cm">
          <draw:text-box>
            <text:p><text:span text:style-name="T17">1. https://www.confluent.io/fr-fr/product/connectors/</text:span></text:p>
          </draw:text-box>
        </draw:frame>
        <presentation:notes draw:style-name="dp5">
          <draw:page-thumbnail draw:style-name="gr2" draw:layer="layout" svg:width="15.597cm" svg:height="10.985cm" svg:x="2.623cm" svg:y="2.258cm" draw:page-number="143" presentation:class="page"/>
          <draw:frame presentation:style-name="pr6" draw:text-style-name="P13"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Connecteur JDBC</text:p>
          </draw:text-box>
        </draw:frame>
        <draw:frame presentation:style-name="pr5" draw:text-style-name="P106" draw:layer="layout" svg:width="23.499cm" svg:height="12.18cm" svg:x="3.033cm" svg:y="6.283cm" presentation:class="outline" presentation:user-transformed="true">
          <draw:text-box>
            <text:list text:style-name="L2">
              <text:list-item>
                <text:p text:style-name="P98"><text:span text:style-name="T178">name=mysql-whitelist-timestamp-source</text:span></text:p>
              </text:list-item>
              <text:list-item>
                <text:p text:style-name="P98"><text:span text:style-name="T178">connector.class=io.confluent.connect.jdbc.JdbcSourceConnector</text:span></text:p>
              </text:list-item>
              <text:list-item>
                <text:p text:style-name="P98"><text:span text:style-name="T178">tasks.max=10</text:span></text:p>
              </text:list-item>
              <text:list-item>
                <text:p text:style-name="P98"><text:span text:style-name="T178"/></text:p>
              </text:list-item>
              <text:list-item>
                <text:p text:style-name="P98"><text:span text:style-name="T178">connection.url=jdbc:mysql://mysql.example.com:3306/my_database?user=alice&amp;password=secret</text:span></text:p>
              </text:list-item>
              <text:list-item>
                <text:p text:style-name="P98"><text:span text:style-name="T178">table.whitelist=users,products,transactions</text:span></text:p>
              </text:list-item>
              <text:list-item>
                <text:p text:style-name="P98"><text:span text:style-name="T179"/></text:p>
              </text:list-item>
              <text:list-item>
                <text:p text:style-name="P98"><text:span text:style-name="T179"># Pour détecter les nouveaux enregistrements</text:span></text:p>
              </text:list-item>
              <text:list-item>
                <text:p text:style-name="P98"><text:span text:style-name="T178">mode=timestamp+incrementing</text:span></text:p>
              </text:list-item>
              <text:list-item>
                <text:p text:style-name="P98"><text:span text:style-name="T178">timestamp.column.name=modified</text:span></text:p>
              </text:list-item>
              <text:list-item>
                <text:p text:style-name="P98"><text:span text:style-name="T178">incrementing.column.name=id</text:span></text:p>
              </text:list-item>
              <text:list-item>
                <text:p text:style-name="P98"><text:span text:style-name="T180"/></text:p>
              </text:list-item>
              <text:list-item>
                <text:p text:style-name="P98"><text:span text:style-name="T178">topic.prefix=mysql-</text:span></text:p>
              </text:list-item>
            </text:list>
          </draw:text-box>
        </draw:frame>
        <presentation:notes draw:style-name="dp5">
          <draw:page-thumbnail draw:style-name="gr2" draw:layer="layout" svg:width="15.597cm" svg:height="10.985cm" svg:x="2.623cm" svg:y="2.258cm" draw:page-number="144" presentation:class="page"/>
          <draw:frame presentation:style-name="pr6" draw:text-style-name="P13"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ransformations</text:p>
          </draw:text-box>
        </draw:frame>
        <draw:frame presentation:style-name="pr5" draw:layer="layout" svg:width="23.499cm" svg:height="12.18cm" svg:x="3.033cm" svg:y="6.283cm" presentation:class="outline">
          <draw:text-box>
            <text:list text:style-name="L2">
              <text:list-item>
                <text:p text:style-name="P11">Une chaîne de transformation, s’appuyant sur des <text:span text:style-name="T181">transformers</text:span> prédéfinis, est spécifiée dans la configuration d’un connecteur.</text:p>
                <text:list>
                  <text:list-item>
                    <text:p><text:span text:style-name="T36">transforms </text:span>: Liste d’aliases spécifiant la séquence des transformations</text:p>
                  </text:list-item>
                  <text:list-item>
                    <text:p><text:span text:style-name="T36">transforms.$alias.type</text:span> : La classe utilisée pour la transformation.</text:p>
                  </text:list-item>
                  <text:list-item>
                    <text:p><text:span text:style-name="T36">transforms.$alias.$transformationSpecificConfig</text:span> : Propriété spécifique d’un <text:span text:style-name="T14">Transformer</text:span></text:p>
                  </text:list-item>
                </text:list>
              </text:list-item>
            </text:list>
          </draw:text-box>
        </draw:frame>
        <presentation:notes draw:style-name="dp5">
          <draw:page-thumbnail draw:style-name="gr2" draw:layer="layout" svg:width="15.597cm" svg:height="10.985cm" svg:x="2.623cm" svg:y="2.258cm" draw:page-number="145" presentation:class="page"/>
          <draw:frame presentation:style-name="pr6" draw:text-style-name="P13"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de configuration</text:p>
          </draw:text-box>
        </draw:frame>
        <draw:frame presentation:style-name="pr5" draw:text-style-name="P106" draw:layer="layout" svg:width="23.499cm" svg:height="12.18cm" svg:x="3.033cm" svg:y="6.283cm" presentation:class="outline">
          <draw:text-box>
            <text:list text:style-name="L2">
              <text:list-item>
                <text:p text:style-name="P98"><text:span text:style-name="T182">name=local-file-source</text:span></text:p>
              </text:list-item>
              <text:list-item>
                <text:p text:style-name="P98"><text:span text:style-name="T182">connector.class=FileStreamSource</text:span></text:p>
              </text:list-item>
              <text:list-item>
                <text:p text:style-name="P98"><text:span text:style-name="T182">tasks.max=1</text:span></text:p>
              </text:list-item>
              <text:list-item>
                <text:p text:style-name="P98"><text:span text:style-name="T182">file=test.txt</text:span></text:p>
              </text:list-item>
              <text:list-item>
                <text:p text:style-name="P98"><text:span text:style-name="T183"># Un sink défini un topic de destination</text:span></text:p>
              </text:list-item>
              <text:list-item>
                <text:p text:style-name="P98"><text:span text:style-name="T182">topic=connect-test</text:span></text:p>
              </text:list-item>
              <text:list-item>
                <text:p text:style-name="P98"><text:span text:style-name="T183"># 2 transformers nommés MakeMap et InsertSource</text:span></text:p>
              </text:list-item>
              <text:list-item>
                <text:p text:style-name="P98"><text:span text:style-name="T182">transforms=MakeMap, InsertSource</text:span></text:p>
              </text:list-item>
              <text:list-item>
                <text:p text:style-name="P98"><text:span text:style-name="T183"># La ligne du fichier devient le champ line</text:span></text:p>
              </text:list-item>
              <text:list-item>
                <text:p text:style-name="P98"><text:span text:style-name="T182">transforms.MakeMap.type=org.apache.kafka.connect.transforms.HoistField$Value</text:span></text:p>
              </text:list-item>
              <text:list-item>
                <text:p text:style-name="P98"><text:span text:style-name="T182">transforms.MakeMap.field=line</text:span></text:p>
              </text:list-item>
              <text:list-item>
                <text:p text:style-name="P98"><text:span text:style-name="T183"># Le champ data-source est ajouté avec une valeur statique</text:span></text:p>
              </text:list-item>
              <text:list-item>
                <text:p text:style-name="P98"><text:span text:style-name="T182">transforms.InsertSource.type=org.apache.kafka.connect.transforms.InsertField$Value</text:span></text:p>
              </text:list-item>
              <text:list-item>
                <text:p text:style-name="P98"><text:span text:style-name="T182">transforms.InsertSource.static.field=data_source</text:span></text:p>
              </text:list-item>
              <text:list-item>
                <text:p text:style-name="P98"><text:span text:style-name="T182">transforms.InsertSource.static.value=test-file-source</text:span></text:p>
              </text:list-item>
            </text:list>
          </draw:text-box>
        </draw:frame>
        <presentation:notes draw:style-name="dp5">
          <draw:page-thumbnail draw:style-name="gr2" draw:layer="layout" svg:width="15.597cm" svg:height="10.985cm" svg:x="2.623cm" svg:y="2.258cm" draw:page-number="146" presentation:class="page"/>
          <draw:frame presentation:style-name="pr6" draw:text-style-name="P13"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14">Transformers</text:span> disponibles</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36">HoistField : </text:span><text:span text:style-name="T44">Encapsule l’événement entier dans un champ </text:span><text:span text:style-name="T44">unique de type Struct ou Map</text:span></text:p>
              </text:list-item>
              <text:list-item>
                <text:p><text:span text:style-name="T36">InsertField </text:span>: Ajout d’un champ avec des données statiques ou des méta-données de l’enregistrement</text:p>
              </text:list-item>
              <text:list-item>
                <text:p><text:span text:style-name="T36">ReplaceField</text:span> : Filtrer ou renommer des champs </text:p>
              </text:list-item>
              <text:list-item>
                <text:p><text:span text:style-name="T36">MaskField</text:span> : Remplace le champ avec une valeur nulle</text:p>
              </text:list-item>
              <text:list-item>
                <text:p><text:span text:style-name="T36">ValueToKey</text:span> : Échange clé/valeur</text:p>
              </text:list-item>
              <text:list-item>
                <text:p><text:span text:style-name="T36">ExtractField</text:span> : Construit le résultat à partir de l’extraction d’un champ spécifique </text:p>
              </text:list-item>
              <text:list-item>
                <text:p><text:span text:style-name="T36">SetSchemaMetadata</text:span> : Modifie le nom du schéma ou la version</text:p>
              </text:list-item>
              <text:list-item>
                <text:p><text:span text:style-name="T36">TimestampRouter</text:span> : Route le message en fonction du timestamp</text:p>
              </text:list-item>
              <text:list-item>
                <text:p><text:span text:style-name="T36">RegexRouter</text:span> : Modifie le nom du topic le destination via une <text:span text:style-name="T14">regexp</text:span></text:p>
              </text:list-item>
            </text:list>
          </draw:text-box>
        </draw:frame>
        <presentation:notes draw:style-name="dp5">
          <draw:page-thumbnail draw:style-name="gr2" draw:layer="layout" svg:width="15.597cm" svg:height="10.985cm" svg:x="2.623cm" svg:y="2.258cm" draw:page-number="147" presentation:class="page"/>
          <draw:frame presentation:style-name="pr6" draw:text-style-name="P13"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 Rest</text:p>
          </draw:text-box>
        </draw:frame>
        <draw:frame presentation:style-name="pr5" draw:layer="layout" svg:width="23.499cm" svg:height="12.18cm" svg:x="3.033cm" svg:y="6.283cm" presentation:class="outline">
          <draw:text-box>
            <text:list text:style-name="L2">
              <text:list-item>
                <text:p>L’adresse d’écoute de l’API REST peut être configuré via la propriété listeners<text:line-break/><text:span text:style-name="T178">listeners=http://localhost:8080,</text:span><text:span text:style-name="T178"><text:a xlink:href="https://localhost:8443/" xlink:type="simple">https://localhost:8443</text:a></text:span></text:p>
              </text:list-item>
              <text:list-item>
                <text:p/>
              </text:list-item>
              <text:list-item>
                <text:p>Ces listeners sont également utilisés par la communication intra-cluster</text:p>
                <text:list>
                  <text:list-item>
                    <text:p text:style-name="P61">Pour utiliser d’autres Ips pour le cluster, positionner :<text:line-break/><text:span text:style-name="T178">rest.advertised.listener</text:span></text:p>
                  </text:list-item>
                </text:list>
              </text:list-item>
              <text:list-item>
                <text:p/>
              </text:list-item>
            </text:list>
          </draw:text-box>
        </draw:frame>
        <presentation:notes draw:style-name="dp5">
          <draw:page-thumbnail draw:style-name="gr2" draw:layer="layout" svg:width="15.597cm" svg:height="10.985cm" svg:x="2.623cm" svg:y="2.258cm" draw:page-number="148" presentation:class="page"/>
          <draw:frame presentation:style-name="pr6" draw:text-style-name="P13"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text:p>
          </draw:text-box>
        </draw:frame>
        <draw:frame presentation:style-name="pr5" draw:layer="layout" svg:width="23.499cm" svg:height="12.18cm" svg:x="3.033cm" svg:y="6.283cm" presentation:class="outline">
          <draw:text-box>
            <text:list text:style-name="L2">
              <text:list-item>
                <text:p><text:span text:style-name="T36">GET /connectors</text:span> : Liste des connecteurs actifs</text:p>
              </text:list-item>
              <text:list-item>
                <text:p><text:span text:style-name="T36">POST</text:span> <text:span text:style-name="T36">/connectors</text:span> : Création d’un nouveau connecteur</text:p>
              </text:list-item>
              <text:list-item>
                <text:p><text:span text:style-name="T36">GET</text:span> <text:span text:style-name="T36">/connectors/{name}</text:span> : Information sur un connecteur (config et statuts et tasks)</text:p>
              </text:list-item>
              <text:list-item>
                <text:p><text:span text:style-name="T36">PUT</text:span> <text:span text:style-name="T36">/connectors/{name}/config </text:span>: Mise à jour de la configuration</text:p>
              </text:list-item>
              <text:list-item>
                <text:p><text:span text:style-name="T36">GET /connectors/{name}/tasks/{taskid}/status</text:span> : Statut d’une tâche</text:p>
              </text:list-item>
              <text:list-item>
                <text:p><text:span text:style-name="T36">PUT</text:span> <text:span text:style-name="T36">/connectors/{name}/pause</text:span> : Mettre en pause le connecteur</text:p>
              </text:list-item>
              <text:list-item>
                <text:p><text:span text:style-name="T36">PUT</text:span> <text:span text:style-name="T36">/connectors/{name}/resume</text:span> : Réactiver un connecteur</text:p>
              </text:list-item>
              <text:list-item>
                <text:p><text:span text:style-name="T36">POST</text:span> <text:span text:style-name="T36">/connectors/{name}/restart</text:span> : Redémarrage après un plantage</text:p>
              </text:list-item>
              <text:list-item>
                <text:p><text:span text:style-name="T36">DELETE</text:span> <text:span text:style-name="T36">/connectors/{name} </text:span>: Supprimer un connecteur</text:p>
              </text:list-item>
            </text:list>
          </draw:text-box>
        </draw:frame>
        <draw:frame draw:style-name="gr63" draw:text-style-name="P59" draw:layer="layout" svg:width="8.74cm" svg:height="1.216cm" svg:x="1.602cm" svg:y="19.4cm">
          <draw:text-box>
            <text:p><text:span text:style-name="T94">Atelier 6 : Connect API</text:span></text:p>
          </draw:text-box>
        </draw:frame>
        <presentation:notes draw:style-name="dp5">
          <draw:page-thumbnail draw:style-name="gr2" draw:layer="layout" svg:width="15.597cm" svg:height="10.985cm" svg:x="2.623cm" svg:y="2.258cm" draw:page-number="149" presentation:class="page"/>
          <draw:frame presentation:style-name="pr6" draw:text-style-name="P18" draw:layer="layout" svg:width="14.362cm" svg:height="11.254cm" svg:x="3.25cm" svg:y="14.128cm" presentation:class="notes" presentation:placeholder="true">
            <draw:text-box/>
          </draw:frame>
        </presentation:notes>
      </draw:page>
      <draw:page draw:name="page150"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Eco-système Kafka</text:span></text:p>
              </text:list-header>
            </text:list>
          </draw:text-box>
        </draw:frame>
        <draw:frame presentation:style-name="pr46"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Schema registry</text:span></text:p>
              </text:list-item>
              <text:list-item>
                <text:p text:style-name="P19"><text:span text:style-name="T2">Kafka Connect</text:span></text:p>
              </text:list-item>
              <text:list-item>
                <text:p text:style-name="P19"><text:span text:style-name="T12">MirrorMaker 2</text:span></text:p>
              </text:list-item>
              <text:list-item>
                <text:p text:style-name="P33"><text:span text:style-name="T2">KafkaStream et kSqlDb</text:span></text:p>
              </text:list-item>
              <text:list-item>
                <text:p text:style-name="P3"><text:span text:style-name="T13"/></text:p>
              </text:list-item>
            </text:list>
          </draw:text-box>
        </draw:frame>
        <presentation:notes draw:style-name="dp10">
          <office:forms form:automatic-focus="false" form:apply-design-mode="false"/>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1" draw:style-name="dp6" draw:master-page-name="Blank">
        <office:forms form:automatic-focus="false" form:apply-design-mode="false"/>
        <draw:frame draw:name="Picture 11"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1"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64" draw:text-style-name="P71" draw:layer="layout" svg:width="0.249cm" svg:height="0.467cm" svg:x="28.386cm" svg:y="19.739cm">
          <text:p text:style-name="P70"><text:span text:style-name="T11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65" draw:text-style-name="P73" draw:layer="layout" svg:width="26.729cm" svg:height="1.65cm" svg:x="1.484cm" svg:y="0.98cm">
          <text:p text:style-name="P72"><text:span text:style-name="T117">MirrorMak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66" draw:text-style-name="P84" draw:layer="layout" svg:width="25.541cm" svg:height="9.714cm" svg:x="2.078cm" svg:y="4.759cm">
          <text:p text:style-name="P79"><text:span text:style-name="T138">MirrorMaker 2 (MM2) réplique des données entre deux clusters Kafka. Il est bâti au-dessus de Kafka Connect (mode distribué) et s’appuie sur trois connecteurs spécialisés :</text:span></text:p>
          <text:p text:style-name="P87"><text:span text:style-name="T184">– </text:span><text:span text:style-name="T184">MirrorSourceConnector</text:span><text:span text:style-name="T151"> <text:s/>— <text:s/>réplique les </text:span><text:span text:style-name="T185">topics</text:span><text:span text:style-name="T151"> du cluster source vers le cluster cible</text:span></text:p>
          <text:p text:style-name="P87"><text:span text:style-name="T184">– </text:span><text:span text:style-name="T184">MirrorCheckpointConnector</text:span><text:span text:style-name="T151"> <text:s/>— <text:s/>réplique les </text:span><text:span text:style-name="T185">offsets de consumer groups</text:span><text:span text:style-name="T151"> (clé pour le failover)</text:span></text:p>
          <text:p text:style-name="P79"><text:span text:style-name="T184">– </text:span><text:span text:style-name="T184">MirrorHeartbeatConnector</text:span><text:span text:style-name="T151"> <text:s/>— <text:s/>émet des </text:span><text:span text:style-name="T185">heartbeats</text:span><text:span text:style-name="T151"> pour mesurer la latence et la santé du lien</text:span></text:p>
          <text:p text:style-name="P92"><text:span text:style-name="T186">Cas d’usage typiques : </text:span><text:span text:style-name="T154">PRA / DR</text:span><text:span text:style-name="T186">, </text:span><text:span text:style-name="T154">migration de cluster</text:span><text:span text:style-name="T186">, </text:span><text:span text:style-name="T154">agrégation multi-régions</text:span><text:span text:style-name="T1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9.798cm" svg:height="11.136cm" svg:x="0.6cm" svg:y="2.257cm" draw:page-number="151" presentation:class="page"/>
          <draw:frame presentation:style-name="pr39" draw:text-style-name="P107" draw:layer="layout" svg:width="16.799cm" svg:height="13.364cm" svg:x="2.1cm" svg:y="14.107cm" presentation:class="notes" presentation:placeholder="true">
            <draw:text-box/>
          </draw:frame>
        </presentation:notes>
      </draw:page>
      <draw:page draw:name="page152" draw:style-name="dp6" draw:master-page-name="Blank">
        <office:forms form:automatic-focus="false" form:apply-design-mode="false"/>
        <draw:frame draw:name="Picture 12"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3"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67" draw:text-style-name="P71" draw:layer="layout" svg:width="0.249cm" svg:height="0.467cm" svg:x="28.386cm" svg:y="19.739cm">
          <text:p text:style-name="P70"><text:span text:style-name="T11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68" draw:text-style-name="P73" draw:layer="layout" svg:width="26.729cm" svg:height="1.65cm" svg:x="1.484cm" svg:y="0.98cm">
          <text:p text:style-name="P72"><text:span text:style-name="T117">Top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69" draw:text-style-name="P109" draw:layer="layout" svg:width="25.541cm" svg:height="10.418cm" svg:x="2.078cm" svg:y="4.759cm">
          <text:p text:style-name="P93"><text:span text:style-name="T138">MM2 supporte plusieurs topologies de réplication :</text:span></text:p>
          <text:p text:style-name="P94"><text:span text:style-name="T153">Active / Passive</text:span></text:p>
          <text:p text:style-name="P90"><text:span text:style-name="T145">Un cluster primaire produit et consomme. Le cluster secondaire reçoit la copie des topics et des offsets. Bascule en cas de sinistre.</text:span></text:p>
          <text:p text:style-name="P94"><text:span text:style-name="T153">Active / Active</text:span></text:p>
          <text:p text:style-name="P90"><text:span text:style-name="T145">Les deux clusters produisent. Chacun réplique les topics de l’autre. Les producteurs écrivent localement, les consommateurs voient les deux flux.</text:span></text:p>
          <text:p text:style-name="P108"><text:span text:style-name="T151">Pour éviter les boucles de réplication, MM2 préfixe les topics répliqués par l’</text:span><text:span text:style-name="T152">alias du cluster source</text:span><text:span text:style-name="T151">.</text:span></text:p>
          <text:p text:style-name="P83"><text:span text:style-name="T186">Exemple : </text:span><text:span text:style-name="T154">orders</text:span><text:span text:style-name="T186"> sur cluster A est répliqué en </text:span><text:span text:style-name="T155">A.orders</text:span><text:span text:style-name="T186"> sur cluster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52" presentation:class="page"/>
          <draw:frame presentation:style-name="pr39" draw:text-style-name="P107" draw:layer="layout" svg:width="16.799cm" svg:height="13.364cm" svg:x="2.1cm" svg:y="14.107cm" presentation:class="notes" presentation:placeholder="true">
            <draw:text-box/>
          </draw:frame>
        </presentation:notes>
      </draw:page>
      <draw:page draw:name="page153" draw:style-name="dp6" draw:master-page-name="Blank">
        <office:forms form:automatic-focus="false" form:apply-design-mode="false"/>
        <draw:frame draw:name="Picture 13"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5"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70" draw:text-style-name="P71" draw:layer="layout" svg:width="0.249cm" svg:height="0.467cm" svg:x="28.386cm" svg:y="19.739cm">
          <text:p text:style-name="P70"><text:span text:style-name="T11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71" draw:text-style-name="P73" draw:layer="layout" svg:width="26.729cm" svg:height="1.65cm" svg:x="1.484cm" svg:y="0.98cm">
          <text:p text:style-name="P72"><text:span text:style-name="T117">Configuration &amp; topics répliqu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72" draw:text-style-name="P113" draw:layer="layout" svg:width="25.541cm" svg:height="10.082cm" svg:x="2.078cm" svg:y="4.76cm">
          <text:p text:style-name="P75"><text:span text:style-name="T151">MM2 se configure via un fichier décrivant les clusters et les flux de réplication :</text:span></text:p>
          <text:p text:style-name="P110"><text:span text:style-name="T187">clusters = A, B</text:span></text:p>
          <text:p text:style-name="P110"><text:span text:style-name="T187">A.bootstrap.servers = ...</text:span><text:span text:style-name="T188"> <text:s text:c="3"/></text:span><text:span text:style-name="T187">B.bootstrap.servers = ...</text:span></text:p>
          <text:p text:style-name="P90"><text:span text:style-name="T189">A-&gt;B.enabled = true</text:span><text:span text:style-name="T188"> <text:s text:c="3"/></text:span><text:span text:style-name="T187">A-&gt;B.topics = .*</text:span></text:p>
          <text:p text:style-name="P76"><text:span text:style-name="T146">– </text:span><text:span text:style-name="T146">replication.policy.class</text:span><text:span text:style-name="T145"> <text:s/>— <text:s/>règle de renommage des topics répliqués</text:span></text:p>
          <text:p text:style-name="P85"><text:span text:style-name="T190">Défaut : </text:span><text:span text:style-name="T191">DefaultReplicationPolicy</text:span><text:span text:style-name="T190"> (préfixe par alias) <text:s/>· <text:s/>alternative : </text:span><text:span text:style-name="T191">IdentityReplicationPolicy</text:span><text:span text:style-name="T190"> (même nom)</text:span></text:p>
          <text:p text:style-name="P111"><text:span text:style-name="T145">Topics internes créés automatiquement sur le cluster cible :</text:span></text:p>
          <text:p text:style-name="P112"><text:span text:style-name="T192">– </text:span><text:span text:style-name="T192">&lt;source&gt;.checkpoints.internal</text:span><text:span text:style-name="T193"> <text:s/>— <text:s/>offsets traduits par groupe</text:span></text:p>
          <text:p text:style-name="P112"><text:span text:style-name="T192">– </text:span><text:span text:style-name="T192">heartbeats</text:span><text:span text:style-name="T193"> <text:s/>— <text:s/>signaux de santé</text:span></text:p>
          <text:p text:style-name="P76"><text:span text:style-name="T192">– </text:span><text:span text:style-name="T192">mm2-offset-syncs.&lt;target&gt;.internal</text:span><text:span text:style-name="T193"> <text:s/>— <text:s/>table de correspondance des off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53" presentation:class="page"/>
          <draw:frame presentation:style-name="pr39" draw:text-style-name="P107" draw:layer="layout" svg:width="16.799cm" svg:height="13.364cm" svg:x="2.1cm" svg:y="14.107cm" presentation:class="notes" presentation:placeholder="true">
            <draw:text-box/>
          </draw:frame>
        </presentation:notes>
      </draw:page>
      <draw:page draw:name="page154" draw:style-name="dp6" draw:master-page-name="Blank">
        <office:forms form:automatic-focus="false" form:apply-design-mode="false"/>
        <draw:frame draw:name="Picture 14"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7" draw:style-name="gr4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73" draw:text-style-name="P71" draw:layer="layout" svg:width="0.249cm" svg:height="0.467cm" svg:x="28.386cm" svg:y="19.739cm">
          <text:p text:style-name="P70"><text:span text:style-name="T11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74" draw:text-style-name="P73" draw:layer="layout" svg:width="26.729cm" svg:height="1.481cm" svg:x="1.484cm" svg:y="0.979cm">
          <text:p text:style-name="P72"><text:span text:style-name="T139">MirrorMaker vs MirrorMak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75" draw:text-style-name="P114" draw:layer="layout" svg:width="25.541cm" svg:height="11.152cm" svg:x="2.078cm" svg:y="4.759cm">
          <text:p text:style-name="P82"><text:span text:style-name="T194">MirrorMaker (v1)</text:span></text:p>
          <text:p text:style-name="P86"><text:span text:style-name="T148">Simple paire consumer / producer. Pas de réplication des configurations de topic, ni des ACLs, ni des offsets de consumer groups. Failover difficile.</text:span></text:p>
          <text:p text:style-name="P82"><text:span text:style-name="T194">MirrorMaker 2</text:span></text:p>
          <text:p text:style-name="P86"><text:span text:style-name="T188">Réplique topics, configurations de topic, ACLs et offsets de consumer groups. Topologies actives/actives natives. S’exploite via Kafka Connect.</text:span></text:p>
          <text:p text:style-name="P94"><text:span text:style-name="T194">Failover avec MM2</text:span></text:p>
          <text:p text:style-name="P76"><text:span text:style-name="T188">– </text:span><text:span text:style-name="T188">Le </text:span><text:span text:style-name="T187">MirrorCheckpointConnector</text:span><text:span text:style-name="T188"> écrit régulièrement la correspondance entre offsets source et offsets cible.</text:span></text:p>
          <text:p text:style-name="P76"><text:span text:style-name="T188">– </text:span><text:span text:style-name="T188">Lors d’une bascule, l’API </text:span><text:span text:style-name="T189">RemoteClusterUtils.translateOffsets()</text:span><text:span text:style-name="T188"> permet aux consommateurs de reprendre sur le cluster cible à la bonne position.</text:span></text:p>
          <text:p text:style-name="P83"><text:span text:style-name="T191">La traduction n’est pas exacte au message près : tolérer un petit rejeu (au sens At Least O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54" presentation:class="page"/>
          <draw:frame presentation:style-name="pr39" draw:text-style-name="P107" draw:layer="layout" svg:width="16.799cm" svg:height="13.364cm" svg:x="2.1cm" svg:y="14.107cm" presentation:class="notes" presentation:placeholder="true">
            <draw:text-box/>
          </draw:frame>
        </presentation:notes>
      </draw:page>
      <draw:page draw:name="page155" draw:style-name="dp6" draw:master-page-name="Blank">
        <office:forms form:automatic-focus="false" form:apply-design-mode="false"/>
        <draw:frame draw:name="Picture 15"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9" draw:style-name="gr4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76" draw:text-style-name="P71" draw:layer="layout" svg:width="0.249cm" svg:height="0.467cm" svg:x="28.386cm" svg:y="19.739cm">
          <text:p text:style-name="P70"><text:span text:style-name="T1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77" draw:text-style-name="P73" draw:layer="layout" svg:width="26.729cm" svg:height="1.65cm" svg:x="1.484cm" svg:y="0.98cm">
          <text:p text:style-name="P72"><text:span text:style-name="T117">Limites &amp; alterna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8" draw:text-style-name="P116" draw:layer="layout" svg:width="25.541cm" svg:height="11.73cm" svg:x="2.078cm" svg:y="4.76cm">
          <text:p text:style-name="P87"><text:span text:style-name="T153">Limites de MM2</text:span></text:p>
          <text:p text:style-name="P82"><text:span text:style-name="T145">– </text:span><text:span text:style-name="T145">Réplication asynchrone : RPO non nul, données en transit perdues lors d’un sinistre brutal.</text:span></text:p>
          <text:p text:style-name="P82"><text:span text:style-name="T145">– </text:span><text:span text:style-name="T145">Traduction d’offsets approximative : pas de garantie Exactly Once entre clusters.</text:span></text:p>
          <text:p text:style-name="P82"><text:span text:style-name="T145">– </text:span><text:span text:style-name="T145">Doublons possibles côté cible (sémantique At Least Once).</text:span></text:p>
          <text:p text:style-name="P79"><text:span text:style-name="T145">– </text:span><text:span text:style-name="T145">Coût opérationnel : un cluster Connect dédié à exploiter et superviser.</text:span></text:p>
          <text:p text:style-name="P96"><text:span text:style-name="T153">Alternative : Cluster Linking (Confluent)</text:span></text:p>
          <text:p text:style-name="P88"><text:span text:style-name="T145">Réplication intégrée au broker, sans cluster Connect intermédiaire. Préserve les noms de topics et les offsets à l’identique.</text:span></text:p>
          <text:p text:style-name="P86"><text:span text:style-name="T191">Disponible uniquement sur Confluent Platform / Cloud — pas dans Apache Kafka open source.</text:span></text:p>
          <text:p text:style-name="P115"><text:span text:style-name="T1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3" draw:text-style-name="P59" draw:layer="layout" svg:width="9.743cm" svg:height="1.216cm" svg:x="1.602cm" svg:y="19.4cm">
          <draw:text-box>
            <text:p><text:span text:style-name="T94">Atelier 7 : Mirror Maker 2</text:span></text:p>
          </draw:text-box>
        </draw:frame>
        <presentation:notes draw:style-name="dp8">
          <office:forms form:automatic-focus="false" form:apply-design-mode="false"/>
          <draw:page-thumbnail draw:style-name="gr2" draw:layer="layout" svg:width="14.848cm" svg:height="11.136cm" svg:x="3.075cm" svg:y="2.257cm" draw:page-number="155" presentation:class="page"/>
          <draw:frame presentation:style-name="pr39" draw:text-style-name="P107" draw:layer="layout" svg:width="16.799cm" svg:height="13.364cm" svg:x="2.1cm" svg:y="14.107cm" presentation:class="notes" presentation:placeholder="true">
            <draw:text-box/>
          </draw:frame>
        </presentation:notes>
      </draw:page>
      <draw:page draw:name="page156"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Eco-système Kafka</text:span></text:p>
              </text:list-header>
            </text:list>
          </draw:text-box>
        </draw:frame>
        <draw:frame presentation:style-name="pr47"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19"><text:span text:style-name="T2">Schema registry</text:span></text:p>
              </text:list-item>
              <text:list-item>
                <text:p text:style-name="P19"><text:span text:style-name="T2">Kafka Connect</text:span></text:p>
              </text:list-item>
              <text:list-item>
                <text:p text:style-name="P19"><text:span text:style-name="T2">MirrorMaker 2</text:span></text:p>
              </text:list-item>
              <text:list-item>
                <text:p text:style-name="P19"><text:span text:style-name="T12">KafkaStream et kSqlDb</text:span></text:p>
              </text:list-item>
              <text:list-item>
                <text:p text:style-name="P3"><text:span text:style-name="T13"/></text:p>
              </text:list-item>
            </text:list>
          </draw:text-box>
        </draw:frame>
        <presentation:notes draw:style-name="dp10">
          <office:forms form:automatic-focus="false" form:apply-design-mode="false"/>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7" draw:style-name="dp6" draw:master-page-name="Blank">
        <office:forms form:automatic-focus="false" form:apply-design-mode="false"/>
        <draw:frame draw:name="Picture 16"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1"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79" draw:text-style-name="P71" draw:layer="layout" svg:width="0.249cm" svg:height="0.467cm" svg:x="28.386cm" svg:y="19.739cm">
          <text:p text:style-name="P70"><text:span text:style-name="T11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80" draw:text-style-name="P73" draw:layer="layout" svg:width="26.729cm" svg:height="1.481cm" svg:x="1.484cm" svg:y="0.979cm">
          <text:p text:style-name="P72"><text:span text:style-name="T139">Traitement de flux : où se placent-i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81" draw:text-style-name="P84" draw:layer="layout" svg:width="25.541cm" svg:height="9.357cm" svg:x="2.078cm" svg:y="4.759cm">
          <text:p text:style-name="P79"><text:span text:style-name="T138">Trois familles d’outils gravitent autour de Kafka :</text:span></text:p>
          <text:p text:style-name="P75"><text:span text:style-name="T146">– </text:span><text:span text:style-name="T146">Kafka Connect</text:span><text:span text:style-name="T145"> <text:s/>— <text:s/>intégration : déplacer des données entre Kafka et d’autres systèmes (BDD, fichiers, Elasticsearch…), sans transformation lourde.</text:span></text:p>
          <text:p text:style-name="P75"><text:span text:style-name="T146">– </text:span><text:span text:style-name="T146">Kafka Streams / ksqlDB</text:span><text:span text:style-name="T145"> <text:s/>— <text:s/>traitement de flux </text:span><text:span text:style-name="T195">in situ</text:span><text:span text:style-name="T145"> : transformer, agréger, joindre des topics Kafka, à l’échelle d’un microservice.</text:span></text:p>
          <text:p text:style-name="P79"><text:span text:style-name="T146">– </text:span><text:span text:style-name="T146">Spark Streaming, Flink</text:span><text:span text:style-name="T145"> <text:s/>— <text:s/>moteurs de traitement distribués (cluster dédié, scheduler) ; adaptés aux pipelines batch + stream lourds, ML, jointures sur très gros volumes.</text:span></text:p>
          <text:p text:style-name="P89"><text:span text:style-name="T154">Différence clé : </text:span><text:span text:style-name="T155">Kafka Streams est une bibliothèque</text:span><text:span text:style-name="T154">, pas un cluster. L’application stream est un simple JAR Java déployé comme un micro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9.798cm" svg:height="11.136cm" svg:x="0.6cm" svg:y="2.257cm" draw:page-number="157" presentation:class="page"/>
          <draw:frame presentation:style-name="pr39" draw:text-style-name="P107" draw:layer="layout" svg:width="16.799cm" svg:height="13.364cm" svg:x="2.1cm" svg:y="14.107cm" presentation:class="notes" presentation:placeholder="true">
            <draw:text-box/>
          </draw:frame>
        </presentation:notes>
      </draw:page>
      <draw:page draw:name="page158" draw:style-name="dp6" draw:master-page-name="Blank">
        <office:forms form:automatic-focus="false" form:apply-design-mode="false"/>
        <draw:frame draw:name="Picture 17"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3"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82" draw:text-style-name="P71" draw:layer="layout" svg:width="0.249cm" svg:height="0.467cm" svg:x="28.386cm" svg:y="19.739cm">
          <text:p text:style-name="P70"><text:span text:style-name="T11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83" draw:text-style-name="P73" draw:layer="layout" svg:width="26.729cm" svg:height="1.65cm" svg:x="1.484cm" svg:y="0.98cm">
          <text:p text:style-name="P72"><text:span text:style-name="T117">Kafka Str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84" draw:text-style-name="P84" draw:layer="layout" svg:width="25.541cm" svg:height="10.177cm" svg:x="2.078cm" svg:y="4.759cm">
          <text:p text:style-name="P79"><text:span text:style-name="T151">Bibliothèque Java pour construire des applications de traitement de flux qui consomment et produisent des topics Kafka.</text:span></text:p>
          <text:p text:style-name="P82"><text:span text:style-name="T194">Deux abstractions principales</text:span></text:p>
          <text:p text:style-name="P82"><text:span text:style-name="T146">– </text:span><text:span text:style-name="T146">KStream</text:span><text:span text:style-name="T145"> <text:s/>— <text:s/>flux d’événements immuables (chaque message est un fait indépendant)</text:span></text:p>
          <text:p text:style-name="P79"><text:span text:style-name="T146">– </text:span><text:span text:style-name="T146">KTable</text:span><text:span text:style-name="T145"> <text:s/>— <text:s/>vue matérialisée par clé (le dernier message par clé représente l’état courant)</text:span></text:p>
          <text:p text:style-name="P94"><text:span text:style-name="T194">Opérations courantes</text:span></text:p>
          <text:p text:style-name="P76"><text:span text:style-name="T145">– </text:span><text:span text:style-name="T145">Stateless : </text:span><text:span text:style-name="T195">filter, map, flatMap, branch</text:span></text:p>
          <text:p text:style-name="P76"><text:span text:style-name="T145">– </text:span><text:span text:style-name="T145">Stateful : </text:span><text:span text:style-name="T195">groupBy, count, aggregate, reduce, join</text:span></text:p>
          <text:p text:style-name="P76"><text:span text:style-name="T145">– </text:span><text:span text:style-name="T145">Fenêtres : </text:span><text:span text:style-name="T195">tumbling</text:span><text:span text:style-name="T145"> (fixes), </text:span><text:span text:style-name="T195">hopping</text:span><text:span text:style-name="T145"> (glissantes), </text:span><text:span text:style-name="T195">session</text:span><text:span text:style-name="T145"> (basées sur l’inactiv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58" presentation:class="page"/>
          <draw:frame presentation:style-name="pr39" draw:text-style-name="P107" draw:layer="layout" svg:width="16.799cm" svg:height="13.364cm" svg:x="2.1cm" svg:y="14.107cm" presentation:class="notes" presentation:placeholder="true">
            <draw:text-box/>
          </draw:frame>
        </presentation:notes>
      </draw:page>
      <draw:page draw:name="page159" draw:style-name="dp6" draw:master-page-name="Blank">
        <office:forms form:automatic-focus="false" form:apply-design-mode="false"/>
        <draw:frame draw:name="Picture 18"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5" draw:style-name="gr2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85" draw:text-style-name="P71" draw:layer="layout" svg:width="0.249cm" svg:height="0.467cm" svg:x="28.386cm" svg:y="19.739cm">
          <text:p text:style-name="P70"><text:span text:style-name="T11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86" draw:text-style-name="P73" draw:layer="layout" svg:width="26.729cm" svg:height="1.65cm" svg:x="1.484cm" svg:y="0.98cm">
          <text:p text:style-name="P72"><text:span text:style-name="T117">Sous le ca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87" draw:text-style-name="P114" draw:layer="layout" svg:width="25.541cm" svg:height="11.221cm" svg:x="2.078cm" svg:y="4.76cm">
          <text:p text:style-name="P82"><text:span text:style-name="T194">État local et tolérance aux fautes</text:span></text:p>
          <text:p text:style-name="P82"><text:span text:style-name="T145">– </text:span><text:span text:style-name="T145">Les opérations stateful (agrégations, jointures) stockent leur état dans un </text:span><text:span text:style-name="T146">state store</text:span><text:span text:style-name="T145"> local à l’instance — par défaut, RocksDB sur disque.</text:span></text:p>
          <text:p text:style-name="P79"><text:span text:style-name="T145">– </text:span><text:span text:style-name="T145">Chaque state store est sauvegardé dans un </text:span><text:span text:style-name="T146">changelog topic</text:span><text:span text:style-name="T145"> Kafka compacté. En cas de crash, l’état est reconstruit à partir du changelog.</text:span></text:p>
          <text:p text:style-name="P94"><text:span text:style-name="T194">Scaling</text:span></text:p>
          <text:p text:style-name="P82"><text:span text:style-name="T145">– </text:span><text:span text:style-name="T145">Plusieurs instances de la même application partagent un même </text:span><text:span text:style-name="T195">application.id</text:span><text:span text:style-name="T145"> <text:s/>→ <text:s/>Kafka leur distribue les partitions (comme un consumer group).</text:span></text:p>
          <text:p text:style-name="P79"><text:span text:style-name="T145">– </text:span><text:span text:style-name="T145">Ajouter ou retirer une instance déclenche un rebalancing ; les state stores sont rejoués depuis les changelogs.</text:span></text:p>
          <text:p text:style-name="P111"><text:span text:style-name="T147">Sémantique Exactly Once disponible via </text:span><text:span text:style-name="T196">processing.guarantee = exactly_once_v2</text:span><text:span text:style-name="T147"> (utilise les transactions Kaf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59" presentation:class="page"/>
          <draw:frame presentation:style-name="pr39" draw:text-style-name="P107" draw:layer="layout" svg:width="16.799cm" svg:height="13.364cm" svg:x="2.1cm" svg:y="14.107cm" presentation:class="notes" presentation:placeholder="true">
            <draw:text-box/>
          </draw:frame>
        </presentation:notes>
      </draw:page>
      <draw:page draw:name="page160" draw:style-name="dp6" draw:master-page-name="Blank">
        <office:forms form:automatic-focus="false" form:apply-design-mode="false"/>
        <draw:frame draw:name="Picture 19"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7" draw:style-name="gr4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4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88" draw:text-style-name="P71" draw:layer="layout" svg:width="0.249cm" svg:height="0.467cm" svg:x="28.386cm" svg:y="19.739cm">
          <text:p text:style-name="P70"><text:span text:style-name="T11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89" draw:text-style-name="P73" draw:layer="layout" svg:width="26.729cm" svg:height="1.65cm" svg:x="1.484cm" svg:y="0.98cm">
          <text:p text:style-name="P72"><text:span text:style-name="T117">ksql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90" draw:text-style-name="P84" draw:layer="layout" svg:width="25.541cm" svg:height="11.913cm" svg:x="2.078cm" svg:y="4.759cm">
          <text:p text:style-name="P79"><text:span text:style-name="T151">Une couche SQL bâtie au-dessus de Kafka Streams. Permet de déclarer des traitements de flux sans écrire de code Java.</text:span></text:p>
          <text:p text:style-name="P82"><text:span text:style-name="T194">Concepts SQL</text:span></text:p>
          <text:p text:style-name="P82"><text:span text:style-name="T146">– </text:span><text:span text:style-name="T146">STREAM</text:span><text:span text:style-name="T145"> <text:s/>↔ <text:s/>KStream <text:s text:c="4"/>· <text:s text:c="4"/></text:span><text:span text:style-name="T146">TABLE</text:span><text:span text:style-name="T145"> <text:s/>↔ <text:s/>KTable</text:span></text:p>
          <text:p text:style-name="P79"><text:span text:style-name="T145">– </text:span><text:span text:style-name="T145">Requêtes SELECT, GROUP BY, JOIN, fenêtres (TUMBLING, HOPPING, SESSION) — syntaxe SQL standard.</text:span></text:p>
          <text:p text:style-name="P94"><text:span text:style-name="T194">Deux types de requêtes</text:span></text:p>
          <text:p text:style-name="P82"><text:span text:style-name="T146">– </text:span><text:span text:style-name="T146">Push queries</text:span><text:span text:style-name="T145"> (continues) — résultats émis en continu vers un nouveau topic ou un client connecté.</text:span></text:p>
          <text:p text:style-name="P79"><text:span text:style-name="T146">– </text:span><text:span text:style-name="T146">Pull queries</text:span><text:span text:style-name="T145"> (ponctuelles) — interrogation de l’état courant d’une TABLE matérialisée, comme une BDD classique.</text:span></text:p>
          <text:p text:style-name="P76"><text:span text:style-name="T147">Se déploie via un </text:span><text:span text:style-name="T196">ksqlDB server</text:span><text:span text:style-name="T147"> <text:s/>+ <text:s/>CLI ou REST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office:forms form:automatic-focus="false" form:apply-design-mode="false"/>
          <draw:page-thumbnail draw:style-name="gr2" draw:layer="layout" svg:width="14.848cm" svg:height="11.136cm" svg:x="3.075cm" svg:y="2.257cm" draw:page-number="160" presentation:class="page"/>
          <draw:frame presentation:style-name="pr39" draw:text-style-name="P107" draw:layer="layout" svg:width="16.799cm" svg:height="13.364cm" svg:x="2.1cm" svg:y="14.107cm" presentation:class="notes" presentation:placeholder="true">
            <draw:text-box/>
          </draw:frame>
        </presentation:notes>
      </draw:page>
      <draw:page draw:name="page161" draw:style-name="dp6" draw:master-page-name="Blank">
        <office:forms form:automatic-focus="false" form:apply-design-mode="false"/>
        <draw:frame draw:name="Picture 20" draw:style-name="gr23" draw:text-style-name="P67"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9" draw:style-name="gr44" draw:text-style-name="P68" draw:layer="layout" svg:width="27.323cm" svg:height="0.111cm" svg:x="1.188cm" svg:y="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5" draw:text-style-name="P69" draw:layer="layout" svg:width="22.274cm" svg:height="0.069cm" svg:x="1.188cm" svg:y="3.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91" draw:text-style-name="P71" draw:layer="layout" svg:width="0.249cm" svg:height="0.467cm" svg:x="28.386cm" svg:y="19.739cm">
          <text:p text:style-name="P70"><text:span text:style-name="T1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92" draw:text-style-name="P73" draw:layer="layout" svg:width="26.729cm" svg:height="1.65cm" svg:x="1.484cm" svg:y="0.98cm">
          <text:p text:style-name="P72"><text:span text:style-name="T117">Quand utiliser quo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93" draw:text-style-name="P114" draw:layer="layout" svg:width="25.541cm" svg:height="13.509cm" svg:x="2.078cm" svg:y="4.759cm">
          <text:p text:style-name="P82"><text:span text:style-name="T194">Kafka Streams</text:span></text:p>
          <text:p text:style-name="P90"><text:span text:style-name="T148">Microservice Java/Kotlin existant, logique métier complexe, tests unitaires, contrôle fin sur la topologie.</text:span></text:p>
          <text:p text:style-name="P82"><text:span text:style-name="T194">ksqlDB</text:span></text:p>
          <text:p text:style-name="P90"><text:span text:style-name="T148">Profil data plutôt que dev, prototypage rapide, traitements simples (filtrage, agrégation, enrichissement par jointure).</text:span></text:p>
          <text:p text:style-name="P82"><text:span text:style-name="T194">Spark / Flink</text:span></text:p>
          <text:p text:style-name="P86"><text:span text:style-name="T148">Très gros volumes, jobs batch + stream unifiés, écosystème ML, sources hétérogènes hors Kafka.</text:span></text:p>
          <text:p text:style-name="P94"><text:span text:style-name="T144">Cas d’usage typiques (Streams ou ksqlDB)</text:span></text:p>
          <text:p text:style-name="P112"><text:span text:style-name="T188">– </text:span><text:span text:style-name="T188">Détection de fraude / d’anomalie en temps réel</text:span></text:p>
          <text:p text:style-name="P112"><text:span text:style-name="T188">– </text:span><text:span text:style-name="T188">Tableaux de bord live, indicateurs métier (compteurs, KPI)</text:span></text:p>
          <text:p text:style-name="P112"><text:span text:style-name="T188">– </text:span><text:span text:style-name="T188">Enrichissement de flux d’événements par jointure avec des référentiels</text:span></text:p>
          <text:p text:style-name="P76"><text:span text:style-name="T188">– </text:span><text:span text:style-name="T188">Event-driven microservices, sourcing / projections CQ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3" draw:text-style-name="P59" draw:layer="layout" svg:width="16.771cm" svg:height="1.216cm" svg:x="1.603cm" svg:y="19.4cm">
          <draw:text-box>
            <text:p><text:span text:style-name="T94">Atelier 8 : Traitement d’événements temps réel</text:span></text:p>
          </draw:text-box>
        </draw:frame>
        <presentation:notes draw:style-name="dp8">
          <office:forms form:automatic-focus="false" form:apply-design-mode="false"/>
          <draw:page-thumbnail draw:style-name="gr2" draw:layer="layout" svg:width="14.848cm" svg:height="11.136cm" svg:x="3.075cm" svg:y="2.257cm" draw:page-number="161" presentation:class="page"/>
          <draw:frame presentation:style-name="pr39" draw:text-style-name="P107" draw:layer="layout" svg:width="16.799cm" svg:height="13.364cm" svg:x="2.1cm" svg:y="14.107cm" presentation:class="notes" presentation:placeholder="true">
            <draw:text-box/>
          </draw:frame>
        </presentation:notes>
      </draw:page>
      <draw:page draw:name="page162"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48" draw:text-style-name="P16" draw:layer="layout" svg:width="23.499cm" svg:height="12.18cm" svg:x="3.033cm" svg:y="6.283cm" presentation:class="subtitle">
          <draw:text-box>
            <text:list text:style-name="L1">
              <text:list-item>
                <text:p text:style-name="P33"><text:span text:style-name="T197"/></text:p>
              </text:list-item>
              <text:list-item>
                <text:p text:style-name="P33"><text:span text:style-name="T197"/></text:p>
              </text:list-item>
              <text:list-item>
                <text:p text:style-name="P19"><text:span text:style-name="T198">Configuration des listeners</text:span></text:p>
              </text:list-item>
              <text:list-item>
                <text:p text:style-name="P33"><text:span text:style-name="T2">SSL/TLS</text:span></text:p>
              </text:list-item>
              <text:list-item>
                <text:p text:style-name="P33"><text:span text:style-name="T13">Authentification via SASL</text:span></text:p>
              </text:list-item>
              <text:list-item>
                <text:p text:style-name="P33"><text:span text:style-name="T199">ACLs</text:span></text:p>
              </text:list-item>
              <text:list-item>
                <text:p text:style-name="P33"><text:span text:style-name="T199">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Différentes alternatives supportées pour la sécurité :</text:p>
                <text:list>
                  <text:list-item>
                    <text:p>Authentification des connections clients vers les brokers via SSL ou SASL</text:p>
                  </text:list-item>
                  <text:list-item>
                    <text:p>Authentification des connections entre contrôleurs Kraft OU des brokers vers <text:span text:style-name="T14">Zookeeper</text:span></text:p>
                  </text:list-item>
                  <text:list-item>
                    <text:p>Cryptage des données transférées avec les clients/brokers via TLS/SSL</text:p>
                  </text:list-item>
                  <text:list-item>
                    <text:p>Autorisation des opérations read/write/create/delete/... par client</text:p>
                  </text:list-item>
                  <text:list-item>
                    <text:p>Possibilité d’intégration avec d’autres mécanismes d’authentification et d’autorisation</text:p>
                  </text:list-item>
                </text:list>
              </text:list-item>
              <text:list-item>
                <text:p>Naturellement, dégradation des performances avec SSL/TLS</text:p>
              </text:list-item>
            </text:list>
          </draw:text-box>
        </draw:frame>
        <presentation:notes draw:style-name="dp5">
          <draw:page-thumbnail draw:style-name="gr2" draw:layer="layout" svg:width="15.597cm" svg:height="10.985cm" svg:x="2.623cm" svg:y="2.258cm" draw:page-number="163" presentation:class="page"/>
          <draw:frame presentation:style-name="pr6" draw:text-style-name="P13"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steners</text:p>
          </draw:text-box>
        </draw:frame>
        <draw:frame presentation:style-name="pr5" draw:layer="layout" svg:width="23.499cm" svg:height="12.18cm" svg:x="3.033cm" svg:y="6.283cm" presentation:class="outline">
          <draw:text-box>
            <text:list text:style-name="L2">
              <text:list-item>
                <text:p>Chaque serveur doit définir l'ensemble des <text:span text:style-name="T14">listeners</text:span> utilisés (i.e. ports TCP ouverts) pour recevoir les requêtes des clients ainsi que des autres serveurs. </text:p>
              </text:list-item>
              <text:list-item>
                <text:p>Chaque listener peut être configuré pour authentifier les clients et pour garantir que le trafic entre le serveur et le client est crypté.</text:p>
              </text:list-item>
              <text:list-item>
                <text:p><text:span text:style-name="T95"/></text:p>
              </text:list-item>
            </text:list>
          </draw:text-box>
        </draw:frame>
        <presentation:notes draw:style-name="dp5">
          <draw:page-thumbnail draw:style-name="gr2" draw:layer="layout" svg:width="15.597cm" svg:height="10.985cm" svg:x="2.623cm" svg:y="2.258cm" draw:page-number="164" presentation:class="page"/>
          <draw:frame presentation:style-name="pr6" draw:text-style-name="P13"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binaisons des protocoles</text:p>
          </draw:text-box>
        </draw:frame>
        <draw:frame presentation:style-name="pr5" draw:layer="layout" svg:width="23.499cm" svg:height="12.18cm" svg:x="3.033cm" svg:y="6.283cm" presentation:class="outline" presentation:user-transformed="true">
          <draw:text-box>
            <text:list text:style-name="L2">
              <text:list-item>
                <text:p>Chaque protocole combine une couche de transport (PLAINTEXT ou SSL) avec une couche d'authentification optionnelle (SSL ou SASL) :</text:p>
                <text:list>
                  <text:list-item>
                    <text:p><text:span text:style-name="T200">PLAIN_TEXT</text:span> : En clair sans authentification. Ne convient qu'à une utilisation au sein de réseaux privés pour le traitement de données non sensibles </text:p>
                  </text:list-item>
                  <text:list-item>
                    <text:p><text:span text:style-name="T200">SSL</text:span> : Couche de transport SSL avec authentification client SSL en option. Convient pour une utilisation dans réseaux non sécurisés car l'authentification client et serveur ainsi que le chiffrement sont prise en charge.</text:p>
                  </text:list-item>
                  <text:list-item>
                    <text:p><text:span text:style-name="T200">SASL</text:span>_<text:span text:style-name="T200">PLAINTEXT</text:span> : Couche de transport PLAINTEXT avec authentification client SASL. Ne prend pas en charge le cryptage et convient donc uniquement pour une utilisation dans des réseaux privés.</text:p>
                  </text:list-item>
                  <text:list-item>
                    <text:p><text:span text:style-name="T200">SASL_SSL</text:span> : Couche de transport SSL avec authentification SASL. Convient pour une utilisation dans des réseaux non sécurisés.</text:p>
                  </text:list-item>
                </text:list>
              </text:list-item>
            </text:list>
          </draw:text-box>
        </draw:frame>
        <presentation:notes draw:style-name="dp5">
          <draw:page-thumbnail draw:style-name="gr2" draw:layer="layout" svg:width="15.597cm" svg:height="10.985cm" svg:x="2.623cm" svg:y="2.258cm" draw:page-number="165" presentation:class="page"/>
          <draw:frame presentation:style-name="pr6" draw:text-style-name="P13"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draw:text-box>
            <text:list text:style-name="L2">
              <text:list-item>
                <text:p>Les listeners sont déclarés via la propriété <text:span text:style-name="T36">listeners </text:span>:</text:p>
              </text:list-item>
              <text:list-item>
                <text:p><text:span text:style-name="T95">{LISTENER_NAME}://:{port}</text:span></text:p>
              </text:list-item>
              <text:list-item>
                <text:p>Ou LISTENER_NAME est un nom descriptif</text:p>
              </text:list-item>
              <text:list-item>
                <text:p>Exemple :</text:p>
              </text:list-item>
              <text:list-item>
                <text:p><text:span text:style-name="T95"><text:s text:c="2"/></text:span><text:span text:style-name="T95">listeners=CLIENT://:9092,BROKER://:9095</text:span></text:p>
              </text:list-item>
              <text:list-item>
                <text:p/>
              </text:list-item>
              <text:list-item>
                <text:p>Le protocole utilisé pour chaque listener est spécifié dans la propriété <text:span text:style-name="T36">listener.security.protocol.map</text:span></text:p>
              </text:list-item>
              <text:list-item>
                <text:p>Exemple : <text:span text:style-name="T95">listener.security.protocol.map=CLIENT:SSL,BROKER:PLAINTE</text:span><text:span text:style-name="T95">XT</text:span></text:p>
              </text:list-item>
              <text:list-item>
                <text:p/>
              </text:list-item>
              <text:list-item>
                <text:p>Il faut également déclarer les listener utilisés pour les communications inter broker via <text:span text:style-name="T36">inter.broker.listener.name </text:span><text:span text:style-name="T44">et</text:span><text:span text:style-name="T36"> </text:span><text:span text:style-name="T36">controller.listener.names</text:span></text:p>
              </text:list-item>
            </text:list>
          </draw:text-box>
        </draw:frame>
        <draw:frame draw:style-name="gr94" draw:text-style-name="P59" draw:layer="layout" svg:width="14.942cm" svg:height="1.216cm" svg:x="1.602cm" svg:y="19.4cm">
          <draw:text-box>
            <text:p><text:span text:style-name="T94">Atelier 7.1 : Séparation des trafics réseau</text:span></text:p>
          </draw:text-box>
        </draw:frame>
        <presentation:notes draw:style-name="dp5">
          <draw:page-thumbnail draw:style-name="gr2" draw:layer="layout" svg:width="15.597cm" svg:height="10.985cm" svg:x="2.623cm" svg:y="2.258cm" draw:page-number="166" presentation:class="page"/>
          <draw:frame presentation:style-name="pr6" draw:text-style-name="P13" draw:layer="layout" svg:width="14.362cm" svg:height="11.254cm" svg:x="3.25cm" svg:y="14.128cm" presentation:class="notes" presentation:placeholder="true">
            <draw:text-box/>
          </draw:frame>
        </presentation:notes>
      </draw:page>
      <draw:page draw:name="page167"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49" draw:text-style-name="P16" draw:layer="layout" svg:width="23.499cm" svg:height="12.18cm" svg:x="3.033cm" svg:y="6.283cm" presentation:class="subtitle">
          <draw:text-box>
            <text:list text:style-name="L1">
              <text:list-item>
                <text:p text:style-name="P33"><text:span text:style-name="T197"/></text:p>
              </text:list-item>
              <text:list-item>
                <text:p text:style-name="P33"><text:span text:style-name="T197"/></text:p>
              </text:list-item>
              <text:list-item>
                <text:p text:style-name="P19"><text:span text:style-name="T2">Configuration des listeners</text:span></text:p>
              </text:list-item>
              <text:list-item>
                <text:p text:style-name="P19"><text:span text:style-name="T198">SSL/TLS</text:span></text:p>
              </text:list-item>
              <text:list-item>
                <text:p text:style-name="P33"><text:span text:style-name="T13">Authentification via SASL</text:span></text:p>
              </text:list-item>
              <text:list-item>
                <text:p text:style-name="P33"><text:span text:style-name="T199">ACLs</text:span></text:p>
              </text:list-item>
              <text:list-item>
                <text:p text:style-name="P33"><text:span text:style-name="T199">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ertificats </text:p>
          </draw:text-box>
        </draw:frame>
        <draw:frame presentation:style-name="pr5" draw:layer="layout" svg:width="23.499cm" svg:height="12.18cm" svg:x="3.033cm" svg:y="6.283cm" presentation:class="outline" presentation:user-transformed="true">
          <draw:text-box>
            <text:list text:style-name="L2">
              <text:list-item>
                <text:p>SSL pour le cryptage et l’authentification</text:p>
              </text:list-item>
            </text:list>
          </draw:text-box>
        </draw:frame>
        <draw:frame draw:style-name="gr9" draw:text-style-name="P23" draw:layer="layout" svg:width="20.912cm" svg:height="10.546cm" svg:x="3.8cm" svg:y="9.2cm">
          <draw:image xlink:href="Pictures/10000001000004FB00000283DDBC7E5B.png" xlink:type="simple" xlink:show="embed" xlink:actuate="onLoad" draw:mime-type="image/png">
            <text:p/>
          </draw:image>
        </draw:frame>
        <presentation:notes draw:style-name="dp5">
          <draw:page-thumbnail draw:style-name="gr2" draw:layer="layout" svg:width="15.597cm" svg:height="10.985cm" svg:x="2.623cm" svg:y="2.258cm" draw:page-number="168" presentation:class="page"/>
          <draw:frame presentation:style-name="pr6" draw:text-style-name="P13"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TLS et Vérification d’hôte</text:p>
          </draw:text-box>
        </draw:frame>
        <draw:frame presentation:style-name="pr5" draw:layer="layout" svg:width="23.499cm" svg:height="12.18cm" svg:x="3.033cm" svg:y="6.283cm" presentation:class="outline">
          <draw:text-box>
            <text:list text:style-name="L2">
              <text:list-item>
                <text:p>Les certificats des brokers doivent contenir le nom d'hôte du broker en tant que nom alternatif du sujet (SAN) extension ou comme nom commun (CN) pour permettre aux clients de vérifier l'hôte du serveur.</text:p>
              </text:list-item>
              <text:list-item>
                <text:p/>
              </text:list-item>
              <text:list-item>
                <text:p>Les certificats génériques utilisant les wildcards peuvent être utilisés pour simplifier l'administration en utilisant le même keystore pour tous les brokers d'un domaine</text:p>
              </text:list-item>
            </text:list>
          </draw:text-box>
        </draw:frame>
        <presentation:notes draw:style-name="dp5">
          <draw:page-thumbnail draw:style-name="gr2" draw:layer="layout" svg:width="15.597cm" svg:height="10.985cm" svg:x="2.623cm" svg:y="2.258cm" draw:page-number="169" presentation:class="page"/>
          <draw:frame presentation:style-name="pr6" draw:text-style-name="P13"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text:span text:style-name="T14">server.properties</text:span> :</text:p>
              </text:list-item>
              <text:list-item>
                <text:p><text:span text:style-name="T201">listeners=SSL://:port</text:span></text:p>
              </text:list-item>
              <text:list-item>
                <text:p><text:span text:style-name="T201">listener.security.protocol.map=SSL:SSL</text:span></text:p>
              </text:list-item>
              <text:list-item>
                <text:p><text:span text:style-name="T97"/></text:p>
              </text:list-item>
              <text:list-item>
                <text:p text:style-name="P31"><text:span text:style-name="T202">ssl.keystore.location=/home/ubuntu/ssl/server.keystore.jks</text:span></text:p>
              </text:list-item>
              <text:list-item>
                <text:p text:style-name="P31"><text:span text:style-name="T202">ssl.keystore.password=servpass</text:span></text:p>
              </text:list-item>
              <text:list-item>
                <text:p text:style-name="P31"><text:span text:style-name="T202">ssl.key.password=servpass</text:span></text:p>
              </text:list-item>
              <text:list-item>
                <text:p text:style-name="P31"><text:span text:style-name="T202">ssl.truststore.location=/home/ubuntu/ssl/server.truststore.jks</text:span></text:p>
              </text:list-item>
              <text:list-item>
                <text:p text:style-name="P31"><text:span text:style-name="T202">ssl.truststore.password=servpass</text:span></text:p>
              </text:list-item>
            </text:list>
          </draw:text-box>
        </draw:frame>
        <presentation:notes draw:style-name="dp9">
          <draw:page-thumbnail draw:style-name="gr2" draw:layer="layout" svg:width="15.597cm" svg:height="10.985cm" svg:x="2.623cm" svg:y="2.258cm" draw:page-number="170" presentation:class="page"/>
          <draw:frame presentation:style-name="pr6" draw:text-style-name="P13" draw:layer="layout" svg:width="14.362cm" svg:height="11.254cm" svg:x="3.25cm" svg:y="14.128cm" presentation:class="notes" presentation:placeholder="true">
            <draw:text-box/>
          </draw:frame>
        </presentation:notes>
      </draw:page>
      <draw:page draw:name="page1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clients</text:p>
          </draw:text-box>
        </draw:frame>
        <draw:frame presentation:style-name="pr5" draw:text-style-name="P117" draw:layer="layout" svg:width="23.499cm" svg:height="12.18cm" svg:x="3.033cm" svg:y="6.283cm" presentation:class="outline" presentation:user-transformed="true">
          <draw:text-box>
            <text:list text:style-name="L2">
              <text:list-item>
                <text:p text:style-name="P31"><text:span text:style-name="T201">security.protocol=SSL</text:span></text:p>
              </text:list-item>
              <text:list-item>
                <text:p text:style-name="P31"><text:span text:style-name="T201">ssl.truststore.location=/var/private/ssl/client.truststore.jks</text:span></text:p>
              </text:list-item>
              <text:list-item>
                <text:p text:style-name="P31"><text:span text:style-name="T201">ssl.truststore.password=clipass</text:span></text:p>
              </text:list-item>
              <text:list-item>
                <text:p text:style-name="P31"><text:span text:style-name="T201"/></text:p>
              </text:list-item>
              <text:list-item>
                <text:p text:style-name="P31"><text:span text:style-name="T201"/></text:p>
              </text:list-item>
              <text:list-item>
                <text:p text:style-name="P31"><text:span text:style-name="T201"/></text:p>
              </text:list-item>
            </text:list>
          </draw:text-box>
        </draw:frame>
        <presentation:notes draw:style-name="dp9">
          <draw:page-thumbnail draw:style-name="gr2" draw:layer="layout" svg:width="15.597cm" svg:height="10.985cm" svg:x="2.623cm" svg:y="2.258cm" draw:page-number="171" presentation:class="page"/>
          <draw:frame presentation:style-name="pr6" draw:text-style-name="P13"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Authentification des clients via SSL</text:p>
          </draw:text-box>
        </draw:frame>
        <draw:frame presentation:style-name="pr5" draw:layer="layout" svg:width="23.499cm" svg:height="12.18cm" svg:x="3.033cm" svg:y="6.283cm" presentation:class="outline">
          <draw:text-box>
            <text:list text:style-name="L2">
              <text:list-item>
                <text:p>Si l'authentification du client est requise, un <text:span text:style-name="T14">keystore</text:span> doit également être créé et la configuration de <text:span text:style-name="T14">client.properties</text:span> doit contenir :</text:p>
              </text:list-item>
              <text:list-item>
                <text:p text:style-name="P98"><text:span text:style-name="T203">ssl.keystore.location=/var/private/client.keystore.jks</text:span></text:p>
              </text:list-item>
              <text:list-item>
                <text:p text:style-name="P98"><text:span text:style-name="T203">ssl.keystore.password=test1234</text:span></text:p>
              </text:list-item>
              <text:list-item>
                <text:p text:style-name="P98"><text:span text:style-name="T203">ssl.key.password=test1234</text:span></text:p>
              </text:list-item>
            </text:list>
          </draw:text-box>
        </draw:frame>
        <draw:frame draw:style-name="gr95" draw:text-style-name="P59" draw:layer="layout" svg:width="11.733cm" svg:height="1.216cm" svg:x="1.603cm" svg:y="19.4cm">
          <draw:text-box>
            <text:p><text:span text:style-name="T94">Atelier 9.2 : Mise en place SSL</text:span></text:p>
          </draw:text-box>
        </draw:frame>
        <presentation:notes draw:style-name="dp9">
          <draw:page-thumbnail draw:style-name="gr2" draw:layer="layout" svg:width="15.597cm" svg:height="10.985cm" svg:x="2.623cm" svg:y="2.258cm" draw:page-number="172" presentation:class="page"/>
          <draw:frame presentation:style-name="pr6" draw:text-style-name="P13" draw:layer="layout" svg:width="14.362cm" svg:height="11.254cm" svg:x="3.25cm" svg:y="14.128cm" presentation:class="notes" presentation:placeholder="true">
            <draw:text-box/>
          </draw:frame>
        </presentation:notes>
      </draw:page>
      <draw:page draw:name="page17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50" draw:text-style-name="P16" draw:layer="layout" svg:width="23.499cm" svg:height="12.18cm" svg:x="3.033cm" svg:y="6.283cm" presentation:class="subtitle">
          <draw:text-box>
            <text:list text:style-name="L1">
              <text:list-item>
                <text:p text:style-name="P33"><text:span text:style-name="T197"/></text:p>
              </text:list-item>
              <text:list-item>
                <text:p text:style-name="P33"><text:span text:style-name="T197"/></text:p>
              </text:list-item>
              <text:list-item>
                <text:p text:style-name="P19"><text:span text:style-name="T2">Configuration des listeners</text:span></text:p>
              </text:list-item>
              <text:list-item>
                <text:p text:style-name="P33"><text:span text:style-name="T2">SSL/TLS</text:span></text:p>
              </text:list-item>
              <text:list-item>
                <text:p text:style-name="P19"><text:span text:style-name="T198">Authentification via SASL</text:span></text:p>
              </text:list-item>
              <text:list-item>
                <text:p text:style-name="P33"><text:span text:style-name="T199">ACLs</text:span></text:p>
              </text:list-item>
              <text:list-item>
                <text:p text:style-name="P33"><text:span text:style-name="T199">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text:p>
          </draw:text-box>
        </draw:frame>
        <draw:frame presentation:style-name="pr5" draw:layer="layout" svg:width="23.499cm" svg:height="12.18cm" svg:x="3.033cm" svg:y="6.283cm" presentation:class="outline">
          <draw:text-box>
            <text:list text:style-name="L2">
              <text:list-item>
                <text:p><text:span text:style-name="T14">Simple Authentication and Security Layer</text:span> pour <text:span text:style-name="T43">l’authentification</text:span></text:p>
              </text:list-item>
              <text:list-item>
                <text:p>Kafka utilise JAAS pour la configuration SASL.</text:p>
              </text:list-item>
              <text:list-item>
                <text:p>Mécanismes:</text:p>
                <text:list>
                  <text:list-item>
                    <text:p>GSSAPI: Kerberos</text:p>
                  </text:list-item>
                  <text:list-item>
                    <text:p>SCRAM-SHA-256, SCRAM-SHA-512: hashed passwords</text:p>
                  </text:list-item>
                  <text:list-item>
                    <text:p>PLAIN: <text:s/>username/password en clair</text:p>
                  </text:list-item>
                  <text:list-item>
                    <text:p>OAUTHBEARER (Depuis Kafka 3.x)</text:p>
                  </text:list-item>
                </text:list>
              </text:list-item>
            </text:list>
          </draw:text-box>
        </draw:frame>
        <presentation:notes draw:style-name="dp9">
          <draw:page-thumbnail draw:style-name="gr2" draw:layer="layout" svg:width="15.597cm" svg:height="10.985cm" svg:x="2.623cm" svg:y="2.258cm" draw:page-number="174" presentation:class="page"/>
          <draw:frame presentation:style-name="pr6" draw:text-style-name="P13"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JAAS</text:p>
          </draw:text-box>
        </draw:frame>
        <draw:frame presentation:style-name="pr5" draw:layer="layout" svg:width="23.499cm" svg:height="12.18cm" svg:x="3.033cm" svg:y="6.283cm" presentation:class="outline" presentation:user-transformed="true">
          <draw:text-box>
            <text:list text:style-name="L2">
              <text:list-item>
                <text:p>La configuration JAAS s’effectue :</text:p>
                <text:list>
                  <text:list-item>
                    <text:p>Soit via un <text:span text:style-name="T102">fichier jaas</text:span> </text:p>
                    <text:list>
                      <text:list-item>
                        <text:p>La propriété JVM <text:span text:style-name="T204">java.security.auth.login.config</text:span> référence l’emplacement du fichier:</text:p>
                      </text:list-item>
                      <text:list-item>
                        <text:p>Le fichier contient une section <text:span text:style-name="T204">KafkaServer</text:span> pour l’authentification auprès d’un broker</text:p>
                      </text:list-item>
                    </text:list>
                  </text:list-item>
                  <text:list-item>
                    <text:p>Soit par la propriété :<text:line-break/> <text:span text:style-name="T205">listener.name.&lt;listener-name&gt;.&lt;mechanism&gt;.sasl.jaas.config </text:span></text:p>
                  </text:list-item>
                </text:list>
              </text:list-item>
              <text:list-item>
                <text:p><text:span text:style-name="T171"/></text:p>
              </text:list-item>
            </text:list>
          </draw:text-box>
        </draw:frame>
        <presentation:notes draw:style-name="dp9">
          <draw:page-thumbnail draw:style-name="gr2" draw:layer="layout" svg:width="15.597cm" svg:height="10.985cm" svg:x="2.623cm" svg:y="2.258cm" draw:page-number="175" presentation:class="page"/>
          <draw:frame presentation:style-name="pr6" draw:text-style-name="P13"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 JAAS</text:p>
          </draw:text-box>
        </draw:frame>
        <draw:frame presentation:style-name="pr5" draw:layer="layout" svg:width="23.499cm" svg:height="12.18cm" svg:x="3.033cm" svg:y="6.283cm" presentation:class="outline" presentation:user-transformed="true">
          <draw:text-box>
            <text:list text:style-name="L2">
              <text:list-item>
                <text:p text:style-name="P24">L’exemple suivant définit 2 utilisateurs admin et alice <text:s/>qui pourront accéder au broker et l’identité avec laquelle le broker initiera les requêtes inter-broker</text:p>
              </text:list-item>
              <text:list-item>
                <text:p text:style-name="P118"><text:span text:style-name="T171">KafkaServer {</text:span></text:p>
              </text:list-item>
              <text:list-item>
                <text:p text:style-name="P118"><text:span text:style-name="T171"><text:s text:c="4"/></text:span><text:span text:style-name="T171">org.apache.kafka.common.security.plain.PlainLoginModule required</text:span></text:p>
              </text:list-item>
              <text:list-item>
                <text:p text:style-name="P118"><text:span text:style-name="T171"><text:s text:c="4"/></text:span><text:span text:style-name="T171">username="admin"</text:span></text:p>
              </text:list-item>
              <text:list-item>
                <text:p text:style-name="P118"><text:span text:style-name="T171"><text:s text:c="4"/></text:span><text:span text:style-name="T171">password="admin-secret"</text:span></text:p>
              </text:list-item>
              <text:list-item>
                <text:p text:style-name="P118"><text:span text:style-name="T171"><text:s text:c="4"/></text:span><text:span text:style-name="T171">user_admin="admin-secret"</text:span></text:p>
              </text:list-item>
              <text:list-item>
                <text:p text:style-name="P118"><text:span text:style-name="T171"><text:s text:c="4"/></text:span><text:span text:style-name="T171">user_alice="alice-secret";</text:span></text:p>
              </text:list-item>
              <text:list-item>
                <text:p text:style-name="P118"><text:span text:style-name="T171">};</text:span></text:p>
                <text:list>
                  <text:list-item>
                    <text:p><text:span text:style-name="T171"/></text:p>
                  </text:list-item>
                </text:list>
              </text:list-item>
            </text:list>
          </draw:text-box>
        </draw:frame>
        <presentation:notes draw:style-name="dp9">
          <draw:page-thumbnail draw:style-name="gr2" draw:layer="layout" svg:width="15.597cm" svg:height="10.985cm" svg:x="2.623cm" svg:y="2.258cm" draw:page-number="176" presentation:class="page"/>
          <draw:frame presentation:style-name="pr6" draw:text-style-name="P13" draw:layer="layout" svg:width="14.362cm" svg:height="11.254cm" svg:x="3.25cm" svg:y="14.128cm" presentation:class="notes" presentation:placeholder="true">
            <draw:text-box/>
          </draw:frame>
        </presentation:notes>
      </draw:page>
      <draw:page draw:name="page1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 <text:span text:style-name="T14">sasl.jaas.config</text:span></text:p>
          </draw:text-box>
        </draw:frame>
        <draw:frame presentation:style-name="pr5" draw:layer="layout" svg:width="23.499cm" svg:height="12.18cm" svg:x="3.033cm" svg:y="6.283cm" presentation:class="outline" presentation:user-transformed="true">
          <draw:text-box>
            <text:list text:style-name="L2">
              <text:list-item>
                <text:p>La configuration JAAS peut également s’effectuer dans les propriétés Kafka</text:p>
              </text:list-item>
              <text:list-item>
                <text:p>L’exemple suivant configure le listener SASL_SSL utilisant le mécanisme scram-sha-256</text:p>
              </text:list-item>
              <text:list-item>
                <text:p text:style-name="P98"><text:span text:style-name="T171">listener.name.</text:span><text:span text:style-name="T206">sasl_ssl.scram-sha-</text:span><text:span text:style-name="T206">256.sasl</text:span><text:span text:style-name="T171">.jaas.config=org.apache.kafka.common.security.scram.ScramLoginModule required \</text:span></text:p>
              </text:list-item>
              <text:list-item>
                <text:p text:style-name="P98"><text:span text:style-name="T171"><text:s text:c="4"/></text:span><text:span text:style-name="T171">username="admin" \</text:span></text:p>
              </text:list-item>
              <text:list-item>
                <text:p text:style-name="P98"><text:span text:style-name="T171"><text:s text:c="4"/></text:span><text:span text:style-name="T171">password="admin-secret";</text:span></text:p>
              </text:list-item>
            </text:list>
          </draw:text-box>
        </draw:frame>
        <presentation:notes draw:style-name="dp9">
          <draw:page-thumbnail draw:style-name="gr2" draw:layer="layout" svg:width="15.597cm" svg:height="10.985cm" svg:x="2.623cm" svg:y="2.258cm" draw:page-number="177" presentation:class="page"/>
          <draw:frame presentation:style-name="pr6" draw:text-style-name="P13"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2">
              <text:list-item>
                <text:p><text:span text:style-name="T36">SASL/Kerberos</text:span> : Nécessite un serveur (Active Directory par exemple), d’y créer les Principals représentant les brokers. Tous les hosts kafka doivent être atteignables via leur FQDNs</text:p>
              </text:list-item>
              <text:list-item>
                <text:p><text:span text:style-name="T36">SASL/PLAIN</text:span> est un mécanisme simple d'authentification par login/mot de passe. Il doit être utilisé avec TLS. Kafka fournit une implémentation par défaut qui peut être étendue pour la production</text:p>
              </text:list-item>
              <text:list-item>
                <text:p><text:span text:style-name="T36">SASL/SCRAM (256/512)</text:span> (Salted Challenge Response Authentication Mechanism) : Mot de passe haché stocké dans Zookeeper</text:p>
              </text:list-item>
              <text:list-item>
                <text:p><text:span text:style-name="T36">SASL/OAUTHBEARER</text:span> : Basé sur oAuth2 </text:p>
              </text:list-item>
            </text:list>
          </draw:text-box>
        </draw:frame>
        <presentation:notes draw:style-name="dp9">
          <draw:page-thumbnail draw:style-name="gr2" draw:layer="layout" svg:width="15.597cm" svg:height="10.985cm" svg:x="2.623cm" svg:y="2.258cm" draw:page-number="178" presentation:class="page"/>
          <draw:frame presentation:style-name="pr6" draw:text-style-name="P13"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PLAIN</text:p>
          </draw:text-box>
        </draw:frame>
        <draw:frame presentation:style-name="pr5" draw:layer="layout" svg:width="23.499cm" svg:height="12.18cm" svg:x="3.033cm" svg:y="6.283cm" presentation:class="outline" presentation:user-transformed="true">
          <draw:text-box>
            <text:list text:style-name="L2">
              <text:list-item>
                <text:p>1. Configurer le fichier JAAS</text:p>
              </text:list-item>
              <text:list-item>
                <text:p text:style-name="P98">2. Passer l'emplacement du fichier de configuration JAAS en tant que paramètre JVM à chaque broker <text:line-break/><text:span text:style-name="T207">-Djava.security.auth.login.config=/etc/kafka/kafka_server_jaas.conf</text:span></text:p>
              </text:list-item>
              <text:list-item>
                <text:p text:style-name="P98"><text:span text:style-name="T207"/></text:p>
              </text:list-item>
              <text:list-item>
                <text:p>3. Configurer SASL dans <text:span text:style-name="T14">server.properties</text:span></text:p>
              </text:list-item>
              <text:list-item>
                <text:p text:style-name="P98"><text:span text:style-name="T207">listeners=SASL_SSL://host.name:port</text:span></text:p>
              </text:list-item>
              <text:list-item>
                <text:p text:style-name="P98"><text:span text:style-name="T207">security.inter.broker.protocol=SASL_SSL</text:span></text:p>
              </text:list-item>
              <text:list-item>
                <text:p text:style-name="P98"><text:span text:style-name="T207">sasl.mechanism.inter.broker.protocol=PLAIN</text:span></text:p>
              </text:list-item>
              <text:list-item>
                <text:p text:style-name="P98"><text:span text:style-name="T207">sasl.enabled.mechanisms=PLAIN</text:span></text:p>
              </text:list-item>
            </text:list>
          </draw:text-box>
        </draw:frame>
        <presentation:notes draw:style-name="dp9">
          <draw:page-thumbnail draw:style-name="gr2" draw:layer="layout" svg:width="15.597cm" svg:height="10.985cm" svg:x="2.623cm" svg:y="2.258cm" draw:page-number="179" presentation:class="page"/>
          <draw:frame presentation:style-name="pr6" draw:text-style-name="P13"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95">KafkaClient {</text:span></text:p>
              </text:list-item>
              <text:list-item>
                <text:p><text:span text:style-name="T208"><text:s text:c="2"/></text:span><text:span text:style-name="T208">org.apache.kafka.common.security.plain.PlainLoginModule </text:span><text:span text:style-name="T208">required</text:span><text:span text:style-name="T208"><text:line-break/></text:span><text:span text:style-name="T208">username="alice"</text:span><text:span text:style-name="T208"><text:line-break/></text:span><text:span text:style-name="T208">password="</text:span><text:span text:style-name="T95">alice-secret" </text:span></text:p>
              </text:list-item>
              <text:list-item>
                <text:p><text:span text:style-name="T95">} ;</text:span></text:p>
              </text:list-item>
              <text:list-item>
                <text:p/>
              </text:list-item>
              <text:list-item>
                <text:p>Ajouter un paramètre JVM </text:p>
              </text:list-item>
              <text:list-item>
                <text:p><text:span text:style-name="T209">-Djava.security.auth.login.config=/home/ubuntu/ssl/</text:span><text:span text:style-name="T209">client_jaas.conf</text:span></text:p>
              </text:list-item>
              <text:list-item>
                <text:p><text:span text:style-name="T14">client.properties</text:span></text:p>
              </text:list-item>
              <text:list-item>
                <text:p text:style-name="P31"><text:span text:style-name="T95"><text:s/></text:span><text:span text:style-name="T95">security.protocol=SASL_SSL</text:span></text:p>
              </text:list-item>
              <text:list-item>
                <text:p text:style-name="P31"><text:span text:style-name="T95"><text:s/></text:span><text:span text:style-name="T95">sasl.mechanisms=PLAIN</text:span></text:p>
              </text:list-item>
            </text:list>
          </draw:text-box>
        </draw:frame>
        <presentation:notes draw:style-name="dp9">
          <draw:page-thumbnail draw:style-name="gr2" draw:layer="layout" svg:width="15.597cm" svg:height="10.985cm" svg:x="2.623cm" svg:y="2.258cm" draw:page-number="180" presentation:class="page"/>
          <draw:frame presentation:style-name="pr6" draw:text-style-name="P13"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PLAIN en production</text:p>
          </draw:text-box>
        </draw:frame>
        <draw:frame presentation:style-name="pr5" draw:layer="layout" svg:width="23.499cm" svg:height="12.18cm" svg:x="3.033cm" svg:y="6.283cm" presentation:class="outline" presentation:user-transformed="true">
          <draw:text-box>
            <text:list text:style-name="L2">
              <text:list-item>
                <text:p>Doit être utilisé avec SSL</text:p>
              </text:list-item>
              <text:list-item>
                <text:p>Possibilité d’éviter de stocker des mots de passe clairs en configurant des <text:span text:style-name="T14">callback handler</text:span> qui obtiennent le nom d'utilisateur et le mot de passe d'une source externe via :<text:line-break/><text:span text:style-name="T36">sasl.server.callback.handler.class</text:span> <text:line-break/>et <text:line-break/><text:span text:style-name="T36">sasl.client.callback.handler.class.</text:span></text:p>
              </text:list-item>
              <text:list-item>
                <text:p>Possibilité d’intégrer des <text:span text:style-name="T14">callback handler</text:span> utilisant des serveurs d'authentification externes pour la vérification du mot de passe via<text:span text:style-name="T36"> </text:span><text:span text:style-name="T36"><text:line-break/></text:span><text:span text:style-name="T36">sasl.server.callback.handler.class</text:span></text:p>
              </text:list-item>
            </text:list>
          </draw:text-box>
        </draw:frame>
        <presentation:notes draw:style-name="dp9">
          <draw:page-thumbnail draw:style-name="gr2" draw:layer="layout" svg:width="15.597cm" svg:height="10.985cm" svg:x="2.623cm" svg:y="2.258cm" draw:page-number="181" presentation:class="page"/>
          <draw:frame presentation:style-name="pr6" draw:text-style-name="P13"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oAuth</text:p>
          </draw:text-box>
        </draw:frame>
        <draw:frame presentation:style-name="pr5" draw:text-style-name="P104" draw:layer="layout" svg:width="23.499cm" svg:height="12.18cm" svg:x="3.033cm" svg:y="6.283cm" presentation:class="outline" presentation:user-transformed="true">
          <draw:text-box>
            <text:list text:style-name="L2">
              <text:list-item>
                <text:p text:style-name="P98"><text:span text:style-name="T210"># Activer SASL</text:span></text:p>
              </text:list-item>
              <text:list-item>
                <text:p text:style-name="P98"><text:span text:style-name="T201">listeners=SASL_PLAINTEXT://:9092</text:span></text:p>
              </text:list-item>
              <text:list-item>
                <text:p text:style-name="P98"><text:span text:style-name="T201">listener.security.protocol.map=SASL_PLAINTEXT:SASL_PLAINTEXT</text:span></text:p>
              </text:list-item>
              <text:list-item>
                <text:p text:style-name="P98"><text:span text:style-name="T211">sasl.enabled.mechanisms=OAUTHBEARER</text:span></text:p>
              </text:list-item>
              <text:list-item>
                <text:p text:style-name="P98"><text:span text:style-name="T201">inter.broker.listener.name=SASL_PLAINTEXT</text:span></text:p>
              </text:list-item>
              <text:list-item>
                <text:p text:style-name="P98"><text:span text:style-name="T97"/></text:p>
              </text:list-item>
              <text:list-item>
                <text:p text:style-name="P98"><text:span text:style-name="T210"># Config OAuth</text:span></text:p>
              </text:list-item>
              <text:list-item>
                <text:p text:style-name="P98"><text:span text:style-name="T211">sasl.server.callback.handler.class=org.apache.kafka.common.security.oa</text:span><text:span text:style-name="T211">uthbearer.OAuthBearerValidatorCallbackHandler</text:span></text:p>
              </text:list-item>
              <text:list-item>
                <text:p text:style-name="P98"><text:span text:style-name="T97"/></text:p>
              </text:list-item>
              <text:list-item>
                <text:p text:style-name="P98"><text:span text:style-name="T210"># Vérification des JWT avec JWKS de Keycloak</text:span></text:p>
              </text:list-item>
              <text:list-item>
                <text:p text:style-name="P98"><text:span text:style-name="T211">oauthbearer.jwks.endpoint.url=https://&lt;keycloak-host&gt;/realms/&lt;realm&gt;/</text:span><text:span text:style-name="T211">protocol/openid-connect/certs</text:span></text:p>
              </text:list-item>
              <text:list-item>
                <text:p text:style-name="P98"><text:span text:style-name="T97"/></text:p>
              </text:list-item>
              <text:list-item>
                <text:p text:style-name="P98"><text:span text:style-name="T210"># Optionnel : audience/issuer</text:span></text:p>
              </text:list-item>
              <text:list-item>
                <text:p text:style-name="P98"><text:span text:style-name="T201">oauthbearer.jwks.endpoint.refresh.ms=3600000</text:span></text:p>
              </text:list-item>
              <text:list-item>
                <text:p text:style-name="P98"><text:span text:style-name="T201">oauthbearer.expected.audience=kafka-clients</text:span></text:p>
              </text:list-item>
              <text:list-item>
                <text:p text:style-name="P98"><text:span text:style-name="T201">oauthbearer.expected.issuer=https://&lt;keycloak-host&gt;/realms/&lt;realm&gt;</text:span></text:p>
              </text:list-item>
            </text:list>
          </draw:text-box>
        </draw:frame>
        <presentation:notes draw:style-name="dp9">
          <draw:page-thumbnail draw:style-name="gr2" draw:layer="layout" svg:width="15.597cm" svg:height="10.985cm" svg:x="2.623cm" svg:y="2.258cm" draw:page-number="182" presentation:class="page"/>
          <draw:frame presentation:style-name="pr6" draw:text-style-name="P13" draw:layer="layout" svg:width="14.362cm" svg:height="11.254cm" svg:x="3.25cm" svg:y="14.128cm" presentation:class="notes" presentation:placeholder="true">
            <draw:text-box/>
          </draw:frame>
        </presentation:notes>
      </draw:page>
      <draw:page draw:name="page18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51" draw:text-style-name="P16" draw:layer="layout" svg:width="23.499cm" svg:height="12.18cm" svg:x="3.033cm" svg:y="6.283cm" presentation:class="subtitle">
          <draw:text-box>
            <text:list text:style-name="L1">
              <text:list-item>
                <text:p text:style-name="P33"><text:span text:style-name="T197"/></text:p>
              </text:list-item>
              <text:list-item>
                <text:p text:style-name="P33"><text:span text:style-name="T197"/></text:p>
              </text:list-item>
              <text:list-item>
                <text:p text:style-name="P19"><text:span text:style-name="T2">Configuration des listeners</text:span></text:p>
              </text:list-item>
              <text:list-item>
                <text:p text:style-name="P33"><text:span text:style-name="T2">SSL/TLS</text:span></text:p>
              </text:list-item>
              <text:list-item>
                <text:p text:style-name="P19"><text:span text:style-name="T2">Authentification via SASL</text:span></text:p>
              </text:list-item>
              <text:list-item>
                <text:p text:style-name="P19"><text:span text:style-name="T198">ACLs</text:span></text:p>
              </text:list-item>
              <text:list-item>
                <text:p text:style-name="P19"><text:span text:style-name="T2">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8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brokers Kafka gèrent le contrôle d'accès à l'aide d'une API définie par l’interface <text:span text:style-name="T14">org.apache.kafka.server.authorizer.Authorizer</text:span></text:p>
              </text:list-item>
              <text:list-item>
                <text:p>L’implémentation est configurée via la propriété : <text:span text:style-name="T200">authorizer.class.name</text:span></text:p>
              </text:list-item>
              <text:list-item>
                <text:p>Kafka fournit 2 implémentations</text:p>
                <text:list>
                  <text:list-item>
                    <text:p>Pour Zookeeper, <text:line-break/><text:span text:style-name="T212">kafka.security.authorizer.AclAuthorizer</text:span></text:p>
                  </text:list-item>
                  <text:list-item>
                    <text:p>En kraft mode<text:line-break/><text:span text:style-name="T212">org.apache.kafka.metadata.authorizer.StandardAuthorizer</text:span><text:line-break/></text:p>
                  </text:list-item>
                </text:list>
              </text:list-item>
            </text:list>
          </draw:text-box>
        </draw:frame>
        <presentation:notes draw:style-name="dp5">
          <draw:page-thumbnail draw:style-name="gr2" draw:layer="layout" svg:width="15.597cm" svg:height="10.985cm" svg:x="2.623cm" svg:y="2.258cm" draw:page-number="184" presentation:class="page"/>
          <draw:frame presentation:style-name="pr6" draw:text-style-name="P13"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draw:text-box>
            <text:list text:style-name="L2">
              <text:list-item>
                <text:p>Dés lors que les ACLs sont activées, les contrôleurs doivent s’identifier pour communiquer.</text:p>
              </text:list-item>
              <text:list-item>
                <text:p>Par exemple pour SASL_PLAIN :</text:p>
              </text:list-item>
              <text:list-item>
                <text:p text:style-name="P98"><text:span text:style-name="T97">controller.listener.names=CONTROLLER</text:span></text:p>
              </text:list-item>
              <text:list-item>
                <text:p text:style-name="P98"><text:span text:style-name="T97">listener.security.protocol.map=CONTROLLER:SASL_SSL,</text:span><text:span text:style-name="T97">…</text:span></text:p>
              </text:list-item>
              <text:list-item>
                <text:p text:style-name="P98"><text:span text:style-name="T97">sasl.mechanism.controller.protocol=PLAIN</text:span></text:p>
              </text:list-item>
              <text:list-item>
                <text:p/>
              </text:list-item>
              <text:list-item>
                <text:p>Le fichier JAAS contient une section pour le contrôleur préfixé avec le nom du listener</text:p>
              </text:list-item>
              <text:list-item>
                <text:p text:style-name="P98"><text:span text:style-name="T95">controller.KafkaServer {</text:span></text:p>
              </text:list-item>
              <text:list-item>
                <text:p text:style-name="P98"><text:span text:style-name="T95"><text:s text:c="4"/></text:span><text:span text:style-name="T95">org.apache.kafka.common.security.plain.PlainLoginModule </text:span><text:span text:style-name="T95">required</text:span></text:p>
              </text:list-item>
              <text:list-item>
                <text:p text:style-name="P98"><text:span text:style-name="T95"><text:s text:c="4"/></text:span><text:span text:style-name="T95">username="admin"</text:span></text:p>
              </text:list-item>
              <text:list-item>
                <text:p text:style-name="P98"><text:span text:style-name="T95"><text:s text:c="4"/></text:span><text:span text:style-name="T95">password="admin-secret"</text:span></text:p>
              </text:list-item>
              <text:list-item>
                <text:p text:style-name="P98"><text:span text:style-name="T95"><text:s text:c="4"/></text:span><text:span text:style-name="T95">user_admin="admin-secret";</text:span></text:p>
              </text:list-item>
              <text:list-item>
                <text:p text:style-name="P98"><text:span text:style-name="T95">};</text:span></text:p>
              </text:list-item>
            </text:list>
          </draw:text-box>
        </draw:frame>
        <presentation:notes draw:style-name="dp5">
          <draw:page-thumbnail draw:style-name="gr2" draw:layer="layout" svg:width="15.597cm" svg:height="10.985cm" svg:x="2.623cm" svg:y="2.258cm" draw:page-number="185" presentation:class="page"/>
          <draw:frame presentation:style-name="pr6" draw:text-style-name="P13"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orisation</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26">Les ACLs sont stockées dans les méta-données gérées par </text:span><text:span text:style-name="T26">les contrôleurs et peuvent être gérées par l’</text:span>utilitaire <text:span text:style-name="T204">kafka-acls.sh</text:span> </text:p>
              </text:list-item>
              <text:list-item>
                <text:p>Chaque requête Kafka est autorisée si le <text:span text:style-name="T14">KafkaPrincipal</text:span> associé à la connexion a les autorisations pour effectuer l'opération demandée sur les ressources demandées.</text:p>
              </text:list-item>
              <text:list-item>
                <text:p>Les règles peuvent être exprimées comme suit :</text:p>
              </text:list-item>
              <text:list-item>
                <text:p><text:span text:style-name="T14">Principal P is [Allowed/Denied] Operation O From Host H on </text:span><text:span text:style-name="T14">any Resource R matching ResourcePattern RP</text:span></text:p>
                <text:p/>
              </text:list-item>
            </text:list>
          </draw:text-box>
        </draw:frame>
        <presentation:notes draw:style-name="dp9">
          <draw:page-thumbnail draw:style-name="gr2" draw:layer="layout" svg:width="15.597cm" svg:height="10.985cm" svg:x="2.623cm" svg:y="2.258cm" draw:page-number="186" presentation:class="page"/>
          <draw:frame presentation:style-name="pr6" draw:text-style-name="P13"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4">Principals User:Bob et User:Alice sont autorisés à effectuer </text:span><text:span text:style-name="T14">les opérations Read et Write sur le Topic Test-Topic à </text:span><text:span text:style-name="T14">partir des IP 198.51.100.0 et IP 198.51.100.1</text:span></text:p>
              </text:list-item>
              <text:list-item>
                <text:p/>
              </text:list-item>
              <text:list-item>
                <text:p><text:s/><text:span text:style-name="T97">bin/kafka-acls.sh –bootstrap-servers </text:span><text:span text:style-name="T97">localhost:9092 --add --allow-principal User:Bob </text:span><text:span text:style-name="T97">--allow-principal User:Alice --allow-host </text:span><text:span text:style-name="T97">198.51.100.0 --allow-host 198.51.100.1 --</text:span><text:span text:style-name="T97">operation Read --operation Write --topic Test-</text:span><text:span text:style-name="T97">topic</text:span></text:p>
              </text:list-item>
            </text:list>
          </draw:text-box>
        </draw:frame>
        <presentation:notes draw:style-name="dp9">
          <draw:page-thumbnail draw:style-name="gr2" draw:layer="layout" svg:width="15.597cm" svg:height="10.985cm" svg:x="2.623cm" svg:y="2.258cm" draw:page-number="187" presentation:class="page"/>
          <draw:frame presentation:style-name="pr6" draw:text-style-name="P13"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ssources et opérations</text:p>
          </draw:text-box>
        </draw:frame>
        <draw:frame presentation:style-name="pr5" draw:layer="layout" svg:width="23.499cm" svg:height="12.18cm" svg:x="3.033cm" svg:y="6.283cm" presentation:class="outline">
          <draw:text-box>
            <text:list text:style-name="L2">
              <text:list-item>
                <text:p>Chaque ACL consiste en :</text:p>
                <text:list>
                  <text:list-item>
                    <text:p><text:span text:style-name="T213">Type de ressource</text:span> : <text:span text:style-name="T14">Cluster | Topic | Group | </text:span><text:span text:style-name="T14">TransactionalId</text:span></text:p>
                  </text:list-item>
                  <text:list-item>
                    <text:p><text:span text:style-name="T213">Type</text:span> <text:span text:style-name="T213">de</text:span> <text:span text:style-name="T213">pattern</text:span> : <text:span text:style-name="T14">Literal | Prefixed</text:span></text:p>
                  </text:list-item>
                  <text:list-item>
                    <text:p><text:span text:style-name="T213">Nom</text:span> <text:span text:style-name="T213">de la ressource</text:span> : Possibilité d’utiliser les wildcards</text:p>
                  </text:list-item>
                  <text:list-item>
                    <text:p><text:span text:style-name="T213">Opération</text:span> : <text:span text:style-name="T14">Describe | Create | Delete | Alter | Read | Write </text:span><text:span text:style-name="T14">| DescribeConfigs | AlterConfigs</text:span></text:p>
                  </text:list-item>
                  <text:list-item>
                    <text:p><text:span text:style-name="T213">Type de permission</text:span> : <text:span text:style-name="T14">Allow | Deny</text:span></text:p>
                  </text:list-item>
                  <text:list-item>
                    <text:p><text:span text:style-name="T213">Principal</text:span> : De la forme <text:span text:style-name="T14">&lt;principalType&gt;:&lt;principalName&gt;</text:span><text:line-break/>Exemple : <text:span text:style-name="T14">User:Alice, Group:Sales, User :*</text:span></text:p>
                  </text:list-item>
                  <text:list-item>
                    <text:p><text:span text:style-name="T213">Host</text:span> : Adresse IP du client, * si tout le monde</text:p>
                  </text:list-item>
                </text:list>
              </text:list-item>
              <text:list-item>
                <text:p>Exemple Complet :<text:line-break/><text:span text:style-name="T14">User:Alice has Allow permission for Write to Prefixed </text:span><text:span text:style-name="T14">Topic:customer from 192.168.0.1</text:span></text:p>
              </text:list-item>
            </text:list>
          </draw:text-box>
        </draw:frame>
        <presentation:notes draw:style-name="dp2">
          <draw:page-thumbnail draw:style-name="gr2" draw:layer="layout" svg:width="15.597cm" svg:height="10.985cm" svg:x="2.623cm" svg:y="2.258cm" draw:page-number="188" presentation:class="page"/>
          <draw:frame presentation:style-name="pr6" draw:text-style-name="P13"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ègles</text:p>
          </draw:text-box>
        </draw:frame>
        <draw:frame presentation:style-name="pr5" draw:layer="layout" svg:width="23.499cm" svg:height="12.18cm" svg:x="3.033cm" svg:y="6.283cm" presentation:class="outline" presentation:user-transformed="true">
          <draw:text-box>
            <text:list text:style-name="L2">
              <text:list-item>
                <text:p><text:span text:style-name="T14">AclAuthorizer</text:span> autorise une action s'il n'y a pas d'ACL de DENY qui corresponde à l'action et qu'il y a au moins une ACL ALLOW qui correspond à l'action.</text:p>
                <text:list>
                  <text:list-item>
                    <text:p>L'autorisation <text:span text:style-name="T14">Describe</text:span> est implicitement accordée si l'autorisation Read, Write, Alter ou Delete est accordée.</text:p>
                  </text:list-item>
                  <text:list-item>
                    <text:p>L'autorisation <text:span text:style-name="T14">Describe Configs</text:span> est implicitement accordée si l'autorisation AlterConfigs est accordée.</text:p>
                  </text:list-item>
                </text:list>
              </text:list-item>
            </text:list>
          </draw:text-box>
        </draw:frame>
        <presentation:notes draw:style-name="dp2">
          <draw:page-thumbnail draw:style-name="gr2" draw:layer="layout" svg:width="15.597cm" svg:height="10.985cm" svg:x="2.623cm" svg:y="2.258cm" draw:page-number="189" presentation:class="page"/>
          <draw:frame presentation:style-name="pr6" draw:text-style-name="P13"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ermissions clientes</text:p>
          </draw:text-box>
        </draw:frame>
        <draw:frame presentation:style-name="pr5" draw:layer="layout" svg:width="23.499cm" svg:height="12.18cm" svg:x="3.033cm" svg:y="6.283cm" presentation:class="outline">
          <draw:text-box>
            <text:list text:style-name="L2">
              <text:list-item>
                <text:p>Brokers : <text:span text:style-name="T200">Cluster:ClusterAction</text:span> pour autoriser les requêtes de contrôleur et les requêtes de fetch des répliques. </text:p>
              </text:list-item>
              <text:list-item>
                <text:p>Producteurs simples : <text:span text:style-name="T200">Topic:Write</text:span><text:span text:style-name="T213"> </text:span></text:p>
                <text:list>
                  <text:list-item>
                    <text:p>idempotents sans transactions : <text:span text:style-name="T200">Cluster:IdempotentWrite</text:span>.</text:p>
                  </text:list-item>
                  <text:list-item>
                    <text:p>Transactionnels : <text:span text:style-name="T200">TransactionalId:Write</text:span> à la transaction et <text:span text:style-name="T200">Group:Read</text:span> pour que les groupes de consommateurs valident les offsets. </text:p>
                  </text:list-item>
                </text:list>
              </text:list-item>
              <text:list-item>
                <text:p>Consommateurs : <text:span text:style-name="T200">Topic:Read</text:span> et <text:span text:style-name="T200">Group:Read</text:span> s'ils utilisent la gestion de groupe ou la gestion des offsets. </text:p>
              </text:list-item>
              <text:list-item>
                <text:p>Clients admin : <text:span text:style-name="T200">Create, Delete, Describe, Alter, </text:span><text:span text:style-name="T200">DescribeConfigs, AlterConfigs</text:span> .</text:p>
              </text:list-item>
            </text:list>
          </draw:text-box>
        </draw:frame>
        <presentation:notes draw:style-name="dp2">
          <draw:page-thumbnail draw:style-name="gr2" draw:layer="layout" svg:width="15.597cm" svg:height="10.985cm" svg:x="2.623cm" svg:y="2.258cm" draw:page-number="190" presentation:class="page"/>
          <draw:frame presentation:style-name="pr6" draw:text-style-name="P13"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ceptions</text:p>
          </draw:text-box>
        </draw:frame>
        <draw:frame presentation:style-name="pr5" draw:layer="layout" svg:width="23.499cm" svg:height="12.18cm" svg:x="3.033cm" svg:y="6.283cm" presentation:class="outline">
          <draw:text-box>
            <text:list text:style-name="L2">
              <text:list-item>
                <text:p>2 options de configuration permettant d’accorder un large accès aux ressources permet de simplifier la <text:s/>mise en place d’ACL à des clusters existants :</text:p>
                <text:list>
                  <text:list-item>
                    <text:p><text:span text:style-name="T200">super.users</text:span> : Pemet de définir les utilisateurs ayant droit à tout</text:p>
                  </text:list-item>
                  <text:list-item>
                    <text:p><text:span text:style-name="T200">allow.everyone.if.no.acl.found=true</text:span> : <text:line-break/>Tous les utilisateurs ont accès aux ressources sans ACL.</text:p>
                  </text:list-item>
                </text:list>
              </text:list-item>
            </text:list>
          </draw:text-box>
        </draw:frame>
        <presentation:notes draw:style-name="dp2">
          <draw:page-thumbnail draw:style-name="gr2" draw:layer="layout" svg:width="15.597cm" svg:height="10.985cm" svg:x="2.623cm" svg:y="2.258cm" draw:page-number="191" presentation:class="page"/>
          <draw:frame presentation:style-name="pr6" draw:text-style-name="P13"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dit</text:p>
          </draw:text-box>
        </draw:frame>
        <draw:frame presentation:style-name="pr5" draw:layer="layout" svg:width="23.499cm" svg:height="12.18cm" svg:x="3.033cm" svg:y="6.283cm" presentation:class="outline">
          <draw:text-box>
            <text:list text:style-name="L2">
              <text:list-item>
                <text:p>Les brokers peuvent être configurés pour générés des traces d’audit.</text:p>
              </text:list-item>
              <text:list-item>
                <text:p>La configuration s’effectue dans <text:span text:style-name="T14">conf/log4j.properties</text:span></text:p>
                <text:list>
                  <text:list-item>
                    <text:p>Le fichier par défaut est <text:span text:style-name="T14">kafka-authorizer.log</text:span></text:p>
                  </text:list-item>
                  <text:list-item>
                    <text:p>Le niveau INFO trace les entrées pour chaque refus</text:p>
                  </text:list-item>
                  <text:list-item>
                    <text:p>Le niveau DEBUG pour chaque requête acceptée</text:p>
                  </text:list-item>
                </text:list>
              </text:list-item>
              <text:list-item>
                <text:p/>
              </text:list-item>
            </text:list>
          </draw:text-box>
        </draw:frame>
        <draw:frame draw:style-name="gr96" draw:text-style-name="P59" draw:layer="layout" svg:width="13.901cm" svg:height="1.216cm" svg:x="1.604cm" svg:y="19.4cm">
          <draw:text-box>
            <text:p><text:span text:style-name="T94">Atelier 7.4 : Autorisation</text:span></text:p>
          </draw:text-box>
        </draw:frame>
        <presentation:notes draw:style-name="dp2">
          <draw:page-thumbnail draw:style-name="gr2" draw:layer="layout" svg:width="15.597cm" svg:height="10.985cm" svg:x="2.623cm" svg:y="2.258cm" draw:page-number="192" presentation:class="page"/>
          <draw:frame presentation:style-name="pr6" draw:text-style-name="P13" draw:layer="layout" svg:width="14.362cm" svg:height="11.254cm" svg:x="3.25cm" svg:y="14.128cm" presentation:class="notes" presentation:placeholder="true">
            <draw:text-box/>
          </draw:frame>
        </presentation:notes>
      </draw:page>
      <draw:page draw:name="page19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Sécurité</text:span></text:p>
              </text:list-header>
            </text:list>
          </draw:text-box>
        </draw:frame>
        <draw:frame presentation:style-name="pr52" draw:text-style-name="P16" draw:layer="layout" svg:width="23.499cm" svg:height="12.18cm" svg:x="3.033cm" svg:y="6.283cm" presentation:class="subtitle">
          <draw:text-box>
            <text:list text:style-name="L1">
              <text:list-item>
                <text:p text:style-name="P33"><text:span text:style-name="T197"/></text:p>
              </text:list-item>
              <text:list-item>
                <text:p text:style-name="P33"><text:span text:style-name="T197"/></text:p>
              </text:list-item>
              <text:list-item>
                <text:p text:style-name="P19"><text:span text:style-name="T2">Configuration des listeners</text:span></text:p>
              </text:list-item>
              <text:list-item>
                <text:p text:style-name="P33"><text:span text:style-name="T2">SSL/TLS</text:span></text:p>
              </text:list-item>
              <text:list-item>
                <text:p text:style-name="P19"><text:span text:style-name="T2">Authentification via SASL</text:span></text:p>
              </text:list-item>
              <text:list-item>
                <text:p text:style-name="P19"><text:span text:style-name="T2">ACLs</text:span></text:p>
              </text:list-item>
              <text:list-item>
                <text:p text:style-name="P33"><text:span text:style-name="T12">Quotas</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afka permet d'appliquer des quotas sur les requêtes pour contrôler les ressources du broker utilisées par les clients. </text:p>
              </text:list-item>
              <text:list-item>
                <text:p>Deux types de quotas peuvent être appliqués par groupe de client :</text:p>
                <text:list>
                  <text:list-item>
                    <text:p>Les quotas de bande passante réseau définissent des seuils de débit </text:p>
                  </text:list-item>
                  <text:list-item>
                    <text:p>Les quotas de taux de requête définissent les seuils d'utilisation du processeur en pourcentage du réseau et des threads d'E/S</text:p>
                  </text:list-item>
                  <text:list-item>
                    <text:p>Quotas du taux de connexion par IP</text:p>
                  </text:list-item>
                </text:list>
              </text:list-item>
              <text:list-item>
                <text:p>L’identité du client correspond au KafkaPrincipal dans un cluster sécurisé ou la propriété applicative client-id. </text:p>
              </text:list-item>
              <text:list-item>
                <text:p>Tous les clients ayant la même identité partagent leur configuration de quotas</text:p>
              </text:list-item>
            </text:list>
          </draw:text-box>
        </draw:frame>
        <presentation:notes draw:style-name="dp5">
          <draw:page-thumbnail draw:style-name="gr2" draw:layer="layout" svg:width="15.597cm" svg:height="10.985cm" svg:x="2.623cm" svg:y="2.258cm" draw:page-number="194" presentation:class="page"/>
          <draw:frame presentation:style-name="pr6" draw:text-style-name="P13"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Quota de bande passante</text:p>
          </draw:text-box>
        </draw:frame>
        <draw:frame presentation:style-name="pr5" draw:layer="layout" svg:width="23.499cm" svg:height="12.18cm" svg:x="3.033cm" svg:y="6.283cm" presentation:class="outline" presentation:user-transformed="true">
          <draw:text-box>
            <text:list text:style-name="L2">
              <text:list-item>
                <text:p>Le seuil de débit d'octets pour chaque groupe de clients.</text:p>
              </text:list-item>
              <text:list-item>
                <text:p>Chaque groupe peut publier/consommer un maximum de X octets/sec par broker avant d’être limités.</text:p>
              </text:list-item>
              <text:list-item>
                <text:p/>
              </text:list-item>
              <text:list-item>
                <text:p><text:span text:style-name="T201">kafka-configs.sh --bootstrap-server $BOOT --alter --add-config </text:span><text:span text:style-name="T214">'producer_byte_rate=1024,consumer_byte_rate=1024'</text:span><text:span text:style-name="T201"> --entity-type </text:span><text:span text:style-name="T201">users --entity-name &lt;authenticated-principal&gt; --command-config </text:span><text:span text:style-name="T201">/tmp/client.properties</text:span></text:p>
              </text:list-item>
            </text:list>
          </draw:text-box>
        </draw:frame>
        <presentation:notes draw:style-name="dp5">
          <draw:page-thumbnail draw:style-name="gr2" draw:layer="layout" svg:width="15.597cm" svg:height="10.985cm" svg:x="2.623cm" svg:y="2.258cm" draw:page-number="195" presentation:class="page"/>
          <draw:frame presentation:style-name="pr6" draw:text-style-name="P13"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aux de requêtes</text:p>
          </draw:text-box>
        </draw:frame>
        <draw:frame presentation:style-name="pr5" draw:layer="layout" svg:width="23.499cm" svg:height="12.18cm" svg:x="3.033cm" svg:y="6.283cm" presentation:class="outline" presentation:user-transformed="true">
          <draw:text-box>
            <text:list text:style-name="L2">
              <text:list-item>
                <text:p><text:span text:style-name="T26">Définis en pourcentage de temps </text:span>sur les threads d'I/O et de réseau de chaque broker dans une fenêtre temporelle.</text:p>
              </text:list-item>
              <text:list-item>
                <text:p/>
              </text:list-item>
              <text:list-item>
                <text:p><text:span text:style-name="T201">kafka-configs.sh --bootstrap-server $BOOT --alter --add-config </text:span><text:span text:style-name="T214">'request_percentage=150'</text:span><text:span text:style-name="T201"> --entity-type users --entity-name big-</text:span><text:span text:style-name="T201">time-tv-show-host --command-config /tmp/client.properties</text:span></text:p>
              </text:list-item>
            </text:list>
          </draw:text-box>
        </draw:frame>
        <presentation:notes draw:style-name="dp5">
          <draw:page-thumbnail draw:style-name="gr2" draw:layer="layout" svg:width="15.597cm" svg:height="10.985cm" svg:x="2.623cm" svg:y="2.258cm" draw:page-number="196" presentation:class="page"/>
          <draw:frame presentation:style-name="pr6" draw:text-style-name="P13"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des quotas</text:p>
          </draw:text-box>
        </draw:frame>
        <draw:frame presentation:style-name="pr5" draw:layer="layout" svg:width="23.499cm" svg:height="12.18cm" svg:x="3.033cm" svg:y="6.283cm" presentation:class="outline">
          <draw:text-box>
            <text:list text:style-name="L2">
              <text:list-item>
                <text:p>Lorsqu'un broker constate une violation de quota, il calcule une estimation du délai nécessaire pour ramener le client sous son quota.</text:p>
              </text:list-item>
              <text:list-item>
                <text:p>Le broker peut alors :</text:p>
                <text:list>
                  <text:list-item>
                    <text:p>Répondre au client avec une demande de délai</text:p>
                  </text:list-item>
                  <text:list-item>
                    <text:p>Désactiver le canal de la socket</text:p>
                  </text:list-item>
                </text:list>
              </text:list-item>
              <text:list-item>
                <text:p/>
              </text:list-item>
              <text:list-item>
                <text:p>Selon le client (récent ou non), le client peut soit respecter ce délai, soit l'ignorer.</text:p>
              </text:list-item>
            </text:list>
          </draw:text-box>
        </draw:frame>
        <presentation:notes draw:style-name="dp5">
          <draw:page-thumbnail draw:style-name="gr2" draw:layer="layout" svg:width="15.597cm" svg:height="10.985cm" svg:x="2.623cm" svg:y="2.258cm" draw:page-number="197" presentation:class="page"/>
          <draw:frame presentation:style-name="pr6" draw:text-style-name="P13" draw:layer="layout" svg:width="14.362cm" svg:height="11.254cm" svg:x="3.25cm" svg:y="14.128cm" presentation:class="notes" presentation:placeholder="true">
            <draw:text-box/>
          </draw:frame>
        </presentation:notes>
      </draw:page>
      <draw:page draw:name="Slide 2" draw:style-name="dp11" draw:master-page-name="DEFAULT">
        <office:forms form:automatic-focus="false" form:apply-design-mode="false"/>
        <draw:custom-shape draw:name="Shape 15"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1" draw:style-name="gr101" draw:text-style-name="P67" draw:layer="layout" svg:x1="2.197cm" svg:y1="0.7cm" svg:x2="2.198cm" svg:y2="3.108cm">
          <text:p/>
        </draw:line>
        <draw:line draw:name="Shape 12" draw:style-name="gr102" draw:text-style-name="P67" draw:layer="layout" svg:x1="0.89cm" svg:y1="4.34cm" svg:x2="10.394cm" svg:y2="4.341cm">
          <text:p/>
        </draw:line>
        <draw:line draw:name="Shape 13" draw:style-name="gr103" draw:text-style-name="P67" draw:layer="layout" svg:x1="10.394cm" svg:y1="4.34cm" svg:x2="19.304cm" svg:y2="4.341cm">
          <text:p/>
        </draw:line>
        <draw:line draw:name="Shape 14" draw:style-name="gr104" draw:text-style-name="P67" draw:layer="layout" svg:x1="19.305cm" svg:y1="4.339cm" svg:x2="28.809cm" svg:y2="4.34cm">
          <text:p/>
        </draw:line>
        <draw:custom-shape draw:name="Text 1" draw:style-name="gr105" draw:text-style-name="P124" draw:layer="layout" svg:width="22.274cm" svg:height="2.799cm" svg:x="4.454cm" svg:y="1.259cm">
          <text:p text:style-name="P123"><text:span text:style-name="T215">Exploitation au quotid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06" draw:text-style-name="P126" draw:layer="layout" svg:width="23.759cm" svg:height="9.799cm" svg:x="2.969cm" svg:y="6.999cm">
          <text:p text:style-name="P125"><text:span text:style-name="T216">Stockage et rétention</text:span></text:p>
          <text:p text:style-name="P125"><text:span text:style-name="T217">Gestion des topics</text:span></text:p>
          <text:p text:style-name="P125"><text:span text:style-name="T217">Gestion des partitions</text:span></text:p>
          <text:p text:style-name="P125"><text:span text:style-name="T217">Gestion des consumer groups</text:span></text:p>
          <text:p text:style-name="P125"><text:span text:style-name="T217">Ajout et retrait de brokers</text:span></text:p>
          <text:p text:style-name="P125"><text:span text:style-name="T217">Mise à jour du cluster</text:span></text:p>
          <text:p text:style-name="P125"><text:span text:style-name="T217">Sauvegarde et reprise (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07" draw:text-style-name="P128" draw:layer="layout" svg:width="1.484cm" svg:height="0.839cm" svg:x="27.62cm" svg:y="19.739cm">
          <text:p text:style-name="P127"><text:span text:style-name="T21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 draw:style-name="gr2" draw:layer="layout" svg:width="16.799cm" svg:height="10.023cm" svg:x="2.1cm" svg:y="3.712cm" draw:page-number="198" presentation:class="page"/>
          <draw:frame draw:name="Notes Placeholder 1" presentation:style-name="pr53" draw:text-style-name="P129" draw:layer="layout" svg:width="16.799cm" svg:height="11.693cm" svg:x="2.1cm" svg:y="14.293cm" presentation:class="notes" presentation:placeholder="true" presentation:user-transformed="true">
            <draw:text-box/>
          </draw:frame>
          <draw:frame draw:name="Slide Number Placeholder 1" presentation:style-name="pr5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3" draw:style-name="dp11" draw:master-page-name="DEFAULT">
        <office:forms form:automatic-focus="false" form:apply-design-mode="false"/>
        <draw:custom-shape draw:name="Shape 23"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9" draw:style-name="gr101" draw:text-style-name="P67" draw:layer="layout" svg:x1="2.197cm" svg:y1="0.7cm" svg:x2="2.198cm" svg:y2="3.108cm">
          <text:p/>
        </draw:line>
        <draw:line draw:name="Shape 20" draw:style-name="gr102" draw:text-style-name="P67" draw:layer="layout" svg:x1="0.89cm" svg:y1="4.34cm" svg:x2="10.394cm" svg:y2="4.341cm">
          <text:p/>
        </draw:line>
        <draw:line draw:name="Shape 21" draw:style-name="gr103" draw:text-style-name="P67" draw:layer="layout" svg:x1="10.394cm" svg:y1="4.34cm" svg:x2="19.304cm" svg:y2="4.341cm">
          <text:p/>
        </draw:line>
        <draw:line draw:name="Shape 22" draw:style-name="gr104" draw:text-style-name="P67" draw:layer="layout" svg:x1="19.305cm" svg:y1="4.339cm" svg:x2="28.809cm" svg:y2="4.34cm">
          <text:p/>
        </draw:line>
        <draw:custom-shape draw:name="Text 8" draw:style-name="gr108" draw:text-style-name="P124" draw:layer="layout" svg:width="22.274cm" svg:height="2.799cm" svg:x="4.454cm" svg:y="1.259cm">
          <text:p text:style-name="P123"><text:span text:style-name="T215">Segments — rapp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09" draw:text-style-name="P134" draw:layer="layout" svg:width="25.541cm" svg:height="14.559cm" svg:x="2.078cm" svg:y="5.179cm">
          <text:list text:style-name="L26">
            <text:list-item>
              <text:p text:style-name="P132"><text:span text:style-name="T220">La partition est l'unité de stockage de Kafka</text:span></text:p>
            </text:list-item>
            <text:list-item>
              <text:p text:style-name="P132"><text:span text:style-name="T220">Chaque partition est physiquement découpée en segments</text:span></text:p>
            </text:list-item>
            <text:list-item>
              <text:p text:style-name="P132"><text:span text:style-name="T220">Trois critères de fermeture du segment actif :</text:span></text:p>
            </text:list-item>
          </text:list>
          <text:p text:style-name="P133"><text:span text:style-name="T220"><text:s text:c="6"/>– <text:s/></text:span><text:span text:style-name="T220">log.segment.bytes (défaut 1 Go)</text:span></text:p>
          <text:p text:style-name="P133"><text:span text:style-name="T220"><text:s text:c="6"/>– <text:s/></text:span><text:span text:style-name="T220">log.roll.hours (défaut 168h)</text:span></text:p>
          <text:p text:style-name="P133"><text:span text:style-name="T220"><text:s text:c="6"/>– <text:s/></text:span><text:span text:style-name="T220">log.roll.ms (ignoré si log.roll.hours)</text:span></text:p>
          <text:list text:continue-numbering="true" text:style-name="L26">
            <text:list-item>
              <text:p text:style-name="P133"><text:span text:style-name="T220">Un seul segment actif par partition à un instant T</text:span></text:p>
            </text:list-item>
            <text:list-item>
              <text:p text:style-name="P133"><text:span text:style-name="T220">Le segment actif n'est jamais purgé</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10" draw:text-style-name="P128" draw:layer="layout" svg:width="1.484cm" svg:height="0.839cm" svg:x="27.62cm" svg:y="19.739cm">
          <text:p text:style-name="P127"><text:span text:style-name="T21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 draw:style-name="gr2" draw:layer="layout" svg:width="16.799cm" svg:height="10.023cm" svg:x="2.1cm" svg:y="3.712cm" draw:page-number="199" presentation:class="page"/>
          <draw:frame draw:name="Notes Placeholder 3" presentation:style-name="pr55" draw:text-style-name="P129" draw:layer="layout" svg:width="16.799cm" svg:height="11.693cm" svg:x="2.1cm" svg:y="14.293cm" presentation:class="notes" presentation:placeholder="true" presentation:user-transformed="true">
            <draw:text-box/>
          </draw:frame>
          <draw:frame draw:name="Slide Number Placeholder 3" presentation:style-name="pr5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4" draw:style-name="dp11" draw:master-page-name="DEFAULT">
        <office:forms form:automatic-focus="false" form:apply-design-mode="false"/>
        <draw:custom-shape draw:name="Shape 31"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7" draw:style-name="gr101" draw:text-style-name="P67" draw:layer="layout" svg:x1="2.197cm" svg:y1="0.7cm" svg:x2="2.198cm" svg:y2="3.108cm">
          <text:p/>
        </draw:line>
        <draw:line draw:name="Shape 28" draw:style-name="gr102" draw:text-style-name="P67" draw:layer="layout" svg:x1="0.89cm" svg:y1="4.34cm" svg:x2="10.394cm" svg:y2="4.341cm">
          <text:p/>
        </draw:line>
        <draw:line draw:name="Shape 29" draw:style-name="gr103" draw:text-style-name="P67" draw:layer="layout" svg:x1="10.394cm" svg:y1="4.34cm" svg:x2="19.304cm" svg:y2="4.341cm">
          <text:p/>
        </draw:line>
        <draw:line draw:name="Shape 30" draw:style-name="gr104" draw:text-style-name="P67" draw:layer="layout" svg:x1="19.305cm" svg:y1="4.339cm" svg:x2="28.809cm" svg:y2="4.34cm">
          <text:p/>
        </draw:line>
        <draw:custom-shape draw:name="Text 7" draw:style-name="gr111" draw:text-style-name="P124" draw:layer="layout" svg:width="22.274cm" svg:height="2.799cm" svg:x="4.454cm" svg:y="1.259cm">
          <text:p text:style-name="P123"><text:span text:style-name="T215">Politiques de ré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12" draw:text-style-name="P134" draw:layer="layout" svg:width="25.541cm" svg:height="14.559cm" svg:x="2.078cm" svg:y="5.179cm">
          <text:list text:style-name="L26">
            <text:list-item>
              <text:p text:style-name="P132"><text:span text:style-name="T220">Propriété log.cleanup.policy</text:span></text:p>
            </text:list-item>
            <text:list-item>
              <text:p text:style-name="P132"><text:span text:style-name="T220">Stratégie delete (défaut)</text:span></text:p>
            </text:list-item>
          </text:list>
          <text:p text:style-name="P133"><text:span text:style-name="T220"><text:s text:c="6"/>– <text:s/></text:span><text:span text:style-name="T220">Suppression sur âge ou taille</text:span></text:p>
          <text:p text:style-name="P133"><text:span text:style-name="T220"><text:s text:c="6"/>– <text:s/></text:span><text:span text:style-name="T220">log.retention.hours / .minutes / .ms</text:span></text:p>
          <text:p text:style-name="P133"><text:span text:style-name="T220"><text:s text:c="6"/>– <text:s/></text:span><text:span text:style-name="T220">log.retention.bytes (-1 = infini)</text:span></text:p>
          <text:list text:continue-numbering="true" text:style-name="L26">
            <text:list-item>
              <text:p text:style-name="P133"><text:span text:style-name="T220">Stratégie compact</text:span></text:p>
            </text:list-item>
          </text:list>
          <text:p text:style-name="P133"><text:span text:style-name="T220"><text:s text:c="6"/>– <text:s/></text:span><text:span text:style-name="T220">Conserve uniquement la dernière valeur par clé</text:span></text:p>
          <text:p text:style-name="P133"><text:span text:style-name="T220"><text:s text:c="6"/>– <text:s/></text:span><text:span text:style-name="T220">Nécessite des messages avec clé</text:span></text:p>
          <text:p text:style-name="P133"><text:span text:style-name="T220"><text:s text:c="6"/>– <text:s/></text:span><text:span text:style-name="T220">log.cleaner.enabled=true</text:span></text:p>
          <text:list text:continue-numbering="true" text:style-name="L26">
            <text:list-item>
              <text:p text:style-name="P133"><text:span text:style-name="T220">Combinaison possible : delete and compac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13" draw:text-style-name="P128" draw:layer="layout" svg:width="1.484cm" svg:height="0.839cm" svg:x="27.62cm" svg:y="19.739cm">
          <text:p text:style-name="P127"><text:span text:style-name="T21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 draw:style-name="gr2" draw:layer="layout" svg:width="16.799cm" svg:height="10.023cm" svg:x="2.1cm" svg:y="3.712cm" draw:page-number="200" presentation:class="page"/>
          <draw:frame draw:name="Notes Placeholder 4" presentation:style-name="pr57" draw:text-style-name="P129" draw:layer="layout" svg:width="16.799cm" svg:height="11.693cm" svg:x="2.1cm" svg:y="14.293cm" presentation:class="notes" presentation:placeholder="true" presentation:user-transformed="true">
            <draw:text-box/>
          </draw:frame>
          <draw:frame draw:name="Slide Number Placeholder 4" presentation:style-name="pr5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5" draw:style-name="dp11" draw:master-page-name="DEFAULT">
        <office:forms form:automatic-focus="false" form:apply-design-mode="false"/>
        <draw:custom-shape draw:name="Shape 39"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5" draw:style-name="gr101" draw:text-style-name="P67" draw:layer="layout" svg:x1="2.197cm" svg:y1="0.7cm" svg:x2="2.198cm" svg:y2="3.108cm">
          <text:p/>
        </draw:line>
        <draw:line draw:name="Shape 36" draw:style-name="gr102" draw:text-style-name="P67" draw:layer="layout" svg:x1="0.89cm" svg:y1="4.34cm" svg:x2="10.394cm" svg:y2="4.341cm">
          <text:p/>
        </draw:line>
        <draw:line draw:name="Shape 37" draw:style-name="gr103" draw:text-style-name="P67" draw:layer="layout" svg:x1="10.394cm" svg:y1="4.34cm" svg:x2="19.304cm" svg:y2="4.341cm">
          <text:p/>
        </draw:line>
        <draw:line draw:name="Shape 38" draw:style-name="gr104" draw:text-style-name="P67" draw:layer="layout" svg:x1="19.305cm" svg:y1="4.339cm" svg:x2="28.809cm" svg:y2="4.34cm">
          <text:p/>
        </draw:line>
        <draw:custom-shape draw:name="Text 13" draw:style-name="gr114" draw:text-style-name="P124" draw:layer="layout" svg:width="22.274cm" svg:height="2.799cm" svg:x="4.454cm" svg:y="1.259cm">
          <text:p text:style-name="P123"><text:span text:style-name="T215">Configuration del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15" draw:text-style-name="P134" draw:layer="layout" svg:width="25.541cm" svg:height="14.559cm" svg:x="2.078cm" svg:y="5.179cm">
          <text:list text:style-name="L26">
            <text:list-item>
              <text:p text:style-name="P132"><text:span text:style-name="T220">log.retention.hours (défaut 168 : 7 jours)</text:span></text:p>
            </text:list-item>
            <text:list-item>
              <text:p text:style-name="P132"><text:span text:style-name="T220">log.retention.minutes / log.retention.ms (-1 infini)</text:span></text:p>
            </text:list-item>
            <text:list-item>
              <text:p text:style-name="P132"><text:span text:style-name="T220">log.retention.bytes (défaut -1)</text:span></text:p>
            </text:list-item>
          </text:list>
          <text:p text:style-name="P133"><text:span text:style-name="T220"><text:s text:c="6"/>– <text:s/></text:span><text:span text:style-name="T220">Taille maximale du log</text:span></text:p>
          <text:list text:continue-numbering="true" text:style-name="L26">
            <text:list-item>
              <text:p text:style-name="P133"><text:span text:style-name="T220">offsets.retention.minutes (défaut 10080 : 7 jours)</text:span></text:p>
            </text:list-item>
          </text:list>
          <text:p text:style-name="P133"><text:span text:style-name="T220"><text:s text:c="6"/>– <text:s/></text:span><text:span text:style-name="T220">Durée de conservation des offsets d'un groupe inact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16" draw:text-style-name="P128" draw:layer="layout" svg:width="1.484cm" svg:height="0.839cm" svg:x="27.62cm" svg:y="19.739cm">
          <text:p text:style-name="P127"><text:span text:style-name="T21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 draw:style-name="gr2" draw:layer="layout" svg:width="16.799cm" svg:height="10.023cm" svg:x="2.1cm" svg:y="3.712cm" draw:page-number="201" presentation:class="page"/>
          <draw:frame draw:name="Notes Placeholder 5" presentation:style-name="pr59" draw:text-style-name="P129" draw:layer="layout" svg:width="16.799cm" svg:height="11.693cm" svg:x="2.1cm" svg:y="14.293cm" presentation:class="notes" presentation:placeholder="true" presentation:user-transformed="true">
            <draw:text-box/>
          </draw:frame>
          <draw:frame draw:name="Slide Number Placeholder 5" presentation:style-name="pr6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6" draw:style-name="dp11" draw:master-page-name="DEFAULT">
        <office:forms form:automatic-focus="false" form:apply-design-mode="false"/>
        <draw:custom-shape draw:name="Shape 47"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3" draw:style-name="gr101" draw:text-style-name="P67" draw:layer="layout" svg:x1="2.197cm" svg:y1="0.7cm" svg:x2="2.198cm" svg:y2="3.108cm">
          <text:p/>
        </draw:line>
        <draw:line draw:name="Shape 44" draw:style-name="gr102" draw:text-style-name="P67" draw:layer="layout" svg:x1="0.89cm" svg:y1="4.34cm" svg:x2="10.394cm" svg:y2="4.341cm">
          <text:p/>
        </draw:line>
        <draw:line draw:name="Shape 45" draw:style-name="gr103" draw:text-style-name="P67" draw:layer="layout" svg:x1="10.394cm" svg:y1="4.34cm" svg:x2="19.304cm" svg:y2="4.341cm">
          <text:p/>
        </draw:line>
        <draw:line draw:name="Shape 46" draw:style-name="gr104" draw:text-style-name="P67" draw:layer="layout" svg:x1="19.305cm" svg:y1="4.339cm" svg:x2="28.809cm" svg:y2="4.34cm">
          <text:p/>
        </draw:line>
        <draw:custom-shape draw:name="Text 16" draw:style-name="gr117" draw:text-style-name="P124" draw:layer="layout" svg:width="22.274cm" svg:height="2.799cm" svg:x="4.454cm" svg:y="1.259cm">
          <text:p text:style-name="P123"><text:span text:style-name="T215">Tiered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118" draw:text-style-name="P134" draw:layer="layout" svg:width="25.541cm" svg:height="14.559cm" svg:x="2.078cm" svg:y="5.179cm">
          <text:list text:style-name="L26">
            <text:list-item>
              <text:p text:style-name="P132"><text:span text:style-name="T220">KIP-405, GA en Kafka 3.9+</text:span></text:p>
            </text:list-item>
            <text:list-item>
              <text:p text:style-name="P132"><text:span text:style-name="T220">Principe</text:span></text:p>
            </text:list-item>
          </text:list>
          <text:p text:style-name="P133"><text:span text:style-name="T220"><text:s text:c="6"/>– <text:s/></text:span><text:span text:style-name="T220">Segment actif et récents en local sur le broker</text:span></text:p>
          <text:p text:style-name="P133"><text:span text:style-name="T220"><text:s text:c="6"/>– <text:s/></text:span><text:span text:style-name="T220">Segments anciens déchargés sur stockage objet</text:span></text:p>
          <text:p text:style-name="P133"><text:span text:style-name="T220"><text:s text:c="6"/>– <text:s/></text:span><text:span text:style-name="T220">S3 / GCS / Azure Blob via RemoteStorageManager</text:span></text:p>
          <text:list text:continue-numbering="true" text:style-name="L26">
            <text:list-item>
              <text:p text:style-name="P133"><text:span text:style-name="T220">Activation par topic</text:span></text:p>
            </text:list-item>
          </text:list>
          <text:p text:style-name="P133"><text:span text:style-name="T220"><text:s text:c="6"/>– <text:s/></text:span><text:span text:style-name="T220">remote.storage.enable = true</text:span></text:p>
          <text:p text:style-name="P133"><text:span text:style-name="T220"><text:s text:c="6"/>– <text:s/></text:span><text:span text:style-name="T220">local.retention.ms (durée locale)</text:span></text:p>
          <text:p text:style-name="P133"><text:span text:style-name="T220"><text:s text:c="6"/>– <text:s/></text:span><text:span text:style-name="T220">retention.ms (durée to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119" draw:text-style-name="P128" draw:layer="layout" svg:width="1.484cm" svg:height="0.839cm" svg:x="27.62cm" svg:y="19.739cm">
          <text:p text:style-name="P127"><text:span text:style-name="T21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 draw:style-name="gr2" draw:layer="layout" svg:width="16.799cm" svg:height="10.023cm" svg:x="2.1cm" svg:y="3.712cm" draw:page-number="202" presentation:class="page"/>
          <draw:frame draw:name="Notes Placeholder 6" presentation:style-name="pr61" draw:text-style-name="P129" draw:layer="layout" svg:width="16.799cm" svg:height="11.693cm" svg:x="2.1cm" svg:y="14.293cm" presentation:class="notes" presentation:placeholder="true" presentation:user-transformed="true">
            <draw:text-box/>
          </draw:frame>
          <draw:frame draw:name="Slide Number Placeholder 6" presentation:style-name="pr6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7" draw:style-name="dp11" draw:master-page-name="DEFAULT">
        <office:forms form:automatic-focus="false" form:apply-design-mode="false"/>
        <draw:custom-shape draw:name="Shape 55"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1" draw:style-name="gr101" draw:text-style-name="P67" draw:layer="layout" svg:x1="2.197cm" svg:y1="0.7cm" svg:x2="2.198cm" svg:y2="3.108cm">
          <text:p/>
        </draw:line>
        <draw:line draw:name="Shape 52" draw:style-name="gr102" draw:text-style-name="P67" draw:layer="layout" svg:x1="0.89cm" svg:y1="4.34cm" svg:x2="10.394cm" svg:y2="4.341cm">
          <text:p/>
        </draw:line>
        <draw:line draw:name="Shape 53" draw:style-name="gr103" draw:text-style-name="P67" draw:layer="layout" svg:x1="10.394cm" svg:y1="4.34cm" svg:x2="19.304cm" svg:y2="4.341cm">
          <text:p/>
        </draw:line>
        <draw:line draw:name="Shape 54" draw:style-name="gr104" draw:text-style-name="P67" draw:layer="layout" svg:x1="19.305cm" svg:y1="4.339cm" svg:x2="28.809cm" svg:y2="4.34cm">
          <text:p/>
        </draw:line>
        <draw:custom-shape draw:name="Text 19" draw:style-name="gr120" draw:text-style-name="P124" draw:layer="layout" svg:width="22.274cm" svg:height="2.799cm" svg:x="4.454cm" svg:y="1.259cm">
          <text:p text:style-name="P123"><text:span text:style-name="T215">Tiered Storage — quand l'utili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21" draw:text-style-name="P134" draw:layer="layout" svg:width="25.541cm" svg:height="14.559cm" svg:x="2.078cm" svg:y="5.179cm">
          <text:list text:style-name="L26">
            <text:list-item>
              <text:p text:style-name="P132"><text:span text:style-name="T220">Bénéfices</text:span></text:p>
            </text:list-item>
          </text:list>
          <text:p text:style-name="P133"><text:span text:style-name="T220"><text:s text:c="6"/>– <text:s/></text:span><text:span text:style-name="T220">Rétention longue (mois, années) sans gonfler les disques</text:span></text:p>
          <text:p text:style-name="P133"><text:span text:style-name="T220"><text:s text:c="6"/>– <text:s/></text:span><text:span text:style-name="T220">Scaling indépendant stockage / compute</text:span></text:p>
          <text:p text:style-name="P133"><text:span text:style-name="T220"><text:s text:c="6"/>– <text:s/></text:span><text:span text:style-name="T220">Recovery de broker accélérée</text:span></text:p>
          <text:list text:continue-numbering="true" text:style-name="L26">
            <text:list-item>
              <text:p text:style-name="P133"><text:span text:style-name="T220">Limites actuelles</text:span></text:p>
            </text:list-item>
          </text:list>
          <text:p text:style-name="P133"><text:span text:style-name="T220"><text:s text:c="6"/>– <text:s/></text:span><text:span text:style-name="T220">Non compatible avec la stratégie compact</text:span></text:p>
          <text:p text:style-name="P133"><text:span text:style-name="T220"><text:s text:c="6"/>– <text:s/></text:span><text:span text:style-name="T220">Latence accrue sur la consommation des données froides</text:span></text:p>
          <text:p text:style-name="P133"><text:span text:style-name="T220"><text:s text:c="6"/>– <text:s/></text:span><text:span text:style-name="T220">Dépendance à la disponibilité du backend ob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122" draw:text-style-name="P128" draw:layer="layout" svg:width="1.484cm" svg:height="0.839cm" svg:x="27.62cm" svg:y="19.739cm">
          <text:p text:style-name="P127"><text:span text:style-name="T21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3" draw:text-style-name="P59" draw:layer="layout" svg:width="11.602cm" svg:height="1.216cm" svg:x="1.605cm" svg:y="19.4cm">
          <draw:text-box>
            <text:p><text:span text:style-name="T94">Atelier 10.1 : Rétention des logs</text:span></text:p>
          </draw:text-box>
        </draw:frame>
        <presentation:notes draw:style-name="dp6">
          <office:forms form:automatic-focus="false" form:apply-design-mode="false"/>
          <draw:page-thumbnail draw:name="Slide Image Placeholder 7" draw:style-name="gr2" draw:layer="layout" svg:width="16.799cm" svg:height="10.023cm" svg:x="2.1cm" svg:y="3.712cm" draw:page-number="203" presentation:class="page"/>
          <draw:frame draw:name="Notes Placeholder 7" presentation:style-name="pr63" draw:text-style-name="P129" draw:layer="layout" svg:width="16.799cm" svg:height="11.693cm" svg:x="2.1cm" svg:y="14.293cm" presentation:class="notes" presentation:placeholder="true" presentation:user-transformed="true">
            <draw:text-box/>
          </draw:frame>
          <draw:frame draw:name="Slide Number Placeholder 7" presentation:style-name="pr6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8" draw:style-name="dp11" draw:master-page-name="DEFAULT">
        <office:forms form:automatic-focus="false" form:apply-design-mode="false"/>
        <draw:custom-shape draw:name="Shape 63"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9" draw:style-name="gr101" draw:text-style-name="P67" draw:layer="layout" svg:x1="2.197cm" svg:y1="0.7cm" svg:x2="2.198cm" svg:y2="3.108cm">
          <text:p/>
        </draw:line>
        <draw:line draw:name="Shape 60" draw:style-name="gr102" draw:text-style-name="P67" draw:layer="layout" svg:x1="0.89cm" svg:y1="4.34cm" svg:x2="10.394cm" svg:y2="4.341cm">
          <text:p/>
        </draw:line>
        <draw:line draw:name="Shape 61" draw:style-name="gr103" draw:text-style-name="P67" draw:layer="layout" svg:x1="10.394cm" svg:y1="4.34cm" svg:x2="19.304cm" svg:y2="4.341cm">
          <text:p/>
        </draw:line>
        <draw:line draw:name="Shape 62" draw:style-name="gr104" draw:text-style-name="P67" draw:layer="layout" svg:x1="19.305cm" svg:y1="4.339cm" svg:x2="28.809cm" svg:y2="4.34cm">
          <text:p/>
        </draw:line>
        <draw:custom-shape draw:name="Text 22" draw:style-name="gr124" draw:text-style-name="P124" draw:layer="layout" svg:width="22.274cm" svg:height="2.799cm" svg:x="4.454cm" svg:y="1.259cm">
          <text:p text:style-name="P123"><text:span text:style-name="T215">Exploitation au quotid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125" draw:text-style-name="P126" draw:layer="layout" svg:width="23.759cm" svg:height="9.799cm" svg:x="2.969cm" svg:y="6.999cm">
          <text:p text:style-name="P125"><text:span text:style-name="T217">Stockage et rétention</text:span></text:p>
          <text:p text:style-name="P125"><text:span text:style-name="T216">Gestion des topics</text:span></text:p>
          <text:p text:style-name="P125"><text:span text:style-name="T217">Gestion des partitions</text:span></text:p>
          <text:p text:style-name="P125"><text:span text:style-name="T217">Gestion des consumer groups</text:span></text:p>
          <text:p text:style-name="P125"><text:span text:style-name="T217">Ajout et retrait de brokers</text:span></text:p>
          <text:p text:style-name="P125"><text:span text:style-name="T217">Mise à jour du cluster</text:span></text:p>
          <text:p text:style-name="P125"><text:span text:style-name="T217">Sauvegarde et reprise (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126" draw:text-style-name="P128" draw:layer="layout" svg:width="1.484cm" svg:height="0.839cm" svg:x="27.62cm" svg:y="19.739cm">
          <text:p text:style-name="P127"><text:span text:style-name="T21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8" draw:style-name="gr2" draw:layer="layout" svg:width="16.799cm" svg:height="10.023cm" svg:x="2.1cm" svg:y="3.712cm" draw:page-number="204" presentation:class="page"/>
          <draw:frame draw:name="Notes Placeholder 8" presentation:style-name="pr65" draw:text-style-name="P129" draw:layer="layout" svg:width="16.799cm" svg:height="11.693cm" svg:x="2.1cm" svg:y="14.293cm" presentation:class="notes" presentation:placeholder="true" presentation:user-transformed="true">
            <draw:text-box/>
          </draw:frame>
          <draw:frame draw:name="Slide Number Placeholder 8" presentation:style-name="pr6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9" draw:style-name="dp11" draw:master-page-name="DEFAULT">
        <office:forms form:automatic-focus="false" form:apply-design-mode="false"/>
        <draw:custom-shape draw:name="Shape 71"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7" draw:style-name="gr101" draw:text-style-name="P67" draw:layer="layout" svg:x1="2.197cm" svg:y1="0.7cm" svg:x2="2.198cm" svg:y2="3.108cm">
          <text:p/>
        </draw:line>
        <draw:line draw:name="Shape 68" draw:style-name="gr102" draw:text-style-name="P67" draw:layer="layout" svg:x1="0.89cm" svg:y1="4.34cm" svg:x2="10.394cm" svg:y2="4.341cm">
          <text:p/>
        </draw:line>
        <draw:line draw:name="Shape 69" draw:style-name="gr103" draw:text-style-name="P67" draw:layer="layout" svg:x1="10.394cm" svg:y1="4.34cm" svg:x2="19.304cm" svg:y2="4.341cm">
          <text:p/>
        </draw:line>
        <draw:line draw:name="Shape 70" draw:style-name="gr104" draw:text-style-name="P67" draw:layer="layout" svg:x1="19.305cm" svg:y1="4.339cm" svg:x2="28.809cm" svg:y2="4.34cm">
          <text:p/>
        </draw:line>
        <draw:custom-shape draw:name="Text 25" draw:style-name="gr127" draw:text-style-name="P124" draw:layer="layout" svg:width="22.274cm" svg:height="2.799cm" svg:x="4.454cm" svg:y="1.259cm">
          <text:p text:style-name="P123"><text:span text:style-name="T215">Outill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128" draw:text-style-name="P134" draw:layer="layout" svg:width="25.541cm" svg:height="14.559cm" svg:x="2.078cm" svg:y="5.179cm">
          <text:list text:style-name="L26">
            <text:list-item>
              <text:p text:style-name="P132"><text:span text:style-name="T220">kafka-topics.sh : création, description, ajout de partitions, suppression</text:span></text:p>
            </text:list-item>
            <text:list-item>
              <text:p text:style-name="P132"><text:span text:style-name="T220">kafka-configs.sh : configuration générique (topic, broker, client)</text:span></text:p>
            </text:list-item>
            <text:list-item>
              <text:p text:style-name="P132"><text:span text:style-name="T220">Configurations fréquemment ajustées par topic</text:span></text:p>
            </text:list-item>
          </text:list>
          <text:p text:style-name="P133"><text:span text:style-name="T220"><text:s text:c="6"/>– <text:s/></text:span><text:span text:style-name="T220">retention.ms, retention.bytes</text:span></text:p>
          <text:p text:style-name="P133"><text:span text:style-name="T220"><text:s text:c="6"/>– <text:s/></text:span><text:span text:style-name="T220">cleanup.policy</text:span></text:p>
          <text:p text:style-name="P133"><text:span text:style-name="T220"><text:s text:c="6"/>– <text:s/></text:span><text:span text:style-name="T220">min.insync.replicas</text:span></text:p>
          <text:p text:style-name="P133"><text:span text:style-name="T220"><text:s text:c="6"/>– <text:s/></text:span><text:span text:style-name="T220">segment.bytes, compression.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129" draw:text-style-name="P128" draw:layer="layout" svg:width="1.484cm" svg:height="0.839cm" svg:x="27.62cm" svg:y="19.739cm">
          <text:p text:style-name="P127"><text:span text:style-name="T2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9" draw:style-name="gr2" draw:layer="layout" svg:width="16.799cm" svg:height="10.023cm" svg:x="2.1cm" svg:y="3.712cm" draw:page-number="205" presentation:class="page"/>
          <draw:frame draw:name="Notes Placeholder 9" presentation:style-name="pr67" draw:text-style-name="P129" draw:layer="layout" svg:width="16.799cm" svg:height="11.693cm" svg:x="2.1cm" svg:y="14.293cm" presentation:class="notes" presentation:placeholder="true" presentation:user-transformed="true">
            <draw:text-box/>
          </draw:frame>
          <draw:frame draw:name="Slide Number Placeholder 9" presentation:style-name="pr6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0" draw:style-name="dp11" draw:master-page-name="DEFAULT">
        <office:forms form:automatic-focus="false" form:apply-design-mode="false"/>
        <draw:custom-shape draw:name="Shape 79"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75" draw:style-name="gr101" draw:text-style-name="P67" draw:layer="layout" svg:x1="2.197cm" svg:y1="0.7cm" svg:x2="2.198cm" svg:y2="3.108cm">
          <text:p/>
        </draw:line>
        <draw:line draw:name="Shape 76" draw:style-name="gr102" draw:text-style-name="P67" draw:layer="layout" svg:x1="0.89cm" svg:y1="4.34cm" svg:x2="10.394cm" svg:y2="4.341cm">
          <text:p/>
        </draw:line>
        <draw:line draw:name="Shape 77" draw:style-name="gr103" draw:text-style-name="P67" draw:layer="layout" svg:x1="10.394cm" svg:y1="4.34cm" svg:x2="19.304cm" svg:y2="4.341cm">
          <text:p/>
        </draw:line>
        <draw:line draw:name="Shape 78" draw:style-name="gr104" draw:text-style-name="P67" draw:layer="layout" svg:x1="19.305cm" svg:y1="4.339cm" svg:x2="28.809cm" svg:y2="4.34cm">
          <text:p/>
        </draw:line>
        <draw:custom-shape draw:name="Text 28" draw:style-name="gr130" draw:text-style-name="P124" draw:layer="layout" svg:width="22.274cm" svg:height="2.799cm" svg:x="4.454cm" svg:y="1.259cm">
          <text:p text:style-name="P123"><text:span text:style-name="T215">Création et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9" draw:style-name="gr131" draw:text-style-name="P136" draw:layer="layout" svg:width="26.729cm" svg:height="13.999cm" svg:x="1.484cm" svg:y="5.599cm">
          <text:p text:style-name="P135"><text:span text:style-name="T221">./kafka-topics.sh --bootstrap-server localhost:9092 \</text:span></text:p>
          <text:p text:style-name="P135"><text:span text:style-name="T221"><text:s text:c="3"/></text:span><text:span text:style-name="T221">--create --topic orders \</text:span></text:p>
          <text:p text:style-name="P135"><text:span text:style-name="T221"><text:s text:c="3"/></text:span><text:span text:style-name="T221">--partitions 6 --replication-factor 3</text:span></text:p>
          <text:p text:style-name="P135"><text:span text:style-name="T222"/></text:p>
          <text:p text:style-name="P135"><text:span text:style-name="T221">./kafka-topics.sh --bootstrap-server localhost:9092 \</text:span></text:p>
          <text:p text:style-name="P135"><text:span text:style-name="T221"><text:s text:c="3"/></text:span><text:span text:style-name="T221">--describe --topic or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132" draw:text-style-name="P128" draw:layer="layout" svg:width="1.484cm" svg:height="0.839cm" svg:x="27.62cm" svg:y="19.739cm">
          <text:p text:style-name="P127"><text:span text:style-name="T218">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0" draw:style-name="gr2" draw:layer="layout" svg:width="16.799cm" svg:height="10.023cm" svg:x="2.1cm" svg:y="3.712cm" draw:page-number="206" presentation:class="page"/>
          <draw:frame draw:name="Notes Placeholder 10" presentation:style-name="pr69" draw:text-style-name="P129" draw:layer="layout" svg:width="16.799cm" svg:height="11.693cm" svg:x="2.1cm" svg:y="14.293cm" presentation:class="notes" presentation:placeholder="true" presentation:user-transformed="true">
            <draw:text-box/>
          </draw:frame>
          <draw:frame draw:name="Slide Number Placeholder 10" presentation:style-name="pr7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1" draw:style-name="dp11" draw:master-page-name="DEFAULT">
        <office:forms form:automatic-focus="false" form:apply-design-mode="false"/>
        <draw:custom-shape draw:name="Shape 87"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83" draw:style-name="gr101" draw:text-style-name="P67" draw:layer="layout" svg:x1="2.197cm" svg:y1="0.7cm" svg:x2="2.198cm" svg:y2="3.108cm">
          <text:p/>
        </draw:line>
        <draw:line draw:name="Shape 84" draw:style-name="gr102" draw:text-style-name="P67" draw:layer="layout" svg:x1="0.89cm" svg:y1="4.34cm" svg:x2="10.394cm" svg:y2="4.341cm">
          <text:p/>
        </draw:line>
        <draw:line draw:name="Shape 85" draw:style-name="gr103" draw:text-style-name="P67" draw:layer="layout" svg:x1="10.394cm" svg:y1="4.34cm" svg:x2="19.304cm" svg:y2="4.341cm">
          <text:p/>
        </draw:line>
        <draw:line draw:name="Shape 86" draw:style-name="gr104" draw:text-style-name="P67" draw:layer="layout" svg:x1="19.305cm" svg:y1="4.339cm" svg:x2="28.809cm" svg:y2="4.34cm">
          <text:p/>
        </draw:line>
        <draw:custom-shape draw:name="Text 31" draw:style-name="gr133" draw:text-style-name="P124" draw:layer="layout" svg:width="22.274cm" svg:height="2.799cm" svg:x="4.454cm" svg:y="1.259cm">
          <text:p text:style-name="P123"><text:span text:style-name="T215">Modification de 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134" draw:text-style-name="P136" draw:layer="layout" svg:width="26.729cm" svg:height="13.999cm" svg:x="1.484cm" svg:y="5.599cm">
          <text:p text:style-name="P135"><text:span text:style-name="T223">./kafka-configs.sh --bootstrap-server localhost:9092 \</text:span></text:p>
          <text:p text:style-name="P135"><text:span text:style-name="T223"><text:s text:c="3"/></text:span><text:span text:style-name="T223">--entity-type topics --entity-name orders \</text:span></text:p>
          <text:p text:style-name="P135"><text:span text:style-name="T223"><text:s text:c="3"/></text:span><text:span text:style-name="T223">--alter --add-config retention.ms=604800000,min.insync.replicas=2</text:span></text:p>
          <text:p text:style-name="P135"><text:span text:style-name="T224"/></text:p>
          <text:p text:style-name="P135"><text:span text:style-name="T223">./kafka-configs.sh --bootstrap-server localhost:9092 \</text:span></text:p>
          <text:p text:style-name="P135"><text:span text:style-name="T223"><text:s text:c="3"/></text:span><text:span text:style-name="T223">--entity-type topics --entity-name orders \</text:span></text:p>
          <text:p text:style-name="P135"><text:span text:style-name="T223"><text:s text:c="3"/></text:span><text:span text:style-name="T223">--de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3" draw:style-name="gr135" draw:text-style-name="P128" draw:layer="layout" svg:width="1.484cm" svg:height="0.839cm" svg:x="27.62cm" svg:y="19.739cm">
          <text:p text:style-name="P127"><text:span text:style-name="T21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1" draw:style-name="gr2" draw:layer="layout" svg:width="16.799cm" svg:height="10.023cm" svg:x="2.1cm" svg:y="3.712cm" draw:page-number="207" presentation:class="page"/>
          <draw:frame draw:name="Notes Placeholder 11" presentation:style-name="pr71" draw:text-style-name="P129" draw:layer="layout" svg:width="16.799cm" svg:height="11.693cm" svg:x="2.1cm" svg:y="14.293cm" presentation:class="notes" presentation:placeholder="true" presentation:user-transformed="true">
            <draw:text-box/>
          </draw:frame>
          <draw:frame draw:name="Slide Number Placeholder 11" presentation:style-name="pr7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2" draw:style-name="dp11" draw:master-page-name="DEFAULT">
        <office:forms form:automatic-focus="false" form:apply-design-mode="false"/>
        <draw:custom-shape draw:name="Shape 95"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91" draw:style-name="gr101" draw:text-style-name="P67" draw:layer="layout" svg:x1="2.197cm" svg:y1="0.7cm" svg:x2="2.198cm" svg:y2="3.108cm">
          <text:p/>
        </draw:line>
        <draw:line draw:name="Shape 92" draw:style-name="gr102" draw:text-style-name="P67" draw:layer="layout" svg:x1="0.89cm" svg:y1="4.34cm" svg:x2="10.394cm" svg:y2="4.341cm">
          <text:p/>
        </draw:line>
        <draw:line draw:name="Shape 93" draw:style-name="gr103" draw:text-style-name="P67" draw:layer="layout" svg:x1="10.394cm" svg:y1="4.34cm" svg:x2="19.304cm" svg:y2="4.341cm">
          <text:p/>
        </draw:line>
        <draw:line draw:name="Shape 94" draw:style-name="gr104" draw:text-style-name="P67" draw:layer="layout" svg:x1="19.305cm" svg:y1="4.339cm" svg:x2="28.809cm" svg:y2="4.34cm">
          <text:p/>
        </draw:line>
        <draw:custom-shape draw:name="Text 34" draw:style-name="gr136" draw:text-style-name="P124" draw:layer="layout" svg:width="22.274cm" svg:height="2.799cm" svg:x="4.454cm" svg:y="1.259cm">
          <text:p text:style-name="P123"><text:span text:style-name="T215">Suppression de top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5" draw:style-name="gr137" draw:text-style-name="P134" draw:layer="layout" svg:width="25.541cm" svg:height="14.559cm" svg:x="2.078cm" svg:y="5.179cm">
          <text:list text:style-name="L26">
            <text:list-item>
              <text:p text:style-name="P132"><text:span text:style-name="T220">Prérequis sur les brokers</text:span></text:p>
            </text:list-item>
          </text:list>
          <text:p text:style-name="P133"><text:span text:style-name="T220"><text:s text:c="6"/>– <text:s/></text:span><text:span text:style-name="T220">delete.topic.enable = true</text:span></text:p>
          <text:list text:continue-numbering="true" text:style-name="L26">
            <text:list-item>
              <text:p text:style-name="P133"><text:span text:style-name="T220">Arrêter producteurs et consommateurs avant la suppression</text:span></text:p>
            </text:list-item>
            <text:list-item>
              <text:p text:style-name="P133"><text:span text:style-name="T220">Les offsets des consommateurs ne sont pas supprimés immédiatement</text:span></text:p>
            </text:list-item>
          </text:list>
          <text:p text:style-name="P133"><text:span text:style-name="T220"><text:s text:c="6"/>– <text:s/></text:span><text:span text:style-name="T220">Régis par offsets.retention.minu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138" draw:text-style-name="P128" draw:layer="layout" svg:width="1.484cm" svg:height="0.839cm" svg:x="27.62cm" svg:y="19.739cm">
          <text:p text:style-name="P127"><text:span text:style-name="T21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2" draw:style-name="gr2" draw:layer="layout" svg:width="16.799cm" svg:height="10.023cm" svg:x="2.1cm" svg:y="3.712cm" draw:page-number="208" presentation:class="page"/>
          <draw:frame draw:name="Notes Placeholder 12" presentation:style-name="pr73" draw:text-style-name="P129" draw:layer="layout" svg:width="16.799cm" svg:height="11.693cm" svg:x="2.1cm" svg:y="14.293cm" presentation:class="notes" presentation:placeholder="true" presentation:user-transformed="true">
            <draw:text-box/>
          </draw:frame>
          <draw:frame draw:name="Slide Number Placeholder 12" presentation:style-name="pr7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3" draw:style-name="dp11" draw:master-page-name="DEFAULT">
        <office:forms form:automatic-focus="false" form:apply-design-mode="false"/>
        <draw:custom-shape draw:name="Shape 103"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99" draw:style-name="gr101" draw:text-style-name="P67" draw:layer="layout" svg:x1="2.197cm" svg:y1="0.7cm" svg:x2="2.198cm" svg:y2="3.108cm">
          <text:p/>
        </draw:line>
        <draw:line draw:name="Shape 100" draw:style-name="gr102" draw:text-style-name="P67" draw:layer="layout" svg:x1="0.89cm" svg:y1="4.34cm" svg:x2="10.394cm" svg:y2="4.341cm">
          <text:p/>
        </draw:line>
        <draw:line draw:name="Shape 101" draw:style-name="gr103" draw:text-style-name="P67" draw:layer="layout" svg:x1="10.394cm" svg:y1="4.34cm" svg:x2="19.304cm" svg:y2="4.341cm">
          <text:p/>
        </draw:line>
        <draw:line draw:name="Shape 102" draw:style-name="gr104" draw:text-style-name="P67" draw:layer="layout" svg:x1="19.305cm" svg:y1="4.339cm" svg:x2="28.809cm" svg:y2="4.34cm">
          <text:p/>
        </draw:line>
        <draw:custom-shape draw:name="Text 37" draw:style-name="gr139" draw:text-style-name="P124" draw:layer="layout" svg:width="22.274cm" svg:height="2.799cm" svg:x="4.454cm" svg:y="1.259cm">
          <text:p text:style-name="P123"><text:span text:style-name="T215">Exploitation au quotid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8" draw:style-name="gr140" draw:text-style-name="P126" draw:layer="layout" svg:width="23.759cm" svg:height="9.799cm" svg:x="2.969cm" svg:y="6.999cm">
          <text:p text:style-name="P125"><text:span text:style-name="T217">Stockage et rétention</text:span></text:p>
          <text:p text:style-name="P125"><text:span text:style-name="T217">Gestion des topics</text:span></text:p>
          <text:p text:style-name="P125"><text:span text:style-name="T216">Gestion des partitions</text:span></text:p>
          <text:p text:style-name="P125"><text:span text:style-name="T217">Gestion des consumer groups</text:span></text:p>
          <text:p text:style-name="P125"><text:span text:style-name="T217">Ajout et retrait de brokers</text:span></text:p>
          <text:p text:style-name="P125"><text:span text:style-name="T217">Mise à jour du cluster</text:span></text:p>
          <text:p text:style-name="P125"><text:span text:style-name="T217">Sauvegarde et reprise (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9" draw:style-name="gr141" draw:text-style-name="P128" draw:layer="layout" svg:width="1.484cm" svg:height="0.839cm" svg:x="27.62cm" svg:y="19.739cm">
          <text:p text:style-name="P127"><text:span text:style-name="T21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3" draw:style-name="gr2" draw:layer="layout" svg:width="16.799cm" svg:height="10.023cm" svg:x="2.1cm" svg:y="3.712cm" draw:page-number="209" presentation:class="page"/>
          <draw:frame draw:name="Notes Placeholder 13" presentation:style-name="pr75" draw:text-style-name="P129" draw:layer="layout" svg:width="16.799cm" svg:height="11.693cm" svg:x="2.1cm" svg:y="14.293cm" presentation:class="notes" presentation:placeholder="true" presentation:user-transformed="true">
            <draw:text-box/>
          </draw:frame>
          <draw:frame draw:name="Slide Number Placeholder 13" presentation:style-name="pr7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4" draw:style-name="dp11" draw:master-page-name="DEFAULT">
        <office:forms form:automatic-focus="false" form:apply-design-mode="false"/>
        <draw:custom-shape draw:name="Shape 111"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07" draw:style-name="gr101" draw:text-style-name="P67" draw:layer="layout" svg:x1="2.197cm" svg:y1="0.7cm" svg:x2="2.198cm" svg:y2="3.108cm">
          <text:p/>
        </draw:line>
        <draw:line draw:name="Shape 108" draw:style-name="gr102" draw:text-style-name="P67" draw:layer="layout" svg:x1="0.89cm" svg:y1="4.34cm" svg:x2="10.394cm" svg:y2="4.341cm">
          <text:p/>
        </draw:line>
        <draw:line draw:name="Shape 109" draw:style-name="gr103" draw:text-style-name="P67" draw:layer="layout" svg:x1="10.394cm" svg:y1="4.34cm" svg:x2="19.304cm" svg:y2="4.341cm">
          <text:p/>
        </draw:line>
        <draw:line draw:name="Shape 110" draw:style-name="gr104" draw:text-style-name="P67" draw:layer="layout" svg:x1="19.305cm" svg:y1="4.339cm" svg:x2="28.809cm" svg:y2="4.34cm">
          <text:p/>
        </draw:line>
        <draw:custom-shape draw:name="Text 40" draw:style-name="gr142" draw:text-style-name="P124" draw:layer="layout" svg:width="22.274cm" svg:height="2.799cm" svg:x="4.454cm" svg:y="1.259cm">
          <text:p text:style-name="P123"><text:span text:style-name="T215">Ajout de part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1" draw:style-name="gr143" draw:text-style-name="P134" draw:layer="layout" svg:width="25.541cm" svg:height="14.559cm" svg:x="2.078cm" svg:y="5.179cm">
          <text:list text:style-name="L26">
            <text:list-item>
              <text:p text:style-name="P132"><text:span text:style-name="T220">Permet de scaler le parallélisme de consommation</text:span></text:p>
            </text:list-item>
            <text:list-item>
              <text:p text:style-name="P132"><text:span text:style-name="T220">Attention aux topics à clé</text:span></text:p>
            </text:list-item>
          </text:list>
          <text:p text:style-name="P133"><text:span text:style-name="T220"><text:s text:c="6"/>– <text:s/></text:span><text:span text:style-name="T220">Casse la garantie d'ordre par clé</text:span></text:p>
          <text:p text:style-name="P133"><text:span text:style-name="T220"><text:s text:c="6"/>– <text:s/></text:span><text:span text:style-name="T220">Une même clé peut basculer sur une autre partition</text:span></text:p>
          <text:p text:style-name="P133"><text:span text:style-name="T220"><text:s text:c="6"/>– <text:s/></text:span><text:span text:style-name="T220">Préférer un nouveau topic + migration</text:span></text:p>
          <text:list text:continue-numbering="true" text:style-name="L26">
            <text:list-item>
              <text:p text:style-name="P133"><text:span text:style-name="T220">Il n'est pas possible de réduire le nombre de parti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2" draw:style-name="gr144" draw:text-style-name="P128" draw:layer="layout" svg:width="1.484cm" svg:height="0.839cm" svg:x="27.62cm" svg:y="19.739cm">
          <text:p text:style-name="P127"><text:span text:style-name="T218">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4" draw:style-name="gr2" draw:layer="layout" svg:width="16.799cm" svg:height="10.023cm" svg:x="2.1cm" svg:y="3.712cm" draw:page-number="210" presentation:class="page"/>
          <draw:frame draw:name="Notes Placeholder 14" presentation:style-name="pr77" draw:text-style-name="P129" draw:layer="layout" svg:width="16.799cm" svg:height="11.693cm" svg:x="2.1cm" svg:y="14.293cm" presentation:class="notes" presentation:placeholder="true" presentation:user-transformed="true">
            <draw:text-box/>
          </draw:frame>
          <draw:frame draw:name="Slide Number Placeholder 14" presentation:style-name="pr7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5" draw:style-name="dp11" draw:master-page-name="DEFAULT">
        <office:forms form:automatic-focus="false" form:apply-design-mode="false"/>
        <draw:custom-shape draw:name="Shape 119"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15" draw:style-name="gr101" draw:text-style-name="P67" draw:layer="layout" svg:x1="2.197cm" svg:y1="0.7cm" svg:x2="2.198cm" svg:y2="3.108cm">
          <text:p/>
        </draw:line>
        <draw:line draw:name="Shape 116" draw:style-name="gr102" draw:text-style-name="P67" draw:layer="layout" svg:x1="0.89cm" svg:y1="4.34cm" svg:x2="10.394cm" svg:y2="4.341cm">
          <text:p/>
        </draw:line>
        <draw:line draw:name="Shape 117" draw:style-name="gr103" draw:text-style-name="P67" draw:layer="layout" svg:x1="10.394cm" svg:y1="4.34cm" svg:x2="19.304cm" svg:y2="4.341cm">
          <text:p/>
        </draw:line>
        <draw:line draw:name="Shape 118" draw:style-name="gr104" draw:text-style-name="P67" draw:layer="layout" svg:x1="19.305cm" svg:y1="4.339cm" svg:x2="28.809cm" svg:y2="4.34cm">
          <text:p/>
        </draw:line>
        <draw:custom-shape draw:name="Text 43" draw:style-name="gr145" draw:text-style-name="P124" draw:layer="layout" svg:width="22.274cm" svg:height="2.799cm" svg:x="4.454cm" svg:y="1.259cm">
          <text:p text:style-name="P123"><text:span text:style-name="T215">Réassignation : kafka-reassign-part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4" draw:style-name="gr146" draw:text-style-name="P134" draw:layer="layout" svg:width="25.541cm" svg:height="14.559cm" svg:x="2.078cm" svg:y="5.179cm">
          <text:list text:style-name="L26">
            <text:list-item>
              <text:p text:style-name="P132"><text:span text:style-name="T220">Kafka ne rééquilibre pas automatiquement après ajout de broker</text:span></text:p>
            </text:list-item>
            <text:list-item>
              <text:p text:style-name="P132"><text:span text:style-name="T220">Cas d'usage</text:span></text:p>
            </text:list-item>
          </text:list>
          <text:p text:style-name="P133"><text:span text:style-name="T220"><text:s text:c="6"/>– <text:s/></text:span><text:span text:style-name="T220">Étendre ou réduire le cluster</text:span></text:p>
          <text:p text:style-name="P133"><text:span text:style-name="T220"><text:s text:c="6"/>– <text:s/></text:span><text:span text:style-name="T220">Augmenter le facteur de réplication d'un topic</text:span></text:p>
          <text:p text:style-name="P133"><text:span text:style-name="T220"><text:s text:c="6"/>– <text:s/></text:span><text:span text:style-name="T220">Résoudre un déséquilibre entre brokers ou disques</text:span></text:p>
          <text:list text:continue-numbering="true" text:style-name="L26">
            <text:list-item>
              <text:p text:style-name="P133"><text:span text:style-name="T220">À retenir</text:span></text:p>
            </text:list-item>
          </text:list>
          <text:p text:style-name="P133"><text:span text:style-name="T220"><text:s text:c="6"/>– <text:s/></text:span><text:span text:style-name="T220">Pas d'interruption de service</text:span></text:p>
          <text:p text:style-name="P133"><text:span text:style-name="T220"><text:s text:c="6"/>– <text:s/></text:span><text:span text:style-name="T220">Une seule réassignation à la fois</text:span></text:p>
          <text:p text:style-name="P133"><text:span text:style-name="T220"><text:s text:c="6"/>– <text:s/></text:span><text:span text:style-name="T220">Annulation possible depuis 2.4 (--canc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5" draw:style-name="gr147" draw:text-style-name="P128" draw:layer="layout" svg:width="1.484cm" svg:height="0.839cm" svg:x="27.62cm" svg:y="19.739cm">
          <text:p text:style-name="P127"><text:span text:style-name="T218">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5" draw:style-name="gr2" draw:layer="layout" svg:width="16.799cm" svg:height="10.023cm" svg:x="2.1cm" svg:y="3.712cm" draw:page-number="211" presentation:class="page"/>
          <draw:frame draw:name="Notes Placeholder 15" presentation:style-name="pr79" draw:text-style-name="P129" draw:layer="layout" svg:width="16.799cm" svg:height="11.693cm" svg:x="2.1cm" svg:y="14.293cm" presentation:class="notes" presentation:placeholder="true" presentation:user-transformed="true">
            <draw:text-box/>
          </draw:frame>
          <draw:frame draw:name="Slide Number Placeholder 15" presentation:style-name="pr8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6" draw:style-name="dp11" draw:master-page-name="DEFAULT">
        <office:forms form:automatic-focus="false" form:apply-design-mode="false"/>
        <draw:custom-shape draw:name="Shape 127"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23" draw:style-name="gr101" draw:text-style-name="P67" draw:layer="layout" svg:x1="2.197cm" svg:y1="0.7cm" svg:x2="2.198cm" svg:y2="3.108cm">
          <text:p/>
        </draw:line>
        <draw:line draw:name="Shape 124" draw:style-name="gr102" draw:text-style-name="P67" draw:layer="layout" svg:x1="0.89cm" svg:y1="4.34cm" svg:x2="10.394cm" svg:y2="4.341cm">
          <text:p/>
        </draw:line>
        <draw:line draw:name="Shape 125" draw:style-name="gr103" draw:text-style-name="P67" draw:layer="layout" svg:x1="10.394cm" svg:y1="4.34cm" svg:x2="19.304cm" svg:y2="4.341cm">
          <text:p/>
        </draw:line>
        <draw:line draw:name="Shape 126" draw:style-name="gr104" draw:text-style-name="P67" draw:layer="layout" svg:x1="19.305cm" svg:y1="4.339cm" svg:x2="28.809cm" svg:y2="4.34cm">
          <text:p/>
        </draw:line>
        <draw:custom-shape draw:name="Text 46" draw:style-name="gr148" draw:text-style-name="P124" draw:layer="layout" svg:width="22.274cm" svg:height="2.799cm" svg:x="4.454cm" svg:y="1.259cm">
          <text:p text:style-name="P123"><text:span text:style-name="T215">Étape 1 — génération du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7" draw:style-name="gr149" draw:text-style-name="P136" draw:layer="layout" svg:width="26.729cm" svg:height="13.999cm" svg:x="1.484cm" svg:y="5.599cm">
          <text:p text:style-name="P135"><text:span text:style-name="T225">$ cat topics-to-move.json</text:span></text:p>
          <text:p text:style-name="P135"><text:span text:style-name="T225">{"topics":[{"topic":"orders"},{"topic":"payments"}], "version":1}</text:span></text:p>
          <text:p text:style-name="P135"><text:span text:style-name="T226"/></text:p>
          <text:p text:style-name="P135"><text:span text:style-name="T225">$ ./kafka-reassign-partitions.sh \</text:span></text:p>
          <text:p text:style-name="P135"><text:span text:style-name="T225"><text:s text:c="4"/></text:span><text:span text:style-name="T225">--bootstrap-server localhost:9092 \</text:span></text:p>
          <text:p text:style-name="P135"><text:span text:style-name="T225"><text:s text:c="4"/></text:span><text:span text:style-name="T225">--topics-to-move-json-file topics-to-move.json \</text:span></text:p>
          <text:p text:style-name="P135"><text:span text:style-name="T225"><text:s text:c="4"/></text:span><text:span text:style-name="T225">--broker-list "0,1,2,3" --generate</text:span></text:p>
          <text:p text:style-name="P135"><text:span text:style-name="T226"/></text:p>
          <text:p text:style-name="P135"><text:span text:style-name="T225">Proposed partition reassignment configuration</text:span></text:p>
          <text:p text:style-name="P135"><text:span text:style-name="T225">{"version":1, "partitions":[</text:span></text:p>
          <text:p text:style-name="P135"><text:span text:style-name="T225"><text:s text:c="3"/></text:span><text:span text:style-name="T225">{"topic":"orders", "partition":0, "replicas":[0,1]},</text:span></text:p>
          <text:p text:style-name="P135"><text:span text:style-name="T225"><text:s text:c="3"/></text:span><text:span text:style-name="T225">{"topic":"orders", "partition":1, "replicas":[2,3]},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8" draw:style-name="gr150" draw:text-style-name="P128" draw:layer="layout" svg:width="1.484cm" svg:height="0.839cm" svg:x="27.62cm" svg:y="19.739cm">
          <text:p text:style-name="P127"><text:span text:style-name="T218">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6" draw:style-name="gr2" draw:layer="layout" svg:width="16.799cm" svg:height="10.023cm" svg:x="2.1cm" svg:y="3.712cm" draw:page-number="212" presentation:class="page"/>
          <draw:frame draw:name="Notes Placeholder 16" presentation:style-name="pr81" draw:text-style-name="P129" draw:layer="layout" svg:width="16.799cm" svg:height="11.693cm" svg:x="2.1cm" svg:y="14.293cm" presentation:class="notes" presentation:placeholder="true" presentation:user-transformed="true">
            <draw:text-box/>
          </draw:frame>
          <draw:frame draw:name="Slide Number Placeholder 16" presentation:style-name="pr8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7" draw:style-name="dp11" draw:master-page-name="DEFAULT">
        <office:forms form:automatic-focus="false" form:apply-design-mode="false"/>
        <draw:custom-shape draw:name="Shape 135"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31" draw:style-name="gr101" draw:text-style-name="P67" draw:layer="layout" svg:x1="2.197cm" svg:y1="0.7cm" svg:x2="2.198cm" svg:y2="3.108cm">
          <text:p/>
        </draw:line>
        <draw:line draw:name="Shape 132" draw:style-name="gr102" draw:text-style-name="P67" draw:layer="layout" svg:x1="0.89cm" svg:y1="4.34cm" svg:x2="10.394cm" svg:y2="4.341cm">
          <text:p/>
        </draw:line>
        <draw:line draw:name="Shape 133" draw:style-name="gr103" draw:text-style-name="P67" draw:layer="layout" svg:x1="10.394cm" svg:y1="4.34cm" svg:x2="19.304cm" svg:y2="4.341cm">
          <text:p/>
        </draw:line>
        <draw:line draw:name="Shape 134" draw:style-name="gr104" draw:text-style-name="P67" draw:layer="layout" svg:x1="19.305cm" svg:y1="4.339cm" svg:x2="28.809cm" svg:y2="4.34cm">
          <text:p/>
        </draw:line>
        <draw:custom-shape draw:name="Text 49" draw:style-name="gr151" draw:text-style-name="P124" draw:layer="layout" svg:width="22.274cm" svg:height="2.799cm" svg:x="4.454cm" svg:y="1.26cm">
          <text:p text:style-name="P123"><text:span text:style-name="T215">Étape 2 — exécution avec throt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0" draw:style-name="gr152" draw:text-style-name="P136" draw:layer="layout" svg:width="26.729cm" svg:height="13.999cm" svg:x="1.484cm" svg:y="5.599cm">
          <text:p text:style-name="P135"><text:span text:style-name="T227">$ ./kafka-reassign-partitions.sh \</text:span></text:p>
          <text:p text:style-name="P135"><text:span text:style-name="T227"><text:s text:c="4"/></text:span><text:span text:style-name="T227">--bootstrap-server localhost:9092 \</text:span></text:p>
          <text:p text:style-name="P135"><text:span text:style-name="T227"><text:s text:c="4"/></text:span><text:span text:style-name="T227">--reassignment-json-file expand-cluster-reassignment.json \</text:span></text:p>
          <text:p text:style-name="P135"><text:span text:style-name="T227"><text:s text:c="4"/></text:span><text:span text:style-name="T227">--throttle 50000000 \</text:span></text:p>
          <text:p text:style-name="P135"><text:span text:style-name="T227"><text:s text:c="4"/></text:span><text:span text:style-name="T227">--execute</text:span></text:p>
          <text:p text:style-name="P135"><text:span text:style-name="T228"/></text:p>
          <text:p text:style-name="P135"><text:span text:style-name="T227">Save this to use as the --reassignment-json-file</text:span></text:p>
          <text:p text:style-name="P135"><text:span text:style-name="T227">option during rollback.</text:span></text:p>
          <text:p text:style-name="P135"><text:span text:style-name="T227">Successfully started reassignments of part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1" draw:style-name="gr153" draw:text-style-name="P128" draw:layer="layout" svg:width="1.484cm" svg:height="0.839cm" svg:x="27.62cm" svg:y="19.739cm">
          <text:p text:style-name="P127"><text:span text:style-name="T218">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7" draw:style-name="gr2" draw:layer="layout" svg:width="16.799cm" svg:height="10.023cm" svg:x="2.1cm" svg:y="3.712cm" draw:page-number="213" presentation:class="page"/>
          <draw:frame draw:name="Notes Placeholder 17" presentation:style-name="pr83" draw:text-style-name="P129" draw:layer="layout" svg:width="16.799cm" svg:height="11.693cm" svg:x="2.1cm" svg:y="14.293cm" presentation:class="notes" presentation:placeholder="true" presentation:user-transformed="true">
            <draw:text-box/>
          </draw:frame>
          <draw:frame draw:name="Slide Number Placeholder 17" presentation:style-name="pr8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8" draw:style-name="dp11" draw:master-page-name="DEFAULT">
        <office:forms form:automatic-focus="false" form:apply-design-mode="false"/>
        <draw:custom-shape draw:name="Shape 143"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39" draw:style-name="gr101" draw:text-style-name="P67" draw:layer="layout" svg:x1="2.197cm" svg:y1="0.7cm" svg:x2="2.198cm" svg:y2="3.108cm">
          <text:p/>
        </draw:line>
        <draw:line draw:name="Shape 140" draw:style-name="gr102" draw:text-style-name="P67" draw:layer="layout" svg:x1="0.89cm" svg:y1="4.34cm" svg:x2="10.394cm" svg:y2="4.341cm">
          <text:p/>
        </draw:line>
        <draw:line draw:name="Shape 141" draw:style-name="gr103" draw:text-style-name="P67" draw:layer="layout" svg:x1="10.394cm" svg:y1="4.34cm" svg:x2="19.304cm" svg:y2="4.341cm">
          <text:p/>
        </draw:line>
        <draw:line draw:name="Shape 142" draw:style-name="gr104" draw:text-style-name="P67" draw:layer="layout" svg:x1="19.305cm" svg:y1="4.339cm" svg:x2="28.809cm" svg:y2="4.34cm">
          <text:p/>
        </draw:line>
        <draw:custom-shape draw:name="Text 52" draw:style-name="gr154" draw:text-style-name="P124" draw:layer="layout" svg:width="22.274cm" svg:height="2.799cm" svg:x="4.454cm" svg:y="1.259cm">
          <text:p text:style-name="P123"><text:span text:style-name="T215">Étape 3 — vér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3" draw:style-name="gr155" draw:text-style-name="P136" draw:layer="layout" svg:width="26.729cm" svg:height="13.999cm" svg:x="1.484cm" svg:y="5.599cm">
          <text:p text:style-name="P135"><text:span text:style-name="T227">$ ./kafka-reassign-partitions.sh \</text:span></text:p>
          <text:p text:style-name="P135"><text:span text:style-name="T227"><text:s text:c="4"/></text:span><text:span text:style-name="T227">--bootstrap-server localhost:9092 \</text:span></text:p>
          <text:p text:style-name="P135"><text:span text:style-name="T227"><text:s text:c="4"/></text:span><text:span text:style-name="T227">--reassignment-json-file expand-cluster-reassignment.json \</text:span></text:p>
          <text:p text:style-name="P135"><text:span text:style-name="T227"><text:s text:c="4"/></text:span><text:span text:style-name="T227">--verify</text:span></text:p>
          <text:p text:style-name="P135"><text:span text:style-name="T228"/></text:p>
          <text:p text:style-name="P135"><text:span text:style-name="T227">Status of partition reassignment :</text:span></text:p>
          <text:p text:style-name="P135"><text:span text:style-name="T227">Reassignment of partition [orders,0] completed successfully</text:span></text:p>
          <text:p text:style-name="P135"><text:span text:style-name="T227">Reassignment of partition [orders,1] is in progress</text:span></text:p>
          <text:p text:style-name="P135"><text:span text:style-name="T227">Reassignment of partition [payments,0] completed successful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4" draw:style-name="gr156" draw:text-style-name="P128" draw:layer="layout" svg:width="1.484cm" svg:height="0.839cm" svg:x="27.62cm" svg:y="19.739cm">
          <text:p text:style-name="P127"><text:span text:style-name="T218">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8" draw:style-name="gr2" draw:layer="layout" svg:width="16.799cm" svg:height="10.023cm" svg:x="2.1cm" svg:y="3.712cm" draw:page-number="214" presentation:class="page"/>
          <draw:frame draw:name="Notes Placeholder 18" presentation:style-name="pr85" draw:text-style-name="P129" draw:layer="layout" svg:width="16.799cm" svg:height="11.693cm" svg:x="2.1cm" svg:y="14.293cm" presentation:class="notes" presentation:placeholder="true" presentation:user-transformed="true">
            <draw:text-box/>
          </draw:frame>
          <draw:frame draw:name="Slide Number Placeholder 18" presentation:style-name="pr8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9" draw:style-name="dp11" draw:master-page-name="DEFAULT">
        <office:forms form:automatic-focus="false" form:apply-design-mode="false"/>
        <draw:custom-shape draw:name="Shape 151" draw:style-name="gr97"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98"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99"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00"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47" draw:style-name="gr101" draw:text-style-name="P67" draw:layer="layout" svg:x1="2.197cm" svg:y1="0.7cm" svg:x2="2.198cm" svg:y2="3.108cm">
          <text:p/>
        </draw:line>
        <draw:line draw:name="Shape 148" draw:style-name="gr102" draw:text-style-name="P67" draw:layer="layout" svg:x1="0.89cm" svg:y1="4.34cm" svg:x2="10.394cm" svg:y2="4.341cm">
          <text:p/>
        </draw:line>
        <draw:line draw:name="Shape 149" draw:style-name="gr103" draw:text-style-name="P67" draw:layer="layout" svg:x1="10.394cm" svg:y1="4.34cm" svg:x2="19.304cm" svg:y2="4.341cm">
          <text:p/>
        </draw:line>
        <draw:line draw:name="Shape 150" draw:style-name="gr104" draw:text-style-name="P67" draw:layer="layout" svg:x1="19.305cm" svg:y1="4.339cm" svg:x2="28.809cm" svg:y2="4.34cm">
          <text:p/>
        </draw:line>
        <draw:custom-shape draw:name="Text 55" draw:style-name="gr157" draw:text-style-name="P124" draw:layer="layout" svg:width="22.274cm" svg:height="2.799cm" svg:x="4.454cm" svg:y="1.259cm">
          <text:p text:style-name="P123"><text:span text:style-name="T215">Cruise Control (Linked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6" draw:style-name="gr158" draw:text-style-name="P134" draw:layer="layout" svg:width="25.541cm" svg:height="14.559cm" svg:x="2.078cm" svg:y="5.179cm">
          <text:list text:style-name="L26">
            <text:list-item>
              <text:p text:style-name="P132"><text:span text:style-name="T220">Réassignation manuelle vite ingérable au-delà de quelques dizaines de brokers</text:span></text:p>
            </text:list-item>
            <text:list-item>
              <text:p text:style-name="P132"><text:span text:style-name="T220">Apports</text:span></text:p>
            </text:list-item>
          </text:list>
          <text:p text:style-name="P133"><text:span text:style-name="T220"><text:s text:c="6"/>– <text:s/></text:span><text:span text:style-name="T220">Collecte continue de métriques par broker / partition</text:span></text:p>
          <text:p text:style-name="P133"><text:span text:style-name="T220"><text:s text:c="6"/>– <text:s/></text:span><text:span text:style-name="T220">Génération de plans selon des goals configurables</text:span></text:p>
          <text:p text:style-name="P133"><text:span text:style-name="T220"><text:s text:c="6"/>– <text:s/></text:span><text:span text:style-name="T220">Détection et auto-remédiation d'anomalies</text:span></text:p>
          <text:p text:style-name="P133"><text:span text:style-name="T220"><text:s text:c="6"/>– <text:s/></text:span><text:span text:style-name="T220">API REST + UI</text:span></text:p>
          <text:list text:continue-numbering="true" text:style-name="L26">
            <text:list-item>
              <text:p text:style-name="P133"><text:span text:style-name="T220">Intégré nativement dans l'opérateur Kubernetes Strimz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7" draw:style-name="gr159" draw:text-style-name="P128" draw:layer="layout" svg:width="1.484cm" svg:height="0.839cm" svg:x="27.62cm" svg:y="19.739cm">
          <text:p text:style-name="P127"><text:span text:style-name="T218">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9" draw:style-name="gr2" draw:layer="layout" svg:width="16.799cm" svg:height="10.023cm" svg:x="2.1cm" svg:y="3.712cm" draw:page-number="215" presentation:class="page"/>
          <draw:frame draw:name="Notes Placeholder 19" presentation:style-name="pr87" draw:text-style-name="P129" draw:layer="layout" svg:width="16.799cm" svg:height="11.693cm" svg:x="2.1cm" svg:y="14.293cm" presentation:class="notes" presentation:placeholder="true" presentation:user-transformed="true">
            <draw:text-box/>
          </draw:frame>
          <draw:frame draw:name="Slide Number Placeholder 19" presentation:style-name="pr8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0" draw:style-name="dp11" draw:master-page-name="DEFAULT">
        <office:forms form:automatic-focus="false" form:apply-design-mode="false"/>
        <draw:custom-shape draw:name="Shape 159"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55" draw:style-name="gr164" draw:text-style-name="P67" draw:layer="layout" svg:x1="2.197cm" svg:y1="0.7cm" svg:x2="2.198cm" svg:y2="3.108cm">
          <text:p/>
        </draw:line>
        <draw:line draw:name="Shape 156" draw:style-name="gr165" draw:text-style-name="P67" draw:layer="layout" svg:x1="0.89cm" svg:y1="4.34cm" svg:x2="10.394cm" svg:y2="4.341cm">
          <text:p/>
        </draw:line>
        <draw:line draw:name="Shape 157" draw:style-name="gr166" draw:text-style-name="P67" draw:layer="layout" svg:x1="10.394cm" svg:y1="4.34cm" svg:x2="19.304cm" svg:y2="4.341cm">
          <text:p/>
        </draw:line>
        <draw:line draw:name="Shape 158" draw:style-name="gr167" draw:text-style-name="P67" draw:layer="layout" svg:x1="19.305cm" svg:y1="4.339cm" svg:x2="28.809cm" svg:y2="4.34cm">
          <text:p/>
        </draw:line>
        <draw:custom-shape draw:name="Text 58" draw:style-name="gr168" draw:text-style-name="P124" draw:layer="layout" svg:width="22.274cm" svg:height="2.799cm" svg:x="4.454cm" svg:y="1.259cm">
          <text:p text:style-name="P123"><text:span text:style-name="T215">Exploitation au quotid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9" draw:style-name="gr169" draw:text-style-name="P126" draw:layer="layout" svg:width="23.759cm" svg:height="9.799cm" svg:x="2.969cm" svg:y="6.999cm">
          <text:p text:style-name="P125"><text:span text:style-name="T217">Stockage et rétention</text:span></text:p>
          <text:p text:style-name="P125"><text:span text:style-name="T217">Gestion des topics</text:span></text:p>
          <text:p text:style-name="P125"><text:span text:style-name="T217">Gestion des partitions</text:span></text:p>
          <text:p text:style-name="P125"><text:span text:style-name="T216">Gestion des consumer groups</text:span></text:p>
          <text:p text:style-name="P125"><text:span text:style-name="T217">Ajout et retrait de brokers</text:span></text:p>
          <text:p text:style-name="P125"><text:span text:style-name="T217">Mise à jour du cluster</text:span></text:p>
          <text:p text:style-name="P125"><text:span text:style-name="T217">Sauvegarde et reprise (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0" draw:style-name="gr170" draw:text-style-name="P128" draw:layer="layout" svg:width="1.484cm" svg:height="0.839cm" svg:x="27.62cm" svg:y="19.739cm">
          <text:p text:style-name="P127"><text:span text:style-name="T218">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0" draw:style-name="gr2" draw:layer="layout" svg:width="16.799cm" svg:height="10.023cm" svg:x="2.1cm" svg:y="3.712cm" draw:page-number="216" presentation:class="page"/>
          <draw:frame draw:name="Notes Placeholder 20" presentation:style-name="pr89" draw:text-style-name="P129" draw:layer="layout" svg:width="16.799cm" svg:height="11.693cm" svg:x="2.1cm" svg:y="14.293cm" presentation:class="notes" presentation:placeholder="true" presentation:user-transformed="true">
            <draw:text-box/>
          </draw:frame>
          <draw:frame draw:name="Slide Number Placeholder 20" presentation:style-name="pr9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1" draw:style-name="dp11" draw:master-page-name="DEFAULT">
        <office:forms form:automatic-focus="false" form:apply-design-mode="false"/>
        <draw:custom-shape draw:name="Shape 167"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63" draw:style-name="gr164" draw:text-style-name="P67" draw:layer="layout" svg:x1="2.197cm" svg:y1="0.7cm" svg:x2="2.198cm" svg:y2="3.108cm">
          <text:p/>
        </draw:line>
        <draw:line draw:name="Shape 164" draw:style-name="gr165" draw:text-style-name="P67" draw:layer="layout" svg:x1="0.89cm" svg:y1="4.34cm" svg:x2="10.394cm" svg:y2="4.341cm">
          <text:p/>
        </draw:line>
        <draw:line draw:name="Shape 165" draw:style-name="gr166" draw:text-style-name="P67" draw:layer="layout" svg:x1="10.394cm" svg:y1="4.34cm" svg:x2="19.304cm" svg:y2="4.341cm">
          <text:p/>
        </draw:line>
        <draw:line draw:name="Shape 166" draw:style-name="gr167" draw:text-style-name="P67" draw:layer="layout" svg:x1="19.305cm" svg:y1="4.339cm" svg:x2="28.809cm" svg:y2="4.34cm">
          <text:p/>
        </draw:line>
        <draw:custom-shape draw:name="Text 61" draw:style-name="gr171" draw:text-style-name="P124" draw:layer="layout" svg:width="22.274cm" svg:height="2.799cm" svg:x="4.454cm" svg:y="1.259cm">
          <text:p text:style-name="P123"><text:span text:style-name="T215">kafka-consumer-groups.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2" draw:style-name="gr172" draw:text-style-name="P134" draw:layer="layout" svg:width="25.541cm" svg:height="14.559cm" svg:x="2.078cm" svg:y="5.179cm">
          <text:list text:style-name="L26">
            <text:list-item>
              <text:p text:style-name="P132"><text:span text:style-name="T220">Opérations supportées</text:span></text:p>
            </text:list-item>
          </text:list>
          <text:p text:style-name="P133"><text:span text:style-name="T220"><text:s text:c="6"/>– <text:s/></text:span><text:span text:style-name="T220">Lister les groupes</text:span></text:p>
          <text:p text:style-name="P133"><text:span text:style-name="T220"><text:s text:c="6"/>– <text:s/></text:span><text:span text:style-name="T220">Décrire un groupe</text:span></text:p>
          <text:p text:style-name="P133"><text:span text:style-name="T220"><text:s text:c="6"/>– <text:s/></text:span><text:span text:style-name="T220">Supprimer des groupes</text:span></text:p>
          <text:p text:style-name="P133"><text:span text:style-name="T220"><text:s text:c="6"/>– <text:s/></text:span><text:span text:style-name="T220">Réinitialiser les offsets</text:span></text:p>
          <text:list text:continue-numbering="true" text:style-name="L26">
            <text:list-item>
              <text:p text:style-name="P133"><text:span text:style-name="T220">Le groupe doit être inactif pour modifier ses offse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3" draw:style-name="gr173" draw:text-style-name="P128" draw:layer="layout" svg:width="1.484cm" svg:height="0.839cm" svg:x="27.62cm" svg:y="19.739cm">
          <text:p text:style-name="P127"><text:span text:style-name="T218">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1" draw:style-name="gr2" draw:layer="layout" svg:width="16.799cm" svg:height="10.023cm" svg:x="2.1cm" svg:y="3.712cm" draw:page-number="217" presentation:class="page"/>
          <draw:frame draw:name="Notes Placeholder 21" presentation:style-name="pr91" draw:text-style-name="P129" draw:layer="layout" svg:width="16.799cm" svg:height="11.693cm" svg:x="2.1cm" svg:y="14.293cm" presentation:class="notes" presentation:placeholder="true" presentation:user-transformed="true">
            <draw:text-box/>
          </draw:frame>
          <draw:frame draw:name="Slide Number Placeholder 21" presentation:style-name="pr9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2" draw:style-name="dp11" draw:master-page-name="DEFAULT">
        <office:forms form:automatic-focus="false" form:apply-design-mode="false"/>
        <draw:custom-shape draw:name="Shape 175"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71" draw:style-name="gr164" draw:text-style-name="P67" draw:layer="layout" svg:x1="2.197cm" svg:y1="0.7cm" svg:x2="2.198cm" svg:y2="3.108cm">
          <text:p/>
        </draw:line>
        <draw:line draw:name="Shape 172" draw:style-name="gr165" draw:text-style-name="P67" draw:layer="layout" svg:x1="0.89cm" svg:y1="4.34cm" svg:x2="10.394cm" svg:y2="4.341cm">
          <text:p/>
        </draw:line>
        <draw:line draw:name="Shape 173" draw:style-name="gr166" draw:text-style-name="P67" draw:layer="layout" svg:x1="10.394cm" svg:y1="4.34cm" svg:x2="19.304cm" svg:y2="4.341cm">
          <text:p/>
        </draw:line>
        <draw:line draw:name="Shape 174" draw:style-name="gr167" draw:text-style-name="P67" draw:layer="layout" svg:x1="19.305cm" svg:y1="4.339cm" svg:x2="28.809cm" svg:y2="4.34cm">
          <text:p/>
        </draw:line>
        <draw:custom-shape draw:name="Text 64" draw:style-name="gr174" draw:text-style-name="P124" draw:layer="layout" svg:width="22.274cm" svg:height="2.799cm" svg:x="4.454cm" svg:y="1.259cm">
          <text:p text:style-name="P123"><text:span text:style-name="T215">Suivi du 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5" draw:style-name="gr175" draw:text-style-name="P138" draw:layer="layout" svg:width="25.541cm" svg:height="5.319cm" svg:x="2.078cm" svg:y="5.179cm">
          <text:p text:style-name="P137"><text:span text:style-name="T229">Le lag est l'indicateur opérationnel n°1 : il mesure le retard de consommation. Un lag qui croît durablement signale une consommation sous-dimensionnée ou un problème applicat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6" draw:style-name="gr176" draw:text-style-name="P136" draw:layer="layout" svg:width="26.729cm" svg:height="8.399cm" svg:x="1.484cm" svg:y="11.199cm">
          <text:p text:style-name="P135"><text:span text:style-name="T230">$ ./kafka-consumer-groups.sh --bootstrap-server localhost:9092 \</text:span></text:p>
          <text:p text:style-name="P135"><text:span text:style-name="T230"><text:s text:c="4"/></text:span><text:span text:style-name="T230">--describe --group order-processor</text:span></text:p>
          <text:p text:style-name="P135"><text:span text:style-name="T231"/></text:p>
          <text:p text:style-name="P135"><text:span text:style-name="T230">GROUP <text:s text:c="11"/>TOPIC <text:s text:c="3"/>PARTITION <text:s/>CURRENT-OFFSET <text:s/>LOG-END-OFFSET <text:s/>LAG</text:span></text:p>
          <text:p text:style-name="P135"><text:span text:style-name="T230">order-processor <text:s/>orders <text:s text:c="2"/>0 <text:s text:c="9"/>15234 <text:s text:c="10"/>15240 <text:s text:c="10"/>6</text:span></text:p>
          <text:p text:style-name="P135"><text:span text:style-name="T230">order-processor <text:s/>orders <text:s text:c="2"/>1 <text:s text:c="9"/>15102 <text:s text:c="10"/>15240 <text:s text:c="10"/>1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1" draw:style-name="gr177" draw:text-style-name="P128" draw:layer="layout" svg:width="1.484cm" svg:height="0.839cm" svg:x="27.62cm" svg:y="19.739cm">
          <text:p text:style-name="P127"><text:span text:style-name="T218">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2" draw:style-name="gr2" draw:layer="layout" svg:width="16.799cm" svg:height="10.023cm" svg:x="2.1cm" svg:y="3.712cm" draw:page-number="218" presentation:class="page"/>
          <draw:frame draw:name="Notes Placeholder 22" presentation:style-name="pr93" draw:text-style-name="P129" draw:layer="layout" svg:width="16.799cm" svg:height="11.693cm" svg:x="2.1cm" svg:y="14.293cm" presentation:class="notes" presentation:placeholder="true" presentation:user-transformed="true">
            <draw:text-box/>
          </draw:frame>
          <draw:frame draw:name="Slide Number Placeholder 22" presentation:style-name="pr9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3" draw:style-name="dp11" draw:master-page-name="DEFAULT">
        <office:forms form:automatic-focus="false" form:apply-design-mode="false"/>
        <draw:custom-shape draw:name="Shape 183"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79" draw:style-name="gr164" draw:text-style-name="P67" draw:layer="layout" svg:x1="2.197cm" svg:y1="0.7cm" svg:x2="2.198cm" svg:y2="3.108cm">
          <text:p/>
        </draw:line>
        <draw:line draw:name="Shape 180" draw:style-name="gr165" draw:text-style-name="P67" draw:layer="layout" svg:x1="0.89cm" svg:y1="4.34cm" svg:x2="10.394cm" svg:y2="4.341cm">
          <text:p/>
        </draw:line>
        <draw:line draw:name="Shape 181" draw:style-name="gr166" draw:text-style-name="P67" draw:layer="layout" svg:x1="10.394cm" svg:y1="4.34cm" svg:x2="19.304cm" svg:y2="4.341cm">
          <text:p/>
        </draw:line>
        <draw:line draw:name="Shape 182" draw:style-name="gr167" draw:text-style-name="P67" draw:layer="layout" svg:x1="19.305cm" svg:y1="4.339cm" svg:x2="28.809cm" svg:y2="4.34cm">
          <text:p/>
        </draw:line>
        <draw:custom-shape draw:name="Text 67" draw:style-name="gr178" draw:text-style-name="P124" draw:layer="layout" svg:width="22.274cm" svg:height="2.799cm" svg:x="4.454cm" svg:y="1.259cm">
          <text:p text:style-name="P123"><text:span text:style-name="T215">Industrialiser le suivi du 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8" draw:style-name="gr179" draw:text-style-name="P134" draw:layer="layout" svg:width="25.541cm" svg:height="14.559cm" svg:x="2.078cm" svg:y="5.179cm">
          <text:list text:style-name="L26">
            <text:list-item>
              <text:p text:style-name="P132"><text:span text:style-name="T220">Outils dédiés</text:span></text:p>
            </text:list-item>
          </text:list>
          <text:p text:style-name="P133"><text:span text:style-name="T220"><text:s text:c="6"/>– <text:s/></text:span><text:span text:style-name="T220">Burrow (LinkedIn)</text:span></text:p>
          <text:p text:style-name="P133"><text:span text:style-name="T220"><text:s text:c="6"/>– <text:s/></text:span><text:span text:style-name="T220">Kafka Lag Exporter (Prometheus)</text:span></text:p>
          <text:p text:style-name="P133"><text:span text:style-name="T220"><text:s text:c="6"/>– <text:s/></text:span><text:span text:style-name="T220">Solutions APM : Datadog, Dynatrace, New Relic</text:span></text:p>
          <text:list text:continue-numbering="true" text:style-name="L26">
            <text:list-item>
              <text:p text:style-name="P133"><text:span text:style-name="T220">Au-delà du lag brut, surveiller</text:span></text:p>
            </text:list-item>
          </text:list>
          <text:p text:style-name="P133"><text:span text:style-name="T220"><text:s text:c="6"/>– <text:s/></text:span><text:span text:style-name="T220">Tendance (croissance vs stabilité)</text:span></text:p>
          <text:p text:style-name="P133"><text:span text:style-name="T220"><text:s text:c="6"/>– <text:s/></text:span><text:span text:style-name="T220">Lag en temps (et non en messages)</text:span></text:p>
          <text:p text:style-name="P133"><text:span text:style-name="T220"><text:s text:c="6"/>– <text:s/></text:span><text:span text:style-name="T220">Distribution par part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9" draw:style-name="gr180" draw:text-style-name="P128" draw:layer="layout" svg:width="1.484cm" svg:height="0.839cm" svg:x="27.62cm" svg:y="19.739cm">
          <text:p text:style-name="P127"><text:span text:style-name="T218">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3" draw:style-name="gr2" draw:layer="layout" svg:width="16.799cm" svg:height="10.023cm" svg:x="2.1cm" svg:y="3.712cm" draw:page-number="219" presentation:class="page"/>
          <draw:frame draw:name="Notes Placeholder 23" presentation:style-name="pr95" draw:text-style-name="P129" draw:layer="layout" svg:width="16.799cm" svg:height="11.693cm" svg:x="2.1cm" svg:y="14.293cm" presentation:class="notes" presentation:placeholder="true" presentation:user-transformed="true">
            <draw:text-box/>
          </draw:frame>
          <draw:frame draw:name="Slide Number Placeholder 23" presentation:style-name="pr9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4" draw:style-name="dp11" draw:master-page-name="DEFAULT">
        <office:forms form:automatic-focus="false" form:apply-design-mode="false"/>
        <draw:custom-shape draw:name="Shape 191"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87" draw:style-name="gr164" draw:text-style-name="P67" draw:layer="layout" svg:x1="2.197cm" svg:y1="0.7cm" svg:x2="2.198cm" svg:y2="3.108cm">
          <text:p/>
        </draw:line>
        <draw:line draw:name="Shape 188" draw:style-name="gr165" draw:text-style-name="P67" draw:layer="layout" svg:x1="0.89cm" svg:y1="4.34cm" svg:x2="10.394cm" svg:y2="4.341cm">
          <text:p/>
        </draw:line>
        <draw:line draw:name="Shape 189" draw:style-name="gr166" draw:text-style-name="P67" draw:layer="layout" svg:x1="10.394cm" svg:y1="4.34cm" svg:x2="19.304cm" svg:y2="4.341cm">
          <text:p/>
        </draw:line>
        <draw:line draw:name="Shape 190" draw:style-name="gr167" draw:text-style-name="P67" draw:layer="layout" svg:x1="19.305cm" svg:y1="4.339cm" svg:x2="28.809cm" svg:y2="4.34cm">
          <text:p/>
        </draw:line>
        <draw:custom-shape draw:name="Text 70" draw:style-name="gr181" draw:text-style-name="P124" draw:layer="layout" svg:width="22.274cm" svg:height="2.799cm" svg:x="4.454cm" svg:y="1.259cm">
          <text:p text:style-name="P123"><text:span text:style-name="T215">Reset d'off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2" draw:style-name="gr182" draw:text-style-name="P136" draw:layer="layout" svg:width="26.729cm" svg:height="13.999cm" svg:x="1.484cm" svg:y="5.599cm">
          <text:p text:style-name="P135"><text:span text:style-name="T225"># Repartir du début</text:span></text:p>
          <text:p text:style-name="P135"><text:span text:style-name="T225">./kafka-consumer-groups.sh --bootstrap-server localhost:9092 \</text:span></text:p>
          <text:p text:style-name="P135"><text:span text:style-name="T225"><text:s text:c="3"/></text:span><text:span text:style-name="T225">--group order-processor --topic orders \</text:span></text:p>
          <text:p text:style-name="P135"><text:span text:style-name="T225"><text:s text:c="3"/></text:span><text:span text:style-name="T225">--reset-offsets --to-earliest --execute</text:span></text:p>
          <text:p text:style-name="P135"><text:span text:style-name="T226"/></text:p>
          <text:p text:style-name="P135"><text:span text:style-name="T225"># Repartir à une date donnée</text:span></text:p>
          <text:p text:style-name="P135"><text:span text:style-name="T225"><text:s text:c="3"/></text:span><text:span text:style-name="T225">--reset-offsets --to-datetime 2026-05-01T00:00:00.000</text:span></text:p>
          <text:p text:style-name="P135"><text:span text:style-name="T226"/></text:p>
          <text:p text:style-name="P135"><text:span text:style-name="T225"># Avancer / reculer relativement</text:span></text:p>
          <text:p text:style-name="P135"><text:span text:style-name="T225"><text:s text:c="3"/></text:span><text:span text:style-name="T225">--reset-offsets --shift-by -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3" draw:style-name="gr183" draw:text-style-name="P128" draw:layer="layout" svg:width="1.484cm" svg:height="0.839cm" svg:x="27.62cm" svg:y="19.739cm">
          <text:p text:style-name="P127"><text:span text:style-name="T218">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4" draw:style-name="gr2" draw:layer="layout" svg:width="16.799cm" svg:height="10.023cm" svg:x="2.1cm" svg:y="3.712cm" draw:page-number="220" presentation:class="page"/>
          <draw:frame draw:name="Notes Placeholder 24" presentation:style-name="pr97" draw:text-style-name="P129" draw:layer="layout" svg:width="16.799cm" svg:height="11.693cm" svg:x="2.1cm" svg:y="14.293cm" presentation:class="notes" presentation:placeholder="true" presentation:user-transformed="true">
            <draw:text-box/>
          </draw:frame>
          <draw:frame draw:name="Slide Number Placeholder 24" presentation:style-name="pr9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5" draw:style-name="dp11" draw:master-page-name="DEFAULT">
        <office:forms form:automatic-focus="false" form:apply-design-mode="false"/>
        <draw:custom-shape draw:name="Shape 199"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95" draw:style-name="gr164" draw:text-style-name="P67" draw:layer="layout" svg:x1="2.197cm" svg:y1="0.7cm" svg:x2="2.198cm" svg:y2="3.108cm">
          <text:p/>
        </draw:line>
        <draw:line draw:name="Shape 196" draw:style-name="gr165" draw:text-style-name="P67" draw:layer="layout" svg:x1="0.89cm" svg:y1="4.34cm" svg:x2="10.394cm" svg:y2="4.341cm">
          <text:p/>
        </draw:line>
        <draw:line draw:name="Shape 197" draw:style-name="gr166" draw:text-style-name="P67" draw:layer="layout" svg:x1="10.394cm" svg:y1="4.34cm" svg:x2="19.304cm" svg:y2="4.341cm">
          <text:p/>
        </draw:line>
        <draw:line draw:name="Shape 198" draw:style-name="gr167" draw:text-style-name="P67" draw:layer="layout" svg:x1="19.305cm" svg:y1="4.339cm" svg:x2="28.809cm" svg:y2="4.34cm">
          <text:p/>
        </draw:line>
        <draw:custom-shape draw:name="Text 74" draw:style-name="gr184" draw:text-style-name="P124" draw:layer="layout" svg:width="22.274cm" svg:height="2.799cm" svg:x="4.454cm" svg:y="1.259cm">
          <text:p text:style-name="P123"><text:span text:style-name="T215">Bonnes pr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5" draw:style-name="gr185" draw:text-style-name="P134" draw:layer="layout" svg:width="25.541cm" svg:height="14.559cm" svg:x="2.078cm" svg:y="5.179cm">
          <text:list text:style-name="L26">
            <text:list-item>
              <text:p text:style-name="P132"><text:span text:style-name="T220">Workflow recommandé</text:span></text:p>
            </text:list-item>
          </text:list>
          <text:p text:style-name="P133"><text:span text:style-name="T220"><text:s text:c="6"/>– <text:s/></text:span><text:span text:style-name="T220">Export CSV en --dry-run</text:span></text:p>
          <text:p text:style-name="P133"><text:span text:style-name="T220"><text:s text:c="6"/>– <text:s/></text:span><text:span text:style-name="T220">Revue du fichier</text:span></text:p>
          <text:p text:style-name="P133"><text:span text:style-name="T220"><text:s text:c="6"/>– <text:s/></text:span><text:span text:style-name="T220">--execute ou import via --from-file</text:span></text:p>
          <text:list text:continue-numbering="true" text:style-name="L26">
            <text:list-item>
              <text:p text:style-name="P133"><text:span text:style-name="T220">Groupes orphelins</text:span></text:p>
            </text:list-item>
          </text:list>
          <text:p text:style-name="P133"><text:span text:style-name="T220"><text:s text:c="6"/>– <text:s/></text:span><text:span text:style-name="T220">Offsets purgés au bout de offsets.retention.minutes</text:span></text:p>
          <text:p text:style-name="P133"><text:span text:style-name="T220"><text:s text:c="6"/>– <text:s/></text:span><text:span text:style-name="T220">Auditer périodiquement (--list, --describe)</text:span></text:p>
          <text:p text:style-name="P133"><text:span text:style-name="T220"><text:s text:c="6"/>– <text:s/></text:span><text:span text:style-name="T220">Supprimer les groupes inutilisés (--del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6" draw:style-name="gr186" draw:text-style-name="P128" draw:layer="layout" svg:width="1.484cm" svg:height="0.839cm" svg:x="27.62cm" svg:y="19.739cm">
          <text:p text:style-name="P127"><text:span text:style-name="T218">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5" draw:style-name="gr2" draw:layer="layout" svg:width="16.799cm" svg:height="10.023cm" svg:x="2.1cm" svg:y="3.712cm" draw:page-number="221" presentation:class="page"/>
          <draw:frame draw:name="Notes Placeholder 25" presentation:style-name="pr99" draw:text-style-name="P129" draw:layer="layout" svg:width="16.799cm" svg:height="11.693cm" svg:x="2.1cm" svg:y="14.293cm" presentation:class="notes" presentation:placeholder="true" presentation:user-transformed="true">
            <draw:text-box/>
          </draw:frame>
          <draw:frame draw:name="Slide Number Placeholder 25" presentation:style-name="pr10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6" draw:style-name="dp11" draw:master-page-name="DEFAULT">
        <office:forms form:automatic-focus="false" form:apply-design-mode="false"/>
        <draw:custom-shape draw:name="Shape 207"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03" draw:style-name="gr164" draw:text-style-name="P67" draw:layer="layout" svg:x1="2.197cm" svg:y1="0.7cm" svg:x2="2.198cm" svg:y2="3.108cm">
          <text:p/>
        </draw:line>
        <draw:line draw:name="Shape 204" draw:style-name="gr165" draw:text-style-name="P67" draw:layer="layout" svg:x1="0.89cm" svg:y1="4.34cm" svg:x2="10.394cm" svg:y2="4.341cm">
          <text:p/>
        </draw:line>
        <draw:line draw:name="Shape 205" draw:style-name="gr166" draw:text-style-name="P67" draw:layer="layout" svg:x1="10.394cm" svg:y1="4.34cm" svg:x2="19.304cm" svg:y2="4.341cm">
          <text:p/>
        </draw:line>
        <draw:line draw:name="Shape 206" draw:style-name="gr167" draw:text-style-name="P67" draw:layer="layout" svg:x1="19.305cm" svg:y1="4.339cm" svg:x2="28.809cm" svg:y2="4.34cm">
          <text:p/>
        </draw:line>
        <draw:custom-shape draw:name="Text 77" draw:style-name="gr187" draw:text-style-name="P124" draw:layer="layout" svg:width="22.274cm" svg:height="2.799cm" svg:x="4.454cm" svg:y="1.259cm">
          <text:p text:style-name="P123"><text:span text:style-name="T215">Exploitation au quotid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8" draw:style-name="gr188" draw:text-style-name="P126" draw:layer="layout" svg:width="23.759cm" svg:height="9.799cm" svg:x="2.969cm" svg:y="6.999cm">
          <text:p text:style-name="P125"><text:span text:style-name="T217">Stockage et rétention</text:span></text:p>
          <text:p text:style-name="P125"><text:span text:style-name="T217">Gestion des topics</text:span></text:p>
          <text:p text:style-name="P125"><text:span text:style-name="T217">Gestion des partitions</text:span></text:p>
          <text:p text:style-name="P125"><text:span text:style-name="T217">Gestion des consumer groups</text:span></text:p>
          <text:p text:style-name="P125"><text:span text:style-name="T216">Ajout et retrait de brokers</text:span></text:p>
          <text:p text:style-name="P125"><text:span text:style-name="T217">Mise à jour du cluster</text:span></text:p>
          <text:p text:style-name="P125"><text:span text:style-name="T217">Sauvegarde et reprise (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9" draw:style-name="gr189" draw:text-style-name="P128" draw:layer="layout" svg:width="1.484cm" svg:height="0.839cm" svg:x="27.62cm" svg:y="19.739cm">
          <text:p text:style-name="P127"><text:span text:style-name="T218">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6" draw:style-name="gr2" draw:layer="layout" svg:width="16.799cm" svg:height="10.023cm" svg:x="2.1cm" svg:y="3.712cm" draw:page-number="222" presentation:class="page"/>
          <draw:frame draw:name="Notes Placeholder 26" presentation:style-name="pr101" draw:text-style-name="P129" draw:layer="layout" svg:width="16.799cm" svg:height="11.693cm" svg:x="2.1cm" svg:y="14.293cm" presentation:class="notes" presentation:placeholder="true" presentation:user-transformed="true">
            <draw:text-box/>
          </draw:frame>
          <draw:frame draw:name="Slide Number Placeholder 26" presentation:style-name="pr10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7" draw:style-name="dp11" draw:master-page-name="DEFAULT">
        <office:forms form:automatic-focus="false" form:apply-design-mode="false"/>
        <draw:custom-shape draw:name="Shape 215"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11" draw:style-name="gr164" draw:text-style-name="P67" draw:layer="layout" svg:x1="2.197cm" svg:y1="0.7cm" svg:x2="2.198cm" svg:y2="3.108cm">
          <text:p/>
        </draw:line>
        <draw:line draw:name="Shape 212" draw:style-name="gr165" draw:text-style-name="P67" draw:layer="layout" svg:x1="0.89cm" svg:y1="4.34cm" svg:x2="10.394cm" svg:y2="4.341cm">
          <text:p/>
        </draw:line>
        <draw:line draw:name="Shape 213" draw:style-name="gr166" draw:text-style-name="P67" draw:layer="layout" svg:x1="10.394cm" svg:y1="4.34cm" svg:x2="19.304cm" svg:y2="4.341cm">
          <text:p/>
        </draw:line>
        <draw:line draw:name="Shape 214" draw:style-name="gr167" draw:text-style-name="P67" draw:layer="layout" svg:x1="19.305cm" svg:y1="4.339cm" svg:x2="28.809cm" svg:y2="4.34cm">
          <text:p/>
        </draw:line>
        <draw:custom-shape draw:name="Text 80" draw:style-name="gr190" draw:text-style-name="P124" draw:layer="layout" svg:width="22.274cm" svg:height="2.799cm" svg:x="4.454cm" svg:y="1.259cm">
          <text:p text:style-name="P123"><text:span text:style-name="T215">Ajout d'un 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1" draw:style-name="gr191" draw:text-style-name="P134" draw:layer="layout" svg:width="25.541cm" svg:height="14.559cm" svg:x="2.078cm" svg:y="5.179cm">
          <text:list text:style-name="L26">
            <text:list-item>
              <text:p text:style-name="P132"><text:span text:style-name="T220">Provisionner la machine et installer Kafka</text:span></text:p>
            </text:list-item>
            <text:list-item>
              <text:p text:style-name="P132"><text:span text:style-name="T220">Configurer un broker.id unique, pointer vers le même cluster</text:span></text:p>
            </text:list-item>
            <text:list-item>
              <text:p text:style-name="P132"><text:span text:style-name="T220">Démarrer le broker — il rejoint le cluster mais ne reçoit aucune donnée existante</text:span></text:p>
            </text:list-item>
            <text:list-item>
              <text:p text:style-name="P132"><text:span text:style-name="T220">Lancer une réassignation pour répartir les partitions existantes</text:span></text:p>
            </text:list-item>
            <text:list-item>
              <text:p text:style-name="P132"><text:span text:style-name="T220">Vérifier l'équilibrage du leadership</text:span></text:p>
            </text:list-item>
          </text:list>
          <text:p text:style-name="P133"><text:span text:style-name="T220"><text:s text:c="6"/>– <text:s/></text:span><text:span text:style-name="T220">kafka-leader-election.sh --election-type preferred --all-topic-part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2" draw:style-name="gr192" draw:text-style-name="P128" draw:layer="layout" svg:width="1.484cm" svg:height="0.839cm" svg:x="27.62cm" svg:y="19.739cm">
          <text:p text:style-name="P127"><text:span text:style-name="T218">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7" draw:style-name="gr2" draw:layer="layout" svg:width="16.799cm" svg:height="10.023cm" svg:x="2.1cm" svg:y="3.712cm" draw:page-number="223" presentation:class="page"/>
          <draw:frame draw:name="Notes Placeholder 27" presentation:style-name="pr103" draw:text-style-name="P129" draw:layer="layout" svg:width="16.799cm" svg:height="11.693cm" svg:x="2.1cm" svg:y="14.293cm" presentation:class="notes" presentation:placeholder="true" presentation:user-transformed="true">
            <draw:text-box/>
          </draw:frame>
          <draw:frame draw:name="Slide Number Placeholder 27" presentation:style-name="pr10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8" draw:style-name="dp11" draw:master-page-name="DEFAULT">
        <office:forms form:automatic-focus="false" form:apply-design-mode="false"/>
        <draw:custom-shape draw:name="Shape 223"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19" draw:style-name="gr164" draw:text-style-name="P67" draw:layer="layout" svg:x1="2.197cm" svg:y1="0.7cm" svg:x2="2.198cm" svg:y2="3.108cm">
          <text:p/>
        </draw:line>
        <draw:line draw:name="Shape 220" draw:style-name="gr165" draw:text-style-name="P67" draw:layer="layout" svg:x1="0.89cm" svg:y1="4.34cm" svg:x2="10.394cm" svg:y2="4.341cm">
          <text:p/>
        </draw:line>
        <draw:line draw:name="Shape 221" draw:style-name="gr166" draw:text-style-name="P67" draw:layer="layout" svg:x1="10.394cm" svg:y1="4.34cm" svg:x2="19.304cm" svg:y2="4.341cm">
          <text:p/>
        </draw:line>
        <draw:line draw:name="Shape 222" draw:style-name="gr167" draw:text-style-name="P67" draw:layer="layout" svg:x1="19.305cm" svg:y1="4.339cm" svg:x2="28.809cm" svg:y2="4.34cm">
          <text:p/>
        </draw:line>
        <draw:custom-shape draw:name="Text 83" draw:style-name="gr193" draw:text-style-name="P124" draw:layer="layout" svg:width="22.274cm" svg:height="2.799cm" svg:x="4.454cm" svg:y="1.259cm">
          <text:p text:style-name="P123"><text:span text:style-name="T215">Retrait d'un 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4" draw:style-name="gr194" draw:text-style-name="P134" draw:layer="layout" svg:width="25.541cm" svg:height="14.559cm" svg:x="2.078cm" svg:y="5.179cm">
          <text:list text:style-name="L26">
            <text:list-item>
              <text:p text:style-name="P132"><text:span text:style-name="T220">Réassigner toutes les partitions du broker vers les autres</text:span></text:p>
            </text:list-item>
            <text:list-item>
              <text:p text:style-name="P132"><text:span text:style-name="T220">Vérifier qu'aucune partition ne réside sur le broker</text:span></text:p>
            </text:list-item>
          </text:list>
          <text:p text:style-name="P133"><text:span text:style-name="T220"><text:s text:c="6"/>– <text:s/></text:span><text:span text:style-name="T220">kafka-topics.sh --describe filtré sur le broker</text:span></text:p>
          <text:list text:continue-numbering="true" text:style-name="L26">
            <text:list-item>
              <text:p text:style-name="P133"><text:span text:style-name="T220">Arrêter proprement le broker (kafka-server-stop.sh)</text:span></text:p>
            </text:list-item>
            <text:list-item>
              <text:p text:style-name="P133"><text:span text:style-name="T220">Décommissionner la machine</text:span></text:p>
            </text:list-item>
            <text:list-item>
              <text:p text:style-name="P133"><text:span text:style-name="T220">À jouer en heures creuses si volumes importants</text:span></text:p>
            </text:list-item>
          </text:list>
          <text:p text:style-name="P133"><text:span text:style-name="T220"><text:s text:c="6"/>– <text:s/></text:span><text:span text:style-name="T220">Utiliser --throttle pour ne pas saturer le rés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5" draw:style-name="gr195" draw:text-style-name="P128" draw:layer="layout" svg:width="1.484cm" svg:height="0.839cm" svg:x="27.62cm" svg:y="19.739cm">
          <text:p text:style-name="P127"><text:span text:style-name="T218">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3" draw:text-style-name="P59" draw:layer="layout" svg:width="20.682cm" svg:height="1.216cm" svg:x="1.605cm" svg:y="19.4cm">
          <draw:text-box>
            <text:p><text:span text:style-name="T94">Atelier 10.2 : Ajout de nœud et réassignation de partitions</text:span></text:p>
          </draw:text-box>
        </draw:frame>
        <presentation:notes draw:style-name="dp6">
          <office:forms form:automatic-focus="false" form:apply-design-mode="false"/>
          <draw:page-thumbnail draw:name="Slide Image Placeholder 28" draw:style-name="gr2" draw:layer="layout" svg:width="16.799cm" svg:height="10.023cm" svg:x="2.1cm" svg:y="3.712cm" draw:page-number="224" presentation:class="page"/>
          <draw:frame draw:name="Notes Placeholder 28" presentation:style-name="pr105" draw:text-style-name="P129" draw:layer="layout" svg:width="16.799cm" svg:height="11.693cm" svg:x="2.1cm" svg:y="14.293cm" presentation:class="notes" presentation:placeholder="true" presentation:user-transformed="true">
            <draw:text-box/>
          </draw:frame>
          <draw:frame draw:name="Slide Number Placeholder 28" presentation:style-name="pr10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29" draw:style-name="dp11" draw:master-page-name="DEFAULT">
        <office:forms form:automatic-focus="false" form:apply-design-mode="false"/>
        <draw:custom-shape draw:name="Shape 231"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27" draw:style-name="gr164" draw:text-style-name="P67" draw:layer="layout" svg:x1="2.197cm" svg:y1="0.7cm" svg:x2="2.198cm" svg:y2="3.108cm">
          <text:p/>
        </draw:line>
        <draw:line draw:name="Shape 228" draw:style-name="gr165" draw:text-style-name="P67" draw:layer="layout" svg:x1="0.89cm" svg:y1="4.34cm" svg:x2="10.394cm" svg:y2="4.341cm">
          <text:p/>
        </draw:line>
        <draw:line draw:name="Shape 229" draw:style-name="gr166" draw:text-style-name="P67" draw:layer="layout" svg:x1="10.394cm" svg:y1="4.34cm" svg:x2="19.304cm" svg:y2="4.341cm">
          <text:p/>
        </draw:line>
        <draw:line draw:name="Shape 230" draw:style-name="gr167" draw:text-style-name="P67" draw:layer="layout" svg:x1="19.305cm" svg:y1="4.339cm" svg:x2="28.809cm" svg:y2="4.34cm">
          <text:p/>
        </draw:line>
        <draw:custom-shape draw:name="Text 86" draw:style-name="gr196" draw:text-style-name="P124" draw:layer="layout" svg:width="22.274cm" svg:height="2.799cm" svg:x="4.454cm" svg:y="1.259cm">
          <text:p text:style-name="P123"><text:span text:style-name="T215">Exploitation au quotid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7" draw:style-name="gr197" draw:text-style-name="P126" draw:layer="layout" svg:width="23.759cm" svg:height="9.799cm" svg:x="2.969cm" svg:y="6.999cm">
          <text:p text:style-name="P125"><text:span text:style-name="T217">Stockage et rétention</text:span></text:p>
          <text:p text:style-name="P125"><text:span text:style-name="T217">Gestion des topics</text:span></text:p>
          <text:p text:style-name="P125"><text:span text:style-name="T217">Gestion des partitions</text:span></text:p>
          <text:p text:style-name="P125"><text:span text:style-name="T217">Gestion des consumer groups</text:span></text:p>
          <text:p text:style-name="P125"><text:span text:style-name="T217">Ajout et retrait de brokers</text:span></text:p>
          <text:p text:style-name="P125"><text:span text:style-name="T216">Mise à jour du cluster</text:span></text:p>
          <text:p text:style-name="P125"><text:span text:style-name="T217">Sauvegarde et reprise (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8" draw:style-name="gr198" draw:text-style-name="P128" draw:layer="layout" svg:width="1.484cm" svg:height="0.839cm" svg:x="27.62cm" svg:y="19.739cm">
          <text:p text:style-name="P127"><text:span text:style-name="T218">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29" draw:style-name="gr2" draw:layer="layout" svg:width="16.799cm" svg:height="10.023cm" svg:x="2.1cm" svg:y="3.712cm" draw:page-number="225" presentation:class="page"/>
          <draw:frame draw:name="Notes Placeholder 29" presentation:style-name="pr107" draw:text-style-name="P129" draw:layer="layout" svg:width="16.799cm" svg:height="11.693cm" svg:x="2.1cm" svg:y="14.293cm" presentation:class="notes" presentation:placeholder="true" presentation:user-transformed="true">
            <draw:text-box/>
          </draw:frame>
          <draw:frame draw:name="Slide Number Placeholder 29" presentation:style-name="pr10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30" draw:style-name="dp11" draw:master-page-name="DEFAULT">
        <office:forms form:automatic-focus="false" form:apply-design-mode="false"/>
        <draw:custom-shape draw:name="Shape 239"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5" draw:style-name="gr164" draw:text-style-name="P67" draw:layer="layout" svg:x1="2.197cm" svg:y1="0.7cm" svg:x2="2.198cm" svg:y2="3.108cm">
          <text:p/>
        </draw:line>
        <draw:line draw:name="Shape 236" draw:style-name="gr165" draw:text-style-name="P67" draw:layer="layout" svg:x1="0.89cm" svg:y1="4.34cm" svg:x2="10.394cm" svg:y2="4.341cm">
          <text:p/>
        </draw:line>
        <draw:line draw:name="Shape 237" draw:style-name="gr166" draw:text-style-name="P67" draw:layer="layout" svg:x1="10.394cm" svg:y1="4.34cm" svg:x2="19.304cm" svg:y2="4.341cm">
          <text:p/>
        </draw:line>
        <draw:line draw:name="Shape 238" draw:style-name="gr167" draw:text-style-name="P67" draw:layer="layout" svg:x1="19.305cm" svg:y1="4.339cm" svg:x2="28.809cm" svg:y2="4.34cm">
          <text:p/>
        </draw:line>
        <draw:custom-shape draw:name="Text 89" draw:style-name="gr199" draw:text-style-name="P124" draw:layer="layout" svg:width="22.274cm" svg:height="2.799cm" svg:x="4.454cm" svg:y="1.259cm">
          <text:p text:style-name="P123"><text:span text:style-name="T215">Rolling upgrade — princi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0" draw:style-name="gr200" draw:text-style-name="P134" draw:layer="layout" svg:width="25.541cm" svg:height="14.559cm" svg:x="2.078cm" svg:y="5.179cm">
          <text:list text:style-name="L26">
            <text:list-item>
              <text:p text:style-name="P132"><text:span text:style-name="T220">Objectif</text:span></text:p>
            </text:list-item>
          </text:list>
          <text:p text:style-name="P133"><text:span text:style-name="T220"><text:s text:c="6"/>– <text:s/></text:span><text:span text:style-name="T220">Aucune interruption de service</text:span></text:p>
          <text:p text:style-name="P133"><text:span text:style-name="T220"><text:s text:c="6"/>– <text:s/></text:span><text:span text:style-name="T220">Producteurs et consommateurs continuent de tourner</text:span></text:p>
          <text:list text:continue-numbering="true" text:style-name="L26">
            <text:list-item>
              <text:p text:style-name="P133"><text:span text:style-name="T220">Garanties Kafka</text:span></text:p>
            </text:list-item>
          </text:list>
          <text:p text:style-name="P133"><text:span text:style-name="T220"><text:s text:c="6"/>– <text:s/></text:span><text:span text:style-name="T220">Compatibilité ascendante des clients</text:span></text:p>
          <text:p text:style-name="P133"><text:span text:style-name="T220"><text:s text:c="6"/>– <text:s/></text:span><text:span text:style-name="T220">Nouveaux brokers compatibles avec anciens clients</text:span></text:p>
          <text:list text:continue-numbering="true" text:style-name="L26">
            <text:list-item>
              <text:p text:style-name="P133"><text:span text:style-name="T220">Prérequis</text:span></text:p>
            </text:list-item>
          </text:list>
          <text:p text:style-name="P133"><text:span text:style-name="T220"><text:s text:c="6"/>– <text:s/></text:span><text:span text:style-name="T220">Pour toutes les partitions : ISR = Replicas</text:span></text:p>
          <text:p text:style-name="P133"><text:span text:style-name="T220"><text:s text:c="6"/>– <text:s/></text:span><text:span text:style-name="T220">Lecture des release notes (paliers intermédiaires possi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1" draw:style-name="gr201" draw:text-style-name="P128" draw:layer="layout" svg:width="1.484cm" svg:height="0.839cm" svg:x="27.62cm" svg:y="19.739cm">
          <text:p text:style-name="P127"><text:span text:style-name="T218">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0" draw:style-name="gr2" draw:layer="layout" svg:width="16.799cm" svg:height="10.023cm" svg:x="2.1cm" svg:y="3.712cm" draw:page-number="226" presentation:class="page"/>
          <draw:frame draw:name="Notes Placeholder 30" presentation:style-name="pr109" draw:text-style-name="P129" draw:layer="layout" svg:width="16.799cm" svg:height="11.693cm" svg:x="2.1cm" svg:y="14.293cm" presentation:class="notes" presentation:placeholder="true" presentation:user-transformed="true">
            <draw:text-box/>
          </draw:frame>
          <draw:frame draw:name="Slide Number Placeholder 30" presentation:style-name="pr11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31" draw:style-name="dp11" draw:master-page-name="DEFAULT">
        <office:forms form:automatic-focus="false" form:apply-design-mode="false"/>
        <draw:custom-shape draw:name="Shape 247"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43" draw:style-name="gr164" draw:text-style-name="P67" draw:layer="layout" svg:x1="2.197cm" svg:y1="0.7cm" svg:x2="2.198cm" svg:y2="3.108cm">
          <text:p/>
        </draw:line>
        <draw:line draw:name="Shape 244" draw:style-name="gr165" draw:text-style-name="P67" draw:layer="layout" svg:x1="0.89cm" svg:y1="4.34cm" svg:x2="10.394cm" svg:y2="4.341cm">
          <text:p/>
        </draw:line>
        <draw:line draw:name="Shape 245" draw:style-name="gr166" draw:text-style-name="P67" draw:layer="layout" svg:x1="10.394cm" svg:y1="4.34cm" svg:x2="19.304cm" svg:y2="4.341cm">
          <text:p/>
        </draw:line>
        <draw:line draw:name="Shape 246" draw:style-name="gr167" draw:text-style-name="P67" draw:layer="layout" svg:x1="19.305cm" svg:y1="4.339cm" svg:x2="28.809cm" svg:y2="4.34cm">
          <text:p/>
        </draw:line>
        <draw:custom-shape draw:name="Text 92" draw:style-name="gr202" draw:text-style-name="P124" draw:layer="layout" svg:width="22.274cm" svg:height="2.799cm" svg:x="4.454cm" svg:y="1.259cm">
          <text:p text:style-name="P123"><text:span text:style-name="T215">Étapes (cluster ZooKee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3" draw:style-name="gr203" draw:text-style-name="P134" draw:layer="layout" svg:width="25.541cm" svg:height="14.559cm" svg:x="2.078cm" svg:y="5.179cm">
          <text:list text:style-name="L26">
            <text:list-item>
              <text:p text:style-name="P132"><text:span text:style-name="T229">Figer les versions de protocole dans server.properties</text:span></text:p>
            </text:list-item>
          </text:list>
          <text:p text:style-name="P133"><text:span text:style-name="T229"><text:s text:c="6"/>– <text:s/></text:span><text:span text:style-name="T229">inter.broker.protocol.version = version actuelle</text:span></text:p>
          <text:p text:style-name="P133"><text:span text:style-name="T229"><text:s text:c="6"/>– <text:s/></text:span><text:span text:style-name="T229">log.message.format.version = version actuelle</text:span></text:p>
          <text:list text:continue-numbering="true" text:style-name="L26">
            <text:list-item>
              <text:p text:style-name="P133"><text:span text:style-name="T229">Mettre à niveau les brokers un par un (rolling restart)</text:span></text:p>
            </text:list-item>
            <text:list-item>
              <text:p text:style-name="P133"><text:span text:style-name="T229">Attendre l'état stable (ISR = Replicas) entre chaque</text:span></text:p>
            </text:list-item>
            <text:list-item>
              <text:p text:style-name="P133"><text:span text:style-name="T229">Mettre à jour le contrôleur en dernier</text:span></text:p>
            </text:list-item>
            <text:list-item>
              <text:p text:style-name="P133"><text:span text:style-name="T229">Basculer inter.broker.protocol.version sur la nouvelle version</text:span></text:p>
            </text:list-item>
            <text:list-item>
              <text:p text:style-name="P133"><text:span text:style-name="T229">Mettre à jour les clients producteurs / consommateurs</text:span></text:p>
            </text:list-item>
            <text:list-item>
              <text:p text:style-name="P133"><text:span text:style-name="T229">Optionnellement basculer log.message.format.vers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4" draw:style-name="gr204" draw:text-style-name="P128" draw:layer="layout" svg:width="1.484cm" svg:height="0.839cm" svg:x="27.62cm" svg:y="19.739cm">
          <text:p text:style-name="P127"><text:span text:style-name="T218">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1" draw:style-name="gr2" draw:layer="layout" svg:width="16.799cm" svg:height="10.023cm" svg:x="2.1cm" svg:y="3.712cm" draw:page-number="227" presentation:class="page"/>
          <draw:frame draw:name="Notes Placeholder 31" presentation:style-name="pr111" draw:text-style-name="P129" draw:layer="layout" svg:width="16.799cm" svg:height="11.693cm" svg:x="2.1cm" svg:y="14.293cm" presentation:class="notes" presentation:placeholder="true" presentation:user-transformed="true">
            <draw:text-box/>
          </draw:frame>
          <draw:frame draw:name="Slide Number Placeholder 31" presentation:style-name="pr11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32" draw:style-name="dp11" draw:master-page-name="DEFAULT">
        <office:forms form:automatic-focus="false" form:apply-design-mode="false"/>
        <draw:custom-shape draw:name="Shape 255"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51" draw:style-name="gr164" draw:text-style-name="P67" draw:layer="layout" svg:x1="2.197cm" svg:y1="0.7cm" svg:x2="2.198cm" svg:y2="3.108cm">
          <text:p/>
        </draw:line>
        <draw:line draw:name="Shape 252" draw:style-name="gr165" draw:text-style-name="P67" draw:layer="layout" svg:x1="0.89cm" svg:y1="4.34cm" svg:x2="10.394cm" svg:y2="4.341cm">
          <text:p/>
        </draw:line>
        <draw:line draw:name="Shape 253" draw:style-name="gr166" draw:text-style-name="P67" draw:layer="layout" svg:x1="10.394cm" svg:y1="4.34cm" svg:x2="19.304cm" svg:y2="4.341cm">
          <text:p/>
        </draw:line>
        <draw:line draw:name="Shape 254" draw:style-name="gr167" draw:text-style-name="P67" draw:layer="layout" svg:x1="19.305cm" svg:y1="4.339cm" svg:x2="28.809cm" svg:y2="4.34cm">
          <text:p/>
        </draw:line>
        <draw:custom-shape draw:name="Text 95" draw:style-name="gr205" draw:text-style-name="P124" draw:layer="layout" svg:width="22.274cm" svg:height="2.799cm" svg:x="4.454cm" svg:y="1.259cm">
          <text:p text:style-name="P123"><text:span text:style-name="T215">Spécificité KRaft (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6" draw:style-name="gr206" draw:text-style-name="P134" draw:layer="layout" svg:width="25.541cm" svg:height="14.559cm" svg:x="2.078cm" svg:y="5.179cm">
          <text:list text:style-name="L26">
            <text:list-item>
              <text:p text:style-name="P132"><text:span text:style-name="T220">Rolling upgrade séparé sur les controllers et les brokers</text:span></text:p>
            </text:list-item>
            <text:list-item>
              <text:p text:style-name="P132"><text:span text:style-name="T220">Feature flags</text:span></text:p>
            </text:list-item>
          </text:list>
          <text:p text:style-name="P133"><text:span text:style-name="T220"><text:s text:c="6"/>– <text:s/></text:span><text:span text:style-name="T220">Outil kafka-features.sh</text:span></text:p>
          <text:p text:style-name="P133"><text:span text:style-name="T220"><text:s text:c="6"/>– <text:s/></text:span><text:span text:style-name="T220">Remplacent progressivement inter.broker.protocol.version</text:span></text:p>
          <text:p text:style-name="P133"><text:span text:style-name="T220"><text:s text:c="6"/>– <text:s/></text:span><text:span text:style-name="T220">Activation atomique des nouvelles fonctionnalités</text:span></text:p>
          <text:list text:continue-numbering="true" text:style-name="L26">
            <text:list-item>
              <text:p text:style-name="P133"><text:span text:style-name="T220">Vérifier la matrice de compatibilité avant chaque upgra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7" draw:style-name="gr207" draw:text-style-name="P128" draw:layer="layout" svg:width="1.484cm" svg:height="0.839cm" svg:x="27.62cm" svg:y="19.739cm">
          <text:p text:style-name="P127"><text:span text:style-name="T218">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2" draw:style-name="gr2" draw:layer="layout" svg:width="16.799cm" svg:height="10.023cm" svg:x="2.1cm" svg:y="3.712cm" draw:page-number="228" presentation:class="page"/>
          <draw:frame draw:name="Notes Placeholder 32" presentation:style-name="pr113" draw:text-style-name="P129" draw:layer="layout" svg:width="16.799cm" svg:height="11.693cm" svg:x="2.1cm" svg:y="14.293cm" presentation:class="notes" presentation:placeholder="true" presentation:user-transformed="true">
            <draw:text-box/>
          </draw:frame>
          <draw:frame draw:name="Slide Number Placeholder 32" presentation:style-name="pr11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33" draw:style-name="dp11" draw:master-page-name="DEFAULT">
        <office:forms form:automatic-focus="false" form:apply-design-mode="false"/>
        <draw:custom-shape draw:name="Shape 263"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59" draw:style-name="gr164" draw:text-style-name="P67" draw:layer="layout" svg:x1="2.197cm" svg:y1="0.7cm" svg:x2="2.198cm" svg:y2="3.108cm">
          <text:p/>
        </draw:line>
        <draw:line draw:name="Shape 260" draw:style-name="gr165" draw:text-style-name="P67" draw:layer="layout" svg:x1="0.89cm" svg:y1="4.34cm" svg:x2="10.394cm" svg:y2="4.341cm">
          <text:p/>
        </draw:line>
        <draw:line draw:name="Shape 261" draw:style-name="gr166" draw:text-style-name="P67" draw:layer="layout" svg:x1="10.394cm" svg:y1="4.34cm" svg:x2="19.304cm" svg:y2="4.341cm">
          <text:p/>
        </draw:line>
        <draw:line draw:name="Shape 262" draw:style-name="gr167" draw:text-style-name="P67" draw:layer="layout" svg:x1="19.305cm" svg:y1="4.339cm" svg:x2="28.809cm" svg:y2="4.34cm">
          <text:p/>
        </draw:line>
        <draw:custom-shape draw:name="Text 98" draw:style-name="gr208" draw:text-style-name="P124" draw:layer="layout" svg:width="22.274cm" svg:height="2.799cm" svg:x="4.454cm" svg:y="1.259cm">
          <text:p text:style-name="P123"><text:span text:style-name="T215">Exploitation au quotid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9" draw:style-name="gr209" draw:text-style-name="P126" draw:layer="layout" svg:width="23.759cm" svg:height="9.799cm" svg:x="2.969cm" svg:y="6.999cm">
          <text:p text:style-name="P125"><text:span text:style-name="T217">Stockage et rétention</text:span></text:p>
          <text:p text:style-name="P125"><text:span text:style-name="T217">Gestion des topics</text:span></text:p>
          <text:p text:style-name="P125"><text:span text:style-name="T217">Gestion des partitions</text:span></text:p>
          <text:p text:style-name="P125"><text:span text:style-name="T217">Gestion des consumer groups</text:span></text:p>
          <text:p text:style-name="P125"><text:span text:style-name="T217">Ajout et retrait de brokers</text:span></text:p>
          <text:p text:style-name="P125"><text:span text:style-name="T217">Mise à jour du cluster</text:span></text:p>
          <text:p text:style-name="P125"><text:span text:style-name="T216">Sauvegarde et reprise (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0" draw:style-name="gr210" draw:text-style-name="P128" draw:layer="layout" svg:width="1.484cm" svg:height="0.839cm" svg:x="27.62cm" svg:y="19.739cm">
          <text:p text:style-name="P127"><text:span text:style-name="T21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3" draw:style-name="gr2" draw:layer="layout" svg:width="16.799cm" svg:height="10.023cm" svg:x="2.1cm" svg:y="3.712cm" draw:page-number="229" presentation:class="page"/>
          <draw:frame draw:name="Notes Placeholder 33" presentation:style-name="pr115" draw:text-style-name="P129" draw:layer="layout" svg:width="16.799cm" svg:height="11.693cm" svg:x="2.1cm" svg:y="14.293cm" presentation:class="notes" presentation:placeholder="true" presentation:user-transformed="true">
            <draw:text-box/>
          </draw:frame>
          <draw:frame draw:name="Slide Number Placeholder 33" presentation:style-name="pr11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34" draw:style-name="dp11" draw:master-page-name="DEFAULT">
        <office:forms form:automatic-focus="false" form:apply-design-mode="false"/>
        <draw:custom-shape draw:name="Shape 271"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67" draw:style-name="gr164" draw:text-style-name="P67" draw:layer="layout" svg:x1="2.197cm" svg:y1="0.7cm" svg:x2="2.198cm" svg:y2="3.108cm">
          <text:p/>
        </draw:line>
        <draw:line draw:name="Shape 268" draw:style-name="gr165" draw:text-style-name="P67" draw:layer="layout" svg:x1="0.89cm" svg:y1="4.34cm" svg:x2="10.394cm" svg:y2="4.341cm">
          <text:p/>
        </draw:line>
        <draw:line draw:name="Shape 269" draw:style-name="gr166" draw:text-style-name="P67" draw:layer="layout" svg:x1="10.394cm" svg:y1="4.34cm" svg:x2="19.304cm" svg:y2="4.341cm">
          <text:p/>
        </draw:line>
        <draw:line draw:name="Shape 270" draw:style-name="gr167" draw:text-style-name="P67" draw:layer="layout" svg:x1="19.305cm" svg:y1="4.339cm" svg:x2="28.809cm" svg:y2="4.34cm">
          <text:p/>
        </draw:line>
        <draw:custom-shape draw:name="Text 101" draw:style-name="gr211" draw:text-style-name="P124" draw:layer="layout" svg:width="22.274cm" svg:height="2.799cm" svg:x="4.454cm" svg:y="1.259cm">
          <text:p text:style-name="P123"><text:span text:style-name="T215">Straté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2" draw:style-name="gr212" draw:text-style-name="P134" draw:layer="layout" svg:width="25.541cm" svg:height="14.559cm" svg:x="2.078cm" svg:y="5.179cm">
          <text:list text:style-name="L26">
            <text:list-item>
              <text:p text:style-name="P132"><text:span text:style-name="T220">Kafka n'a pas de mécanisme de backup au sens base de données</text:span></text:p>
            </text:list-item>
            <text:list-item>
              <text:p text:style-name="P132"><text:span text:style-name="T220">La résilience repose sur la réplication</text:span></text:p>
            </text:list-item>
            <text:list-item>
              <text:p text:style-name="P132"><text:span text:style-name="T220">Quatre approches combinables</text:span></text:p>
            </text:list-item>
          </text:list>
          <text:p text:style-name="P133"><text:span text:style-name="T220"><text:s text:c="6"/>– <text:s/></text:span><text:span text:style-name="T220">Réplication intra-cluster multi-AZ (base)</text:span></text:p>
          <text:p text:style-name="P133"><text:span text:style-name="T220"><text:s text:c="6"/>– <text:s/></text:span><text:span text:style-name="T220">Multi-cluster actif / passif via MirrorMaker 2</text:span></text:p>
          <text:p text:style-name="P133"><text:span text:style-name="T220"><text:s text:c="6"/>– <text:s/></text:span><text:span text:style-name="T220">Multi-cluster actif / actif (MM2 bidirectionnel)</text:span></text:p>
          <text:p text:style-name="P133"><text:span text:style-name="T220"><text:s text:c="6"/>– <text:s/></text:span><text:span text:style-name="T220">Snapshots disques (complément, pas substit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3" draw:style-name="gr213" draw:text-style-name="P128" draw:layer="layout" svg:width="1.484cm" svg:height="0.839cm" svg:x="27.62cm" svg:y="19.739cm">
          <text:p text:style-name="P127"><text:span text:style-name="T218">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4" draw:style-name="gr2" draw:layer="layout" svg:width="16.799cm" svg:height="10.023cm" svg:x="2.1cm" svg:y="3.712cm" draw:page-number="230" presentation:class="page"/>
          <draw:frame draw:name="Notes Placeholder 34" presentation:style-name="pr117" draw:text-style-name="P129" draw:layer="layout" svg:width="16.799cm" svg:height="11.693cm" svg:x="2.1cm" svg:y="14.293cm" presentation:class="notes" presentation:placeholder="true" presentation:user-transformed="true">
            <draw:text-box/>
          </draw:frame>
          <draw:frame draw:name="Slide Number Placeholder 34" presentation:style-name="pr11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35" draw:style-name="dp11" draw:master-page-name="DEFAULT">
        <office:forms form:automatic-focus="false" form:apply-design-mode="false"/>
        <draw:custom-shape draw:name="Shape 279"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75" draw:style-name="gr164" draw:text-style-name="P67" draw:layer="layout" svg:x1="2.197cm" svg:y1="0.7cm" svg:x2="2.198cm" svg:y2="3.108cm">
          <text:p/>
        </draw:line>
        <draw:line draw:name="Shape 276" draw:style-name="gr165" draw:text-style-name="P67" draw:layer="layout" svg:x1="0.89cm" svg:y1="4.34cm" svg:x2="10.394cm" svg:y2="4.341cm">
          <text:p/>
        </draw:line>
        <draw:line draw:name="Shape 277" draw:style-name="gr166" draw:text-style-name="P67" draw:layer="layout" svg:x1="10.394cm" svg:y1="4.34cm" svg:x2="19.304cm" svg:y2="4.341cm">
          <text:p/>
        </draw:line>
        <draw:line draw:name="Shape 278" draw:style-name="gr167" draw:text-style-name="P67" draw:layer="layout" svg:x1="19.305cm" svg:y1="4.339cm" svg:x2="28.809cm" svg:y2="4.34cm">
          <text:p/>
        </draw:line>
        <draw:custom-shape draw:name="Text 104" draw:style-name="gr214" draw:text-style-name="P124" draw:layer="layout" svg:width="22.274cm" svg:height="2.799cm" svg:x="4.454cm" svg:y="1.259cm">
          <text:p text:style-name="P123"><text:span text:style-name="T215">MirrorMak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5" draw:style-name="gr215" draw:text-style-name="P134" draw:layer="layout" svg:width="25.541cm" svg:height="14.559cm" svg:x="2.078cm" svg:y="5.179cm">
          <text:list text:style-name="L26">
            <text:list-item>
              <text:p text:style-name="P132"><text:span text:style-name="T220">Construit sur Kafka Connect, remplace l'ancien MirrorMaker</text:span></text:p>
            </text:list-item>
            <text:list-item>
              <text:p text:style-name="P132"><text:span text:style-name="T220">Réplique</text:span></text:p>
            </text:list-item>
          </text:list>
          <text:p text:style-name="P133"><text:span text:style-name="T220"><text:s text:c="6"/>– <text:s/></text:span><text:span text:style-name="T220">Les données (topics)</text:span></text:p>
          <text:p text:style-name="P133"><text:span text:style-name="T220"><text:s text:c="6"/>– <text:s/></text:span><text:span text:style-name="T220">Les configurations de topics et ACLs</text:span></text:p>
          <text:p text:style-name="P133"><text:span text:style-name="T220"><text:s text:c="6"/>– <text:s/></text:span><text:span text:style-name="T220">Les offsets de consumer groups</text:span></text:p>
          <text:list text:continue-numbering="true" text:style-name="L26">
            <text:list-item>
              <text:p text:style-name="P133"><text:span text:style-name="T220">Topics répliqués préfixés par l'alias source</text:span></text:p>
            </text:list-item>
          </text:list>
          <text:p text:style-name="P133"><text:span text:style-name="T220"><text:s text:c="6"/>– <text:s/></text:span><text:span text:style-name="T220">Exemple : primary.orders côté DR</text:span></text:p>
          <text:p text:style-name="P133"><text:span text:style-name="T220"><text:s text:c="6"/>– <text:s/></text:span><text:span text:style-name="T220">IdentityReplicationPolicy si préfixe non souha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6" draw:style-name="gr216" draw:text-style-name="P128" draw:layer="layout" svg:width="1.484cm" svg:height="0.839cm" svg:x="27.62cm" svg:y="19.739cm">
          <text:p text:style-name="P127"><text:span text:style-name="T218">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5" draw:style-name="gr2" draw:layer="layout" svg:width="16.799cm" svg:height="10.023cm" svg:x="2.1cm" svg:y="3.712cm" draw:page-number="231" presentation:class="page"/>
          <draw:frame draw:name="Notes Placeholder 35" presentation:style-name="pr119" draw:text-style-name="P129" draw:layer="layout" svg:width="16.799cm" svg:height="11.693cm" svg:x="2.1cm" svg:y="14.293cm" presentation:class="notes" presentation:placeholder="true" presentation:user-transformed="true">
            <draw:text-box/>
          </draw:frame>
          <draw:frame draw:name="Slide Number Placeholder 35" presentation:style-name="pr12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36" draw:style-name="dp11" draw:master-page-name="DEFAULT">
        <office:forms form:automatic-focus="false" form:apply-design-mode="false"/>
        <draw:custom-shape draw:name="Shape 287"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83" draw:style-name="gr164" draw:text-style-name="P67" draw:layer="layout" svg:x1="2.197cm" svg:y1="0.7cm" svg:x2="2.198cm" svg:y2="3.108cm">
          <text:p/>
        </draw:line>
        <draw:line draw:name="Shape 284" draw:style-name="gr165" draw:text-style-name="P67" draw:layer="layout" svg:x1="0.89cm" svg:y1="4.34cm" svg:x2="10.394cm" svg:y2="4.341cm">
          <text:p/>
        </draw:line>
        <draw:line draw:name="Shape 285" draw:style-name="gr166" draw:text-style-name="P67" draw:layer="layout" svg:x1="10.394cm" svg:y1="4.34cm" svg:x2="19.304cm" svg:y2="4.341cm">
          <text:p/>
        </draw:line>
        <draw:line draw:name="Shape 286" draw:style-name="gr167" draw:text-style-name="P67" draw:layer="layout" svg:x1="19.305cm" svg:y1="4.339cm" svg:x2="28.809cm" svg:y2="4.34cm">
          <text:p/>
        </draw:line>
        <draw:custom-shape draw:name="Text 107" draw:style-name="gr217" draw:text-style-name="P124" draw:layer="layout" svg:width="22.274cm" svg:height="2.799cm" svg:x="4.454cm" svg:y="1.259cm">
          <text:p text:style-name="P123"><text:span text:style-name="T215">MM2 — 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8" draw:style-name="gr218" draw:text-style-name="P136" draw:layer="layout" svg:width="26.729cm" svg:height="13.999cm" svg:x="1.484cm" svg:y="5.599cm">
          <text:p text:style-name="P135"><text:span text:style-name="T227">clusters = primary, dr</text:span></text:p>
          <text:p text:style-name="P135"><text:span text:style-name="T228"/></text:p>
          <text:p text:style-name="P135"><text:span text:style-name="T227">primary.bootstrap.servers = kafka-primary:9092</text:span></text:p>
          <text:p text:style-name="P135"><text:span text:style-name="T227">dr.bootstrap.servers <text:s text:c="5"/>= kafka-dr:9092</text:span></text:p>
          <text:p text:style-name="P135"><text:span text:style-name="T228"/></text:p>
          <text:p text:style-name="P135"><text:span text:style-name="T227">primary-&gt;dr.enabled = true</text:span></text:p>
          <text:p text:style-name="P135"><text:span text:style-name="T227">primary-&gt;dr.topics <text:s/>= orders,payments,.*-events</text:span></text:p>
          <text:p text:style-name="P135"><text:span text:style-name="T228"/></text:p>
          <text:p text:style-name="P135"><text:span text:style-name="T227"># Topics internes créés automatiquement</text:span></text:p>
          <text:p text:style-name="P135"><text:span text:style-name="T227"># <text:s text:c="2"/>heartbeats</text:span></text:p>
          <text:p text:style-name="P135"><text:span text:style-name="T227"># <text:s text:c="2"/>primary.checkpoints.internal</text:span></text:p>
          <text:p text:style-name="P135"><text:span text:style-name="T227"># <text:s text:c="2"/>mm2-offset-syncs.dr.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9" draw:style-name="gr219" draw:text-style-name="P128" draw:layer="layout" svg:width="1.484cm" svg:height="0.839cm" svg:x="27.62cm" svg:y="19.739cm">
          <text:p text:style-name="P127"><text:span text:style-name="T218">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6" draw:style-name="gr2" draw:layer="layout" svg:width="16.799cm" svg:height="10.023cm" svg:x="2.1cm" svg:y="3.712cm" draw:page-number="232" presentation:class="page"/>
          <draw:frame draw:name="Notes Placeholder 36" presentation:style-name="pr121" draw:text-style-name="P129" draw:layer="layout" svg:width="16.799cm" svg:height="11.693cm" svg:x="2.1cm" svg:y="14.293cm" presentation:class="notes" presentation:placeholder="true" presentation:user-transformed="true">
            <draw:text-box/>
          </draw:frame>
          <draw:frame draw:name="Slide Number Placeholder 36" presentation:style-name="pr12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37" draw:style-name="dp11" draw:master-page-name="DEFAULT">
        <office:forms form:automatic-focus="false" form:apply-design-mode="false"/>
        <draw:custom-shape draw:name="Shape 295" draw:style-name="gr160" draw:text-style-name="P119" draw:layer="layout" svg:width="0.949cm" svg:height="0.895cm" svg:x="1.188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161" draw:text-style-name="P120" draw:layer="layout" svg:width="0.949cm" svg:height="0.895cm" svg:x="2.256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62" draw:text-style-name="P121" draw:layer="layout" svg:width="0.949cm" svg:height="0.895cm" svg:x="1.188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163" draw:text-style-name="P122" draw:layer="layout" svg:width="0.949cm" svg:height="0.895cm" svg:x="2.256cm" svg:y="1.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91" draw:style-name="gr164" draw:text-style-name="P67" draw:layer="layout" svg:x1="2.197cm" svg:y1="0.7cm" svg:x2="2.198cm" svg:y2="3.108cm">
          <text:p/>
        </draw:line>
        <draw:line draw:name="Shape 292" draw:style-name="gr165" draw:text-style-name="P67" draw:layer="layout" svg:x1="0.89cm" svg:y1="4.34cm" svg:x2="10.394cm" svg:y2="4.341cm">
          <text:p/>
        </draw:line>
        <draw:line draw:name="Shape 293" draw:style-name="gr166" draw:text-style-name="P67" draw:layer="layout" svg:x1="10.394cm" svg:y1="4.34cm" svg:x2="19.304cm" svg:y2="4.341cm">
          <text:p/>
        </draw:line>
        <draw:line draw:name="Shape 294" draw:style-name="gr167" draw:text-style-name="P67" draw:layer="layout" svg:x1="19.305cm" svg:y1="4.339cm" svg:x2="28.809cm" svg:y2="4.34cm">
          <text:p/>
        </draw:line>
        <draw:custom-shape draw:name="Text 110" draw:style-name="gr220" draw:text-style-name="P124" draw:layer="layout" svg:width="22.274cm" svg:height="2.799cm" svg:x="4.454cm" svg:y="1.259cm">
          <text:p text:style-name="P123"><text:span text:style-name="T215">Bascule en cas de sinis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1" draw:style-name="gr221" draw:text-style-name="P134" draw:layer="layout" svg:width="25.541cm" svg:height="14.559cm" svg:x="2.078cm" svg:y="5.179cm">
          <text:list text:style-name="L26">
            <text:list-item>
              <text:p text:style-name="P132"><text:span text:style-name="T220">Stopper les producteurs côté primaire (s'il est joignable)</text:span></text:p>
            </text:list-item>
            <text:list-item>
              <text:p text:style-name="P132"><text:span text:style-name="T220">Rediriger producteurs et consumers vers le cluster DR</text:span></text:p>
            </text:list-item>
            <text:list-item>
              <text:p text:style-name="P132"><text:span text:style-name="T220">Les consumers reprennent grâce aux offsets traduits</text:span></text:p>
            </text:list-item>
          </text:list>
          <text:p text:style-name="P133"><text:span text:style-name="T220"><text:s text:c="6"/>– <text:s/></text:span><text:span text:style-name="T220">RemoteClusterUtils.translateOffsets</text:span></text:p>
          <text:list text:continue-numbering="true" text:style-name="L26">
            <text:list-item>
              <text:p text:style-name="P133"><text:span text:style-name="T220">Au retour du primaire</text:span></text:p>
            </text:list-item>
          </text:list>
          <text:p text:style-name="P133"><text:span text:style-name="T220"><text:s text:c="6"/>– <text:s/></text:span><text:span text:style-name="T220">Failback ou inversion des rôles</text:span></text:p>
          <text:list text:continue-numbering="true" text:style-name="L26">
            <text:list-item>
              <text:p text:style-name="P133"><text:span text:style-name="T220">Limites à anticiper</text:span></text:p>
            </text:list-item>
          </text:list>
          <text:p text:style-name="P133"><text:span text:style-name="T220"><text:s text:c="6"/>– <text:s/></text:span><text:span text:style-name="T220">Réplication asynchrone : RPO non nul</text:span></text:p>
          <text:p text:style-name="P133"><text:span text:style-name="T220"><text:s text:c="6"/>– <text:s/></text:span><text:span text:style-name="T220">Traduction d'offsets non exacte au message prè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2" draw:style-name="gr222" draw:text-style-name="P128" draw:layer="layout" svg:width="1.484cm" svg:height="0.839cm" svg:x="27.62cm" svg:y="19.739cm">
          <text:p text:style-name="P127"><text:span text:style-name="T218">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7" draw:style-name="gr2" draw:layer="layout" svg:width="16.799cm" svg:height="10.023cm" svg:x="2.1cm" svg:y="3.712cm" draw:page-number="233" presentation:class="page"/>
          <draw:frame draw:name="Notes Placeholder 37" presentation:style-name="pr123" draw:text-style-name="P129" draw:layer="layout" svg:width="16.799cm" svg:height="11.693cm" svg:x="2.1cm" svg:y="14.293cm" presentation:class="notes" presentation:placeholder="true" presentation:user-transformed="true">
            <draw:text-box/>
          </draw:frame>
          <draw:frame draw:name="Slide Number Placeholder 37" presentation:style-name="pr12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Slide 1" draw:style-name="dp11" draw:master-page-name="DEFAULT">
        <office:forms form:automatic-focus="false" form:apply-design-mode="false"/>
        <draw:custom-shape draw:name="Text 0" draw:style-name="gr223" draw:text-style-name="P136" draw:layer="layout" svg:width="1.484cm" svg:height="0.839cm" svg:x="0.89cm" svg:y="0.419cm">
          <text:p text:style-name="P135"><text:span text:style-name="T23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24" draw:text-style-name="P124" draw:layer="layout" svg:width="26.729cm" svg:height="4.479cm" svg:x="1.484cm" svg:y="2.799cm">
          <text:p text:style-name="P123"><text:span text:style-name="T233">Dimensionnement et</text:span></text:p>
          <text:p text:style-name="P123"><text:span text:style-name="T233">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25" draw:text-style-name="P140" draw:layer="layout" svg:width="23.759cm" svg:height="6.999cm" svg:x="2.969cm" svg:y="9.519cm">
          <text:p text:style-name="P139"><text:span text:style-name="T234">Dimensionnement</text:span></text:p>
          <text:p text:style-name="P139"><text:span text:style-name="T234">Réglages JVM et OS</text:span></text:p>
          <text:p text:style-name="P139"><text:span text:style-name="T235">Tuning 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1" draw:style-name="gr2" draw:layer="layout" svg:width="16.799cm" svg:height="10.023cm" svg:x="2.1cm" svg:y="3.712cm" draw:page-number="234" presentation:class="page"/>
          <draw:frame draw:name="Notes Placeholder 2" presentation:style-name="pr125" draw:text-style-name="P129" draw:layer="layout" svg:width="16.799cm" svg:height="11.693cm" svg:x="2.1cm" svg:y="14.293cm" presentation:class="notes" presentation:placeholder="true" presentation:user-transformed="true">
            <draw:text-box/>
          </draw:frame>
          <draw:frame draw:name="Slide Number Placeholder 2" presentation:style-name="pr12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35" draw:style-name="dp11" draw:master-page-name="DEFAULT">
        <office:forms form:automatic-focus="false" form:apply-design-mode="false"/>
        <draw:custom-shape draw:name="Text 4" draw:style-name="gr226" draw:text-style-name="P136" draw:layer="layout" svg:width="1.484cm" svg:height="0.839cm" svg:x="0.89cm" svg:y="0.419cm">
          <text:p text:style-name="P135"><text:span text:style-name="T23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3" draw:style-name="gr227" draw:text-style-name="P124" draw:layer="layout" svg:width="26.729cm" svg:height="3.079cm" svg:x="1.484cm" svg:y="0.979cm">
          <text:p text:style-name="P123"><text:span text:style-name="T236">Tuning produc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4" draw:style-name="gr228" draw:text-style-name="P136" draw:layer="layout" svg:width="23.759cm" svg:height="15.399cm" svg:x="2.969cm" svg:y="4.759cm">
          <text:p text:style-name="P135"><text:span text:style-name="T237">Trois leviers principaux</text:span></text:p>
          <text:p text:style-name="P135"><text:span text:style-name="T238">– </text:span><text:span text:style-name="T238">Débit (throughput)</text:span></text:p>
          <text:p text:style-name="P135"><text:span text:style-name="T238">– </text:span><text:span text:style-name="T238">Latence</text:span></text:p>
          <text:p text:style-name="P135"><text:span text:style-name="T238">– </text:span><text:span text:style-name="T238">Garantie de livraison</text:span></text:p>
          <text:p text:style-name="P135"><text:span text:style-name="T239"><text:s/></text:span></text:p>
          <text:p text:style-name="P135"><text:span text:style-name="T237">Compromis</text:span></text:p>
          <text:p text:style-name="P135"><text:span text:style-name="T238">– </text:span><text:span text:style-name="T238">Plus de débit ⇒ plus de latence</text:span></text:p>
          <text:p text:style-name="P135"><text:span text:style-name="T238">– </text:span><text:span text:style-name="T238">Plus de garantie ⇒ moins de dé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8" draw:style-name="gr2" draw:layer="layout" svg:width="16.799cm" svg:height="10.023cm" svg:x="2.1cm" svg:y="3.712cm" draw:page-number="235" presentation:class="page"/>
          <draw:frame draw:name="Notes Placeholder 38" presentation:style-name="pr127" draw:text-style-name="P129" draw:layer="layout" svg:width="16.799cm" svg:height="11.693cm" svg:x="2.1cm" svg:y="14.293cm" presentation:class="notes" presentation:placeholder="true" presentation:user-transformed="true">
            <draw:text-box/>
          </draw:frame>
          <draw:frame draw:name="Slide Number Placeholder 38" presentation:style-name="pr12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36" draw:style-name="dp11" draw:master-page-name="DEFAULT">
        <office:forms form:automatic-focus="false" form:apply-design-mode="false"/>
        <draw:custom-shape draw:name="Text 115" draw:style-name="gr229" draw:text-style-name="P136" draw:layer="layout" svg:width="1.484cm" svg:height="0.839cm" svg:x="0.89cm" svg:y="0.419cm">
          <text:p text:style-name="P135"><text:span text:style-name="T23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6" draw:style-name="gr230" draw:text-style-name="P124" draw:layer="layout" svg:width="26.729cm" svg:height="3.079cm" svg:x="1.484cm" svg:y="0.979cm">
          <text:p text:style-name="P123"><text:span text:style-name="T236">Producteur : paramètres cl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7" draw:style-name="gr231" draw:text-style-name="P136" draw:layer="layout" svg:width="23.759cm" svg:height="15.399cm" svg:x="2.969cm" svg:y="4.759cm">
          <text:p text:style-name="P135"><text:span text:style-name="T237">batch.size</text:span></text:p>
          <text:p text:style-name="P135"><text:span text:style-name="T238">– </text:span><text:span text:style-name="T238">Taille du lot par partition (octets)</text:span></text:p>
          <text:p text:style-name="P135"><text:span text:style-name="T238">– </text:span><text:span text:style-name="T238">Défaut 16384, augmenter à 32-64 KB</text:span></text:p>
          <text:p text:style-name="P135"><text:span text:style-name="T239"><text:s/></text:span></text:p>
          <text:p text:style-name="P135"><text:span text:style-name="T237">linger.ms</text:span></text:p>
          <text:p text:style-name="P135"><text:span text:style-name="T238">– </text:span><text:span text:style-name="T238">Attente avant envoi du lot</text:span></text:p>
          <text:p text:style-name="P135"><text:span text:style-name="T238">– </text:span><text:span text:style-name="T238">0 par défaut, passer à 5-20 ms</text:span></text:p>
          <text:p text:style-name="P135"><text:span text:style-name="T239"><text:s/></text:span></text:p>
          <text:p text:style-name="P135"><text:span text:style-name="T237">compression.type</text:span></text:p>
          <text:p text:style-name="P135"><text:span text:style-name="T238">– </text:span><text:span text:style-name="T238">none, gzip, snappy, lz4, zstd</text:span></text:p>
          <text:p text:style-name="P135"><text:span text:style-name="T238">– </text:span><text:span text:style-name="T238">lz4 ou zstd recommand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9" draw:style-name="gr2" draw:layer="layout" svg:width="16.799cm" svg:height="10.023cm" svg:x="2.1cm" svg:y="3.712cm" draw:page-number="236" presentation:class="page"/>
          <draw:frame draw:name="Notes Placeholder 39" presentation:style-name="pr129" draw:text-style-name="P129" draw:layer="layout" svg:width="16.799cm" svg:height="11.693cm" svg:x="2.1cm" svg:y="14.293cm" presentation:class="notes" presentation:placeholder="true" presentation:user-transformed="true">
            <draw:text-box/>
          </draw:frame>
          <draw:frame draw:name="Slide Number Placeholder 39" presentation:style-name="pr13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37" draw:style-name="dp11" draw:master-page-name="DEFAULT">
        <office:forms form:automatic-focus="false" form:apply-design-mode="false"/>
        <draw:custom-shape draw:name="Text 118" draw:style-name="gr232" draw:text-style-name="P136" draw:layer="layout" svg:width="1.484cm" svg:height="0.839cm" svg:x="0.89cm" svg:y="0.419cm">
          <text:p text:style-name="P135"><text:span text:style-name="T23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9" draw:style-name="gr233" draw:text-style-name="P124" draw:layer="layout" svg:width="26.729cm" svg:height="3.079cm" svg:x="1.484cm" svg:y="0.979cm">
          <text:p text:style-name="P123"><text:span text:style-name="T236">Producteur : fiabi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0" draw:style-name="gr234" draw:text-style-name="P136" draw:layer="layout" svg:width="23.759cm" svg:height="15.399cm" svg:x="2.969cm" svg:y="4.759cm">
          <text:p text:style-name="P135"><text:span text:style-name="T237">acks</text:span></text:p>
          <text:p text:style-name="P135"><text:span text:style-name="T238">– </text:span><text:span text:style-name="T238">0 : pas d'accusé (rapide, perte possible)</text:span></text:p>
          <text:p text:style-name="P135"><text:span text:style-name="T238">– </text:span><text:span text:style-name="T238">1 : accusé du leader</text:span></text:p>
          <text:p text:style-name="P135"><text:span text:style-name="T238">– </text:span><text:span text:style-name="T238">all : tous les ISR (plus sûr)</text:span></text:p>
          <text:p text:style-name="P135"><text:span text:style-name="T239"><text:s/></text:span></text:p>
          <text:p text:style-name="P135"><text:span text:style-name="T237">enable.idempotence=true</text:span></text:p>
          <text:p text:style-name="P135"><text:span text:style-name="T238">– </text:span><text:span text:style-name="T238">Évite les doublons en cas de retry</text:span></text:p>
          <text:p text:style-name="P135"><text:span text:style-name="T238">– </text:span><text:span text:style-name="T238">Active automatiquement acks=all</text:span></text:p>
          <text:p text:style-name="P135"><text:span text:style-name="T239"><text:s/></text:span></text:p>
          <text:p text:style-name="P135"><text:span text:style-name="T237">max.in.flight.requests.per.connection</text:span></text:p>
          <text:p text:style-name="P135"><text:span text:style-name="T238">– ≤ </text:span><text:span text:style-name="T238">5 si idempotence activ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0" draw:style-name="gr2" draw:layer="layout" svg:width="16.799cm" svg:height="10.023cm" svg:x="2.1cm" svg:y="3.712cm" draw:page-number="237" presentation:class="page"/>
          <draw:frame draw:name="Notes Placeholder 40" presentation:style-name="pr131" draw:text-style-name="P129" draw:layer="layout" svg:width="16.799cm" svg:height="11.693cm" svg:x="2.1cm" svg:y="14.293cm" presentation:class="notes" presentation:placeholder="true" presentation:user-transformed="true">
            <draw:text-box/>
          </draw:frame>
          <draw:frame draw:name="Slide Number Placeholder 40" presentation:style-name="pr13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38" draw:style-name="dp11" draw:master-page-name="DEFAULT">
        <office:forms form:automatic-focus="false" form:apply-design-mode="false"/>
        <draw:custom-shape draw:name="Text 121" draw:style-name="gr235" draw:text-style-name="P136" draw:layer="layout" svg:width="1.484cm" svg:height="0.839cm" svg:x="0.89cm" svg:y="0.419cm">
          <text:p text:style-name="P135"><text:span text:style-name="T23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2" draw:style-name="gr236" draw:text-style-name="P124" draw:layer="layout" svg:width="26.729cm" svg:height="3.079cm" svg:x="1.484cm" svg:y="0.979cm">
          <text:p text:style-name="P123"><text:span text:style-name="T236">Consommateur : paramètres cl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3" draw:style-name="gr237" draw:text-style-name="P136" draw:layer="layout" svg:width="23.759cm" svg:height="15.399cm" svg:x="2.969cm" svg:y="4.759cm">
          <text:p text:style-name="P135"><text:span text:style-name="T237">fetch.min.bytes</text:span></text:p>
          <text:p text:style-name="P135"><text:span text:style-name="T238">– </text:span><text:span text:style-name="T238">Taille minimale d'une réponse</text:span></text:p>
          <text:p text:style-name="P135"><text:span text:style-name="T238">– </text:span><text:span text:style-name="T238">Augmenter pour réduire la charge réseau</text:span></text:p>
          <text:p text:style-name="P135"><text:span text:style-name="T239"><text:s/></text:span></text:p>
          <text:p text:style-name="P135"><text:span text:style-name="T237">fetch.max.wait.ms</text:span></text:p>
          <text:p text:style-name="P135"><text:span text:style-name="T238">– </text:span><text:span text:style-name="T238">Attente max si min.bytes pas atteint</text:span></text:p>
          <text:p text:style-name="P135"><text:span text:style-name="T239"><text:s/></text:span></text:p>
          <text:p text:style-name="P135"><text:span text:style-name="T237">max.poll.records</text:span></text:p>
          <text:p text:style-name="P135"><text:span text:style-name="T238">– </text:span><text:span text:style-name="T238">Nombre max de messages par poll()</text:span></text:p>
          <text:p text:style-name="P135"><text:span text:style-name="T238">– </text:span><text:span text:style-name="T238">Défaut 500, à ajuster selon traitement</text:span></text:p>
          <text:p text:style-name="P135"><text:span text:style-name="T239"><text:s/></text:span></text:p>
          <text:p text:style-name="P135"><text:span text:style-name="T237">max.poll.interval.ms</text:span></text:p>
          <text:p text:style-name="P135"><text:span text:style-name="T238">– </text:span><text:span text:style-name="T238">Délai max entre deux poll()</text:span></text:p>
          <text:p text:style-name="P135"><text:span text:style-name="T238">– </text:span><text:span text:style-name="T238">Au-delà, le consommateur est excl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1" draw:style-name="gr2" draw:layer="layout" svg:width="16.799cm" svg:height="10.023cm" svg:x="2.1cm" svg:y="3.712cm" draw:page-number="238" presentation:class="page"/>
          <draw:frame draw:name="Notes Placeholder 41" presentation:style-name="pr133" draw:text-style-name="P129" draw:layer="layout" svg:width="16.799cm" svg:height="11.693cm" svg:x="2.1cm" svg:y="14.293cm" presentation:class="notes" presentation:placeholder="true" presentation:user-transformed="true">
            <draw:text-box/>
          </draw:frame>
          <draw:frame draw:name="Slide Number Placeholder 41" presentation:style-name="pr13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39" draw:style-name="dp11" draw:master-page-name="DEFAULT">
        <office:forms form:automatic-focus="false" form:apply-design-mode="false"/>
        <draw:custom-shape draw:name="Text 124" draw:style-name="gr238" draw:text-style-name="P136" draw:layer="layout" svg:width="1.484cm" svg:height="0.839cm" svg:x="0.89cm" svg:y="0.419cm">
          <text:p text:style-name="P135"><text:span text:style-name="T232">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5" draw:style-name="gr239" draw:text-style-name="P124" draw:layer="layout" svg:width="26.729cm" svg:height="3.079cm" svg:x="1.484cm" svg:y="0.979cm">
          <text:p text:style-name="P123"><text:span text:style-name="T236">Consommateur : gestion des off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6" draw:style-name="gr240" draw:text-style-name="P136" draw:layer="layout" svg:width="23.759cm" svg:height="15.399cm" svg:x="2.969cm" svg:y="4.759cm">
          <text:p text:style-name="P135"><text:span text:style-name="T237">enable.auto.commit</text:span></text:p>
          <text:p text:style-name="P135"><text:span text:style-name="T238">– </text:span><text:span text:style-name="T238">true : commit périodique automatique</text:span></text:p>
          <text:p text:style-name="P135"><text:span text:style-name="T238">– </text:span><text:span text:style-name="T238">false : commit manuel (recommandé)</text:span></text:p>
          <text:p text:style-name="P135"><text:span text:style-name="T239"><text:s/></text:span></text:p>
          <text:p text:style-name="P135"><text:span text:style-name="T237">auto.commit.interval.ms</text:span></text:p>
          <text:p text:style-name="P135"><text:span text:style-name="T238">– </text:span><text:span text:style-name="T238">Période de commit automatique</text:span></text:p>
          <text:p text:style-name="P135"><text:span text:style-name="T238">– </text:span><text:span text:style-name="T238">Défaut 5000 ms</text:span></text:p>
          <text:p text:style-name="P135"><text:span text:style-name="T239"><text:s/></text:span></text:p>
          <text:p text:style-name="P135"><text:span text:style-name="T237">Commit manuel</text:span></text:p>
          <text:p text:style-name="P135"><text:span text:style-name="T238">– </text:span><text:span text:style-name="T238">commitSync() : bloquant, fiable</text:span></text:p>
          <text:p text:style-name="P135"><text:span text:style-name="T238">– </text:span><text:span text:style-name="T238">commitAsync() : non bloquant, plus rap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2" draw:style-name="gr2" draw:layer="layout" svg:width="16.799cm" svg:height="10.023cm" svg:x="2.1cm" svg:y="3.712cm" draw:page-number="239" presentation:class="page"/>
          <draw:frame draw:name="Notes Placeholder 42" presentation:style-name="pr135" draw:text-style-name="P129" draw:layer="layout" svg:width="16.799cm" svg:height="11.693cm" svg:x="2.1cm" svg:y="14.293cm" presentation:class="notes" presentation:placeholder="true" presentation:user-transformed="true">
            <draw:text-box/>
          </draw:frame>
          <draw:frame draw:name="Slide Number Placeholder 42" presentation:style-name="pr13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0" draw:style-name="dp11" draw:master-page-name="DEFAULT">
        <office:forms form:automatic-focus="false" form:apply-design-mode="false"/>
        <draw:custom-shape draw:name="Text 127" draw:style-name="gr241" draw:text-style-name="P136" draw:layer="layout" svg:width="1.484cm" svg:height="0.839cm" svg:x="0.89cm" svg:y="0.419cm">
          <text:p text:style-name="P135"><text:span text:style-name="T232">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8" draw:style-name="gr242" draw:text-style-name="P124" draw:layer="layout" svg:width="26.729cm" svg:height="3.919cm" svg:x="1.484cm" svg:y="5.599cm">
          <text:p text:style-name="P123"><text:span text:style-name="T240">Benchm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9" draw:style-name="gr243" draw:text-style-name="P140" draw:layer="layout" svg:width="23.759cm" svg:height="5.599cm" svg:x="2.969cm" svg:y="11.199cm">
          <text:p text:style-name="P139"><text:span text:style-name="T235">kafka-producer-perf-test</text:span></text:p>
          <text:p text:style-name="P139"><text:span text:style-name="T234">kafka-consumer-perf-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3" draw:style-name="gr2" draw:layer="layout" svg:width="16.799cm" svg:height="10.023cm" svg:x="2.1cm" svg:y="3.712cm" draw:page-number="240" presentation:class="page"/>
          <draw:frame draw:name="Notes Placeholder 43" presentation:style-name="pr137" draw:text-style-name="P129" draw:layer="layout" svg:width="16.799cm" svg:height="11.693cm" svg:x="2.1cm" svg:y="14.293cm" presentation:class="notes" presentation:placeholder="true" presentation:user-transformed="true">
            <draw:text-box/>
          </draw:frame>
          <draw:frame draw:name="Slide Number Placeholder 43" presentation:style-name="pr13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1" draw:style-name="dp11" draw:master-page-name="DEFAULT">
        <office:forms form:automatic-focus="false" form:apply-design-mode="false"/>
        <draw:custom-shape draw:name="Text 130" draw:style-name="gr244" draw:text-style-name="P136" draw:layer="layout" svg:width="1.484cm" svg:height="0.839cm" svg:x="0.89cm" svg:y="0.419cm">
          <text:p text:style-name="P135"><text:span text:style-name="T232">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1" draw:style-name="gr245" draw:text-style-name="P124" draw:layer="layout" svg:width="26.729cm" svg:height="3.079cm" svg:x="1.484cm" svg:y="0.979cm">
          <text:p text:style-name="P123"><text:span text:style-name="T236">kafka-producer-perf-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2" draw:style-name="gr246" draw:text-style-name="P136" draw:layer="layout" svg:width="23.759cm" svg:height="3.639cm" svg:x="2.969cm" svg:y="4.759cm">
          <text:p text:style-name="P135"><text:span text:style-name="T237">Mesurer le débit en écriture</text:span></text:p>
          <text:p text:style-name="P135"><text:span text:style-name="T238">– </text:span><text:span text:style-name="T238">Taille des messages, taux d'envoi</text:span></text:p>
          <text:p text:style-name="P135"><text:span text:style-name="T238">– </text:span><text:span text:style-name="T238">Compression, batch.size, linge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247" draw:text-style-name="P141" draw:layer="layout" svg:width="25.541cm" svg:height="5.599cm" svg:x="2.079cm" svg:y="8.9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3" draw:style-name="gr248" draw:text-style-name="P136" draw:layer="layout" svg:width="24.947cm" svg:height="5.319cm" svg:x="2.375cm" svg:y="9.099cm">
          <text:p text:style-name="P135"><text:span text:style-name="T241">kafka-producer-perf-test.sh \</text:span></text:p>
          <text:p text:style-name="P135"><text:span text:style-name="T241"><text:s text:c="2"/></text:span><text:span text:style-name="T241">--topic test-perf \</text:span></text:p>
          <text:p text:style-name="P135"><text:span text:style-name="T241"><text:s text:c="2"/></text:span><text:span text:style-name="T241">--num-records 1000000 \</text:span></text:p>
          <text:p text:style-name="P135"><text:span text:style-name="T241"><text:s text:c="2"/></text:span><text:span text:style-name="T241">--record-size 1024 \</text:span></text:p>
          <text:p text:style-name="P135"><text:span text:style-name="T241"><text:s text:c="2"/></text:span><text:span text:style-name="T241">--throughput -1 \</text:span></text:p>
          <text:p text:style-name="P135"><text:span text:style-name="T241"><text:s text:c="2"/></text:span><text:span text:style-name="T241">--producer-props bootstrap.servers=broker:9092 \</text:span></text:p>
          <text:p text:style-name="P135"><text:span text:style-name="T241"><text:s text:c="18"/></text:span><text:span text:style-name="T241">acks=all compression.type=lz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4" draw:style-name="gr249" draw:text-style-name="P136" draw:layer="layout" svg:width="23.759cm" svg:height="1.679cm" svg:x="2.969cm" svg:y="15.399cm">
          <text:p text:style-name="P135"><text:span text:style-name="T242">Sortie : msg/s, MB/s, latence moyenne, p50/p95/p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4" draw:style-name="gr2" draw:layer="layout" svg:width="16.799cm" svg:height="10.023cm" svg:x="2.1cm" svg:y="3.712cm" draw:page-number="241" presentation:class="page"/>
          <draw:frame draw:name="Notes Placeholder 44" presentation:style-name="pr139" draw:text-style-name="P129" draw:layer="layout" svg:width="16.799cm" svg:height="11.693cm" svg:x="2.1cm" svg:y="14.293cm" presentation:class="notes" presentation:placeholder="true" presentation:user-transformed="true">
            <draw:text-box/>
          </draw:frame>
          <draw:frame draw:name="Slide Number Placeholder 44" presentation:style-name="pr14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2" draw:style-name="dp11" draw:master-page-name="DEFAULT">
        <office:forms form:automatic-focus="false" form:apply-design-mode="false"/>
        <draw:custom-shape draw:name="Text 135" draw:style-name="gr250" draw:text-style-name="P136" draw:layer="layout" svg:width="1.484cm" svg:height="0.839cm" svg:x="0.89cm" svg:y="0.419cm">
          <text:p text:style-name="P135"><text:span text:style-name="T232">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6" draw:style-name="gr251" draw:text-style-name="P124" draw:layer="layout" svg:width="26.729cm" svg:height="3.079cm" svg:x="1.484cm" svg:y="0.979cm">
          <text:p text:style-name="P123"><text:span text:style-name="T236">kafka-consumer-perf-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7" draw:style-name="gr252" draw:text-style-name="P136" draw:layer="layout" svg:width="23.759cm" svg:height="3.639cm" svg:x="2.969cm" svg:y="4.759cm">
          <text:p text:style-name="P135"><text:span text:style-name="T237">Mesurer le débit en lecture</text:span></text:p>
          <text:p text:style-name="P135"><text:span text:style-name="T238">– </text:span><text:span text:style-name="T238">Vitesse de consommation d'un topic</text:span></text:p>
          <text:p text:style-name="P135"><text:span text:style-name="T238">– </text:span><text:span text:style-name="T238">Impact de fetch.min.bytes, max.poll.rec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53" draw:text-style-name="P141" draw:layer="layout" svg:width="25.541cm" svg:height="4.759cm" svg:x="2.079cm" svg:y="8.9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8" draw:style-name="gr254" draw:text-style-name="P136" draw:layer="layout" svg:width="24.947cm" svg:height="4.479cm" svg:x="2.375cm" svg:y="9.099cm">
          <text:p text:style-name="P135"><text:span text:style-name="T241">kafka-consumer-perf-test.sh \</text:span></text:p>
          <text:p text:style-name="P135"><text:span text:style-name="T241"><text:s text:c="2"/></text:span><text:span text:style-name="T241">--bootstrap-server broker:9092 \</text:span></text:p>
          <text:p text:style-name="P135"><text:span text:style-name="T241"><text:s text:c="2"/></text:span><text:span text:style-name="T241">--topic test-perf \</text:span></text:p>
          <text:p text:style-name="P135"><text:span text:style-name="T241"><text:s text:c="2"/></text:span><text:span text:style-name="T241">--messages 1000000 \</text:span></text:p>
          <text:p text:style-name="P135"><text:span text:style-name="T241"><text:s text:c="2"/></text:span><text:span text:style-name="T241">--threads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9" draw:style-name="gr255" draw:text-style-name="P136" draw:layer="layout" svg:width="23.759cm" svg:height="5.039cm" svg:x="2.969cm" svg:y="14.559cm">
          <text:p text:style-name="P135"><text:span text:style-name="T243">Bonnes pratiques</text:span></text:p>
          <text:p text:style-name="P135"><text:span text:style-name="T244">– </text:span><text:span text:style-name="T244">Lancer prod et conso sur des hôtes séparés</text:span></text:p>
          <text:p text:style-name="P135"><text:span text:style-name="T244">– </text:span><text:span text:style-name="T244">Vider le page cache entre deux runs</text:span></text:p>
          <text:p text:style-name="P135"><text:span text:style-name="T244">– </text:span><text:span text:style-name="T244">Reproduire la production (taille msg, part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5" draw:style-name="gr2" draw:layer="layout" svg:width="16.799cm" svg:height="10.023cm" svg:x="2.1cm" svg:y="3.712cm" draw:page-number="242" presentation:class="page"/>
          <draw:frame draw:name="Notes Placeholder 45" presentation:style-name="pr141" draw:text-style-name="P129" draw:layer="layout" svg:width="16.799cm" svg:height="11.693cm" svg:x="2.1cm" svg:y="14.293cm" presentation:class="notes" presentation:placeholder="true" presentation:user-transformed="true">
            <draw:text-box/>
          </draw:frame>
          <draw:frame draw:name="Slide Number Placeholder 45" presentation:style-name="pr14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3" draw:style-name="dp11" draw:master-page-name="DEFAULT">
        <office:forms form:automatic-focus="false" form:apply-design-mode="false"/>
        <draw:custom-shape draw:name="Text 140" draw:style-name="gr256" draw:text-style-name="P136" draw:layer="layout" svg:width="1.484cm" svg:height="0.839cm" svg:x="0.89cm" svg:y="0.419cm">
          <text:p text:style-name="P135"><text:span text:style-name="T232">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1" draw:style-name="gr257" draw:text-style-name="P124" draw:layer="layout" svg:width="26.729cm" svg:height="3.919cm" svg:x="1.484cm" svg:y="4.199cm">
          <text:p text:style-name="P123"><text:span text:style-name="T233">Patterns d'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2" draw:style-name="gr258" draw:text-style-name="P140" draw:layer="layout" svg:width="23.759cm" svg:height="6.999cm" svg:x="2.969cm" svg:y="9.799cm">
          <text:p text:style-name="P139"><text:span text:style-name="T235">Multi-DC</text:span></text:p>
          <text:p text:style-name="P139"><text:span text:style-name="T234">Stretched cluster</text:span></text:p>
          <text:p text:style-name="P139"><text:span text:style-name="T234">Active-active vs active-pass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6" draw:style-name="gr2" draw:layer="layout" svg:width="16.799cm" svg:height="10.023cm" svg:x="2.1cm" svg:y="3.712cm" draw:page-number="243" presentation:class="page"/>
          <draw:frame draw:name="Notes Placeholder 46" presentation:style-name="pr143" draw:text-style-name="P129" draw:layer="layout" svg:width="16.799cm" svg:height="11.693cm" svg:x="2.1cm" svg:y="14.293cm" presentation:class="notes" presentation:placeholder="true" presentation:user-transformed="true">
            <draw:text-box/>
          </draw:frame>
          <draw:frame draw:name="Slide Number Placeholder 46" presentation:style-name="pr14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4" draw:style-name="dp11" draw:master-page-name="DEFAULT">
        <office:forms form:automatic-focus="false" form:apply-design-mode="false"/>
        <draw:custom-shape draw:name="Text 143" draw:style-name="gr259" draw:text-style-name="P136" draw:layer="layout" svg:width="1.484cm" svg:height="0.839cm" svg:x="0.89cm" svg:y="0.419cm">
          <text:p text:style-name="P135"><text:span text:style-name="T232">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4" draw:style-name="gr260" draw:text-style-name="P124" draw:layer="layout" svg:width="26.729cm" svg:height="3.079cm" svg:x="1.484cm" svg:y="0.979cm">
          <text:p text:style-name="P123"><text:span text:style-name="T236">Pourquoi du multi-D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5" draw:style-name="gr261" draw:text-style-name="P136" draw:layer="layout" svg:width="23.759cm" svg:height="15.399cm" svg:x="2.969cm" svg:y="4.759cm">
          <text:p text:style-name="P135"><text:span text:style-name="T237">Objectifs</text:span></text:p>
          <text:p text:style-name="P135"><text:span text:style-name="T238">– </text:span><text:span text:style-name="T238">Reprise après sinistre (DR)</text:span></text:p>
          <text:p text:style-name="P135"><text:span text:style-name="T238">– </text:span><text:span text:style-name="T238">Haute disponibilité géographique</text:span></text:p>
          <text:p text:style-name="P135"><text:span text:style-name="T238">– </text:span><text:span text:style-name="T238">Conformité (souveraineté des données)</text:span></text:p>
          <text:p text:style-name="P135"><text:span text:style-name="T238">– </text:span><text:span text:style-name="T238">Rapprocher les données des consommateurs</text:span></text:p>
          <text:p text:style-name="P135"><text:span text:style-name="T239"><text:s/></text:span></text:p>
          <text:p text:style-name="P135"><text:span text:style-name="T237">Contraintes</text:span></text:p>
          <text:p text:style-name="P135"><text:span text:style-name="T238">– </text:span><text:span text:style-name="T238">Latence inter-DC</text:span></text:p>
          <text:p text:style-name="P135"><text:span text:style-name="T238">– </text:span><text:span text:style-name="T238">Bande passante et coût</text:span></text:p>
          <text:p text:style-name="P135"><text:span text:style-name="T238">– </text:span><text:span text:style-name="T238">Cohérence vs disponibi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7" draw:style-name="gr2" draw:layer="layout" svg:width="16.799cm" svg:height="10.023cm" svg:x="2.1cm" svg:y="3.712cm" draw:page-number="244" presentation:class="page"/>
          <draw:frame draw:name="Notes Placeholder 47" presentation:style-name="pr145" draw:text-style-name="P129" draw:layer="layout" svg:width="16.799cm" svg:height="11.693cm" svg:x="2.1cm" svg:y="14.293cm" presentation:class="notes" presentation:placeholder="true" presentation:user-transformed="true">
            <draw:text-box/>
          </draw:frame>
          <draw:frame draw:name="Slide Number Placeholder 47" presentation:style-name="pr14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5" draw:style-name="dp11" draw:master-page-name="DEFAULT">
        <office:forms form:automatic-focus="false" form:apply-design-mode="false"/>
        <draw:custom-shape draw:name="Text 146" draw:style-name="gr262" draw:text-style-name="P136" draw:layer="layout" svg:width="1.484cm" svg:height="0.839cm" svg:x="0.89cm" svg:y="0.419cm">
          <text:p text:style-name="P135"><text:span text:style-name="T232">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7" draw:style-name="gr263" draw:text-style-name="P124" draw:layer="layout" svg:width="26.729cm" svg:height="3.079cm" svg:x="1.484cm" svg:y="0.979cm">
          <text:p text:style-name="P123"><text:span text:style-name="T236">Stretched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8" draw:style-name="gr264" draw:text-style-name="P136" draw:layer="layout" svg:width="23.759cm" svg:height="15.399cm" svg:x="2.969cm" svg:y="4.759cm">
          <text:p text:style-name="P135"><text:span text:style-name="T237">Principe</text:span></text:p>
          <text:p text:style-name="P135"><text:span text:style-name="T238">– </text:span><text:span text:style-name="T238">Un seul cluster Kafka réparti sur plusieurs DC</text:span></text:p>
          <text:p text:style-name="P135"><text:span text:style-name="T238">– </text:span><text:span text:style-name="T238">Réplication synchrone via le mécanisme ISR</text:span></text:p>
          <text:p text:style-name="P135"><text:span text:style-name="T239"><text:s/></text:span></text:p>
          <text:p text:style-name="P135"><text:span text:style-name="T237">Avantages</text:span></text:p>
          <text:p text:style-name="P135"><text:span text:style-name="T238">– </text:span><text:span text:style-name="T238">Pas de réplication applicative à gérer</text:span></text:p>
          <text:p text:style-name="P135"><text:span text:style-name="T238">– </text:span><text:span text:style-name="T238">Bascule transparente</text:span></text:p>
          <text:p text:style-name="P135"><text:span text:style-name="T239"><text:s/></text:span></text:p>
          <text:p text:style-name="P135"><text:span text:style-name="T237">Limites</text:span></text:p>
          <text:p text:style-name="P135"><text:span text:style-name="T238">– </text:span><text:span text:style-name="T238">Latence &lt; 50 ms entre DC obligatoire</text:span></text:p>
          <text:p text:style-name="P135"><text:span text:style-name="T238">– </text:span><text:span text:style-name="T238">Liens réseau dédiés et redondés</text:span></text:p>
          <text:p text:style-name="P135"><text:span text:style-name="T238">– </text:span><text:span text:style-name="T238">Recommandé : 3 DC pour le quorum (K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8" draw:style-name="gr2" draw:layer="layout" svg:width="16.799cm" svg:height="10.023cm" svg:x="2.1cm" svg:y="3.712cm" draw:page-number="245" presentation:class="page"/>
          <draw:frame draw:name="Notes Placeholder 48" presentation:style-name="pr147" draw:text-style-name="P129" draw:layer="layout" svg:width="16.799cm" svg:height="11.693cm" svg:x="2.1cm" svg:y="14.293cm" presentation:class="notes" presentation:placeholder="true" presentation:user-transformed="true">
            <draw:text-box/>
          </draw:frame>
          <draw:frame draw:name="Slide Number Placeholder 48" presentation:style-name="pr14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6" draw:style-name="dp11" draw:master-page-name="DEFAULT">
        <office:forms form:automatic-focus="false" form:apply-design-mode="false"/>
        <draw:custom-shape draw:name="Text 149" draw:style-name="gr265" draw:text-style-name="P136" draw:layer="layout" svg:width="1.484cm" svg:height="0.839cm" svg:x="0.89cm" svg:y="0.419cm">
          <text:p text:style-name="P135"><text:span text:style-name="T23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0" draw:style-name="gr266" draw:text-style-name="P124" draw:layer="layout" svg:width="26.729cm" svg:height="3.079cm" svg:x="1.484cm" svg:y="0.979cm">
          <text:p text:style-name="P123"><text:span text:style-name="T236">Réplication entre clu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1" draw:style-name="gr267" draw:text-style-name="P136" draw:layer="layout" svg:width="23.759cm" svg:height="15.399cm" svg:x="2.969cm" svg:y="4.759cm">
          <text:p text:style-name="P135"><text:span text:style-name="T237">MirrorMaker 2</text:span></text:p>
          <text:p text:style-name="P135"><text:span text:style-name="T238">– </text:span><text:span text:style-name="T238">Outil officiel basé sur Kafka Connect</text:span></text:p>
          <text:p text:style-name="P135"><text:span text:style-name="T238">– </text:span><text:span text:style-name="T238">Réplique topics, ACL, configs et offsets</text:span></text:p>
          <text:p text:style-name="P135"><text:span text:style-name="T239"><text:s/></text:span></text:p>
          <text:p text:style-name="P135"><text:span text:style-name="T237">Confluent Replicator</text:span></text:p>
          <text:p text:style-name="P135"><text:span text:style-name="T238">– </text:span><text:span text:style-name="T238">Alternative commerciale</text:span></text:p>
          <text:p text:style-name="P135"><text:span text:style-name="T238">– </text:span><text:span text:style-name="T238">Fonctionnalités enrichies</text:span></text:p>
          <text:p text:style-name="P135"><text:span text:style-name="T239"><text:s/></text:span></text:p>
          <text:p text:style-name="P135"><text:span text:style-name="T237">Convention de nommage</text:span></text:p>
          <text:p text:style-name="P135"><text:span text:style-name="T238">– </text:span><text:span text:style-name="T238">Topics préfixés par alias source</text:span></text:p>
          <text:p text:style-name="P135"><text:span text:style-name="T238">– </text:span><text:span text:style-name="T238">Ex : dc1.commandes sur le D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9" draw:style-name="gr2" draw:layer="layout" svg:width="16.799cm" svg:height="10.023cm" svg:x="2.1cm" svg:y="3.712cm" draw:page-number="246" presentation:class="page"/>
          <draw:frame draw:name="Notes Placeholder 49" presentation:style-name="pr149" draw:text-style-name="P129" draw:layer="layout" svg:width="16.799cm" svg:height="11.693cm" svg:x="2.1cm" svg:y="14.293cm" presentation:class="notes" presentation:placeholder="true" presentation:user-transformed="true">
            <draw:text-box/>
          </draw:frame>
          <draw:frame draw:name="Slide Number Placeholder 49" presentation:style-name="pr150"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7" draw:style-name="dp11" draw:master-page-name="DEFAULT">
        <office:forms form:automatic-focus="false" form:apply-design-mode="false"/>
        <draw:custom-shape draw:name="Text 152" draw:style-name="gr268" draw:text-style-name="P136" draw:layer="layout" svg:width="1.484cm" svg:height="0.839cm" svg:x="0.89cm" svg:y="0.419cm">
          <text:p text:style-name="P135"><text:span text:style-name="T23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3" draw:style-name="gr269" draw:text-style-name="P124" draw:layer="layout" svg:width="26.729cm" svg:height="3.079cm" svg:x="1.484cm" svg:y="0.979cm">
          <text:p text:style-name="P123"><text:span text:style-name="T236">Active-pass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4" draw:style-name="gr270" draw:text-style-name="P136" draw:layer="layout" svg:width="23.759cm" svg:height="15.399cm" svg:x="2.969cm" svg:y="4.759cm">
          <text:p text:style-name="P135"><text:span text:style-name="T237">Principe</text:span></text:p>
          <text:p text:style-name="P135"><text:span text:style-name="T238">– </text:span><text:span text:style-name="T238">Un cluster primaire, un cluster de secours</text:span></text:p>
          <text:p text:style-name="P135"><text:span text:style-name="T238">– </text:span><text:span text:style-name="T238">Réplication asynchrone via MirrorMaker 2</text:span></text:p>
          <text:p text:style-name="P135"><text:span text:style-name="T239"><text:s/></text:span></text:p>
          <text:p text:style-name="P135"><text:span text:style-name="T237">Avantages</text:span></text:p>
          <text:p text:style-name="P135"><text:span text:style-name="T238">– </text:span><text:span text:style-name="T238">Architecture simple</text:span></text:p>
          <text:p text:style-name="P135"><text:span text:style-name="T238">– </text:span><text:span text:style-name="T238">Pas de conflit d'écriture</text:span></text:p>
          <text:p text:style-name="P135"><text:span text:style-name="T239"><text:s/></text:span></text:p>
          <text:p text:style-name="P135"><text:span text:style-name="T237">Limites</text:span></text:p>
          <text:p text:style-name="P135"><text:span text:style-name="T238">– </text:span><text:span text:style-name="T238">Cluster passif sous-utilisé</text:span></text:p>
          <text:p text:style-name="P135"><text:span text:style-name="T238">– </text:span><text:span text:style-name="T238">Bascule à organiser (offsets, clients)</text:span></text:p>
          <text:p text:style-name="P135"><text:span text:style-name="T238">– </text:span><text:span text:style-name="T238">RPO non nul (perte po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0" draw:style-name="gr2" draw:layer="layout" svg:width="16.799cm" svg:height="10.023cm" svg:x="2.1cm" svg:y="3.712cm" draw:page-number="247" presentation:class="page"/>
          <draw:frame draw:name="Notes Placeholder 50" presentation:style-name="pr151" draw:text-style-name="P129" draw:layer="layout" svg:width="16.799cm" svg:height="11.693cm" svg:x="2.1cm" svg:y="14.293cm" presentation:class="notes" presentation:placeholder="true" presentation:user-transformed="true">
            <draw:text-box/>
          </draw:frame>
          <draw:frame draw:name="Slide Number Placeholder 50" presentation:style-name="pr152"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8" draw:style-name="dp11" draw:master-page-name="DEFAULT">
        <office:forms form:automatic-focus="false" form:apply-design-mode="false"/>
        <draw:custom-shape draw:name="Text 155" draw:style-name="gr271" draw:text-style-name="P136" draw:layer="layout" svg:width="1.484cm" svg:height="0.839cm" svg:x="0.89cm" svg:y="0.419cm">
          <text:p text:style-name="P135"><text:span text:style-name="T23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6" draw:style-name="gr272" draw:text-style-name="P124" draw:layer="layout" svg:width="26.729cm" svg:height="3.079cm" svg:x="1.484cm" svg:y="0.979cm">
          <text:p text:style-name="P123"><text:span text:style-name="T236">Active-a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7" draw:style-name="gr273" draw:text-style-name="P136" draw:layer="layout" svg:width="23.759cm" svg:height="15.399cm" svg:x="2.969cm" svg:y="4.759cm">
          <text:p text:style-name="P135"><text:span text:style-name="T237">Principe</text:span></text:p>
          <text:p text:style-name="P135"><text:span text:style-name="T238">– </text:span><text:span text:style-name="T238">Deux clusters acceptent les écritures</text:span></text:p>
          <text:p text:style-name="P135"><text:span text:style-name="T238">– </text:span><text:span text:style-name="T238">Réplication bidirectionnelle</text:span></text:p>
          <text:p text:style-name="P135"><text:span text:style-name="T239"><text:s/></text:span></text:p>
          <text:p text:style-name="P135"><text:span text:style-name="T237">Avantages</text:span></text:p>
          <text:p text:style-name="P135"><text:span text:style-name="T238">– </text:span><text:span text:style-name="T238">Charge répartie sur les deux DC</text:span></text:p>
          <text:p text:style-name="P135"><text:span text:style-name="T238">– </text:span><text:span text:style-name="T238">Bascule quasi immédiate</text:span></text:p>
          <text:p text:style-name="P135"><text:span text:style-name="T239"><text:s/></text:span></text:p>
          <text:p text:style-name="P135"><text:span text:style-name="T237">Limites</text:span></text:p>
          <text:p text:style-name="P135"><text:span text:style-name="T238">– </text:span><text:span text:style-name="T238">Risque de boucles de réplication</text:span></text:p>
          <text:p text:style-name="P135"><text:span text:style-name="T238">– </text:span><text:span text:style-name="T238">Conflits applicatifs à gérer</text:span></text:p>
          <text:p text:style-name="P135"><text:span text:style-name="T238">– </text:span><text:span text:style-name="T238">Complexité de monit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1" draw:style-name="gr2" draw:layer="layout" svg:width="16.799cm" svg:height="10.023cm" svg:x="2.1cm" svg:y="3.712cm" draw:page-number="248" presentation:class="page"/>
          <draw:frame draw:name="Notes Placeholder 51" presentation:style-name="pr153" draw:text-style-name="P129" draw:layer="layout" svg:width="16.799cm" svg:height="11.693cm" svg:x="2.1cm" svg:y="14.293cm" presentation:class="notes" presentation:placeholder="true" presentation:user-transformed="true">
            <draw:text-box/>
          </draw:frame>
          <draw:frame draw:name="Slide Number Placeholder 51" presentation:style-name="pr154"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49" draw:style-name="dp11" draw:master-page-name="DEFAULT">
        <office:forms form:automatic-focus="false" form:apply-design-mode="false"/>
        <draw:custom-shape draw:name="Text 158" draw:style-name="gr274" draw:text-style-name="P136" draw:layer="layout" svg:width="1.484cm" svg:height="0.839cm" svg:x="0.89cm" svg:y="0.419cm">
          <text:p text:style-name="P135"><text:span text:style-name="T23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9" draw:style-name="gr275" draw:text-style-name="P124" draw:layer="layout" svg:width="26.729cm" svg:height="3.079cm" svg:x="1.484cm" svg:y="0.979cm">
          <text:p text:style-name="P123"><text:span text:style-name="T236">Quel pattern choisi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276" draw:layer="layout" svg:width="26.728cm" svg:height="6.159cm" svg:x="1.485cm" svg:y="5.04cm">
          <table:table>
            <table:table-column table:style-name="co3"/>
            <table:table-column table:style-name="co4"/>
            <table:table-column table:style-name="co5"/>
            <table:table-column table:style-name="co6"/>
            <table:table-column table:style-name="co7"/>
            <table:table-row table:style-name="ro5" table:default-cell-style-name="ce3">
              <table:table-cell>
                <text:p text:style-name="P142"><text:span text:style-name="T245">Pattern</text:span></text:p>
              </table:table-cell>
              <table:table-cell>
                <text:p text:style-name="P143"><text:span text:style-name="T245">RPO</text:span></text:p>
              </table:table-cell>
              <table:table-cell>
                <text:p text:style-name="P143"><text:span text:style-name="T245">RTO</text:span></text:p>
              </table:table-cell>
              <table:table-cell>
                <text:p text:style-name="P143"><text:span text:style-name="T245">Complexité</text:span></text:p>
              </table:table-cell>
              <table:table-cell>
                <text:p text:style-name="P143"><text:span text:style-name="T245">Usage</text:span></text:p>
              </table:table-cell>
            </table:table-row>
            <table:table-row table:style-name="ro5" table:default-cell-style-name="ce4">
              <table:table-cell>
                <text:p text:style-name="P142"><text:span text:style-name="T246">Stretched</text:span></text:p>
              </table:table-cell>
              <table:table-cell>
                <text:p text:style-name="P143"><text:span text:style-name="T247">0</text:span></text:p>
              </table:table-cell>
              <table:table-cell>
                <text:p text:style-name="P143"><text:span text:style-name="T247">Auto</text:span></text:p>
              </table:table-cell>
              <table:table-cell>
                <text:p text:style-name="P143"><text:span text:style-name="T247">Moyenne</text:span></text:p>
              </table:table-cell>
              <table:table-cell>
                <text:p text:style-name="P143"><text:span text:style-name="T247">DC proches</text:span></text:p>
              </table:table-cell>
            </table:table-row>
            <table:table-row table:style-name="ro5" table:default-cell-style-name="ce4">
              <table:table-cell>
                <text:p text:style-name="P142"><text:span text:style-name="T246">Active-passive</text:span></text:p>
              </table:table-cell>
              <table:table-cell>
                <text:p text:style-name="P143"><text:span text:style-name="T247">&gt; 0</text:span></text:p>
              </table:table-cell>
              <table:table-cell>
                <text:p text:style-name="P143"><text:span text:style-name="T247">Manuel</text:span></text:p>
              </table:table-cell>
              <table:table-cell>
                <text:p text:style-name="P143"><text:span text:style-name="T247">Faible</text:span></text:p>
              </table:table-cell>
              <table:table-cell>
                <text:p text:style-name="P143"><text:span text:style-name="T247">DR classique</text:span></text:p>
              </table:table-cell>
            </table:table-row>
            <table:table-row table:style-name="ro5" table:default-cell-style-name="ce4">
              <table:table-cell>
                <text:p text:style-name="P142"><text:span text:style-name="T246">Active-active</text:span></text:p>
              </table:table-cell>
              <table:table-cell>
                <text:p text:style-name="P143"><text:span text:style-name="T247">&gt; 0</text:span></text:p>
              </table:table-cell>
              <table:table-cell>
                <text:p text:style-name="P143"><text:span text:style-name="T247">Rapide</text:span></text:p>
              </table:table-cell>
              <table:table-cell>
                <text:p text:style-name="P143"><text:span text:style-name="T247">Élevée</text:span></text:p>
              </table:table-cell>
              <table:table-cell>
                <text:p text:style-name="P143"><text:span text:style-name="T247">Multi-régions</text:span></text:p>
              </table:table-cell>
            </table:table-row>
          </table:table>
          <draw:image xlink:href="Pictures/TablePreview2.svm" xlink:type="simple" xlink:show="embed" xlink:actuate="onLoad"/>
        </draw:frame>
        <draw:custom-shape draw:name="Text 160" draw:style-name="gr277" draw:text-style-name="P136" draw:layer="layout" svg:width="23.759cm" svg:height="4.199cm" svg:x="2.969cm" svg:y="13.159cm">
          <text:p text:style-name="P135"><text:span text:style-name="T243">Règle empirique</text:span></text:p>
          <text:p text:style-name="P135"><text:span text:style-name="T244">– </text:span><text:span text:style-name="T244">Latence inter-DC &lt; 50 ms ⇒ stretched envisageable</text:span></text:p>
          <text:p text:style-name="P135"><text:span text:style-name="T244">– </text:span><text:span text:style-name="T244">Sinon ⇒ deux clusters et MirrorMak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2" draw:style-name="gr2" draw:layer="layout" svg:width="16.799cm" svg:height="10.023cm" svg:x="2.1cm" svg:y="3.712cm" draw:page-number="249" presentation:class="page"/>
          <draw:frame draw:name="Notes Placeholder 52" presentation:style-name="pr155" draw:text-style-name="P129" draw:layer="layout" svg:width="16.799cm" svg:height="11.693cm" svg:x="2.1cm" svg:y="14.293cm" presentation:class="notes" presentation:placeholder="true" presentation:user-transformed="true">
            <draw:text-box/>
          </draw:frame>
          <draw:frame draw:name="Slide Number Placeholder 52" presentation:style-name="pr156"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page250" draw:style-name="dp11" draw:master-page-name="DEFAULT">
        <office:forms form:automatic-focus="false" form:apply-design-mode="false"/>
        <draw:custom-shape draw:name="Text 161" draw:style-name="gr278" draw:text-style-name="P136" draw:layer="layout" svg:width="1.484cm" svg:height="0.839cm" svg:x="0.89cm" svg:y="0.419cm">
          <text:p text:style-name="P135"><text:span text:style-name="T23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2" draw:style-name="gr279" draw:text-style-name="P124" draw:layer="layout" svg:width="26.729cm" svg:height="3.079cm" svg:x="1.484cm" svg:y="0.979cm">
          <text:p text:style-name="P123"><text:span text:style-name="T236">À reten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3" draw:style-name="gr280" draw:text-style-name="P136" draw:layer="layout" svg:width="23.759cm" svg:height="15.399cm" svg:x="2.969cm" svg:y="4.479cm">
          <text:p text:style-name="P135"><text:span text:style-name="T243">Dimensionnement</text:span></text:p>
          <text:p text:style-name="P135"><text:span text:style-name="T244">– </text:span><text:span text:style-name="T244">Capacité disque dimensionne le cluster</text:span></text:p>
          <text:p text:style-name="P135"><text:span text:style-name="T244">– </text:span><text:span text:style-name="T244">Surveiller CPU, disque, réseau (seuil 70 %)</text:span></text:p>
          <text:p text:style-name="P135"><text:span text:style-name="T239"><text:s/></text:span></text:p>
          <text:p text:style-name="P135"><text:span text:style-name="T243">OS et JVM</text:span></text:p>
          <text:p text:style-name="P135"><text:span text:style-name="T244">– </text:span><text:span text:style-name="T244">swappiness=1, file descriptors élevés</text:span></text:p>
          <text:p text:style-name="P135"><text:span text:style-name="T244">– </text:span><text:span text:style-name="T244">Heap 4-6 Gb, G1GC, pauses &lt; 20 ms</text:span></text:p>
          <text:p text:style-name="P135"><text:span text:style-name="T239"><text:s/></text:span></text:p>
          <text:p text:style-name="P135"><text:span text:style-name="T243">Tuning client</text:span></text:p>
          <text:p text:style-name="P135"><text:span text:style-name="T244">– </text:span><text:span text:style-name="T244">Producteur : batch, linger, compression, acks</text:span></text:p>
          <text:p text:style-name="P135"><text:span text:style-name="T244">– </text:span><text:span text:style-name="T244">Consommateur : fetch, poll, commit manuel</text:span></text:p>
          <text:p text:style-name="P135"><text:span text:style-name="T239"><text:s/></text:span></text:p>
          <text:p text:style-name="P135"><text:span text:style-name="T243">Architecture</text:span></text:p>
          <text:p text:style-name="P135"><text:span text:style-name="T244">– </text:span><text:span text:style-name="T244">Multi-DC : choisir selon RPO/RTO et lat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3" draw:style-name="gr2" draw:layer="layout" svg:width="16.799cm" svg:height="10.023cm" svg:x="2.1cm" svg:y="3.712cm" draw:page-number="250" presentation:class="page"/>
          <draw:frame draw:name="Notes Placeholder 53" presentation:style-name="pr157" draw:text-style-name="P129" draw:layer="layout" svg:width="16.799cm" svg:height="11.693cm" svg:x="2.1cm" svg:y="14.293cm" presentation:class="notes" presentation:placeholder="true" presentation:user-transformed="true">
            <draw:text-box/>
          </draw:frame>
          <draw:frame draw:name="Slide Number Placeholder 53" presentation:style-name="pr158" draw:text-style-name="P131" draw:layer="layout" svg:width="9.099cm" svg:height="1.489cm" svg:x="11.895cm" svg:y="28.21cm" presentation:class="page-number" presentation:user-transformed="true">
            <draw:text-box>
              <text:p text:style-name="P130"><text:span text:style-name="T219"><text:page-number>&lt;numéro&gt;</text:page-number></text:span></text:p>
            </draw:text-box>
          </draw:frame>
        </presentation:notes>
      </draw:page>
      <draw:page draw:name="Monitoring" draw:style-name="dp6" draw:master-page-name="Vide_5f_">
        <office:forms form:automatic-focus="false" form:apply-design-mode="false"/>
        <draw:frame draw:name="Titre 5" presentation:style-name="pr159" draw:text-style-name="P145" draw:layer="layout" svg:width="23.499cm" svg:height="3.506cm" svg:x="3.033cm" svg:y="2.402cm" presentation:class="title" presentation:user-transformed="true">
          <draw:text-box>
            <text:p text:style-name="P144"><text:span text:style-name="T248">Monitoring</text:span></text:p>
          </draw:text-box>
        </draw:frame>
        <draw:frame draw:name="Sous-titre 2" presentation:style-name="pr160" draw:text-style-name="P147" draw:layer="layout" svg:width="23.499cm" svg:height="12.18cm" svg:x="3.033cm" svg:y="6.283cm" presentation:class="subtitle" presentation:user-transformed="true">
          <draw:text-box>
            <text:p text:style-name="P146"><text:span text:style-name="T249"/></text:p>
            <text:p text:style-name="P146"><text:span text:style-name="T249"/></text:p>
            <text:p text:style-name="P146"><text:span text:style-name="T250">Métriques clés</text:span></text:p>
            <text:p text:style-name="P146"><text:span text:style-name="T251">Solutions d’observabilité</text:span></text:p>
            <text:p text:style-name="P146"><text:span text:style-name="T251"/></text:p>
          </draw:text-box>
        </draw:frame>
        <presentation:notes draw:style-name="dp6">
          <office:forms form:automatic-focus="false" form:apply-design-mode="false"/>
          <draw:custom-shape draw:name="Forme libre 2" draw:style-name="gr281" draw:text-style-name="P148" draw:layer="layout" svg:width="15.751cm" svg:height="11.138cm" svg:x="2.624cm" svg:y="2.227cm">
            <text:p/>
            <draw:enhanced-geometry draw:mirror-horizontal="false" draw:mirror-vertical="false" draw:glue-points="?f2 0 ?f3 ?f4 ?f2 ?f5 0 ?f4" drawooo:sub-view-size="21600 21600" draw:text-areas="0 0 ?f3 ?f5" svg:viewBox="0 0 0 0"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1" presentation:style-name="pr161" draw:text-style-name="P47" draw:layer="layout" svg:width="14.367cm" svg:height="11.259cm" svg:x="3.249cm" svg:y="14.129cm" presentation:class="notes" presentation:placeholder="true" presentation:user-transformed="true">
            <draw:text-box/>
          </draw:frame>
        </presentation:notes>
      </draw:page>
      <draw:page draw:name="Pourquoi monitorer Kafka ?" draw:style-name="dp6" draw:master-page-name="Vide_5f_">
        <office:forms form:automatic-focus="false" form:apply-design-mode="false"/>
        <draw:frame draw:name="Titre 12" presentation:style-name="pr41" draw:text-style-name="P48" draw:layer="layout" svg:width="23.499cm" svg:height="3.574cm" svg:x="3.033cm" svg:y="2.367cm" presentation:class="title" presentation:user-transformed="true">
          <draw:text-box>
            <text:p text:style-name="P144"><text:span text:style-name="T252">Pourquoi monitorer Kafka ?</text:span></text:p>
          </draw:text-box>
        </draw:frame>
        <draw:frame draw:name="Espace réservé du texte 10" presentation:style-name="pr42" draw:text-style-name="P52" draw:layer="layout" svg:width="23.499cm" svg:height="12.18cm" svg:x="3.1cm" svg:y="6.452cm" presentation:class="outline" presentation:user-transformed="true">
          <draw:text-box>
            <text:p text:style-name="P149"><text:span text:style-name="T253">1. Est-ce que le cluster tourne correctement ?</text:span></text:p>
            <text:p text:style-name="P149"><text:span text:style-name="T254">Tous les brokers sont-ils actifs ? Les partitions sont-elles </text:span><text:span text:style-name="T254">répliquées ?</text:span></text:p>
            <text:p text:style-name="P149"><text:span text:style-name="T254">Y a-t-il des partitions sans leader ? Des élections en cours ?</text:span></text:p>
            <text:p text:style-name="P149"><text:span text:style-name="T253">2. Est-ce que le débit suit ?</text:span></text:p>
            <text:p text:style-name="P149"><text:span text:style-name="T254">Les producteurs écrivent-ils à la vitesse attendue ?</text:span></text:p>
            <text:p text:style-name="P149"><text:span text:style-name="T254">Les consommateurs suivent-ils le rythme de production ?</text:span></text:p>
            <text:p text:style-name="P149"><text:span text:style-name="T254">Le lag augmente-t-il de façon anormale ?</text:span></text:p>
            <text:p text:style-name="P149"><text:span text:style-name="T253">3. Les applications vont-elles bien ?</text:span></text:p>
            <text:p text:style-name="P149"><text:span text:style-name="T254">Y a-t-il des erreurs de sérialisation, des timeouts, des retries </text:span><text:span text:style-name="T254">excessifs ?</text:span></text:p>
            <text:p text:style-name="P149"><text:span text:style-name="T254">Les batches producteur sont-ils efficaces ?</text:span></text:p>
            <text:p text:style-name="P149"><text:span text:style-name="T254">Les rééquilibrages consommateur sont-ils fréquents ?</text:span></text:p>
            <text:p text:style-name="P149"><text:span text:style-name="T254"/></text:p>
            <text:p text:style-name="P149"><text:span text:style-name="T255">Point de vue développeur : les métriques 2 et 3 sont les plus </text:span><text:span text:style-name="T255">importantes au quotidien.</text:span></text:p>
          </draw:text-box>
        </draw:frame>
        <presentation:notes draw:style-name="dp6">
          <office:forms form:automatic-focus="false" form:apply-design-mode="false"/>
          <draw:page-thumbnail draw:name="Espace réservé de l'image des diapositives 4" draw:style-name="gr2" draw:layer="layout" svg:width="15.535cm" svg:height="10.984cm" svg:x="2.655cm" svg:y="2.258cm" draw:page-number="252" presentation:class="page"/>
          <draw:frame draw:name="Espace réservé des notes 12" presentation:style-name="pr162" draw:text-style-name="P47" draw:layer="layout" svg:width="14.362cm" svg:height="11.253cm" svg:x="3.25cm" svg:y="14.128cm" presentation:class="notes" presentation:placeholder="true" presentation:user-transformed="true">
            <draw:text-box/>
          </draw:frame>
        </presentation:notes>
      </draw:page>
      <draw:page draw:name="Métriques broker — santé du cluster" draw:style-name="dp6" draw:master-page-name="Vide_5f_">
        <office:forms form:automatic-focus="false" form:apply-design-mode="false"/>
        <draw:frame draw:name="Titre 13" presentation:style-name="pr41" draw:text-style-name="P48" draw:layer="layout" svg:width="23.499cm" svg:height="3.574cm" svg:x="3.033cm" svg:y="2.367cm" presentation:class="title" presentation:user-transformed="true">
          <draw:text-box>
            <text:p text:style-name="P144"><text:span text:style-name="T252">Métriques broker — santé du cluster</text:span></text:p>
          </draw:text-box>
        </draw:frame>
        <draw:frame draw:name="Espace réservé du texte 11" presentation:style-name="pr42" draw:text-style-name="P52" draw:layer="layout" svg:width="23.499cm" svg:height="12.18cm" svg:x="3.033cm" svg:y="6.283cm" presentation:class="outline" presentation:user-transformed="true">
          <draw:text-box>
            <text:p text:style-name="P149"><text:span text:style-name="T249">Indicateurs critiques — alerter immédiatement si non </text:span><text:span text:style-name="T249">nul</text:span></text:p>
            <text:p text:style-name="P149"><text:span text:style-name="T256">⚠ </text:span><text:span text:style-name="T256">UnderReplicatedPartitions</text:span></text:p>
            <text:p text:style-name="P149"><text:span text:style-name="T251">Partitions dont le nombre de répliques ISR &lt; </text:span><text:span text:style-name="T251">replication.factor</text:span></text:p>
            <text:p text:style-name="P149"><text:span text:style-name="T251">=&gt; risque de perte de données si un broker tombe</text:span></text:p>
            <text:p text:style-name="P149"><text:span text:style-name="T256">⚠ </text:span><text:span text:style-name="T256">OfflinePartitionsCount</text:span></text:p>
            <text:p text:style-name="P149"><text:span text:style-name="T251">Partitions sans leader — les clients ne peuvent ni lire ni </text:span><text:span text:style-name="T251">écrire</text:span></text:p>
            <text:p text:style-name="P149"><text:span text:style-name="T256">⚠ </text:span><text:span text:style-name="T256">ActiveControllerCount ≠ 1</text:span></text:p>
            <text:p text:style-name="P149"><text:span text:style-name="T251">Doit toujours valoir 1 — 0 ou 2 indique un problème de </text:span><text:span text:style-name="T251">quorum KRaft</text:span></text:p>
            <text:p text:style-name="P149"><text:span text:style-name="T251"/></text:p>
            <text:p text:style-name="P149"><text:span text:style-name="T249">Indicateurs de performance</text:span></text:p>
            <text:p text:style-name="P149"><text:span text:style-name="T253">LeaderElectionRateAndTimeMs</text:span><text:span text:style-name="T251"> : taux d'élection de </text:span><text:span text:style-name="T251">leaders — doit être proche de 0</text:span></text:p>
            <text:p text:style-name="P149"><text:span text:style-name="T253">NetworkProcessorAvgIdlePercent</text:span><text:span text:style-name="T251"> : si &lt; 20%, le broker </text:span><text:span text:style-name="T251">est saturé réseau</text:span></text:p>
            <text:p text:style-name="P149"><text:span text:style-name="T253">RequestHandlerAvgIdlePercent</text:span><text:span text:style-name="T251"> : si &lt; 20%, le broker est </text:span><text:span text:style-name="T251">saturé CPU</text:span></text:p>
          </draw:text-box>
        </draw:frame>
        <presentation:notes draw:style-name="dp6">
          <office:forms form:automatic-focus="false" form:apply-design-mode="false"/>
          <draw:page-thumbnail draw:name="Espace réservé de l'image des diapositives 11" draw:style-name="gr2" draw:layer="layout" svg:width="15.535cm" svg:height="10.984cm" svg:x="2.655cm" svg:y="2.258cm" draw:page-number="253" presentation:class="page"/>
          <draw:frame draw:name="Espace réservé des notes 13" presentation:style-name="pr163" draw:text-style-name="P47" draw:layer="layout" svg:width="14.362cm" svg:height="11.253cm" svg:x="3.25cm" svg:y="14.128cm" presentation:class="notes" presentation:placeholder="true" presentation:user-transformed="true">
            <draw:text-box/>
          </draw:frame>
        </presentation:notes>
      </draw:page>
      <draw:page draw:name="Métriques broker — débit et latence" draw:style-name="dp6" draw:master-page-name="Vide_5f_">
        <office:forms form:automatic-focus="false" form:apply-design-mode="false"/>
        <draw:frame draw:name="Titre 14" presentation:style-name="pr41" draw:text-style-name="P48" draw:layer="layout" svg:width="23.499cm" svg:height="3.574cm" svg:x="3.033cm" svg:y="2.367cm" presentation:class="title" presentation:user-transformed="true">
          <draw:text-box>
            <text:p text:style-name="P144"><text:span text:style-name="T252">Métriques broker — débit et latence</text:span></text:p>
          </draw:text-box>
        </draw:frame>
        <draw:frame draw:name="Espace réservé du texte 12" presentation:style-name="pr42" draw:text-style-name="P52" draw:layer="layout" svg:width="23.499cm" svg:height="12.979cm" svg:x="3.033cm" svg:y="6.283cm" presentation:class="outline" presentation:user-transformed="true">
          <draw:text-box>
            <text:p text:style-name="P149"><text:span text:style-name="T249">Débit</text:span></text:p>
            <text:p text:style-name="P149"><text:span text:style-name="T253">BytesInPerSec</text:span><text:span text:style-name="T251"> : octets entrants par seconde (production)</text:span></text:p>
            <text:p text:style-name="P149"><text:span text:style-name="T257">BytesOutPerSec</text:span><text:span text:style-name="T251"> : octets sortants par seconde </text:span><text:span text:style-name="T251">(consommation + réplication)</text:span></text:p>
            <text:p text:style-name="P149"><text:span text:style-name="T257">MessagesInPerSec</text:span><text:span text:style-name="T251"> : nombre de messages produits par </text:span><text:span text:style-name="T251">seconde</text:span></text:p>
            <text:p text:style-name="P149"><text:span text:style-name="T251"/></text:p>
            <text:p text:style-name="P149"><text:span text:style-name="T249">Requêtes</text:span></text:p>
            <text:p text:style-name="P149"><text:span text:style-name="T257">RequestsPerSec</text:span><text:span text:style-name="T251"> (Produce/Fetch) : taux de requêtes par </text:span><text:span text:style-name="T251">type</text:span></text:p>
            <text:p text:style-name="P149"><text:span text:style-name="T257">TotalTimeMs</text:span><text:span text:style-name="T251"> (Produce/FetchConsumer) : latence totale de </text:span><text:span text:style-name="T251">traitement</text:span></text:p>
            <text:p text:style-name="P149"><text:span text:style-name="T251"/></text:p>
            <text:p text:style-name="P149"><text:span text:style-name="T249">Log / stockage</text:span></text:p>
            <text:p text:style-name="P149"><text:span text:style-name="T257">LogFlushRateAndTimeMs</text:span><text:span text:style-name="T251"> : taux et durée des flushes </text:span><text:span text:style-name="T251">disque</text:span></text:p>
            <text:p text:style-name="P149"><text:span text:style-name="T257">LogEndOffset</text:span><text:span text:style-name="T251"> : offset de fin de partition — mesure </text:span><text:span text:style-name="T251">l'avancement de la production</text:span></text:p>
            <text:p text:style-name="P149"><text:span text:style-name="T251"/></text:p>
            <text:p text:style-name="P149"><text:span text:style-name="T258">Ces métriques sont accessibles via JMX sous </text:span><text:span text:style-name="T259">kafka.server:type=BrokerTopicMetrics</text:span></text:p>
          </draw:text-box>
        </draw:frame>
        <presentation:notes draw:style-name="dp6">
          <office:forms form:automatic-focus="false" form:apply-design-mode="false"/>
          <draw:page-thumbnail draw:name="Espace réservé de l'image des diapositives 12" draw:style-name="gr2" draw:layer="layout" svg:width="15.535cm" svg:height="10.984cm" svg:x="2.655cm" svg:y="2.258cm" draw:page-number="254" presentation:class="page"/>
          <draw:frame draw:name="Espace réservé des notes 14" presentation:style-name="pr164" draw:text-style-name="P47" draw:layer="layout" svg:width="14.362cm" svg:height="11.253cm" svg:x="3.25cm" svg:y="14.128cm" presentation:class="notes" presentation:placeholder="true" presentation:user-transformed="true">
            <draw:text-box/>
          </draw:frame>
        </presentation:notes>
      </draw:page>
      <draw:page draw:name="&#10;Métriques producteur" draw:style-name="dp6" draw:master-page-name="Vide_5f_">
        <office:forms form:automatic-focus="false" form:apply-design-mode="false"/>
        <draw:frame draw:name="Titre 15" presentation:style-name="pr41" draw:text-style-name="P48" draw:layer="layout" svg:width="23.499cm" svg:height="3.574cm" svg:x="3.033cm" svg:y="2.367cm" presentation:class="title" presentation:user-transformed="true">
          <draw:text-box>
            <text:p text:style-name="P144"><text:span text:style-name="T260"><text:line-break/></text:span><text:span text:style-name="T252">Métriques producteur</text:span></text:p>
          </draw:text-box>
        </draw:frame>
        <draw:frame draw:name="Espace réservé du texte 13" presentation:style-name="pr42" draw:text-style-name="P52" draw:layer="layout" svg:width="23.499cm" svg:height="12.349cm" svg:x="3.033cm" svg:y="6.283cm" presentation:class="outline" presentation:user-transformed="true">
          <draw:text-box>
            <text:p text:style-name="P149"><text:span text:style-name="T249">Fiabilité</text:span><text:span text:style-name="T251"> — à surveiller en priorité</text:span></text:p>
            <text:p text:style-name="P149"><text:span text:style-name="T261">⚠ </text:span><text:span text:style-name="T261">record-error-rate : </text:span><text:span text:style-name="T251">Messages en erreur par seconde — </text:span><text:span text:style-name="T251">toute valeur &gt; 0 est anormale</text:span></text:p>
            <text:p text:style-name="P149"><text:span text:style-name="T253">record-retry-rate</text:span><text:span text:style-name="T251"> : taux de retries — acceptable mais à </text:span><text:span text:style-name="T251">surveiller</text:span></text:p>
            <text:p text:style-name="P149"><text:span text:style-name="T253">request-latency-avg</text:span><text:span text:style-name="T251"> / max : latence aller-retour vers les </text:span><text:span text:style-name="T251">brokers</text:span></text:p>
            <text:p text:style-name="P149"><text:span text:style-name="T251"/></text:p>
            <text:p text:style-name="P149"><text:span text:style-name="T249">Performance</text:span></text:p>
            <text:p text:style-name="P149"><text:span text:style-name="T257">batch-size-avg</text:span><text:span text:style-name="T251"> : taille moyenne des batches — si proche </text:span><text:span text:style-name="T251">de batch.size, augmenter</text:span></text:p>
            <text:p text:style-name="P149"><text:span text:style-name="T257">records-per-request-avg</text:span><text:span text:style-name="T251"> : messages par requête réseau </text:span><text:span text:style-name="T251">— indicateur de batching</text:span></text:p>
            <text:p text:style-name="P149"><text:span text:style-name="T257">compression-rate-avg</text:span><text:span text:style-name="T251"> : ratio de compression — plus </text:span><text:span text:style-name="T251">c'est bas, mieux c'est</text:span></text:p>
            <text:p text:style-name="P149"><text:span text:style-name="T251"/></text:p>
          </draw:text-box>
        </draw:frame>
        <presentation:notes draw:style-name="dp6">
          <office:forms form:automatic-focus="false" form:apply-design-mode="false"/>
          <draw:page-thumbnail draw:name="Espace réservé de l'image des diapositives 13" draw:style-name="gr2" draw:layer="layout" svg:width="15.535cm" svg:height="10.984cm" svg:x="2.655cm" svg:y="2.258cm" draw:page-number="255" presentation:class="page"/>
          <draw:frame draw:name="Espace réservé des notes 15" presentation:style-name="pr165" draw:text-style-name="P47" draw:layer="layout" svg:width="14.362cm" svg:height="11.253cm" svg:x="3.25cm" svg:y="14.128cm" presentation:class="notes" presentation:placeholder="true" presentation:user-transformed="true">
            <draw:text-box/>
          </draw:frame>
        </presentation:notes>
      </draw:page>
      <draw:page draw:name="Métriques consommateur" draw:style-name="dp6" draw:master-page-name="Vide_5f_">
        <office:forms form:automatic-focus="false" form:apply-design-mode="false"/>
        <draw:frame draw:name="Titre 16" presentation:style-name="pr41" draw:text-style-name="P48" draw:layer="layout" svg:width="23.499cm" svg:height="3.574cm" svg:x="3.033cm" svg:y="2.367cm" presentation:class="title" presentation:user-transformed="true">
          <draw:text-box>
            <text:p text:style-name="P144"><text:span text:style-name="T252">Métriques consommateur</text:span></text:p>
          </draw:text-box>
        </draw:frame>
        <draw:frame draw:name="Espace réservé du texte 14" presentation:style-name="pr42" draw:text-style-name="P52" draw:layer="layout" svg:width="23.499cm" svg:height="12.18cm" svg:x="3.033cm" svg:y="6.283cm" presentation:class="outline" presentation:user-transformed="true">
          <draw:text-box>
            <text:p text:style-name="P149"><text:span text:style-name="T249">Fiabilité</text:span><text:span text:style-name="T251"> — à surveiller en priorité</text:span></text:p>
            <text:p text:style-name="P149"><text:span text:style-name="T261">⚠ </text:span><text:span text:style-name="T261">records-lag-max : </text:span><text:span text:style-name="T251">Lag maximum sur les partitions </text:span><text:span text:style-name="T251">assignées — l'indicateur le plus important</text:span></text:p>
            <text:p text:style-name="P149"><text:span text:style-name="T253">commit-rate</text:span><text:span text:style-name="T251"> : taux de commits d'offset — doit être régulier</text:span></text:p>
            <text:p text:style-name="P149"><text:span text:style-name="T253">fetch-latency-avg</text:span><text:span text:style-name="T251"> : latence de fetch — indicateur de </text:span><text:span text:style-name="T251">saturation broker</text:span></text:p>
            <text:p text:style-name="P149"><text:span text:style-name="T249"/></text:p>
            <text:p text:style-name="P149"><text:span text:style-name="T249">Rééquilibrages</text:span></text:p>
            <text:p text:style-name="P149"><text:span text:style-name="T253">rebalance-rate-and-time</text:span><text:span text:style-name="T251"> : taux et durée des </text:span><text:span text:style-name="T251">rééquilibrages </text:span></text:p>
            <text:p text:style-name="P149"><text:span text:style-name="T251">Des rééquilibrages fréquents indiquent des problèmes de </text:span><text:span text:style-name="T251">heartbeat (session.timeout.ms trop court, traitement trop </text:span><text:span text:style-name="T251">long entre deux poll)</text:span></text:p>
            <text:p text:style-name="P149"><text:span text:style-name="T249"/></text:p>
            <text:p text:style-name="P149"><text:span text:style-name="T249">Performance</text:span></text:p>
            <text:p text:style-name="P149"><text:span text:style-name="T253">fetch-rate</text:span><text:span text:style-name="T251"> : requêtes fetch par seconde</text:span></text:p>
            <text:p text:style-name="P149"><text:span text:style-name="T253">records-consumed-rate</text:span><text:span text:style-name="T251"> : messages consommés par </text:span><text:span text:style-name="T251">seconde</text:span></text:p>
            <text:p text:style-name="P149"><text:span text:style-name="T253">bytes-consumed-rate</text:span><text:span text:style-name="T251"> : octets consommés par seconde</text:span></text:p>
          </draw:text-box>
        </draw:frame>
        <presentation:notes draw:style-name="dp6">
          <office:forms form:automatic-focus="false" form:apply-design-mode="false"/>
          <draw:page-thumbnail draw:name="Espace réservé de l'image des diapositives 14" draw:style-name="gr2" draw:layer="layout" svg:width="15.535cm" svg:height="10.984cm" svg:x="2.655cm" svg:y="2.258cm" draw:page-number="256" presentation:class="page"/>
          <draw:frame draw:name="Espace réservé des notes 16" presentation:style-name="pr166" draw:text-style-name="P47" draw:layer="layout" svg:width="14.362cm" svg:height="11.253cm" svg:x="3.25cm" svg:y="14.128cm" presentation:class="notes" presentation:placeholder="true" presentation:user-transformed="true">
            <draw:text-box/>
          </draw:frame>
        </presentation:notes>
      </draw:page>
      <draw:page draw:name="Le lag consommateur — l'indicateur clé" draw:style-name="dp6" draw:master-page-name="Vide_5f_">
        <office:forms form:automatic-focus="false" form:apply-design-mode="false"/>
        <draw:frame draw:name="Titre 17" presentation:style-name="pr41" draw:text-style-name="P48" draw:layer="layout" svg:width="23.499cm" svg:height="3.574cm" svg:x="3.033cm" svg:y="2.367cm" presentation:class="title" presentation:user-transformed="true">
          <draw:text-box>
            <text:p text:style-name="P144"><text:span text:style-name="T252">Le lag consommateur — l'indicateur clé</text:span></text:p>
          </draw:text-box>
        </draw:frame>
        <draw:frame draw:name="Espace réservé du texte 15" presentation:style-name="pr42" draw:text-style-name="P52" draw:layer="layout" svg:width="23.499cm" svg:height="12.18cm" svg:x="3.033cm" svg:y="6.283cm" presentation:class="outline" presentation:user-transformed="true">
          <draw:text-box>
            <text:p text:style-name="P149"><text:span text:style-name="T260">Le </text:span><text:span text:style-name="T262">lag </text:span><text:span text:style-name="T260">mesure le </text:span><text:span text:style-name="T262">retard de traitement </text:span><text:span text:style-name="T260">d'un consumer group.</text:span></text:p>
            <text:p text:style-name="P149"><text:span text:style-name="T263">Interprétation</text:span></text:p>
            <text:p text:style-name="P149"><text:span text:style-name="T264">✓ </text:span><text:span text:style-name="T264">Lag stable proche de 0 : consommateur à jour</text:span></text:p>
            <text:p text:style-name="P149"><text:span text:style-name="T265">⚡ </text:span><text:span text:style-name="T265">Lag stable mais non nul : consommateur suit mais avec du retard — acceptable</text:span></text:p>
            <text:p text:style-name="P149"><text:span text:style-name="T266">⚠ </text:span><text:span text:style-name="T266">Lag croissant : consommateur trop lent — risque de saturation</text:span></text:p>
            <text:p text:style-name="P149"><text:span text:style-name="T263"/></text:p>
            <text:p text:style-name="P149"><text:span text:style-name="T263">Causes d'un lag croissant</text:span></text:p>
            <text:p text:style-name="P149"><text:span text:style-name="T260">– </text:span><text:span text:style-name="T260">Traitement trop lent (base de données lente, traitement CPU intensif)</text:span></text:p>
            <text:p text:style-name="P149"><text:span text:style-name="T260">– </text:span><text:span text:style-name="T260">Trop peu de partitions ou de consommateurs</text:span></text:p>
            <text:p text:style-name="P149"><text:span text:style-name="T260">– </text:span><text:span text:style-name="T260">Rééquilibrages fréquents</text:span></text:p>
            <text:p text:style-name="P149"><text:span text:style-name="T260">– </text:span><text:span text:style-name="T260">Producteur qui accélère soudainement</text:span></text:p>
          </draw:text-box>
        </draw:frame>
        <presentation:notes draw:style-name="dp6">
          <office:forms form:automatic-focus="false" form:apply-design-mode="false"/>
          <draw:page-thumbnail draw:name="Espace réservé de l'image des diapositives 15" draw:style-name="gr2" draw:layer="layout" svg:width="15.535cm" svg:height="10.984cm" svg:x="2.655cm" svg:y="2.258cm" draw:page-number="257" presentation:class="page"/>
          <draw:frame draw:name="Espace réservé des notes 17" presentation:style-name="pr167" draw:text-style-name="P47" draw:layer="layout" svg:width="14.362cm" svg:height="11.253cm" svg:x="3.25cm" svg:y="14.128cm" presentation:class="notes" presentation:placeholder="true" presentation:user-transformed="true">
            <draw:text-box/>
          </draw:frame>
        </presentation:notes>
      </draw:page>
      <draw:page draw:name="Monitoring (2)" draw:style-name="dp6" draw:master-page-name="Vide_5f_">
        <office:forms form:automatic-focus="false" form:apply-design-mode="false"/>
        <draw:frame draw:name="Titre 18" presentation:style-name="pr168" draw:text-style-name="P145" draw:layer="layout" svg:width="23.499cm" svg:height="3.506cm" svg:x="3.033cm" svg:y="2.402cm" presentation:class="title" presentation:user-transformed="true">
          <draw:text-box>
            <text:p text:style-name="P144"><text:span text:style-name="T248">Monitoring</text:span></text:p>
          </draw:text-box>
        </draw:frame>
        <draw:frame draw:name="Sous-titre 4" presentation:style-name="pr169" draw:text-style-name="P147" draw:layer="layout" svg:width="23.499cm" svg:height="12.18cm" svg:x="3.033cm" svg:y="6.283cm" presentation:class="subtitle" presentation:user-transformed="true">
          <draw:text-box>
            <text:p text:style-name="P146"><text:span text:style-name="T249"/></text:p>
            <text:p text:style-name="P146"><text:span text:style-name="T249"/></text:p>
            <text:p text:style-name="P146"><text:span text:style-name="T251">Métriques clés</text:span></text:p>
            <text:p text:style-name="P146"><text:span text:style-name="T250">Solutions</text:span><text:span text:style-name="T251"> </text:span><text:span text:style-name="T250">d’observabilité</text:span></text:p>
            <text:p text:style-name="P146"><text:span text:style-name="T251"/></text:p>
          </draw:text-box>
        </draw:frame>
        <presentation:notes draw:style-name="dp6">
          <office:forms form:automatic-focus="false" form:apply-design-mode="false"/>
          <draw:custom-shape draw:name="Forme libre 3" draw:style-name="gr282" draw:text-style-name="P148" draw:layer="layout" svg:width="15.751cm" svg:height="11.138cm" svg:x="2.624cm" svg:y="2.227cm">
            <text:p/>
            <draw:enhanced-geometry draw:mirror-horizontal="false" draw:mirror-vertical="false" draw:glue-points="?f2 0 ?f3 ?f4 ?f2 ?f5 0 ?f4" drawooo:sub-view-size="21600 21600" draw:text-areas="0 0 ?f3 ?f5" svg:viewBox="0 0 0 0"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8" presentation:style-name="pr170" draw:text-style-name="P47" draw:layer="layout" svg:width="14.367cm" svg:height="11.259cm" svg:x="3.249cm" svg:y="14.129cm" presentation:class="notes" presentation:placeholder="true" presentation:user-transformed="true">
            <draw:text-box/>
          </draw:frame>
        </presentation:notes>
      </draw:page>
      <draw:page draw:name="Solutions d'observabilité" draw:style-name="dp6" draw:master-page-name="Vide_5f_">
        <office:forms form:automatic-focus="false" form:apply-design-mode="false"/>
        <draw:frame draw:name="Titre 19" presentation:style-name="pr41" draw:text-style-name="P48" draw:layer="layout" svg:width="23.499cm" svg:height="3.574cm" svg:x="3.033cm" svg:y="2.367cm" presentation:class="title" presentation:user-transformed="true">
          <draw:text-box>
            <text:p text:style-name="P144"><text:span text:style-name="T252">Solutions d'observabilité</text:span></text:p>
          </draw:text-box>
        </draw:frame>
        <draw:frame draw:name="Espace réservé du texte 16" presentation:style-name="pr42" draw:text-style-name="P52" draw:layer="layout" svg:width="23.499cm" svg:height="13.481cm" svg:x="3.033cm" svg:y="6.283cm" presentation:class="outline" presentation:user-transformed="true">
          <draw:text-box>
            <text:p text:style-name="P149"><text:span text:style-name="T263">JMX (Java Management Extensions)</text:span></text:p>
            <text:p text:style-name="P149"><text:span text:style-name="T260">Socle bas niveau — toutes les métriques Kafka sont exposées en JMX</text:span></text:p>
            <text:p text:style-name="P149"><text:span text:style-name="T260">Accès via JConsole, jmxtrans, ou l'API Java directement</text:span></text:p>
            <text:p text:style-name="P149"><text:span text:style-name="T263">Prometheus + Grafana</text:span></text:p>
            <text:p text:style-name="P149"><text:span text:style-name="T260">Standard de facto en environnement cloud-native</text:span></text:p>
            <text:p text:style-name="P149"><text:span text:style-name="T260">JMX Exporter → Prometheus → Grafana — dashboards communautaires disponibles</text:span></text:p>
            <text:p text:style-name="P149"><text:span text:style-name="T263">Confluent Control Center (payant)</text:span></text:p>
            <text:p text:style-name="P149"><text:span text:style-name="T260">Interface web intégrée — self-managed Confluent Platform</text:span></text:p>
            <text:p text:style-name="P149"><text:span text:style-name="T267">Monitoring cluster, consumer groups, alerting, Schema Registry, Connect</text:span></text:p>
            <text:p text:style-name="P149"><text:span text:style-name="T263">Confluent Cloud</text:span></text:p>
            <text:p text:style-name="P149"><text:span text:style-name="T260">Monitoring inclus et managé — métriques via API ou Metrics API</text:span></text:p>
            <text:p text:style-name="P149"><text:span text:style-name="T260">Intégration native Datadog, New Relic, Splunk</text:span></text:p>
            <text:p text:style-name="P149"><text:span text:style-name="T260"/></text:p>
            <text:p text:style-name="P149"><text:span text:style-name="T268">En production : Confluent Control Center pour l'opérationnel, Prometheus/Grafana pour l'observabilité long </text:span><text:span text:style-name="T268">terme.</text:span></text:p>
            <text:p text:style-name="P149"><text:span text:style-name="T269"/></text:p>
            <text:p text:style-name="P149"><text:span text:style-name="T260">8</text:span></text:p>
          </draw:text-box>
        </draw:frame>
        <presentation:notes draw:style-name="dp6">
          <office:forms form:automatic-focus="false" form:apply-design-mode="false"/>
          <draw:page-thumbnail draw:name="Espace réservé de l'image des diapositives 16" draw:style-name="gr2" draw:layer="layout" svg:width="15.535cm" svg:height="10.984cm" svg:x="2.655cm" svg:y="2.258cm" draw:page-number="259" presentation:class="page"/>
          <draw:frame draw:name="Espace réservé des notes 19" presentation:style-name="pr171" draw:text-style-name="P47" draw:layer="layout" svg:width="14.362cm" svg:height="11.253cm" svg:x="3.25cm" svg:y="14.128cm" presentation:class="notes" presentation:placeholder="true" presentation:user-transformed="true">
            <draw:text-box/>
          </draw:frame>
        </presentation:notes>
      </draw:page>
      <draw:page draw:name="Stratégie compact (2)" draw:style-name="dp6" draw:master-page-name="Vide_5f_">
        <office:forms form:automatic-focus="false" form:apply-design-mode="false"/>
        <draw:frame draw:name="Titre 20" presentation:style-name="pr41" draw:text-style-name="P48" draw:layer="layout" svg:width="23.499cm" svg:height="3.574cm" svg:x="3.033cm" svg:y="2.367cm" presentation:class="title" presentation:user-transformed="true">
          <draw:text-box>
            <text:p text:style-name="P144"><text:span text:style-name="T252">Stratégie compact</text:span></text:p>
          </draw:text-box>
        </draw:frame>
        <draw:frame draw:name="Espace réservé du texte 17" presentation:style-name="pr42" draw:text-style-name="P52" draw:layer="layout" svg:width="23.499cm" svg:height="12.18cm" svg:x="3.033cm" svg:y="6.283cm" presentation:class="outline" presentation:user-transformed="true">
          <draw:text-box>
            <text:p text:style-name="P149"><text:span text:style-name="T251">Toutes les métriques Kafka sont exposées via JMX (Java </text:span><text:span text:style-name="T251">Management Extensions).</text:span></text:p>
            <text:p text:style-name="P149"><text:span text:style-name="T251">C'est la source de données de tous les outils de monitoring.</text:span></text:p>
            <text:p text:style-name="P149"><text:span text:style-name="T251"/></text:p>
            <text:p text:style-name="P149"><text:span text:style-name="T251">Nommage des MBeans</text:span></text:p>
            <text:p text:style-name="P149"><text:span text:style-name="T270">kafka.server:type=BrokerTopicMetrics,name=MessagesInPerSec</text:span></text:p>
            <text:p text:style-name="P149"><text:span text:style-name="T270">kafka.server:type=ReplicaManager,name=UnderReplicatedPartitions</text:span></text:p>
            <text:p text:style-name="P149"><text:span text:style-name="T270">kafka.producer:type=producer-metrics,client-id=my-producer</text:span></text:p>
            <text:p text:style-name="P149"><text:span text:style-name="T270">kafka.consumer:type=consumer-fetch-manager-metrics,client-id=my-consumer</text:span></text:p>
          </draw:text-box>
        </draw:frame>
        <presentation:notes draw:style-name="dp6">
          <office:forms form:automatic-focus="false" form:apply-design-mode="false"/>
          <draw:page-thumbnail draw:name="Espace réservé de l'image des diapositives 17" draw:style-name="gr2" draw:layer="layout" svg:width="15.535cm" svg:height="10.984cm" svg:x="2.655cm" svg:y="2.258cm" draw:page-number="260" presentation:class="page"/>
          <draw:frame draw:name="Espace réservé des notes 20" presentation:style-name="pr172" draw:text-style-name="P47" draw:layer="layout" svg:width="14.362cm" svg:height="11.253cm" svg:x="3.25cm" svg:y="14.128cm" presentation:class="notes" presentation:placeholder="true" presentation:user-transformed="true">
            <draw:text-box/>
          </draw:frame>
        </presentation:notes>
      </draw:page>
      <draw:page draw:name="Prometheus + Grafana" draw:style-name="dp6" draw:master-page-name="Vide_5f_">
        <office:forms form:automatic-focus="false" form:apply-design-mode="false"/>
        <draw:frame draw:name="Titre 21" presentation:style-name="pr41" draw:text-style-name="P48" draw:layer="layout" svg:width="23.499cm" svg:height="3.574cm" svg:x="3.033cm" svg:y="2.367cm" presentation:class="title" presentation:user-transformed="true">
          <draw:text-box>
            <text:p text:style-name="P144"><text:span text:style-name="T252">Prometheus + Grafana</text:span></text:p>
          </draw:text-box>
        </draw:frame>
        <draw:frame draw:name="Espace réservé du texte 18" presentation:style-name="pr42" draw:text-style-name="P52" draw:layer="layout" svg:width="23.499cm" svg:height="13.058cm" svg:x="3.033cm" svg:y="6.283cm" presentation:class="outline" presentation:user-transformed="true">
          <draw:text-box>
            <text:p text:style-name="P149"><text:span text:style-name="T263">Architecture</text:span></text:p>
            <text:p text:style-name="P149"><text:span text:style-name="T260">Broker Kafka (JMX :9999) </text:span></text:p>
            <text:p text:style-name="P149"><text:span text:style-name="T260">↓ </text:span><text:span text:style-name="T260">JMX Exporter (agent Java — expose les métriques en HTTP /metrics) </text:span></text:p>
            <text:p text:style-name="P149"><text:span text:style-name="T260">↓ </text:span><text:span text:style-name="T260">Prometheus (scrape toutes les X secondes) </text:span></text:p>
            <text:p text:style-name="P149"><text:span text:style-name="T260">↓ </text:span><text:span text:style-name="T260">Grafana (dashboards, alerting)</text:span></text:p>
            <text:p text:style-name="P149"><text:span text:style-name="T263">JMX Exporter — configuration Docker</text:span></text:p>
            <text:p text:style-name="P149"><text:span text:style-name="T271">environment: </text:span></text:p>
            <text:p text:style-name="P149"><text:span text:style-name="T260">KAFKA_JMX_PORT: 9999 </text:span></text:p>
            <text:p text:style-name="P149"><text:span text:style-name="T271">KAFKA_OPTS: "-javaagent:/opt/jmx-exporter.jar=8080:/etc/kafka/jmx-config.yml"</text:span></text:p>
            <text:p text:style-name="P149"><text:span text:style-name="T263">Dashboards Grafana communautaires</text:span></text:p>
            <text:p text:style-name="P149"><text:span text:style-name="T267">Dashboard officiel Confluent : </text:span><text:span text:style-name="T272">grafana.com/grafana/dashboards/7589</text:span></text:p>
            <text:p text:style-name="P149"><text:span text:style-name="T273">Dashboard général Kafka : </text:span><text:span text:style-name="T274">grafana.com/grafana/dashboards/721</text:span></text:p>
            <text:p text:style-name="P149"><text:span text:style-name="T263">Avantages</text:span></text:p>
            <text:p text:style-name="P149"><text:span text:style-name="T260">– </text:span><text:span text:style-name="T260">Rétention long terme, requêtes PromQL puissantes</text:span></text:p>
            <text:p text:style-name="P149"><text:span text:style-name="T260">– </text:span><text:span text:style-name="T260">Alerting via Alertmanager (PagerDuty, Slack, email)</text:span></text:p>
            <text:p text:style-name="P149"><text:span text:style-name="T260">– </text:span><text:span text:style-name="T260">Intégration avec toute l'infra (pas seulement Kafka)</text:span></text:p>
          </draw:text-box>
        </draw:frame>
        <draw:frame draw:name="Image 2" draw:style-name="gr23" draw:text-style-name="P67" draw:layer="layout" svg:width="5.927cm" svg:height="9.596cm" svg:x="20.98cm" svg:y="6.588cm">
          <draw:image xlink:href="Pictures/10000001000001FD00000338D9B9BD2F.png" xlink:type="simple" xlink:show="embed" xlink:actuate="onLoad" draw:mime-type="image/png">
            <text:p/>
          </draw:image>
        </draw:frame>
        <presentation:notes draw:style-name="dp6">
          <office:forms form:automatic-focus="false" form:apply-design-mode="false"/>
          <draw:page-thumbnail draw:name="Espace réservé de l'image des diapositives 18" draw:style-name="gr2" draw:layer="layout" svg:width="15.535cm" svg:height="10.984cm" svg:x="2.655cm" svg:y="2.258cm" draw:page-number="261" presentation:class="page"/>
          <draw:frame draw:name="Espace réservé des notes 21" presentation:style-name="pr173" draw:text-style-name="P47" draw:layer="layout" svg:width="14.362cm" svg:height="11.253cm" svg:x="3.25cm" svg:y="14.128cm" presentation:class="notes" presentation:placeholder="true" presentation:user-transformed="true">
            <draw:text-box/>
          </draw:frame>
        </presentation:notes>
      </draw:page>
      <draw:page draw:name="Autres outils" draw:style-name="dp6" draw:master-page-name="Vide_5f_">
        <office:forms form:automatic-focus="false" form:apply-design-mode="false"/>
        <draw:frame draw:name="Titre 22" presentation:style-name="pr41" draw:text-style-name="P48" draw:layer="layout" svg:width="23.499cm" svg:height="3.574cm" svg:x="3.033cm" svg:y="2.367cm" presentation:class="title" presentation:user-transformed="true">
          <draw:text-box>
            <text:p text:style-name="P144"><text:span text:style-name="T252">Autres outils</text:span></text:p>
          </draw:text-box>
        </draw:frame>
        <draw:frame draw:name="Espace réservé du texte 19" presentation:style-name="pr42" draw:text-style-name="P52" draw:layer="layout" svg:width="23.499cm" svg:height="12.18cm" svg:x="3.033cm" svg:y="6.283cm" presentation:class="outline" presentation:user-transformed="true">
          <draw:text-box>
            <text:p text:style-name="P149"><text:span text:style-name="T251">Interface web intégrée dans Confluent Platform — port 9021. </text:span><text:span text:style-name="T251">Il couvre</text:span></text:p>
            <text:p text:style-name="P149"><text:span text:style-name="T253">Cluster</text:span><text:span text:style-name="T251"> : brokers, topics, partitions, réplication, leaders</text:span></text:p>
            <text:p text:style-name="P149"><text:span text:style-name="T275">Consumer Groups </text:span><text:span text:style-name="T251">: lag par groupe et par partition en </text:span><text:span text:style-name="T251">temps réel</text:span></text:p>
            <text:p text:style-name="P149"><text:span text:style-name="T275">Schema Registry </text:span><text:span text:style-name="T251">: schemas, versions, compatibilité</text:span></text:p>
            <text:p text:style-name="P149"><text:span text:style-name="T275">Kafka Connect </text:span><text:span text:style-name="T251">: état des connecteurs, tasks, erreurs</text:span></text:p>
            <text:p text:style-name="P149"><text:span text:style-name="T275">ksqlDB</text:span><text:span text:style-name="T251"> : requêtes persistantes, statut</text:span></text:p>
            <text:p text:style-name="P149"><text:span text:style-name="T275">Alerting</text:span><text:span text:style-name="T251"> : seuils configurables sur n'importe quelle métrique</text:span></text:p>
            <text:p text:style-name="P149"><text:span text:style-name="T251"/></text:p>
            <text:p text:style-name="P149"><text:span text:style-name="T251">Limites</text:span></text:p>
            <text:p text:style-name="P149"><text:span text:style-name="T251">– </text:span><text:span text:style-name="T251">Rétention courte par défaut (quelques heures à quelques </text:span><text:span text:style-name="T251">jours)</text:span></text:p>
            <text:p text:style-name="P149"><text:span text:style-name="T251">– </text:span><text:span text:style-name="T251">Pas de requêtes ad hoc sur les métriques historiques</text:span></text:p>
            <text:p text:style-name="P149"><text:span text:style-name="T251">– </text:span><text:span text:style-name="T251">Uniquement Confluent Platform (pas Apache Kafka </text:span><text:span text:style-name="T251">community)</text:span></text:p>
            <text:p text:style-name="P149"><text:span text:style-name="T251">Idéal pour l'opérationnel temps réel — complémentaire de </text:span><text:span text:style-name="T251">Prometheus/Grafana pour l'historique.</text:span></text:p>
          </draw:text-box>
        </draw:frame>
        <draw:custom-shape draw:name="ZoneTexte 2" draw:style-name="gr283" draw:text-style-name="P151" draw:layer="layout" svg:width="19.388cm" svg:height="1.214cm" svg:x="1.612cm" svg:y="19.4cm">
          <text:p text:style-name="P150"><text:span text:style-name="T276">Atelier 10.2 : Monitoring JMX et Promeheus/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Espace réservé de l'image des diapositives 19" draw:style-name="gr2" draw:layer="layout" svg:width="15.535cm" svg:height="10.984cm" svg:x="2.655cm" svg:y="2.258cm" draw:page-number="262" presentation:class="page"/>
          <draw:frame draw:name="Espace réservé des notes 22" presentation:style-name="pr174" draw:text-style-name="P47" draw:layer="layout" svg:width="14.362cm" svg:height="11.253cm" svg:x="3.25cm" svg:y="14.128cm" presentation:class="notes" presentation:placeholder="true" presentation:user-transformed="true">
            <draw:text-box/>
          </draw:frame>
        </presentation:notes>
      </draw:page>
      <draw:page draw:name="page263"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175" draw:text-style-name="P13" draw:layer="layout" svg:width="23.499cm" svg:height="12.18cm" svg:x="3.033cm" svg:y="6.283cm" presentation:class="subtitle">
          <draw:text-box>
            <text:p><text:span text:style-name="T46">Apache Zookeeper</text:span></text:p>
            <text:p>Contrôleur et Zookeeper</text:p>
            <text:p text:style-name="P152">SASL SCRAM</text:p>
            <text:p text:style-name="P152">Dimensionnement ZooKeeper</text:p>
          </draw:text-box>
        </draw:frame>
        <presentation:notes draw:style-name="dp5">
          <draw:page-thumbnail draw:style-name="gr2" draw:layer="layout" svg:width="15.597cm" svg:height="10.985cm" svg:x="2.623cm" svg:y="2.258cm" draw:page-number="263" presentation:class="page"/>
          <draw:frame presentation:style-name="pr6" draw:text-style-name="P13" draw:layer="layout" svg:width="14.362cm" svg:height="11.254cm" svg:x="3.25cm" svg:y="14.128cm" presentation:class="notes" presentation:placeholder="true">
            <draw:text-box/>
          </draw:frame>
        </presentation:notes>
      </draw:page>
      <draw:page draw:name="page2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et Zookeeper</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4.103cm" svg:height="12.276cm" svg:x="3.6cm" svg:y="7.4cm">
          <draw:image xlink:href="Pictures/100000010000038F000001D048BCFD06.png" xlink:type="simple" xlink:show="embed" xlink:actuate="onLoad" draw:mime-type="image/png">
            <text:p/>
          </draw:image>
        </draw:frame>
        <presentation:notes draw:style-name="dp5">
          <draw:page-thumbnail draw:style-name="gr2" draw:layer="layout" svg:width="15.597cm" svg:height="10.985cm" svg:x="2.623cm" svg:y="2.258cm" draw:page-number="264" presentation:class="page"/>
          <draw:frame presentation:style-name="pr6" draw:text-style-name="P13" draw:layer="layout" svg:width="14.362cm" svg:height="11.254cm" svg:x="3.25cm" svg:y="14.128cm" presentation:class="notes" presentation:placeholder="true">
            <draw:text-box/>
          </draw:frame>
        </presentation:notes>
      </draw:page>
      <draw:page draw:name="page265"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Zookeeper<text:line-break/>Principes</text:p>
          </draw:text-box>
        </draw:frame>
        <draw:frame presentation:style-name="pr5" draw:layer="layout" svg:width="23.499cm" svg:height="12.938cm" svg:x="3.033cm" svg:y="6.283cm" presentation:class="outline" presentation:user-transformed="true">
          <draw:text-box>
            <text:list text:style-name="L2">
              <text:list-item>
                <text:p>“<text:span text:style-name="T14">High-performance coordination service for distributed </text:span><text:span text:style-name="T14">applications</text:span>”</text:p>
              </text:list-item>
              <text:list-item>
                <text:p>Utilisé par Kafka pour la gestion de configuration <text:s/>et la synchronisation</text:p>
              </text:list-item>
              <text:list-item>
                <text:p>Stocke les méta-données du cluster Kafka </text:p>
              </text:list-item>
              <text:list-item>
                <text:p>Répliqué sur plusieurs hôtes formant un <text:span text:style-name="T14">ensemble</text:span></text:p>
              </text:list-item>
              <text:list-item>
                <text:p>Fournit un espace de noms hiérarchiques</text:p>
              </text:list-item>
              <text:list-item>
                <text:p>Exemples de nœuds pour Kafka :</text:p>
                <text:list>
                  <text:list-item>
                    <text:p><text:span text:style-name="T277">/controller</text:span></text:p>
                  </text:list-item>
                  <text:list-item>
                    <text:p><text:span text:style-name="T277">/brokers/topics/</text:span></text:p>
                  </text:list-item>
                  <text:list-item>
                    <text:p><text:span text:style-name="T277">/config</text:span></text:p>
                  </text:list-item>
                </text:list>
              </text:list-item>
            </text:list>
          </draw:text-box>
        </draw:frame>
        <draw:frame draw:style-name="gr9" draw:text-style-name="P23" draw:layer="layout" svg:width="9.047cm" svg:height="6.249cm" svg:x="20.181cm" svg:y="13.284cm">
          <draw:image xlink:href="Pictures/100000010000024600000192222575E2.png" xlink:type="simple" xlink:show="embed" xlink:actuate="onLoad" draw:mime-type="image/png">
            <text:p/>
          </draw:image>
        </draw:frame>
        <presentation:notes draw:style-name="dp5">
          <draw:page-thumbnail draw:style-name="gr2" draw:layer="layout" svg:width="15.597cm" svg:height="10.985cm" svg:x="2.623cm" svg:y="2.258cm" draw:page-number="265" presentation:class="page"/>
          <draw:frame presentation:style-name="pr6" draw:text-style-name="P13" draw:layer="layout" svg:width="14.362cm" svg:height="11.254cm" svg:x="3.25cm" svg:y="14.128cm" presentation:class="notes" presentation:placeholder="true">
            <draw:text-box/>
          </draw:frame>
        </presentation:notes>
      </draw:page>
      <draw:page draw:name="page2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ocabulaire Zookeeper</text:p>
          </draw:text-box>
        </draw:frame>
        <draw:frame presentation:style-name="pr5" draw:layer="layout" svg:width="23.499cm" svg:height="12.18cm" svg:x="3.033cm" svg:y="6.283cm" presentation:class="outline" presentation:user-transformed="true">
          <draw:text-box>
            <text:list text:style-name="L2">
              <text:list-item>
                <text:p><text:span text:style-name="T278">Nœud (zNode)</text:span> : Donnée identifiée par un chemin </text:p>
              </text:list-item>
              <text:list-item>
                <text:p><text:span text:style-name="T278">Client</text:span> : Utilisateur du service Zookeeper </text:p>
              </text:list-item>
              <text:list-item>
                <text:p><text:span text:style-name="T278">Session</text:span> : Établie entre le client et le service Zookeeper</text:p>
              </text:list-item>
              <text:list-item>
                <text:p><text:span text:style-name="T278">Noeud</text:span> <text:span text:style-name="T278">éphémère</text:span> : le nœud existe aussi longtemps que la session qui l’a créé est active</text:p>
              </text:list-item>
              <text:list-item>
                <text:p><text:span text:style-name="T278">Watch</text:span> :</text:p>
                <text:list>
                  <text:list-item>
                    <text:p>Déclenché et supprimé lorsque le nœud change</text:p>
                  </text:list-item>
                  <text:list-item>
                    <text:p>Clients peuvent positionné un watch sur un nœud <text:span text:style-name="T14">znode</text:span></text:p>
                  </text:list-item>
                </text:list>
              </text:list-item>
            </text:list>
          </draw:text-box>
        </draw:frame>
        <presentation:notes draw:style-name="dp5">
          <draw:page-thumbnail draw:style-name="gr2" draw:layer="layout" svg:width="15.597cm" svg:height="10.985cm" svg:x="2.623cm" svg:y="2.258cm" draw:page-number="266" presentation:class="page"/>
          <draw:frame presentation:style-name="pr6" draw:text-style-name="P13" draw:layer="layout" svg:width="14.362cm" svg:height="11.254cm" svg:x="3.25cm" svg:y="14.128cm" presentation:class="notes" presentation:placeholder="true">
            <draw:text-box/>
          </draw:frame>
        </presentation:notes>
      </draw:page>
      <draw:page draw:name="page267"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text:span text:style-name="T14">Zookeeper</text:span><text:span text:style-name="T14"><text:line-break/></text:span><text:span text:style-name="T21">Distribu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4">Kafka contient des scripts permettant de démarrer une instance de </text:span><text:span text:style-name="T4">Zookeeper mais il est préférable d’installer une version complète à </text:span><text:span text:style-name="T4">partir de la distribution officielle de </text:span><text:span text:style-name="T106">Zookeeper</text:span></text:p>
              </text:list-item>
              <text:list-item>
                <text:p><text:span text:style-name="T106"/></text:p>
              </text:list-item>
              <text:list-item>
                <text:p><text:span text:style-name="T106">https://zookeeper.apache.org/</text:span></text:p>
              </text:list-item>
              <text:list-item>
                <text:p><text:span text:style-name="T279"/></text:p>
              </text:list-item>
              <text:list-item>
                <text:p text:style-name="P98"><text:span text:style-name="T172"/></text:p>
              </text:list-item>
            </text:list>
          </draw:text-box>
        </draw:frame>
        <presentation:notes draw:style-name="dp5">
          <draw:page-thumbnail draw:style-name="gr2" draw:layer="layout" svg:width="15.597cm" svg:height="10.985cm" svg:x="2.623cm" svg:y="2.258cm" draw:page-number="267" presentation:class="page"/>
          <draw:frame presentation:style-name="pr6" draw:text-style-name="P13" draw:layer="layout" svg:width="14.362cm" svg:height="11.254cm" svg:x="3.25cm" svg:y="14.128cm" presentation:class="notes" presentation:placeholder="true">
            <draw:text-box/>
          </draw:frame>
        </presentation:notes>
      </draw:page>
      <draw:page draw:name="page268"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Exemple installation standalone</text:p>
          </draw:text-box>
        </draw:frame>
        <draw:frame presentation:style-name="pr5" draw:layer="layout" svg:width="23.499cm" svg:height="12.18cm" svg:x="3.033cm" svg:y="6.283cm" presentation:class="outline" presentation:user-transformed="true">
          <draw:text-box>
            <text:list text:style-name="L2">
              <text:list-item>
                <text:p text:style-name="P118"><text:span text:style-name="T172"># tar -zxf zookeeper-3.4.6.tar.gz</text:span></text:p>
              </text:list-item>
              <text:list-item>
                <text:p text:style-name="P118"><text:span text:style-name="T172"># mv zookeeper-3.4.6 /usr/local/zookeeper</text:span></text:p>
              </text:list-item>
              <text:list-item>
                <text:p text:style-name="P118"><text:span text:style-name="T172"># mkdir -p /var/lib/zookeeper</text:span></text:p>
              </text:list-item>
              <text:list-item>
                <text:p text:style-name="P118"><text:span text:style-name="T172"># cat &gt; /usr/local/zookeeper/conf/zoo.cfg &lt;&lt; EOF</text:span></text:p>
              </text:list-item>
              <text:list-item>
                <text:p text:style-name="P118"><text:span text:style-name="T172">&gt; tickTime=2000</text:span></text:p>
              </text:list-item>
              <text:list-item>
                <text:p text:style-name="P118"><text:span text:style-name="T172">&gt; dataDir=/var/lib/zookeeper</text:span></text:p>
              </text:list-item>
              <text:list-item>
                <text:p text:style-name="P118"><text:span text:style-name="T172">&gt; clientPort=2181</text:span></text:p>
              </text:list-item>
              <text:list-item>
                <text:p text:style-name="P118"><text:span text:style-name="T172">&gt; EOF</text:span></text:p>
              </text:list-item>
              <text:list-item>
                <text:p text:style-name="P118"><text:span text:style-name="T172"># export JAVA_HOME=/usr/java/jdk1.8.0_51</text:span></text:p>
              </text:list-item>
              <text:list-item>
                <text:p text:style-name="P98"><text:span text:style-name="T280"># /usr/local/zookeeper/bin/zkServer.sh start</text:span></text:p>
              </text:list-item>
              <text:list-item>
                <text:p text:style-name="P118"><text:span text:style-name="T172">JMX enabled by default</text:span></text:p>
              </text:list-item>
              <text:list-item>
                <text:p text:style-name="P118"><text:span text:style-name="T172">Using config: /usr/local/zookeeper/bin/../conf/zoo.cfg</text:span></text:p>
              </text:list-item>
              <text:list-item>
                <text:p text:style-name="P118"><text:span text:style-name="T172">Starting zookeeper ... STARTED</text:span></text:p>
              </text:list-item>
              <text:list-item>
                <text:p><text:span text:style-name="T172">#</text:span></text:p>
              </text:list-item>
            </text:list>
          </draw:text-box>
        </draw:frame>
        <presentation:notes draw:style-name="dp5">
          <draw:page-thumbnail draw:style-name="gr2" draw:layer="layout" svg:width="15.597cm" svg:height="10.985cm" svg:x="2.623cm" svg:y="2.258cm" draw:page-number="268" presentation:class="page"/>
          <draw:frame presentation:style-name="pr6" draw:text-style-name="P13" draw:layer="layout" svg:width="14.362cm" svg:height="11.254cm" svg:x="3.25cm" svg:y="14.128cm" presentation:class="notes" presentation:placeholder="true">
            <draw:text-box/>
          </draw:frame>
        </presentation:notes>
      </draw:page>
      <draw:page draw:name="page2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érification Zookeeper</text:p>
          </draw:text-box>
        </draw:frame>
        <draw:frame presentation:style-name="pr5" draw:text-style-name="P106" draw:layer="layout" svg:width="23.499cm" svg:height="12.18cm" svg:x="3.033cm" svg:y="6.283cm" presentation:class="outline" presentation:user-transformed="true">
          <draw:text-box>
            <text:list text:style-name="L2">
              <text:list-item>
                <text:p text:style-name="P98"><text:span text:style-name="T180"># </text:span><text:span text:style-name="T281">telnet localhost 2181</text:span></text:p>
              </text:list-item>
              <text:list-item>
                <text:p text:style-name="P98"><text:span text:style-name="T180">Trying ::1...</text:span></text:p>
              </text:list-item>
              <text:list-item>
                <text:p text:style-name="P98"><text:span text:style-name="T180">Connected to localhost.</text:span></text:p>
              </text:list-item>
              <text:list-item>
                <text:p text:style-name="P98"><text:span text:style-name="T180">Escape character is '^]'.</text:span></text:p>
              </text:list-item>
              <text:list-item>
                <text:p text:style-name="P98"><text:span text:style-name="T281">srvr</text:span></text:p>
              </text:list-item>
              <text:list-item>
                <text:p text:style-name="P98"><text:span text:style-name="T180">Zookeeper version: 3.4.6-1569965, built on </text:span><text:span text:style-name="T180">02/20/2014 09:09 GMT</text:span></text:p>
              </text:list-item>
              <text:list-item>
                <text:p text:style-name="P98"><text:span text:style-name="T180">Latency min/avg/max: 0/0/0</text:span></text:p>
              </text:list-item>
              <text:list-item>
                <text:p text:style-name="P98"><text:span text:style-name="T180">Received: 1</text:span></text:p>
              </text:list-item>
              <text:list-item>
                <text:p text:style-name="P98"><text:span text:style-name="T180">Sent: 0</text:span></text:p>
              </text:list-item>
              <text:list-item>
                <text:p text:style-name="P98"><text:span text:style-name="T180">Connections: 1</text:span></text:p>
              </text:list-item>
              <text:list-item>
                <text:p text:style-name="P98"><text:span text:style-name="T180">Outstanding: 0</text:span></text:p>
              </text:list-item>
              <text:list-item>
                <text:p text:style-name="P98"><text:span text:style-name="T180">Zxid: 0x0</text:span></text:p>
              </text:list-item>
              <text:list-item>
                <text:p text:style-name="P98"><text:span text:style-name="T180">Mode: standalone</text:span></text:p>
              </text:list-item>
              <text:list-item>
                <text:p text:style-name="P98"><text:span text:style-name="T180">Node count: 4</text:span></text:p>
              </text:list-item>
              <text:list-item>
                <text:p text:style-name="P98"><text:span text:style-name="T180">Connection closed by foreign host.</text:span></text:p>
              </text:list-item>
              <text:list-item>
                <text:p text:style-name="P98"><text:span text:style-name="T180">#</text:span></text:p>
              </text:list-item>
            </text:list>
          </draw:text-box>
        </draw:frame>
        <presentation:notes draw:style-name="dp5">
          <draw:page-thumbnail draw:style-name="gr2" draw:layer="layout" svg:width="15.597cm" svg:height="10.985cm" svg:x="2.623cm" svg:y="2.258cm" draw:page-number="269" presentation:class="page"/>
          <draw:frame presentation:style-name="pr6" draw:text-style-name="P13" draw:layer="layout" svg:width="14.362cm" svg:height="11.254cm" svg:x="3.25cm" svg:y="14.128cm" presentation:class="notes" presentation:placeholder="true">
            <draw:text-box/>
          </draw:frame>
        </presentation:notes>
      </draw:page>
      <draw:page draw:name="page2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semble Zookeeper</text:p>
          </draw:text-box>
        </draw:frame>
        <draw:frame presentation:style-name="pr5" draw:layer="layout" svg:width="23.499cm" svg:height="12.18cm" svg:x="3.033cm" svg:y="6.283cm" presentation:class="outline">
          <draw:text-box>
            <text:list text:style-name="L2">
              <text:list-item>
                <text:p>Un cluster Zookeeper est appelé un <text:span text:style-name="T45">ensemble</text:span></text:p>
              </text:list-item>
              <text:list-item>
                <text:p>Une instance est élue comme <text:span text:style-name="T37">leader</text:span></text:p>
              </text:list-item>
              <text:list-item>
                <text:p>L’ensemble contient un nombre impair d’instances (algorithme de consensus basé sur la notion de quorum). </text:p>
                <text:list>
                  <text:list-item>
                    <text:p>Le nombre dépend du niveau de tolérance aux pannes voulu :</text:p>
                    <text:list>
                      <text:list-item>
                        <text:p>3 nœuds =&gt; 1 défaillance</text:p>
                      </text:list-item>
                      <text:list-item>
                        <text:p>5 nœuds =&gt; 2 défaillances</text:p>
                      </text:list-item>
                    </text:list>
                  </text:list-item>
                </text:list>
              </text:list-item>
              <text:list-item>
                <text:p>Les clients peuvent s’adresser à n’importe quelle instance pour lire/écrire les données</text:p>
              </text:list-item>
              <text:list-item>
                <text:p>Lors d’une écriture, le <text:span text:style-name="T14">leader</text:span> coordonne les écritures sur les <text:span text:style-name="T14">followers</text:span></text:p>
              </text:list-item>
            </text:list>
          </draw:text-box>
        </draw:frame>
        <presentation:notes draw:style-name="dp5">
          <draw:page-thumbnail draw:style-name="gr2" draw:layer="layout" svg:width="15.597cm" svg:height="10.985cm" svg:x="2.623cm" svg:y="2.258cm" draw:page-number="270" presentation:class="page"/>
          <draw:frame presentation:style-name="pr6" draw:text-style-name="P13" draw:layer="layout" svg:width="14.362cm" svg:height="11.254cm" svg:x="3.25cm" svg:y="14.128cm" presentation:class="notes" presentation:placeholder="true">
            <draw:text-box/>
          </draw:frame>
        </presentation:notes>
      </draw:page>
      <draw:page draw:name="page271"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 <text:span text:style-name="T14">ZooKeeper</text:span></text:p>
          </draw:text-box>
        </draw:frame>
        <draw:frame presentation:style-name="pr5" draw:layer="layout" svg:width="23.499cm" svg:height="12.18cm" svg:x="3.033cm" svg:y="6.283cm" presentation:class="outline" presentation:placeholder="true">
          <draw:text-box/>
        </draw:frame>
        <draw:frame draw:style-name="gr284" draw:text-style-name="P21" draw:layer="layout" svg:width="14.6cm" svg:height="11.266cm" svg:x="7cm" svg:y="6.6cm">
          <draw:image xlink:href="Pictures/1000000100000258000001CFDA410BBD.png" xlink:type="simple" xlink:show="embed" xlink:actuate="onLoad" draw:mime-type="image/png">
            <text:p/>
          </draw:image>
        </draw:frame>
        <presentation:notes draw:style-name="dp4">
          <draw:page-thumbnail draw:style-name="gr2" draw:layer="layout" svg:width="15.597cm" svg:height="10.985cm" svg:x="2.623cm" svg:y="2.258cm" draw:page-number="271" presentation:class="page"/>
          <draw:frame presentation:style-name="pr6" draw:text-style-name="P13" draw:layer="layout" svg:width="14.362cm" svg:height="11.254cm" svg:x="3.25cm" svg:y="14.128cm" presentation:class="notes" presentation:placeholder="true">
            <draw:text-box/>
          </draw:frame>
        </presentation:notes>
      </draw:page>
      <draw:page draw:name="page2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s de config</text:p>
          </draw:text-box>
        </draw:frame>
        <draw:frame presentation:style-name="pr5" draw:layer="layout" svg:width="23.499cm" svg:height="12.18cm" svg:x="3.033cm" svg:y="6.283cm" presentation:class="outline" presentation:user-transformed="true">
          <draw:text-box>
            <text:list text:style-name="L2">
              <text:list-item>
                <text:p><text:span text:style-name="T36">tickTime : </text:span>L’unité<text:span text:style-name="T36"> </text:span>de temps en ms</text:p>
              </text:list-item>
              <text:list-item>
                <text:p><text:span text:style-name="T36">initLimit </text:span>: nombre de tick autorisé pour la connexion des suiveurs au leader</text:p>
              </text:list-item>
              <text:list-item>
                <text:p><text:span text:style-name="T36">syncLimit </text:span>: nombre de tick autorisé pour la synchronisation suiveur/leader</text:p>
              </text:list-item>
              <text:list-item>
                <text:p><text:span text:style-name="T36">dataDir</text:span> : Répertoire de stockage des données</text:p>
              </text:list-item>
              <text:list-item>
                <text:p><text:span text:style-name="T36">clientPort</text:span> : Port utilisé par les clients</text:p>
              </text:list-item>
              <text:list-item>
                <text:p>La configuration répertorie également chaque sous la forme :<text:line-break/> <text:span text:style-name="T14">server.X = nom d'hôte: peerPort: leaderPort</text:span></text:p>
                <text:list>
                  <text:list-item>
                    <text:p><text:span text:style-name="T36">X</text:span> : numéro d'identification du serveur.</text:p>
                  </text:list-item>
                  <text:list-item>
                    <text:p><text:span text:style-name="T36">nom</text:span> <text:span text:style-name="T36">d'hôte</text:span> : IP</text:p>
                  </text:list-item>
                  <text:list-item>
                    <text:p><text:span text:style-name="T36">peerPort</text:span> : Port TCP pour communication entre serveurs </text:p>
                  </text:list-item>
                  <text:list-item>
                    <text:p><text:span text:style-name="T36">leaderPort</text:span> : Port TCP pour l’élection.</text:p>
                  </text:list-item>
                </text:list>
              </text:list-item>
            </text:list>
            <text:p/>
            <text:p>Optionnel : </text:p>
            <text:p><text:span text:style-name="T36">4lw.commands.whitelist</text:span> : Les commandes d’administration autorisées </text:p>
          </draw:text-box>
        </draw:frame>
        <presentation:notes draw:style-name="dp5">
          <draw:page-thumbnail draw:style-name="gr2" draw:layer="layout" svg:width="15.597cm" svg:height="10.985cm" svg:x="2.623cm" svg:y="2.258cm" draw:page-number="272" presentation:class="page"/>
          <draw:frame presentation:style-name="pr6" draw:text-style-name="P18" draw:layer="layout" svg:width="14.362cm" svg:height="11.254cm" svg:x="3.25cm" svg:y="14.128cm" presentation:class="notes" presentation:placeholder="true">
            <draw:text-box/>
          </draw:frame>
        </presentation:notes>
      </draw:page>
      <draw:page draw:name="page2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n ensemble</text:p>
          </draw:text-box>
        </draw:frame>
        <draw:frame presentation:style-name="pr5" draw:layer="layout" svg:width="23.499cm" svg:height="12.18cm" svg:x="3.033cm" svg:y="6.283cm" presentation:class="outline" presentation:user-transformed="true">
          <draw:text-box>
            <text:list text:style-name="L2">
              <text:list-item>
                <text:p>Les serveurs doivent partager une configuration commune listant les serveurs et chaque serveur doit contenir un fichier <text:span text:style-name="T37">myid</text:span> dans son répertoire de données contenant son identifiant</text:p>
              </text:list-item>
              <text:list-item>
                <text:p/>
              </text:list-item>
              <text:list-item>
                <text:p>Exemple de config :</text:p>
              </text:list-item>
              <text:list-item>
                <text:p text:style-name="P98"><text:span text:style-name="T282">tickTime=2000</text:span></text:p>
              </text:list-item>
              <text:list-item>
                <text:p text:style-name="P98"><text:span text:style-name="T282">dataDir=/var/lib/zookeeper</text:span></text:p>
              </text:list-item>
              <text:list-item>
                <text:p text:style-name="P98"><text:span text:style-name="T282">clientPort=2181</text:span></text:p>
              </text:list-item>
              <text:list-item>
                <text:p text:style-name="P98"><text:span text:style-name="T282">initLimit=20</text:span></text:p>
              </text:list-item>
              <text:list-item>
                <text:p text:style-name="P98"><text:span text:style-name="T282">syncLimit=5</text:span></text:p>
              </text:list-item>
              <text:list-item>
                <text:p text:style-name="P98"><text:span text:style-name="T282">server.1=zoo1.example.com:2888:3888</text:span></text:p>
              </text:list-item>
              <text:list-item>
                <text:p text:style-name="P98"><text:span text:style-name="T282">server.2=zoo2.example.com:2888:3888</text:span></text:p>
              </text:list-item>
              <text:list-item>
                <text:p text:style-name="P98"><text:span text:style-name="T282">server.3=zoo3.example.com:2888:3888</text:span></text:p>
              </text:list-item>
            </text:list>
          </draw:text-box>
        </draw:frame>
        <presentation:notes draw:style-name="dp5">
          <draw:page-thumbnail draw:style-name="gr2" draw:layer="layout" svg:width="15.597cm" svg:height="10.985cm" svg:x="2.623cm" svg:y="2.258cm" draw:page-number="273" presentation:class="page"/>
          <draw:frame presentation:style-name="pr6" draw:text-style-name="P13" draw:layer="layout" svg:width="14.362cm" svg:height="11.254cm" svg:x="3.25cm" svg:y="14.128cm" presentation:class="notes" presentation:placeholder="true">
            <draw:text-box/>
          </draw:frame>
        </presentation:notes>
      </draw:page>
      <draw:page draw:name="page274"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Vérifications Ensemble Zookeeper</text:p>
          </draw:text-box>
        </draw:frame>
        <draw:frame presentation:style-name="pr5" draw:layer="layout" svg:width="23.499cm" svg:height="12.18cm" svg:x="3.033cm" svg:y="6.283cm" presentation:class="outline">
          <draw:text-box>
            <text:list text:style-name="L2">
              <text:list-item>
                <text:p>Se connecter à une instance :</text:p>
              </text:list-item>
              <text:list-item>
                <text:p><text:span text:style-name="T95">./zkCli.sh -server 127.0.0.1:2181</text:span></text:p>
              </text:list-item>
              <text:list-item>
                <text:p>Voir le mode (leader ou suiveur) d’une instance <text:line-break/><text:span text:style-name="T4">si la commande </text:span><text:span text:style-name="T106">stat</text:span><text:span text:style-name="T4"> est autorisée</text:span> </text:p>
              </text:list-item>
              <text:list-item>
                <text:p><text:span text:style-name="T209">echo stat | nc localhost 2181 | grep Mode</text:span></text:p>
              </text:list-item>
              <text:list-item>
                <text:p/>
              </text:list-item>
            </text:list>
          </draw:text-box>
        </draw:frame>
        <presentation:notes draw:style-name="dp5">
          <draw:page-thumbnail draw:style-name="gr2" draw:layer="layout" svg:width="15.597cm" svg:height="10.985cm" svg:x="2.623cm" svg:y="2.258cm" draw:page-number="274" presentation:class="page"/>
          <draw:frame presentation:style-name="pr6" draw:text-style-name="P13" draw:layer="layout" svg:width="14.362cm" svg:height="11.254cm" svg:x="3.25cm" svg:y="14.128cm" presentation:class="notes" presentation:placeholder="true">
            <draw:text-box/>
          </draw:frame>
        </presentation:notes>
      </draw:page>
      <draw:page draw:name="page2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Quelques commandes</text:p>
          </draw:text-box>
        </draw:frame>
        <draw:frame presentation:style-name="pr5" draw:text-style-name="P153" draw:layer="layout" svg:width="23.499cm" svg:height="12.18cm" svg:x="3.033cm" svg:y="6.283cm" presentation:class="outline">
          <draw:text-box>
            <text:list text:style-name="L2">
              <text:list-item>
                <text:p text:style-name="P153"><text:span text:style-name="T283">ls [path] </text:span><text:span text:style-name="T4">: Lister un </text:span><text:span text:style-name="T106">zNode</text:span></text:p>
              </text:list-item>
              <text:list-item>
                <text:p text:style-name="P153"><text:span text:style-name="T283">create [zNode]</text:span><text:span text:style-name="T4"> : Créer un nœud</text:span></text:p>
              </text:list-item>
              <text:list-item>
                <text:p text:style-name="P153"><text:span text:style-name="T283">delete/deleteall</text:span><text:span text:style-name="T4"> : Suppression (récursive) d’un nœud</text:span></text:p>
              </text:list-item>
              <text:list-item>
                <text:p text:style-name="P153"><text:span text:style-name="T283">get/set [zNode] </text:span><text:span text:style-name="T4">: Lire/écrire la valeur du nœud</text:span></text:p>
              </text:list-item>
              <text:list-item>
                <text:p text:style-name="P153"><text:span text:style-name="T283">history</text:span><text:span text:style-name="T4"> : Historique des commandes</text:span></text:p>
              </text:list-item>
              <text:list-item>
                <text:p text:style-name="P153"><text:span text:style-name="T283">quit</text:span><text:span text:style-name="T4"> : Quitter </text:span><text:span text:style-name="T106">zkCli</text:span></text:p>
              </text:list-item>
            </text:list>
          </draw:text-box>
        </draw:frame>
        <draw:frame draw:style-name="gr285" draw:text-style-name="P59" draw:layer="layout" svg:width="10.971cm" svg:height="1.216cm" svg:x="1.601cm" svg:y="19.4cm">
          <draw:text-box>
            <text:p><text:span text:style-name="T94">TP 1.1 : Ensemble ZooKeeper</text:span></text:p>
          </draw:text-box>
        </draw:frame>
        <presentation:notes draw:style-name="dp5">
          <draw:page-thumbnail draw:style-name="gr2" draw:layer="layout" svg:width="15.597cm" svg:height="10.985cm" svg:x="2.623cm" svg:y="2.258cm" draw:page-number="275" presentation:class="page"/>
          <draw:frame presentation:style-name="pr6" draw:text-style-name="P13" draw:layer="layout" svg:width="14.362cm" svg:height="11.254cm" svg:x="3.25cm" svg:y="14.128cm" presentation:class="notes" presentation:placeholder="true">
            <draw:text-box/>
          </draw:frame>
        </presentation:notes>
      </draw:page>
      <draw:page draw:name="page276"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Installation</text:span></text:p>
              </text:list-header>
            </text:list>
          </draw:text-box>
        </draw:frame>
        <draw:frame presentation:style-name="pr176"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3"/></text:p>
              </text:list-item>
              <text:list-item>
                <text:p text:style-name="P3"><text:span text:style-name="T13">Pré-requis et ensemble </text:span><text:span text:style-name="T51">Zookeeper</text:span><text:span text:style-name="T13"> </text:span></text:p>
              </text:list-item>
              <text:list-item>
                <text:p text:style-name="P3"><text:span text:style-name="T13">Broker </text:span><text:span text:style-name="T51">Kafka</text:span></text:p>
              </text:list-item>
              <text:list-item>
                <text:p text:style-name="P3"><text:span text:style-name="T284">Utilitaires</text:span><text:span text:style-name="T285"> </text:span><text:span text:style-name="T51">Kafka</text:span></text:p>
              </text:list-item>
              <text:list-item>
                <text:p text:style-name="P19"><text:span text:style-name="T12">Cluster </text:span><text:span text:style-name="T286">Kafka</text:span></text:p>
              </text:list-item>
              <text:list-item>
                <text:p text:style-name="P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77"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2 contraintes pour la configuration d’un cluster :</text:p>
                <text:list>
                  <text:list-item>
                    <text:p>Tous les brokers doivent avoir le même paramètre <text:span text:style-name="T36">zookeeper.connect</text:span>. </text:p>
                  </text:list-item>
                  <text:list-item>
                    <text:p>Chaque broker doit avoir une valeur unique pour <text:span text:style-name="T36">broker.id.</text:span></text:p>
                  </text:list-item>
                </text:list>
              </text:list-item>
              <text:list-item>
                <text:p/>
              </text:list-item>
            </text:list>
          </draw:text-box>
        </draw:frame>
        <draw:frame draw:style-name="gr286" draw:text-style-name="P154" draw:layer="layout" svg:width="4.172cm" svg:height="1.216cm" svg:x="22.78cm" svg:y="0.793cm">
          <draw:text-box>
            <text:p><text:span text:style-name="T287">Zookeeper</text:span></text:p>
          </draw:text-box>
        </draw:frame>
        <presentation:notes draw:style-name="dp4">
          <draw:page-thumbnail draw:style-name="gr2" draw:layer="layout" svg:width="15.597cm" svg:height="10.985cm" svg:x="2.623cm" svg:y="2.258cm" draw:page-number="277" presentation:class="page"/>
          <draw:frame presentation:style-name="pr6" draw:text-style-name="P18" draw:layer="layout" svg:width="14.362cm" svg:height="11.254cm" svg:x="3.25cm" svg:y="14.128cm" presentation:class="notes" presentation:placeholder="true">
            <draw:text-box/>
          </draw:frame>
        </presentation:notes>
      </draw:page>
      <draw:page draw:name="page278"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3 contraintes pour la configuration d’un cluster :</text:p>
                <text:list>
                  <text:list-item>
                    <text:p>Tous les brokers doivent avoir le même paramètre <text:span text:style-name="T36">cluster.id</text:span> </text:p>
                  </text:list-item>
                  <text:list-item>
                    <text:p>Chaque broker doit avoir une valeur unique pour <text:span text:style-name="T36">broker.id</text:span></text:p>
                  </text:list-item>
                  <text:list-item>
                    <text:p>Au<text:span text:style-name="T36"> </text:span>moins 1 broker doit avoir le rôle contrôleur</text:p>
                  </text:list-item>
                </text:list>
              </text:list-item>
              <text:list-item>
                <text:p/>
              </text:list-item>
            </text:list>
          </draw:text-box>
        </draw:frame>
        <draw:frame draw:style-name="gr287" draw:text-style-name="P154" draw:layer="layout" svg:width="2.339cm" svg:height="1.216cm" svg:x="22.78cm" svg:y="0.793cm">
          <draw:text-box>
            <text:p><text:span text:style-name="T287">Kraft</text:span></text:p>
          </draw:text-box>
        </draw:frame>
        <presentation:notes draw:style-name="dp4">
          <draw:page-thumbnail draw:style-name="gr2" draw:layer="layout" svg:width="15.597cm" svg:height="10.985cm" svg:x="2.623cm" svg:y="2.258cm" draw:page-number="278" presentation:class="page"/>
          <draw:frame presentation:style-name="pr6" draw:text-style-name="P18" draw:layer="layout" svg:width="14.362cm" svg:height="11.254cm" svg:x="3.25cm" svg:y="14.128cm" presentation:class="notes" presentation:placeholder="true">
            <draw:text-box/>
          </draw:frame>
        </presentation:notes>
      </draw:page>
      <draw:page draw:name="page279"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4">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279" presentation:class="page"/>
          <draw:frame presentation:style-name="pr6" draw:text-style-name="P13" draw:layer="layout" svg:width="14.362cm" svg:height="11.254cm" svg:x="3.25cm" svg:y="14.128cm" presentation:class="notes" presentation:placeholder="true">
            <draw:text-box/>
          </draw:frame>
        </presentation:notes>
      </draw:page>
      <draw:page draw:name="page280" draw:style-name="dp7"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luster et ensemble Zookeeper</text:p>
          </draw:text-box>
        </draw:frame>
        <draw:frame presentation:style-name="pr5" draw:layer="layout" svg:width="23.499cm" svg:height="12.18cm" svg:x="3.033cm" svg:y="6.283cm" presentation:class="outline">
          <draw:text-box>
            <text:list text:style-name="L2">
              <text:list-item>
                <text:p>Kafka utilise <text:span text:style-name="T14">Zookeeper</text:span> pour stocker des informations de métadonnées sur les brokers, les topics et les partitions. </text:p>
              </text:list-item>
              <text:list-item>
                <text:p>Les écritures sont peu volumineuses et il n’est pas nécessaire de dédier un ensemble <text:span text:style-name="T14">Zookeeper</text:span> à un seul cluster Kafka. </text:p>
                <text:list>
                  <text:list-item>
                    <text:p><text:span text:style-name="T4">=&gt; Un seul ensemble pour plusieurs clusters Kafka.</text:span></text:p>
                  </text:list-item>
                </text:list>
              </text:list-item>
            </text:list>
          </draw:text-box>
        </draw:frame>
        <draw:frame draw:style-name="gr288" draw:text-style-name="P59" draw:layer="layout" svg:width="9.71cm" svg:height="1.216cm" svg:x="1.602cm" svg:y="19.4cm">
          <draw:text-box>
            <text:p><text:span text:style-name="T94">Atelier 1.3 : Cluster Kafka</text:span></text:p>
          </draw:text-box>
        </draw:frame>
        <draw:frame draw:style-name="gr286" draw:text-style-name="P154" draw:layer="layout" svg:width="4.172cm" svg:height="1.216cm" svg:x="22.78cm" svg:y="0.793cm">
          <draw:text-box>
            <text:p><text:span text:style-name="T287">Zookeeper</text:span></text:p>
          </draw:text-box>
        </draw:frame>
        <presentation:notes draw:style-name="dp4">
          <draw:page-thumbnail draw:style-name="gr2" draw:layer="layout" svg:width="15.597cm" svg:height="10.985cm" svg:x="2.623cm" svg:y="2.258cm" draw:page-number="280" presentation:class="page"/>
          <draw:frame presentation:style-name="pr6" draw:text-style-name="P13" draw:layer="layout" svg:width="14.362cm" svg:height="11.254cm" svg:x="3.25cm" svg:y="14.128cm" presentation:class="notes" presentation:placeholder="true">
            <draw:text-box/>
          </draw:frame>
        </presentation:notes>
      </draw:page>
      <draw:page draw:name="page281"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175" draw:text-style-name="P13" draw:layer="layout" svg:width="23.499cm" svg:height="12.18cm" svg:x="3.033cm" svg:y="6.283cm" presentation:class="subtitle">
          <draw:text-box>
            <text:p>Apache<text:span text:style-name="T46"> </text:span>Zookeeper</text:p>
            <text:p><text:span text:style-name="T46">Contrôleur et Zookeeper</text:span></text:p>
            <text:p>SASL SCRAM</text:p>
          </draw:text-box>
        </draw:frame>
        <presentation:notes draw:style-name="dp5">
          <draw:page-thumbnail draw:style-name="gr2" draw:layer="layout" svg:width="15.597cm" svg:height="10.985cm" svg:x="2.623cm" svg:y="2.258cm" draw:page-number="281" presentation:class="page"/>
          <draw:frame presentation:style-name="pr6" draw:text-style-name="P13" draw:layer="layout" svg:width="14.362cm" svg:height="11.254cm" svg:x="3.25cm" svg:y="14.128cm" presentation:class="notes" presentation:placeholder="true">
            <draw:text-box/>
          </draw:frame>
        </presentation:notes>
      </draw:page>
      <draw:page draw:name="page2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u contrôleur</text:p>
          </draw:text-box>
        </draw:frame>
        <draw:frame presentation:style-name="pr5" draw:layer="layout" svg:width="23.499cm" svg:height="12.18cm" svg:x="3.033cm" svg:y="6.283cm" presentation:class="outline">
          <draw:text-box>
            <text:list text:style-name="L2">
              <text:list-item>
                <text:p>Un des brokers Kafka (nœud éphémère dans <text:span text:style-name="T14">Zookeeper</text:span>)<text:line-break/>Pour le visualiser :<text:line-break/><text:span text:style-name="T288">./bin/zookeeper-shell.sh [ZK_IP] get /controller</text:span></text:p>
                <text:list>
                  <text:list-item>
                    <text:p>Gère le cluster en plus des fonctionnalités habituelles d’un broker</text:p>
                  </text:list-item>
                  <text:list-item>
                    <text:p>Détecte le départ / l'arrivée de broker via <text:span text:style-name="T14">Zookeeper</text:span> (<text:span text:style-name="T14">/brokers ids</text:span>)</text:p>
                  </text:list-item>
                  <text:list-item>
                    <text:p>Gère les changements de Leaders</text:p>
                  </text:list-item>
                </text:list>
              </text:list-item>
              <text:list-item>
                <text:p>Si le contrôleur échoue:</text:p>
                <text:list>
                  <text:list-item>
                    <text:p>un autre broker est désigné comme nouveau contrôleur</text:p>
                  </text:list-item>
                  <text:list-item>
                    <text:p>les états des partitions (liste des leaders et des ISR) sont récupérés à partir de Zookeeper</text:p>
                  </text:list-item>
                </text:list>
              </text:list-item>
            </text:list>
          </draw:text-box>
        </draw:frame>
        <presentation:notes draw:style-name="dp5">
          <draw:page-thumbnail draw:style-name="gr2" draw:layer="layout" svg:width="15.597cm" svg:height="10.985cm" svg:x="2.623cm" svg:y="2.258cm" draw:page-number="282" presentation:class="page"/>
          <draw:frame presentation:style-name="pr6" draw:text-style-name="P13" draw:layer="layout" svg:width="14.362cm" svg:height="11.254cm" svg:x="3.25cm" svg:y="14.128cm" presentation:class="notes" presentation:placeholder="true">
            <draw:text-box/>
          </draw:frame>
        </presentation:notes>
      </draw:page>
      <draw:page draw:name="page2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Responsabilités</text:p>
          </draw:text-box>
        </draw:frame>
        <draw:frame presentation:style-name="pr5" draw:layer="layout" svg:width="23.499cm" svg:height="12.18cm" svg:x="3.033cm" svg:y="6.283cm" presentation:class="outline">
          <draw:text-box>
            <text:list text:style-name="L2">
              <text:list-item>
                <text:p><text:span text:style-name="T26">Lors d’un départ de broker, pour toutes les partitions dont il </text:span><text:span text:style-name="T26">est le leader, le </text:span>contrôleur :</text:p>
                <text:list>
                  <text:list-item>
                    <text:p>Choisit un nouveau leader et met à jour l’ISR</text:p>
                  </text:list-item>
                  <text:list-item>
                    <text:p>Met à jour le nouveau Leader et l’ISR (État des partitions) dans <text:span text:style-name="T14">Zookeeper</text:span></text:p>
                  </text:list-item>
                  <text:list-item>
                    <text:p>Envoie le nouveau Leader/ISR à tous les brokers contenant le nouveau leader ou les followers existants</text:p>
                  </text:list-item>
                </text:list>
              </text:list-item>
              <text:list-item>
                <text:p>Lors de l’arrivée d’un broker, le contrôleur lui envoie le Leader et l’ISR</text:p>
              </text:list-item>
            </text:list>
          </draw:text-box>
        </draw:frame>
        <presentation:notes draw:style-name="dp5">
          <draw:page-thumbnail draw:style-name="gr2" draw:layer="layout" svg:width="15.597cm" svg:height="10.985cm" svg:x="2.623cm" svg:y="2.258cm" draw:page-number="283" presentation:class="page"/>
          <draw:frame presentation:style-name="pr6" draw:text-style-name="P13" draw:layer="layout" svg:width="14.362cm" svg:height="11.254cm" svg:x="3.25cm" svg:y="14.128cm" presentation:class="notes" presentation:placeholder="true">
            <draw:text-box/>
          </draw:frame>
        </presentation:notes>
      </draw:page>
      <draw:page draw:name="page284"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175" draw:text-style-name="P13" draw:layer="layout" svg:width="23.499cm" svg:height="12.18cm" svg:x="3.033cm" svg:y="6.283cm" presentation:class="subtitle">
          <draw:text-box>
            <text:p>Apache<text:span text:style-name="T46"> </text:span>Zookeeper</text:p>
            <text:p>Contrôleur et Zookeeper</text:p>
            <text:p><text:span text:style-name="T46">SASL SCRAM</text:span></text:p>
          </draw:text-box>
        </draw:frame>
        <presentation:notes draw:style-name="dp5">
          <draw:page-thumbnail draw:style-name="gr2" draw:layer="layout" svg:width="15.597cm" svg:height="10.985cm" svg:x="2.623cm" svg:y="2.258cm" draw:page-number="284" presentation:class="page"/>
          <draw:frame presentation:style-name="pr6" draw:text-style-name="P13" draw:layer="layout" svg:width="14.362cm" svg:height="11.254cm" svg:x="3.25cm" svg:y="14.128cm" presentation:class="notes" presentation:placeholder="true">
            <draw:text-box/>
          </draw:frame>
        </presentation:notes>
      </draw:page>
      <draw:page draw:name="page2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SCARM</text:p>
          </draw:text-box>
        </draw:frame>
        <draw:frame presentation:style-name="pr5" draw:layer="layout" svg:width="23.499cm" svg:height="12.18cm" svg:x="3.033cm" svg:y="6.283cm" presentation:class="outline" presentation:user-transformed="true">
          <draw:text-box>
            <text:list text:style-name="L2">
              <text:list-item>
                <text:p>Utilisé avec SSL pour une authentification sécurisée</text:p>
                <text:list>
                  <text:list-item>
                    <text:p><text:span text:style-name="T14">Zookeeper</text:span> est utilisé pour stocker les crédentiels</text:p>
                  </text:list-item>
                  <text:list-item>
                    <text:p>Sécurisé via l’utilisation d’un réseau privé</text:p>
                  </text:list-item>
                </text:list>
              </text:list-item>
            </text:list>
          </draw:text-box>
        </draw:frame>
        <presentation:notes draw:style-name="dp9">
          <draw:page-thumbnail draw:style-name="gr2" draw:layer="layout" svg:width="15.597cm" svg:height="10.985cm" svg:x="2.623cm" svg:y="2.258cm" draw:page-number="285" presentation:class="page"/>
          <draw:frame presentation:style-name="pr6" draw:text-style-name="P13" draw:layer="layout" svg:width="14.362cm" svg:height="11.254cm" svg:x="3.25cm" svg:y="14.128cm" presentation:class="notes" presentation:placeholder="true">
            <draw:text-box/>
          </draw:frame>
        </presentation:notes>
      </draw:page>
      <draw:page draw:name="page286"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Configuration des crédentiels SASL SCRAM</text:p>
          </draw:text-box>
        </draw:frame>
        <draw:frame presentation:style-name="pr5" draw:layer="layout" svg:width="23.499cm" svg:height="12.18cm" svg:x="3.033cm" svg:y="6.283cm" presentation:class="outline" presentation:user-transformed="true">
          <draw:text-box>
            <text:list text:style-name="L2">
              <text:list-item>
                <text:p>Communication Inter-Broker : user “admin”</text:p>
              </text:list-item>
              <text:list-item>
                <text:p text:style-name="P31"><text:span text:style-name="T95">kafka-configs.sh --zookeeper host:port --alter \</text:span></text:p>
              </text:list-item>
              <text:list-item>
                <text:p text:style-name="P31"><text:span text:style-name="T95">--add-config 'SCRAM-SHA-256=[password=adminpass],SCRAM-SHA-</text:span><text:span text:style-name="T95">512=[password=adminpass]' \</text:span></text:p>
              </text:list-item>
              <text:list-item>
                <text:p text:style-name="P31"><text:span text:style-name="T95">--entity-type users --entity-name admin \</text:span></text:p>
              </text:list-item>
              <text:list-item>
                <text:p/>
              </text:list-item>
              <text:list-item>
                <text:p>Communication Client-Broker : user “user”</text:p>
              </text:list-item>
              <text:list-item>
                <text:p text:style-name="P31"><text:span text:style-name="T95">kafka-configs.sh</text:span> <text:span text:style-name="T95">--zookeeper host:port --alter \</text:span></text:p>
              </text:list-item>
              <text:list-item>
                <text:p text:style-name="P31"><text:span text:style-name="T95">--add-config 'SCRAM-SHA-256=[password=userpass],SCRAM-SHA-</text:span><text:span text:style-name="T95">512=[password=userpass] ' \</text:span></text:p>
              </text:list-item>
              <text:list-item>
                <text:p text:style-name="P31"><text:span text:style-name="T95">--entity-type users --entity-name user\</text:span></text:p>
              </text:list-item>
            </text:list>
          </draw:text-box>
        </draw:frame>
        <presentation:notes draw:style-name="dp9">
          <draw:page-thumbnail draw:style-name="gr2" draw:layer="layout" svg:width="15.597cm" svg:height="10.985cm" svg:x="2.623cm" svg:y="2.258cm" draw:page-number="286" presentation:class="page"/>
          <draw:frame presentation:style-name="pr6" draw:text-style-name="P18" draw:layer="layout" svg:width="14.362cm" svg:height="11.254cm" svg:x="3.25cm" svg:y="14.128cm" presentation:class="notes" presentation:placeholder="true">
            <draw:text-box/>
          </draw:frame>
        </presentation:notes>
      </draw:page>
      <draw:page draw:name="page2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95">KafkaServer {</text:span></text:p>
              </text:list-item>
              <text:list-item>
                <text:p><text:span text:style-name="T95"><text:s text:c="2"/></text:span><text:span text:style-name="T95">org.apache.kafka.common.security.scram.ScramLoginModule </text:span><text:span text:style-name="T95">required</text:span><text:span text:style-name="T95"><text:line-break/></text:span><text:span text:style-name="T95">username="admin"</text:span><text:span text:style-name="T95"><text:line-break/></text:span><text:span text:style-name="T95">password="adminpass" </text:span></text:p>
              </text:list-item>
              <text:list-item>
                <text:p><text:span text:style-name="T95">} ;</text:span></text:p>
              </text:list-item>
              <text:list-item>
                <text:p/>
              </text:list-item>
              <text:list-item>
                <text:p>Ajouter un paramètre JVM </text:p>
              </text:list-item>
              <text:list-item>
                <text:p><text:span text:style-name="T209">-Djava.security.auth.login.config=/home/ubuntu/ssl/</text:span><text:span text:style-name="T209">kafka_jaas.conf</text:span></text:p>
              </text:list-item>
              <text:list-item>
                <text:p><text:span text:style-name="T14">server.properties</text:span></text:p>
              </text:list-item>
              <text:list-item>
                <text:p text:style-name="P31"><text:s text:c="2"/><text:span text:style-name="T95">listeners=SASL_SSL://host.name:port</text:span></text:p>
              </text:list-item>
              <text:list-item>
                <text:p text:style-name="P31"><text:span text:style-name="T95"><text:s/></text:span><text:span text:style-name="T95">security.inter.broker.protocol=SASL_SSL</text:span></text:p>
              </text:list-item>
              <text:list-item>
                <text:p text:style-name="P31"><text:span text:style-name="T95"><text:s/></text:span><text:span text:style-name="T95">sasl.mechanism.inter.broker.protocol=SCRAM-SHA-512</text:span></text:p>
              </text:list-item>
              <text:list-item>
                <text:p text:style-name="P31"><text:span text:style-name="T95"><text:s/></text:span><text:span text:style-name="T95">sasl.enabled.mechanisms=SCRAM-SHA-512</text:span></text:p>
              </text:list-item>
            </text:list>
          </draw:text-box>
        </draw:frame>
        <presentation:notes draw:style-name="dp9">
          <draw:page-thumbnail draw:style-name="gr2" draw:layer="layout" svg:width="15.597cm" svg:height="10.985cm" svg:x="2.623cm" svg:y="2.258cm" draw:page-number="287" presentation:class="page"/>
          <draw:frame presentation:style-name="pr6" draw:text-style-name="P13" draw:layer="layout" svg:width="14.362cm" svg:height="11.254cm" svg:x="3.25cm" svg:y="14.128cm" presentation:class="notes" presentation:placeholder="true">
            <draw:text-box/>
          </draw:frame>
        </presentation:notes>
      </draw:page>
      <draw:page draw:name="page2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95">KafkaClient {</text:span></text:p>
              </text:list-item>
              <text:list-item>
                <text:p><text:span text:style-name="T208"><text:s text:c="2"/></text:span><text:span text:style-name="T208">org.apache.kafka.common.security.scram.ScramLoginModule </text:span><text:span text:style-name="T208">required</text:span><text:span text:style-name="T208"><text:line-break/></text:span><text:span text:style-name="T208">username="alice"</text:span><text:span text:style-name="T208"><text:line-break/></text:span><text:span text:style-name="T208">password="</text:span><text:span text:style-name="T95">alice-secret" </text:span></text:p>
              </text:list-item>
              <text:list-item>
                <text:p><text:span text:style-name="T95">} ;</text:span></text:p>
              </text:list-item>
              <text:list-item>
                <text:p/>
              </text:list-item>
              <text:list-item>
                <text:p>Ajouter un paramètre JVM </text:p>
              </text:list-item>
              <text:list-item>
                <text:p><text:span text:style-name="T209">-Djava.security.auth.login.config=/home/ubuntu/ssl/</text:span><text:span text:style-name="T209">client_jaas.conf</text:span></text:p>
              </text:list-item>
              <text:list-item>
                <text:p><text:span text:style-name="T14">client.properties</text:span></text:p>
              </text:list-item>
              <text:list-item>
                <text:p text:style-name="P31"><text:span text:style-name="T95"><text:s/></text:span><text:span text:style-name="T95">security.protocol=SASL_SSL</text:span></text:p>
              </text:list-item>
              <text:list-item>
                <text:p text:style-name="P31"><text:span text:style-name="T95"><text:s/></text:span><text:span text:style-name="T95">sasl.mechanisms=SCRAM-SHA-512</text:span></text:p>
              </text:list-item>
            </text:list>
          </draw:text-box>
        </draw:frame>
        <presentation:notes draw:style-name="dp9">
          <draw:page-thumbnail draw:style-name="gr2" draw:layer="layout" svg:width="15.597cm" svg:height="10.985cm" svg:x="2.623cm" svg:y="2.258cm" draw:page-number="288" presentation:class="page"/>
          <draw:frame presentation:style-name="pr6" draw:text-style-name="P13" draw:layer="layout" svg:width="14.362cm" svg:height="11.254cm" svg:x="3.25cm" svg:y="14.128cm" presentation:class="notes" presentation:placeholder="true">
            <draw:text-box/>
          </draw:frame>
        </presentation:notes>
      </draw:page>
      <draw:page draw:name="page289"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1">Administration</text:span></text:p>
              </text:list-header>
            </text:list>
          </draw:text-box>
        </draw:frame>
        <draw:frame presentation:style-name="pr177" draw:text-style-name="P16" draw:layer="layout" svg:width="23.499cm" svg:height="12.18cm" svg:x="3.033cm" svg:y="6.283cm" presentation:class="subtitle" presentation:user-transformed="true">
          <draw:text-box>
            <text:list text:style-name="L1">
              <text:list-item>
                <text:p text:style-name="P33"><text:span text:style-name="T197"/></text:p>
              </text:list-item>
              <text:list-item>
                <text:p text:style-name="P33"><text:span text:style-name="T197"/></text:p>
              </text:list-item>
              <text:list-item>
                <text:p text:style-name="P19"><text:span text:style-name="T2">Gestion des topics</text:span></text:p>
              </text:list-item>
              <text:list-item>
                <text:p text:style-name="P33"><text:span text:style-name="T2">Stockage et rétention des partitions</text:span></text:p>
              </text:list-item>
              <text:list-item>
                <text:p text:style-name="P33"><text:span text:style-name="T2">Quotas</text:span></text:p>
              </text:list-item>
              <text:list-item>
                <text:p text:style-name="P33"><text:span text:style-name="T13">Gestion du cluster</text:span></text:p>
              </text:list-item>
              <text:list-item>
                <text:p text:style-name="P19"><text:span text:style-name="T12">Dimensionnement</text:span></text:p>
              </text:list-item>
              <text:list-item>
                <text:p text:style-name="P19"><text:span text:style-name="T199">Monitoring</text:span></text:p>
              </text:list-item>
              <text:list-item>
                <text:p text:style-name="P33"><text:span text:style-name="T13"/></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9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presentation:user-transformed="true">
          <draw:text-box>
            <text:list text:style-name="L2">
              <text:list-item>
                <text:p><text:span text:style-name="T289">CPU</text:span> : Typiquement pas un goulot d’étranglement </text:p>
                <text:list>
                  <text:list-item>
                    <text:p><text:s/>2 - 4 CPU</text:p>
                  </text:list-item>
                </text:list>
              </text:list-item>
              <text:list-item>
                <text:p><text:span text:style-name="T289">Disque</text:span> : Sensible à la latence I/O, Utilisation d’un disque dédié. De préférence SSD </text:p>
                <text:list>
                  <text:list-item>
                    <text:p>Au moins 64 Gb</text:p>
                  </text:list-item>
                </text:list>
              </text:list-item>
              <text:list-item>
                <text:p><text:span text:style-name="T289">Mémoire</text:span> : Pas d’utilisation intensive</text:p>
                <text:list>
                  <text:list-item>
                    <text:p>Dépend de l’état du cluster </text:p>
                  </text:list-item>
                  <text:list-item>
                    <text:p>4 Gb - 16 Gb (Pour les très grand cluster : plus de 2000 partitions)</text:p>
                  </text:list-item>
                </text:list>
              </text:list-item>
              <text:list-item>
                <text:p><text:span text:style-name="T289">JVM</text:span> : Pas d’utilisation intensive de la heap </text:p>
                <text:list>
                  <text:list-item>
                    <text:p>Au moins 1 Gb pour le cache de page </text:p>
                  </text:list-item>
                  <text:list-item>
                    <text:p>1 Gb - 4 Gb</text:p>
                  </text:list-item>
                </text:list>
              </text:list-item>
              <text:list-item>
                <text:p><text:span text:style-name="T289">Réseau</text:span> : La bande passante ne doit pas être partagée avec d’autres applications</text:p>
              </text:list-item>
            </text:list>
          </draw:text-box>
        </draw:frame>
        <presentation:notes draw:style-name="dp9">
          <draw:page-thumbnail draw:style-name="gr2" draw:layer="layout" svg:width="15.597cm" svg:height="10.985cm" svg:x="2.623cm" svg:y="2.258cm" draw:page-number="290" presentation:class="page"/>
          <draw:frame presentation:style-name="pr6" draw:text-style-name="P13" draw:layer="layout" svg:width="14.362cm" svg:height="11.254cm" svg:x="3.25cm" svg:y="14.128cm" presentation:class="notes" presentation:placeholder="true">
            <draw:text-box/>
          </draw:frame>
        </presentation:notes>
      </draw:page>
      <draw:page draw:name="page2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draw:text-box>
            <text:list text:style-name="L2">
              <text:list-item>
                <text:p>Un nombre impair de serveurs <text:span text:style-name="T14">Zookeeper</text:span> </text:p>
                <text:list>
                  <text:list-item>
                    <text:p>Nécessité d’un Quorum (vote majoritaire)</text:p>
                  </text:list-item>
                </text:list>
              </text:list-item>
              <text:list-item>
                <text:p>– 3 nœuds permet une panne</text:p>
              </text:list-item>
              <text:list-item>
                <text:p>– 5 nœuds permet 2 pannes </text:p>
              </text:list-item>
            </text:list>
          </draw:text-box>
        </draw:frame>
        <presentation:notes draw:style-name="dp9">
          <draw:page-thumbnail draw:style-name="gr2" draw:layer="layout" svg:width="15.597cm" svg:height="10.985cm" svg:x="2.623cm" svg:y="2.258cm" draw:page-number="291" presentation:class="page"/>
          <draw:frame presentation:style-name="pr6" draw:text-style-name="P13"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Consolas" svg:font-family="Consolas" style:font-family-generic="swiss" style:font-pitch="variable"/>
    <style:font-face style:name="Consolas1" svg:font-family="Consolas" style:font-family-generic="modern" style:font-pitch="fixed"/>
    <style:font-face style:name="Consolas2"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swiss" style:font-pitch="variable"/>
    <style:font-face style:name="DejaVu Sans Mono1" svg:font-family="'DejaVu Sans Mono'" style:font-family-generic="modern" style:font-pitch="fixed"/>
    <style:font-face style:name="DejaVu Sans1" svg:font-family="'DejaVu Sans'"/>
    <style:font-face style:name="DejaVu Sans2" svg:font-family="'DejaVu Sans'" style:font-family-generic="modern" style:font-pitch="fixed"/>
    <style:font-face style:name="DejaVu Sans3" svg:font-family="'DejaVu Sans'" style:font-family-generic="system" style:font-pitch="variable"/>
    <style:font-face style:name="DejaVu Sans4" svg:font-family="'DejaVu Sans'"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face style:name="Lohit Hindi1" svg:font-family="'Lohit Hindi'" style:font-family-generic="roman" style:font-pitch="variable"/>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Lucida Sans Unicode3" svg:font-family="'Lucida Sans Unicode'" style:font-family-generic="modern" style:font-pitch="fixed"/>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ce style:name="Tahoma1" svg:font-family="Tahoma" style:font-family-generic="swiss" style:font-pitch="variable"/>
    <style:font-face style:name="Tahoma2"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333cc" draw:end-color="#ffffff" draw:start-intensity="100%" draw:end-intensity="100%" draw:angle="27deg" draw:border="0%">
      <loext:gradient-stop svg:offset="0" loext:color-type="rgb" loext:color-value="#3333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2" draw:display-name="Gradient 2" draw:style="linear" draw:start-color="#ffcf01" draw:end-color="#ffffff" draw:start-intensity="100%" draw:end-intensity="100%" draw:angle="27deg" draw:border="0%">
      <loext:gradient-stop svg:offset="0" loext:color-type="rgb" loext:color-value="#ffcf01"/>
      <loext:gradient-stop svg:offset="1" loext:color-type="rgb" loext:color-value="#ffffff"/>
    </draw:gradient>
    <draw:gradient draw:name="Gradient_20_3" draw:display-name="Gradient 3"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Gradient_20_4" draw:display-name="Gradient 4" draw:style="linear" draw:start-color="#1c1c1c" draw:end-color="#ffffff" draw:start-intensity="100%" draw:end-intensity="100%" draw:angle="207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fr" fo:country="FR"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1"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Standard_5f_1_5f_4" style:display-name="Standard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Saut_20_d_27_index" style:display-name="Saut d'index"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3" style:display-name="Table des matières niveau 3" style:family="graphic">
      <style:paragraph-properties fo:margin-left="1.76cm" fo:margin-right="0cm" fo:text-indent="0cm" style:text-autospace="none" loext:tab-stop-distance="0cm">
        <style:tab-stops>
          <style:tab-stop style:position="28.226cm" style:type="right" style:leader-style="dotted" style:leader-text="."/>
        </style:tab-stops>
      </style:paragraph-properties>
      <style:text-properties style:font-name-complex="Lohit Hindi2" style:font-family-complex="'Lohit Hindi'"/>
    </style:style>
    <style:style style:name="Table_20_des_20_matières_20_niveau_20_4" style:display-name="Table des matières niveau 4" style:family="graphic">
      <style:paragraph-properties fo:margin-left="2.642cm" fo:margin-right="0cm" fo:text-indent="0cm" style:text-autospace="none" loext:tab-stop-distance="0cm">
        <style:tab-stops>
          <style:tab-stop style:position="27.346cm" style:type="right" style:leader-style="dotted" style:leader-text="."/>
        </style:tab-stops>
      </style:paragraph-properties>
      <style:text-properties style:font-name-complex="Lohit Hindi2" style:font-family-complex="'Lohit Hindi'"/>
    </style:style>
    <style:style style:name="Table_20_des_20_matières_20_niveau_20_2" style:display-name="Table des matières niveau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2" style:font-family-complex="'Lohit Hindi'"/>
    </style:style>
    <style:style style:name="Table_20_des_20_matières_20_niveau_20_1" style:display-name="Table des matières niveau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2" style:font-family-complex="'Lohit Hind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1" style:font-family-asian="'WenQuanYi Micro Hei'" style:font-pitch-asian="variable" style:font-name-complex="Arial" style:font-family-complex="Arial" style:font-family-generic-complex="swiss" style:font-pitch-complex="variable" style:font-size-complex="28pt" style:font-weight-complex="bold"/>
    </style:style>
    <style:style style:name="Corps_20_de_20_texte" style:display-name="Corps de texte" style:family="graphic">
      <style:paragraph-properties fo:margin-top="0cm" fo:margin-bottom="0.374cm" style:text-autospace="none"/>
    </style:style>
    <style:style style:name="Objet_20_sans_20_remplissage_20_et_20_sans_20_ligne_5f_3" style:display-name="Objet sans remplissage et sans ligne_3" style:family="graphic">
      <style:graphic-properties draw:stroke="none" draw:fill="none"/>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Lucida Sans Unicode2" style:font-family-asian="'Lucida Sans Unicode'" style:font-family-generic-asian="swiss" style:font-pitch-asian="variable" style:font-size-asian="28pt" style:font-style-asian="normal" style:font-weight-asian="normal" style:font-name-complex="Lucida Sans Unicode2"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1" fo:font-family="Tahoma" style:font-family-generic="swiss" style:font-pitch="variable" fo:font-size="44pt" fo:font-style="normal" fo:text-shadow="none" style:text-underline-style="none" fo:font-weight="normal" style:font-name-asian="Lucida Sans Unicode2" style:font-family-asian="'Lucida Sans Unicode'" style:font-family-generic-asian="swiss" style:font-pitch-asian="variable" style:font-size-asian="44pt" style:font-style-asian="normal" style:font-weight-asian="normal" style:font-name-complex="Lucida Sans Unicode2"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_5f_-outline2" style:display-name="Vide_-outline2" style:family="presentation" style:parent-style-name="Vide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1cm" fo:margin-bottom="0cm" fo:text-indent="0cm"/>
      <style:text-properties fo:font-size="20pt" style:font-size-asian="20pt" style:font-size-complex="20pt"/>
    </style:style>
    <style:style style:name="Vide_5f_-outline6" style:display-name="Vide_-outline6" style:family="presentation" style:parent-style-name="Vide_5f_-outline5">
      <style:paragraph-properties fo:margin-left="0cm" fo:margin-right="0cm" fo:margin-top="0.1cm" fo:margin-bottom="0cm" fo:text-indent="0cm"/>
      <style:text-properties fo:font-size="20pt" style:font-size-asian="20pt" style:font-size-complex="20pt"/>
    </style:style>
    <style:style style:name="Vide_5f_-outline7" style:display-name="Vide_-outline7" style:family="presentation" style:parent-style-name="Vide_5f_-outline6">
      <style:paragraph-properties fo:margin-left="0cm" fo:margin-right="0cm" fo:margin-top="0.1cm" fo:margin-bottom="0cm" fo:text-indent="0cm"/>
      <style:text-properties fo:font-size="20pt" style:font-size-asian="20pt" style:font-size-complex="20pt"/>
    </style:style>
    <style:style style:name="Vide_5f_-outline8" style:display-name="Vide_-outline8" style:family="presentation" style:parent-style-name="Vide_5f_-outline7">
      <style:paragraph-properties fo:margin-left="0cm" fo:margin-right="0cm" fo:margin-top="0.1cm" fo:margin-bottom="0cm" fo:text-indent="0cm"/>
      <style:text-properties fo:font-size="20pt" style:font-size-asian="20pt" style:font-size-complex="20pt"/>
    </style:style>
    <style:style style:name="Vide_5f_-outline9" style:display-name="Vide_-outline9" style:family="presentation" style:parent-style-name="Vide_5f_-outline8">
      <style:paragraph-properties fo:margin-left="0cm" fo:margin-right="0cm" fo:margin-top="0.1cm" fo:margin-bottom="0cm" fo:text-indent="0cm"/>
      <style:text-properties fo:font-size="20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1cm" fo:margin-bottom="0cm" fo:text-indent="0cm"/>
      <style:text-properties fo:font-size="20pt" style:font-size-asian="20pt" style:font-size-complex="20pt"/>
    </style:style>
    <style:style style:name="Vide-outline6" style:family="presentation" style:parent-style-name="Vide-outline5">
      <style:paragraph-properties fo:margin-left="0cm" fo:margin-right="0cm" fo:margin-top="0.1cm" fo:margin-bottom="0cm" fo:text-indent="0cm"/>
      <style:text-properties fo:font-size="20pt" style:font-size-asian="20pt" style:font-size-complex="20pt"/>
    </style:style>
    <style:style style:name="Vide-outline7" style:family="presentation" style:parent-style-name="Vide-outline6">
      <style:paragraph-properties fo:margin-left="0cm" fo:margin-right="0cm" fo:margin-top="0.1cm" fo:margin-bottom="0cm" fo:text-indent="0cm"/>
      <style:text-properties fo:font-size="20pt" style:font-size-asian="20pt" style:font-size-complex="20pt"/>
    </style:style>
    <style:style style:name="Vide-outline8" style:family="presentation" style:parent-style-name="Vide-outline7">
      <style:paragraph-properties fo:margin-left="0cm" fo:margin-right="0cm" fo:margin-top="0.1cm" fo:margin-bottom="0cm" fo:text-indent="0cm"/>
      <style:text-properties fo:font-size="20pt" style:font-size-asian="20pt" style:font-size-complex="20pt"/>
    </style:style>
    <style:style style:name="Vide-outline9" style:family="presentation" style:parent-style-name="Vide-outline8">
      <style:paragraph-properties fo:margin-left="0cm" fo:margin-right="0cm" fo:margin-top="0.1cm" fo:margin-bottom="0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5.299999237060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9.7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5.2999992370606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left="0cm" fo:margin-right="0cm" fo:margin-top="0.11cm" fo:margin-bottom="0cm" fo:text-indent="0cm"/>
      <style:text-properties fo:font-size="22.1000003814697pt" style:font-size-asian="20pt" style:font-size-complex="20pt"/>
    </style:style>
    <style:style style:name="DEFAULT-outline6" style:family="presentation" style:parent-style-name="DEFAULT-outline5">
      <style:paragraph-properties fo:margin-left="0cm" fo:margin-right="0cm" fo:margin-top="0.11cm" fo:margin-bottom="0cm" fo:text-indent="0cm"/>
      <style:text-properties fo:font-size="22.1000003814697pt" style:font-size-asian="20pt" style:font-size-complex="20pt"/>
    </style:style>
    <style:style style:name="DEFAULT-outline7" style:family="presentation" style:parent-style-name="DEFAULT-outline6">
      <style:paragraph-properties fo:margin-left="0cm" fo:margin-right="0cm" fo:margin-top="0.11cm" fo:margin-bottom="0cm" fo:text-indent="0cm"/>
      <style:text-properties fo:font-size="22.1000003814697pt" style:font-size-asian="20pt" style:font-size-complex="20pt"/>
    </style:style>
    <style:style style:name="DEFAULT-outline8" style:family="presentation" style:parent-style-name="DEFAULT-outline7">
      <style:paragraph-properties fo:margin-left="0cm" fo:margin-right="0cm" fo:margin-top="0.11cm" fo:margin-bottom="0cm" fo:text-indent="0cm"/>
      <style:text-properties fo:font-size="22.1000003814697pt" style:font-size-asian="20pt" style:font-size-complex="20pt"/>
    </style:style>
    <style:style style:name="DEFAULT-outline9" style:family="presentation" style:parent-style-name="DEFAULT-outline8">
      <style:paragraph-properties fo:margin-left="0cm" fo:margin-right="0cm" fo:margin-top="0.11cm" fo:margin-bottom="0cm" fo:text-indent="0cm"/>
      <style:text-properties fo:font-size="22.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3.200000762939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gr21" style:family="graphic" style:parent-style-name="standard">
      <style:graphic-properties draw:stroke="none" svg:stroke-width="0cm" draw:fill="solid" draw:fill-color="#3333cc" draw:textarea-horizontal-align="justify" draw:textarea-vertical-align="middle" draw:auto-grow-height="false" draw:fit-to-size="false" style:shrink-to-fit="false" fo:min-height="1.033cm" fo:min-width="0.701cm" fo:padding-top="0.13cm" fo:padding-bottom="0.13cm" fo:padding-left="0.25cm" fo:padding-right="0.25cm" fo:wrap-option="no-wrap" style:writing-mode="lr-tb" loext:decorative="false"/>
      <style:paragraph-properties style:writing-mode="lr-tb"/>
    </style:style>
    <style:style style:name="Mgr22"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1.033cm" fo:min-width="0.401cm" fo:padding-top="0.13cm" fo:padding-bottom="0.13cm" fo:padding-left="0.25cm" fo:padding-right="0.25cm" fo:wrap-option="no-wrap" style:writing-mode="lr-tb" loext:decorative="false"/>
      <style:paragraph-properties style:writing-mode="lr-tb"/>
    </style:style>
    <style:style style:name="Mgr23" style:family="graphic" style:parent-style-name="standard">
      <style:graphic-properties draw:stroke="none" svg:stroke-width="0cm" draw:fill="solid" draw:fill-color="#ffcf01" draw:textarea-horizontal-align="justify" draw:textarea-vertical-align="middle" draw:auto-grow-height="false" draw:fit-to-size="false" style:shrink-to-fit="false" fo:min-height="1.038cm" fo:min-width="0.666cm" fo:padding-top="0.13cm" fo:padding-bottom="0.13cm" fo:padding-left="0.25cm" fo:padding-right="0.25cm" fo:wrap-option="no-wrap" style:writing-mode="lr-tb" loext:decorative="false"/>
      <style:paragraph-properties style:writing-mode="lr-tb"/>
    </style:style>
    <style:style style:name="Mgr24" style:family="graphic" style:parent-style-name="standard">
      <style:graphic-properties draw:stroke="none" svg:stroke-width="0cm" draw:fill="gradient" draw:fill-gradient-name="Gradient_20_2" draw:textarea-horizontal-align="justify" draw:textarea-vertical-align="middle" draw:auto-grow-height="false" draw:fit-to-size="false" style:shrink-to-fit="false" fo:min-height="1.038cm" fo:min-width="0.516cm" fo:padding-top="0.13cm" fo:padding-bottom="0.13cm" fo:padding-left="0.25cm" fo:padding-right="0.25cm" fo:wrap-option="no-wrap" style:writing-mode="lr-tb" loext:decorative="false"/>
      <style:paragraph-properties style:writing-mode="lr-tb"/>
    </style:style>
    <style:style style:name="Mgr25" style:family="graphic" style:parent-style-name="standard">
      <style:graphic-properties draw:stroke="none" svg:stroke-width="0cm" draw:fill="gradient" draw:fill-gradient-name="Gradient_20_3" draw:textarea-horizontal-align="justify" draw:textarea-vertical-align="middle" draw:auto-grow-height="false" draw:fit-to-size="false" style:shrink-to-fit="false" fo:min-height="0.906cm" fo:min-width="1.054cm" fo:padding-top="0.13cm" fo:padding-bottom="0.13cm" fo:padding-left="0.25cm" fo:padding-right="0.25cm" fo:wrap-option="no-wrap" style:writing-mode="lr-tb" loext:decorative="false"/>
      <style:paragraph-properties style:writing-mode="lr-tb"/>
    </style:style>
    <style:style style:name="Mgr26" style:family="graphic" style:parent-style-name="standard">
      <style:graphic-properties draw:stroke="none" svg:stroke-width="0cm" draw:fill="solid" draw:fill-color="#1c1c1c" draw:textarea-horizontal-align="justify" draw:textarea-vertical-align="middle" draw:auto-grow-height="false" draw:fit-to-size="false" style:shrink-to-fit="false" fo:min-height="2.647cm" fo:min-width="0cm" fo:padding-top="0.13cm" fo:padding-bottom="0.13cm" fo:padding-left="0.25cm" fo:padding-right="0.25cm" fo:wrap-option="no-wrap" style:writing-mode="lr-tb" loext:decorative="false"/>
      <style:paragraph-properties style:writing-mode="lr-tb"/>
    </style:style>
    <style:style style:name="Mgr27" style:family="graphic" style:parent-style-name="standard">
      <style:graphic-properties draw:stroke="none" svg:stroke-width="0cm" draw:fill="gradient" draw:fill-gradient-name="Gradient_20_4" draw:textarea-horizontal-align="justify" draw:textarea-vertical-align="middle" draw:auto-grow-height="false" draw:fit-to-size="false" style:shrink-to-fit="false" fo:min-height="0cm" fo:min-width="23.623cm" fo:padding-top="0.076cm" fo:padding-bottom="0.076cm" fo:padding-left="0.25cm" fo:padding-right="0.25cm" fo:wrap-option="no-wrap" style:writing-mode="lr-tb" loext:decorative="false"/>
      <style:paragraph-properties style:writing-mode="lr-tb"/>
    </style:style>
    <style:style style:name="Mgr28"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gr2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pr1"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2"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P23" style:family="paragraph">
      <loext:graphic-properties draw:fill="solid" draw:fill-color="#3333c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4" style:family="paragraph">
      <loext:graphic-properties draw:fill="gradient" draw:fill-gradient-name="Gradient_20_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5" style:family="paragraph">
      <loext:graphic-properties draw:fill="solid" draw:fill-color="#ffcf0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6" style:family="paragraph">
      <loext:graphic-properties draw:fill="gradient" draw:fill-gradient-name="Gradient_20_2"/>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7" style:family="paragraph">
      <loext:graphic-properties draw:fill="gradient" draw:fill-gradient-name="Gradient_20_3"/>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8" style:family="paragraph">
      <loext:graphic-properties draw:fill="solid" draw:fill-color="#1c1c1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9" style:family="paragraph">
      <loext:graphic-properties draw:fill="gradient" draw:fill-gradient-name="Gradient_20_4"/>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30" style:family="paragraph">
      <style:paragraph-properties fo:margin-left="0cm" fo:margin-right="0cm" fo:margin-top="0cm" fo:margin-bottom="0cm" fo:line-height="95%" fo:text-align="end" fo:text-indent="0cm" style:punctuation-wrap="simple" loext:tab-stop-distance="2.54cm" style:writing-mode="lr-tb">
        <style:tab-stops>
          <style:tab-stop style:position="0cm"/>
        </style:tab-stops>
      </style:paragraph-properties>
      <style:text-properties fo:font-size="18pt" fo:hyphenate="false"/>
    </style:style>
    <style:style style:name="MP31" style:family="paragraph">
      <loext:graphic-properties draw:fill="none"/>
      <style:paragraph-properties fo:margin-left="0cm" fo:margin-right="0cm" fo:margin-top="0cm" fo:margin-bottom="0cm" fo:line-height="95%" fo:text-align="end"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P34"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35" style:family="paragraph">
      <loext:graphic-properties draw:fill="none" draw:fill-color="#ffffff"/>
      <style:paragraph-properties fo:text-align="start" style:font-independent-line-spacing="true"/>
      <style:text-properties fo:font-size="12pt" style:font-size-asian="14pt" style:font-size-complex="14pt"/>
    </style:style>
    <style:style style:name="MP36" style:family="paragraph">
      <style:paragraph-properties fo:text-align="center"/>
      <style:text-properties fo:font-size="14pt" style:font-size-asian="14pt" style:font-size-complex="14pt"/>
    </style:style>
    <style:style style:name="MP3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4" style:font-size-asian="14pt" style:font-name-complex="DejaVu Sans4"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5"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style:master-page style:name="Vide_5f_" style:display-name="Vide_"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8"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_5f_-title" draw:layer="backgroundobjects" svg:width="26.729cm" svg:height="3.505cm" svg:x="1.484cm" svg:y="0.837cm" presentation:class="title" presentation:placeholder="true">
        <draw:text-box/>
      </draw:frame>
      <draw:frame presentation:style-name="Vide_5f_-outline1" draw:layer="backgroundobjects" svg:width="26.729cm" svg:height="12.179cm" svg:x="1.484cm" svg:y="4.913cm" presentation:class="outline" presentation:placeholder="true">
        <draw:text-box/>
      </draw:frame>
      <presentation:notes style:page-layout-name="PM0">
        <draw:page-thumbnail presentation:style-name="Vide_5f_-title" draw:layer="backgroundobjects" svg:width="0.048cm" svg:height="0.001cm" svg:x="0.001cm" svg:y="2.257cm" presentation:class="page"/>
        <draw:frame presentation:style-name="Vide_5f_-notes" draw:layer="backgroundobjects" svg:width="16.8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32"><text:span text:style-name="MT1"><presentation:header/></text:span></text:p>
          </draw:text-box>
        </draw:frame>
        <draw:frame presentation:style-name="Mpr1" draw:text-style-name="MP4" draw:layer="backgroundobjects" svg:width="9.113cm" svg:height="1.484cm" svg:x="11.886cm" svg:y="0cm" presentation:class="date-time">
          <draw:text-box>
            <text:p text:style-name="MP33"><text:span text:style-name="MT1"><presentation:date-time/></text:span></text:p>
          </draw:text-box>
        </draw:frame>
        <draw:frame presentation:style-name="Mpr2" draw:text-style-name="MP2" draw:layer="backgroundobjects" svg:width="9.113cm" svg:height="1.484cm" svg:x="0cm" svg:y="28.215cm" presentation:class="footer">
          <draw:text-box>
            <text:p text:style-name="MP32"><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Vide"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9"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title" draw:layer="backgroundobjects" svg:width="26.729cm" svg:height="3.505cm" svg:x="1.484cm" svg:y="0.837cm" presentation:class="title" presentation:placeholder="true">
        <draw:text-box/>
      </draw:frame>
      <draw:frame presentation:style-name="Vide-outline1" draw:layer="backgroundobjects" svg:width="26.729cm" svg:height="12.179cm" svg:x="1.484cm" svg:y="4.913cm" presentation:class="outline" presentation:placeholder="true">
        <draw:text-box/>
      </draw:frame>
      <presentation:notes style:page-layout-name="PM0">
        <draw:page-thumbnail presentation:style-name="Vide-title" draw:layer="backgroundobjects" svg:width="0.048cm" svg:height="0.001cm" svg:x="0.001cm" svg:y="2.257cm" presentation:class="page"/>
        <draw:frame presentation:style-name="Vide-notes" draw:layer="backgroundobjects" svg:width="16.8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32"><text:span text:style-name="MT1"><presentation:header/></text:span></text:p>
          </draw:text-box>
        </draw:frame>
        <draw:frame presentation:style-name="Mpr3" draw:text-style-name="MP4" draw:layer="backgroundobjects" svg:width="9.113cm" svg:height="1.484cm" svg:x="11.886cm" svg:y="0cm" presentation:class="date-time">
          <draw:text-box>
            <text:p text:style-name="MP33"><text:span text:style-name="MT1"><presentation:date-time/></text:span></text:p>
          </draw:text-box>
        </draw:frame>
        <draw:frame presentation:style-name="Mpr4" draw:text-style-name="MP2" draw:layer="backgroundobjects" svg:width="9.113cm" svg:height="1.484cm" svg:x="0cm" svg:y="28.215cm" presentation:class="footer">
          <draw:text-box>
            <text:p text:style-name="MP3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Blank"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5" draw:text-style-name="MP35" draw:layer="backgroundobjects" svg:width="6.929cm" svg:height="1.117cm" svg:x="1.485cm" svg:y="19.464cm" presentation:class="date-time" presentation:user-transformed="true">
        <draw:text-box>
          <text:p text:style-name="MP34"><text:span text:style-name="MT5"><presentation:date-time/></text:span></text:p>
        </draw:text-box>
      </draw:frame>
      <draw:frame draw:name="Footer Placeholder 2" presentation:style-name="Mpr5" draw:text-style-name="MP35" draw:layer="backgroundobjects" svg:width="9.403cm" svg:height="1.117cm" svg:x="10.147cm" svg:y="19.464cm" presentation:class="footer" presentation:user-transformed="true">
        <draw:text-box>
          <text:p text:style-name="MP36"><presentation:footer/></text:p>
        </draw:text-box>
      </draw:frame>
      <draw:frame draw:name="Slide Number Placeholder 3" presentation:style-name="Mpr5" draw:text-style-name="MP35" draw:layer="backgroundobjects" svg:width="6.929cm" svg:height="1.117cm" svg:x="21.284cm" svg:y="19.464cm" presentation:class="page-number" presentation:user-transformed="true">
        <draw:text-box>
          <text:p text:style-name="MP37"><text:span text:style-name="MT5"><text:page-number>&lt;numéro&gt;</text:page-number></text:span></text:p>
        </draw:text-box>
      </draw:frame>
      <draw:frame presentation:style-name="Blank-title" draw:layer="backgroundobjects" svg:width="26.729cm" svg:height="3.506cm" svg:x="1.484cm" svg:y="0.837cm" presentation:class="title" presentation:placeholder="true">
        <draw:text-box/>
      </draw:frame>
      <draw:frame presentation:style-name="Blank-outline1" draw:layer="backgroundobjects" svg:width="26.729cm" svg:height="12.179cm" svg:x="1.485cm" svg:y="4.913cm" presentation:class="outline" presentation:placeholder="true">
        <draw:text-box/>
      </draw:frame>
      <presentation:notes style:page-layout-name="PM0">
        <office:forms form:automatic-focus="false" form:apply-design-mode="false"/>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32"><presentation:header/></text:p>
          </draw:text-box>
        </draw:frame>
        <draw:frame presentation:style-name="Mpr6" draw:text-style-name="MP4" draw:layer="backgroundobjects" svg:width="9.113cm" svg:height="1.484cm" svg:x="11.886cm" svg:y="0cm" presentation:class="date-time">
          <draw:text-box>
            <text:p text:style-name="MP33"><presentation:date-time/></text:p>
          </draw:text-box>
        </draw:frame>
        <draw:frame presentation:style-name="Mpr7" draw:text-style-name="MP2" draw:layer="backgroundobjects" svg:width="9.113cm" svg:height="1.484cm" svg:x="0cm" svg:y="28.215cm" presentation:class="footer">
          <draw:text-box>
            <text:p text:style-name="MP32"><presentation:footer/></text:p>
          </draw:text-box>
        </draw:frame>
        <draw:frame presentation:style-name="Mpr7" draw:text-style-name="MP4" draw:layer="backgroundobjects" svg:width="9.113cm" svg:height="1.484cm" svg:x="11.886cm" svg:y="28.215cm" presentation:class="page-number">
          <draw:text-box>
            <text:p text:style-name="MP33"><text:page-number>&lt;numéro&gt;</text:page-number></text:p>
          </draw:text-box>
        </draw:frame>
      </presentation:notes>
    </style:master-page>
    <style:master-page style:name="DEFAULT"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26.729cm" svg:height="3.506cm" svg:x="1.485cm" svg:y="0.837cm" presentation:class="title" presentation:placeholder="true">
        <draw:text-box/>
      </draw:frame>
      <draw:frame presentation:style-name="DEFAULT-outline1" draw:layer="backgroundobjects" svg:width="26.729cm" svg:height="12.179cm" svg:x="1.485cm" svg:y="4.913cm" presentation:class="outline" presentation:placeholder="true">
        <draw:text-box/>
      </draw:frame>
      <presentation:notes style:page-layout-name="PM0">
        <office:forms form:automatic-focus="false" form:apply-design-mode="false"/>
        <draw:page-thumbnail presentation:style-name="DEFAULT-title" draw:layer="backgroundobjects" svg:width="21.825cm" svg:height="13.021cm" svg:x="0.661cm" svg:y="2.639cm" presentation:class="page"/>
        <draw:frame presentation:style-name="DEFAULT-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32"><presentation:header/></text:p>
          </draw:text-box>
        </draw:frame>
        <draw:frame presentation:style-name="Mpr8" draw:text-style-name="MP4" draw:layer="backgroundobjects" svg:width="10.046cm" svg:height="1.735cm" svg:x="13.102cm" svg:y="0cm" presentation:class="date-time">
          <draw:text-box>
            <text:p text:style-name="MP33"><presentation:date-time/></text:p>
          </draw:text-box>
        </draw:frame>
        <draw:frame presentation:style-name="Mpr9" draw:text-style-name="MP2" draw:layer="backgroundobjects" svg:width="10.046cm" svg:height="1.735cm" svg:x="0cm" svg:y="32.991cm" presentation:class="footer">
          <draw:text-box>
            <text:p text:style-name="MP32"><presentation:footer/></text:p>
          </draw:text-box>
        </draw:frame>
        <draw:frame presentation:style-name="Mpr9" draw:text-style-name="MP4" draw:layer="backgroundobjects" svg:width="10.046cm" svg:height="1.735cm" svg:x="13.102cm" svg:y="32.991cm" presentation:class="page-number">
          <draw:text-box>
            <text:p text:style-name="MP3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essagerie distribuée avec Kafka</dc:title>
    <dc:date>2026-05-05T17:29:47.824007844</dc:date>
    <meta:editing-cycles>3859</meta:editing-cycles>
    <meta:editing-duration>P75DT19H36M23S</meta:editing-duration>
    <meta:generator>LibreOffice/24.2.7.2$Linux_X86_64 LibreOffice_project/420$Build-2</meta:generator>
    <meta:print-date>2025-09-17T08:59:23.584446954</meta:print-date>
    <meta:printed-by>Fichiers PDF</meta:printed-by>
    <meta:document-statistic meta:object-count="1874"/>
  </office:meta>
</office:document-meta>
</file>