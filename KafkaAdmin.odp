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8000001CFDA410BBD.png" manifest:media-type="image/png"/>
  <manifest:file-entry manifest:full-path="Pictures/100000010000038F000001D048BCFD06.png" manifest:media-type="image/png"/>
  <manifest:file-entry manifest:full-path="Pictures/10000001000001FD00000338D9B9BD2F.png" manifest:media-type="image/png"/>
  <manifest:file-entry manifest:full-path="Pictures/TablePreview2.svm" manifest:media-type=""/>
  <manifest:file-entry manifest:full-path="Pictures/TablePreview1.svm" manifest:media-type=""/>
  <manifest:file-entry manifest:full-path="Pictures/100000010000062000000355C8F34CC3.png" manifest:media-type="image/png"/>
  <manifest:file-entry manifest:full-path="Pictures/10000001000003E9000002360842F6F0.png" manifest:media-type="image/png"/>
  <manifest:file-entry manifest:full-path="Pictures/100000010000030A00000274242AFF16.png" manifest:media-type="image/png"/>
  <manifest:file-entry manifest:full-path="Pictures/10000001000002FC0000024A32DCC4C5.png" manifest:media-type="image/png"/>
  <manifest:file-entry manifest:full-path="Pictures/10000001000005E60000031D3D250AAF.png" manifest:media-type="image/png"/>
  <manifest:file-entry manifest:full-path="Pictures/1000000100000AD1000004AEF47DE572.png" manifest:media-type="image/png"/>
  <manifest:file-entry manifest:full-path="Pictures/10000001000004EC0000027A89CF54CB.png" manifest:media-type="image/png"/>
  <manifest:file-entry manifest:full-path="Pictures/100000010000024600000192222575E2.png" manifest:media-type="image/png"/>
  <manifest:file-entry manifest:full-path="Pictures/1000000000000500000002D00D415DCF.png" manifest:media-type="image/png"/>
  <manifest:file-entry manifest:full-path="Pictures/10000001000006600000038573250FF0.png" manifest:media-type="image/png"/>
  <manifest:file-entry manifest:full-path="Pictures/1000000000000300000001A10D151138.png" manifest:media-type="image/png"/>
  <manifest:file-entry manifest:full-path="Pictures/100000010000042D00000383E3AA16A6.png" manifest:media-type="image/png"/>
  <manifest:file-entry manifest:full-path="Pictures/100000010000047F0000021CB0C6DDE3.png" manifest:media-type="image/png"/>
  <manifest:file-entry manifest:full-path="Pictures/100000000000026A000001EF6A727DA5.png" manifest:media-type="image/png"/>
  <manifest:file-entry manifest:full-path="Pictures/10000001000003BD0000026C12AB267E.png" manifest:media-type="image/png"/>
  <manifest:file-entry manifest:full-path="Pictures/10000001000005270000007C23643E04.png" manifest:media-type="image/png"/>
  <manifest:file-entry manifest:full-path="Pictures/100000010000030000000215F4C6714B.png" manifest:media-type="image/png"/>
  <manifest:file-entry manifest:full-path="Pictures/10000001000005870000007C39CFC6ED.png" manifest:media-type="image/png"/>
  <manifest:file-entry manifest:full-path="Pictures/10000001000002E6000002BEDC997BE6.png" manifest:media-type="image/png"/>
  <manifest:file-entry manifest:full-path="Pictures/10000001000005950000029671B5A3BA.png" manifest:media-type="image/png"/>
  <manifest:file-entry manifest:full-path="Pictures/10000000000001A00000010B99E34F5B.png" manifest:media-type="image/png"/>
  <manifest:file-entry manifest:full-path="Pictures/1000000100000735000003090E6462D1.png" manifest:media-type="image/png"/>
  <manifest:file-entry manifest:full-path="Pictures/100000010000062D00000362271446F0.png" manifest:media-type="image/png"/>
  <manifest:file-entry manifest:full-path="Pictures/10000001000002C6000001F577A322C2.png" manifest:media-type="image/png"/>
  <manifest:file-entry manifest:full-path="Pictures/10000000000001DA000000FC8E08F9E1.png" manifest:media-type="image/png"/>
  <manifest:file-entry manifest:full-path="Pictures/10000001000002C6000001F5A5AA6B72.png" manifest:media-type="image/png"/>
  <manifest:file-entry manifest:full-path="Pictures/100000000000093E00000474937D8F7C.png" manifest:media-type="image/png"/>
  <manifest:file-entry manifest:full-path="Pictures/10000001000003D3000001E5F6382571.png" manifest:media-type="image/png"/>
  <manifest:file-entry manifest:full-path="Pictures/100000010000073500000375CAE94E07.png" manifest:media-type="image/png"/>
  <manifest:file-entry manifest:full-path="Pictures/10000001000007350000037587DA9EE3.png" manifest:media-type="image/png"/>
  <manifest:file-entry manifest:full-path="Pictures/10000001000004FB00000283DDBC7E5B.png" manifest:media-type="image/png"/>
  <manifest:file-entry manifest:full-path="Pictures/1000000100000468000004E0069CD733.png" manifest:media-type="image/png"/>
  <manifest:file-entry manifest:full-path="Pictures/10000000000003DE000001B0B0EE38E8.png" manifest:media-type="image/png"/>
  <manifest:file-entry manifest:full-path="Pictures/10000001000003000000024F09C46404.png" manifest:media-type="image/png"/>
  <manifest:file-entry manifest:full-path="Pictures/10000001000002C60000024EE140356B.png" manifest:media-type="image/png"/>
  <manifest:file-entry manifest:full-path="Pictures/10000001000003D2000001A6E9FDD1E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ce style:name="Courier New" svg:font-family="'Courier New'" style:font-family-generic="modern" style:font-pitch="fixed"/>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FreeSans" svg:font-family="FreeSans" style:font-family-generic="roman"/>
    <style:font-face style:name="FreeSans1" svg:font-family="FreeSans" style:font-pitch="variable"/>
    <style:font-face style:name="FreeSans2" svg:font-family="FreeSans" style:font-family-generic="swiss"/>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pitch="variable"/>
    <style:font-face style:name="Lohit Devanagari" svg:font-family="'Lohit Devanagari'" style:font-family-generic="system" style:font-pitch="variable"/>
    <style:font-face style:name="Lohit Hindi" svg:font-family="'Lohit Hindi'" style:font-family-generic="roman"/>
    <style:font-face style:name="Lohit Hindi1" svg:font-family="'Lohit Hindi'" style:font-family-generic="roman" style:font-pitch="variable"/>
    <style:font-face style:name="Lohit Hindi2" svg:font-family="'Lohit Hindi'"/>
    <style:font-face style:name="Lohit Hindi3" svg:font-family="'Lohit Hindi'" style:font-family-generic="system" style:font-pitch="variable"/>
    <style:font-face style:name="Lucida Sans Unicode" svg:font-family="'Lucida Sans Unicode'" style:font-family-generic="roman" style:font-pitch="variable"/>
    <style:font-face style:name="Lucida Sans Unicode1" svg:font-family="'Lucida Sans Unicode'" style:font-family-generic="swiss" style:font-pitch="variable"/>
    <style:font-face style:name="Lucida Sans Unicode2" svg:font-family="'Lucida Sans Unicode'" style:font-family-generic="modern" style:font-pitch="fixed"/>
    <style:font-face style:name="Monospace"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Tahoma" svg:font-family="Tahoma" style:font-family-generic="swiss"/>
    <style:font-face style:name="Tahoma1" svg:font-family="Tahoma" style:font-family-generic="swiss" style:font-pitch="variable"/>
    <style:font-face style:name="Times New Roman" svg:font-family="'Times New Roman'" style:font-family-generic="roman" style:font-pitch="variable"/>
    <style:font-face style:name="WenQuanYi Micro Hei" svg:font-family="'WenQuanYi Micro Hei'" style:font-pitch="variable"/>
    <style:font-face style:name="WenQuanYi Micro Hei1"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display-header="true" presentation:display-footer="true" presentation:display-page-number="true" presentation:display-date-time="true"/>
    </style:style>
    <style:style style:name="dp6"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7" style:family="drawing-page">
      <style:drawing-page-properties presentation:transition-type="semi-automatic" presentation:visibility="hidden" presentation:background-visible="true" presentation:background-objects-visible="true" presentation:display-footer="true" presentation:display-page-number="true" presentation:display-date-time="true"/>
    </style:style>
    <style:style style:name="dp8" style:family="drawing-page">
      <style:drawing-page-properties presentation:display-header="true" presentation:display-footer="false" presentation:display-page-number="false" presentation:display-date-time="false"/>
    </style:style>
    <style:style style:name="dp9"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gr2" style:family="graphic">
      <style:graphic-properties style:protect="size" loext:decorative="false"/>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min-height="10.879cm" fo:min-width="15.251cm" fo:padding-top="0.13cm" fo:padding-bottom="0.13cm" fo:padding-left="0.25cm" fo:padding-right="0.25cm" fo:wrap-option="no-wrap" style:writing-mode="lr-tb"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1.611cm" fo:min-width="20.686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644cm" fo:min-width="13.621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806cm" fo:min-width="14.311cm" loext:decorative="false"/>
      <style:paragraph-properties style:writing-mode="lr-tb"/>
    </style:style>
    <style:style style:name="gr8" style:family="graphic" style:parent-style-name="Objet_20_sans_20_remplissage_20_et_20_sans_20_ligne_5f_2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0.966cm" fo:min-width="18.062cm" loext:decorative="false"/>
      <style:paragraph-properties style:writing-mode="lr-tb"/>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6.35cm, 0cm, 0cm, -1.61cm)" draw:image-opacity="100%" style:mirror="none" loext:decorative="fals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8.132cm, 0cm, 0cm, -1.014cm)" draw:image-opacity="100%" style:mirror="none" loext:decorative="false"/>
    </style:style>
    <style:style style:name="gr13" style:family="graphic" style:parent-style-name="standard">
      <style:graphic-properties draw:stroke="none" svg:stroke-color="#000000" draw:fill="none" draw:fill-color="#ffffff" draw:textarea-horizontal-align="left" draw:auto-grow-height="true" draw:auto-grow-width="false" fo:min-height="4.421cm" fo:min-width="0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846cm" fo:min-width="7.465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691cm" fo:min-width="22.164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381cm" fo:min-width="23.052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846cm" fo:min-width="21.27cm"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966cm" fo:min-width="10.962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966cm" fo:min-width="9.112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966cm" fo:min-width="14.184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2.896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3.861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806cm" fo:min-width="8.731cm" loext:decorative="false"/>
      <style:paragraph-properties style:writing-mode="lr-tb"/>
    </style:style>
    <style:style style:name="gr24" style:family="graphic" style:parent-style-name="standard">
      <style:graphic-properties draw:textarea-horizontal-align="justify" draw:textarea-vertical-align="middle" draw:auto-grow-height="false" fo:min-height="0.934cm" fo:min-width="3.348cm" style:writing-mode="lr-tb" loext:decorative="false"/>
      <style:paragraph-properties style:writing-mode="lr-tb"/>
    </style:style>
    <style:style style:name="gr25" style:family="graphic" style:parent-style-name="standard">
      <style:graphic-properties draw:textarea-horizontal-align="justify" draw:textarea-vertical-align="middle" draw:auto-grow-height="false" fo:min-height="1.14cm" fo:min-width="1.379cm" style:writing-mode="lr-tb" loext:decorative="false"/>
      <style:paragraph-properties style:writing-mode="lr-tb"/>
    </style:style>
    <style:style style:name="gr26" style:family="graphic" style:parent-style-name="objectwithoutfill">
      <style:graphic-properties draw:marker-end="Arrow" draw:marker-end-width="0.3cm" draw:fill="none" draw:textarea-vertical-align="middle" loext:decorative="false"/>
    </style:style>
    <style:style style:name="gr27" style:family="graphic" style:parent-style-name="standard">
      <style:graphic-properties draw:stroke="none" svg:stroke-color="#000000" draw:fill="none" draw:fill-color="#ffffff" draw:textarea-horizontal-align="left" draw:auto-grow-height="true" draw:auto-grow-width="true" fo:min-height="0.966cm" fo:min-width="9.019cm" loext:decorative="false"/>
      <style:paragraph-properties style:writing-mode="lr-tb"/>
    </style:style>
    <style:style style:name="gr28" style:family="graphic" style:parent-style-name="Style_20_de_20_dessin_20_par_20_défaut_5f_1">
      <style:graphic-properties draw:stroke="none" svg:stroke-color="#000000" draw:fill="none" draw:fill-color="#ffffff" draw:textarea-horizontal-align="left" draw:auto-grow-height="true" draw:auto-grow-width="true" fo:min-height="0.966cm" fo:min-width="19.89cm" loext:decorative="false"/>
      <style:paragraph-properties style:writing-mode="lr-tb"/>
    </style:style>
    <style:style style:name="gr29" style:family="graphic" style:parent-style-name="Style_20_de_20_dessin_20_par_20_défaut_5f_1_5f_1"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966cm" fo:min-width="12.296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806cm" fo:min-width="14.933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966cm" fo:min-width="8.24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966cm" fo:min-width="14.442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966cm" fo:min-width="11.233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966cm" fo:min-width="13.401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966cm" fo:min-width="10.695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966cm" fo:min-width="11.614cm" loext:decorative="false"/>
      <style:paragraph-properties style:writing-mode="lr-tb"/>
    </style:style>
    <style:style style:name="gr38" style:family="graphic" style:parent-style-name="standard">
      <style:graphic-properties loext:decorative="false"/>
    </style:style>
    <style:style style:name="gr39" style:family="graphic" style:parent-style-name="standard">
      <style:graphic-properties draw:stroke="none" svg:stroke-color="#000000" draw:fill="none" draw:fill-color="#ffffff" draw:textarea-horizontal-align="left" draw:auto-grow-height="true" draw:auto-grow-width="true" fo:min-height="0.966cm" fo:min-width="18.485cm" loext:decorative="false"/>
      <style:paragraph-properties style:writing-mode="lr-tb"/>
    </style:style>
    <style:style style:name="gr40" style:family="graphic" style:parent-style-name="Objet_20_sans_20_remplissage_20_et_20_sans_20_lig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1" style:family="graphic" style:parent-style-name="standard">
      <style:graphic-properties draw:stroke="none" svg:stroke-color="#000000" draw:fill="none" draw:fill-color="#ffffff" draw:textarea-horizontal-align="left" draw:auto-grow-height="true" draw:auto-grow-width="true" fo:min-height="0.966cm" fo:min-width="10.471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966cm" fo:min-width="3.672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966cm" fo:min-width="1.839cm"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966cm" fo:min-width="9.21cm" loext:decorative="false"/>
      <style:paragraph-properties style:writing-mode="lr-tb"/>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3.217cm" fo:min-width="0cm" fo:padding-top="0cm" fo:padding-bottom="0cm" fo:padding-left="0cm" fo:padding-right="0cm" fo:wrap-option="wrap" draw:shadow-color="#808080" loext:decorative="false"/>
      <style:paragraph-properties style:writing-mode="lr-tb"/>
    </style:style>
    <style:style style:name="pr2" style:family="presentation" style:parent-style-name="Standard-subtitle">
      <style:graphic-properties draw:stroke="none" draw:fill="none" draw:fill-color="#ffffff" draw:textarea-horizontal-align="justify" draw:textarea-vertical-align="middle" draw:auto-grow-height="true" draw:auto-grow-width="false" fo:min-height="3.927cm" fo:min-width="0cm" fo:padding-top="0cm" fo:padding-bottom="0cm" fo:padding-left="0cm" fo:padding-right="0cm" fo:wrap-option="wrap" draw:shadow-color="#808080" loext:decorative="false"/>
      <style:paragraph-properties style:writing-mode="lr-tb"/>
    </style:style>
    <style:style style:name="pr3" style:family="presentation" style:parent-style-name="Standard-notes">
      <style:graphic-properties draw:stroke="none" draw:fill="none" draw:fill-color="#ffffff" fo:min-height="11.26cm" loext:decorative="false"/>
      <style:paragraph-properties style:writing-mode="lr-tb"/>
    </style:style>
    <style:style style:name="pr4" style:family="presentation" style:parent-style-name="Standard-title">
      <style:graphic-properties draw:auto-grow-height="true" fo:min-height="3.575cm" loext:decorative="false"/>
      <style:paragraph-properties style:writing-mode="lr-tb"/>
    </style:style>
    <style:style style:name="pr5" style:family="presentation" style:parent-style-name="Standard-outline1">
      <style:graphic-properties fo:min-height="11.93cm" loext:decorative="false"/>
      <style:paragraph-properties style:writing-mode="lr-tb"/>
    </style:style>
    <style:style style:name="pr6" style:family="presentation" style:parent-style-name="Standard-notes">
      <style:graphic-properties draw:fill-color="#ffffff" fo:min-height="11.254cm" loext:decorative="false"/>
      <style:paragraph-properties style:writing-mode="lr-tb"/>
    </style:style>
    <style:style style:name="pr7" style:family="presentation" style:parent-style-name="Standard-title">
      <style:graphic-properties draw:stroke="none" draw:fill="none" draw:fill-color="#ffffff" draw:textarea-horizontal-align="justify" draw:textarea-vertical-align="middle" draw:auto-grow-height="true" draw:auto-grow-width="false" fo:min-height="3.575cm" fo:min-width="0cm" fo:padding-top="0cm" fo:padding-bottom="0cm" fo:padding-left="0cm" fo:padding-right="0cm" fo:wrap-option="wrap" draw:shadow-color="#808080" loext:decorative="false"/>
      <style:paragraph-properties style:writing-mode="lr-tb"/>
    </style:style>
    <style:style style:name="pr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9" style:family="presentation" style:parent-style-name="Standard-title">
      <style:graphic-properties fo:min-height="3.575cm" loext:decorative="false"/>
      <style:paragraph-properties style:writing-mode="lr-tb"/>
    </style:style>
    <style:style style:name="pr1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1" style:family="presentation" style:parent-style-name="Standard-title">
      <style:graphic-properties fo:min-height="3.577cm" loext:decorative="false"/>
      <style:paragraph-properties style:writing-mode="lr-tb"/>
    </style:style>
    <style:style style:name="pr12" style:family="presentation" style:parent-style-name="Standard-title">
      <style:graphic-properties fo:min-height="6.064cm" loext:decorative="false"/>
      <style:paragraph-properties style:writing-mode="lr-tb"/>
    </style:style>
    <style:style style:name="pr1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6"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7"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8" style:family="presentation" style:parent-style-name="Standard-subtitle" style:list-style-name="L1">
      <style:graphic-properties draw:stroke="none" draw:fill="none" draw:fill-color="#ffffff" draw:textarea-horizontal-align="justify" draw:textarea-vertical-align="top" draw:auto-grow-height="true" draw:auto-grow-width="false" fo:min-height="14.226cm" fo:min-width="0cm" fo:padding-top="0cm" fo:padding-bottom="0cm" fo:padding-left="0cm" fo:padding-right="0cm" fo:wrap-option="wrap" draw:shadow-color="#808080" loext:decorative="false"/>
      <style:paragraph-properties style:writing-mode="lr-tb"/>
    </style:style>
    <style:style style:name="pr19"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20"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21"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22"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23" style:family="presentation" style:parent-style-name="Vide_5f_-title">
      <style:graphic-properties draw:stroke="none" svg:stroke-width="0cm" draw:fill="none" loext:fill-use-slide-background="false" draw:textarea-horizontal-align="justify" draw:textarea-vertical-align="middle" draw:auto-grow-height="false" draw:fit-to-size="false" style:shrink-to-fit="false" fo:min-height="3.506cm" fo:padding-top="0cm" fo:padding-bottom="0cm" fo:padding-left="0cm" fo:padding-right="0cm" fo:wrap-option="wrap" loext:decorative="false"/>
      <style:paragraph-properties style:writing-mode="lr-tb"/>
    </style:style>
    <style:style style:name="pr24" style:family="presentation" style:parent-style-name="Vide_5f_-outline1">
      <style:graphic-properties draw:stroke="none" svg:stroke-width="0cm" draw:fill="none" loext:fill-use-slide-background="false" draw:textarea-horizontal-align="justify" draw:textarea-vertical-align="top" draw:auto-grow-height="false" draw:fit-to-size="false" style:shrink-to-fit="true" fo:min-height="11.928cm" fo:padding-top="0cm" fo:padding-bottom="0cm" fo:padding-left="0cm" fo:padding-right="0cm" fo:wrap-option="wrap" loext:decorative="false"/>
      <style:paragraph-properties style:writing-mode="lr-tb"/>
    </style:style>
    <style:style style:name="pr25" style:family="presentation" style:parent-style-name="Vide_5f_-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26" style:family="presentation" style:parent-style-name="Vide_5f_-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27"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2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9"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1"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2"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6"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7"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8" style:family="presentation" style:parent-style-name="Standard-subtitle">
      <style:graphic-properties draw:fill-color="#ffffff" fo:min-height="12.18cm" loext:decorative="false"/>
      <style:paragraph-properties style:writing-mode="lr-tb"/>
    </style:style>
    <style:style style:name="pr39"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co1" style:family="table-column">
      <style:table-column-properties style:column-width="10.43cm" style:use-optimal-column-width="false"/>
    </style:style>
    <style:style style:name="co2" style:family="table-column">
      <style:table-column-properties style:column-width="11.209cm" style:use-optimal-column-width="false"/>
    </style:style>
    <style:style style:name="co3" style:family="table-column">
      <style:table-column-properties style:column-width="5.361cm" style:use-optimal-column-width="false"/>
    </style:style>
    <style:style style:name="ro1" style:family="table-row">
      <style:table-row-properties style:row-height="1.222cm" style:use-optimal-row-height="false"/>
    </style:style>
    <style:style style:name="ro2" style:family="table-row">
      <style:table-row-properties style:row-height="2.292cm" style:use-optimal-row-height="false"/>
    </style:style>
    <style:style style:name="ro3" style:family="table-row">
      <style:table-row-properties style:row-height="1.785cm" style:use-optimal-row-height="false"/>
    </style:style>
    <style:style style:name="ro4" style:family="table-row">
      <style:table-row-properties style:row-height="1.224cm" style:use-optimal-row-height="false"/>
    </style:style>
    <style:style style:name="ro5" style:family="table-row">
      <style:table-row-properties style:row-height="1.678cm" style:use-optimal-row-height="false"/>
    </style:style>
    <style:style style:name="ro6" style:family="table-row">
      <style:table-row-properties style:row-height="2.541cm" style:use-optimal-row-height="false"/>
    </style:style>
    <style:style style:name="ro7" style:family="table-row">
      <style:table-row-properties style:row-height="2.969cm" style:use-optimal-row-height="false"/>
    </style:style>
    <style:style style:name="ro8" style:family="table-row">
      <style:table-row-properties style:row-height="1.615cm" style:use-optimal-row-height="false"/>
    </style:style>
    <style:style style:name="ce1"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6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6pt" style:language-asian="zh" style:country-asian="CN" style:font-style-asian="normal" style:font-weight-asian="normal" style:font-name-complex="DejaVu San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style:text-properties fo:font-size="16pt" style:font-size-asian="16pt" style:font-size-complex="16pt"/>
    </style:style>
    <style:style style:name="ce4"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paragraph-properties fo:margin-left="0cm" fo:margin-right="0cm" fo:line-height="95%" fo:text-indent="0cm" style:line-break="strict"/>
    </style:style>
    <style:style style:name="P2" style:family="paragraph">
      <loext:graphic-properties draw:fill="none" draw:fill-color="#ffffff"/>
      <style:paragraph-properties style:font-independent-line-spacing="true"/>
      <style:text-properties fo:font-size="40pt" style:font-size-asian="40pt" style:font-size-complex="40pt"/>
    </style:style>
    <style:style style:name="P3" style:family="paragraph">
      <style:paragraph-properties fo:margin-left="0.952cm" fo:margin-right="0cm" fo:line-height="95%" fo:text-indent="-0.864cm" style:line-break="strict"/>
    </style:style>
    <style:style style:name="P4" style:family="paragraph">
      <loext:graphic-properties draw:fill="none" draw:fill-color="#ffffff"/>
      <style:paragraph-properties style:font-independent-line-spacing="true"/>
    </style:style>
    <style:style style:name="P5" style:family="paragraph">
      <loext:graphic-properties draw:fill="solid" draw:fill-color="#ffffff"/>
      <style:paragraph-properties style:writing-mode="lr-tb" style:font-independent-line-spacing="true"/>
    </style:style>
    <style:style style:name="P6" style:family="paragraph">
      <loext:graphic-properties draw:fill="none" draw:fill-color="#ffffff"/>
    </style:style>
    <style:style style:name="P7" style:family="paragraph">
      <style:paragraph-properties fo:margin-top="0cm" fo:margin-bottom="0.2cm"/>
    </style:style>
    <style:style style:name="P8" style:family="paragraph">
      <style:paragraph-properties fo:margin-top="0cm" fo:margin-bottom="0.1cm"/>
    </style:style>
    <style:style style:name="P9" style:family="paragraph">
      <style:paragraph-properties fo:margin-left="0.952cm" fo:margin-right="0cm" fo:margin-top="0cm" fo:margin-bottom="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10" style:family="paragraph">
      <style:paragraph-properties fo:margin-left="2.063cm" fo:margin-right="0cm" fo:margin-top="0cm" fo:margin-bottom="0.1cm" fo:text-indent="-0.793cm"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11" style:family="paragraph">
      <style:paragraph-properties fo:margin-left="2.063cm" fo:margin-right="0cm" fo:margin-top="0cm" fo:margin-bottom="0.401cm" fo:text-indent="-0.793cm"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12" style:family="paragraph">
      <style:paragraph-properties fo:margin-top="0cm" fo:margin-bottom="0.1cm" fo:line-height="96%"/>
    </style:style>
    <style:style style:name="P13" style:family="paragraph">
      <loext:graphic-properties draw:fill-color="#ffffff"/>
    </style:style>
    <style:style style:name="P14" style:family="paragraph">
      <style:paragraph-properties fo:margin-left="0cm" fo:margin-right="0cm" fo:text-indent="0cm" style:line-break="strict"/>
    </style:style>
    <style:style style:name="P15" style:family="paragraph">
      <loext:graphic-properties draw:fill="none" draw:fill-color="#ffffff"/>
      <style:paragraph-properties fo:margin-left="0cm" fo:margin-right="0cm" fo:text-indent="0cm" style:line-break="strict" style:font-independent-line-spacing="true"/>
    </style:style>
    <style:style style:name="P16" style:family="paragraph">
      <loext:graphic-properties draw:fill="none" draw:fill-color="#ffffff"/>
      <style:paragraph-properties fo:margin-left="0.952cm" fo:margin-right="0cm" fo:line-height="95%" fo:text-indent="-0.864cm" style:line-break="strict" style:font-independent-line-spacing="true"/>
    </style:style>
    <style:style style:name="P17" style:family="paragraph">
      <loext:graphic-properties draw:fill="none" draw:fill-color="#ffffff"/>
      <style:text-properties fo:font-style="normal" style:font-style-asian="normal" style:font-style-complex="normal"/>
    </style:style>
    <style:style style:name="P18" style:family="paragraph">
      <loext:graphic-properties draw:fill-color="#ffffff"/>
      <style:text-properties fo:font-size="12pt"/>
    </style:style>
    <style:style style:name="P19" style:family="paragraph">
      <style:paragraph-properties fo:margin-left="0.952cm" fo:margin-right="0cm" fo:line-height="95%" fo:text-indent="-0.864cm"/>
    </style:style>
    <style:style style:name="P20" style:family="paragraph">
      <loext:graphic-properties draw:fill="none" draw:fill-color="#ffffff"/>
      <style:text-properties fo:font-style="italic" style:font-style-asian="italic" style:font-style-complex="italic"/>
    </style:style>
    <style:style style:name="P21" style:family="paragraph">
      <loext:graphic-properties draw:fill="none"/>
      <style:paragraph-properties fo:text-align="center"/>
    </style:style>
    <style:style style:name="P22" style:family="paragraph">
      <style:paragraph-properties fo:margin-left="0cm" fo:margin-right="0cm" fo:margin-top="0cm" fo:margin-bottom="0cm" fo:line-height="96%" fo:text-align="center" fo:text-indent="0cm" style:punctuation-wrap="simple"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3" style:family="paragraph">
      <loext:graphic-properties draw:fill="none"/>
    </style:style>
    <style:style style:name="P24" style:family="paragraph">
      <style:paragraph-properties fo:margin-left="0.952cm" fo:margin-right="0cm" fo:margin-top="0cm" fo:margin-bottom="0.5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5" style:family="paragraph">
      <style:paragraph-properties style:writing-mode="lr-tb"/>
    </style:style>
    <style:style style:name="P26" style:family="paragraph">
      <style:paragraph-properties fo:margin-top="0cm" fo:margin-bottom="0.2cm" fo:line-height="100%"/>
    </style:style>
    <style:style style:name="P27" style:family="paragraph">
      <loext:graphic-properties draw:fill="none" draw:fill-color="#ffffff"/>
      <style:text-properties style:font-name="Tahoma"/>
    </style:style>
    <style:style style:name="P28" style:family="paragraph">
      <style:paragraph-properties fo:margin-left="0.952cm" fo:margin-right="0cm" fo:margin-top="0cm" fo:margin-bottom="0cm" fo:line-height="95%" fo:text-align="center" fo:text-indent="-0.864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9" style:family="paragraph">
      <style:paragraph-properties fo:margin-left="0.952cm" fo:margin-right="0cm" fo:margin-top="0cm" fo:margin-bottom="0.502cm" fo:line-height="96%" fo:text-indent="-0.952cm"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0" style:family="paragraph">
      <style:paragraph-properties fo:margin-left="1cm" fo:margin-right="0cm" fo:margin-top="0cm" fo:margin-bottom="0.5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1" style:family="paragraph">
      <style:paragraph-properties fo:margin-left="1cm" fo:margin-right="0cm" fo:margin-top="0cm" fo:margin-bottom="0.401cm" fo:line-height="96%" fo:text-align="start" fo:text-indent="-0.793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32" style:family="paragraph">
      <style:paragraph-properties fo:margin-left="1cm" fo:margin-right="0cm" fo:margin-top="0cm" fo:margin-bottom="0.299cm" fo:line-height="96%" fo:text-align="start" fo:text-indent="-0.635cm" style:punctuation-wrap="simple" style:line-break="strict" loext:tab-stop-distance="0cm">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style>
    <style:style style:name="P33" style:family="paragraph">
      <style:paragraph-properties fo:margin-top="0cm" fo:margin-bottom="0.1cm" fo:line-height="100%"/>
    </style:style>
    <style:style style:name="P34" style:family="paragraph">
      <loext:graphic-properties draw:fill="none" draw:fill-color="#ffffff"/>
      <style:text-properties fo:color="#ce181e" loext:opacity="100%" fo:font-style="italic" fo:font-weight="bold" style:font-style-asian="italic" style:font-weight-asian="bold" style:font-style-complex="italic" style:font-weight-complex="bold"/>
    </style:style>
    <style:style style:name="P35" style:family="paragraph">
      <style:text-properties style:font-name="Courier New"/>
    </style:style>
    <style:style style:name="P36" style:family="paragraph">
      <style:paragraph-properties fo:margin-left="0.952cm" fo:margin-right="0cm" fo:margin-top="0cm" fo:margin-bottom="0.502cm" fo:text-indent="-0.952cm"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7" style:family="paragraph">
      <style:text-properties fo:font-weight="normal" style:font-weight-asian="normal" style:font-weight-complex="normal"/>
    </style:style>
    <style:style style:name="P38" style:family="paragraph">
      <style:paragraph-properties fo:margin-left="2.063cm" fo:margin-right="0cm" fo:margin-top="0cm" fo:margin-bottom="0.401cm" fo:line-height="96%" fo:text-align="start" fo:text-indent="-0.793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39" style:family="paragraph">
      <style:paragraph-properties fo:margin-top="0cm" fo:margin-bottom="0.1cm" fo:line-height="100%"/>
      <style:text-properties style:font-name="Courier new"/>
    </style:style>
    <style:style style:name="P40" style:family="paragraph">
      <loext:graphic-properties draw:fill="none" draw:fill-color="#ffffff"/>
      <style:text-properties fo:font-size="24pt"/>
    </style:style>
    <style:style style:name="P41" style:family="paragraph">
      <style:paragraph-properties fo:text-align="center" style:writing-mode="lr-tb"/>
    </style:style>
    <style:style style:name="P42" style:family="paragraph">
      <style:paragraph-properties fo:margin-left="0cm" fo:margin-right="0cm" fo:margin-top="0cm" fo:margin-bottom="0cm" fo:line-height="96%" fo:text-align="center" fo:text-indent="0cm" style:punctuation-wrap="simple" loext:tab-stop-distance="0cm" style:writing-mode="lr-tb">
        <style:tab-stops>
          <style:tab-stop style:position="0cm"/>
        </style:tab-stops>
      </style:paragraph-properties>
    </style:style>
    <style:style style:name="P43" style:family="paragraph">
      <loext:graphic-properties draw:fill="none"/>
      <style:paragraph-properties fo:text-align="start" style:font-independent-line-spacing="true"/>
      <style:text-properties fo:font-size="44pt"/>
    </style:style>
    <style:style style:name="P44" style:family="paragraph">
      <style:paragraph-properties fo:margin-left="0.952cm" fo:margin-right="0cm" fo:margin-top="0cm" fo:margin-bottom="0.502cm" fo:line-height="96%" fo:text-align="start" fo:text-indent="-0.952cm" style:punctuation-wrap="simple" loext:tab-stop-distance="0cm" style:writing-mode="lr-tb">
        <style:tab-stops>
          <style:tab-stop style:position="0cm"/>
        </style:tab-stops>
      </style:paragraph-properties>
    </style:style>
    <style:style style:name="P45" style:family="paragraph">
      <style:paragraph-properties fo:margin-left="0cm" fo:margin-right="0cm" fo:margin-top="0cm" fo:margin-bottom="0.502cm" fo:line-height="96%"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style>
    <style:style style:name="P46" style:family="paragraph">
      <style:paragraph-properties fo:margin-left="0cm" fo:margin-right="0cm" fo:margin-top="0cm" fo:margin-bottom="0.502cm" fo:line-height="96%" fo:text-align="start" fo:text-indent="0cm" style:punctuation-wrap="simple" loext:tab-stop-distance="0cm" style:writing-mode="lr-tb">
        <style:tab-stops>
          <style:tab-stop style:position="0cm"/>
        </style:tab-stops>
      </style:paragraph-properties>
    </style:style>
    <style:style style:name="P47" style:family="paragraph">
      <loext:graphic-properties draw:fill="none"/>
      <style:paragraph-properties fo:text-align="start" style:font-independent-line-spacing="true"/>
      <style:text-properties fo:font-size="32pt"/>
    </style:style>
    <style:style style:name="P4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49"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50"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51" style:family="paragraph">
      <style:paragraph-properties fo:margin-left="0.952cm" fo:margin-right="0cm" fo:margin-top="0cm" fo:margin-bottom="0.502cm" fo:line-height="120%" fo:text-align="start" fo:text-indent="-0.952cm" style:punctuation-wrap="simple" loext:tab-stop-distance="0cm" style:writing-mode="lr-tb">
        <style:tab-stops>
          <style:tab-stop style:position="0cm"/>
        </style:tab-stops>
      </style:paragraph-properties>
    </style:style>
    <style:style style:name="P52" style:family="paragraph">
      <style:paragraph-properties fo:margin-left="0cm" fo:margin-right="0cm" fo:margin-top="0cm" fo:margin-bottom="0.502cm" fo:line-height="120%"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style>
    <style:style style:name="P53" style:family="paragraph">
      <style:paragraph-properties fo:margin-top="0cm" fo:margin-bottom="0.1cm" fo:line-height="100%"/>
      <style:text-properties style:font-name="Courier New"/>
    </style:style>
    <style:style style:name="P54" style:family="paragraph">
      <style:paragraph-properties fo:margin-top="0cm" fo:margin-bottom="0.1cm" fo:line-height="100%" style:text-autospace="none"/>
    </style:style>
    <style:style style:name="P55" style:family="paragraph">
      <style:paragraph-properties fo:margin-top="0cm" fo:margin-bottom="0.2cm" fo:line-height="100%"/>
      <style:text-properties style:font-name="Courier New"/>
    </style:style>
    <style:style style:name="P56" style:family="paragraph">
      <style:paragraph-properties fo:margin-left="0.952cm" fo:margin-right="0cm" fo:margin-top="0cm" fo:margin-bottom="0.1cm" fo:line-height="100%"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57" style:family="paragraph">
      <style:text-properties fo:font-style="italic" style:font-style-asian="italic" style:font-style-complex="italic"/>
    </style:style>
    <style:style style:name="P58"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6pt" fo:letter-spacing="normal" fo:language="fr" fo:country="FR" fo:font-style="normal" fo:text-shadow="none" style:text-underline-style="none" fo:font-weight="normal" style:text-underline-mode="continuous" style:text-overline-mode="continuous" style:text-line-through-mode="continuous" fo:background-color="transparent" style:font-name-asian="DejaVu Sans" style:font-size-asian="16pt" style:language-asian="zh" style:country-asian="CN" style:font-style-asian="normal" style:font-weight-asian="normal" style:font-name-complex="DejaVu San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59"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0" style:family="paragraph">
      <style:text-properties style:font-size-asian="16pt" style:font-size-complex="16pt"/>
    </style:style>
    <style:style style:name="P61" style:family="paragraph">
      <style:text-properties fo:font-size="16pt" style:font-size-asian="16pt" style:font-size-complex="16pt"/>
    </style:style>
    <style:style style:name="P62"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63" style:family="paragraph">
      <style:paragraph-properties fo:margin-left="0.952cm" fo:margin-right="0cm" fo:margin-top="0cm" fo:margin-bottom="0cm" fo:line-height="96%" fo:text-align="center"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64" style:family="paragraph">
      <style:paragraph-properties fo:margin-top="0cm" fo:margin-bottom="0.7cm"/>
    </style:style>
    <style:style style:name="P65" style:family="paragraph">
      <loext:graphic-properties draw:fill="none" draw:fill-color="#ffffff"/>
      <style:text-properties fo:color="#c9211e" loext:opacity="100%" fo:font-style="italic" fo:font-weight="bold" style:font-style-asian="italic" style:font-weight-asian="bold" style:font-style-complex="italic" style:font-weight-complex="bold"/>
    </style:style>
    <style:style style:name="T1" style:family="text">
      <style:text-properties fo:font-size="40pt" fo:language="fr" fo:country="FR" style:font-size-asian="40pt" style:font-size-complex="40pt"/>
    </style:style>
    <style:style style:name="T2" style:family="text">
      <style:text-properties fo:language="fr" fo:country="FR"/>
    </style:style>
    <style:style style:name="T3" style:family="text">
      <style:text-properties fo:font-size="42pt" fo:font-weight="bold" style:font-size-asian="42pt" style:font-weight-asian="bold" style:font-size-complex="42pt" style:font-weight-complex="bold"/>
    </style:style>
    <style:style style:name="T4" style:family="text">
      <style:text-properties fo:font-size="26pt" style:font-size-asian="26pt" style:font-size-complex="26pt"/>
    </style:style>
    <style:style style:name="T5" style:family="text">
      <style:text-properties fo:font-size="28pt" style:font-size-asian="28pt" style:font-size-complex="28pt"/>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12pt" style:font-size-asian="12pt" style:font-size-complex="12pt"/>
    </style:style>
    <style:style style:name="T9" style:family="text">
      <style:text-properties fo:font-size="9pt" style:font-size-asian="9pt" style:font-size-complex="9pt"/>
    </style:style>
    <style:style style:name="T10" style:family="text">
      <style:text-properties fo:font-size="11pt" style:font-size-asian="11pt" style:font-size-complex="11pt"/>
    </style:style>
    <style:style style:name="T11" style:family="text">
      <style:text-properties fo:font-size="48pt" fo:language="fr" fo:country="FR" style:font-size-asian="48pt" style:font-size-complex="48pt"/>
    </style:style>
    <style:style style:name="T12" style:family="text">
      <style:text-properties fo:color="#0d1f63" loext:opacity="100%" fo:language="fr" fo:country="FR" fo:font-weight="bold" style:font-weight-asian="bold" style:font-weight-complex="bold"/>
    </style:style>
    <style:style style:name="T13" style:family="text">
      <style:text-properties fo:language="fr" fo:country="FR"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style:text-position="super 58%" fo:font-size="28pt" style:font-size-asian="28pt" style:font-size-complex="28pt"/>
    </style:style>
    <style:style style:name="T16" style:family="text">
      <style:text-properties fo:font-size="20pt" fo:font-style="normal" style:font-size-asian="20pt" style:font-style-asian="normal" style:font-size-complex="20pt" style:font-style-complex="normal"/>
    </style:style>
    <style:style style:name="T17" style:family="text">
      <style:text-properties fo:font-size="20pt" fo:font-style="italic" style:font-size-asian="20pt" style:font-style-asian="italic" style:font-size-complex="20pt" style:font-style-complex="italic"/>
    </style:style>
    <style:style style:name="T18" style:family="text">
      <style:text-properties fo:color="#355269" loext:opacity="100%" fo:font-weight="bold" style:font-weight-asian="bold" style:font-weight-complex="bold"/>
    </style:style>
    <style:style style:name="T19" style:family="text">
      <style:text-properties fo:color="#2a6099" loext:opacity="100%" fo:font-style="italic" fo:font-weight="bold" style:font-style-asian="italic" style:font-weight-asian="bold" style:font-style-complex="italic" style:font-weight-complex="bold"/>
    </style:style>
    <style:style style:name="T20" style:family="text">
      <style:text-properties fo:color="#2a6099" loext:opacity="100%" style:text-position="super 58%" fo:font-style="italic" fo:font-weight="bol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color="#2a6099" loext:opacity="100%" fo:font-weight="bold" style:font-weight-asian="bold" style:font-weight-complex="bold"/>
    </style:style>
    <style:style style:name="T23" style:family="text">
      <style:text-properties fo:font-size="16pt" fo:font-style="italic" style:font-size-asian="16pt" style:font-style-asian="italic" style:font-size-complex="16pt" style:font-style-complex="italic"/>
    </style:style>
    <style:style style:name="T24" style:family="text">
      <style:text-properties fo:font-size="40pt" style:font-size-asian="40pt" style:font-size-complex="40pt"/>
    </style:style>
    <style:style style:name="T25" style:family="text">
      <style:text-properties fo:font-size="36pt" fo:font-style="italic" style:font-size-asian="36pt" style:font-style-asian="italic" style:font-size-complex="36pt" style:font-style-complex="italic"/>
    </style:style>
    <style:style style:name="T26" style:family="text">
      <style:text-properties fo:color="#000000" loext:opacity="100%" style:text-outline="false" style:text-line-through-style="none" style:text-line-through-type="none" style:text-position="0% 100%" style:font-name="Tahoma1" fo:font-size="32pt" fo:font-style="normal" fo:text-shadow="none" style:text-underline-style="none" fo:font-weight="normal" style:font-name-asian="Lucida Sans Unicode1" style:font-size-asian="32pt" style:font-style-asian="normal" style:font-weight-asian="normal" style:font-name-complex="Lucida Sans Unicode1" style:font-size-complex="32pt" style:font-style-complex="normal" style:font-weight-complex="normal" style:text-emphasize="none" style:font-relief="none" style:text-overline-style="none" style:text-overline-color="font-color"/>
    </style:style>
    <style:style style:name="T27" style:family="text">
      <style:text-properties fo:font-size="24pt" style:font-size-asian="24pt" style:font-size-complex="24pt"/>
    </style:style>
    <style:style style:name="T28" style:family="text">
      <style:text-properties fo:font-size="24pt" fo:font-style="italic" style:font-size-asian="24pt" style:font-style-asian="italic" style:font-size-complex="24pt" style:font-style-complex="italic"/>
    </style:style>
    <style:style style:name="T29" style:family="text">
      <style:text-properties fo:font-size="36pt" style:font-size-asian="36pt" style:font-size-complex="36pt"/>
    </style:style>
    <style:style style:name="T30" style:family="text">
      <style:text-properties fo:language="fr" fo:country="FR" fo:font-style="italic" style:font-style-asian="italic" style:font-style-complex="italic"/>
    </style:style>
    <style:style style:name="T31" style:family="text">
      <style:text-properties fo:color="#0d1f63" loext:opacity="100%" fo:font-style="italic" fo:font-weight="bold" style:font-style-asian="italic" style:font-weight-asian="bold" style:font-style-complex="italic" style:font-weight-complex="bold"/>
    </style:style>
    <style:style style:name="T32" style:family="text">
      <style:text-properties fo:color="#182f7c" loext:opacity="100%" fo:font-style="italic" fo:font-weight="bold" style:font-style-asian="italic" style:font-weight-asian="bold" style:font-style-complex="italic" style:font-weight-complex="bold"/>
    </style:style>
    <style:style style:name="T33" style:family="text">
      <style:text-properties fo:color="#000000" loext:opacity="100%" style:text-outline="false" style:text-line-through-style="none" style:text-line-through-type="none" style:text-position="super 58%" style:font-name="Tahoma1" fo:font-size="32pt" fo:font-style="normal" fo:text-shadow="none" style:text-underline-style="none" fo:font-weight="normal" style:font-name-asian="Lucida Sans Unicode1" style:font-size-asian="32pt" style:font-style-asian="normal" style:font-weight-asian="normal" style:font-name-complex="Lucida Sans Unicode1" style:font-size-complex="32pt" style:font-style-complex="normal" style:font-weight-complex="normal" style:text-emphasize="none" style:font-relief="none" style:text-overline-style="none" style:text-overline-color="font-color"/>
    </style:style>
    <style:style style:name="T34" style:family="text">
      <style:text-properties fo:color="#000000" loext:opacity="100%" style:text-outline="false" style:text-line-through-style="none" style:text-line-through-type="none" style:text-position="0% 100%" style:font-name="Times New Roman" fo:font-size="24pt" fo:font-style="normal" fo:text-shadow="none" style:text-underline-style="none" fo:font-weight="normal" style:font-name-asian="Lucida Sans Unicode1" style:font-size-asian="24pt" style:font-style-asian="normal" style:font-weight-asian="normal" style:font-name-complex="Lucida Sans Unicode1" style:font-size-complex="24pt" style:font-style-complex="normal" style:font-weight-complex="normal" style:text-emphasize="none" style:font-relief="none" style:text-overline-style="none" style:text-overline-color="font-color"/>
    </style:style>
    <style:style style:name="T35" style:family="text">
      <style:text-properties fo:font-size="20pt" style:font-size-asian="20pt" style:font-size-complex="20pt"/>
    </style:style>
    <style:style style:name="T36" style:family="text">
      <style:text-properties fo:color="#0d1f63" loext:opacity="100%" fo:font-size="36pt" fo:font-weight="bold" style:font-size-asian="36pt" style:font-weight-asian="bold" style:font-size-complex="36pt" style:font-weight-complex="bold"/>
    </style:style>
    <style:style style:name="T37" style:family="text">
      <style:text-properties fo:font-size="21pt" style:font-size-asian="21pt" style:font-size-complex="21pt"/>
    </style:style>
    <style:style style:name="T38" style:family="text">
      <style:text-properties fo:color="#0d1f63" loext:opacity="100%" fo:font-weight="bold" style:font-weight-asian="bold" style:font-weight-complex="bold"/>
    </style:style>
    <style:style style:name="T39" style:family="text">
      <style:text-properties fo:color="#000000" loext:opacity="100%" fo:font-style="normal" fo:font-weight="normal" style:font-style-asian="normal" style:font-weight-asian="normal" style:font-style-complex="normal" style:font-weight-complex="normal"/>
    </style:style>
    <style:style style:name="T40" style:family="text">
      <style:text-properties fo:color="#182f7c" loext:opacity="100%" fo:font-weight="bold" style:font-weight-asian="bold" style:font-weight-complex="bold"/>
    </style:style>
    <style:style style:name="T41" style:family="text">
      <style:text-properties fo:color="#000099" loext:opacity="100%" fo:font-weight="bold" style:font-weight-asian="bold" style:font-weight-complex="bold"/>
    </style:style>
    <style:style style:name="T42" style:family="text">
      <style:text-properties style:font-name="Tahoma" fo:font-size="22pt" style:font-size-asian="22pt" style:font-size-complex="22pt"/>
    </style:style>
    <style:style style:name="T43" style:family="text">
      <style:text-properties style:font-name="Tahoma" fo:font-size="22pt" fo:font-style="italic" style:font-size-asian="22pt" style:font-style-asian="italic" style:font-size-complex="22pt" style:font-style-complex="italic"/>
    </style:style>
    <style:style style:name="T44" style:family="text">
      <style:text-properties fo:color="#182f7c" loext:opacity="100%" style:text-position="super 58%" fo:font-weight="bold" style:font-weight-asian="bold" style:font-weight-complex="bold"/>
    </style:style>
    <style:style style:name="T45" style:family="text">
      <style:text-properties fo:font-size="21pt" fo:font-style="italic" style:font-size-asian="21pt" style:font-style-asian="italic" style:font-size-complex="21pt" style:font-style-complex="italic"/>
    </style:style>
    <style:style style:name="T46" style:family="text">
      <style:text-properties fo:language="fr" fo:country="FR" fo:font-style="italic" fo:font-weight="normal" style:font-style-asian="italic" style:font-weight-asian="normal" style:font-style-complex="italic" style:font-weight-complex="normal"/>
    </style:style>
    <style:style style:name="T47" style:family="text">
      <style:text-properties fo:color="#000000" loext:opacity="100%" style:text-outline="false" style:text-line-through-style="none" style:text-line-through-type="none" style:text-position="0% 100%" style:font-name="Tahoma1" fo:font-size="28pt" fo:font-style="normal" fo:text-shadow="none" style:text-underline-style="none" fo:font-weight="normal" style:font-name-asian="Lucida Sans Unicode1" style:font-size-asian="28pt" style:font-style-asian="normal" style:font-weight-asian="normal" style:font-name-complex="Lucida Sans Unicode1" style:font-size-complex="28pt" style:font-style-complex="normal" style:font-weight-complex="normal" style:text-emphasize="none" style:font-relief="none" style:text-overline-style="none" style:text-overline-color="font-color"/>
    </style:style>
    <style:style style:name="T48" style:family="text">
      <style:text-properties fo:color="#000099" loext:opacity="100%" style:text-position="super 58%" fo:font-weight="bold" style:font-weight-asian="bold" style:font-weight-complex="bold"/>
    </style:style>
    <style:style style:name="T49" style:family="text">
      <style:text-properties style:text-position="super 58%"/>
    </style:style>
    <style:style style:name="T50" style:family="text">
      <style:text-properties fo:color="#000099" loext:opacity="100%" fo:font-style="italic" fo:font-weight="bold" style:font-style-asian="italic" style:font-weight-asian="bold" style:font-style-complex="italic" style:font-weight-complex="bold"/>
    </style:style>
    <style:style style:name="T51" style:family="text">
      <style:text-properties fo:color="#000099" loext:opacity="100%" style:text-position="super 58%" fo:font-style="italic" fo:font-weight="bold" style:font-style-asian="italic" style:font-weight-asian="bold" style:font-style-complex="italic" style:font-weight-complex="bold"/>
    </style:style>
    <style:style style:name="T52" style:family="text">
      <style:text-properties style:font-name="Courier New" fo:font-size="18pt" fo:font-style="italic" style:font-size-asian="18pt" style:font-style-asian="italic" style:font-size-complex="18pt" style:font-style-complex="italic"/>
    </style:style>
    <style:style style:name="T53" style:family="text">
      <style:text-properties fo:color="#000000" loext:opacity="100%" style:text-outline="false" style:text-line-through-style="none" style:text-line-through-type="none" style:text-position="0% 100%" style:font-name="Times New Roman" fo:font-size="20pt" fo:font-style="normal" fo:text-shadow="none" style:text-underline-style="none" fo:font-weight="normal" style:font-name-asian="Lucida Sans Unicode1" style:font-size-asian="20pt" style:font-style-asian="normal" style:font-weight-asian="normal" style:font-name-complex="Lucida Sans Unicode1" style:font-size-complex="20pt" style:font-style-complex="normal" style:font-weight-complex="normal" style:text-emphasize="none" style:font-relief="none" style:text-overline-style="none" style:text-overline-color="font-color"/>
    </style:style>
    <style:style style:name="T54" style:family="text">
      <style:text-properties fo:color="#000000" loext:opacity="100%" style:text-outline="false" style:text-line-through-style="none" style:text-line-through-type="none" style:text-position="0% 100%" style:font-name="Times New Roman" fo:font-size="20pt" fo:font-style="italic" fo:text-shadow="none" style:text-underline-style="none" fo:font-weight="bold" style:font-name-asian="Lucida Sans Unicode1" style:font-size-asian="20pt" style:font-style-asian="italic" style:font-weight-asian="bold" style:font-name-complex="Lucida Sans Unicode1" style:font-size-complex="20pt" style:font-style-complex="italic" style:font-weight-complex="bold" style:text-emphasize="none" style:font-relief="none" style:text-overline-style="none" style:text-overline-color="font-color"/>
    </style:style>
    <style:style style:name="T55" style:family="text">
      <style:text-properties style:font-name="Courier New" fo:font-size="14pt" fo:font-style="italic" style:font-size-asian="14pt" style:font-style-asian="italic" style:font-size-complex="14pt" style:font-style-complex="italic"/>
    </style:style>
    <style:style style:name="T56" style:family="text">
      <style:text-properties fo:color="#0d1f63" loext:opacity="100%" style:text-outline="false" style:text-line-through-style="none" style:text-line-through-type="none" style:text-position="0% 100%" style:font-name="Tahoma1" fo:font-size="32pt" fo:font-style="italic" fo:text-shadow="none" style:text-underline-style="none" fo:font-weight="bold" style:font-name-asian="Lucida Sans Unicode1" style:font-size-asian="32pt" style:font-style-asian="italic" style:font-weight-asian="normal" style:font-name-complex="Lucida Sans Unicode1" style:font-size-complex="32pt" style:font-style-complex="italic" style:font-weight-complex="bold" style:text-emphasize="none" style:font-relief="none" style:text-overline-style="none" style:text-overline-color="font-color"/>
    </style:style>
    <style:style style:name="T57" style:family="text">
      <style:text-properties fo:color="#0d1f63" loext:opacity="100%" fo:font-style="italic" fo:font-weight="bold" style:font-style-asian="italic" style:font-style-complex="italic" style:font-weight-complex="bold"/>
    </style:style>
    <style:style style:name="T58" style:family="text">
      <style:text-properties fo:color="#000000" loext:opacity="100%" style:text-outline="false" style:text-line-through-style="none" style:text-line-through-type="none" style:text-position="0% 100%" style:font-name="Tahoma1" fo:font-size="32pt" fo:font-style="italic" fo:text-shadow="none" style:text-underline-style="none" fo:font-weight="normal" style:font-name-asian="Lucida Sans Unicode1" style:font-size-asian="32pt" style:font-style-asian="italic" style:font-weight-asian="normal" style:font-name-complex="Lucida Sans Unicode1" style:font-size-complex="32pt" style:font-style-complex="italic" style:font-weight-complex="normal" style:text-emphasize="none" style:font-relief="none" style:text-overline-style="none" style:text-overline-color="font-color"/>
    </style:style>
    <style:style style:name="T59" style:family="text">
      <style:text-properties fo:color="#0d1f63" loext:opacity="100%" style:text-outline="false" style:text-line-through-style="none" style:text-line-through-type="none" style:text-position="0% 100%" style:font-name="Tahoma1" fo:font-size="24pt" fo:font-style="italic" fo:text-shadow="none" style:text-underline-style="none" fo:font-weight="bold" style:font-name-asian="Lucida Sans Unicode1" style:font-size-asian="24pt" style:font-style-asian="italic" style:font-weight-asian="bold" style:font-name-complex="Lucida Sans Unicode1" style:font-size-complex="24pt" style:font-style-complex="italic" style:font-weight-complex="bold" style:text-emphasize="none" style:font-relief="none" style:text-overline-style="none" style:text-overline-color="font-color"/>
    </style:style>
    <style:style style:name="T60" style:family="text">
      <style:text-properties fo:color="#000000" loext:opacity="100%" style:text-outline="false" style:text-line-through-style="none" style:text-line-through-type="none" style:text-position="0% 100%" style:font-name="Tahoma1" fo:font-size="28pt" fo:font-style="italic" fo:text-shadow="none" style:text-underline-style="none" fo:font-weight="normal" style:font-name-asian="Lucida Sans Unicode1" style:font-size-asian="28pt" style:font-style-asian="italic" style:font-weight-asian="normal" style:font-name-complex="Lucida Sans Unicode1" style:font-size-complex="28pt" style:font-style-complex="italic" style:font-weight-complex="normal" style:text-emphasize="none" style:font-relief="none" style:text-overline-style="none" style:text-overline-color="font-color"/>
    </style:style>
    <style:style style:name="T61" style:family="text">
      <style:text-properties style:font-name="Courier new" fo:font-size="20pt" style:font-size-asian="20pt" style:font-size-complex="20pt"/>
    </style:style>
    <style:style style:name="T62" style:family="text">
      <style:text-properties fo:color="#000000" loext:opacity="100%" style:text-outline="false" style:text-line-through-style="none" style:text-line-through-type="none" style:text-position="0% 100%" style:font-name="Courier new" fo:font-size="20pt" fo:font-style="normal" fo:text-shadow="none" style:text-underline-style="none" fo:font-weight="normal" style:font-name-asian="Lucida Sans Unicode1" style:font-size-asian="20pt" style:font-style-asian="normal" style:font-weight-asian="normal" style:font-name-complex="Lucida Sans Unicode1" style:font-size-complex="20pt" style:font-style-complex="normal" style:font-weight-complex="normal" style:text-emphasize="none" style:font-relief="none" style:text-overline-style="none" style:text-overline-color="font-color"/>
    </style:style>
    <style:style style:name="T63" style:family="text">
      <style:text-properties fo:color="#000099" loext:opacity="100%" style:font-name="Courier new" fo:font-size="20pt" fo:font-weight="bold" style:font-size-asian="20pt" style:font-weight-asian="bold" style:font-size-complex="20pt" style:font-weight-complex="bold"/>
    </style:style>
    <style:style style:name="T64" style:family="text">
      <style:text-properties style:font-name="Courier New" fo:font-size="22pt" style:font-size-asian="22pt" style:font-size-complex="22pt"/>
    </style:style>
    <style:style style:name="T65" style:family="text">
      <style:text-properties style:font-name="Courier New" fo:font-size="24pt" style:font-size-asian="24pt" style:font-size-complex="24pt"/>
    </style:style>
    <style:style style:name="T66" style:family="text">
      <style:text-properties style:text-underline-style="solid" style:text-underline-width="auto" style:text-underline-color="font-color"/>
    </style:style>
    <style:style style:name="T67" style:family="text">
      <style:text-properties style:font-name="Courier New" fo:font-size="28pt" style:font-size-asian="28pt" style:font-size-complex="28pt"/>
    </style:style>
    <style:style style:name="T68" style:family="text">
      <style:text-properties fo:color="#000000" loext:opacity="100%" style:text-outline="false" style:text-line-through-style="none" style:text-line-through-type="none" style:text-position="0% 100%" fo:font-style="normal" fo:text-shadow="none" style:text-underline-style="solid" style:text-underline-width="auto" style:text-underline-color="font-color" fo:font-weight="normal" style:font-name-asian="Lucida Sans Unicode1" style:font-style-asian="normal" style:font-weight-asian="normal" style:font-name-complex="Lucida Sans Unicode1" style:font-style-complex="normal" style:font-weight-complex="normal" style:text-emphasize="none" style:font-relief="none" style:text-overline-style="none" style:text-overline-color="font-color"/>
    </style:style>
    <style:style style:name="T69" style:family="text">
      <style:text-properties fo:color="#000000" loext:opacity="100%" style:text-outline="false" style:text-line-through-style="none" style:text-line-through-type="none" style:text-position="0% 100%" fo:font-style="normal" fo:text-shadow="none" style:text-underline-style="none" fo:font-weight="normal" style:font-name-asian="Lucida Sans Unicode1" style:font-style-asian="normal" style:font-weight-asian="normal" style:font-name-complex="Lucida Sans Unicode1" style:font-style-complex="normal" style:font-weight-complex="normal" style:text-emphasize="none" style:font-relief="none" style:text-overline-style="none" style:text-overline-color="font-color"/>
    </style:style>
    <style:style style:name="T70" style:family="text">
      <style:text-properties fo:color="#000000" loext:opacity="100%" style:text-outline="false" style:text-line-through-style="none" style:text-line-through-type="none" style:text-position="0% 100%" style:font-name="Courier New" fo:font-size="28pt" fo:font-style="normal" fo:text-shadow="none" style:text-underline-style="none" fo:font-weight="normal" style:font-name-asian="Lucida Sans Unicode1" style:font-size-asian="28pt" style:font-style-asian="normal" style:font-weight-asian="normal" style:font-name-complex="Lucida Sans Unicode1" style:font-size-complex="28pt" style:font-style-complex="normal" style:font-weight-complex="normal" style:text-emphasize="none" style:font-relief="none" style:text-overline-style="none" style:text-overline-color="font-color"/>
    </style:style>
    <style:style style:name="T71" style:family="text">
      <style:text-properties fo:color="#0d1f63" loext:opacity="100%" style:font-name="Courier New" fo:font-style="normal" fo:font-weight="bold" style:font-style-asian="normal" style:font-weight-asian="bold" style:font-style-complex="normal" style:font-weight-complex="bold"/>
    </style:style>
    <style:style style:name="T72" style:family="text">
      <style:text-properties fo:color="#064280" loext:opacity="100%" fo:font-style="italic" fo:font-weight="bold" style:font-style-asian="italic" style:font-weight-asian="bold" style:font-style-complex="italic" style:font-weight-complex="bold"/>
    </style:style>
    <style:style style:name="T73" style:family="text">
      <style:text-properties fo:color="#ce181e" loext:opacity="100%" fo:font-style="italic" fo:font-weight="bold" style:font-style-asian="italic" style:font-weight-asian="bold" style:font-style-complex="italic" style:font-weight-complex="bold"/>
    </style:style>
    <style:style style:name="T74" style:family="text">
      <style:text-properties fo:color="#355269" loext:opacity="100%" fo:font-style="italic" fo:font-weight="bold" style:font-style-asian="italic" style:font-weight-asian="bold" style:font-style-complex="italic" style:font-weight-complex="bold"/>
    </style:style>
    <style:style style:name="T75" style:family="text">
      <style:text-properties style:font-name="Courier new" fo:font-size="26pt" style:font-size-asian="26pt" style:font-size-complex="26pt"/>
    </style:style>
    <style:style style:name="T76" style:family="text">
      <style:text-properties fo:color="#000000" loext:opacity="100%" style:text-outline="false" style:text-line-through-style="none" style:text-line-through-type="none" style:text-position="0% 100%" style:font-name="Courier new" fo:font-size="26pt" fo:font-style="normal" fo:text-shadow="none" style:text-underline-style="none" fo:font-weight="normal" style:font-name-asian="Lucida Sans Unicode1" style:font-size-asian="26pt" style:font-style-asian="normal" style:font-weight-asian="normal" style:font-name-complex="Lucida Sans Unicode1" style:font-size-complex="26pt" style:font-style-complex="normal" style:font-weight-complex="normal" style:text-emphasize="none" style:font-relief="none" style:text-overline-style="none" style:text-overline-color="font-color"/>
    </style:style>
    <style:style style:name="T77" style:family="text">
      <style:text-properties fo:color="#0d1f63" loext:opacity="100%" fo:font-size="28pt" fo:font-style="italic" fo:font-weight="bold" style:font-size-asian="28pt" style:font-style-asian="italic" style:font-weight-asian="bold" style:font-size-complex="28pt" style:font-style-complex="italic" style:font-weight-complex="bold"/>
    </style:style>
    <style:style style:name="T78" style:family="text">
      <style:text-properties style:font-name="Courier New" fo:font-size="21pt" style:font-size-asian="21pt" style:font-size-complex="21pt"/>
    </style:style>
    <style:style style:name="T79" style:family="text">
      <style:text-properties style:font-name="Courier New"/>
    </style:style>
    <style:style style:name="T80" style:family="text">
      <style:text-properties fo:color="#000099" loext:opacity="100%" style:font-name="Courier New" fo:font-size="21pt" fo:font-weight="bold" style:font-size-asian="21pt" style:font-weight-asian="bold" style:font-size-complex="21pt" style:font-weight-complex="bold"/>
    </style:style>
    <style:style style:name="T81" style:family="text">
      <style:text-properties fo:color="#0d1f63" loext:opacity="100%" style:font-name="Courier new" fo:font-size="26pt" fo:font-style="italic" fo:font-weight="bold" style:font-size-asian="26pt" style:font-style-asian="italic" style:font-weight-asian="bold" style:font-size-complex="26pt" style:font-style-complex="italic" style:font-weight-complex="bold"/>
    </style:style>
    <style:style style:name="T82" style:family="text">
      <style:text-properties fo:color="#3465a4" loext:opacity="100%" fo:font-weight="bold" style:font-weight-asian="bold" style:font-weight-complex="bold"/>
    </style:style>
    <style:style style:name="T83" style:family="text">
      <style:text-properties fo:color="#0d1f63" loext:opacity="100%"/>
    </style:style>
    <style:style style:name="T84" style:family="text">
      <style:text-properties fo:font-size="26pt" fo:font-weight="normal" style:font-size-asian="26pt" style:font-weight-asian="normal" style:font-size-complex="26pt" style:font-weight-complex="normal"/>
    </style:style>
    <style:style style:name="T85" style:family="text">
      <style:text-properties fo:color="#0d1f63" loext:opacity="100%" fo:font-size="26pt" fo:font-weight="bold" style:font-size-asian="26pt" style:font-weight-asian="bold" style:font-size-complex="26pt" style:font-weight-complex="bold"/>
    </style:style>
    <style:style style:name="T86" style:family="text">
      <style:text-properties fo:color="#0d1f63" loext:opacity="100%" fo:font-size="26pt" fo:font-style="italic" fo:font-weight="bold" style:font-size-asian="26pt" style:font-style-asian="italic" style:font-weight-asian="bold" style:font-size-complex="26pt" style:font-style-complex="italic" style:font-weight-complex="bold"/>
    </style:style>
    <style:style style:name="T87" style:family="text">
      <style:text-properties fo:font-size="24pt" fo:font-weight="normal" style:font-size-asian="24pt" style:font-weight-asian="normal" style:font-size-complex="24pt" style:font-weight-complex="normal"/>
    </style:style>
    <style:style style:name="T88" style:family="text">
      <style:text-properties fo:font-size="18pt" fo:font-weight="normal" style:font-size-asian="18pt" style:font-weight-asian="normal" style:font-size-complex="18pt" style:font-weight-complex="normal"/>
    </style:style>
    <style:style style:name="T89" style:family="text">
      <style:text-properties fo:font-weight="normal" style:font-weight-asian="normal" style:font-weight-complex="normal"/>
    </style:style>
    <style:style style:name="T90" style:family="text">
      <style:text-properties fo:font-size="26pt" fo:font-style="italic" fo:font-weight="normal" style:font-size-asian="26pt" style:font-style-asian="italic" style:font-weight-asian="normal" style:font-size-complex="26pt" style:font-style-complex="italic" style:font-weight-complex="normal"/>
    </style:style>
    <style:style style:name="T91" style:family="text">
      <style:text-properties fo:color="#000000" loext:opacity="100%" style:text-outline="false" style:text-line-through-style="none" style:text-line-through-type="none" style:text-position="0% 100%" style:font-name="Tahoma1" fo:font-size="26pt" fo:text-shadow="none" style:text-underline-style="none" fo:font-weight="normal" style:font-name-asian="Lucida Sans Unicode1" style:font-size-asian="26pt" style:font-weight-asian="normal" style:font-name-complex="Lucida Sans Unicode1" style:font-size-complex="26pt" style:font-weight-complex="normal" style:text-emphasize="none" style:font-relief="none" style:text-overline-style="none" style:text-overline-color="font-color"/>
    </style:style>
    <style:style style:name="T92" style:family="text">
      <style:text-properties fo:color="#000000" loext:opacity="100%" style:text-outline="false" style:text-line-through-style="none" style:text-line-through-type="none" style:text-position="0% 100%" style:font-name="Tahoma1" fo:font-size="26pt" fo:font-style="italic" fo:text-shadow="none" style:text-underline-style="none" fo:font-weight="normal" style:font-name-asian="Lucida Sans Unicode1" style:font-size-asian="26pt" style:font-style-asian="italic" style:font-weight-asian="normal" style:font-name-complex="Lucida Sans Unicode1" style:font-size-complex="26pt" style:font-style-complex="italic" style:font-weight-complex="normal" style:text-emphasize="none" style:font-relief="none" style:text-overline-style="none" style:text-overline-color="font-color"/>
    </style:style>
    <style:style style:name="T93" style:family="text">
      <style:text-properties fo:color="#000000" loext:opacity="100%" style:text-outline="false" style:text-line-through-style="none" style:text-line-through-type="none" style:text-position="0% 100%" style:font-name="Tahoma1" fo:font-size="26pt" fo:font-style="normal" fo:text-shadow="none" style:text-underline-style="none" fo:font-weight="normal" style:font-name-asian="Lucida Sans Unicode1" style:font-size-asian="26pt" style:font-style-asian="normal" style:font-weight-asian="normal" style:font-name-complex="Lucida Sans Unicode1" style:font-size-complex="26pt" style:font-style-complex="normal" style:font-weight-complex="normal" style:text-emphasize="none" style:font-relief="none" style:text-overline-style="none" style:text-overline-color="font-color"/>
    </style:style>
    <style:style style:name="T94" style:family="text">
      <style:text-properties fo:font-size="26pt" fo:font-style="italic" style:font-size-asian="26pt" style:font-style-asian="italic" style:font-size-complex="26pt" style:font-style-complex="italic"/>
    </style:style>
    <style:style style:name="T95" style:family="text">
      <style:text-properties fo:font-size="40pt" fo:font-style="italic" style:font-size-asian="40pt" style:font-style-asian="italic" style:font-size-complex="40pt" style:font-style-complex="italic"/>
    </style:style>
    <style:style style:name="T96" style:family="text">
      <style:text-properties fo:color="#0d1f63" loext:opacity="100%" fo:font-size="28pt" fo:font-weight="bold" style:font-size-asian="28pt" style:font-weight-asian="bold" style:font-size-complex="28pt" style:font-weight-complex="bold"/>
    </style:style>
    <style:style style:name="T97" style:family="text">
      <style:text-properties style:font-name="Courier new"/>
    </style:style>
    <style:style style:name="T98" style:family="text">
      <style:text-properties fo:color="#0d1f63" loext:opacity="100%" style:font-name="Courier new" fo:font-weight="bold" style:font-weight-asian="bold" style:font-weight-complex="bold"/>
    </style:style>
    <style:style style:name="T99" style:family="text">
      <style:text-properties fo:color="#006d6f" loext:opacity="100%" style:font-name="Courier new" fo:font-weight="bold" style:font-weight-asian="bold" style:font-weight-complex="bold"/>
    </style:style>
    <style:style style:name="T100" style:family="text">
      <style:text-properties fo:color="#000000" loext:opacity="100%" style:text-outline="false" style:text-line-through-style="none" style:text-line-through-type="none" style:text-position="0% 100%" style:font-name="Courier new" fo:font-size="32pt" fo:font-style="normal" fo:text-shadow="none" style:text-underline-style="none" fo:font-weight="normal" style:font-name-asian="Lucida Sans Unicode1" style:font-size-asian="32pt" style:font-style-asian="normal" style:font-weight-asian="normal" style:font-name-complex="Lucida Sans Unicode1" style:font-size-complex="32pt" style:font-style-complex="normal" style:font-weight-complex="normal" style:text-emphasize="none" style:font-relief="none" style:text-overline-style="none" style:text-overline-color="font-color"/>
    </style:style>
    <style:style style:name="T101" style:family="text">
      <style:text-properties style:font-name="Courier new" fo:font-size="18pt" style:font-size-asian="18pt" style:font-size-complex="18pt"/>
    </style:style>
    <style:style style:name="T102" style:family="text">
      <style:text-properties fo:font-size="32pt" fo:font-style="italic" style:font-size-asian="32pt" style:font-style-asian="italic" style:font-size-complex="32pt" style:font-style-complex="italic"/>
    </style:style>
    <style:style style:name="T103" style:family="text">
      <style:text-properties fo:font-size="32pt" style:font-size-asian="32pt" style:font-size-complex="32pt"/>
    </style:style>
    <style:style style:name="T104" style:family="text">
      <style:text-properties fo:color="#000000" loext:opacity="100%" fo:font-size="26pt" fo:font-style="normal" fo:font-weight="normal" style:font-size-asian="26pt" style:font-style-asian="normal" style:font-weight-asian="normal" style:font-size-complex="26pt" style:font-style-complex="normal" style:font-weight-complex="normal"/>
    </style:style>
    <style:style style:name="T105" style:family="text">
      <style:text-properties fo:color="#000000" loext:opacity="100%" fo:font-size="26pt" fo:font-style="italic" fo:font-weight="normal" style:font-size-asian="26pt" style:font-style-asian="italic" style:font-weight-asian="normal" style:font-size-complex="26pt" style:font-style-complex="italic" style:font-weight-complex="normal"/>
    </style:style>
    <style:style style:name="T106" style:family="text">
      <style:text-properties fo:font-size="24pt"/>
    </style:style>
    <style:style style:name="T107" style:family="text">
      <style:text-properties fo:font-size="22pt" style:font-size-asian="22pt" style:font-size-complex="22pt"/>
    </style:style>
    <style:style style:name="T108" style:family="text">
      <style:text-properties fo:font-size="22pt" fo:font-style="italic" style:font-size-asian="22pt" style:font-style-asian="italic" style:font-size-complex="22pt" style:font-style-complex="italic"/>
    </style:style>
    <style:style style:name="T109" style:family="text">
      <style:text-properties fo:font-size="22pt" fo:font-style="normal" style:text-underline-style="none" style:font-size-asian="22pt" style:font-style-asian="normal" style:font-size-complex="22pt" style:font-style-complex="normal"/>
    </style:style>
    <style:style style:name="T110" style:family="text">
      <style:text-properties fo:color="#000000" loext:opacity="100%" style:text-outline="false" style:text-line-through-style="none" style:text-line-through-type="none" style:text-position="0% 100%" style:font-name="Tahoma1" fo:font-size="22pt" fo:font-style="normal" fo:text-shadow="none" style:text-underline-style="none" fo:font-weight="normal" style:font-name-asian="Lucida Sans Unicode1" style:font-size-asian="22pt" style:font-style-asian="normal" style:font-weight-asian="normal" style:font-name-complex="Lucida Sans Unicode1" style:font-size-complex="22pt" style:font-style-complex="normal" style:font-weight-complex="normal" style:text-emphasize="none" style:font-relief="none" style:text-overline-style="none" style:text-overline-color="font-color"/>
    </style:style>
    <style:style style:name="T111" style:family="text">
      <style:text-properties fo:color="#000000" loext:opacity="100%" style:text-outline="false" style:text-line-through-style="none" style:text-line-through-type="none" style:text-position="0% 100%" style:font-name="Tahoma1" fo:font-size="22pt" fo:font-style="italic" fo:text-shadow="none" style:text-underline-style="none" fo:font-weight="normal" style:font-name-asian="Lucida Sans Unicode1" style:font-size-asian="22pt" style:font-style-asian="italic" style:font-weight-asian="normal" style:font-name-complex="Lucida Sans Unicode1" style:font-size-complex="22pt" style:font-style-complex="italic" style:font-weight-complex="normal" style:text-emphasize="none" style:font-relief="none" style:text-overline-style="none" style:text-overline-color="font-color"/>
    </style:style>
    <style:style style:name="T112" style:family="text">
      <style:text-properties fo:font-size="16pt" style:font-size-asian="16pt" style:font-size-complex="16pt"/>
    </style:style>
    <style:style style:name="T113" style:family="text">
      <style:text-properties fo:font-variant="normal" fo:text-transform="none" fo:color="#000000" loext:opacity="100%" style:text-outline="false" style:text-line-through-style="none" style:text-line-through-type="none" style:text-position="0% 100%" style:font-name="Tahoma1" fo:font-size="32pt" fo:letter-spacing="normal" fo:language="fr" fo:country="FR" fo:font-style="normal" style:text-underline-style="none" fo:font-weight="normal" fo:background-color="transparent" style:font-size-asian="32pt" style:font-style-asian="normal" style:font-weight-asian="normal" style:font-name-complex="Lucida Sans Unicode1" style:font-size-complex="32pt" style:font-style-complex="normal" style:font-weight-complex="normal"/>
    </style:style>
    <style:style style:name="T114" style:family="text">
      <style:text-properties fo:font-variant="normal" fo:text-transform="none" fo:color="#000000" loext:opacity="100%" style:text-outline="false" style:text-line-through-style="none" style:text-line-through-type="none" style:text-position="0% 100%" style:font-name="Tahoma1" fo:font-size="44pt" fo:letter-spacing="normal" fo:language="fr" fo:country="FR" fo:font-style="normal" style:text-underline-style="none" fo:font-weight="normal" fo:background-color="transparent" style:font-size-asian="44pt" style:font-style-asian="normal" style:font-weight-asian="normal" style:font-name-complex="Lucida Sans Unicode1" style:font-size-complex="44pt" style:font-style-complex="normal" style:font-weight-complex="normal">
        <loext:char-complex-color loext:theme-type="dark1" loext:color-type="theme"/>
      </style:text-properties>
    </style:style>
    <style:style style:name="T115" style:family="text">
      <style:text-properties fo:font-variant="normal" fo:text-transform="none" fo:color="#000000" loext:opacity="100%" style:text-outline="false" style:text-line-through-style="none" style:text-line-through-type="none" style:text-position="0% 100%" style:font-name="Tahoma1" fo:font-size="32pt" fo:letter-spacing="normal" fo:language="fr" fo:country="FR" fo:font-style="normal" style:text-underline-style="none" fo:font-weight="normal" fo:background-color="transparent" style:font-size-asian="32pt" style:font-style-asian="normal" style:font-weight-asian="normal" style:font-name-complex="Lucida Sans Unicode1" style:font-size-complex="32pt" style:font-style-complex="normal" style:font-weight-complex="normal">
        <loext:char-complex-color loext:theme-type="dark1" loext:color-type="theme"/>
      </style:text-properties>
    </style:style>
    <style:style style:name="T116" style:family="text">
      <style:text-properties fo:font-variant="normal" fo:text-transform="none" fo:color="#000000" loext:opacity="100%" style:text-outline="false" style:text-line-through-style="none" style:text-line-through-type="none" style:text-position="0% 100%" style:font-name="Tahoma1" fo:font-size="32pt" fo:letter-spacing="normal" fo:language="fr" fo:country="FR" fo:font-style="italic" style:text-underline-style="none" fo:font-weight="normal" fo:background-color="transparent" style:font-size-asian="32pt" style:font-style-asian="italic" style:font-weight-asian="normal" style:font-name-complex="Lucida Sans Unicode1" style:font-size-complex="32pt" style:font-style-complex="italic" style:font-weight-complex="normal">
        <loext:char-complex-color loext:theme-type="dark1" loext:color-type="theme"/>
      </style:text-properties>
    </style:style>
    <style:style style:name="T117" style:family="text">
      <style:text-properties fo:font-variant="normal" fo:text-transform="none" fo:color="#002060" loext:opacity="100%" style:text-outline="false" style:text-line-through-style="none" style:text-line-through-type="none" style:text-position="0% 100%" style:font-name="Tahoma1" fo:font-size="32pt" fo:letter-spacing="normal" fo:language="fr" fo:country="FR" fo:font-style="normal" style:text-underline-style="none" fo:font-weight="bold" fo:background-color="transparent" style:font-size-asian="32pt" style:font-style-asian="normal" style:font-weight-asian="bold" style:font-name-complex="Lucida Sans Unicode1" style:font-size-complex="32pt" style:font-style-complex="normal" style:font-weight-complex="bold"/>
    </style:style>
    <style:style style:name="T118" style:family="text">
      <style:text-properties fo:font-variant="normal" fo:text-transform="none" fo:color="#000000" loext:opacity="100%" style:text-outline="false" style:text-line-through-style="none" style:text-line-through-type="none" style:text-position="0% 100%" style:font-name="Calibri"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loext:char-complex-color loext:theme-type="dark1" loext:color-type="theme"/>
      </style:text-properties>
    </style:style>
    <style:style style:name="T119" style:family="text">
      <style:text-properties fo:color="#355269" loext:opacity="100%" style:font-name="Courier New" fo:font-weight="bold" style:font-weight-asian="bold" style:font-weight-complex="bold"/>
    </style:style>
    <style:style style:name="T120" style:family="text">
      <style:text-properties fo:font-size="44pt" style:font-size-asian="44pt" style:font-size-complex="44pt"/>
    </style:style>
    <style:style style:name="T121" style:family="text">
      <style:text-properties fo:font-size="44pt" fo:font-style="italic" style:font-size-asian="44pt" style:font-style-asian="italic" style:font-size-complex="44pt" style:font-style-complex="italic"/>
    </style:style>
    <style:style style:name="T122" style:family="text">
      <style:text-properties fo:color="#1e6a39" loext:opacity="100%" style:font-name="Monospace" fo:font-size="15pt" fo:font-weight="bold" style:font-name-asian="Monospace" style:font-size-asian="15pt" style:font-weight-asian="bold" style:font-name-complex="Monospace" style:font-size-complex="15pt" style:font-weight-complex="bold"/>
    </style:style>
    <style:style style:name="T123" style:family="text">
      <style:text-properties fo:color="#000000" loext:opacity="100%" style:font-name="Monospace" fo:font-size="15pt" style:font-name-asian="Monospace" style:font-size-asian="15pt" style:font-name-complex="Monospace" style:font-size-complex="15pt"/>
    </style:style>
    <style:style style:name="T124" style:family="text">
      <style:text-properties fo:color="#7f0055" loext:opacity="100%" style:font-name="Monospace" fo:font-size="15pt" fo:font-weight="bold" style:font-name-asian="Monospace" style:font-size-asian="15pt" style:font-weight-asian="bold" style:font-name-complex="Monospace" style:font-size-complex="15pt" style:font-weight-complex="bold"/>
    </style:style>
    <style:style style:name="T125" style:family="text">
      <style:text-properties fo:color="#000000" loext:opacity="100%" style:font-name="Monospace" fo:font-size="15pt" style:text-underline-style="none" style:font-name-asian="Monospace" style:font-size-asian="15pt" style:font-name-complex="Monospace" style:font-size-complex="15pt"/>
    </style:style>
    <style:style style:name="T126" style:family="text">
      <style:text-properties fo:color="#7f0055" loext:opacity="100%" style:text-outline="false" style:text-line-through-style="none" style:text-line-through-type="none" style:text-position="0% 100%" style:font-name="Monospace" fo:font-size="16pt" fo:font-style="normal" fo:text-shadow="none" style:text-underline-style="none" fo:font-weight="bold" style:font-name-asian="Monospace" style:font-size-asian="16pt" style:font-style-asian="normal" style:font-weight-asian="bold" style:font-name-complex="Monospace" style:font-size-complex="16pt" style:font-style-complex="normal" style:font-weight-complex="bold" style:text-emphasize="none" style:font-relief="none" style:text-overline-style="none" style:text-overline-color="font-color"/>
    </style:style>
    <style:style style:name="T127" style:family="text">
      <style:text-properties fo:color="#000000" loext:opacity="100%" style:text-outline="false" style:text-line-through-style="none" style:text-line-through-type="none" style:text-position="0% 100%" style:font-name="Monospace" fo:font-size="16pt" fo:font-style="normal" fo:text-shadow="none" style:text-underline-style="none" fo:font-weight="normal" style:font-name-asian="Monospace" style:font-size-asian="16pt" style:font-style-asian="normal" style:font-weight-asian="normal" style:font-name-complex="Monospace" style:font-size-complex="16pt" style:font-style-complex="normal" style:font-weight-complex="normal" style:text-emphasize="none" style:font-relief="none" style:text-overline-style="none" style:text-overline-color="font-color"/>
    </style:style>
    <style:style style:name="T128" style:family="text">
      <style:text-properties fo:color="#6a3e3e" loext:opacity="100%" style:text-outline="false" style:text-line-through-style="none" style:text-line-through-type="none" style:text-position="0% 100%" style:font-name="Monospace" fo:font-size="16pt" fo:font-style="normal" fo:text-shadow="none" style:text-underline-style="none" fo:font-weight="normal" style:font-name-asian="Monospace" style:font-size-asian="16pt" style:font-style-asian="normal" style:font-weight-asian="normal" style:font-name-complex="Monospace" style:font-size-complex="16pt" style:font-style-complex="normal" style:font-weight-complex="normal" style:text-emphasize="none" style:font-relief="none" style:text-overline-style="none" style:text-overline-color="font-color"/>
    </style:style>
    <style:style style:name="T129" style:family="text">
      <style:text-properties fo:color="#355269" loext:opacity="100%" fo:font-size="18pt" fo:font-style="italic" fo:font-weight="bold" style:font-size-asian="18pt" style:font-style-asian="italic" style:font-weight-asian="bold" style:font-size-complex="18pt" style:font-style-complex="italic" style:font-weight-complex="bold"/>
    </style:style>
    <style:style style:name="T130" style:family="text">
      <style:text-properties fo:color="#355269" loext:opacity="100%" fo:font-size="22pt" fo:font-style="italic" fo:font-weight="bold" style:font-size-asian="22pt" style:font-style-asian="italic" style:font-weight-asian="bold" style:font-size-complex="22pt" style:font-style-complex="italic" style:font-weight-complex="bold"/>
    </style:style>
    <style:style style:name="T131" style:family="text">
      <style:text-properties fo:color="#355269" loext:opacity="100%" style:font-name="Courier New" fo:font-size="18pt" fo:font-weight="bold" style:font-size-asian="18pt" style:font-weight-asian="bold" style:font-size-complex="18pt" style:font-weight-complex="bold"/>
    </style:style>
    <style:style style:name="T132" style:family="text">
      <style:text-properties style:font-name="Courier New" fo:font-size="18pt" style:font-size-asian="18pt" style:font-size-complex="18pt"/>
    </style:style>
    <style:style style:name="T133" style:family="text">
      <style:text-properties style:font-name="Courier new" fo:font-size="22pt" style:font-size-asian="22pt" style:font-size-complex="22pt"/>
    </style:style>
    <style:style style:name="T134" style:family="text">
      <style:text-properties style:font-name="Courier new" fo:font-size="24pt" style:font-size-asian="24pt" style:font-size-complex="24pt"/>
    </style:style>
    <style:style style:name="T135" style:family="text">
      <style:text-properties fo:font-size="24pt" fo:font-style="normal" style:font-size-asian="24pt" style:font-style-asian="normal" style:font-size-complex="24pt" style:font-style-complex="normal"/>
    </style:style>
    <style:style style:name="T136" style:family="text">
      <style:text-properties fo:font-size="26pt" fo:font-style="normal" style:font-size-asian="26pt" style:font-style-asian="normal" style:font-size-complex="26pt" style:font-style-complex="normal"/>
    </style:style>
    <style:style style:name="T137" style:family="text">
      <style:text-properties fo:color="#0d1f63" loext:opacity="100%" style:text-outline="false" style:text-line-through-style="none" style:text-line-through-type="none" style:text-position="0% 100%" style:font-name="Tahoma1" fo:font-size="28pt" fo:font-style="italic" fo:text-shadow="none" style:text-underline-style="none" fo:font-weight="bold" style:font-name-asian="Lucida Sans Unicode1" style:font-size-asian="28pt" style:font-style-asian="italic" style:font-weight-asian="bold" style:font-name-complex="Lucida Sans Unicode1" style:font-size-complex="28pt" style:font-style-complex="italic" style:font-weight-complex="bold" style:text-emphasize="none" style:font-relief="none" style:text-overline-style="none" style:text-overline-color="font-color"/>
    </style:style>
    <style:style style:name="T138" style:family="text">
      <style:text-properties style:text-position="super 58%" fo:font-size="32pt" style:font-size-asian="32pt" style:font-size-complex="32pt"/>
    </style:style>
    <style:style style:name="T139" style:family="text">
      <style:text-properties fo:color="#006d6f" loext:opacity="100%" style:font-name="Courier new" fo:font-size="18pt" fo:font-weight="bold" style:font-size-asian="18pt" style:font-weight-asian="bold" style:font-size-complex="18pt" style:font-weight-complex="bold"/>
    </style:style>
    <style:style style:name="T140" style:family="text">
      <style:text-properties fo:color="#0d1f63" loext:opacity="100%" fo:font-size="32pt" fo:font-style="italic" fo:font-weight="bold" style:font-size-asian="32pt" style:font-style-asian="italic" style:font-weight-asian="bold" style:font-size-complex="32pt" style:font-style-complex="italic" style:font-weight-complex="bold"/>
    </style:style>
    <style:style style:name="T141" style:family="text">
      <style:text-properties style:font-name="Courier new" fo:font-size="13pt" style:font-size-asian="13pt" style:font-size-complex="13pt"/>
    </style:style>
    <style:style style:name="T142" style:family="text">
      <style:text-properties fo:color="#00a933" loext:opacity="100%" style:font-name="Courier new" fo:font-size="13pt" fo:font-weight="bold" style:font-size-asian="13pt" style:font-weight-asian="bold" style:font-size-complex="13pt" style:font-weight-complex="bold"/>
    </style:style>
    <style:style style:name="T143" style:family="text">
      <style:text-properties fo:language="fr" fo:country="FR" fo:font-weight="bold" style:font-weight-asian="bold" style:font-weight-complex="bold"/>
    </style:style>
    <style:style style:name="T144" style:family="text">
      <style:text-properties fo:color="#064280" loext:opacity="100%" fo:language="fr" fo:country="FR" fo:font-weight="bold" style:font-weight-asian="bold" style:font-weight-complex="bold"/>
    </style:style>
    <style:style style:name="T145" style:family="text">
      <style:text-properties fo:color="#000000" loext:opacity="100%" fo:language="fr" fo:country="FR" fo:font-weight="normal" style:font-weight-asian="normal" style:font-weight-complex="normal"/>
    </style:style>
    <style:style style:name="T146" style:family="text">
      <style:text-properties style:font-name="Courier New" fo:font-size="16pt" style:font-size-asian="16pt" style:font-size-complex="16pt"/>
    </style:style>
    <style:style style:name="T147" style:family="text">
      <style:text-properties style:font-name="Courier New" fo:font-size="20pt" style:font-size-asian="20pt" style:font-size-complex="20pt"/>
    </style:style>
    <style:style style:name="T148" style:family="text">
      <style:text-properties fo:color="#3465a4" loext:opacity="100%" fo:font-style="italic" fo:font-weight="bold" style:font-style-asian="italic" style:font-weight-asian="bold" style:font-style-complex="italic" style:font-weight-complex="bold"/>
    </style:style>
    <style:style style:name="T149" style:family="text">
      <style:text-properties fo:color="#3465a4" loext:opacity="100%" fo:font-size="16pt" fo:font-weight="bold" style:font-size-asian="16pt" style:font-weight-asian="bold" style:font-size-complex="16pt" style:font-weight-complex="bold"/>
    </style:style>
    <style:style style:name="T150" style:family="text">
      <style:text-properties fo:color="#3465a4" loext:opacity="100%" style:font-name="Courier New" fo:font-size="18pt" fo:font-weight="bold" style:font-size-asian="18pt" style:font-weight-asian="bold" style:font-size-complex="18pt" style:font-weight-complex="bold"/>
    </style:style>
    <style:style style:name="T151" style:family="text">
      <style:text-properties style:font-name="Courier New" fo:font-size="26pt" style:font-size-asian="26pt" style:font-size-complex="26pt"/>
    </style:style>
    <style:style style:name="T152" style:family="text">
      <style:text-properties fo:color="#127622" loext:opacity="100%" style:font-name="Courier New" fo:font-size="24pt" fo:font-weight="bold" style:font-size-asian="24pt" style:font-weight-asian="bold" style:font-size-complex="24pt" style:font-weight-complex="bold"/>
    </style:style>
    <style:style style:name="T153" style:family="text">
      <style:text-properties fo:color="#000099" loext:opacity="100%" style:font-name="Courier New" fo:font-size="24pt" fo:font-weight="bold" style:font-size-asian="24pt" style:font-weight-asian="bold" style:font-size-complex="24pt" style:font-weight-complex="bold"/>
    </style:style>
    <style:style style:name="T154" style:family="text">
      <style:text-properties fo:color="#064280" loext:opacity="100%" fo:font-size="22pt" fo:font-style="italic" fo:font-weight="bold" style:font-size-asian="22pt" style:font-style-asian="italic" style:font-weight-asian="bold" style:font-size-complex="22pt" style:font-style-complex="italic" style:font-weight-complex="bold"/>
    </style:style>
    <style:style style:name="T155" style:family="text">
      <style:text-properties fo:color="#064280" loext:opacity="100%" fo:font-weight="bold" style:font-weight-asian="bold" style:font-weight-complex="bold"/>
    </style:style>
    <style:style style:name="T156" style:family="text">
      <style:text-properties fo:color="#064280" loext:opacity="100%" style:font-name="Courier New" fo:font-size="24pt" fo:font-weight="bold" style:font-size-asian="24pt" style:font-weight-asian="bold" style:font-size-complex="24pt" style:font-weight-complex="bold"/>
    </style:style>
    <style:style style:name="T157" style:family="text">
      <style:text-properties fo:font-style="italic" fo:font-weight="bold" style:font-style-asian="italic" style:font-weight-asian="bold" style:font-style-complex="italic" style:font-weight-complex="bold"/>
    </style:style>
    <style:style style:name="T158" style:family="text">
      <style:text-properties style:font-name="Courier New" fo:font-size="15pt" style:font-size-asian="15pt" style:font-size-complex="15pt"/>
    </style:style>
    <style:style style:name="T159" style:family="text">
      <style:text-properties fo:color="#000000" loext:opacity="100%" style:text-outline="false" style:text-line-through-style="none" style:text-line-through-type="none" style:text-position="0% 100%" style:font-name="Courier New" fo:font-size="18pt" fo:font-style="normal" fo:text-shadow="none" style:text-underline-style="none" fo:font-weight="normal" style:font-name-asian="Lucida Sans Unicode1" style:font-size-asian="18pt" style:font-style-asian="normal" style:font-weight-asian="normal" style:font-name-complex="Lucida Sans Unicode1" style:font-size-complex="18pt" style:font-style-complex="normal" style:font-weight-complex="normal" style:text-emphasize="none" style:font-relief="none" style:text-overline-style="none" style:text-overline-color="font-color"/>
    </style:style>
    <style:style style:name="T160" style:family="text">
      <style:text-properties fo:color="#0d1f63" loext:opacity="100%" style:font-name="Courier New" fo:font-size="18pt" fo:font-weight="bold" style:font-size-asian="18pt" style:font-weight-asian="bold" style:font-size-complex="18pt" style:font-weight-complex="bold"/>
    </style:style>
    <style:style style:name="T161" style:family="text">
      <style:text-properties fo:color="#0d1f63" loext:opacity="100%" style:text-outline="false" style:text-line-through-style="none" style:text-line-through-type="none" style:text-position="0% 100%" style:font-name="Tahoma1" fo:font-size="32pt" fo:language="fr" fo:country="FR" fo:font-style="normal" fo:text-shadow="none" style:text-underline-style="none" fo:font-weight="bold" style:font-name-asian="Lucida Sans Unicode1" style:font-size-asian="32pt" style:font-style-asian="normal" style:font-weight-asian="bold" style:font-name-complex="Lucida Sans Unicode1" style:font-size-complex="32pt" style:font-style-complex="normal" style:font-weight-complex="bold" style:text-emphasize="none" style:font-relief="none" style:text-overline-style="none" style:text-overline-color="font-color"/>
    </style:style>
    <style:style style:name="T162" style:family="text">
      <style:text-properties fo:color="#0d1f63" loext:opacity="100%" style:text-outline="false" style:text-line-through-style="none" style:text-line-through-type="none" style:text-position="0% 100%" style:font-name="Tahoma1" fo:font-size="32pt" fo:font-style="italic" fo:text-shadow="none" style:text-underline-style="none" fo:font-weight="bold" style:font-name-asian="Lucida Sans Unicode1" style:font-size-asian="32pt" style:font-style-asian="italic" style:font-weight-asian="bold" style:font-name-complex="Lucida Sans Unicode1" style:font-size-complex="32pt" style:font-style-complex="italic" style:font-weight-complex="bold" style:text-emphasize="none" style:font-relief="none" style:text-overline-style="none" style:text-overline-color="font-color"/>
    </style:style>
    <style:style style:name="T163" style:family="text">
      <style:text-properties fo:font-size="16pt" fo:font-weight="bold" style:font-size-asian="16pt" style:font-weight-asian="bold" style:font-size-complex="16pt" style:font-weight-complex="bold"/>
    </style:style>
    <style:style style:name="T164" style:family="text">
      <style:text-properties fo:font-variant="normal" fo:text-transform="none" style:use-window-font-color="true" loext:opacity="0%" style:text-outline="false" style:text-line-through-style="none" style:text-line-through-type="none" style:text-position="0% 100%" style:font-name="Times New Roman" fo:font-size="16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6pt" style:language-asian="zh" style:country-asian="CN" style:font-style-asian="normal" style:font-weight-asian="normal" style:font-name-complex="DejaVu Sans"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65" style:family="text">
      <style:text-properties fo:font-variant="normal" fo:text-transform="none" style:use-window-font-color="true" loext:opacity="0%" style:text-outline="false" style:text-line-through-style="none" style:text-line-through-type="none" style:text-position="0% 100%" style:font-name="Times New Roman" fo:font-size="16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6pt" style:language-asian="zh" style:country-asian="CN" style:font-style-asian="normal" style:font-weight-asian="bold" style:font-name-complex="DejaVu Sans" style:font-size-complex="16pt" style:language-complex="hi" style:country-complex="IN" style:font-style-complex="normal" style:font-weight-complex="bold" style:text-emphasize="none" style:text-scale="100%" style:font-relief="none" style:text-overline-style="none" style:text-overline-color="font-color"/>
    </style:style>
    <style:style style:name="T166"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67" style:family="text">
      <style:text-properties fo:font-variant="normal" fo:text-transform="none" style:use-window-font-color="true" loext:opacity="0%" style:text-outline="false" style:text-line-through-style="none" style:text-line-through-type="none" style:text-position="0% 100%" style:font-name="Liberation Sans"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68" style:family="text">
      <style:text-properties fo:color="#064280" loext:opacity="100%" fo:font-size="24pt" fo:font-style="italic" fo:font-weight="bold" style:font-size-asian="24pt" style:font-style-asian="italic" style:font-weight-asian="bold" style:font-size-complex="24pt" style:font-style-complex="italic" style:font-weight-complex="bold"/>
    </style:style>
    <style:style style:name="T169" style:family="text">
      <style:text-properties fo:color="#064280" loext:opacity="100%" fo:font-size="20pt" fo:font-style="italic" fo:font-weight="bold" style:font-size-asian="20pt" style:font-style-asian="italic" style:font-weight-asian="bold" style:font-size-complex="20pt" style:font-style-complex="italic" style:font-weight-complex="bold"/>
    </style:style>
    <style:style style:name="T170" style:family="text">
      <style:text-properties fo:color="#064280" loext:opacity="100%" style:text-outline="false" style:text-line-through-style="none" style:text-line-through-type="none" style:text-position="0% 100%" style:font-name="Tahoma1" fo:font-size="28pt" fo:font-style="italic" fo:text-shadow="none" style:text-underline-style="none" fo:font-weight="bold" style:font-name-asian="Lucida Sans Unicode1" style:font-size-asian="28pt" style:font-style-asian="italic" style:font-weight-asian="bold" style:font-name-complex="Lucida Sans Unicode1" style:font-size-complex="28pt" style:font-style-complex="italic" style:font-weight-complex="bold" style:text-emphasize="none" style:font-relief="none" style:text-overline-style="none" style:text-overline-color="font-color"/>
    </style:style>
    <style:style style:name="T171" style:family="text">
      <style:text-properties style:font-name="Courier new" fo:font-style="italic" style:font-style-asian="italic" style:font-style-complex="italic"/>
    </style:style>
    <style:style style:name="T172" style:family="text">
      <style:text-properties fo:color="#390a5d" loext:opacity="100%" fo:font-style="italic" fo:font-weight="bold" style:font-style-asian="italic" style:font-weight-asian="bold" style:font-style-complex="italic" style:font-weight-complex="bold"/>
    </style:style>
    <style:style style:name="T173" style:family="text">
      <style:text-properties fo:color="#3465a4" loext:opacity="100%" style:font-name="Courier new" fo:font-size="22pt" fo:font-weight="bold" style:font-size-asian="22pt" style:font-weight-asian="bold" style:font-size-complex="22pt" style:font-weight-complex="bold"/>
    </style:style>
    <style:style style:name="T174" style:family="text">
      <style:text-properties fo:color="#2a6099" loext:opacity="100%" style:font-name="Courier new" fo:font-weight="bold" style:font-weight-asian="bold" style:font-weight-complex="bold"/>
    </style:style>
    <style:style style:name="T175" style:family="text">
      <style:text-properties fo:color="#182f7c" loext:opacity="100%" fo:font-size="26pt" fo:font-style="italic" fo:font-weight="bold" style:font-size-asian="26pt" style:font-style-asian="italic" style:font-weight-asian="bold" style:font-size-complex="26pt" style:font-style-complex="italic" style:font-weight-complex="bold"/>
    </style:style>
    <style:style style:name="T176" style:family="text">
      <style:text-properties fo:language="fr" fo:country="FR" fo:font-style="normal" fo:font-weight="normal" style:font-style-asian="normal" style:font-weight-asian="normal" style:font-style-complex="normal" style:font-weight-complex="normal"/>
    </style:style>
    <style:style style:name="T177" style:family="text">
      <style:text-properties fo:color="#0d1f63" loext:opacity="100%" fo:language="fr" fo:country="FR" fo:font-style="normal" fo:font-weight="bold" style:font-style-asian="normal" style:font-weight-asian="bold" style:font-style-complex="normal" style:font-weight-complex="bold"/>
    </style:style>
    <style:style style:name="T178" style:family="text">
      <style:text-properties fo:color="#0d1f63" loext:opacity="100%" fo:language="fr" fo:country="FR" fo:font-style="italic" fo:font-weight="bold" style:font-style-asian="italic" style:font-weight-asian="bold" style:font-style-complex="italic" style:font-weight-complex="bold"/>
    </style:style>
    <style:style style:name="T179" style:family="text">
      <style:text-properties fo:color="#c9211e" loext:opacity="100%" fo:font-style="italic" fo:font-weight="bold" style:font-style-asian="italic" style:font-weight-asian="bold" style:font-style-complex="italic" style:font-weight-complex="bold"/>
    </style:style>
    <style:style style:name="T180" style:family="text">
      <style:text-properties style:font-name="Courier New" fo:font-style="italic" style:font-style-asian="italic" style:font-style-complex="italic"/>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OpenSymbol" style:font-charset="x-symbol" fo:color="#000000" fo:font-size="100%"/>
      </text:list-level-style-bullet>
      <text:list-level-style-bullet text:level="2" text:bullet-char="➢">
        <style:list-level-properties text:space-before="1.27cm" text:min-label-width="0.793cm"/>
        <style:text-properties fo:font-family="OpenSymbol" style:font-charset="x-symbol" fo:color="#000000" fo:font-size="100%"/>
      </text:list-level-style-bullet>
      <text:list-level-style-bullet text:level="3" text:bullet-char="➢">
        <style:list-level-properties text:space-before="2.54cm" text:min-label-width="0.635cm"/>
        <style:text-properties fo:font-family="OpenSymbol" style:font-charset="x-symbol" fo:color="#000000" fo:font-size="100%"/>
      </text:list-level-style-bullet>
      <text:list-level-style-bullet text:level="4" text:bullet-char="➢">
        <style:list-level-properties text:space-before="3.81cm" text:min-label-width="0.635cm"/>
        <style:text-properties fo:font-family="OpenSymbol" style:font-charset="x-symbol" fo:color="#000000" fo:font-size="100%"/>
      </text:list-level-style-bullet>
      <text:list-level-style-bullet text:level="5" text:bullet-char="➢">
        <style:list-level-properties text:space-before="5.08cm" text:min-label-width="0.635cm"/>
        <style:text-properties fo:font-family="OpenSymbol" style:font-charset="x-symbol" fo:color="#000000" fo:font-size="100%"/>
      </text:list-level-style-bullet>
      <text:list-level-style-bullet text:level="6" text:bullet-char="➢">
        <style:list-level-properties text:space-before="5.08cm" text:min-label-width="0.635cm"/>
        <style:text-properties fo:font-family="OpenSymbol" style:font-charset="x-symbol" fo:color="#000000" fo:font-size="100%"/>
      </text:list-level-style-bullet>
      <text:list-level-style-bullet text:level="7" text:bullet-char="➢">
        <style:list-level-properties text:space-before="5.08cm" text:min-label-width="0.635cm"/>
        <style:text-properties fo:font-family="OpenSymbol" style:font-charset="x-symbol" fo:color="#000000" fo:font-size="100%"/>
      </text:list-level-style-bullet>
      <text:list-level-style-bullet text:level="8" text:bullet-char="➢">
        <style:list-level-properties text:space-before="5.08cm" text:min-label-width="0.635cm"/>
        <style:text-properties fo:font-family="OpenSymbol" style:font-charset="x-symbol" fo:color="#000000" fo:font-size="100%"/>
      </text:list-level-style-bullet>
      <text:list-level-style-bullet text:level="9" text:bullet-char="➢">
        <style:list-level-properties text:space-before="5.08cm" text:min-label-width="0.635cm"/>
        <style:text-properties fo:font-family="OpenSymbol" style:font-charset="x-symbol" fo:color="#000000" fo:font-size="100%"/>
      </text:list-level-style-bullet>
      <text:list-level-style-bullet text:level="10" text:bullet-char="➢">
        <style:list-level-properties text:space-before="5.08cm" text:min-label-width="0.635cm"/>
        <style:text-properties fo:font-family="OpenSymbol" style:font-charset="x-symbol" fo:color="#000000" fo:font-size="100%"/>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min-label-width="1.27cm"/>
        <style:text-properties style:font-name="Arial" fo:color="#00206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1.27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3.658cm" svg:height="3.217cm" svg:x="3.034cm" svg:y="2.552cm" presentation:class="title" presentation:user-transformed="true">
          <draw:text-box>
            <text:list text:style-name="L1">
              <text:list-header>
                <text:p text:style-name="P1"><text:span text:style-name="T1">Kafka Administration</text:span></text:p>
              </text:list-header>
            </text:list>
          </draw:text-box>
        </draw:frame>
        <draw:frame presentation:style-name="pr2" draw:text-style-name="P4" draw:layer="layout" svg:width="23.658cm" svg:height="3.927cm" svg:x="3.034cm" svg:y="10.304cm" presentation:class="subtitle" presentation:user-transformed="true">
          <draw:text-box>
            <text:list text:style-name="L1">
              <text:list-header>
                <text:p text:style-name="P3"><text:span text:style-name="T2">David THIBAU – 2026</text:span></text:p>
                <text:p text:style-name="P3"><text:span text:style-name="T2"/></text:p>
                <text:p text:style-name="P3"><text:span text:style-name="T2">david.thibau@gmail.com</text:span></text:p>
              </text:list-header>
            </text:list>
          </draw:text-box>
        </draw:frame>
        <presentation:notes draw:style-name="dp2">
          <draw:custom-shape draw:style-name="gr1" draw:text-style-name="P5" draw:layer="layout" svg:width="14.535cm" svg:height="10.279cm" svg:x="3.232cm" svg:y="2.853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 draw:style-name="dp3" draw:master-page-name="Standard" presentation:presentation-page-layout-name="AL2T3">
        <office:forms form:automatic-focus="false" form:apply-design-mode="false"/>
        <draw:frame presentation:style-name="pr4" draw:layer="layout" svg:width="23.499cm" svg:height="3.575cm" svg:x="3.033cm" svg:y="2.367cm" presentation:class="title">
          <draw:text-box>
            <text:p>Agenda</text:p>
          </draw:text-box>
        </draw:frame>
        <draw:frame presentation:style-name="pr5" draw:layer="layout" svg:width="11.467cm" svg:height="13.847cm" svg:x="3.033cm" svg:y="6.283cm" presentation:class="outline" presentation:user-transformed="true">
          <draw:text-box>
            <text:list text:style-name="L2">
              <text:list-item>
                <text:p text:style-name="P7"><text:span text:style-name="T3">Introduction à Kafka</text:span></text:p>
              </text:list-item>
            </text:list>
            <text:list text:style-name="L3">
              <text:list-item>
                <text:list>
                  <text:list-item>
                    <text:p text:style-name="P8"><text:span text:style-name="T4">Le projet Kafka</text:span></text:p>
                  </text:list-item>
                  <text:list-item>
                    <text:p text:style-name="P8"><text:span text:style-name="T4">Cas d’usage</text:span></text:p>
                  </text:list-item>
                  <text:list-item>
                    <text:p text:style-name="P8"><text:span text:style-name="T4">Alternatives</text:span></text:p>
                  </text:list-item>
                  <text:list-item>
                    <text:p text:style-name="P8"><text:span text:style-name="T4">Concepts</text:span><text:span text:style-name="T4"><text:line-break/></text:span><text:span text:style-name="T4"/></text:p>
                  </text:list-item>
                </text:list>
              </text:list-item>
            </text:list>
            <text:list text:style-name="L2">
              <text:list-item>
                <text:p text:style-name="P9"><text:span text:style-name="T3">Cluster </text:span></text:p>
              </text:list-item>
            </text:list>
            <text:list text:style-name="L3">
              <text:list-item>
                <text:p text:style-name="P10"><text:span text:style-name="T4">Nœuds du cluster</text:span></text:p>
              </text:list-item>
              <text:list-item>
                <text:p text:style-name="P10"><text:span text:style-name="T4">Zookeeper vs Kraft</text:span></text:p>
              </text:list-item>
              <text:list-item>
                <text:p text:style-name="P10"><text:span text:style-name="T4">Distributions / Installation</text:span></text:p>
              </text:list-item>
              <text:list-item>
                <text:p text:style-name="P10"><text:span text:style-name="T4">Utilitaires Kafka</text:span></text:p>
              </text:list-item>
              <text:list-item>
                <text:p text:style-name="P10"><text:span text:style-name="T4">Outils graphiques</text:span></text:p>
              </text:list-item>
            </text:list>
            <text:list text:style-name="L2">
              <text:list-header>
                <text:p text:style-name="P11"><text:span text:style-name="T5"/></text:p>
              </text:list-header>
              <text:list-item>
                <text:p text:style-name="P9"><text:span text:style-name="T3">Production et Consommation </text:span></text:p>
              </text:list-item>
            </text:list>
            <text:list text:style-name="L3">
              <text:list-item>
                <text:p text:style-name="P10"><text:span text:style-name="T4">Anatomie d’un message</text:span></text:p>
              </text:list-item>
              <text:list-item>
                <text:p text:style-name="P10"><text:span text:style-name="T4">Production : mécanisme et configuration </text:span></text:p>
              </text:list-item>
              <text:list-item>
                <text:p text:style-name="P10"><text:span text:style-name="T4">Consommation : mécanisme et configuration </text:span></text:p>
              </text:list-item>
              <text:list-item>
                <text:p text:style-name="P10"><text:span text:style-name="T4">Sérialisation : formats et implication</text:span></text:p>
              </text:list-item>
              <text:list-item>
                <text:p text:style-name="P10"><text:span text:style-name="T4">Garanties Kafka</text:span></text:p>
                <text:p text:style-name="P10"><text:span text:style-name="T6"/></text:p>
              </text:list-item>
            </text:list>
            <text:p><text:span text:style-name="T3">Écosystème Kafka</text:span></text:p>
            <text:list text:continue-numbering="true" text:style-name="L3">
              <text:list-item>
                <text:p text:style-name="P10"><text:span text:style-name="T4">Schema Registry </text:span></text:p>
              </text:list-item>
              <text:list-item>
                <text:p text:style-name="P10"><text:span text:style-name="T4">Kafka Connect</text:span></text:p>
              </text:list-item>
              <text:list-item>
                <text:p text:style-name="P10"><text:span text:style-name="T4">MirrorMaker 2</text:span></text:p>
              </text:list-item>
              <text:list-item>
                <text:p text:style-name="P10"><text:span text:style-name="T4">Autres composants : Kafka Streams, ksqlDB et RestProxy </text:span></text:p>
              </text:list-item>
            </text:list>
          </draw:text-box>
        </draw:frame>
        <draw:frame presentation:style-name="pr5" draw:layer="layout" svg:width="11.467cm" svg:height="14.31cm" svg:x="15.074cm" svg:y="6.283cm" presentation:class="outline" presentation:user-transformed="true">
          <draw:text-box>
            <text:list text:style-name="L2">
              <text:list-item>
                <text:p text:style-name="P7"><text:span text:style-name="T7">Sécurité</text:span></text:p>
              </text:list-item>
            </text:list>
            <text:list text:style-name="L3">
              <text:list-item>
                <text:list>
                  <text:list-item>
                    <text:p text:style-name="P12"><text:span text:style-name="T8">Configuration des listeners</text:span></text:p>
                  </text:list-item>
                  <text:list-item>
                    <text:p text:style-name="P12"><text:span text:style-name="T8">SSL/TLS</text:span></text:p>
                  </text:list-item>
                  <text:list-item>
                    <text:p text:style-name="P12"><text:span text:style-name="T8">Authentification SASL</text:span></text:p>
                  </text:list-item>
                  <text:list-item>
                    <text:p text:style-name="P12"><text:span text:style-name="T8">ACL et Quotas </text:span></text:p>
                  </text:list-item>
                  <text:list-item>
                    <text:p text:style-name="P12"><text:span text:style-name="T8">Sécurisation composant annexe</text:span></text:p>
                    <text:p text:style-name="P12"><text:span text:style-name="T8"/></text:p>
                  </text:list-item>
                </text:list>
              </text:list-item>
            </text:list>
            <text:list text:style-name="L2">
              <text:list-item>
                <text:p text:style-name="P7"><text:span text:style-name="T7">Exploitation</text:span></text:p>
              </text:list-item>
            </text:list>
            <text:list text:style-name="L3">
              <text:list-item>
                <text:list>
                  <text:list-item>
                    <text:p text:style-name="P12"><text:span text:style-name="T8">Stockage et rétention</text:span><text:span text:style-name="T9"> </text:span><text:span text:style-name="T8">des partitions</text:span></text:p>
                  </text:list-item>
                  <text:list-item>
                    <text:p text:style-name="P12"><text:span text:style-name="T8">Gestion des topics, des partitions, des groupes </text:span></text:p>
                  </text:list-item>
                  <text:list-item>
                    <text:p text:style-name="P8"><text:span text:style-name="T8">Gestion du cluster, Mise à jour </text:span></text:p>
                  </text:list-item>
                  <text:list-item>
                    <text:p text:style-name="P8"><text:span text:style-name="T8">Sauvegarde et reprise</text:span></text:p>
                    <text:p text:style-name="P12"><text:span text:style-name="T10"/></text:p>
                  </text:list-item>
                </text:list>
              </text:list-item>
            </text:list>
            <text:p text:style-name="P7"><text:span text:style-name="T7">Dimensionnement et performance</text:span></text:p>
            <text:list text:continue-numbering="true" text:style-name="L3">
              <text:list-item>
                <text:p text:style-name="P10"><text:span text:style-name="T8">Dimensionnement</text:span></text:p>
              </text:list-item>
              <text:list-item>
                <text:p text:style-name="P10"><text:span text:style-name="T8">Réglages JVM et OS</text:span></text:p>
              </text:list-item>
              <text:list-item>
                <text:p text:style-name="P10"><text:span text:style-name="T8">Benchmarks </text:span></text:p>
              </text:list-item>
              <text:list-item>
                <text:p text:style-name="P10"><text:span text:style-name="T8">Pattern d’architecture</text:span></text:p>
                <text:p text:style-name="P10"><text:span text:style-name="T8"/></text:p>
              </text:list-item>
            </text:list>
            <text:p text:style-name="P7"><text:span text:style-name="T7">Monitoring et observabilité</text:span></text:p>
            <text:list text:continue-numbering="true" text:style-name="L3">
              <text:list-item>
                <text:p text:style-name="P10"><text:span text:style-name="T8">Métriques clés à surveiller </text:span></text:p>
              </text:list-item>
              <text:list-item>
                <text:p text:style-name="P10"><text:span text:style-name="T8">Exposition JMX et intégration Prometheus / Grafana</text:span></text:p>
              </text:list-item>
              <text:list-item>
                <text:p text:style-name="P10"><text:span text:style-name="T8">Dashboards de référence</text:span></text:p>
              </text:list-item>
              <text:list-item>
                <text:p text:style-name="P10"><text:span text:style-name="T8">Alerting : seuils pertinents </text:span></text:p>
              </text:list-item>
              <text:list-item>
                <text:p text:style-name="P10"><text:span text:style-name="T8">Logs Kafka : ce qu'on cherche, où, quand</text:span></text:p>
                <text:p text:style-name="P10"><text:span text:style-name="T8"/></text:p>
              </text:list-item>
            </text:list>
            <text:p text:style-name="P7"><text:span text:style-name="T7">Troubleshooting</text:span></text:p>
            <text:list text:continue-numbering="true" text:style-name="L3">
              <text:list-item>
                <text:p text:style-name="P10"><text:span text:style-name="T8">Méthodologie de diagnostic</text:span></text:p>
              </text:list-item>
              <text:list-item>
                <text:p text:style-name="P10"><text:span text:style-name="T8">Scénarios classiques </text:span></text:p>
              </text:list-item>
              <text:list-item>
                <text:p text:style-name="P10"><text:span text:style-name="T8">Lecture des logs et corrélation avec les métriques</text:span></text:p>
              </text:list-item>
              <text:list-item>
                <text:p text:style-name="P10"><text:span text:style-name="T8">Outils de diagnostic </text:span></text:p>
              </text:list-item>
            </text:list>
          </draw:text-box>
        </draw:frame>
        <presentation:notes draw:style-name="dp4">
          <draw:page-thumbnail draw:style-name="gr2" draw:layer="layout" svg:width="15.597cm" svg:height="10.985cm" svg:x="2.623cm" svg:y="2.258cm" draw:page-number="2" presentation:class="page"/>
          <draw:frame presentation:style-name="pr6" draw:text-style-name="P13" draw:layer="layout" svg:width="14.362cm" svg:height="11.254cm" svg:x="3.25cm" svg:y="14.128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Introduction à Kafka</text:span></text:p>
              </text:list-header>
            </text:list>
          </draw:text-box>
        </draw:frame>
        <draw:frame presentation:style-name="pr8" draw:text-style-name="P16"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2">Le projet Kafka</text:span></text:p>
              </text:list-item>
              <text:list-item>
                <text:p text:style-name="P3"><text:span text:style-name="T13">Cas d’usage</text:span></text:p>
              </text:list-item>
              <text:list-item>
                <text:p text:style-name="P3"><text:span text:style-name="T13">Concepts</text:span></text:p>
                <text:p text:style-name="P3"><text:span text:style-name="T2"/></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rigine</text:p>
          </draw:text-box>
        </draw:frame>
        <draw:frame presentation:style-name="pr5" draw:layer="layout" svg:width="23.499cm" svg:height="12.18cm" svg:x="3.033cm" svg:y="6.283cm" presentation:class="outline">
          <draw:text-box>
            <text:list text:style-name="L2">
              <text:list-item>
                <text:p>Initié par <text:span text:style-name="T14">LinkedIn,</text:span> mis en OpenSource en 2011</text:p>
              </text:list-item>
              <text:list-item>
                <text:p>Écrit en <text:span text:style-name="T14">Scala</text:span> et <text:span text:style-name="T14">Java</text:span></text:p>
              </text:list-item>
              <text:list-item>
                <text:p>Au départ, un message broker gérant une file de messages</text:p>
              </text:list-item>
              <text:list-item>
                <text:p>A évolué pour devenir une plate-forme de streaming d'événements temps-réel</text:p>
              </text:list-item>
              <text:list-item>
                <text:p>Organisé en cluster, taillé pour le BigData, il est basé sur l’abstraction « d’un journal de commit distribué »</text:p>
              </text:list-item>
              <text:list-item>
                <text:p>Maintenu par <text:span text:style-name="T14">Confluent</text:span> depuis 2014</text:p>
              </text:list-item>
            </text:list>
          </draw:text-box>
        </draw:frame>
        <presentation:notes draw:style-name="dp5">
          <draw:page-thumbnail draw:style-name="gr2" draw:layer="layout" svg:width="15.597cm" svg:height="10.985cm" svg:x="2.623cm" svg:y="2.258cm" draw:page-number="4" presentation:class="page"/>
          <draw:frame presentation:style-name="pr6" draw:text-style-name="P13" draw:layer="layout" svg:width="14.362cm" svg:height="11.254cm" svg:x="3.25cm" svg:y="14.128cm" presentation:class="notes" presentation:placeholder="true">
            <draw:text-box/>
          </draw:frame>
        </presentation:notes>
      </draw:page>
      <draw:page draw:name="page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bjectifs et Points forts</text:p>
          </draw:text-box>
        </draw:frame>
        <draw:frame presentation:style-name="pr5" draw:layer="layout" svg:width="23.499cm" svg:height="12.18cm" svg:x="3.033cm" svg:y="6.283cm" presentation:class="outline" presentation:user-transformed="true">
          <draw:text-box>
            <text:list text:style-name="L4">
              <text:list-item>
                <text:p><text:s/>Découpler producteurs et consommateurs de messages</text:p>
              </text:list-item>
              <text:list-item>
                <text:p><text:s/>Persister les messages afin qu’ils puissent être consommés par de nombreux consommateurs, (éventuellement à posteriori)</text:p>
              </text:list-item>
              <text:list-item>
                <text:p><text:s/>Atteindre de très haut débit et une latence faible</text:p>
              </text:list-item>
              <text:list-item>
                <text:p><text:s/>Scaling horizontal flexible</text:p>
              </text:list-item>
              <text:list-item>
                <text:p><text:s/>Offrir des garanties de fiabilité de la livraison de messages, malgré des défaillances !</text:p>
              </text:list-item>
            </text:list>
          </draw:text-box>
        </draw:frame>
        <presentation:notes draw:style-name="dp5">
          <draw:page-thumbnail draw:style-name="gr2" draw:layer="layout" svg:width="15.597cm" svg:height="10.985cm" svg:x="2.623cm" svg:y="2.258cm" draw:page-number="5" presentation:class="page"/>
          <draw:frame presentation:style-name="pr6" draw:text-style-name="P13" draw:layer="layout" svg:width="14.362cm" svg:height="11.254cm" svg:x="3.25cm" svg:y="14.128cm" presentation:class="notes" presentation:placeholder="true">
            <draw:text-box/>
          </draw:frame>
        </presentation:notes>
      </draw:page>
      <draw:page draw:name="page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onctionnalités</text:p>
          </draw:text-box>
        </draw:frame>
        <draw:frame presentation:style-name="pr5" draw:layer="layout" svg:width="23.499cm" svg:height="12.18cm" svg:x="3.033cm" svg:y="6.283cm" presentation:class="outline" presentation:user-transformed="true">
          <draw:text-box>
            <text:list text:style-name="L2">
              <text:list-item>
                <text:p>Kafka a trois capacités clés:</text:p>
                <text:list>
                  <text:list-item>
                    <text:p>Publier et s’abonner à des flux de messages<text:span text:style-name="T15">1</text:span> avec certaines garanties de fiabilité malgré des défaillances.</text:p>
                  </text:list-item>
                  <text:list-item>
                    <text:p>Stocker les flux de messages de manière durable malgré des défaillances.</text:p>
                  </text:list-item>
                  <text:list-item>
                    <text:p>Traiter, transformer les flux de messages au fur et à mesure qu'ils se produisent (KafkaStream).</text:p>
                  </text:list-item>
                </text:list>
              </text:list-item>
            </text:list>
          </draw:text-box>
        </draw:frame>
        <draw:frame draw:style-name="gr4" draw:text-style-name="P17" draw:layer="layout" svg:width="21.186cm" svg:height="1.861cm" svg:x="1.428cm" svg:y="18.388cm">
          <draw:text-box>
            <text:p><text:span text:style-name="T16">1. Dans la suite des slides on utilise de façon non-différenciés les termes </text:span></text:p>
            <text:p><text:span text:style-name="T17">message</text:span><text:span text:style-name="T16">, </text:span><text:span text:style-name="T17">événement</text:span><text:span text:style-name="T16">, </text:span><text:span text:style-name="T17">enregistrement</text:span></text:p>
          </draw:text-box>
        </draw:frame>
        <presentation:notes draw:style-name="dp5">
          <draw:page-thumbnail draw:style-name="gr2" draw:layer="layout" svg:width="15.597cm" svg:height="10.985cm" svg:x="2.623cm" svg:y="2.258cm" draw:page-number="6" presentation:class="page"/>
          <draw:frame presentation:style-name="pr6" draw:text-style-name="P18" draw:layer="layout" svg:width="14.362cm" svg:height="11.254cm" svg:x="3.25cm" svg:y="14.128cm" presentation:class="notes" presentation:placeholder="true">
            <draw:text-box/>
          </draw:frame>
        </presentation:notes>
      </draw:page>
      <draw:page draw:name="page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luent</text:p>
          </draw:text-box>
        </draw:frame>
        <draw:frame presentation:style-name="pr5" draw:layer="layout" svg:width="23.499cm" svg:height="12.18cm" svg:x="3.033cm" svg:y="6.283cm" presentation:class="outline">
          <draw:text-box>
            <text:list text:style-name="L2">
              <text:list-item>
                <text:p>Créé en 2014 par <text:span text:style-name="T14">Jay Kreps, </text:span><text:span text:style-name="T14">Neha Narkhede</text:span>, et <text:span text:style-name="T14">Jun Rao</text:span></text:p>
              </text:list-item>
              <text:list-item>
                <text:p>Mainteneur principal d’Apache Kafka</text:p>
              </text:list-item>
              <text:list-item>
                <text:p><text:span text:style-name="T14">Confluent</text:span> offre:</text:p>
                <text:list>
                  <text:list-item>
                    <text:p>Une distribution de Kafka et d’outils connexes avec des fonctionnalités commerciales additionnelles </text:p>
                  </text:list-item>
                  <text:list-item>
                    <text:p>Solution Cloud</text:p>
                  </text:list-item>
                  <text:list-item>
                    <text:p>Support</text:p>
                  </text:list-item>
                </text:list>
              </text:list-item>
              <text:list-item>
                <text:p/>
              </text:list-item>
            </text:list>
          </draw:text-box>
        </draw:frame>
        <presentation:notes draw:style-name="dp5">
          <draw:page-thumbnail draw:style-name="gr2" draw:layer="layout" svg:width="15.597cm" svg:height="10.985cm" svg:x="2.623cm" svg:y="2.258cm" draw:page-number="7" presentation:class="page"/>
          <draw:frame presentation:style-name="pr6" draw:text-style-name="P13" draw:layer="layout" svg:width="14.362cm" svg:height="11.254cm" svg:x="3.25cm" svg:y="14.128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Introduction à Kafka</text:span></text:p>
              </text:list-header>
            </text:list>
          </draw:text-box>
        </draw:frame>
        <draw:frame presentation:style-name="pr10" draw:text-style-name="P16"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9"><text:span text:style-name="T2">Le projet Kafkfa</text:span></text:p>
              </text:list-item>
              <text:list-item>
                <text:p text:style-name="P19"><text:span text:style-name="T12">Cas d’usage</text:span></text:p>
              </text:list-item>
              <text:list-item>
                <text:p text:style-name="P3"><text:span text:style-name="T13">Concepts</text:span></text:p>
                <text:p text:style-name="P3"><text:span text:style-name="T2"/></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9" draw:style-name="dp3" draw:master-page-name="Standard" presentation:presentation-page-layout-name="AL3T1">
        <office:forms form:automatic-focus="false" form:apply-design-mode="false"/>
        <draw:frame presentation:style-name="pr11" draw:layer="layout" svg:width="23.499cm" svg:height="3.577cm" svg:x="3.033cm" svg:y="2.366cm" presentation:class="title" presentation:user-transformed="true">
          <draw:text-box>
            <text:p>Kafka vs<text:line-break/>Message broker traditionnel</text:p>
          </draw:text-box>
        </draw:frame>
        <draw:frame presentation:style-name="pr5" draw:layer="layout" svg:width="23.499cm" svg:height="12.18cm" svg:x="3.033cm" svg:y="6.283cm" presentation:class="outline">
          <draw:text-box>
            <text:list text:style-name="L2">
              <text:list-item>
                <text:p>Kafka peut être utilisé comme <text:span text:style-name="T18">message broker</text:span> permettant de découpler un service producteur des services consommateurs</text:p>
                <text:list>
                  <text:list-item>
                    <text:p>Kafka privilégie le modèle <text:span text:style-name="T19">PubSub</text:span><text:span text:style-name="T20">1</text:span><text:span text:style-name="T14">.</text:span></text:p>
                  </text:list-item>
                  <text:list-item>
                    <text:p><text:span text:style-name="T21">G</text:span>râce au concept de <text:span text:style-name="T22">groupe de </text:span><text:span text:style-name="T22">consommateur</text:span>, ce modèle est scalable</text:p>
                  </text:list-item>
                  <text:list-item>
                    <text:p>Kafka offre une <text:span text:style-name="T22">garantie plus forte</text:span> sur la livraison et le traitement des messages malgré des défaillances</text:p>
                  </text:list-item>
                  <text:list-item>
                    <text:p>Kafka ne supprime pas les messages après consommation. Ils peuvent être <text:span text:style-name="T22">consommés à </text:span><text:span text:style-name="T22">posteriori</text:span></text:p>
                  </text:list-item>
                </text:list>
              </text:list-item>
              <text:list-item>
                <text:p>=&gt; Idéal comme plate-forme d’intégration entre services : Architecture micro-services, ESB</text:p>
              </text:list-item>
            </text:list>
          </draw:text-box>
        </draw:frame>
        <draw:frame draw:style-name="gr5" draw:text-style-name="P20" draw:layer="layout" svg:width="14.121cm" svg:height="0.894cm" svg:x="1.604cm" svg:y="19.59cm">
          <draw:text-box>
            <text:p><text:span text:style-name="T23">1. Dans la version 4.x, le modèle Point2Point est en preview</text:span></text:p>
          </draw:text-box>
        </draw:frame>
        <presentation:notes draw:style-name="dp5">
          <draw:page-thumbnail draw:style-name="gr2" draw:layer="layout" svg:width="15.597cm" svg:height="10.985cm" svg:x="2.623cm" svg:y="2.258cm" draw:page-number="9" presentation:class="page"/>
          <draw:frame presentation:style-name="pr6" draw:text-style-name="P13" draw:layer="layout" svg:width="14.362cm" svg:height="11.254cm" svg:x="3.25cm" svg:y="14.128cm" presentation:class="notes" presentation:placeholder="true">
            <draw:text-box/>
          </draw:frame>
        </presentation:notes>
      </draw:page>
      <draw:page draw:name="page10"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4">Exemple ESB (New York Times)</text:span><text:line-break/><text:span text:style-name="T25">Avant</text:span></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15.081cm" svg:height="11.605cm" svg:x="7.169cm" svg:y="6.954cm">
          <draw:image xlink:href="Pictures/10000001000003000000024F09C46404.png" xlink:type="simple" xlink:show="embed" xlink:actuate="onLoad" draw:mime-type="image/png">
            <text:p/>
          </draw:image>
        </draw:frame>
        <presentation:notes draw:style-name="dp5">
          <draw:page-thumbnail draw:style-name="gr2" draw:layer="layout" svg:width="15.597cm" svg:height="10.985cm" svg:x="2.623cm" svg:y="2.258cm" draw:page-number="10" presentation:class="page"/>
          <draw:frame presentation:style-name="pr6" draw:text-style-name="P13" draw:layer="layout" svg:width="14.362cm" svg:height="11.254cm" svg:x="3.25cm" svg:y="14.128cm" presentation:class="notes" presentation:placeholder="true">
            <draw:text-box/>
          </draw:frame>
        </presentation:notes>
      </draw:page>
      <draw:page draw:name="page1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text:span text:style-name="T24">Exemple ESB (New York Times)</text:span><text:line-break/><text:span text:style-name="T25">Après</text:span></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17.144cm" svg:height="11.898cm" svg:x="6.615cm" svg:y="7.323cm">
          <draw:image xlink:href="Pictures/100000010000030000000215F4C6714B.png" xlink:type="simple" xlink:show="embed" xlink:actuate="onLoad" draw:mime-type="image/png">
            <text:p/>
          </draw:image>
        </draw:frame>
        <presentation:notes draw:style-name="dp5">
          <draw:page-thumbnail draw:style-name="gr2" draw:layer="layout" svg:width="15.597cm" svg:height="10.985cm" svg:x="2.623cm" svg:y="2.258cm" draw:page-number="11" presentation:class="page"/>
          <draw:frame presentation:style-name="pr6" draw:text-style-name="P13" draw:layer="layout" svg:width="14.362cm" svg:height="11.254cm" svg:x="3.25cm" svg:y="14.128cm" presentation:class="notes" presentation:placeholder="true">
            <draw:text-box/>
          </draw:frame>
        </presentation:notes>
      </draw:page>
      <draw:page draw:name="page1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 micro-services</text:p>
          </draw:text-box>
        </draw:frame>
        <draw:frame presentation:style-name="pr5" draw:layer="layout" svg:width="23.499cm" svg:height="12.18cm" svg:x="3.033cm" svg:y="6.283cm" presentation:class="outline">
          <draw:text-box>
            <text:list text:style-name="L2">
              <text:list-item>
                <text:p>Un message broker est souvent central aux architectures micro-services</text:p>
                <text:list>
                  <text:list-item>
                    <text:p><text:span text:style-name="T26">Permet tous les </text:span><text:span text:style-name="T26">styles </text:span><text:span text:style-name="T26">d’interaction : </text:span><text:span text:style-name="T27">Requête/Réponse </text:span><text:span text:style-name="T27">synchrone ou asynchrone, </text:span><text:span text:style-name="T27"><text:line-break/></text:span><text:span text:style-name="T27">One way notification, </text:span><text:span text:style-name="T27"><text:line-break/></text:span><text:span text:style-name="T28">PubAndSub</text:span><text:span text:style-name="T27"> synchrone ou </text:span><text:span text:style-name="T27">asynchrone</text:span></text:p>
                  </text:list-item>
                  <text:list-item>
                    <text:p>Certains patterns micro-services sont implémentés via un message broker (exemple SAGA<text:span text:style-name="T15">1</text:span>) </text:p>
                  </text:list-item>
                </text:list>
              </text:list-item>
            </text:list>
          </draw:text-box>
        </draw:frame>
        <draw:frame draw:style-name="gr7" draw:text-style-name="P20" draw:layer="layout" svg:width="14.811cm" svg:height="1.056cm" svg:x="1.402cm" svg:y="19.262cm">
          <draw:text-box>
            <text:p><text:span text:style-name="T17">1. https://microservices.io/patterns/data/saga.html</text:span></text:p>
          </draw:text-box>
        </draw:frame>
        <presentation:notes draw:style-name="dp5">
          <draw:page-thumbnail draw:style-name="gr2" draw:layer="layout" svg:width="15.597cm" svg:height="10.985cm" svg:x="2.623cm" svg:y="2.258cm" draw:page-number="12" presentation:class="page"/>
          <draw:frame presentation:style-name="pr6" draw:text-style-name="P13" draw:layer="layout" svg:width="14.362cm" svg:height="11.254cm" svg:x="3.25cm" svg:y="14.128cm" presentation:class="notes" presentation:placeholder="true">
            <draw:text-box/>
          </draw:frame>
        </presentation:notes>
      </draw:page>
      <draw:page draw:name="page13" draw:style-name="dp3" draw:master-page-name="Standard" presentation:presentation-page-layout-name="AL3T1">
        <office:forms form:automatic-focus="false" form:apply-design-mode="false"/>
        <draw:frame presentation:style-name="pr12" draw:layer="layout" svg:width="23.499cm" svg:height="6.064cm" svg:x="3.35cm" svg:y="0.074cm" presentation:class="title" presentation:user-transformed="true">
          <draw:text-box>
            <text:p><text:span text:style-name="T29">Exemple SAGA</text:span><text:span text:style-name="T29"><text:line-break/></text:span><text:span text:style-name="T29">Transaction distribuée </text:span></text:p>
          </draw:text-box>
        </draw:frame>
        <draw:frame presentation:style-name="pr5" draw:layer="layout" svg:width="23.499cm" svg:height="12.18cm" svg:x="3.033cm" svg:y="6.283cm" presentation:class="outline" presentation:placeholder="true" presentation:user-transformed="true">
          <draw:text-box/>
        </draw:frame>
        <draw:frame draw:style-name="gr8" draw:text-style-name="P21" draw:layer="layout" svg:width="19.794cm" svg:height="12.823cm" svg:x="4.2cm" svg:y="6.4cm">
          <draw:image xlink:href="Pictures/10000001000003BD0000026C12AB267E.png" xlink:type="simple" xlink:show="embed" xlink:actuate="onLoad" draw:mime-type="image/png">
            <text:p/>
          </draw:image>
        </draw:frame>
        <presentation:notes draw:style-name="dp5">
          <draw:page-thumbnail draw:style-name="gr2" draw:layer="layout" svg:width="15.597cm" svg:height="10.985cm" svg:x="2.623cm" svg:y="2.258cm" draw:page-number="13" presentation:class="page"/>
          <draw:frame presentation:style-name="pr6" draw:text-style-name="P18" draw:layer="layout" svg:width="14.362cm" svg:height="11.254cm" svg:x="3.25cm" svg:y="14.128cm" presentation:class="notes" presentation:placeholder="true">
            <draw:text-box/>
          </draw:frame>
        </presentation:notes>
      </draw:page>
      <draw:page draw:name="page1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afka : Data Buffering</text:p>
          </draw:text-box>
        </draw:frame>
        <draw:frame presentation:style-name="pr5" draw:layer="layout" svg:width="23.499cm" svg:height="12.18cm" svg:x="3.033cm" svg:y="6.283cm" presentation:class="outline">
          <draw:text-box>
            <text:list text:style-name="L2">
              <text:list-item>
                <text:p>Les <text:span text:style-name="T14">topics</text:span> Kafka peuvent être utilisés pour bufferiser les événements provenant de multiples sources</text:p>
                <text:list>
                  <text:list-item>
                    <text:p>Ces événements alimentent des pipelines de traitement et transformation destinées à des solutions d’analyse temps-réel, d’alerting ou de machine learning</text:p>
                  </text:list-item>
                </text:list>
              </text:list-item>
            </text:list>
          </draw:text-box>
        </draw:frame>
        <presentation:notes draw:style-name="dp5">
          <draw:page-thumbnail draw:style-name="gr2" draw:layer="layout" svg:width="15.597cm" svg:height="10.985cm" svg:x="2.623cm" svg:y="2.258cm" draw:page-number="14" presentation:class="page"/>
          <draw:frame presentation:style-name="pr6" draw:text-style-name="P13" draw:layer="layout" svg:width="14.362cm" svg:height="11.254cm" svg:x="3.25cm" svg:y="14.128cm" presentation:class="notes" presentation:placeholder="true">
            <draw:text-box/>
          </draw:frame>
        </presentation:notes>
      </draw:page>
      <draw:page draw:name="page1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24">Exemple Architecture ELK</text:span><text:span text:style-name="T24"><text:line-break/></text:span><text:span text:style-name="T24">Bufferisation des événements</text:span></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6.094cm" svg:height="12.572cm" svg:x="2.196cm" svg:y="6.885cm">
          <draw:image xlink:href="Pictures/100000000000093E00000474937D8F7C.png" xlink:type="simple" xlink:show="embed" xlink:actuate="onLoad" draw:mime-type="image/png">
            <text:p/>
          </draw:image>
        </draw:frame>
        <presentation:notes draw:style-name="dp5">
          <draw:page-thumbnail draw:style-name="gr2" draw:layer="layout" svg:width="15.597cm" svg:height="10.985cm" svg:x="2.623cm" svg:y="2.258cm" draw:page-number="15" presentation:class="page"/>
          <draw:frame presentation:style-name="pr6" draw:text-style-name="P13" draw:layer="layout" svg:width="14.362cm" svg:height="11.254cm" svg:x="3.25cm" svg:y="14.128cm" presentation:class="notes" presentation:placeholder="true">
            <draw:text-box/>
          </draw:frame>
        </presentation:notes>
      </draw:page>
      <draw:page draw:name="page16"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4">Ingestion massive de données</text:span><text:span text:style-name="T24"><text:line-break/></text:span><text:span text:style-name="T24">Exemple Uber</text:span></text:p>
          </draw:text-box>
        </draw:frame>
        <draw:frame presentation:style-name="pr5" draw:layer="layout" svg:width="23.499cm" svg:height="12.18cm" svg:x="3.033cm" svg:y="6.283cm" presentation:class="outline" presentation:placeholder="true">
          <draw:text-box/>
        </draw:frame>
        <draw:frame draw:style-name="gr9" draw:text-style-name="P23" draw:layer="layout" svg:width="22.057cm" svg:height="11.975cm" svg:x="3.693cm" svg:y="6.494cm">
          <draw:image xlink:href="Pictures/1000000000000300000001A10D151138.png" xlink:type="simple" xlink:show="embed" xlink:actuate="onLoad" draw:mime-type="image/png">
            <text:p/>
          </draw:image>
        </draw:frame>
        <presentation:notes draw:style-name="dp5">
          <draw:page-thumbnail draw:style-name="gr2" draw:layer="layout" svg:width="15.597cm" svg:height="10.985cm" svg:x="2.623cm" svg:y="2.258cm" draw:page-number="16" presentation:class="page"/>
          <draw:frame presentation:style-name="pr6" draw:text-style-name="P18" draw:layer="layout" svg:width="14.362cm" svg:height="11.254cm" svg:x="3.25cm" svg:y="14.128cm" presentation:class="notes" presentation:placeholder="true">
            <draw:text-box/>
          </draw:frame>
        </presentation:notes>
      </draw:page>
      <draw:page draw:name="page17" draw:style-name="dp3" draw:master-page-name="Standard" presentation:presentation-page-layout-name="AL3T1">
        <draw:frame presentation:style-name="pr9" draw:layer="layout" svg:width="23.499cm" svg:height="3.575cm" svg:x="3.033cm" svg:y="2.367cm" presentation:class="title">
          <draw:text-box>
            <text:p>Architectures Event-driven</text:p>
          </draw:text-box>
        </draw:frame>
        <draw:frame presentation:style-name="pr5" draw:layer="layout" svg:width="23.499cm" svg:height="12.18cm" svg:x="3.033cm" svg:y="6.283cm" presentation:class="outline">
          <draw:text-box>
            <text:list text:style-name="L2">
              <text:list-item>
                <text:p>Les architectures <text:span text:style-name="T14">event-</text:span><text:span text:style-name="T14">driven</text:span> sont des architectures constituées de micro-services consommant en continu des événements.</text:p>
              </text:list-item>
              <text:list-item>
                <text:p>Chaque micro-service :</text:p>
                <text:list>
                  <text:list-item>
                    <text:p>Lit un ou plusieurs topics Kafka en entrée</text:p>
                  </text:list-item>
                  <text:list-item>
                    <text:p>Effectue un traitement</text:p>
                  </text:list-item>
                  <text:list-item>
                    <text:p>Écrit vers un ou plusieurs topics de sortie </text:p>
                  </text:list-item>
                </text:list>
              </text:list-item>
            </text:list>
            <text:p>Cela produit généralement des architectures évolutives, scalables et réactives.</text:p>
            <text:list text:continue-numbering="true" text:style-name="L2">
              <text:list-item>
                <text:p>Les micro-services sont simples à développer</text:p>
              </text:list-item>
              <text:list-item>
                <text:p/>
              </text:list-item>
              <text:list-item>
                <text:p>Kafka Stream, Spring Cloud Stream ou Spring Cloud Data Flow facilitent ce type d’architecture <text:s/></text:p>
              </text:list-item>
            </text:list>
          </draw:text-box>
        </draw:frame>
        <presentation:notes draw:style-name="dp5">
          <draw:page-thumbnail draw:style-name="gr2" draw:layer="layout" svg:width="15.597cm" svg:height="10.985cm" svg:x="2.623cm" svg:y="2.258cm" draw:page-number="17" presentation:class="page"/>
          <draw:frame presentation:style-name="pr6" draw:text-style-name="P18" draw:layer="layout" svg:width="14.362cm" svg:height="11.254cm" svg:x="3.25cm" svg:y="14.128cm" presentation:class="notes" presentation:placeholder="true">
            <draw:text-box/>
          </draw:frame>
        </presentation:notes>
      </draw:page>
      <draw:page draw:name="page18" draw:style-name="dp3" draw:master-page-name="Standard" presentation:presentation-page-layout-name="AL3T1">
        <draw:frame presentation:style-name="pr9" draw:layer="layout" svg:width="23.499cm" svg:height="3.575cm" svg:x="3.033cm" svg:y="2.367cm" presentation:class="title">
          <draw:text-box>
            <text:p>Event-driven architecture</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6.193cm" svg:height="11.429cm" svg:x="1.308cm" svg:y="7.968cm">
          <draw:image xlink:href="Pictures/10000000000003DE000001B0B0EE38E8.png" xlink:type="simple" xlink:show="embed" xlink:actuate="onLoad" draw:mime-type="image/png">
            <text:p/>
          </draw:image>
        </draw:frame>
        <presentation:notes draw:style-name="dp5">
          <draw:page-thumbnail draw:style-name="gr2" draw:layer="layout" svg:width="15.597cm" svg:height="10.985cm" svg:x="2.623cm" svg:y="2.258cm" draw:page-number="18" presentation:class="page"/>
          <draw:frame presentation:style-name="pr6" draw:text-style-name="P13" draw:layer="layout" svg:width="14.362cm" svg:height="11.254cm" svg:x="3.25cm" svg:y="14.128cm" presentation:class="notes" presentation:placeholder="true">
            <draw:text-box/>
          </draw:frame>
        </presentation:notes>
      </draw:page>
      <draw:page draw:name="page19" draw:style-name="dp3" draw:master-page-name="Standard" presentation:presentation-page-layout-name="AL3T1">
        <draw:frame presentation:style-name="pr9" draw:layer="layout" svg:width="23.499cm" svg:height="3.575cm" svg:x="3.033cm" svg:y="2.367cm" presentation:class="title" presentation:user-transformed="true">
          <draw:text-box>
            <text:p><text:span text:style-name="T24">Spring Cloud Data Flow</text:span></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16.35cm" svg:height="13.096cm" svg:x="6.774cm" svg:y="6.496cm">
          <draw:image xlink:href="Pictures/100000000000026A000001EF6A727DA5.png" xlink:type="simple" xlink:show="embed" xlink:actuate="onLoad" draw:mime-type="image/png">
            <text:p/>
          </draw:image>
        </draw:frame>
        <presentation:notes draw:style-name="dp5">
          <draw:page-thumbnail draw:style-name="gr2" draw:layer="layout" svg:width="15.597cm" svg:height="10.985cm" svg:x="2.623cm" svg:y="2.258cm" draw:page-number="19" presentation:class="page"/>
          <draw:frame presentation:style-name="pr6" draw:text-style-name="P18" draw:layer="layout" svg:width="14.362cm" svg:height="11.254cm" svg:x="3.25cm" svg:y="14.128cm" presentation:class="notes" presentation:placeholder="true">
            <draw:text-box/>
          </draw:frame>
        </presentation:notes>
      </draw:page>
      <draw:page draw:name="page20" draw:style-name="dp3" draw:master-page-name="Standard" presentation:presentation-page-layout-name="AL3T1">
        <draw:frame presentation:style-name="pr9" draw:layer="layout" svg:width="23.499cm" svg:height="3.575cm" svg:x="3.033cm" svg:y="2.367cm" presentation:class="title">
          <draw:text-box>
            <text:p>KsqlDB et KafkaStream </text:p>
          </draw:text-box>
        </draw:frame>
        <draw:frame presentation:style-name="pr5" draw:layer="layout" svg:width="23.499cm" svg:height="6.946cm" svg:x="3.033cm" svg:y="6.283cm" presentation:class="outline" presentation:user-transformed="true">
          <draw:text-box>
            <text:list text:style-name="L2">
              <text:list-item>
                <text:p text:style-name="P24">KafkaStream est une API Kafka permettant de construire des applications de traitement de flux </text:p>
              </text:list-item>
              <text:list-item>
                <text:p text:style-name="P24"/>
              </text:list-item>
              <text:list-item>
                <text:p text:style-name="P24">KsqlDB est une abstraction au dessus de KafkaStream permettant de créer ces applications à partir d’instructions SQL</text:p>
              </text:list-item>
            </text:list>
          </draw:text-box>
        </draw:frame>
        <draw:frame draw:style-name="gr6" draw:text-style-name="P21" draw:layer="layout" svg:width="16.103cm" svg:height="6.966cm" svg:x="5.425cm" svg:y="13.702cm">
          <draw:image xlink:href="Pictures/1000000100000AD1000004AEF47DE572.png" xlink:type="simple" xlink:show="embed" xlink:actuate="onLoad" draw:mime-type="image/png">
            <text:p/>
          </draw:image>
        </draw:frame>
        <presentation:notes draw:style-name="dp5">
          <draw:page-thumbnail draw:style-name="gr2" draw:layer="layout" svg:width="15.597cm" svg:height="10.985cm" svg:x="2.623cm" svg:y="2.258cm" draw:page-number="20" presentation:class="page"/>
          <draw:frame presentation:style-name="pr6" draw:text-style-name="P13" draw:layer="layout" svg:width="14.362cm" svg:height="11.254cm" svg:x="3.25cm" svg:y="14.128cm" presentation:class="notes" presentation:placeholder="true">
            <draw:text-box/>
          </draw:frame>
        </presentation:notes>
      </draw:page>
      <draw:page draw:name="page21" draw:style-name="dp3" draw:master-page-name="Standard" presentation:presentation-page-layout-name="AL3T1">
        <draw:frame presentation:style-name="pr9" draw:layer="layout" svg:width="23.499cm" svg:height="3.575cm" svg:x="3.033cm" svg:y="2.367cm" presentation:class="title">
          <draw:text-box>
            <text:p text:style-name="P25">Architecture ksqlDB</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0.61cm" svg:height="11.593cm" svg:x="4.766cm" svg:y="6.493cm">
          <draw:image xlink:href="Pictures/1000000000000500000002D00D415DCF.png" xlink:type="simple" xlink:show="embed" xlink:actuate="onLoad" draw:mime-type="image/png">
            <text:p/>
          </draw:image>
        </draw:frame>
        <presentation:notes draw:style-name="dp5">
          <draw:page-thumbnail draw:style-name="gr2" draw:layer="layout" svg:width="15.597cm" svg:height="10.985cm" svg:x="2.623cm" svg:y="2.258cm" draw:page-number="21" presentation:class="page"/>
          <draw:frame presentation:style-name="pr6" draw:text-style-name="P13" draw:layer="layout" svg:width="14.362cm" svg:height="11.254cm" svg:x="3.25cm" svg:y="14.128cm" presentation:class="notes" presentation:placeholder="true">
            <draw:text-box/>
          </draw:frame>
        </presentation:notes>
      </draw:page>
      <draw:page draw:name="page22"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Introduction à Kafka</text:span></text:p>
              </text:list-header>
            </text:list>
          </draw:text-box>
        </draw:frame>
        <draw:frame presentation:style-name="pr13" draw:text-style-name="P16"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9"><text:span text:style-name="T2">Le projet </text:span><text:span text:style-name="T30">Kafka</text:span></text:p>
              </text:list-item>
              <text:list-item>
                <text:p text:style-name="P19"><text:span text:style-name="T2">Cas d’usage</text:span></text:p>
              </text:list-item>
              <text:list-item>
                <text:p text:style-name="P3"><text:span text:style-name="T12">Concepts</text:span></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3" draw:style-name="dp3" draw:master-page-name="Standard" presentation:presentation-page-layout-name="AL3T1">
        <draw:frame presentation:style-name="pr9" draw:layer="layout" svg:width="23.499cm" svg:height="3.575cm" svg:x="3.033cm" svg:y="2.367cm" presentation:class="title">
          <draw:text-box>
            <text:p>Concepts de base</text:p>
          </draw:text-box>
        </draw:frame>
        <draw:frame presentation:style-name="pr5" draw:layer="layout" svg:width="23.499cm" svg:height="12.18cm" svg:x="3.033cm" svg:y="6.283cm" presentation:class="outline" presentation:user-transformed="true">
          <draw:text-box>
            <text:list text:style-name="L2">
              <text:list-item>
                <text:p>Kafka s’exécute en <text:span text:style-name="T31">cluster</text:span> sur un ou plusieurs serveurs (<text:span text:style-name="T31">brokers</text:span>) pouvant être déployés dans différents data-center. </text:p>
              </text:list-item>
              <text:list-item>
                <text:p/>
              </text:list-item>
              <text:list-item>
                <text:p>Le cluster Kafka <text:line-break/>stocke des flux d'enregistrements : les <text:span text:style-name="T31">records</text:span> <text:line-break/>dans des rubriques : les <text:span text:style-name="T31">topics</text:span> .</text:p>
              </text:list-item>
              <text:list-item>
                <text:p/>
              </text:list-item>
              <text:list-item>
                <text:p>Chaque enregistrement se compose d'une clé éventuelle, d'une valeur, d'un horodatage et éventuellement d’entêtes</text:p>
                <text:p/>
              </text:list-item>
            </text:list>
          </draw:text-box>
        </draw:frame>
        <presentation:notes draw:style-name="dp5">
          <draw:page-thumbnail draw:style-name="gr2" draw:layer="layout" svg:width="15.597cm" svg:height="10.985cm" svg:x="2.623cm" svg:y="2.258cm" draw:page-number="23" presentation:class="page"/>
          <draw:frame presentation:style-name="pr6" draw:text-style-name="P13" draw:layer="layout" svg:width="14.362cm" svg:height="11.254cm" svg:x="3.25cm" svg:y="14.128cm" presentation:class="notes" presentation:placeholder="true">
            <draw:text-box/>
          </draw:frame>
        </presentation:notes>
      </draw:page>
      <draw:page draw:name="page24" draw:style-name="dp3" draw:master-page-name="Standard" presentation:presentation-page-layout-name="AL3T1">
        <draw:frame presentation:style-name="pr9" draw:layer="layout" svg:width="23.499cm" svg:height="3.575cm" svg:x="3.033cm" svg:y="2.367cm" presentation:class="title">
          <draw:text-box>
            <text:p>APIs</text:p>
          </draw:text-box>
        </draw:frame>
        <draw:frame presentation:style-name="pr5" draw:layer="layout" svg:width="23.499cm" svg:height="12.18cm" svg:x="3.033cm" svg:y="6.283cm" presentation:class="outline" presentation:user-transformed="true">
          <draw:text-box>
            <text:list text:style-name="L2">
              <text:list-item>
                <text:p>Kafka propose 5 principales APIs :</text:p>
                <text:list>
                  <text:list-item>
                    <text:p>L'API <text:span text:style-name="T32">Producer</text:span> permet à une application de publier un flux sur un ou plusieurs topics Kafka.</text:p>
                  </text:list-item>
                  <text:list-item>
                    <text:p>L'API <text:span text:style-name="T32">Consumer</text:span> permet à une application de s'abonner à un ou plusieurs topics et de traiter le flux d'enregistrements associé.</text:p>
                  </text:list-item>
                  <text:list-item>
                    <text:p>L'API <text:span text:style-name="T32">Streams</text:span> permet à une application d'agir comme un processeur de flux, consommant un ou plusieurs topic d'entrée et produisant un flux de sortie vers un ou plusieurs topics.</text:p>
                  </text:list-item>
                  <text:list-item>
                    <text:p>L'API <text:span text:style-name="T32">Connector</text:span> permet de créer et d'exécuter des producteurs/consommateurs à partir de système tierces (BD, fichiers, STDOUT, …) </text:p>
                  </text:list-item>
                  <text:list-item>
                    <text:p>L’API <text:span text:style-name="T32">Admin</text:span> permet de gérer les topics et le cluster</text:p>
                  </text:list-item>
                </text:list>
              </text:list-item>
            </text:list>
          </draw:text-box>
        </draw:frame>
        <presentation:notes draw:style-name="dp5">
          <draw:page-thumbnail draw:style-name="gr2" draw:layer="layout" svg:width="15.597cm" svg:height="10.985cm" svg:x="2.623cm" svg:y="2.258cm" draw:page-number="24" presentation:class="page"/>
          <draw:frame presentation:style-name="pr6" draw:text-style-name="P13" draw:layer="layout" svg:width="14.362cm" svg:height="11.254cm" svg:x="3.25cm" svg:y="14.128cm" presentation:class="notes" presentation:placeholder="true">
            <draw:text-box/>
          </draw:frame>
        </presentation:notes>
      </draw:page>
      <draw:page draw:name="page25" draw:style-name="dp3" draw:master-page-name="Standard" presentation:presentation-page-layout-name="AL3T1">
        <draw:frame presentation:style-name="pr9" draw:layer="layout" svg:width="23.499cm" svg:height="3.575cm" svg:x="3.033cm" svg:y="2.367cm" presentation:class="title">
          <draw:text-box>
            <text:p>APIs</text:p>
          </draw:text-box>
        </draw:frame>
        <draw:frame presentation:style-name="pr5" draw:layer="layout" svg:width="23.499cm" svg:height="12.18cm" svg:x="3.033cm" svg:y="6.283cm" presentation:class="outline" presentation:placeholder="true" presentation:user-transformed="true">
          <draw:text-box/>
        </draw:frame>
        <draw:frame draw:style-name="gr9" draw:text-style-name="P23" draw:layer="layout" svg:width="17.819cm" svg:height="14.985cm" svg:x="4.8cm" svg:y="6.215cm">
          <draw:image xlink:href="Pictures/100000010000042D00000383E3AA16A6.png" xlink:type="simple" xlink:show="embed" xlink:actuate="onLoad" draw:mime-type="image/png">
            <text:p/>
          </draw:image>
        </draw:frame>
        <presentation:notes draw:style-name="dp5">
          <draw:page-thumbnail draw:style-name="gr2" draw:layer="layout" svg:width="15.597cm" svg:height="10.985cm" svg:x="2.623cm" svg:y="2.258cm" draw:page-number="25" presentation:class="page"/>
          <draw:frame presentation:style-name="pr6" draw:text-style-name="P13" draw:layer="layout" svg:width="14.362cm" svg:height="11.254cm" svg:x="3.25cm" svg:y="14.128cm" presentation:class="notes" presentation:placeholder="true">
            <draw:text-box/>
          </draw:frame>
        </presentation:notes>
      </draw:page>
      <draw:page draw:name="page26" draw:style-name="dp3" draw:master-page-name="Standard" presentation:presentation-page-layout-name="AL3T1">
        <draw:frame presentation:style-name="pr9" draw:layer="layout" svg:width="23.499cm" svg:height="3.575cm" svg:x="3.033cm" svg:y="2.367cm" presentation:class="title">
          <draw:text-box>
            <text:p>Protocole Client/Serveur</text:p>
          </draw:text-box>
        </draw:frame>
        <draw:frame presentation:style-name="pr5" draw:layer="layout" svg:width="23.499cm" svg:height="12.18cm" svg:x="3.033cm" svg:y="6.283cm" presentation:class="outline">
          <draw:text-box>
            <text:list text:style-name="L2">
              <text:list-item>
                <text:p>Dans Kafka, la communication entre les clients et les serveurs s’effectue via un protocole TCP simple, performant et indépendant du langage. </text:p>
                <text:list>
                  <text:list-item>
                    <text:p>Ce protocole est versionné et maintient une compatibilité ascendante avec les versions plus anciennes. </text:p>
                  </text:list-item>
                </text:list>
              </text:list-item>
              <text:list-item>
                <text:p text:style-name="P24"><text:span text:style-name="T26">Apache fournit un client Java, </text:span><text:span text:style-name="T26">mais les clients sont </text:span><text:span text:style-name="T26">disponibles dans de </text:span><text:span text:style-name="T26">nombreuses langages.</text:span><text:span text:style-name="T33">1</text:span><text:span text:style-name="T26"><text:line-break/></text:span><text:span text:style-name="T26"/></text:p>
              </text:list-item>
            </text:list>
          </draw:text-box>
        </draw:frame>
        <draw:frame draw:style-name="gr10" draw:text-style-name="P6" draw:layer="layout" svg:width="18.562cm" svg:height="1.216cm" svg:x="2.011cm" svg:y="19.685cm">
          <draw:text-box>
            <text:p><text:span text:style-name="T34">1. </text:span><text:span text:style-name="T17"><text:a xlink:href="https://cwiki.apache.org/confluence/display/KAFKA/Clients" xlink:type="simple">https://cwiki.apache.org/confluence/display/KAFKA/Clients</text:a></text:span><text:s/></text:p>
          </draw:text-box>
        </draw:frame>
        <presentation:notes draw:style-name="dp5">
          <draw:page-thumbnail draw:style-name="gr2" draw:layer="layout" svg:width="15.597cm" svg:height="10.985cm" svg:x="2.623cm" svg:y="2.258cm" draw:page-number="26" presentation:class="page"/>
          <draw:frame presentation:style-name="pr6" draw:text-style-name="P18" draw:layer="layout" svg:width="14.362cm" svg:height="11.254cm" svg:x="3.25cm" svg:y="14.128cm" presentation:class="notes" presentation:placeholder="true">
            <draw:text-box/>
          </draw:frame>
        </presentation:notes>
      </draw:page>
      <draw:page draw:name="page27" draw:style-name="dp3" draw:master-page-name="Standard" presentation:presentation-page-layout-name="AL3T1">
        <draw:frame presentation:style-name="pr9" draw:layer="layout" svg:width="23.499cm" svg:height="3.575cm" svg:x="3.033cm" svg:y="2.367cm" presentation:class="title">
          <draw:text-box>
            <text:p>Topic</text:p>
          </draw:text-box>
        </draw:frame>
        <draw:frame presentation:style-name="pr5" draw:layer="layout" svg:width="23.499cm" svg:height="5.917cm" svg:x="3.033cm" svg:y="6.283cm" presentation:class="outline" presentation:user-transformed="true">
          <draw:text-box>
            <text:list text:style-name="L2">
              <text:list-item>
                <text:p>Les <text:span text:style-name="T14">records</text:span> sont publiés vers des <text:span text:style-name="T32">topics</text:span>.</text:p>
              </text:list-item>
              <text:list-item>
                <text:p>Les <text:span text:style-name="T14">topics</text:span> de Kafka peuvent avoir Zéro, Un ou de multiples abonnés</text:p>
              </text:list-item>
              <text:list-item>
                <text:p>Les topics stockés dans le cluster peuvent être <text:span text:style-name="T32">partitionnés.</text:span> </text:p>
              </text:list-item>
            </text:list>
          </draw:text-box>
        </draw:frame>
        <draw:frame draw:style-name="gr9" draw:text-style-name="P23" draw:layer="layout" svg:width="11.006cm" svg:height="7.063cm" svg:x="8.794cm" svg:y="13cm">
          <draw:image xlink:href="Pictures/10000000000001A00000010B99E34F5B.png" xlink:type="simple" xlink:show="embed" xlink:actuate="onLoad" draw:mime-type="image/png">
            <text:p/>
          </draw:image>
        </draw:frame>
        <presentation:notes draw:style-name="dp5">
          <draw:page-thumbnail draw:style-name="gr2" draw:layer="layout" svg:width="15.597cm" svg:height="10.985cm" svg:x="2.623cm" svg:y="2.258cm" draw:page-number="27" presentation:class="page"/>
          <draw:frame presentation:style-name="pr6" draw:text-style-name="P13" draw:layer="layout" svg:width="14.362cm" svg:height="11.254cm" svg:x="3.25cm" svg:y="14.128cm" presentation:class="notes" presentation:placeholder="true">
            <draw:text-box/>
          </draw:frame>
        </presentation:notes>
      </draw:page>
      <draw:page draw:name="page28" draw:style-name="dp3" draw:master-page-name="Standard" presentation:presentation-page-layout-name="AL3T1">
        <draw:frame presentation:style-name="pr9" draw:layer="layout" svg:width="23.499cm" svg:height="3.575cm" svg:x="3.033cm" svg:y="2.367cm" presentation:class="title">
          <draw:text-box>
            <text:p>Apport des partitions</text:p>
          </draw:text-box>
        </draw:frame>
        <draw:frame presentation:style-name="pr5" draw:text-style-name="P26" draw:layer="layout" svg:width="23.499cm" svg:height="7.935cm" svg:x="3.033cm" svg:y="6.283cm" presentation:class="outline" presentation:user-transformed="true">
          <draw:text-box>
            <text:list text:style-name="L2">
              <text:list-item>
                <text:p text:style-name="P26"><text:span text:style-name="T35">Les partitions : </text:span></text:p>
                <text:list>
                  <text:list-item>
                    <text:p><text:span text:style-name="T35">autorisent le parallélisme de la </text:span><text:span text:style-name="T35">consommation. (scalabilité) </text:span></text:p>
                  </text:list-item>
                  <text:list-item>
                    <text:p><text:span text:style-name="T35">augmentent la capacité de </text:span><text:span text:style-name="T35">stockage en utilisant les </text:span><text:span text:style-name="T35">capacités disque de </text:span><text:span text:style-name="T35">plusieurs nœuds.</text:span></text:p>
                  </text:list-item>
                </text:list>
              </text:list-item>
              <text:list-item>
                <text:p text:style-name="P26"><text:span text:style-name="T35">L’ordre des messages n’est garanti qu’à </text:span><text:span text:style-name="T35">l’intérieur d’une partition</text:span></text:p>
              </text:list-item>
              <text:list-item>
                <text:p text:style-name="P26"><text:span text:style-name="T35">Le nombre de partition est fixé à la création </text:span><text:span text:style-name="T35">du </text:span><text:span text:style-name="T17">topic</text:span></text:p>
              </text:list-item>
            </text:list>
          </draw:text-box>
        </draw:frame>
        <draw:frame draw:style-name="gr11" draw:text-style-name="P23" draw:layer="layout" svg:width="19.095cm" svg:height="5.407cm" svg:x="3.769cm" svg:y="14.993cm">
          <draw:image xlink:href="Pictures/10000001000005950000029671B5A3BA.png" xlink:type="simple" xlink:show="embed" xlink:actuate="onLoad" draw:mime-type="image/png">
            <text:p/>
          </draw:image>
        </draw:frame>
        <presentation:notes draw:style-name="dp5">
          <draw:page-thumbnail draw:style-name="gr2" draw:layer="layout" svg:width="15.597cm" svg:height="10.985cm" svg:x="2.623cm" svg:y="2.258cm" draw:page-number="28" presentation:class="page"/>
          <draw:frame presentation:style-name="pr6" draw:text-style-name="P13" draw:layer="layout" svg:width="14.362cm" svg:height="11.254cm" svg:x="3.25cm" svg:y="14.128cm" presentation:class="notes" presentation:placeholder="true">
            <draw:text-box/>
          </draw:frame>
        </presentation:notes>
      </draw:page>
      <draw:page draw:name="page29" draw:style-name="dp3" draw:master-page-name="Standard" presentation:presentation-page-layout-name="AL3T1">
        <draw:frame presentation:style-name="pr9" draw:layer="layout" svg:width="23.499cm" svg:height="3.575cm" svg:x="3.033cm" svg:y="2.367cm" presentation:class="title">
          <draw:text-box>
            <text:p>Réplication</text:p>
          </draw:text-box>
        </draw:frame>
        <draw:frame presentation:style-name="pr5" draw:layer="layout" svg:width="23.499cm" svg:height="5.77cm" svg:x="3.033cm" svg:y="6.283cm" presentation:class="outline" presentation:user-transformed="true">
          <draw:text-box>
            <text:list text:style-name="L2">
              <text:list-item>
                <text:p><text:span text:style-name="T29">Les partitions peuvent </text:span><text:span text:style-name="T29">être </text:span><text:span text:style-name="T36">répliquées</text:span><text:span text:style-name="T29"> </text:span></text:p>
                <text:list>
                  <text:list-item>
                    <text:p><text:span text:style-name="T37">=&gt; durabilité des données </text:span><text:span text:style-name="T37">malgré les défaillances</text:span></text:p>
                  </text:list-item>
                </text:list>
              </text:list-item>
            </text:list>
          </draw:text-box>
        </draw:frame>
        <draw:frame draw:style-name="gr12" draw:text-style-name="P23" draw:layer="layout" svg:width="22.328cm" svg:height="7.059cm" svg:x="3.207cm" svg:y="13.843cm">
          <draw:image xlink:href="Pictures/10000001000005E60000031D3D250AAF.png" xlink:type="simple" xlink:show="embed" xlink:actuate="onLoad" draw:mime-type="image/png">
            <text:p/>
          </draw:image>
        </draw:frame>
        <presentation:notes draw:style-name="dp5">
          <draw:page-thumbnail draw:style-name="gr2" draw:layer="layout" svg:width="15.597cm" svg:height="10.985cm" svg:x="2.623cm" svg:y="2.258cm" draw:page-number="29" presentation:class="page"/>
          <draw:frame presentation:style-name="pr6" draw:text-style-name="P13" draw:layer="layout" svg:width="14.362cm" svg:height="11.254cm" svg:x="3.25cm" svg:y="14.128cm" presentation:class="notes" presentation:placeholder="true">
            <draw:text-box/>
          </draw:frame>
        </presentation:notes>
      </draw:page>
      <draw:page draw:name="page30" draw:style-name="dp3" draw:master-page-name="Standard" presentation:presentation-page-layout-name="AL3T1">
        <draw:frame presentation:style-name="pr11" draw:layer="layout" svg:width="23.499cm" svg:height="3.577cm" svg:x="3.033cm" svg:y="2.366cm" presentation:class="title" presentation:user-transformed="true">
          <draw:text-box>
            <text:p>Distribution des partitions<text:line-break/>Leader / Follower</text:p>
          </draw:text-box>
        </draw:frame>
        <draw:frame presentation:style-name="pr5" draw:layer="layout" svg:width="23.499cm" svg:height="12.18cm" svg:x="3.033cm" svg:y="6.283cm" presentation:class="outline">
          <draw:text-box>
            <text:list text:style-name="L2">
              <text:list-item>
                <text:p>Les partitions d’un topic sont réparties sur les instances du cluster. </text:p>
              </text:list-item>
              <text:list-item>
                <text:p>Les répliques sont distribuées sur des instances différentes</text:p>
              </text:list-item>
              <text:list-item>
                <text:p>Pour chaque partition répliquée, une des instances agit comme <text:span text:style-name="T38">maître (leader)</text:span>. Les autres comme <text:span text:style-name="T38">suiveurs </text:span><text:span text:style-name="T38">(follower)</text:span></text:p>
                <text:list>
                  <text:list-item>
                    <text:p>Le maître coordonne les lectures et les écritures sur la partition</text:p>
                  </text:list-item>
                  <text:list-item>
                    <text:p>Les suiveurs répliquent passivement le maître</text:p>
                  </text:list-item>
                  <text:list-item>
                    <text:p>Si le maître défaille, un processus d’élection choisit un autre maître parmi les répliques </text:p>
                  </text:list-item>
                </text:list>
              </text:list-item>
            </text:list>
          </draw:text-box>
        </draw:frame>
        <presentation:notes draw:style-name="dp5">
          <draw:page-thumbnail draw:style-name="gr2" draw:layer="layout" svg:width="15.597cm" svg:height="10.985cm" svg:x="2.623cm" svg:y="2.258cm" draw:page-number="30" presentation:class="page"/>
          <draw:frame presentation:style-name="pr6" draw:text-style-name="P18" draw:layer="layout" svg:width="14.362cm" svg:height="11.254cm" svg:x="3.25cm" svg:y="14.128cm" presentation:class="notes" presentation:placeholder="true">
            <draw:text-box/>
          </draw:frame>
        </presentation:notes>
      </draw:page>
      <draw:page draw:name="page31" draw:style-name="dp3" draw:master-page-name="Standard" presentation:presentation-page-layout-name="AL3T1">
        <draw:frame presentation:style-name="pr9" draw:layer="layout" svg:width="23.499cm" svg:height="3.575cm" svg:x="3.033cm" svg:y="2.367cm" presentation:class="title">
          <draw:text-box>
            <text:p>Partition et offset</text:p>
          </draw:text-box>
        </draw:frame>
        <draw:frame presentation:style-name="pr5" draw:layer="layout" svg:width="23.499cm" svg:height="12.18cm" svg:x="3.033cm" svg:y="6.283cm" presentation:class="outline">
          <draw:text-box>
            <text:list text:style-name="L2">
              <text:list-item>
                <text:p>Chaque <text:span text:style-name="T39">partition</text:span> est une séquence <text:span text:style-name="T40">ordonnée</text:span><text:span text:style-name="T41"> </text:span><text:span text:style-name="T40">et </text:span><text:span text:style-name="T40">immuable</text:span> d'enregistrements. </text:p>
              </text:list-item>
              <text:list-item>
                <text:p>Un numéro d’identification séquentiel nommé <text:span text:style-name="T32">offset</text:span> est attribué à chaque enregistrement.</text:p>
              </text:list-item>
              <text:list-item>
                <text:p>Le cluster Kafka conserve durablement tous les enregistrements publiés, qu'ils aient ou non été consommés, en utilisant une <text:span text:style-name="T32">période</text:span> <text:span text:style-name="T32">de</text:span> <text:span text:style-name="T32">rétention</text:span> configurable.</text:p>
              </text:list-item>
            </text:list>
          </draw:text-box>
        </draw:frame>
        <presentation:notes draw:style-name="dp5">
          <draw:page-thumbnail draw:style-name="gr2" draw:layer="layout" svg:width="15.597cm" svg:height="10.985cm" svg:x="2.623cm" svg:y="2.258cm" draw:page-number="31" presentation:class="page"/>
          <draw:frame presentation:style-name="pr6" draw:text-style-name="P18" draw:layer="layout" svg:width="14.362cm" svg:height="11.254cm" svg:x="3.25cm" svg:y="14.128cm" presentation:class="notes" presentation:placeholder="true">
            <draw:text-box/>
          </draw:frame>
        </presentation:notes>
      </draw:page>
      <draw:page draw:name="page32" draw:style-name="dp3" draw:master-page-name="Standard" presentation:presentation-page-layout-name="AL3T1">
        <draw:frame presentation:style-name="pr9" draw:layer="layout" svg:width="23.499cm" svg:height="3.575cm" svg:x="3.033cm" svg:y="2.367cm" presentation:class="title">
          <draw:text-box>
            <text:p>Clients du cluster</text:p>
          </draw:text-box>
        </draw:frame>
        <draw:frame draw:style-name="gr9" draw:text-style-name="P23" draw:layer="layout" svg:width="24.381cm" svg:height="13.354cm" svg:x="3.123cm" svg:y="6.543cm">
          <draw:image xlink:href="Pictures/100000010000062D00000362271446F0.png" xlink:type="simple" xlink:show="embed" xlink:actuate="onLoad" draw:mime-type="image/png">
            <text:p/>
          </draw:image>
        </draw:frame>
        <draw:frame draw:style-name="gr13" draw:text-style-name="P27" draw:layer="layout" svg:width="10.272cm" svg:height="4.671cm" svg:x="2.734cm" svg:y="6.699cm">
          <draw:text-box>
            <text:p><text:span text:style-name="T42">Les producteurs et consommateurs sont connectés à tous les brokers détenant le </text:span><text:span text:style-name="T43">topic</text:span></text:p>
          </draw:text-box>
        </draw:frame>
        <presentation:notes draw:style-name="dp5">
          <draw:page-thumbnail draw:style-name="gr2" draw:layer="layout" svg:width="15.597cm" svg:height="10.985cm" svg:x="2.623cm" svg:y="2.258cm" draw:page-number="32" presentation:class="page"/>
          <draw:frame presentation:style-name="pr6" draw:text-style-name="P13" draw:layer="layout" svg:width="14.362cm" svg:height="11.254cm" svg:x="3.25cm" svg:y="14.128cm" presentation:class="notes" presentation:placeholder="true">
            <draw:text-box/>
          </draw:frame>
        </presentation:notes>
      </draw:page>
      <draw:page draw:name="page33" draw:style-name="dp3" draw:master-page-name="Standard" presentation:presentation-page-layout-name="AL3T1">
        <draw:frame presentation:style-name="pr9" draw:layer="layout" svg:width="23.499cm" svg:height="3.575cm" svg:x="3.033cm" svg:y="2.367cm" presentation:class="title">
          <draw:text-box>
            <text:p>Routing des messages</text:p>
          </draw:text-box>
        </draw:frame>
        <draw:frame presentation:style-name="pr5" draw:layer="layout" svg:width="23.499cm" svg:height="12.18cm" svg:x="3.033cm" svg:y="6.283cm" presentation:class="outline">
          <draw:text-box>
            <text:list text:style-name="L2">
              <text:list-item>
                <text:p>Les producteurs sont responsables du choix de la partition en fonction de l'enregistrement</text:p>
              </text:list-item>
              <text:list-item>
                <text:p>Cela peut être fait </text:p>
                <text:list>
                  <text:list-item>
                    <text:p>via une stratégie Round-Robin assurant un équilibrage de charge</text:p>
                  </text:list-item>
                  <text:list-item>
                    <text:p>En fonction des données de l’enregistrement. Typiquement, la clé</text:p>
                  </text:list-item>
                </text:list>
              </text:list-item>
            </text:list>
          </draw:text-box>
        </draw:frame>
        <presentation:notes draw:style-name="dp5">
          <draw:page-thumbnail draw:style-name="gr2" draw:layer="layout" svg:width="15.597cm" svg:height="10.985cm" svg:x="2.623cm" svg:y="2.258cm" draw:page-number="33" presentation:class="page"/>
          <draw:frame presentation:style-name="pr6" draw:text-style-name="P18" draw:layer="layout" svg:width="14.362cm" svg:height="11.254cm" svg:x="3.25cm" svg:y="14.128cm" presentation:class="notes" presentation:placeholder="true">
            <draw:text-box/>
          </draw:frame>
        </presentation:notes>
      </draw:page>
      <draw:page draw:name="page34" draw:style-name="dp3" draw:master-page-name="Standard" presentation:presentation-page-layout-name="AL3T1">
        <draw:frame presentation:style-name="pr9" draw:layer="layout" svg:width="23.499cm" svg:height="3.575cm" svg:x="3.033cm" svg:y="2.367cm" presentation:class="title">
          <draw:text-box>
            <text:p>Groupe de consommateurs</text:p>
          </draw:text-box>
        </draw:frame>
        <draw:frame presentation:style-name="pr5" draw:layer="layout" svg:width="23.499cm" svg:height="12.18cm" svg:x="3.033cm" svg:y="6.283cm" presentation:class="outline">
          <draw:text-box>
            <text:list text:style-name="L2">
              <text:list-item>
                <text:p>Les consommateurs sont identifiés avec un nom de <text:span text:style-name="T38">groupe</text:span> </text:p>
                <text:list>
                  <text:list-item>
                    <text:p>Chaque enregistrement d’un topic est remis à une instance de consommateur au sein de chaque groupe.</text:p>
                  </text:list-item>
                  <text:list-item>
                    <text:p>Les instances de consommateurs peuvent se trouver dans des threads, processus <text:s/>ou machines distincts.<text:line-break/>=&gt; Scalabilité</text:p>
                  </text:list-item>
                </text:list>
              </text:list-item>
            </text:list>
          </draw:text-box>
        </draw:frame>
        <presentation:notes draw:style-name="dp5">
          <draw:page-thumbnail draw:style-name="gr2" draw:layer="layout" svg:width="15.597cm" svg:height="10.985cm" svg:x="2.623cm" svg:y="2.258cm" draw:page-number="34" presentation:class="page"/>
          <draw:frame presentation:style-name="pr6" draw:text-style-name="P18" draw:layer="layout" svg:width="14.362cm" svg:height="11.254cm" svg:x="3.25cm" svg:y="14.128cm" presentation:class="notes" presentation:placeholder="true">
            <draw:text-box/>
          </draw:frame>
        </presentation:notes>
      </draw:page>
      <draw:page draw:name="page35" draw:style-name="dp3" draw:master-page-name="Standard" presentation:presentation-page-layout-name="AL3T1">
        <draw:frame presentation:style-name="pr9" draw:layer="layout" svg:width="23.499cm" svg:height="3.575cm" svg:x="3.033cm" svg:y="2.367cm" presentation:class="title">
          <draw:text-box>
            <text:p>Offset consommateur</text:p>
          </draw:text-box>
        </draw:frame>
        <draw:frame presentation:style-name="pr5" draw:layer="layout" svg:width="23.499cm" svg:height="12.18cm" svg:x="3.033cm" svg:y="6.283cm" presentation:class="outline" presentation:user-transformed="true">
          <draw:text-box>
            <text:list text:style-name="L2">
              <text:list-item>
                <text:p>Pour chaque groupe de consommateurs, Kafka conserve son <text:span text:style-name="T40">offset</text:span><text:span text:style-name="T44">1</text:span> du journal.</text:p>
              </text:list-item>
              <text:list-item>
                <text:p>Cet offset est contrôlé par le consommateur:</text:p>
                <text:list>
                  <text:list-item>
                    <text:p>normalement, le consommateur fait avancer son offset au fur et à mesure des traitements des enregistrements.</text:p>
                  </text:list-item>
                  <text:list-item>
                    <text:p>mais, il peut consommer dans l'ordre qu'il souhaite.<text:line-break/>Par exemple, retraiter les données les plus anciennes ou repartir d’un offset particulier.</text:p>
                  </text:list-item>
                </text:list>
              </text:list-item>
            </text:list>
          </draw:text-box>
        </draw:frame>
        <draw:frame draw:style-name="gr14" draw:text-style-name="P20" draw:layer="layout" svg:width="7.965cm" svg:height="1.096cm" svg:x="1.402cm" svg:y="19.552cm">
          <draw:text-box>
            <text:p><text:span text:style-name="T45">1. Un offset par partition</text:span></text:p>
          </draw:text-box>
        </draw:frame>
        <presentation:notes draw:style-name="dp5">
          <draw:page-thumbnail draw:style-name="gr2" draw:layer="layout" svg:width="15.597cm" svg:height="10.985cm" svg:x="2.623cm" svg:y="2.258cm" draw:page-number="35" presentation:class="page"/>
          <draw:frame presentation:style-name="pr6" draw:text-style-name="P13" draw:layer="layout" svg:width="14.362cm" svg:height="11.254cm" svg:x="3.25cm" svg:y="14.128cm" presentation:class="notes" presentation:placeholder="true">
            <draw:text-box/>
          </draw:frame>
        </presentation:notes>
      </draw:page>
      <draw:page draw:name="page36" draw:style-name="dp3" draw:master-page-name="Standard" presentation:presentation-page-layout-name="AL3T1">
        <draw:frame presentation:style-name="pr9" draw:layer="layout" svg:width="23.499cm" svg:height="3.575cm" svg:x="3.033cm" svg:y="2.367cm" presentation:class="title" presentation:user-transformed="true">
          <draw:text-box>
            <text:p><text:span text:style-name="T29">Consommateur vs Partition</text:span><text:span text:style-name="T29"><text:line-break/></text:span><text:span text:style-name="T29">Rééquilibrage dynamique</text:span></text:p>
          </draw:text-box>
        </draw:frame>
        <draw:frame presentation:style-name="pr5" draw:layer="layout" svg:width="23.499cm" svg:height="12.18cm" svg:x="3.033cm" svg:y="6.283cm" presentation:class="outline">
          <draw:text-box>
            <text:list text:style-name="L2">
              <text:list-item>
                <text:p>Kafka assigne les partitions à des instances de consommateur d’un même groupe.</text:p>
                <text:list>
                  <text:list-item>
                    <text:p>A tout moment, une partition est exclusivement affectée à une consommateur <text:s/></text:p>
                  </text:list-item>
                </text:list>
              </text:list-item>
              <text:list-item>
                <text:p>L’affectation des partitions est gérée dynamiquement par Kafka. </text:p>
                <text:list>
                  <text:list-item>
                    <text:p>Si de nouvelles instances rejoignent le groupe, elles reprendront certaines partitions des autres membres du groupe; </text:p>
                  </text:list-item>
                  <text:list-item>
                    <text:p>Si une instance meurt, ses partitions seront distribuées aux instances restantes.</text:p>
                  </text:list-item>
                </text:list>
              </text:list-item>
            </text:list>
          </draw:text-box>
        </draw:frame>
        <presentation:notes draw:style-name="dp5">
          <draw:page-thumbnail draw:style-name="gr2" draw:layer="layout" svg:width="15.597cm" svg:height="10.985cm" svg:x="2.623cm" svg:y="2.258cm" draw:page-number="36" presentation:class="page"/>
          <draw:frame presentation:style-name="pr6" draw:text-style-name="P13" draw:layer="layout" svg:width="14.362cm" svg:height="11.254cm" svg:x="3.25cm" svg:y="14.128cm" presentation:class="notes" presentation:placeholder="true">
            <draw:text-box/>
          </draw:frame>
        </presentation:notes>
      </draw:page>
      <draw:page draw:name="page37" draw:style-name="dp3" draw:master-page-name="Standard" presentation:presentation-page-layout-name="AL3T1">
        <draw:frame presentation:style-name="pr9" draw:layer="layout" svg:width="23.499cm" svg:height="3.575cm" svg:x="3.033cm" svg:y="2.367cm" presentation:class="title">
          <draw:text-box>
            <text:p>Exemple 4 partitions</text:p>
          </draw:text-box>
        </draw:frame>
        <draw:frame draw:style-name="gr9" draw:text-style-name="P23" draw:layer="layout" svg:width="21cm" svg:height="11.165cm" svg:x="4.43cm" svg:y="6.986cm">
          <draw:image xlink:href="Pictures/10000000000001DA000000FC8E08F9E1.png" xlink:type="simple" xlink:show="embed" xlink:actuate="onLoad" draw:mime-type="image/png">
            <text:p/>
          </draw:image>
        </draw:frame>
        <presentation:notes draw:style-name="dp5">
          <draw:page-thumbnail draw:style-name="gr2" draw:layer="layout" svg:width="15.597cm" svg:height="10.985cm" svg:x="2.623cm" svg:y="2.258cm" draw:page-number="37" presentation:class="page"/>
          <draw:frame presentation:style-name="pr6" draw:text-style-name="P13" draw:layer="layout" svg:width="14.362cm" svg:height="11.254cm" svg:x="3.25cm" svg:y="14.128cm" presentation:class="notes" presentation:placeholder="true">
            <draw:text-box/>
          </draw:frame>
        </presentation:notes>
      </draw:page>
      <draw:page draw:name="page38" draw:style-name="dp3" draw:master-page-name="Standard" presentation:presentation-page-layout-name="AL3T1">
        <draw:frame presentation:style-name="pr9" draw:layer="layout" svg:width="23.499cm" svg:height="3.575cm" svg:x="3.033cm" svg:y="2.367cm" presentation:class="title">
          <draw:text-box>
            <text:p>Ordre des enregistrements</text:p>
          </draw:text-box>
        </draw:frame>
        <draw:frame presentation:style-name="pr5" draw:layer="layout" svg:width="23.499cm" svg:height="12.18cm" svg:x="3.033cm" svg:y="6.283cm" presentation:class="outline">
          <draw:text-box>
            <text:list text:style-name="L2">
              <text:list-item>
                <text:p text:style-name="P24">Kafka garantit un ordre total sur les enregistrements d'une partition, mais pas sur les différentes partitions d'un topic. </text:p>
                <text:list>
                  <text:list-item>
                    <text:p>L'ordre sur les partitions, combiné à la possibilité de partitionner les données par une clé est suffisant pour la plupart des applications. </text:p>
                  </text:list-item>
                  <text:list-item>
                    <text:p>Si une application nécessite un ordre strict sur tous les enregistrements. Il faut que le topic n’est qu’une seule partition</text:p>
                  </text:list-item>
                </text:list>
              </text:list-item>
            </text:list>
          </draw:text-box>
        </draw:frame>
        <presentation:notes draw:style-name="dp5">
          <draw:page-thumbnail draw:style-name="gr2" draw:layer="layout" svg:width="15.597cm" svg:height="10.985cm" svg:x="2.623cm" svg:y="2.258cm" draw:page-number="38" presentation:class="page"/>
          <draw:frame presentation:style-name="pr6" draw:text-style-name="P13" draw:layer="layout" svg:width="14.362cm" svg:height="11.254cm" svg:x="3.25cm" svg:y="14.128cm" presentation:class="notes" presentation:placeholder="true">
            <draw:text-box/>
          </draw:frame>
        </presentation:notes>
      </draw:page>
      <draw:page draw:name="page39"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Cluster</text:span></text:p>
              </text:list-header>
            </text:list>
          </draw:text-box>
        </draw:frame>
        <draw:frame presentation:style-name="pr14" draw:text-style-name="P16"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3"><text:span text:style-name="T12">Nœuds du cluster</text:span></text:p>
              </text:list-item>
              <text:list-item>
                <text:p text:style-name="P3"><text:span text:style-name="T13">Distributions / Installation</text:span></text:p>
              </text:list-item>
              <text:list-item>
                <text:p text:style-name="P3"><text:span text:style-name="T13">Utilitaires</text:span><text:span text:style-name="T12"> </text:span><text:span text:style-name="T46">Kafka</text:span></text:p>
              </text:list-item>
              <text:list-item>
                <text:p text:style-name="P28"><text:span text:style-name="T13">Outils graphiques</text:span></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40" draw:style-name="dp3" draw:master-page-name="Standard" presentation:presentation-page-layout-name="AL3T1">
        <draw:frame presentation:style-name="pr9" draw:layer="layout" svg:width="23.499cm" svg:height="3.575cm" svg:x="3.033cm" svg:y="2.367cm" presentation:class="title">
          <draw:text-box>
            <text:p>Cluster</text:p>
          </draw:text-box>
        </draw:frame>
        <draw:frame presentation:style-name="pr5" draw:layer="layout" svg:width="23.499cm" svg:height="12.18cm" svg:x="3.033cm" svg:y="6.283cm" presentation:class="outline">
          <draw:text-box>
            <text:list text:style-name="L2">
              <text:list-item>
                <text:p>Kafka est exécuté comme un cluster d'un ou plusieurs <text:span text:style-name="T41">serveurs</text:span> pouvant s'étendre sur plusieurs centres de données. </text:p>
                <text:list>
                  <text:list-item>
                    <text:p><text:span text:style-name="T47">Certains de ces </text:span><text:span text:style-name="T47">serveurs </text:span>appelés les <text:span text:style-name="T41">brokers </text:span>forment la couche de stockage.</text:p>
                  </text:list-item>
                  <text:list-item>
                    <text:p>Un serveur est désigné <text:span text:style-name="T41">contrôleur</text:span><text:span text:style-name="T48">1</text:span>. <text:line-break/>Son rôle est de prendre des décisions concernant le cluster comme l’affectation de partitions</text:p>
                  </text:list-item>
                </text:list>
              </text:list-item>
            </text:list>
            <text:p/>
            <text:p>Avant la version 3.x, un cluster Kafka nécessitait également un ensemble Zookeeper<text:span text:style-name="T49">2</text:span> permettant de stocker les méta-données nécessaires au contrôleur</text:p>
          </draw:text-box>
        </draw:frame>
        <draw:frame draw:style-name="gr15" draw:text-style-name="P20" draw:layer="layout" svg:width="22.664cm" svg:height="1.941cm" svg:x="1.363cm" svg:y="18.746cm">
          <draw:text-box>
            <text:p><text:span text:style-name="T45">1. Lors de la présence d’un contrôleur, le cluster s’exécute en mode Kraft </text:span></text:p>
            <text:p><text:span text:style-name="T45">2. Voir annexe Zookeeper</text:span></text:p>
          </draw:text-box>
        </draw:frame>
        <presentation:notes draw:style-name="dp5">
          <draw:page-thumbnail draw:style-name="gr2" draw:layer="layout" svg:width="15.597cm" svg:height="10.985cm" svg:x="2.623cm" svg:y="2.258cm" draw:page-number="40" presentation:class="page"/>
          <draw:frame presentation:style-name="pr6" draw:text-style-name="P13" draw:layer="layout" svg:width="14.362cm" svg:height="11.254cm" svg:x="3.25cm" svg:y="14.128cm" presentation:class="notes" presentation:placeholder="true">
            <draw:text-box/>
          </draw:frame>
        </presentation:notes>
      </draw:page>
      <draw:page draw:name="page41" draw:style-name="dp6" draw:master-page-name="Standard" presentation:presentation-page-layout-name="AL3T1">
        <draw:frame presentation:style-name="pr9" draw:layer="layout" svg:width="23.499cm" svg:height="3.575cm" svg:x="3.033cm" svg:y="2.367cm" presentation:class="title">
          <draw:text-box>
            <text:p>Nombre de brokers</text:p>
          </draw:text-box>
        </draw:frame>
        <draw:frame presentation:style-name="pr5" draw:layer="layout" svg:width="23.499cm" svg:height="12.18cm" svg:x="3.033cm" svg:y="6.283cm" presentation:class="outline">
          <draw:text-box>
            <text:list text:style-name="L2">
              <text:list-item>
                <text:p>Pour déterminer le nombre de brokers :</text:p>
                <text:list>
                  <text:list-item>
                    <text:p>Premier facteur :<text:line-break/>Le niveau de tolérance aux pannes requis</text:p>
                  </text:list-item>
                  <text:list-item>
                    <text:p>Second facteur : <text:line-break/>La capacité de disque requise pour conserver les messages et la quantité de stockage disponible sur chaque <text:span text:style-name="T14">broker</text:span>.</text:p>
                  </text:list-item>
                  <text:list-item>
                    <text:p>3ème facteur : <text:line-break/>La capacité du cluster à traiter le débit de requêtes en profitant du parallélisme.</text:p>
                  </text:list-item>
                </text:list>
              </text:list-item>
            </text:list>
          </draw:text-box>
        </draw:frame>
        <presentation:notes draw:style-name="dp4">
          <draw:page-thumbnail draw:style-name="gr2" draw:layer="layout" svg:width="15.597cm" svg:height="10.985cm" svg:x="2.623cm" svg:y="2.258cm" draw:page-number="41" presentation:class="page"/>
          <draw:frame presentation:style-name="pr6" draw:text-style-name="P13" draw:layer="layout" svg:width="14.362cm" svg:height="11.254cm" svg:x="3.25cm" svg:y="14.128cm" presentation:class="notes" presentation:placeholder="true">
            <draw:text-box/>
          </draw:frame>
        </presentation:notes>
      </draw:page>
      <draw:page draw:name="page42" draw:style-name="dp3" draw:master-page-name="Standard" presentation:presentation-page-layout-name="AL3T1">
        <draw:frame presentation:style-name="pr11" draw:layer="layout" svg:width="23.499cm" svg:height="3.577cm" svg:x="3.033cm" svg:y="2.366cm" presentation:class="title">
          <draw:text-box>
            <text:p>Configuration et démarrage d’un nœud</text:p>
          </draw:text-box>
        </draw:frame>
        <draw:frame presentation:style-name="pr5" draw:layer="layout" svg:width="23.499cm" svg:height="12.18cm" svg:x="3.033cm" svg:y="6.283cm" presentation:class="outline" presentation:user-transformed="true">
          <draw:text-box>
            <text:list text:style-name="L2">
              <text:list-item>
                <text:p>Kafka fournit un script de démarrage :<text:line-break/><text:span text:style-name="T50">kafka-server-start.sh</text:span></text:p>
              </text:list-item>
              <text:list-item>
                <text:p>Chaque nœud est démarré via ce script qui lit sa configuration :</text:p>
                <text:list>
                  <text:list-item>
                    <text:p>Dans un fichier <text:span text:style-name="T50">server.properties</text:span></text:p>
                  </text:list-item>
                  <text:list-item>
                    <text:p>Des propriétés peuvent être surchargées par la commande en ligne via l’option <text:span text:style-name="T50">--</text:span><text:span text:style-name="T50">override</text:span></text:p>
                  </text:list-item>
                </text:list>
              </text:list-item>
            </text:list>
          </draw:text-box>
        </draw:frame>
        <presentation:notes draw:style-name="dp5">
          <draw:page-thumbnail draw:style-name="gr2" draw:layer="layout" svg:width="15.597cm" svg:height="10.985cm" svg:x="2.623cm" svg:y="2.258cm" draw:page-number="42" presentation:class="page"/>
          <draw:frame presentation:style-name="pr6" draw:text-style-name="P13" draw:layer="layout" svg:width="14.362cm" svg:height="11.254cm" svg:x="3.25cm" svg:y="14.128cm" presentation:class="notes" presentation:placeholder="true">
            <draw:text-box/>
          </draw:frame>
        </presentation:notes>
      </draw:page>
      <draw:page draw:name="page43" draw:style-name="dp3" draw:master-page-name="Standard" presentation:presentation-page-layout-name="AL3T1">
        <draw:frame presentation:style-name="pr9" draw:layer="layout" svg:width="23.499cm" svg:height="3.575cm" svg:x="3.033cm" svg:y="2.367cm" presentation:class="title">
          <draw:text-box>
            <text:p>Principales configuration</text:p>
          </draw:text-box>
        </draw:frame>
        <draw:frame presentation:style-name="pr5" draw:layer="layout" svg:width="23.499cm" svg:height="12.18cm" svg:x="3.033cm" svg:y="6.283cm" presentation:class="outline">
          <draw:text-box>
            <text:list text:style-name="L2">
              <text:list-item>
                <text:p>Les configurations principales sont :</text:p>
                <text:list>
                  <text:list-item>
                    <text:p><text:span text:style-name="T50">cluster.id</text:span> : Identique pour chaque serveur. </text:p>
                  </text:list-item>
                  <text:list-item>
                    <text:p><text:span text:style-name="T50">node.id</text:span> : Différent pour chaque broker</text:p>
                  </text:list-item>
                  <text:list-item>
                    <text:p><text:span text:style-name="T50">process.roles : </text:span>Les<text:span text:style-name="T50"> </text:span>rôles possibles du nœud : <text:span text:style-name="T14">broker</text:span>, <text:span text:style-name="T14">controller</text:span> ou les 2 à la fois</text:p>
                  </text:list-item>
                  <text:list-item>
                    <text:p><text:span text:style-name="T50">log.dirs</text:span> : Ensemble de répertoires de stockage des enregistrements</text:p>
                  </text:list-item>
                  <text:list-item>
                    <text:p><text:span text:style-name="T50">listeners</text:span> : Ports ouverts pour communication avec les clients et inter-broker</text:p>
                  </text:list-item>
                </text:list>
              </text:list-item>
            </text:list>
          </draw:text-box>
        </draw:frame>
        <presentation:notes draw:style-name="dp5">
          <draw:page-thumbnail draw:style-name="gr2" draw:layer="layout" svg:width="15.597cm" svg:height="10.985cm" svg:x="2.623cm" svg:y="2.258cm" draw:page-number="43" presentation:class="page"/>
          <draw:frame presentation:style-name="pr6" draw:text-style-name="P13" draw:layer="layout" svg:width="14.362cm" svg:height="11.254cm" svg:x="3.25cm" svg:y="14.128cm" presentation:class="notes" presentation:placeholder="true">
            <draw:text-box/>
          </draw:frame>
        </presentation:notes>
      </draw:page>
      <draw:page draw:name="page44" draw:style-name="dp3" draw:master-page-name="Standard" presentation:presentation-page-layout-name="AL3T1">
        <draw:frame presentation:style-name="pr9" draw:layer="layout" svg:width="23.499cm" svg:height="3.575cm" svg:x="3.033cm" svg:y="2.367cm" presentation:class="title">
          <draw:text-box>
            <text:p>Contrôleurs</text:p>
          </draw:text-box>
        </draw:frame>
        <draw:frame presentation:style-name="pr5" draw:layer="layout" svg:width="23.499cm" svg:height="12.18cm" svg:x="3.033cm" svg:y="6.283cm" presentation:class="outline" presentation:user-transformed="true">
          <draw:text-box>
            <text:list text:style-name="L2">
              <text:list-item>
                <text:p>Certains processus Kafka sont donc des contrôleurs, ils participent aux quorums sur les méta-données.</text:p>
                <text:list>
                  <text:list-item>
                    <text:p>Une majorité des contrôleurs doivent être vivants pour maintenir la disponibilité du cluster</text:p>
                  </text:list-item>
                  <text:list-item>
                    <text:p>Il sont donc typiquement en nombre impair. (3 pour tolérer 1 défaillance, 5 pour 2)</text:p>
                  </text:list-item>
                </text:list>
              </text:list-item>
              <text:list-item>
                <text:p>Tous les serveurs découvrent les votants via la propriété <text:span text:style-name="T50">controller.quorum.voter</text:span><text:span text:style-name="T50">s</text:span><text:span text:style-name="T51">1</text:span> qui les liste en utilisant l’<text:span text:style-name="T14">id</text:span>, le <text:span text:style-name="T14">host</text:span> et le <text:span text:style-name="T14">port</text:span><text:line-break/><text:span text:style-name="T52">controller.quorum.voters=id1@host1:port1,</text:span><text:span text:style-name="T52">id2@host2:port2,id3@host3:port3</text:span></text:p>
              </text:list-item>
            </text:list>
          </draw:text-box>
        </draw:frame>
        <draw:frame draw:style-name="gr16" draw:text-style-name="P6" draw:layer="layout" svg:width="23.743cm" svg:height="1.633cm" svg:x="1.791cm" svg:y="19.216cm">
          <draw:text-box>
            <text:p text:style-name="P29"><text:span text:style-name="T53">1. En 4.x, apparaît la propriété </text:span><text:span text:style-name="T54">controller.quorum.bootstrap.servers</text:span><text:span text:style-name="T53"> :</text:span><text:span text:style-name="T53"><text:line-break/></text:span><text:span text:style-name="T55">controller.quorum.bootstrap.servers=host1:port1,host2:port2,id3@host3:port3</text:span></text:p>
          </draw:text-box>
        </draw:frame>
        <presentation:notes draw:style-name="dp5">
          <draw:page-thumbnail draw:style-name="gr2" draw:layer="layout" svg:width="15.597cm" svg:height="10.985cm" svg:x="2.623cm" svg:y="2.258cm" draw:page-number="44" presentation:class="page"/>
          <draw:frame presentation:style-name="pr6" draw:text-style-name="P13" draw:layer="layout" svg:width="14.362cm" svg:height="11.254cm" svg:x="3.25cm" svg:y="14.128cm" presentation:class="notes" presentation:placeholder="true">
            <draw:text-box/>
          </draw:frame>
        </presentation:notes>
      </draw:page>
      <draw:page draw:name="page45" draw:style-name="dp6" draw:master-page-name="Standard" presentation:presentation-page-layout-name="AL3T1">
        <draw:frame presentation:style-name="pr11" draw:layer="layout" svg:width="23.499cm" svg:height="3.577cm" svg:x="3.033cm" svg:y="2.366cm" presentation:class="title">
          <draw:text-box>
            <text:p>Configuration par défaut des topics</text:p>
          </draw:text-box>
        </draw:frame>
        <draw:frame presentation:style-name="pr5" draw:layer="layout" svg:width="23.499cm" svg:height="12.18cm" svg:x="3.033cm" svg:y="6.283cm" presentation:class="outline" presentation:user-transformed="true">
          <draw:text-box>
            <text:list text:style-name="L2">
              <text:list-item>
                <text:p><text:span text:style-name="T50">num.partitions</text:span> : Par défaut 1</text:p>
              </text:list-item>
              <text:list-item>
                <text:p><text:span text:style-name="T50">default.replication.factor</text:span> : Par défaut 1</text:p>
              </text:list-item>
              <text:list-item>
                <text:p><text:span text:style-name="T50">min.insync.replicas</text:span> : Joue sur les garanties de message. Par défaut 1</text:p>
              </text:list-item>
              <text:list-item>
                <text:p><text:span text:style-name="T50">log.retention.ms</text:span> : Durée de rétention de messages. Par défaut 7J </text:p>
              </text:list-item>
              <text:list-item>
                <text:p><text:span text:style-name="T50">log.segment.bytes</text:span> : Taille d’un segment. 1Go par défaut</text:p>
              </text:list-item>
              <text:list-item>
                <text:p><text:span text:style-name="T50">message.max.bytes</text:span> : Taille max d’un message. 1Go par défaut</text:p>
              </text:list-item>
            </text:list>
          </draw:text-box>
        </draw:frame>
        <presentation:notes draw:style-name="dp4">
          <draw:page-thumbnail draw:style-name="gr2" draw:layer="layout" svg:width="15.597cm" svg:height="10.985cm" svg:x="2.623cm" svg:y="2.258cm" draw:page-number="45" presentation:class="page"/>
          <draw:frame presentation:style-name="pr6" draw:text-style-name="P18" draw:layer="layout" svg:width="14.362cm" svg:height="11.254cm" svg:x="3.25cm" svg:y="14.128cm" presentation:class="notes" presentation:placeholder="true">
            <draw:text-box/>
          </draw:frame>
        </presentation:notes>
      </draw:page>
      <draw:page draw:name="page46" draw:style-name="dp3" draw:master-page-name="Standard" presentation:presentation-page-layout-name="AL3T1">
        <draw:frame presentation:style-name="pr9" draw:layer="layout" svg:width="23.499cm" svg:height="3.575cm" svg:x="3.033cm" svg:y="2.367cm" presentation:class="title">
          <draw:text-box>
            <text:p>Cluster ID</text:p>
          </draw:text-box>
        </draw:frame>
        <draw:frame presentation:style-name="pr5" draw:layer="layout" svg:width="23.499cm" svg:height="12.18cm" svg:x="3.033cm" svg:y="6.283cm" presentation:class="outline" presentation:user-transformed="true">
          <draw:text-box>
            <text:list text:style-name="L2">
              <text:list-item>
                <text:p>Chaque cluster a un <text:span text:style-name="T50">ID</text:span> qui doit être présent dans les données de configurations des répertoires de stockage<text:span text:style-name="T49">1</text:span></text:p>
              </text:list-item>
              <text:list-item>
                <text:p/>
              </text:list-item>
              <text:list-item>
                <text:p>L’outil <text:span text:style-name="T14">kafka-storage.sh </text:span><text:s/>permet de générer un ID aléatoire :</text:p>
              </text:list-item>
              <text:list-item>
                <text:p text:style-name="P24"><text:span text:style-name="T56">bin/kafka-storage.sh </text:span><text:span text:style-name="T57">random-uuid</text:span></text:p>
              </text:list-item>
            </text:list>
          </draw:text-box>
        </draw:frame>
        <draw:frame draw:style-name="gr17" draw:text-style-name="P20" draw:layer="layout" svg:width="21.77cm" svg:height="1.096cm" svg:x="1.657cm" svg:y="19.349cm">
          <draw:text-box>
            <text:p><text:span text:style-name="T45">1. Dans le mode zookeeper cluster.id est présent dans server.properties</text:span></text:p>
          </draw:text-box>
        </draw:frame>
        <presentation:notes draw:style-name="dp5">
          <draw:page-thumbnail draw:style-name="gr2" draw:layer="layout" svg:width="15.597cm" svg:height="10.985cm" svg:x="2.623cm" svg:y="2.258cm" draw:page-number="46" presentation:class="page"/>
          <draw:frame presentation:style-name="pr6" draw:text-style-name="P13" draw:layer="layout" svg:width="14.362cm" svg:height="11.254cm" svg:x="3.25cm" svg:y="14.128cm" presentation:class="notes" presentation:placeholder="true">
            <draw:text-box/>
          </draw:frame>
        </presentation:notes>
      </draw:page>
      <draw:page draw:name="page47" draw:style-name="dp3" draw:master-page-name="Standard" presentation:presentation-page-layout-name="AL3T1">
        <draw:frame presentation:style-name="pr11" draw:layer="layout" svg:width="23.499cm" svg:height="3.577cm" svg:x="3.033cm" svg:y="2.366cm" presentation:class="title">
          <draw:text-box>
            <text:p>Formatting des répertoires de log</text:p>
          </draw:text-box>
        </draw:frame>
        <draw:frame presentation:style-name="pr5" draw:layer="layout" svg:width="23.499cm" svg:height="12.18cm" svg:x="3.033cm" svg:y="6.283cm" presentation:class="outline">
          <draw:text-box>
            <text:list text:style-name="L2">
              <text:list-item>
                <text:p text:style-name="P30"><text:span text:style-name="T26">Les répertoires des logs </text:span><text:span text:style-name="T26">doivent être </text:span><text:span text:style-name="T58">formattés</text:span><text:span text:style-name="T26">.</text:span></text:p>
                <text:list>
                  <text:list-item>
                    <text:p text:style-name="P31"><text:span text:style-name="T47">Le formatting consiste à </text:span><text:span text:style-name="T47">créer 1 fichier de méta-</text:span><text:span text:style-name="T47">données :</text:span></text:p>
                    <text:list>
                      <text:list-item>
                        <text:p text:style-name="P32"><text:span text:style-name="T59">meta.properties</text:span></text:p>
                      </text:list-item>
                    </text:list>
                  </text:list-item>
                  <text:list-item>
                    <text:p text:style-name="P31"><text:span text:style-name="T47">Ce fichier est dépendant </text:span><text:span text:style-name="T47">des propriétés </text:span><text:span text:style-name="T60">cluster.id</text:span><text:span text:style-name="T47"> </text:span><text:span text:style-name="T47">et </text:span><text:span text:style-name="T60">node.id</text:span></text:p>
                  </text:list-item>
                </text:list>
              </text:list-item>
              <text:list-item>
                <text:p><text:span text:style-name="T21">Pour créer les fichiers :</text:span><text:span text:style-name="T14"><text:line-break/></text:span><text:span text:style-name="T57">bin/kafka-storage.sh </text:span><text:span text:style-name="T57">format -t &lt;cluster_id&gt; -</text:span><text:span text:style-name="T57">c server.properties</text:span></text:p>
              </text:list-item>
              <text:list-item>
                <text:p text:style-name="P30"><text:span text:style-name="T26"/></text:p>
              </text:list-item>
            </text:list>
          </draw:text-box>
        </draw:frame>
        <presentation:notes draw:style-name="dp5">
          <draw:page-thumbnail draw:style-name="gr2" draw:layer="layout" svg:width="15.597cm" svg:height="10.985cm" svg:x="2.623cm" svg:y="2.258cm" draw:page-number="47" presentation:class="page"/>
          <draw:frame presentation:style-name="pr6" draw:text-style-name="P13" draw:layer="layout" svg:width="14.362cm" svg:height="11.254cm" svg:x="3.25cm" svg:y="14.128cm" presentation:class="notes" presentation:placeholder="true">
            <draw:text-box/>
          </draw:frame>
        </presentation:notes>
      </draw:page>
      <draw:page draw:name="page48"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Cluster Kafka</text:span></text:p>
              </text:list-header>
            </text:list>
          </draw:text-box>
        </draw:frame>
        <draw:frame presentation:style-name="pr15" draw:text-style-name="P16"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19"><text:span text:style-name="T2">Cluster</text:span></text:p>
              </text:list-item>
              <text:list-item>
                <text:p text:style-name="P19"><text:span text:style-name="T12">Distributions / Installation</text:span></text:p>
              </text:list-item>
              <text:list-item>
                <text:p text:style-name="P3"><text:span text:style-name="T13">Utilitaires</text:span><text:span text:style-name="T12"> </text:span><text:span text:style-name="T46">Kafka</text:span></text:p>
              </text:list-item>
              <text:list-item>
                <text:p text:style-name="P28"><text:span text:style-name="T13">Outils graphiques</text:span></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49"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Kafka peut être déployé </text:p>
                <text:list>
                  <text:list-item>
                    <text:p>sur des serveurs physiques, des machines virtuelles ou des conteneurs</text:p>
                  </text:list-item>
                  <text:list-item>
                    <text:p>sur site ou dans le cloud</text:p>
                  </text:list-item>
                </text:list>
              </text:list-item>
              <text:list-item>
                <text:p>Différentes distributions peuvent être récupérées :</text:p>
                <text:list>
                  <text:list-item>
                    <text:p>Binaire chez Apache. <text:line-break/>OS recommandé Linux + pré-installation de Java (Support de Java 17 pour 3.1.0)</text:p>
                  </text:list-item>
                  <text:list-item>
                    <text:p>Images docker <text:s/>ou packages Helm (Bitnami par exemple)</text:p>
                  </text:list-item>
                  <text:list-item>
                    <text:p>Confluent Platform (Téléchargement ou cloud)</text:p>
                  </text:list-item>
                </text:list>
                <text:p/>
              </text:list-item>
            </text:list>
          </draw:text-box>
        </draw:frame>
        <presentation:notes draw:style-name="dp5">
          <draw:page-thumbnail draw:style-name="gr2" draw:layer="layout" svg:width="15.597cm" svg:height="10.985cm" svg:x="2.623cm" svg:y="2.258cm" draw:page-number="49" presentation:class="page"/>
          <draw:frame presentation:style-name="pr6" draw:text-style-name="P13" draw:layer="layout" svg:width="14.362cm" svg:height="11.254cm" svg:x="3.25cm" svg:y="14.128cm" presentation:class="notes" presentation:placeholder="true">
            <draw:text-box/>
          </draw:frame>
        </presentation:notes>
      </draw:page>
      <draw:page draw:name="page50" draw:style-name="dp3" draw:master-page-name="Standard" presentation:presentation-page-layout-name="AL3T1">
        <draw:frame presentation:style-name="pr9" draw:layer="layout" svg:width="23.499cm" svg:height="3.575cm" svg:x="3.033cm" svg:y="2.367cm" presentation:class="title">
          <draw:text-box>
            <text:p>Hardware</text:p>
          </draw:text-box>
        </draw:frame>
        <draw:frame presentation:style-name="pr5" draw:layer="layout" svg:width="23.499cm" svg:height="12.18cm" svg:x="3.033cm" svg:y="6.283cm" presentation:class="outline">
          <draw:text-box>
            <text:list text:style-name="L2">
              <text:list-item>
                <text:p>Afin de sélectionner le matériel :</text:p>
                <text:list>
                  <text:list-item>
                    <text:p>Débit de disque : Influence sur les producteurs de messages. SSD si beaucoup de clients</text:p>
                  </text:list-item>
                  <text:list-item>
                    <text:p>Capacité de disque : Estimer le volume de message * période de rétention</text:p>
                  </text:list-item>
                  <text:list-item>
                    <text:p>Mémoire : Faire en sorte que le système ait assez de mémoire disponible pour utiliser le cache de page. <text:line-break/>Pour la JVM, 5Go permet de traiter beaucoup de message</text:p>
                  </text:list-item>
                  <text:list-item>
                    <text:p>Réseau : Potentiellement beaucoup de trafic. Favoriser les cartes réseau de 10gb</text:p>
                  </text:list-item>
                  <text:list-item>
                    <text:p>CPU : Facteur moins important</text:p>
                  </text:list-item>
                </text:list>
              </text:list-item>
            </text:list>
          </draw:text-box>
        </draw:frame>
        <presentation:notes draw:style-name="dp5">
          <draw:page-thumbnail draw:style-name="gr2" draw:layer="layout" svg:width="15.597cm" svg:height="10.985cm" svg:x="2.623cm" svg:y="2.258cm" draw:page-number="50" presentation:class="page"/>
          <draw:frame presentation:style-name="pr6" draw:text-style-name="P13" draw:layer="layout" svg:width="14.362cm" svg:height="11.254cm" svg:x="3.25cm" svg:y="14.128cm" presentation:class="notes" presentation:placeholder="true">
            <draw:text-box/>
          </draw:frame>
        </presentation:notes>
      </draw:page>
      <draw:page draw:name="page51" draw:style-name="dp3" draw:master-page-name="Standard" presentation:presentation-page-layout-name="AL3T1">
        <draw:frame presentation:style-name="pr11" draw:layer="layout" svg:width="23.499cm" svg:height="3.577cm" svg:x="3.033cm" svg:y="2.366cm" presentation:class="title">
          <draw:text-box>
            <text:p>Installation à partir de l’archive</text:p>
          </draw:text-box>
        </draw:frame>
        <draw:frame presentation:style-name="pr5" draw:layer="layout" svg:width="23.499cm" svg:height="12.18cm" svg:x="3.033cm" svg:y="6.283cm" presentation:class="outline" presentation:user-transformed="true">
          <draw:text-box>
            <text:list text:style-name="L2">
              <text:list-item>
                <text:p>Téléchargement, puis </text:p>
              </text:list-item>
              <text:list-item>
                <text:p text:style-name="P33"><text:span text:style-name="T61"># tar -zxf kafka_&lt;version&gt;.tgz</text:span></text:p>
              </text:list-item>
              <text:list-item>
                <text:p text:style-name="P33"><text:span text:style-name="T62"># mv kafka_</text:span><text:span text:style-name="T61">&lt;version&gt; /usr/local/kafka</text:span></text:p>
              </text:list-item>
              <text:list-item>
                <text:p text:style-name="P33"><text:span text:style-name="T61"># mkdir /tmp/kafka-logs</text:span></text:p>
              </text:list-item>
              <text:list-item>
                <text:p text:style-name="P33"><text:span text:style-name="T61"># export JAVA_HOME=/usr/java/jdk17</text:span></text:p>
              </text:list-item>
              <text:list-item>
                <text:p text:style-name="P33"><text:span text:style-name="T62"># cd </text:span><text:span text:style-name="T61">/usr/local/kafka/bin</text:span></text:p>
              </text:list-item>
              <text:list-item>
                <text:p text:style-name="P33"><text:span text:style-name="T61"># </text:span><text:span text:style-name="T63">./kafka-server-start.sh -daemon </text:span><text:span text:style-name="T63">../config/server.properties</text:span></text:p>
              </text:list-item>
              <text:list-item>
                <text:p text:style-name="P33"><text:span text:style-name="T61">#</text:span></text:p>
              </text:list-item>
              <text:list-item>
                <text:p/>
              </text:list-item>
              <text:list-item>
                <text:p>Les<text:span text:style-name="T61"> </text:span>propriétés de configuration définies dans <text:span text:style-name="T31">server.properties</text:span> peuvent être surchargées en ligne de commande par l’option <text:span text:style-name="T14">--override</text:span></text:p>
              </text:list-item>
            </text:list>
          </draw:text-box>
        </draw:frame>
        <presentation:notes draw:style-name="dp5">
          <draw:page-thumbnail draw:style-name="gr2" draw:layer="layout" svg:width="15.597cm" svg:height="10.985cm" svg:x="2.623cm" svg:y="2.258cm" draw:page-number="51" presentation:class="page"/>
          <draw:frame presentation:style-name="pr6" draw:text-style-name="P13" draw:layer="layout" svg:width="14.362cm" svg:height="11.254cm" svg:x="3.25cm" svg:y="14.128cm" presentation:class="notes" presentation:placeholder="true">
            <draw:text-box/>
          </draw:frame>
        </presentation:notes>
      </draw:page>
      <draw:page draw:name="page52" draw:style-name="dp3" draw:master-page-name="Standard" presentation:presentation-page-layout-name="AL3T1">
        <draw:frame presentation:style-name="pr9" draw:layer="layout" svg:width="23.499cm" svg:height="3.575cm" svg:x="3.033cm" svg:y="2.367cm" presentation:class="title" presentation:user-transformed="true">
          <draw:text-box>
            <text:p>Images bitnami</text:p>
          </draw:text-box>
        </draw:frame>
        <draw:frame presentation:style-name="pr5" draw:layer="layout" svg:width="23.499cm" svg:height="12.18cm" svg:x="3.033cm" svg:y="6.283cm" presentation:class="outline">
          <draw:text-box>
            <text:list text:style-name="L2">
              <text:list-item>
                <text:p><text:s/>Images basées sur minideb (minimaliste Debian)</text:p>
              </text:list-item>
              <text:list-item>
                <text:p text:style-name="P33"><text:span text:style-name="T64">docker run -d --name kafka-server \</text:span></text:p>
              </text:list-item>
              <text:list-item>
                <text:p text:style-name="P33"><text:span text:style-name="T64"><text:s text:c="4"/></text:span><text:span text:style-name="T64">--network app-tier \</text:span></text:p>
              </text:list-item>
              <text:list-item>
                <text:p text:style-name="P33"><text:span text:style-name="T64"><text:s text:c="4"/></text:span><text:span text:style-name="T64">-e </text:span><text:span text:style-name="T64">ALLOW_PLAINTEXT_LISTENER=yes \</text:span></text:p>
              </text:list-item>
              <text:list-item>
                <text:p text:style-name="P33"><text:span text:style-name="T64"><text:s text:c="4"/></text:span><text:span text:style-name="T64">bitnami/kafka:latest</text:span></text:p>
              </text:list-item>
              <text:list-item>
                <text:p>Prises en compte de variables d’environnement pour configurer Kafka</text:p>
                <text:list>
                  <text:list-item>
                    <text:p>Variables spécifiques bitnami. <text:line-break/>Ex : BITNAMI_DEBUG, ALLOW_PLAINTEXT_LISTENER, …</text:p>
                  </text:list-item>
                  <text:list-item>
                    <text:p>Mapping des variables d’environnement préfixée par KAFKA_CFG_<text:line-break/>Ex : KAFKA_CFG_AUTO_CREATE_TOPICS_ENABLE</text:p>
                  </text:list-item>
                </text:list>
              </text:list-item>
            </text:list>
          </draw:text-box>
        </draw:frame>
        <presentation:notes draw:style-name="dp5">
          <draw:page-thumbnail draw:style-name="gr2" draw:layer="layout" svg:width="15.597cm" svg:height="10.985cm" svg:x="2.623cm" svg:y="2.258cm" draw:page-number="52" presentation:class="page"/>
          <draw:frame presentation:style-name="pr6" draw:text-style-name="P13" draw:layer="layout" svg:width="14.362cm" svg:height="11.254cm" svg:x="3.25cm" svg:y="14.128cm" presentation:class="notes" presentation:placeholder="true">
            <draw:text-box/>
          </draw:frame>
        </presentation:notes>
      </draw:page>
      <draw:page draw:name="page53" draw:style-name="dp3" draw:master-page-name="Standard" presentation:presentation-page-layout-name="AL3T1">
        <draw:frame presentation:style-name="pr9" draw:layer="layout" svg:width="23.499cm" svg:height="3.575cm" svg:x="3.033cm" svg:y="2.367cm" presentation:class="title">
          <draw:text-box>
            <text:p>Packages Helm</text:p>
          </draw:text-box>
        </draw:frame>
        <draw:frame presentation:style-name="pr5" draw:layer="layout" svg:width="23.499cm" svg:height="12.18cm" svg:x="3.033cm" svg:y="6.283cm" presentation:class="outline" presentation:user-transformed="true">
          <draw:text-box>
            <text:list text:style-name="L2">
              <text:list-item>
                <text:p>Bitnami propose des packages Helm pour déployer vers Kubernetes ou des clouds</text:p>
              </text:list-item>
              <text:list-item>
                <text:p><text:span text:style-name="T65">helm install my-release </text:span><text:span text:style-name="T65">oci://registry-1.docker.io/bitn</text:span><text:span text:style-name="T65">amicharts/kafka</text:span></text:p>
              </text:list-item>
              <text:list-item>
                <text:p>De nombreux paramètres sont disponibles :</text:p>
                <text:list>
                  <text:list-item>
                    <text:p><text:span text:style-name="T14">replicaCount </text:span>: Nombre de répliques</text:p>
                  </text:list-item>
                  <text:list-item>
                    <text:p><text:span text:style-name="T14">config </text:span>: Fichier de configuration</text:p>
                  </text:list-item>
                  <text:list-item>
                    <text:p><text:span text:style-name="T14">existingConfigmap </text:span>: Pour utiliser les ConfigMap</text:p>
                  </text:list-item>
                  <text:list-item>
                    <text:p>…</text:p>
                  </text:list-item>
                </text:list>
              </text:list-item>
              <text:list-item>
                <text:p text:style-name="P24"><text:span text:style-name="T50">Strimzi</text:span> est également une solution simple pour déployer Kafka dans Kubernetes.</text:p>
              </text:list-item>
            </text:list>
          </draw:text-box>
        </draw:frame>
        <presentation:notes draw:style-name="dp5">
          <draw:page-thumbnail draw:style-name="gr2" draw:layer="layout" svg:width="15.597cm" svg:height="10.985cm" svg:x="2.623cm" svg:y="2.258cm" draw:page-number="53" presentation:class="page"/>
          <draw:frame presentation:style-name="pr6" draw:text-style-name="P13" draw:layer="layout" svg:width="14.362cm" svg:height="11.254cm" svg:x="3.25cm" svg:y="14.128cm" presentation:class="notes" presentation:placeholder="true">
            <draw:text-box/>
          </draw:frame>
        </presentation:notes>
      </draw:page>
      <draw:page draw:name="page54" draw:style-name="dp3" draw:master-page-name="Standard" presentation:presentation-page-layout-name="AL3T1">
        <draw:frame presentation:style-name="pr9" draw:layer="layout" svg:width="23.499cm" svg:height="3.575cm" svg:x="3.033cm" svg:y="2.367cm" presentation:class="title">
          <draw:text-box>
            <text:p>Vérifications de l’installation</text:p>
          </draw:text-box>
        </draw:frame>
        <draw:frame presentation:style-name="pr5" draw:layer="layout" svg:width="23.499cm" svg:height="12.18cm" svg:x="3.033cm" svg:y="6.283cm" presentation:class="outline" presentation:user-transformed="true">
          <draw:text-box>
            <text:list text:style-name="L2">
              <text:list-item>
                <text:p><text:span text:style-name="T66">Création de topic </text:span>:<text:line-break/><text:span text:style-name="T67">bin/kafka-topics.sh --</text:span><text:span text:style-name="T67">create --bootstrap-server </text:span><text:span text:style-name="T67">localhost:9092 --</text:span><text:span text:style-name="T67">replication-factor 1 --</text:span><text:span text:style-name="T67">partitions 1 --topic test</text:span></text:p>
              </text:list-item>
              <text:list-item>
                <text:p text:style-name="P33"><text:span text:style-name="T68">Envois de messages</text:span><text:span text:style-name="T69"> :</text:span><text:span text:style-name="T69"><text:line-break/></text:span><text:span text:style-name="T70">bin/kafka-console-</text:span><text:span text:style-name="T70">producer.sh --</text:span><text:span text:style-name="T67">bootstrap-</text:span><text:span text:style-name="T67">server localhost:9092 --</text:span><text:span text:style-name="T67">topic test</text:span><text:span text:style-name="T67"><text:line-break/></text:span><text:span text:style-name="T67">This is a message</text:span><text:span text:style-name="T67"><text:line-break/></text:span><text:span text:style-name="T67">This is another message</text:span><text:span text:style-name="T67"><text:line-break/></text:span><text:span text:style-name="T67">^D</text:span></text:p>
              </text:list-item>
              <text:list-item>
                <text:p text:style-name="P33"><text:span text:style-name="T66">Consommation de </text:span><text:span text:style-name="T66">messages</text:span> :<text:line-break/><text:span text:style-name="T67">bin/kafka-console-</text:span><text:span text:style-name="T67">consumer.sh --bootstrap-</text:span><text:span text:style-name="T67">server localhost:9092 --</text:span><text:span text:style-name="T67">topic test --from-</text:span><text:span text:style-name="T67">beginning</text:span><text:span text:style-name="T67"><text:line-break/></text:span><text:span text:style-name="T67">This is a message</text:span><text:span text:style-name="T67"><text:line-break/></text:span><text:span text:style-name="T67">This is another message</text:span></text:p>
              </text:list-item>
            </text:list>
          </draw:text-box>
        </draw:frame>
        <presentation:notes draw:style-name="dp5">
          <draw:page-thumbnail draw:style-name="gr2" draw:layer="layout" svg:width="15.597cm" svg:height="10.985cm" svg:x="2.623cm" svg:y="2.258cm" draw:page-number="54" presentation:class="page"/>
          <draw:frame presentation:style-name="pr6" draw:text-style-name="P13" draw:layer="layout" svg:width="14.362cm" svg:height="11.254cm" svg:x="3.25cm" svg:y="14.128cm" presentation:class="notes" presentation:placeholder="true">
            <draw:text-box/>
          </draw:frame>
        </presentation:notes>
      </draw:page>
      <draw:page draw:name="page55" draw:style-name="dp3" draw:master-page-name="Standard" presentation:presentation-page-layout-name="AL3T1">
        <draw:frame presentation:style-name="pr9" draw:layer="layout" svg:width="23.499cm" svg:height="3.575cm" svg:x="3.033cm" svg:y="2.367cm" presentation:class="title">
          <draw:text-box>
            <text:p>Script d’arrêt</text:p>
          </draw:text-box>
        </draw:frame>
        <draw:frame presentation:style-name="pr5" draw:layer="layout" svg:width="23.499cm" svg:height="12.18cm" svg:x="3.033cm" svg:y="6.283cm" presentation:class="outline">
          <draw:text-box>
            <text:list text:style-name="L2">
              <text:list-item>
                <text:p>La distribution propose également un script d’arrêt permettant d’arrêter les process Kafka en cours d’exécution.</text:p>
              </text:list-item>
              <text:list-item>
                <text:p><text:span text:style-name="T71">bin/kafka-server-stop.sh</text:span></text:p>
              </text:list-item>
            </text:list>
          </draw:text-box>
        </draw:frame>
        <presentation:notes draw:style-name="dp5">
          <draw:page-thumbnail draw:style-name="gr2" draw:layer="layout" svg:width="15.597cm" svg:height="10.985cm" svg:x="2.623cm" svg:y="2.258cm" draw:page-number="55" presentation:class="page"/>
          <draw:frame presentation:style-name="pr6" draw:text-style-name="P13" draw:layer="layout" svg:width="14.362cm" svg:height="11.254cm" svg:x="3.25cm" svg:y="14.128cm" presentation:class="notes" presentation:placeholder="true">
            <draw:text-box/>
          </draw:frame>
        </presentation:notes>
      </draw:page>
      <draw:page draw:name="page56" draw:style-name="dp3" draw:master-page-name="Standard" presentation:presentation-page-layout-name="AL3T1">
        <draw:frame presentation:style-name="pr9" draw:layer="layout" svg:width="23.499cm" svg:height="3.575cm" svg:x="3.033cm" svg:y="2.367cm" presentation:class="title">
          <draw:text-box>
            <text:p>Fichiers de trace</text:p>
          </draw:text-box>
        </draw:frame>
        <draw:frame presentation:style-name="pr5" draw:layer="layout" svg:width="23.499cm" svg:height="12.18cm" svg:x="3.033cm" svg:y="6.283cm" presentation:class="outline" presentation:user-transformed="true">
          <draw:text-box>
            <text:list text:style-name="L2">
              <text:list-item>
                <text:p>La configuration des fichiers de trace est définie dans <text:span text:style-name="T72">conf/log4j.yaml </text:span>Par défaut sont générés :</text:p>
                <text:list>
                  <text:list-item>
                    <text:p><text:span text:style-name="T72">server.log</text:span> : Traces générales</text:p>
                  </text:list-item>
                  <text:list-item>
                    <text:p><text:span text:style-name="T72">state-change.log</text:span> : Traces des changements d’état (topics, partition, brokers, répliques) </text:p>
                  </text:list-item>
                  <text:list-item>
                    <text:p><text:span text:style-name="T72">kafka-request.log</text:span> : Traces des requêtes clients et inter-broker</text:p>
                  </text:list-item>
                  <text:list-item>
                    <text:p><text:span text:style-name="T72">log-cleaner.log</text:span> : Suppression des messages expirés</text:p>
                  </text:list-item>
                  <text:list-item>
                    <text:p><text:span text:style-name="T72">controller.log</text:span> : Logs du contrôleur</text:p>
                  </text:list-item>
                  <text:list-item>
                    <text:p><text:span text:style-name="T72">kafka-authorizer.log</text:span><text:tab/> : Traces sur les ACLs</text:p>
                  </text:list-item>
                </text:list>
              </text:list-item>
            </text:list>
          </draw:text-box>
        </draw:frame>
        <draw:frame draw:style-name="gr18" draw:text-style-name="P34" draw:layer="layout" svg:width="11.462cm" svg:height="1.216cm" svg:x="1.603cm" svg:y="19.4cm">
          <draw:text-box>
            <text:p><text:span text:style-name="T73">Atelier 1.1 : Installation cluster</text:span></text:p>
          </draw:text-box>
        </draw:frame>
        <presentation:notes draw:style-name="dp5">
          <draw:page-thumbnail draw:style-name="gr2" draw:layer="layout" svg:width="15.597cm" svg:height="10.985cm" svg:x="2.623cm" svg:y="2.258cm" draw:page-number="56" presentation:class="page"/>
          <draw:frame presentation:style-name="pr6" draw:text-style-name="P13" draw:layer="layout" svg:width="14.362cm" svg:height="11.254cm" svg:x="3.25cm" svg:y="14.128cm" presentation:class="notes" presentation:placeholder="true">
            <draw:text-box/>
          </draw:frame>
        </presentation:notes>
      </draw:page>
      <draw:page draw:name="page57"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Cluster Kafka</text:span></text:p>
              </text:list-header>
            </text:list>
          </draw:text-box>
        </draw:frame>
        <draw:frame presentation:style-name="pr16" draw:text-style-name="P16"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19"><text:span text:style-name="T2">Cluster</text:span></text:p>
              </text:list-item>
              <text:list-item>
                <text:p text:style-name="P19"><text:span text:style-name="T2">Distributions / Installation</text:span></text:p>
              </text:list-item>
              <text:list-item>
                <text:p text:style-name="P19"><text:span text:style-name="T12">Utilitaires Kafka</text:span></text:p>
              </text:list-item>
              <text:list-item>
                <text:p text:style-name="P28"><text:span text:style-name="T13">Outils graphiques</text:span></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58"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e répertoire <text:span text:style-name="T74">$KAFKA_HOME/bin</text:span> contient de nombreux scripts utilitaires dédiés à l’exploitation du cluster.</text:p>
              </text:list-item>
              <text:list-item>
                <text:p>Les scripts utilisent l’API Java de Kafka</text:p>
              </text:list-item>
              <text:list-item>
                <text:p>Une aide est disponible pour chaque script décrivant les paramètres requis ou optionnels</text:p>
              </text:list-item>
            </text:list>
          </draw:text-box>
        </draw:frame>
        <presentation:notes draw:style-name="dp5">
          <draw:page-thumbnail draw:style-name="gr2" draw:layer="layout" svg:width="15.597cm" svg:height="10.985cm" svg:x="2.623cm" svg:y="2.258cm" draw:page-number="58" presentation:class="page"/>
          <draw:frame presentation:style-name="pr6" draw:text-style-name="P13" draw:layer="layout" svg:width="14.362cm" svg:height="11.254cm" svg:x="3.25cm" svg:y="14.128cm" presentation:class="notes" presentation:placeholder="true">
            <draw:text-box/>
          </draw:frame>
        </presentation:notes>
      </draw:page>
      <draw:page draw:name="page59" draw:style-name="dp3" draw:master-page-name="Standard" presentation:presentation-page-layout-name="AL3T1">
        <draw:frame presentation:style-name="pr9" draw:layer="layout" svg:width="23.499cm" svg:height="3.575cm" svg:x="3.033cm" svg:y="2.367cm" presentation:class="title">
          <draw:text-box>
            <text:p>Gestion des topics</text:p>
          </draw:text-box>
        </draw:frame>
        <draw:frame presentation:style-name="pr5" draw:layer="layout" svg:width="23.499cm" svg:height="12.18cm" svg:x="3.033cm" svg:y="6.283cm" presentation:class="outline" presentation:user-transformed="true">
          <draw:text-box>
            <text:list text:style-name="L2">
              <text:list-item>
                <text:p>Le script <text:span text:style-name="T31">bin/kafka-</text:span><text:span text:style-name="T31">topics.sh</text:span> permet de créer, supprimer, modifier visualiser un topic</text:p>
              </text:list-item>
              <text:list-item>
                <text:p>Les valeurs par défaut des topics sont définis dans <text:span text:style-name="T14">server.properties</text:span> mais peuvent être surchargées pour chaque topic</text:p>
              </text:list-item>
              <text:list-item>
                <text:p>Exemple création de topic :</text:p>
              </text:list-item>
              <text:list-item>
                <text:p text:style-name="P33"><text:span text:style-name="T75">bin/kafka-topics.sh --create \</text:span></text:p>
              </text:list-item>
              <text:list-item>
                <text:p text:style-name="P33"><text:span text:style-name="T75"><text:s text:c="2"/></text:span><text:span text:style-name="T75">--bootstrap-server </text:span><text:span text:style-name="T75">localhost:9092 \</text:span></text:p>
              </text:list-item>
              <text:list-item>
                <text:p text:style-name="P33"><text:span text:style-name="T75"><text:s text:c="2"/></text:span><text:span text:style-name="T75">--replication-factor 1 --</text:span><text:span text:style-name="T75">partitions 13 \</text:span></text:p>
              </text:list-item>
              <text:list-item>
                <text:p text:style-name="P33"><text:span text:style-name="T75"><text:s text:c="2"/></text:span><text:span text:style-name="T75">--topic my-topic</text:span></text:p>
              </text:list-item>
              <text:list-item>
                <text:p/>
              </text:list-item>
              <text:list-item>
                <text:p>Exemple listing des topics :</text:p>
              </text:list-item>
              <text:list-item>
                <text:p text:style-name="P33"><text:span text:style-name="T75">bin/kafka-topics.sh --list \</text:span></text:p>
              </text:list-item>
              <text:list-item>
                <text:p text:style-name="P33"><text:span text:style-name="T76"><text:s text:c="4"/></text:span><text:span text:style-name="T75">--bootstrap-server </text:span><text:span text:style-name="T75">localhost:9092 </text:span></text:p>
              </text:list-item>
              <text:list-item>
                <text:p/>
              </text:list-item>
            </text:list>
          </draw:text-box>
        </draw:frame>
        <presentation:notes draw:style-name="dp5">
          <draw:page-thumbnail draw:style-name="gr2" draw:layer="layout" svg:width="15.597cm" svg:height="10.985cm" svg:x="2.623cm" svg:y="2.258cm" draw:page-number="59" presentation:class="page"/>
          <draw:frame presentation:style-name="pr6" draw:text-style-name="P13" draw:layer="layout" svg:width="14.362cm" svg:height="11.254cm" svg:x="3.25cm" svg:y="14.128cm" presentation:class="notes" presentation:placeholder="true">
            <draw:text-box/>
          </draw:frame>
        </presentation:notes>
      </draw:page>
      <draw:page draw:name="page60" draw:style-name="dp3" draw:master-page-name="Standard" presentation:presentation-page-layout-name="AL3T1">
        <draw:frame presentation:style-name="pr11" draw:layer="layout" svg:width="23.499cm" svg:height="3.577cm" svg:x="3.033cm" svg:y="2.366cm" presentation:class="title">
          <draw:text-box>
            <text:p>Choix du nombre de partitions</text:p>
          </draw:text-box>
        </draw:frame>
        <draw:frame presentation:style-name="pr5" draw:layer="layout" svg:width="23.499cm" svg:height="12.18cm" svg:x="3.033cm" svg:y="6.283cm" presentation:class="outline">
          <draw:text-box>
            <text:list text:style-name="L2">
              <text:list-item>
                <text:p>Une fois un <text:span text:style-name="T14">topic</text:span> créé, on ne peut pas diminuer son nombre de partitions. Une augmentation est possible mais peut générer des problèmes.</text:p>
              </text:list-item>
              <text:list-item>
                <text:p>Lors du choix, il faut tenir compte de :</text:p>
                <text:list>
                  <text:list-item>
                    <text:p>Du débit des écritures </text:p>
                  </text:list-item>
                  <text:list-item>
                    <text:p>Le débit maximum de consommation</text:p>
                  </text:list-item>
                  <text:list-item>
                    <text:p>L’espace disque et la bande passante réseau sur chaque broker</text:p>
                  </text:list-item>
                  <text:list-item>
                    <text:p>En général en augmentant le nombre de partitions, on augmente le débit global de l’application en s’autorisant plus de consommateurs</text:p>
                  </text:list-item>
                  <text:list-item>
                    <text:p>Mais évitez de surestimer, car chaque partition utilise de la mémoire et le nombre de partitions augmente le temps du processus d’élection du maître </text:p>
                  </text:list-item>
                </text:list>
              </text:list-item>
            </text:list>
          </draw:text-box>
        </draw:frame>
        <presentation:notes draw:style-name="dp5">
          <draw:page-thumbnail draw:style-name="gr2" draw:layer="layout" svg:width="15.597cm" svg:height="10.985cm" svg:x="2.623cm" svg:y="2.258cm" draw:page-number="60" presentation:class="page"/>
          <draw:frame presentation:style-name="pr6" draw:text-style-name="P18" draw:layer="layout" svg:width="14.362cm" svg:height="11.254cm" svg:x="3.25cm" svg:y="14.128cm" presentation:class="notes" presentation:placeholder="true">
            <draw:text-box/>
          </draw:frame>
        </presentation:notes>
      </draw:page>
      <draw:page draw:name="page61" draw:style-name="dp7" draw:master-page-name="Standard" presentation:presentation-page-layout-name="AL3T1">
        <draw:frame presentation:style-name="pr11" draw:layer="layout" svg:width="23.499cm" svg:height="3.577cm" svg:x="3.033cm" svg:y="2.366cm" presentation:class="title">
          <draw:text-box>
            <text:p>Détail sur le mécanisme d’expiration des messages</text:p>
          </draw:text-box>
        </draw:frame>
        <draw:frame presentation:style-name="pr5" draw:layer="layout" svg:width="23.499cm" svg:height="12.18cm" svg:x="3.033cm" svg:y="6.283cm" presentation:class="outline">
          <draw:text-box>
            <text:list text:style-name="L2">
              <text:list-item>
                <text:p>Les paramètres de rétention s’appliquent sur des <text:span text:style-name="T38">segments</text:span> (fragments du log) et non sur les messages. </text:p>
                <text:list>
                  <text:list-item>
                    <text:p>Au fur et à mesure de leur arrivée, les messages sont ajoutés au segment courant de la partition. </text:p>
                  </text:list-item>
                  <text:list-item>
                    <text:p>Une fois que le segment a atteint la taille spécifiée par <text:span text:style-name="T31">log.segment.bytes</text:span> il est fermé et un nouveau s’ouvre. </text:p>
                  </text:list-item>
                  <text:list-item>
                    <text:p>Une fois fermé, le segment peut être considéré pour expiration. </text:p>
                  </text:list-item>
                </text:list>
              </text:list-item>
              <text:list-item>
                <text:p>=&gt; Une taille de segment petite signifie que les fichiers doivent être fermés et alloués plus souvent, ce qui réduit l'efficacité globale des écritures sur disque.</text:p>
              </text:list-item>
              <text:list-item>
                <text:p>=&gt; Si le débit d’écriture est faible et la taille de segment important, les messages peuvent être retenus plus longtemps que la valeur de configuration</text:p>
              </text:list-item>
            </text:list>
          </draw:text-box>
        </draw:frame>
        <presentation:notes draw:style-name="dp5">
          <draw:page-thumbnail draw:style-name="gr2" draw:layer="layout" svg:width="15.597cm" svg:height="10.985cm" svg:x="2.623cm" svg:y="2.258cm" draw:page-number="61" presentation:class="page"/>
          <draw:frame presentation:style-name="pr6" draw:text-style-name="P18" draw:layer="layout" svg:width="14.362cm" svg:height="11.254cm" svg:x="3.25cm" svg:y="14.128cm" presentation:class="notes" presentation:placeholder="true">
            <draw:text-box/>
          </draw:frame>
        </presentation:notes>
      </draw:page>
      <draw:page draw:name="page62" draw:style-name="dp3" draw:master-page-name="Standard" presentation:presentation-page-layout-name="AL3T1">
        <draw:frame presentation:style-name="pr9" draw:layer="layout" svg:width="23.499cm" svg:height="3.575cm" svg:x="3.033cm" svg:y="2.367cm" presentation:class="title">
          <draw:text-box>
            <text:p>Envoi de message</text:p>
          </draw:text-box>
        </draw:frame>
        <draw:frame presentation:style-name="pr5" draw:layer="layout" svg:width="23.499cm" svg:height="12.18cm" svg:x="3.033cm" svg:y="6.283cm" presentation:class="outline" presentation:user-transformed="true">
          <draw:text-box>
            <text:list text:style-name="L2">
              <text:list-item>
                <text:p><text:span text:style-name="T5">Le script </text:span><text:span text:style-name="T77">bin/kafka-console-</text:span><text:span text:style-name="T77">producer.sh </text:span><text:span text:style-name="T5">permet de tester </text:span><text:span text:style-name="T5">l’envoi des messages sur un </text:span><text:span text:style-name="T5">topic</text:span></text:p>
              </text:list-item>
              <text:list-item>
                <text:p><text:span text:style-name="T5"/></text:p>
              </text:list-item>
              <text:list-item>
                <text:p><text:span text:style-name="T5">Exemple : </text:span></text:p>
              </text:list-item>
              <text:list-item>
                <text:p><text:span text:style-name="T75">bin/kafka-console-</text:span><text:span text:style-name="T75">producer.sh \</text:span></text:p>
              </text:list-item>
              <text:list-item>
                <text:p text:style-name="P33"><text:span text:style-name="T75"><text:s text:c="4"/></text:span><text:span text:style-name="T75">--bootstrap-server </text:span><text:span text:style-name="T75">localhost:9092 \</text:span></text:p>
              </text:list-item>
              <text:list-item>
                <text:p text:style-name="P33"><text:span text:style-name="T75"><text:s text:c="4"/></text:span><text:span text:style-name="T75">--topic my-topic</text:span></text:p>
              </text:list-item>
              <text:list-item>
                <text:p><text:span text:style-name="T5"/></text:p>
              </text:list-item>
              <text:list-item>
                <text:p><text:span text:style-name="T5">...Puis saisir les messages sur </text:span><text:span text:style-name="T5">l’entrée standard</text:span></text:p>
              </text:list-item>
            </text:list>
          </draw:text-box>
        </draw:frame>
        <presentation:notes draw:style-name="dp5">
          <draw:page-thumbnail draw:style-name="gr2" draw:layer="layout" svg:width="15.597cm" svg:height="10.985cm" svg:x="2.623cm" svg:y="2.258cm" draw:page-number="62" presentation:class="page"/>
          <draw:frame presentation:style-name="pr6" draw:text-style-name="P13" draw:layer="layout" svg:width="14.362cm" svg:height="11.254cm" svg:x="3.25cm" svg:y="14.128cm" presentation:class="notes" presentation:placeholder="true">
            <draw:text-box/>
          </draw:frame>
        </presentation:notes>
      </draw:page>
      <draw:page draw:name="page63" draw:style-name="dp3" draw:master-page-name="Standard" presentation:presentation-page-layout-name="AL3T1">
        <draw:frame presentation:style-name="pr9" draw:layer="layout" svg:width="23.499cm" svg:height="3.575cm" svg:x="3.033cm" svg:y="2.367cm" presentation:class="title">
          <draw:text-box>
            <text:p>Lecture de message</text:p>
          </draw:text-box>
        </draw:frame>
        <draw:frame presentation:style-name="pr5" draw:layer="layout" svg:width="23.499cm" svg:height="12.18cm" svg:x="3.033cm" svg:y="6.283cm" presentation:class="outline" presentation:user-transformed="true">
          <draw:text-box>
            <text:list text:style-name="L2">
              <text:list-item>
                <text:p>Le script <text:span text:style-name="T77">bin/kafka-console-</text:span><text:span text:style-name="T77">consumer.sh</text:span> permet de consommer les messages d’un topic</text:p>
              </text:list-item>
              <text:list-item>
                <text:p/>
              </text:list-item>
              <text:list-item>
                <text:p>Exemple lecture depuis l’origine :</text:p>
              </text:list-item>
              <text:list-item>
                <text:p text:style-name="P33"><text:span text:style-name="T75">bin/kafka-console-</text:span><text:span text:style-name="T75">consumer.sh \</text:span></text:p>
              </text:list-item>
              <text:list-item>
                <text:p text:style-name="P33"><text:span text:style-name="T75"><text:s text:c="4"/></text:span><text:span text:style-name="T75">--bootstrap-server </text:span><text:span text:style-name="T75">localhost:9092 \</text:span></text:p>
              </text:list-item>
              <text:list-item>
                <text:p text:style-name="P33"><text:span text:style-name="T75"><text:s text:c="4"/></text:span><text:span text:style-name="T75">--topic my-topic \</text:span></text:p>
              </text:list-item>
              <text:list-item>
                <text:p text:style-name="P33"><text:span text:style-name="T75"><text:s text:c="4"/></text:span><text:span text:style-name="T75">--from-beginning</text:span></text:p>
              </text:list-item>
            </text:list>
          </draw:text-box>
        </draw:frame>
        <presentation:notes draw:style-name="dp5">
          <draw:page-thumbnail draw:style-name="gr2" draw:layer="layout" svg:width="15.597cm" svg:height="10.985cm" svg:x="2.623cm" svg:y="2.258cm" draw:page-number="63" presentation:class="page"/>
          <draw:frame presentation:style-name="pr6" draw:text-style-name="P13" draw:layer="layout" svg:width="14.362cm" svg:height="11.254cm" svg:x="3.25cm" svg:y="14.128cm" presentation:class="notes" presentation:placeholder="true">
            <draw:text-box/>
          </draw:frame>
        </presentation:notes>
      </draw:page>
      <draw:page draw:name="page64" draw:style-name="dp3" draw:master-page-name="Standard" presentation:presentation-page-layout-name="AL3T1">
        <draw:frame presentation:style-name="pr9" draw:layer="layout" svg:width="23.499cm" svg:height="3.575cm" svg:x="3.033cm" svg:y="2.367cm" presentation:class="title">
          <draw:text-box>
            <text:p>Autre utilitaires</text:p>
          </draw:text-box>
        </draw:frame>
        <draw:frame presentation:style-name="pr5" draw:layer="layout" svg:width="23.499cm" svg:height="12.18cm" svg:x="3.033cm" svg:y="6.283cm" presentation:class="outline" presentation:user-transformed="true">
          <draw:text-box>
            <text:list text:style-name="L2">
              <text:list-item>
                <text:p><text:span text:style-name="T31">kafka-consumer-</text:span><text:span text:style-name="T31">groups.sh</text:span> permet de gérer les groupes de consommateurs : les lister et manipuler leurs offsets</text:p>
              </text:list-item>
              <text:list-item>
                <text:p><text:span text:style-name="T31">kafka-reassign-</text:span><text:span text:style-name="T31">partitions.sh </text:span>permet<text:span text:style-name="T31"> </text:span>de gérer les partitions, déplacement sur de nouveau brokers, de nouveaux répertoire, extension de cluster, …</text:p>
              </text:list-item>
              <text:list-item>
                <text:p>kafka-replica-verification.sh : Vérifie </text:p>
              </text:list-item>
              <text:list-item>
                <text:p><text:span text:style-name="T31">kafka-log-dirs.sh : </text:span>Obtient<text:span text:style-name="T31"> </text:span>les informations de configuration des log.dirs du cluster</text:p>
              </text:list-item>
              <text:list-item>
                <text:p><text:span text:style-name="T31">kafka-dump-log.sh</text:span> permet de parser un fichier de log et d’afficher les informations utiles pour debugger</text:p>
              </text:list-item>
              <text:list-item>
                <text:p><text:span text:style-name="T31">kafka-delete-records.sh </text:span><text:s/>Permet de supprimer des messages jusqu’à un offset particulier</text:p>
              </text:list-item>
            </text:list>
          </draw:text-box>
        </draw:frame>
        <presentation:notes draw:style-name="dp5">
          <draw:page-thumbnail draw:style-name="gr2" draw:layer="layout" svg:width="15.597cm" svg:height="10.985cm" svg:x="2.623cm" svg:y="2.258cm" draw:page-number="64" presentation:class="page"/>
          <draw:frame presentation:style-name="pr6" draw:text-style-name="P13" draw:layer="layout" svg:width="14.362cm" svg:height="11.254cm" svg:x="3.25cm" svg:y="14.128cm" presentation:class="notes" presentation:placeholder="true">
            <draw:text-box/>
          </draw:frame>
        </presentation:notes>
      </draw:page>
      <draw:page draw:name="page65" draw:style-name="dp3" draw:master-page-name="Standard" presentation:presentation-page-layout-name="AL3T1">
        <draw:frame presentation:style-name="pr9" draw:layer="layout" svg:width="23.499cm" svg:height="3.575cm" svg:x="3.033cm" svg:y="2.367cm" presentation:class="title">
          <draw:text-box>
            <text:p>Autre utilitaires (2)</text:p>
          </draw:text-box>
        </draw:frame>
        <draw:frame presentation:style-name="pr5" draw:layer="layout" svg:width="23.499cm" svg:height="12.18cm" svg:x="3.033cm" svg:y="6.283cm" presentation:class="outline" presentation:user-transformed="true">
          <draw:text-box>
            <text:list text:style-name="L2">
              <text:list-item>
                <text:p><text:span text:style-name="T31">kafka-configs.sh</text:span> permet des mises à jour de configuration dynamique des brokers</text:p>
              </text:list-item>
              <text:list-item>
                <text:p text:style-name="P24"><text:span text:style-name="T31">kafka-cluster.sh </text:span>obtenir<text:span text:style-name="T31"> </text:span>l’ID du cluster et sortir un broker du cluster</text:p>
              </text:list-item>
              <text:list-item>
                <text:p text:style-name="P24"><text:span text:style-name="T31">kafka-metadata-</text:span><text:span text:style-name="T31">quorum.sh</text:span> permet d’afficher les informations sur les contrôleurs</text:p>
              </text:list-item>
              <text:list-item>
                <text:p><text:span text:style-name="T31">kafka-acls.sh</text:span> permet de gérer les permissions sur les topics</text:p>
              </text:list-item>
              <text:list-item>
                <text:p><text:span text:style-name="T31">kafka-verifiable-</text:span><text:span text:style-name="T31">consumer.sh</text:span>, <text:span text:style-name="T31">kafka-</text:span><text:span text:style-name="T31">verifiable-producer.sh</text:span>: Utilitaires permettant de produire ou consommer des messages et de les afficher sur la console au format JSON </text:p>
              </text:list-item>
            </text:list>
          </draw:text-box>
        </draw:frame>
        <draw:frame draw:style-name="gr19" draw:text-style-name="P34" draw:layer="layout" svg:width="9.612cm" svg:height="1.216cm" svg:x="1.603cm" svg:y="19.4cm">
          <draw:text-box>
            <text:p><text:span text:style-name="T73">Atelier 1.2 : Utilitaires</text:span></text:p>
          </draw:text-box>
        </draw:frame>
        <presentation:notes draw:style-name="dp5">
          <draw:page-thumbnail draw:style-name="gr2" draw:layer="layout" svg:width="15.597cm" svg:height="10.985cm" svg:x="2.623cm" svg:y="2.258cm" draw:page-number="65" presentation:class="page"/>
          <draw:frame presentation:style-name="pr6" draw:text-style-name="P13" draw:layer="layout" svg:width="14.362cm" svg:height="11.254cm" svg:x="3.25cm" svg:y="14.128cm" presentation:class="notes" presentation:placeholder="true">
            <draw:text-box/>
          </draw:frame>
        </presentation:notes>
      </draw:page>
      <draw:page draw:name="page66"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Cluster Kafka</text:span></text:p>
              </text:list-header>
            </text:list>
          </draw:text-box>
        </draw:frame>
        <draw:frame presentation:style-name="pr17" draw:text-style-name="P16"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19"><text:span text:style-name="T2">Cluster</text:span></text:p>
              </text:list-item>
              <text:list-item>
                <text:p text:style-name="P19"><text:span text:style-name="T2">Distributions / Installation</text:span></text:p>
              </text:list-item>
              <text:list-item>
                <text:p text:style-name="P19"><text:span text:style-name="T2">Utilitaires</text:span><text:span text:style-name="T12"> </text:span><text:span text:style-name="T2">Kafka</text:span></text:p>
              </text:list-item>
              <text:list-item>
                <text:p text:style-name="P19"><text:span text:style-name="T12">Outils graphiques</text:span></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67" draw:style-name="dp3" draw:master-page-name="Standard" presentation:presentation-page-layout-name="AL3T1">
        <draw:frame presentation:style-name="pr9" draw:layer="layout" svg:width="23.499cm" svg:height="3.575cm" svg:x="3.033cm" svg:y="2.367cm" presentation:class="title">
          <draw:text-box>
            <text:p>Outils graphiques </text:p>
          </draw:text-box>
        </draw:frame>
        <draw:frame presentation:style-name="pr5" draw:layer="layout" svg:width="23.499cm" svg:height="12.18cm" svg:x="3.033cm" svg:y="6.283cm" presentation:class="outline" presentation:user-transformed="true">
          <draw:text-box>
            <text:list text:style-name="L2">
              <text:list-item>
                <text:p><text:span text:style-name="T21">Il peut être intéressant de </text:span><text:span text:style-name="T21">s’équiper d’outils </text:span><text:span text:style-name="T21">graphiques aidant à </text:span><text:span text:style-name="T21">l’exploitation du cluster.</text:span></text:p>
              </text:list-item>
              <text:list-item>
                <text:p><text:span text:style-name="T21">Comme produit gratuit, semi-</text:span><text:span text:style-name="T21">commerciaux citons :</text:span></text:p>
              </text:list-item>
            </text:list>
            <text:list text:style-name="L3">
              <text:list-item>
                <text:list>
                  <text:list-item>
                    <text:p><text:span text:style-name="T74">Akhq</text:span><text:span text:style-name="T14"> (https://akhq.io/)</text:span></text:p>
                  </text:list-item>
                  <text:list-item>
                    <text:p><text:span text:style-name="T74">Kafka</text:span><text:span text:style-name="T58"> </text:span><text:span text:style-name="T74">Magic</text:span><text:span text:style-name="T26"> </text:span><text:span text:style-name="T26">(</text:span><text:span text:style-name="T58">https://www.kafkam</text:span><text:span text:style-name="T58">agic.com/</text:span><text:span text:style-name="T14"> )</text:span></text:p>
                  </text:list-item>
                  <text:list-item>
                    <text:p><text:span text:style-name="T74">Redpanda</text:span><text:span text:style-name="T14"> </text:span><text:span text:style-name="T74">Console</text:span><text:span text:style-name="T14"> </text:span><text:span text:style-name="T14">(https://docs.redpanda.c</text:span><text:span text:style-name="T14">om/docs/manage/consol</text:span><text:span text:style-name="T14">e/)</text:span></text:p>
                  </text:list-item>
                </text:list>
              </text:list-item>
            </text:list>
            <text:list text:style-name="L2">
              <text:list-item>
                <text:p>Ils proposent une interface graphique permettant :</text:p>
                <text:list>
                  <text:list-item>
                    <text:p>De rechercher et afficher des messages,</text:p>
                  </text:list-item>
                  <text:list-item>
                    <text:p>Transformer et déplacer des messages entre des topics</text:p>
                  </text:list-item>
                  <text:list-item>
                    <text:p>Gérer les topics</text:p>
                  </text:list-item>
                  <text:list-item>
                    <text:p>Automatiser des tâches.</text:p>
                  </text:list-item>
                </text:list>
              </text:list-item>
              <text:list-item>
                <text:p>La distribution commerciale de Confluent a naturellement un outil graphique d’exploitation</text:p>
              </text:list-item>
            </text:list>
          </draw:text-box>
        </draw:frame>
        <presentation:notes draw:style-name="dp5">
          <draw:page-thumbnail draw:style-name="gr2" draw:layer="layout" svg:width="15.597cm" svg:height="10.985cm" svg:x="2.623cm" svg:y="2.258cm" draw:page-number="67" presentation:class="page"/>
          <draw:frame presentation:style-name="pr6" draw:text-style-name="P13" draw:layer="layout" svg:width="14.362cm" svg:height="11.254cm" svg:x="3.25cm" svg:y="14.128cm" presentation:class="notes" presentation:placeholder="true">
            <draw:text-box/>
          </draw:frame>
        </presentation:notes>
      </draw:page>
      <draw:page draw:name="page68" draw:style-name="dp3" draw:master-page-name="Standard" presentation:presentation-page-layout-name="AL3T1">
        <draw:frame presentation:style-name="pr9" draw:layer="layout" svg:width="23.499cm" svg:height="3.575cm" svg:x="3.033cm" svg:y="2.367cm" presentation:class="title">
          <draw:text-box>
            <text:p>Kafka Magic</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6.749cm" svg:height="12.83cm" svg:x="1.561cm" svg:y="6.439cm">
          <draw:image xlink:href="Pictures/100000010000073500000375CAE94E07.png" xlink:type="simple" xlink:show="embed" xlink:actuate="onLoad" draw:mime-type="image/png">
            <text:p/>
          </draw:image>
        </draw:frame>
        <presentation:notes draw:style-name="dp5">
          <draw:page-thumbnail draw:style-name="gr2" draw:layer="layout" svg:width="15.597cm" svg:height="10.985cm" svg:x="2.623cm" svg:y="2.258cm" draw:page-number="68" presentation:class="page"/>
          <draw:frame presentation:style-name="pr6" draw:text-style-name="P13" draw:layer="layout" svg:width="14.362cm" svg:height="11.254cm" svg:x="3.25cm" svg:y="14.128cm" presentation:class="notes" presentation:placeholder="true">
            <draw:text-box/>
          </draw:frame>
        </presentation:notes>
      </draw:page>
      <draw:page draw:name="page69" draw:style-name="dp3" draw:master-page-name="Standard" presentation:presentation-page-layout-name="AL3T1">
        <draw:frame presentation:style-name="pr9" draw:layer="layout" svg:width="23.499cm" svg:height="3.575cm" svg:x="3.033cm" svg:y="2.367cm" presentation:class="title">
          <draw:text-box>
            <text:p>akhq</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9.699cm" svg:height="14.245cm" svg:x="-0.191cm" svg:y="6.369cm">
          <draw:image xlink:href="Pictures/10000001000007350000037587DA9EE3.png" xlink:type="simple" xlink:show="embed" xlink:actuate="onLoad" draw:mime-type="image/png">
            <text:p/>
          </draw:image>
        </draw:frame>
        <presentation:notes draw:style-name="dp5">
          <draw:page-thumbnail draw:style-name="gr2" draw:layer="layout" svg:width="15.597cm" svg:height="10.985cm" svg:x="2.623cm" svg:y="2.258cm" draw:page-number="69" presentation:class="page"/>
          <draw:frame presentation:style-name="pr6" draw:text-style-name="P13" draw:layer="layout" svg:width="14.362cm" svg:height="11.254cm" svg:x="3.25cm" svg:y="14.128cm" presentation:class="notes" presentation:placeholder="true">
            <draw:text-box/>
          </draw:frame>
        </presentation:notes>
      </draw:page>
      <draw:page draw:name="page70" draw:style-name="dp3" draw:master-page-name="Standard" presentation:presentation-page-layout-name="AL3T1">
        <draw:frame presentation:style-name="pr9" draw:layer="layout" svg:width="23.499cm" svg:height="3.575cm" svg:x="3.033cm" svg:y="2.367cm" presentation:class="title">
          <draw:text-box>
            <text:p>Redpanda Console</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9.699cm" svg:height="12.506cm" svg:x="-0.033cm" svg:y="6.42cm">
          <draw:image xlink:href="Pictures/1000000100000735000003090E6462D1.png" xlink:type="simple" xlink:show="embed" xlink:actuate="onLoad" draw:mime-type="image/png">
            <text:p/>
          </draw:image>
        </draw:frame>
        <draw:frame draw:style-name="gr20" draw:text-style-name="P34" draw:layer="layout" svg:width="14.684cm" svg:height="1.216cm" svg:x="1.603cm" svg:y="19.4cm">
          <draw:text-box>
            <text:p><text:span text:style-name="T73">Atelier 1.4 : Installation Outil graphique</text:span></text:p>
          </draw:text-box>
        </draw:frame>
        <presentation:notes draw:style-name="dp5">
          <draw:page-thumbnail draw:style-name="gr2" draw:layer="layout" svg:width="15.597cm" svg:height="10.985cm" svg:x="2.623cm" svg:y="2.258cm" draw:page-number="70" presentation:class="page"/>
          <draw:frame presentation:style-name="pr6" draw:text-style-name="P13" draw:layer="layout" svg:width="14.362cm" svg:height="11.254cm" svg:x="3.25cm" svg:y="14.128cm" presentation:class="notes" presentation:placeholder="true">
            <draw:text-box/>
          </draw:frame>
        </presentation:notes>
      </draw:page>
      <draw:page draw:name="page71"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Clients</text:span></text:p>
              </text:list-header>
            </text:list>
          </draw:text-box>
        </draw:frame>
        <draw:frame presentation:style-name="pr18" draw:text-style-name="P16" draw:layer="layout" svg:width="23.499cm" svg:height="14.226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19"><text:span text:style-name="T12">Types de clients</text:span></text:p>
              </text:list-item>
              <text:list-item>
                <text:p text:style-name="P19"><text:span text:style-name="T2">Production de messages</text:span></text:p>
              </text:list-item>
              <text:list-item>
                <text:p text:style-name="P19"><text:span text:style-name="T2">Consommation de messages</text:span></text:p>
              </text:list-item>
              <text:list-item>
                <text:p text:style-name="P28"><text:span text:style-name="T2">Garanties Kafka</text:span></text:p>
              </text:list-item>
              <text:list-item>
                <text:p text:style-name="P28"><text:span text:style-name="T2">Schema registry</text:span></text:p>
              </text:list-item>
              <text:list-item>
                <text:p text:style-name="P19"><text:span text:style-name="T2">Latence, Débit</text:span></text:p>
              </text:list-item>
              <text:list-item>
                <text:p text:style-name="P19"><text:span text:style-name="T2">Kafka Connect</text:span></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72" draw:style-name="dp3" draw:master-page-name="Standard" presentation:presentation-page-layout-name="AL3T1">
        <draw:frame presentation:style-name="pr9" draw:layer="layout" svg:width="23.499cm" svg:height="3.575cm" svg:x="3.033cm" svg:y="2.367cm" presentation:class="title">
          <draw:text-box>
            <text:p>Types de client</text:p>
          </draw:text-box>
        </draw:frame>
        <draw:frame presentation:style-name="pr5" draw:layer="layout" svg:width="23.499cm" svg:height="12.18cm" svg:x="3.033cm" svg:y="6.283cm" presentation:class="outline">
          <draw:text-box>
            <text:list text:style-name="L2">
              <text:list-item>
                <text:p>Un serveur Kafka a différents types de clients :</text:p>
                <text:list>
                  <text:list-item>
                    <text:p>Les autres serveurs (brokers ou contrôleurs)</text:p>
                  </text:list-item>
                  <text:list-item>
                    <text:p>Les outils d’administration (Admin API)</text:p>
                  </text:list-item>
                  <text:list-item>
                    <text:p>Les producteurs et les consommateurs de message (Client API)</text:p>
                  </text:list-item>
                  <text:list-item>
                    <text:p>KafkaConnect, KafkaMirrors </text:p>
                  </text:list-item>
                  <text:list-item>
                    <text:p>Les applications KafkaStream</text:p>
                  </text:list-item>
                </text:list>
              </text:list-item>
              <text:list-item>
                <text:p>Dans un environnement de production, les flux d’échanges applicatifs et d’exploitation sont séparés en définissant différents listeners (ports différents)</text:p>
              </text:list-item>
            </text:list>
          </draw:text-box>
        </draw:frame>
        <presentation:notes draw:style-name="dp5">
          <draw:page-thumbnail draw:style-name="gr2" draw:layer="layout" svg:width="15.597cm" svg:height="10.985cm" svg:x="2.623cm" svg:y="2.258cm" draw:page-number="72" presentation:class="page"/>
          <draw:frame presentation:style-name="pr6" draw:text-style-name="P13" draw:layer="layout" svg:width="14.362cm" svg:height="11.254cm" svg:x="3.25cm" svg:y="14.128cm" presentation:class="notes" presentation:placeholder="true">
            <draw:text-box/>
          </draw:frame>
        </presentation:notes>
      </draw:page>
      <draw:page draw:name="page73" draw:style-name="dp3" draw:master-page-name="Standard" presentation:presentation-page-layout-name="AL3T1">
        <draw:frame presentation:style-name="pr9" draw:layer="layout" svg:width="23.499cm" svg:height="3.575cm" svg:x="3.033cm" svg:y="2.367cm" presentation:class="title">
          <draw:text-box>
            <text:p>Configuration des listeners</text:p>
          </draw:text-box>
        </draw:frame>
        <draw:frame presentation:style-name="pr5" draw:layer="layout" svg:width="23.499cm" svg:height="12.18cm" svg:x="3.033cm" svg:y="6.283cm" presentation:class="outline" presentation:user-transformed="true">
          <draw:text-box>
            <text:list text:style-name="L2">
              <text:list-item>
                <text:p>Les ports ouverts sont déclarés via la propriété <text:span text:style-name="T31">listeners </text:span>:</text:p>
              </text:list-item>
              <text:list-item>
                <text:p><text:span text:style-name="T67">{LISTENER_NAME}://:{port}</text:span></text:p>
              </text:list-item>
              <text:list-item>
                <text:p>Ou LISTENER_NAME est un nom descriptif</text:p>
              </text:list-item>
              <text:list-item>
                <text:p text:style-name="P24"><text:span text:style-name="T31">advertised.listeners</text:span> doit spécifier l’adresse externe (hôte/IP) utilisé par les clients.</text:p>
              </text:list-item>
              <text:list-item>
                <text:p/>
              </text:list-item>
              <text:list-item>
                <text:p>Exemple :</text:p>
              </text:list-item>
              <text:list-item>
                <text:p><text:span text:style-name="T67"><text:s text:c="2"/></text:span><text:span text:style-name="T67">listeners=CLIENT://:9092,B</text:span><text:span text:style-name="T67">ROKER://:9095</text:span></text:p>
              </text:list-item>
              <text:list-item>
                <text:p><text:span text:style-name="T67"><text:s text:c="2"/></text:span><text:span text:style-name="T67">advertised.listeners=CLIEN</text:span><text:span text:style-name="T67">T://kafka-0.myorg.fr:9092</text:span></text:p>
              </text:list-item>
              <text:list-item>
                <text:p><text:line-break/></text:p>
              </text:list-item>
              <text:list-item>
                <text:p/>
              </text:list-item>
            </text:list>
          </draw:text-box>
        </draw:frame>
        <presentation:notes draw:style-name="dp5">
          <draw:page-thumbnail draw:style-name="gr2" draw:layer="layout" svg:width="15.597cm" svg:height="10.985cm" svg:x="2.623cm" svg:y="2.258cm" draw:page-number="73" presentation:class="page"/>
          <draw:frame presentation:style-name="pr6" draw:text-style-name="P13" draw:layer="layout" svg:width="14.362cm" svg:height="11.254cm" svg:x="3.25cm" svg:y="14.128cm" presentation:class="notes" presentation:placeholder="true">
            <draw:text-box/>
          </draw:frame>
        </presentation:notes>
      </draw:page>
      <draw:page draw:name="page74" draw:style-name="dp3" draw:master-page-name="Standard" presentation:presentation-page-layout-name="AL3T1">
        <draw:frame presentation:style-name="pr9" draw:layer="layout" svg:width="23.499cm" svg:height="3.575cm" svg:x="3.033cm" svg:y="2.367cm" presentation:class="title" presentation:user-transformed="true">
          <draw:text-box>
            <text:p>Listeners inter-brokers</text:p>
          </draw:text-box>
        </draw:frame>
        <draw:frame presentation:style-name="pr5" draw:layer="layout" svg:width="23.499cm" svg:height="12.18cm" svg:x="3.033cm" svg:y="6.283cm" presentation:class="outline" presentation:user-transformed="true">
          <draw:text-box>
            <text:list text:style-name="L2">
              <text:list-item>
                <text:p><text:span text:style-name="T31">inter.broker.listener.nam</text:span><text:span text:style-name="T31">e</text:span> : Nom du listener utilisé pour la communication inter-broker. <text:line-break/>Si non spécifié, le nom du listener est indiqué via <text:s/><text:span text:style-name="T14">security.inter.broker.proto</text:span><text:span text:style-name="T14">col</text:span></text:p>
              </text:list-item>
              <text:list-item>
                <text:p text:style-name="P24"><text:span text:style-name="T31">controller.listener.names</text:span><text:span text:style-name="T14"> : </text:span><text:span text:style-name="T21">Une liste de listeners </text:span><text:span text:style-name="T21">utilisés pour la </text:span><text:span text:style-name="T21">communication inter </text:span><text:span text:style-name="T21">contrôleur </text:span><text:span text:style-name="T14"><text:s/></text:span></text:p>
              </text:list-item>
              <text:list-item>
                <text:p><text:span text:style-name="T31">control.plane.listener.na</text:span><text:span text:style-name="T31">me</text:span> : Nom du listener utilisé pour la communication entre le contrôleur et les brokers. <text:line-break/>Si non spécifié, pas de listener dédié à ce type de communication</text:p>
              </text:list-item>
              <text:list-item>
                <text:p/>
              </text:list-item>
              <text:list-item>
                <text:p/>
              </text:list-item>
              <text:list-item>
                <text:p/>
              </text:list-item>
            </text:list>
          </draw:text-box>
        </draw:frame>
        <presentation:notes draw:style-name="dp5">
          <draw:page-thumbnail draw:style-name="gr2" draw:layer="layout" svg:width="15.597cm" svg:height="10.985cm" svg:x="2.623cm" svg:y="2.258cm" draw:page-number="74" presentation:class="page"/>
          <draw:frame presentation:style-name="pr6" draw:text-style-name="P13" draw:layer="layout" svg:width="14.362cm" svg:height="11.254cm" svg:x="3.25cm" svg:y="14.128cm" presentation:class="notes" presentation:placeholder="true">
            <draw:text-box/>
          </draw:frame>
        </presentation:notes>
      </draw:page>
      <draw:page draw:name="page75" draw:style-name="dp3" draw:master-page-name="Standard" presentation:presentation-page-layout-name="AL3T1">
        <draw:frame presentation:style-name="pr9" draw:layer="layout" svg:width="23.499cm" svg:height="3.575cm" svg:x="3.033cm" svg:y="2.367cm" presentation:class="title">
          <draw:text-box>
            <text:p>Exemple</text:p>
          </draw:text-box>
        </draw:frame>
        <draw:frame presentation:style-name="pr5" draw:text-style-name="P35" draw:layer="layout" svg:width="23.499cm" svg:height="12.18cm" svg:x="3.033cm" svg:y="6.283cm" presentation:class="outline" presentation:user-transformed="true">
          <draw:text-box>
            <text:list text:style-name="L2">
              <text:list-item>
                <text:p><text:span text:style-name="T78">listeners=PLAINTEXT://:9292,CONTROLLER</text:span><text:span text:style-name="T78">://:9293</text:span></text:p>
              </text:list-item>
              <text:list-item>
                <text:p><text:span text:style-name="T79"/></text:p>
              </text:list-item>
              <text:list-item>
                <text:p><text:span text:style-name="T80">inter.broker.listener.name=PLAINTEXT</text:span></text:p>
              </text:list-item>
              <text:list-item>
                <text:p><text:span text:style-name="T79"/></text:p>
              </text:list-item>
              <text:list-item>
                <text:p><text:span text:style-name="T79"/></text:p>
              </text:list-item>
              <text:list-item>
                <text:p><text:span text:style-name="T79"/></text:p>
              </text:list-item>
              <text:list-item>
                <text:p><text:span text:style-name="T78"/></text:p>
              </text:list-item>
              <text:list-item>
                <text:p><text:span text:style-name="T78"># If no explicit mapping set in </text:span><text:span text:style-name="T78">`listener.security.protocol.map`,</text:span></text:p>
              </text:list-item>
              <text:list-item>
                <text:p><text:span text:style-name="T78"># default will be using PLAINTEXT </text:span><text:span text:style-name="T78">protocol</text:span></text:p>
              </text:list-item>
              <text:list-item>
                <text:p><text:span text:style-name="T78"># This is required if running in KRaft </text:span><text:span text:style-name="T78">mode.</text:span></text:p>
              </text:list-item>
              <text:list-item>
                <text:p><text:span text:style-name="T80">controller.listener.names=CONTROLLER</text:span></text:p>
              </text:list-item>
            </text:list>
          </draw:text-box>
        </draw:frame>
        <presentation:notes draw:style-name="dp5">
          <draw:page-thumbnail draw:style-name="gr2" draw:layer="layout" svg:width="15.597cm" svg:height="10.985cm" svg:x="2.623cm" svg:y="2.258cm" draw:page-number="75" presentation:class="page"/>
          <draw:frame presentation:style-name="pr6" draw:text-style-name="P13" draw:layer="layout" svg:width="14.362cm" svg:height="11.254cm" svg:x="3.25cm" svg:y="14.128cm" presentation:class="notes" presentation:placeholder="true">
            <draw:text-box/>
          </draw:frame>
        </presentation:notes>
      </draw:page>
      <draw:page draw:name="page76" draw:style-name="dp3" draw:master-page-name="Standard" presentation:presentation-page-layout-name="AL3T1">
        <draw:frame presentation:style-name="pr9" draw:layer="layout" svg:width="23.499cm" svg:height="3.575cm" svg:x="3.033cm" svg:y="2.367cm" presentation:class="title">
          <draw:text-box>
            <text:p>Protocoles</text:p>
          </draw:text-box>
        </draw:frame>
        <draw:frame presentation:style-name="pr5" draw:layer="layout" svg:width="23.499cm" svg:height="12.18cm" svg:x="3.033cm" svg:y="6.283cm" presentation:class="outline" presentation:user-transformed="true">
          <draw:text-box>
            <text:list text:style-name="L2">
              <text:list-item>
                <text:p text:style-name="P24">Le protocole utilisé pour chaque listener est spécifié dans la propriété <text:span text:style-name="T31">listener.security.protoc</text:span><text:span text:style-name="T31">ol.map</text:span></text:p>
              </text:list-item>
              <text:list-item>
                <text:p text:style-name="P24">Exemple : <text:span text:style-name="T67">listener.security.protocol</text:span><text:span text:style-name="T67">.map=CLIENT:SSL,BROKER:PLA</text:span><text:span text:style-name="T67">INTEXT</text:span></text:p>
              </text:list-item>
              <text:list-item>
                <text:p text:style-name="P24">Les protocoles supportés sont :</text:p>
                <text:list>
                  <text:list-item>
                    <text:p><text:span text:style-name="T31">PLAINTEXT </text:span><text:span text:style-name="T14">: </text:span><text:span text:style-name="T21">Transport </text:span><text:span text:style-name="T21">en clair</text:span></text:p>
                  </text:list-item>
                  <text:list-item>
                    <text:p><text:span text:style-name="T31">SSL</text:span><text:span text:style-name="T14"> : </text:span><text:span text:style-name="T21">Transport crypté </text:span><text:span text:style-name="T21">(TLS 1.2 et 1.3)</text:span></text:p>
                  </text:list-item>
                  <text:list-item>
                    <text:p><text:span text:style-name="T31">SASL_PLAINTEXT</text:span><text:span text:style-name="T14"> : </text:span><text:span text:style-name="T21">Authentification + </text:span><text:span text:style-name="T21">transport en clair</text:span></text:p>
                  </text:list-item>
                  <text:list-item>
                    <text:p><text:span text:style-name="T31">SASL_SSL</text:span><text:span text:style-name="T14"> :</text:span><text:span text:style-name="T21"> </text:span><text:span text:style-name="T21">Authentification + </text:span><text:span text:style-name="T21">crypté</text:span></text:p>
                  </text:list-item>
                </text:list>
              </text:list-item>
            </text:list>
          </draw:text-box>
        </draw:frame>
        <presentation:notes draw:style-name="dp5">
          <draw:page-thumbnail draw:style-name="gr2" draw:layer="layout" svg:width="15.597cm" svg:height="10.985cm" svg:x="2.623cm" svg:y="2.258cm" draw:page-number="76" presentation:class="page"/>
          <draw:frame presentation:style-name="pr6" draw:text-style-name="P13" draw:layer="layout" svg:width="14.362cm" svg:height="11.254cm" svg:x="3.25cm" svg:y="14.128cm" presentation:class="notes" presentation:placeholder="true">
            <draw:text-box/>
          </draw:frame>
        </presentation:notes>
      </draw:page>
      <draw:page draw:name="page77" draw:style-name="dp3" draw:master-page-name="Standard" presentation:presentation-page-layout-name="AL3T1">
        <draw:frame presentation:style-name="pr9" draw:layer="layout" svg:width="23.499cm" svg:height="3.575cm" svg:x="3.033cm" svg:y="2.367cm" presentation:class="title">
          <draw:text-box>
            <text:p>Librairies clientes</text:p>
          </draw:text-box>
        </draw:frame>
        <draw:frame presentation:style-name="pr5" draw:layer="layout" svg:width="23.499cm" svg:height="12.18cm" svg:x="3.033cm" svg:y="6.283cm" presentation:class="outline" presentation:user-transformed="true">
          <draw:text-box>
            <text:list text:style-name="L2">
              <text:list-item>
                <text:p>Apache fournit  :</text:p>
                <text:list>
                  <text:list-item>
                    <text:p><text:span text:style-name="T47">Une librairie Java </text:span><text:span text:style-name="T81">kafka-</text:span><text:span text:style-name="T81">clients</text:span><text:span text:style-name="T75"> : </text:span>Envoi/Consommation de messages + administration cluster</text:p>
                  </text:list-item>
                  <text:list-item>
                    <text:p>Une<text:span text:style-name="T75"> </text:span>librairie java<text:span text:style-name="T75"> </text:span><text:span text:style-name="T81">kafka-stream</text:span><text:span text:style-name="T75"> </text:span>permettant<text:span text:style-name="T75"> </text:span>de<text:span text:style-name="T75"> </text:span>consruire des applications event-stream</text:p>
                  </text:list-item>
                  <text:list-item>
                    <text:p>Une distribution de <text:span text:style-name="T81">KafkaConnect</text:span>, un serveur permettant de s’intégrer avec des systèmes externes</text:p>
                  </text:list-item>
                </text:list>
              </text:list-item>
              <text:list-item>
                <text:p>Confluent fournit des librairies pour les autres technologies (Python, .NET, …)</text:p>
              </text:list-item>
              <text:list-item>
                <text:p>Des tiers fournissent également des librairies en nodejs, php, ...</text:p>
              </text:list-item>
            </text:list>
          </draw:text-box>
        </draw:frame>
        <presentation:notes draw:style-name="dp5">
          <draw:page-thumbnail draw:style-name="gr2" draw:layer="layout" svg:width="15.597cm" svg:height="10.985cm" svg:x="2.623cm" svg:y="2.258cm" draw:page-number="77" presentation:class="page"/>
          <draw:frame presentation:style-name="pr6" draw:text-style-name="P18" draw:layer="layout" svg:width="14.362cm" svg:height="11.254cm" svg:x="3.25cm" svg:y="14.128cm" presentation:class="notes" presentation:placeholder="true">
            <draw:text-box/>
          </draw:frame>
        </presentation:notes>
      </draw:page>
      <draw:page draw:name="page78" draw:style-name="dp3" draw:master-page-name="Standard" presentation:presentation-page-layout-name="AL3T1">
        <draw:frame presentation:style-name="pr11" draw:layer="layout" svg:width="23.499cm" svg:height="3.577cm" svg:x="3.033cm" svg:y="2.366cm" presentation:class="title">
          <draw:text-box>
            <text:p>Configuration commune aux clients</text:p>
          </draw:text-box>
        </draw:frame>
        <draw:frame presentation:style-name="pr5" draw:layer="layout" svg:width="23.499cm" svg:height="12.18cm" svg:x="3.033cm" svg:y="6.283cm" presentation:class="outline">
          <draw:text-box>
            <text:list text:style-name="L2">
              <text:list-item>
                <text:p>Quelque-soit l’API utilisée, un client doit fournir la propriété <text:span text:style-name="T31">bootstrap.servers</text:span></text:p>
                <text:list>
                  <text:list-item>
                    <text:p>Cette propriété est renseignée avec 1 ou plusieurs adresses des serveurs.</text:p>
                  </text:list-item>
                  <text:list-item>
                    <text:p>Il suffit que le client en contacte un pour qu’il découvre l’intégralité du cluster. <text:s text:c="2"/></text:p>
                  </text:list-item>
                </text:list>
              </text:list-item>
            </text:list>
          </draw:text-box>
        </draw:frame>
        <presentation:notes draw:style-name="dp5">
          <draw:page-thumbnail draw:style-name="gr2" draw:layer="layout" svg:width="15.597cm" svg:height="10.985cm" svg:x="2.623cm" svg:y="2.258cm" draw:page-number="78" presentation:class="page"/>
          <draw:frame presentation:style-name="pr6" draw:text-style-name="P13" draw:layer="layout" svg:width="14.362cm" svg:height="11.254cm" svg:x="3.25cm" svg:y="14.128cm" presentation:class="notes" presentation:placeholder="true">
            <draw:text-box/>
          </draw:frame>
        </presentation:notes>
      </draw:page>
      <draw:page draw:name="page79"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Clients</text:span></text:p>
              </text:list-header>
            </text:list>
          </draw:text-box>
        </draw:frame>
        <draw:frame presentation:style-name="pr19"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19"><text:span text:style-name="T2">Types de clients</text:span></text:p>
              </text:list-item>
              <text:list-item>
                <text:p text:style-name="P19"><text:span text:style-name="T12">Production de messages</text:span></text:p>
              </text:list-item>
              <text:list-item>
                <text:p text:style-name="P19"><text:span text:style-name="T2">Consommation de messages</text:span></text:p>
              </text:list-item>
              <text:list-item>
                <text:p text:style-name="P19"><text:span text:style-name="T2">Garanties Kafka</text:span></text:p>
              </text:list-item>
              <text:list-item>
                <text:p text:style-name="P28"><text:span text:style-name="T2">Schema registry</text:span></text:p>
              </text:list-item>
              <text:list-item>
                <text:p text:style-name="P19"><text:span text:style-name="T2">Kafka Connect</text:span></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80" draw:style-name="dp6"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L’API est simple mais les contraintes applicatives influencent la façon de l’utiliser ainsi que la configuration des <text:span text:style-name="T14">topics</text:span></text:p>
              </text:list-item>
              <text:list-item>
                <text:p>Les questions devant être posées : </text:p>
                <text:list>
                  <text:list-item>
                    <text:p>Chaque message est-il critique, ou peut-on tolérer des pertes de messages? </text:p>
                  </text:list-item>
                  <text:list-item>
                    <text:p>La duplication accidentelle de messages est elle autorisée ? </text:p>
                  </text:list-item>
                  <text:list-item>
                    <text:p>Y-a-t-il des exigences strictes de latence ou de débit ?</text:p>
                  </text:list-item>
                </text:list>
              </text:list-item>
            </text:list>
          </draw:text-box>
        </draw:frame>
        <presentation:notes draw:style-name="dp4">
          <draw:page-thumbnail draw:style-name="gr2" draw:layer="layout" svg:width="15.597cm" svg:height="10.985cm" svg:x="2.623cm" svg:y="2.258cm" draw:page-number="80" presentation:class="page"/>
          <draw:frame presentation:style-name="pr6" draw:text-style-name="P18" draw:layer="layout" svg:width="14.362cm" svg:height="11.254cm" svg:x="3.25cm" svg:y="14.128cm" presentation:class="notes" presentation:placeholder="true">
            <draw:text-box/>
          </draw:frame>
        </presentation:notes>
      </draw:page>
      <draw:page draw:name="page81" draw:style-name="dp6" draw:master-page-name="Standard" presentation:presentation-page-layout-name="AL3T1">
        <draw:frame presentation:style-name="pr9" draw:layer="layout" svg:width="23.499cm" svg:height="3.575cm" svg:x="3.033cm" svg:y="2.367cm" presentation:class="title">
          <draw:text-box>
            <text:p>Configuration Producteur</text:p>
          </draw:text-box>
        </draw:frame>
        <draw:frame presentation:style-name="pr5" draw:layer="layout" svg:width="23.499cm" svg:height="12.18cm" svg:x="3.033cm" svg:y="6.283cm" presentation:class="outline" presentation:user-transformed="true">
          <draw:text-box>
            <text:list text:style-name="L2">
              <text:list-item>
                <text:p>En dehors de <text:span text:style-name="T31">bootstrap.servers,</text:span> le producteur configure 2 sérialiseurs</text:p>
                <text:list>
                  <text:list-item>
                    <text:p><text:span text:style-name="T31">key.serializer </text:span>: La classe utilisée pour la sérialisation de la clé</text:p>
                  </text:list-item>
                  <text:list-item>
                    <text:p><text:span text:style-name="T31">value.serializer</text:span><text:span text:style-name="T47"> : La </text:span><text:span text:style-name="T47">classe </text:span>utilisée pour la sérialisation du corps du message …</text:p>
                  </text:list-item>
                </text:list>
              </text:list-item>
              <text:list-item>
                <text:p>Les sérialiseurs typiques sont Json, Avro, Protobuf</text:p>
              </text:list-item>
              <text:list-item>
                <text:p>Un producteur peut également préciser <text:span text:style-name="T31">client.id.</text:span> Une chaîne de caractère utilisé pour le monitoring. </text:p>
                <text:p/>
              </text:list-item>
            </text:list>
          </draw:text-box>
        </draw:frame>
        <presentation:notes draw:style-name="dp4">
          <draw:page-thumbnail draw:style-name="gr2" draw:layer="layout" svg:width="15.597cm" svg:height="10.985cm" svg:x="2.623cm" svg:y="2.258cm" draw:page-number="81" presentation:class="page"/>
          <draw:frame presentation:style-name="pr6" draw:text-style-name="P18" draw:layer="layout" svg:width="14.362cm" svg:height="11.254cm" svg:x="3.25cm" svg:y="14.128cm" presentation:class="notes" presentation:placeholder="true">
            <draw:text-box/>
          </draw:frame>
        </presentation:notes>
      </draw:page>
      <draw:page draw:name="page82" draw:style-name="dp6" draw:master-page-name="Standard" presentation:presentation-page-layout-name="AL3T1">
        <draw:frame presentation:style-name="pr11" draw:layer="layout" svg:width="23.499cm" svg:height="3.577cm" svg:x="3.033cm" svg:y="2.366cm" presentation:class="title">
          <draw:text-box>
            <text:p>Étapes lors de l’envoi d’un message</text:p>
          </draw:text-box>
        </draw:frame>
        <draw:frame presentation:style-name="pr5" draw:layer="layout" svg:width="23.499cm" svg:height="12.18cm" svg:x="3.033cm" svg:y="6.283cm" presentation:class="outline">
          <draw:text-box>
            <text:list text:style-name="L2">
              <text:list-item>
                <text:p>L’envoi de message est constitué de plusieurs étapes :</text:p>
                <text:list>
                  <text:list-item>
                    <text:p>Création d’un objet <text:span text:style-name="T31">ProducerRecord</text:span> encapsulant les données (clé + valeur, topis)</text:p>
                  </text:list-item>
                  <text:list-item>
                    <text:p>L’objet est <text:span text:style-name="T38">sérialisé</text:span> pour préparer sa transmission sur le réseau</text:p>
                  </text:list-item>
                  <text:list-item>
                    <text:p>Les données sont ensuite fournies à un <text:span text:style-name="T38">partitionneur</text:span> qui détermine la partition de destination, (typiquement à partir de la clé du message)</text:p>
                  </text:list-item>
                  <text:list-item>
                    <text:p>Le message est ensuite ajouté à un <text:span text:style-name="T38">lot de </text:span><text:span text:style-name="T38">messages</text:span> destinés à la même partition. <text:line-break/>Une thread séparée envoie le lot de messages.</text:p>
                  </text:list-item>
                  <text:list-item>
                    <text:p>Lorsque le broker reçoit le message, il renvoie une réponse sous le forme d’un objet <text:span text:style-name="T31">RecordMetadata</text:span> encapsulant le <text:span text:style-name="T14">topic</text:span>, la partition, la clé et l’offset</text:p>
                  </text:list-item>
                  <text:list-item>
                    <text:p>Si le broker n’arrive pas à écrire le message dans le journal, il renvoie une erreur et le producteur peut réessayer un certain nombre de fois</text:p>
                  </text:list-item>
                </text:list>
              </text:list-item>
            </text:list>
          </draw:text-box>
        </draw:frame>
        <presentation:notes draw:style-name="dp4">
          <draw:page-thumbnail draw:style-name="gr2" draw:layer="layout" svg:width="15.597cm" svg:height="10.985cm" svg:x="2.623cm" svg:y="2.258cm" draw:page-number="82" presentation:class="page"/>
          <draw:frame presentation:style-name="pr6" draw:text-style-name="P13" draw:layer="layout" svg:width="14.362cm" svg:height="11.254cm" svg:x="3.25cm" svg:y="14.128cm" presentation:class="notes" presentation:placeholder="true">
            <draw:text-box/>
          </draw:frame>
        </presentation:notes>
      </draw:page>
      <draw:page draw:name="page83" draw:style-name="dp6" draw:master-page-name="Standard" presentation:presentation-page-layout-name="AL3T1">
        <draw:frame presentation:style-name="pr9" draw:layer="layout" svg:width="23.499cm" svg:height="3.575cm" svg:x="3.033cm" svg:y="2.367cm" presentation:class="title">
          <draw:text-box>
            <text:p>Envoi de message</text:p>
          </draw:text-box>
        </draw:frame>
        <draw:frame presentation:style-name="pr5" draw:layer="layout" svg:width="23.499cm" svg:height="12.18cm" svg:x="3.033cm" svg:y="6.283cm" presentation:class="outline" presentation:placeholder="true">
          <draw:text-box/>
        </draw:frame>
        <draw:frame draw:style-name="gr9" draw:text-style-name="P23" draw:layer="layout" svg:width="13.223cm" svg:height="14.63cm" svg:x="6.377cm" svg:y="6.17cm">
          <draw:image xlink:href="Pictures/1000000100000468000004E0069CD733.png" xlink:type="simple" xlink:show="embed" xlink:actuate="onLoad" draw:mime-type="image/png">
            <text:p/>
          </draw:image>
        </draw:frame>
        <presentation:notes draw:style-name="dp4">
          <draw:page-thumbnail draw:style-name="gr2" draw:layer="layout" svg:width="15.597cm" svg:height="10.985cm" svg:x="2.623cm" svg:y="2.258cm" draw:page-number="83" presentation:class="page"/>
          <draw:frame presentation:style-name="pr6" draw:text-style-name="P13" draw:layer="layout" svg:width="14.362cm" svg:height="11.254cm" svg:x="3.25cm" svg:y="14.128cm" presentation:class="notes" presentation:placeholder="true">
            <draw:text-box/>
          </draw:frame>
        </presentation:notes>
      </draw:page>
      <draw:page draw:name="page84" draw:style-name="dp6" draw:master-page-name="Standard" presentation:presentation-page-layout-name="AL3T1">
        <draw:frame presentation:style-name="pr11" draw:layer="layout" svg:width="23.499cm" svg:height="3.577cm" svg:x="3.033cm" svg:y="2.366cm" presentation:class="title">
          <draw:text-box>
            <text:p>Méthodes d’envoi des messages </text:p>
          </draw:text-box>
        </draw:frame>
        <draw:frame presentation:style-name="pr5" draw:layer="layout" svg:width="23.499cm" svg:height="12.18cm" svg:x="3.033cm" svg:y="6.283cm" presentation:class="outline">
          <draw:text-box>
            <text:list text:style-name="L2">
              <text:list-item>
                <text:p><text:span text:style-name="T5">3 façons pour un producteur </text:span><text:span text:style-name="T5">d’envoyer des messages :</text:span></text:p>
                <text:list>
                  <text:list-item>
                    <text:p><text:span text:style-name="T77">Fire-and-forget</text:span><text:span text:style-name="T5"> : Pas </text:span><text:span text:style-name="T5">d’acquittement, on </text:span><text:span text:style-name="T5">s’autorise à perdre </text:span><text:span text:style-name="T5">quelques messages </text:span><text:span text:style-name="T5">(même si c’est très </text:span><text:span text:style-name="T5">rare)</text:span></text:p>
                  </text:list-item>
                  <text:list-item>
                    <text:p><text:span text:style-name="T31">Envoi</text:span><text:span text:style-name="T5"> </text:span><text:span text:style-name="T31">synchrone</text:span><text:span text:style-name="T5"> : Le </text:span><text:span text:style-name="T5">producteur attend </text:span><text:span text:style-name="T5">l’acquittement de </text:span><text:span text:style-name="T5">l’écriture du </text:span><text:span text:style-name="T5">message. <text:s/></text:span><text:span text:style-name="T5"><text:line-break/></text:span><text:span text:style-name="T5">On traite </text:span><text:span text:style-name="T5">éventuellement les </text:span><text:span text:style-name="T5">cas d’erreurs</text:span></text:p>
                  </text:list-item>
                  <text:list-item>
                    <text:p><text:span text:style-name="T31">Envoi</text:span><text:span text:style-name="T5"> </text:span><text:span text:style-name="T31">asynchrone</text:span><text:span text:style-name="T5"> : Le </text:span><text:span text:style-name="T5">producteur précise </text:span><text:span text:style-name="T5">une fonction de call-</text:span><text:span text:style-name="T5">back qui sera appelée </text:span><text:span text:style-name="T5">lorsque la réponse </text:span><text:span text:style-name="T5">est retournée.</text:span></text:p>
                  </text:list-item>
                </text:list>
              </text:list-item>
            </text:list>
          </draw:text-box>
        </draw:frame>
        <presentation:notes draw:style-name="dp4">
          <draw:page-thumbnail draw:style-name="gr2" draw:layer="layout" svg:width="15.597cm" svg:height="10.985cm" svg:x="2.623cm" svg:y="2.258cm" draw:page-number="84" presentation:class="page"/>
          <draw:frame presentation:style-name="pr6" draw:text-style-name="P18" draw:layer="layout" svg:width="14.362cm" svg:height="11.254cm" svg:x="3.25cm" svg:y="14.128cm" presentation:class="notes" presentation:placeholder="true">
            <draw:text-box/>
          </draw:frame>
        </presentation:notes>
      </draw:page>
      <draw:page draw:name="page85" draw:style-name="dp3" draw:master-page-name="Standard" presentation:presentation-page-layout-name="AL3T1">
        <draw:frame presentation:style-name="pr9" draw:layer="layout" svg:width="23.499cm" svg:height="3.575cm" svg:x="3.033cm" svg:y="2.367cm" presentation:class="title">
          <draw:text-box>
            <text:p><text:span text:style-name="T2">Ecriture sur une partition</text:span></text:p>
          </draw:text-box>
        </draw:frame>
        <draw:frame presentation:style-name="pr5" draw:layer="layout" svg:width="23.499cm" svg:height="12.18cm" svg:x="3.033cm" svg:y="6.283cm" presentation:class="outline">
          <draw:text-box>
            <text:list text:style-name="L2">
              <text:list-item>
                <text:p>Différents brokers participent à l’écriture d’un message.</text:p>
                <text:list>
                  <text:list-item>
                    <text:p><text:span text:style-name="T82">1 broker leader</text:span> : Détient la partition leader responsable de la validation des écritures</text:p>
                  </text:list-item>
                  <text:list-item>
                    <text:p><text:span text:style-name="T82">N followers</text:span> : Suivent les écritures effectuées par le leader. <text:line-break/>Un décalage est permis mais si il n’arrive plus à suivre la cadence d’écriture, ils sont éliminés</text:p>
                  </text:list-item>
                </text:list>
                <text:p/>
              </text:list-item>
            </text:list>
          </draw:text-box>
        </draw:frame>
        <presentation:notes draw:style-name="dp5">
          <draw:page-thumbnail draw:style-name="gr2" draw:layer="layout" svg:width="15.597cm" svg:height="10.985cm" svg:x="2.623cm" svg:y="2.258cm" draw:page-number="85" presentation:class="page"/>
          <draw:frame presentation:style-name="pr6" draw:text-style-name="P18" draw:layer="layout" svg:width="14.362cm" svg:height="11.254cm" svg:x="3.25cm" svg:y="14.128cm" presentation:class="notes" presentation:placeholder="true">
            <draw:text-box/>
          </draw:frame>
        </presentation:notes>
      </draw:page>
      <draw:page draw:name="page86" draw:style-name="dp3" draw:master-page-name="Standard" presentation:presentation-page-layout-name="AL3T1">
        <draw:frame presentation:style-name="pr9" draw:layer="layout" svg:width="23.499cm" svg:height="3.575cm" svg:x="3.033cm" svg:y="2.367cm" presentation:class="title">
          <draw:text-box>
            <text:p>In Sync Replica (ISR) </text:p>
          </draw:text-box>
        </draw:frame>
        <draw:frame presentation:style-name="pr5" draw:layer="layout" svg:width="23.499cm" svg:height="12.18cm" svg:x="3.033cm" svg:y="6.283cm" presentation:class="outline" presentation:user-transformed="true">
          <draw:text-box>
            <text:list text:style-name="L2">
              <text:list-item>
                <text:p>La liste des répliques synchronisé est contrôlée par la propriété : <text:span text:style-name="T31">replica.lag.time.max.ms</text:span> (défaut 30s)</text:p>
              </text:list-item>
              <text:list-item>
                <text:p>Si pendant ce délai, le follower</text:p>
                <text:list>
                  <text:list-item>
                    <text:p>N’envoie pas de requêtes fetch </text:p>
                  </text:list-item>
                  <text:list-item>
                    <text:p>N’atteint pas l’offset de fin du leader</text:p>
                  </text:list-item>
                </text:list>
              </text:list-item>
              <text:list-item>
                <text:p>Alors, le follower est considéré comme désynchronisé</text:p>
                <text:list>
                  <text:list-item>
                    <text:p text:style-name="P36">Il est supprimé de la liste des <text:span text:style-name="T38">ISR</text:span><text:span text:style-name="T83"> </text:span><text:span text:style-name="T38">(In Sync </text:span><text:span text:style-name="T38">Replica)</text:span></text:p>
                  </text:list-item>
                  <text:list-item>
                    <text:p text:style-name="P36">Il peut ensuite rattraper son retard et être réintégré aux ISRs</text:p>
                  </text:list-item>
                </text:list>
              </text:list-item>
              <text:list-item>
                <text:p><text:span text:style-name="T14"/></text:p>
              </text:list-item>
              <text:list-item>
                <text:p><text:span text:style-name="T14">kafka-topics.sh --describe</text:span> : permet de voir les ISR pour chaque partition d’un topic</text:p>
              </text:list-item>
            </text:list>
          </draw:text-box>
        </draw:frame>
        <presentation:notes draw:style-name="dp5">
          <draw:page-thumbnail draw:style-name="gr2" draw:layer="layout" svg:width="15.597cm" svg:height="10.985cm" svg:x="2.623cm" svg:y="2.258cm" draw:page-number="86" presentation:class="page"/>
          <draw:frame presentation:style-name="pr6" draw:text-style-name="P18" draw:layer="layout" svg:width="14.362cm" svg:height="11.254cm" svg:x="3.25cm" svg:y="14.128cm" presentation:class="notes" presentation:placeholder="true">
            <draw:text-box/>
          </draw:frame>
        </presentation:notes>
      </draw:page>
      <draw:page draw:name="page87" draw:style-name="dp3" draw:master-page-name="Standard" presentation:presentation-page-layout-name="AL3T1">
        <draw:frame presentation:style-name="pr9" draw:layer="layout" svg:width="23.499cm" svg:height="3.575cm" svg:x="3.033cm" svg:y="2.367cm" presentation:class="title">
          <draw:text-box>
            <text:p text:style-name="P22"><text:span text:style-name="T14">min.insync.replica</text:span></text:p>
          </draw:text-box>
        </draw:frame>
        <draw:frame presentation:style-name="pr5" draw:layer="layout" svg:width="23.499cm" svg:height="12.18cm" svg:x="3.033cm" svg:y="6.283cm" presentation:class="outline">
          <draw:text-box>
            <text:list text:style-name="L2">
              <text:list-item>
                <text:p>La propriété <text:span text:style-name="T31">min.insync.replica,</text:span> spécifiée au niveau cluster ou topic, indique le minimum de répliques de l’ISR (incluant le leader) qui doivent avoir écrit un message afin que celui-ci soit considéré comme validé</text:p>
                <text:list>
                  <text:list-item>
                    <text:p>A la réception d’un message, le leader vérifie si il y a assez d’ISR pour écrire le message, sinon il envoie une <text:span text:style-name="T14">NotEnoughReplicasEx</text:span><text:span text:style-name="T14">ception</text:span></text:p>
                    <text:p/>
                  </text:list-item>
                </text:list>
              </text:list-item>
            </text:list>
          </draw:text-box>
        </draw:frame>
        <presentation:notes draw:style-name="dp5">
          <draw:page-thumbnail draw:style-name="gr2" draw:layer="layout" svg:width="15.597cm" svg:height="10.985cm" svg:x="2.623cm" svg:y="2.258cm" draw:page-number="87" presentation:class="page"/>
          <draw:frame presentation:style-name="pr6" draw:text-style-name="P13" draw:layer="layout" svg:width="14.362cm" svg:height="11.254cm" svg:x="3.25cm" svg:y="14.128cm" presentation:class="notes" presentation:placeholder="true">
            <draw:text-box/>
          </draw:frame>
        </presentation:notes>
      </draw:page>
      <draw:page draw:name="page88" draw:style-name="dp3" draw:master-page-name="Standard" presentation:presentation-page-layout-name="AL3T1">
        <draw:frame presentation:style-name="pr9" draw:layer="layout" svg:width="23.499cm" svg:height="3.575cm" svg:x="3.033cm" svg:y="2.367cm" presentation:class="title">
          <draw:text-box>
            <text:p>Conséquences</text:p>
          </draw:text-box>
        </draw:frame>
        <draw:frame presentation:style-name="pr5" draw:layer="layout" svg:width="23.499cm" svg:height="12.18cm" svg:x="3.033cm" svg:y="6.283cm" presentation:class="outline">
          <draw:text-box>
            <text:list text:style-name="L2">
              <text:list-item>
                <text:p>Un réplique synchronisée légèrement en retard peut ralentir l’acquittement du message ; ce qui peut ralentir le débit.</text:p>
              </text:list-item>
              <text:list-item>
                <text:p/>
              </text:list-item>
              <text:list-item>
                <text:p>Une réplique désynchronisée n'a plus d'impact sur les performances mais augmente le risque d’un temps d'arrêt ou d’une perte de données.</text:p>
              </text:list-item>
            </text:list>
          </draw:text-box>
        </draw:frame>
        <presentation:notes draw:style-name="dp5">
          <draw:page-thumbnail draw:style-name="gr2" draw:layer="layout" svg:width="15.597cm" svg:height="10.985cm" svg:x="2.623cm" svg:y="2.258cm" draw:page-number="88" presentation:class="page"/>
          <draw:frame presentation:style-name="pr6" draw:text-style-name="P18" draw:layer="layout" svg:width="14.362cm" svg:height="11.254cm" svg:x="3.25cm" svg:y="14.128cm" presentation:class="notes" presentation:placeholder="true">
            <draw:text-box/>
          </draw:frame>
        </presentation:notes>
      </draw:page>
      <draw:page draw:name="page89" draw:style-name="dp3" draw:master-page-name="Standard" presentation:presentation-page-layout-name="AL3T1">
        <draw:frame presentation:style-name="pr9" draw:layer="layout" svg:width="23.499cm" svg:height="3.575cm" svg:x="3.033cm" svg:y="2.367cm" presentation:class="title">
          <draw:text-box>
            <text:p>Rejet de demande d’émission</text:p>
          </draw:text-box>
        </draw:frame>
        <draw:frame presentation:style-name="pr5" draw:text-style-name="P37" draw:layer="layout" svg:width="23.499cm" svg:height="12.18cm" svg:x="3.033cm" svg:y="6.283cm" presentation:class="outline">
          <draw:text-box>
            <text:list text:style-name="L2">
              <text:list-item>
                <text:p><text:span text:style-name="T84">Si le </text:span><text:span text:style-name="T85">nombre de ISR &lt; </text:span><text:span text:style-name="T86">min.insync.replicas</text:span><text:span text:style-name="T84"> :</text:span></text:p>
                <text:list>
                  <text:list-item>
                    <text:p><text:span text:style-name="T87">Kafka empêche </text:span><text:span text:style-name="T87">l’acquittement du </text:span><text:span text:style-name="T87">message. </text:span><text:span text:style-name="T87"><text:line-break/></text:span><text:span text:style-name="T87">En fonction de la </text:span><text:span text:style-name="T87">configuration du </text:span><text:span text:style-name="T87">producteur, celui-ci peut </text:span><text:span text:style-name="T87">être bloqué.</text:span></text:p>
                    <text:p><text:span text:style-name="T88"/></text:p>
                  </text:list-item>
                </text:list>
              </text:list-item>
              <text:list-item>
                <text:p><text:span text:style-name="T84">Si le</text:span><text:span text:style-name="T85"> nombre de répliques </text:span><text:span text:style-name="T85">disponible &lt; </text:span><text:span text:style-name="T86">min.insync.replicas</text:span></text:p>
                <text:list>
                  <text:list-item>
                    <text:p><text:span text:style-name="T87">Mauvaise configuration, </text:span><text:span text:style-name="T87">Kafka bloque les </text:span><text:span text:style-name="T87">émissions de message</text:span></text:p>
                  </text:list-item>
                </text:list>
                <text:p><text:span text:style-name="T89"/></text:p>
              </text:list-item>
              <text:list-item>
                <text:p><text:span text:style-name="T89">En conséquences :</text:span></text:p>
              </text:list-item>
              <text:list-item>
                <text:p><text:span text:style-name="T84">n répliques </text:span><text:span text:style-name="T84"><text:line-break/></text:span><text:span text:style-name="T84">=&gt; tolère </text:span><text:span text:style-name="T90">n-1</text:span><text:span text:style-name="T84"> failures pour que </text:span><text:span text:style-name="T84">la partition soit disponible à la </text:span><text:span text:style-name="T84">consommation </text:span></text:p>
              </text:list-item>
              <text:list-item>
                <text:p><text:span text:style-name="T84"/></text:p>
              </text:list-item>
              <text:list-item>
                <text:p><text:span text:style-name="T91">n répliques,</text:span><text:span text:style-name="T92"> min.insync.replicas =m </text:span><text:span text:style-name="T93"><text:line-break/></text:span><text:span text:style-name="T93">=&gt; Tolère </text:span><text:span text:style-name="T92">n-m</text:span><text:span text:style-name="T93"> <text:s/></text:span><text:span text:style-name="T84">failures pour </text:span><text:span text:style-name="T84">accepter les envois </text:span></text:p>
              </text:list-item>
            </text:list>
          </draw:text-box>
        </draw:frame>
        <presentation:notes draw:style-name="dp5">
          <draw:page-thumbnail draw:style-name="gr2" draw:layer="layout" svg:width="15.597cm" svg:height="10.985cm" svg:x="2.623cm" svg:y="2.258cm" draw:page-number="89" presentation:class="page"/>
          <draw:frame presentation:style-name="pr6" draw:text-style-name="P18" draw:layer="layout" svg:width="14.362cm" svg:height="11.254cm" svg:x="3.25cm" svg:y="14.128cm" presentation:class="notes" presentation:placeholder="true">
            <draw:text-box/>
          </draw:frame>
        </presentation:notes>
      </draw:page>
      <draw:page draw:name="page90" draw:style-name="dp3" draw:master-page-name="Standard" presentation:presentation-page-layout-name="AL3T1">
        <draw:frame presentation:style-name="pr11" draw:layer="layout" svg:width="23.499cm" svg:height="3.577cm" svg:x="3.033cm" svg:y="2.366cm" presentation:class="title">
          <draw:text-box>
            <text:p>Contrôle de l’acquittement par le client</text:p>
          </draw:text-box>
        </draw:frame>
        <draw:frame presentation:style-name="pr5" draw:layer="layout" svg:width="23.499cm" svg:height="12.18cm" svg:x="3.033cm" svg:y="6.283cm" presentation:class="outline" presentation:user-transformed="true">
          <draw:text-box>
            <text:list text:style-name="L2">
              <text:list-item>
                <text:p>Le producteur de message peut contrôler quand l’acquittement d’écriture est envoyé par le leader via la propriété ack :</text:p>
                <text:list>
                  <text:list-item>
                    <text:p><text:span text:style-name="T31">acks=0</text:span> : On n’attend pas l’acquittement du broker. Perte de messages pas important</text:p>
                  </text:list-item>
                  <text:list-item>
                    <text:p><text:span text:style-name="T77">acks=1</text:span><text:span text:style-name="T5"> : Le producteur </text:span><text:span text:style-name="T5">considère le message </text:span><text:span text:style-name="T5">écrit lorsque le leader </text:span><text:span text:style-name="T5">a acquitté l’écriture. </text:span><text:span text:style-name="T5">Perte de messages </text:span><text:span text:style-name="T5">possibles mais risque </text:span><text:span text:style-name="T5">réduit</text:span></text:p>
                  </text:list-item>
                  <text:list-item>
                    <text:p><text:span text:style-name="T86">acks=all</text:span><text:span text:style-name="T4"> (défaut): Le </text:span><text:span text:style-name="T4">producteur considère </text:span><text:span text:style-name="T4">le message comme </text:span><text:span text:style-name="T4">écrit lorsque il a été </text:span><text:span text:style-name="T4">répliqué par </text:span><text:span text:style-name="T94">min.insync.replica</text:span><text:span text:style-name="T4"> des </text:span><text:span text:style-name="T4">ISR.</text:span><text:span text:style-name="T4"><text:line-break/></text:span><text:span text:style-name="T4">=&gt; Assure le </text:span><text:span text:style-name="T4">maximum de </text:span><text:span text:style-name="T4">durabilité du message</text:span></text:p>
                  </text:list-item>
                </text:list>
              </text:list-item>
            </text:list>
          </draw:text-box>
        </draw:frame>
        <presentation:notes draw:style-name="dp5">
          <draw:page-thumbnail draw:style-name="gr2" draw:layer="layout" svg:width="15.597cm" svg:height="10.985cm" svg:x="2.623cm" svg:y="2.258cm" draw:page-number="90" presentation:class="page"/>
          <draw:frame presentation:style-name="pr6" draw:text-style-name="P13" draw:layer="layout" svg:width="14.362cm" svg:height="11.254cm" svg:x="3.25cm" svg:y="14.128cm" presentation:class="notes" presentation:placeholder="true">
            <draw:text-box/>
          </draw:frame>
        </presentation:notes>
      </draw:page>
      <draw:page draw:name="page91" draw:style-name="dp3" draw:master-page-name="Standard" presentation:presentation-page-layout-name="AL3T1">
        <draw:frame presentation:style-name="pr9" draw:layer="layout" svg:width="23.499cm" svg:height="3.575cm" svg:x="3.033cm" svg:y="2.367cm" presentation:class="title">
          <draw:text-box>
            <text:p>Acks : 0, 1, all</text:p>
          </draw:text-box>
        </draw:frame>
        <draw:frame presentation:style-name="pr5" draw:layer="layout" svg:width="23.499cm" svg:height="12.18cm" svg:x="3.033cm" svg:y="6.283cm" presentation:class="outline" presentation:user-transformed="true">
          <draw:text-box>
            <text:list text:style-name="L2">
              <text:list-item>
                <text:p/>
              </text:list-item>
              <text:list-item>
                <text:p/>
              </text:list-item>
              <text:list-item>
                <text:p/>
              </text:list-item>
            </text:list>
          </draw:text-box>
        </draw:frame>
        <draw:frame draw:style-name="gr6" draw:text-style-name="P21" draw:layer="layout" svg:width="25.101cm" svg:height="2.359cm" svg:x="1.732cm" svg:y="6.456cm">
          <draw:image xlink:href="Pictures/10000001000005270000007C23643E04.png" xlink:type="simple" xlink:show="embed" xlink:actuate="onLoad" draw:mime-type="image/png">
            <text:p/>
          </draw:image>
        </draw:frame>
        <draw:frame draw:style-name="gr6" draw:text-style-name="P21" draw:layer="layout" svg:width="26.572cm" svg:height="2.327cm" svg:x="1.697cm" svg:y="8.764cm">
          <draw:image xlink:href="Pictures/10000001000005870000007C39CFC6ED.png" xlink:type="simple" xlink:show="embed" xlink:actuate="onLoad" draw:mime-type="image/png">
            <text:p/>
          </draw:image>
        </draw:frame>
        <draw:frame draw:style-name="gr6" draw:text-style-name="P21" draw:layer="layout" svg:width="18.5cm" svg:height="9.308cm" svg:x="4.604cm" svg:y="11.71cm">
          <draw:image xlink:href="Pictures/10000001000004EC0000027A89CF54CB.png" xlink:type="simple" xlink:show="embed" xlink:actuate="onLoad" draw:mime-type="image/png">
            <text:p/>
          </draw:image>
        </draw:frame>
        <presentation:notes draw:style-name="dp5">
          <draw:page-thumbnail draw:style-name="gr2" draw:layer="layout" svg:width="15.597cm" svg:height="10.985cm" svg:x="2.623cm" svg:y="2.258cm" draw:page-number="91" presentation:class="page"/>
          <draw:frame presentation:style-name="pr6" draw:text-style-name="P13" draw:layer="layout" svg:width="14.362cm" svg:height="11.254cm" svg:x="3.25cm" svg:y="14.128cm" presentation:class="notes" presentation:placeholder="true">
            <draw:text-box/>
          </draw:frame>
        </presentation:notes>
      </draw:page>
      <draw:page draw:name="page92" draw:style-name="dp3" draw:master-page-name="Standard" presentation:presentation-page-layout-name="AL3T1">
        <draw:frame presentation:style-name="pr9" draw:layer="layout" svg:width="23.499cm" svg:height="3.575cm" svg:x="3.033cm" svg:y="2.366cm" presentation:class="title" presentation:user-transformed="true">
          <draw:text-box>
            <text:p><text:span text:style-name="T24">Configuration des producteurs </text:span><text:span text:style-name="T24"><text:line-break/></text:span><text:span text:style-name="T95">fiabilité</text:span></text:p>
          </draw:text-box>
        </draw:frame>
        <draw:frame presentation:style-name="pr5" draw:layer="layout" svg:width="23.499cm" svg:height="12.18cm" svg:x="3.033cm" svg:y="6.283cm" presentation:class="outline" presentation:user-transformed="true">
          <draw:text-box>
            <text:list text:style-name="L2">
              <text:list-item>
                <text:p>D’autre paramètres jouent sur la fiabilité du producteur de message :</text:p>
                <text:list>
                  <text:list-item>
                    <text:p><text:span text:style-name="T32">retries : </text:span>Si l’erreur renvoyée est de type <text:span text:style-name="T14">Retriable</text:span>, le nombre de tentative de renvoi.<text:line-break/>Par défaut : MAX_LONG <text:line-break/>Si &gt; 0 possibilité d’envoi en doublon</text:p>
                  </text:list-item>
                  <text:list-item>
                    <text:p text:style-name="P38"><text:span text:style-name="T32">max.in.flight.request</text:span><text:span text:style-name="T32">s.per.connection</text:span> : Maximum de message en cours de transmission (sans réponse obtenu) </text:p>
                  </text:list-item>
                  <text:list-item>
                    <text:p><text:span text:style-name="T32">enable.idempotence</text:span> : Livraison unique de message</text:p>
                  </text:list-item>
                  <text:list-item>
                    <text:p><text:span text:style-name="T31">transactional.id : </text:span>Mode<text:span text:style-name="T31"> </text:span>transactionnel</text:p>
                  </text:list-item>
                </text:list>
              </text:list-item>
              <text:list-item>
                <text:p/>
              </text:list-item>
            </text:list>
          </draw:text-box>
        </draw:frame>
        <presentation:notes draw:style-name="dp8">
          <draw:page-thumbnail draw:style-name="gr2" draw:layer="layout" svg:width="15.597cm" svg:height="10.985cm" svg:x="2.623cm" svg:y="2.258cm" draw:page-number="92" presentation:class="page"/>
          <draw:frame presentation:style-name="pr6" draw:text-style-name="P13" draw:layer="layout" svg:width="14.362cm" svg:height="11.254cm" svg:x="3.25cm" svg:y="14.128cm" presentation:class="notes" presentation:placeholder="true">
            <draw:text-box/>
          </draw:frame>
        </presentation:notes>
      </draw:page>
      <draw:page draw:name="page93" draw:style-name="dp3" draw:master-page-name="Standard" presentation:presentation-page-layout-name="AL3T1">
        <draw:frame presentation:style-name="pr9" draw:layer="layout" svg:width="23.499cm" svg:height="3.575cm" svg:x="3.033cm" svg:y="2.366cm" presentation:class="title" presentation:user-transformed="true">
          <draw:text-box>
            <text:p><text:span text:style-name="T24">Configuration des producteurs </text:span><text:span text:style-name="T24"><text:line-break/></text:span><text:span text:style-name="T95">performance</text:span></text:p>
          </draw:text-box>
        </draw:frame>
        <draw:frame presentation:style-name="pr5" draw:layer="layout" svg:width="23.499cm" svg:height="12.18cm" svg:x="3.033cm" svg:y="6.283cm" presentation:class="outline" presentation:user-transformed="true">
          <draw:text-box>
            <text:list text:style-name="L2">
              <text:list-item>
                <text:p><text:span text:style-name="T39">D’autre paramètres jouent </text:span><text:span text:style-name="T39">sur la performance et en </text:span><text:span text:style-name="T39">particulier le débit de </text:span><text:span text:style-name="T39">messages :</text:span></text:p>
                <text:list>
                  <text:list-item>
                    <text:p><text:span text:style-name="T32">batch.size</text:span> : La taille du batch en mémoire pour envoyer les messages. Défaut 16ko</text:p>
                  </text:list-item>
                  <text:list-item>
                    <text:p><text:span text:style-name="T32">linger.ms</text:span> : la durée d'attente de messages supplémentaires avant d'envoyer le batch courant. Défaut 0ms</text:p>
                  </text:list-item>
                  <text:list-item>
                    <text:p><text:span text:style-name="T32">buffer.memory</text:span> : Taille buffer pour stocker les messages que l’on ne peut pas envoyé. Défaut 32Mo</text:p>
                  </text:list-item>
                  <text:list-item>
                    <text:p><text:span text:style-name="T32">compression.type</text:span> : Par défaut, les messages ne sont pas compressés. Valeurs possibles : <text:span text:style-name="T14">snappy</text:span> , <text:span text:style-name="T14">gzip</text:span> , ou <text:span text:style-name="T14">lz4</text:span></text:p>
                  </text:list-item>
                  <text:list-item>
                    <text:p text:style-name="P38"><text:span text:style-name="T32">request.timeout.ms</text:span><text:span text:style-name="T47">, </text:span><text:span text:style-name="T32">metadata.fetch.tim</text:span><text:span text:style-name="T32">eout.ms</text:span><text:span text:style-name="T47"> et </text:span><text:span text:style-name="T32">timeout.ms</text:span><text:span text:style-name="T14">: </text:span><text:span text:style-name="T14">Timeouts pour la </text:span><text:span text:style-name="T14">réception d’une </text:span><text:span text:style-name="T14">réponse à un </text:span><text:span text:style-name="T14">message, pour </text:span><text:span text:style-name="T14">obtenir des méta-</text:span><text:span text:style-name="T14">données (leader, </text:span><text:span text:style-name="T14">etc..) pour obtenir le </text:span><text:span text:style-name="T14">ack des répliques.</text:span></text:p>
                  </text:list-item>
                  <text:list-item>
                    <text:p text:style-name="P38"><text:span text:style-name="T32">max.block.ms</text:span><text:span text:style-name="T14"> : Temps </text:span><text:span text:style-name="T14">maximum d’attente </text:span><text:span text:style-name="T14">pour la méthode </text:span><text:span text:style-name="T14">send(). Dans le cas </text:span><text:span text:style-name="T14">ou le buffer est </text:span><text:span text:style-name="T14">rempli</text:span></text:p>
                  </text:list-item>
                  <text:list-item>
                    <text:p text:style-name="P38"><text:span text:style-name="T32">max.request.size</text:span><text:span text:style-name="T14"> : </text:span><text:span text:style-name="T14">Taille max d’un </text:span><text:span text:style-name="T14">message</text:span></text:p>
                  </text:list-item>
                  <text:list-item>
                    <text:p text:style-name="P38"><text:span text:style-name="T32">receive.buffer.bytes</text:span><text:span text:style-name="T14"> </text:span><text:span text:style-name="T14">et </text:span><text:span text:style-name="T32">send.buffer.bytes</text:span><text:span text:style-name="T14">: </text:span><text:span text:style-name="T14">Taille des buffers TCP</text:span></text:p>
                  </text:list-item>
                </text:list>
              </text:list-item>
            </text:list>
          </draw:text-box>
        </draw:frame>
        <draw:frame draw:style-name="gr20" draw:text-style-name="P34" draw:layer="layout" svg:width="14.684cm" svg:height="1.216cm" svg:x="1.603cm" svg:y="19.4cm">
          <draw:text-box>
            <text:p><text:span text:style-name="T73">Atelier 2 : Production de messages</text:span></text:p>
          </draw:text-box>
        </draw:frame>
        <presentation:notes draw:style-name="dp8">
          <draw:page-thumbnail draw:style-name="gr2" draw:layer="layout" svg:width="15.597cm" svg:height="10.985cm" svg:x="2.623cm" svg:y="2.258cm" draw:page-number="93" presentation:class="page"/>
          <draw:frame presentation:style-name="pr6" draw:text-style-name="P13" draw:layer="layout" svg:width="14.362cm" svg:height="11.254cm" svg:x="3.25cm" svg:y="14.128cm" presentation:class="notes" presentation:placeholder="true">
            <draw:text-box/>
          </draw:frame>
        </presentation:notes>
      </draw:page>
      <draw:page draw:name="page94"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Clients</text:span></text:p>
              </text:list-header>
            </text:list>
          </draw:text-box>
        </draw:frame>
        <draw:frame presentation:style-name="pr20"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19"><text:span text:style-name="T2">Types de clients</text:span></text:p>
              </text:list-item>
              <text:list-item>
                <text:p text:style-name="P19"><text:span text:style-name="T2">Production</text:span><text:span text:style-name="T12"> </text:span><text:span text:style-name="T2">de</text:span><text:span text:style-name="T12"> </text:span><text:span text:style-name="T2">messages</text:span></text:p>
              </text:list-item>
              <text:list-item>
                <text:p text:style-name="P19"><text:span text:style-name="T12">Consommation de messages</text:span></text:p>
              </text:list-item>
              <text:list-item>
                <text:p text:style-name="P28"><text:span text:style-name="T2">Garanties Kafka</text:span></text:p>
              </text:list-item>
              <text:list-item>
                <text:p text:style-name="P28"><text:span text:style-name="T2">Schema registry</text:span></text:p>
              </text:list-item>
              <text:list-item>
                <text:p text:style-name="P19"><text:span text:style-name="T2">Kafka Connect</text:span></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95" draw:style-name="dp3" draw:master-page-name="Standard" presentation:presentation-page-layout-name="AL3T1">
        <draw:frame presentation:style-name="pr9" draw:layer="layout" svg:width="23.499cm" svg:height="3.575cm" svg:x="3.033cm" svg:y="2.367cm" presentation:class="title">
          <draw:text-box>
            <text:p>Groupes de consommateurs</text:p>
          </draw:text-box>
        </draw:frame>
        <draw:frame presentation:style-name="pr5" draw:layer="layout" svg:width="23.499cm" svg:height="12.18cm" svg:x="3.033cm" svg:y="6.283cm" presentation:class="outline">
          <draw:text-box>
            <text:list text:style-name="L2">
              <text:list-item>
                <text:p><text:span text:style-name="T5">Les consommateurs font partie </text:span><text:span text:style-name="T5">d'un </text:span><text:span text:style-name="T96">groupe de </text:span><text:span text:style-name="T96">consommateurs</text:span><text:span text:style-name="T5">.</text:span></text:p>
                <text:list>
                  <text:list-item>
                    <text:p><text:span text:style-name="T5">Chaque consommateur </text:span><text:span text:style-name="T5">d’un groupe reçoit les </text:span><text:span text:style-name="T5">messages d'un sous-</text:span><text:span text:style-name="T5">ensemble différent </text:span><text:span text:style-name="T5">des partitions du </text:span><text:span text:style-name="T5">topic.</text:span></text:p>
                  </text:list-item>
                </text:list>
              </text:list-item>
            </text:list>
          </draw:text-box>
        </draw:frame>
        <draw:frame draw:style-name="gr9" draw:text-style-name="P23" draw:layer="layout" svg:width="7.631cm" svg:height="5.385cm" svg:x="0.569cm" svg:y="14.8cm">
          <draw:image xlink:href="Pictures/10000001000002C6000001F5A5AA6B72.png" xlink:type="simple" xlink:show="embed" xlink:actuate="onLoad" draw:mime-type="image/png">
            <text:p/>
          </draw:image>
        </draw:frame>
        <draw:frame draw:style-name="gr9" draw:text-style-name="P23" draw:layer="layout" svg:width="7.652cm" svg:height="5.4cm" svg:x="8.8cm" svg:y="14.8cm">
          <draw:image xlink:href="Pictures/10000001000002C6000001F577A322C2.png" xlink:type="simple" xlink:show="embed" xlink:actuate="onLoad" draw:mime-type="image/png">
            <text:p/>
          </draw:image>
        </draw:frame>
        <draw:frame draw:style-name="gr9" draw:text-style-name="P23" draw:layer="layout" svg:width="7.526cm" svg:height="6.254cm" svg:x="18.2cm" svg:y="14.8cm">
          <draw:image xlink:href="Pictures/10000001000002C60000024EE140356B.png" xlink:type="simple" xlink:show="embed" xlink:actuate="onLoad" draw:mime-type="image/png">
            <text:p/>
          </draw:image>
        </draw:frame>
        <presentation:notes draw:style-name="dp2">
          <draw:page-thumbnail draw:style-name="gr2" draw:layer="layout" svg:width="15.597cm" svg:height="10.985cm" svg:x="2.623cm" svg:y="2.258cm" draw:page-number="95" presentation:class="page"/>
          <draw:frame presentation:style-name="pr6" draw:text-style-name="P13" draw:layer="layout" svg:width="14.362cm" svg:height="11.254cm" svg:x="3.25cm" svg:y="14.128cm" presentation:class="notes" presentation:placeholder="true">
            <draw:text-box/>
          </draw:frame>
        </presentation:notes>
      </draw:page>
      <draw:page draw:name="page96" draw:style-name="dp3" draw:master-page-name="Standard" presentation:presentation-page-layout-name="AL3T1">
        <draw:frame presentation:style-name="pr9" draw:layer="layout" svg:width="23.499cm" svg:height="3.575cm" svg:x="3.033cm" svg:y="2.367cm" presentation:class="title">
          <draw:text-box>
            <text:p>Configuration Consommateur</text:p>
          </draw:text-box>
        </draw:frame>
        <draw:frame presentation:style-name="pr5" draw:layer="layout" svg:width="23.499cm" svg:height="12.18cm" svg:x="3.033cm" svg:y="6.283cm" presentation:class="outline">
          <draw:text-box>
            <text:list text:style-name="L2">
              <text:list-item>
                <text:p>En dehors de <text:span text:style-name="T14">bootstrap.servers, </text:span><text:span text:style-name="T21">le </text:span><text:span text:style-name="T21">consommateur configure </text:span></text:p>
                <text:list>
                  <text:list-item>
                    <text:p><text:span text:style-name="T31">group.id</text:span> qui spécifie le groupe de consommateur</text:p>
                  </text:list-item>
                  <text:list-item>
                    <text:p text:style-name="P38"><text:span text:style-name="T31">key.deserializer</text:span> et <text:span text:style-name="T31">value.deserializer</text:span><text:span text:style-name="T14"> </text:span><text:span text:style-name="T21">qui permettent de </text:span><text:span text:style-name="T21">transformer le </text:span><text:span text:style-name="T21">message en objet</text:span></text:p>
                  </text:list-item>
                </text:list>
              </text:list-item>
            </text:list>
          </draw:text-box>
        </draw:frame>
        <presentation:notes draw:style-name="dp8">
          <draw:page-thumbnail draw:style-name="gr2" draw:layer="layout" svg:width="15.597cm" svg:height="10.985cm" svg:x="2.623cm" svg:y="2.258cm" draw:page-number="96" presentation:class="page"/>
          <draw:frame presentation:style-name="pr6" draw:text-style-name="P18" draw:layer="layout" svg:width="14.362cm" svg:height="11.254cm" svg:x="3.25cm" svg:y="14.128cm" presentation:class="notes" presentation:placeholder="true">
            <draw:text-box/>
          </draw:frame>
        </presentation:notes>
      </draw:page>
      <draw:page draw:name="page97" draw:style-name="dp3" draw:master-page-name="Standard" presentation:presentation-page-layout-name="AL3T1">
        <draw:frame presentation:style-name="pr11" draw:layer="layout" svg:width="23.499cm" svg:height="3.577cm" svg:x="3.033cm" svg:y="2.366cm" presentation:class="title">
          <draw:text-box>
            <text:p>Rééquilibrage dynamique des consommateurs</text:p>
          </draw:text-box>
        </draw:frame>
        <draw:frame presentation:style-name="pr5" draw:layer="layout" svg:width="23.499cm" svg:height="12.18cm" svg:x="3.033cm" svg:y="6.283cm" presentation:class="outline" presentation:user-transformed="true">
          <draw:text-box>
            <text:list text:style-name="L2">
              <text:list-item>
                <text:p>Lors de l’ajout d’un nouveau consommateur, celui-ci peut se faire affecter une partition consommée précédemment par un autre consommateur du groupe.</text:p>
              </text:list-item>
              <text:list-item>
                <text:p>Lors de l’arrêt d’un consommateur, la partition qui lui était assignée est réaffectée à un autre consommateur</text:p>
              </text:list-item>
              <text:list-item>
                <text:p>Cette répartition dynamique offre la scalabilité et la tolérance aux défaillances mais n’est pas spécialement désirable </text:p>
                <text:list>
                  <text:list-item>
                    <text:p>car durant le rééquilibrage les messages ne sont pas consommés</text:p>
                  </text:list-item>
                  <text:list-item>
                    <text:p>les consommateurs si ils utilisent des caches sont obligés de les rafraîchir</text:p>
                  </text:list-item>
                </text:list>
              </text:list-item>
            </text:list>
          </draw:text-box>
        </draw:frame>
        <presentation:notes draw:style-name="dp2">
          <draw:page-thumbnail draw:style-name="gr2" draw:layer="layout" svg:width="15.597cm" svg:height="10.985cm" svg:x="2.623cm" svg:y="2.258cm" draw:page-number="97" presentation:class="page"/>
          <draw:frame presentation:style-name="pr6" draw:text-style-name="P13" draw:layer="layout" svg:width="14.362cm" svg:height="11.254cm" svg:x="3.25cm" svg:y="14.128cm" presentation:class="notes" presentation:placeholder="true">
            <draw:text-box/>
          </draw:frame>
        </presentation:notes>
      </draw:page>
      <draw:page draw:name="page98" draw:style-name="dp3" draw:master-page-name="Standard" presentation:presentation-page-layout-name="AL3T1">
        <draw:frame presentation:style-name="pr11" draw:layer="layout" svg:width="23.499cm" svg:height="3.577cm" svg:x="3.033cm" svg:y="2.366cm" presentation:class="title">
          <draw:text-box>
            <text:p>Membership et détection de pannes</text:p>
          </draw:text-box>
        </draw:frame>
        <draw:frame presentation:style-name="pr5" draw:layer="layout" svg:width="23.499cm" svg:height="12.18cm" svg:x="3.033cm" svg:y="6.283cm" presentation:class="outline" presentation:user-transformed="true">
          <draw:text-box>
            <text:list text:style-name="L2">
              <text:list-item>
                <text:p>Les consommateurs maintiennent leur appartenance à un groupe et leurs attributions de partitions en envoyant régulièrement des <text:span text:style-name="T14">heartbeat</text:span> à un broker coordinateur (qui peut être différent en fonction des groupes).<text:line-break/></text:p>
              </text:list-item>
              <text:list-item>
                <text:p><text:span text:style-name="T67">kafka-consumer-groups.sh --</text:span><text:span text:style-name="T67">bootstrap-server </text:span><text:span text:style-name="T67">localhost:9092 --group </text:span><text:span text:style-name="T67">sample --describe --state</text:span></text:p>
              </text:list-item>
              <text:list-item>
                <text:p/>
              </text:list-item>
              <text:list-item>
                <text:p>La période de heartbeat est fixé par <text:span text:style-name="T50">heartbeat.interval.ms</text:span> (par défaut 3s)</text:p>
              </text:list-item>
              <text:list-item>
                <text:p>Si un consommateur cesse d'envoyer des <text:span text:style-name="T14">heartbeats</text:span>, sa session expire et le coordinateur démarre une réaffectation des partitions</text:p>
              </text:list-item>
            </text:list>
          </draw:text-box>
        </draw:frame>
        <presentation:notes draw:style-name="dp2">
          <draw:page-thumbnail draw:style-name="gr2" draw:layer="layout" svg:width="15.597cm" svg:height="10.985cm" svg:x="2.623cm" svg:y="2.258cm" draw:page-number="98" presentation:class="page"/>
          <draw:frame presentation:style-name="pr6" draw:text-style-name="P18" draw:layer="layout" svg:width="14.362cm" svg:height="11.254cm" svg:x="3.25cm" svg:y="14.128cm" presentation:class="notes" presentation:placeholder="true">
            <draw:text-box/>
          </draw:frame>
        </presentation:notes>
      </draw:page>
      <draw:page draw:name="page99" draw:style-name="dp3" draw:master-page-name="Standard" presentation:presentation-page-layout-name="AL3T1">
        <draw:frame presentation:style-name="pr11" draw:layer="layout" svg:width="23.499cm" svg:height="3.577cm" svg:x="3.033cm" svg:y="2.366cm" presentation:class="title">
          <draw:text-box>
            <text:p>Affectation statique des partitions</text:p>
          </draw:text-box>
        </draw:frame>
        <draw:frame presentation:style-name="pr5" draw:layer="layout" svg:width="23.499cm" svg:height="12.18cm" svg:x="3.033cm" svg:y="6.283cm" presentation:class="outline">
          <draw:text-box>
            <text:list text:style-name="L2">
              <text:list-item>
                <text:p>Si une instance de consommateur précise un identifiant d’instance via la propriété <text:span text:style-name="T31">group.instance.id</text:span>, les mêmes partitions lui seront affectés lors des arrêts / redémarrages rapides</text:p>
                <text:list>
                  <text:list-item>
                    <text:p>La réaffectation de partition ne s’effectuera que lorsque le timeout <text:span text:style-name="T31">session.timeout.ms</text:span> aura expiré (45s par défaut)</text:p>
                  </text:list-item>
                </text:list>
              </text:list-item>
            </text:list>
          </draw:text-box>
        </draw:frame>
        <presentation:notes draw:style-name="dp2">
          <draw:page-thumbnail draw:style-name="gr2" draw:layer="layout" svg:width="15.597cm" svg:height="10.985cm" svg:x="2.623cm" svg:y="2.258cm" draw:page-number="99" presentation:class="page"/>
          <draw:frame presentation:style-name="pr6" draw:text-style-name="P13" draw:layer="layout" svg:width="14.362cm" svg:height="11.254cm" svg:x="3.25cm" svg:y="14.128cm" presentation:class="notes" presentation:placeholder="true">
            <draw:text-box/>
          </draw:frame>
        </presentation:notes>
      </draw:page>
      <draw:page draw:name="page100" draw:style-name="dp3" draw:master-page-name="Standard" presentation:presentation-page-layout-name="AL3T1">
        <draw:frame presentation:style-name="pr9" draw:layer="layout" svg:width="23.499cm" svg:height="3.575cm" svg:x="3.033cm" svg:y="2.367cm" presentation:class="title">
          <draw:text-box>
            <text:p>Boucle de Polling</text:p>
          </draw:text-box>
        </draw:frame>
        <draw:frame presentation:style-name="pr5" draw:layer="layout" svg:width="23.499cm" svg:height="12.18cm" svg:x="3.033cm" svg:y="6.283cm" presentation:class="outline" presentation:user-transformed="true">
          <draw:text-box>
            <text:list text:style-name="L2">
              <text:list-item>
                <text:p>Typiquement, les consommateurs <text:span text:style-name="T14">poll</text:span> continuellement les <text:span text:style-name="T14">topics</text:span> auxquels ils sont abonnés.</text:p>
              </text:list-item>
              <text:list-item>
                <text:p>Périodiquement, il récupère un lot d’enregistrements.</text:p>
              </text:list-item>
              <text:list-item>
                <text:p><text:span text:style-name="T26">Chaque </text:span>enregistrement encapsule :</text:p>
                <text:list>
                  <text:list-item>
                    <text:p>le <text:s/>message </text:p>
                  </text:list-item>
                  <text:list-item>
                    <text:p>La partition</text:p>
                  </text:list-item>
                  <text:list-item>
                    <text:p>L’offset</text:p>
                  </text:list-item>
                  <text:list-item>
                    <text:p>Le timestamp</text:p>
                  </text:list-item>
                </text:list>
              </text:list-item>
            </text:list>
          </draw:text-box>
        </draw:frame>
        <presentation:notes draw:style-name="dp2">
          <draw:page-thumbnail draw:style-name="gr2" draw:layer="layout" svg:width="15.597cm" svg:height="10.985cm" svg:x="2.623cm" svg:y="2.258cm" draw:page-number="100" presentation:class="page"/>
          <draw:frame presentation:style-name="pr6" draw:text-style-name="P13" draw:layer="layout" svg:width="14.362cm" svg:height="11.254cm" svg:x="3.25cm" svg:y="14.128cm" presentation:class="notes" presentation:placeholder="true">
            <draw:text-box/>
          </draw:frame>
        </presentation:notes>
      </draw:page>
      <draw:page draw:name="page101" draw:style-name="dp3" draw:master-page-name="Standard" presentation:presentation-page-layout-name="AL3T1">
        <draw:frame presentation:style-name="pr9" draw:layer="layout" svg:width="23.499cm" svg:height="3.575cm" svg:x="3.033cm" svg:y="2.367cm" presentation:class="title">
          <draw:text-box>
            <text:p>Exemple Java</text:p>
          </draw:text-box>
        </draw:frame>
        <draw:frame presentation:style-name="pr5" draw:text-style-name="P39" draw:layer="layout" svg:width="23.499cm" svg:height="12.18cm" svg:x="3.033cm" svg:y="6.283cm" presentation:class="outline">
          <draw:text-box>
            <text:list text:style-name="L2">
              <text:list-item>
                <text:p text:style-name="P33"><text:span text:style-name="T97">try {</text:span></text:p>
              </text:list-item>
              <text:list-item>
                <text:p text:style-name="P33"><text:span text:style-name="T98">while (true)</text:span><text:span text:style-name="T97"> {</text:span></text:p>
              </text:list-item>
              <text:list-item>
                <text:p text:style-name="P33"><text:span text:style-name="T99"><text:s text:c="2"/></text:span><text:span text:style-name="T99">// poll on bloque pdt </text:span><text:span text:style-name="T99">100ms pour récupérer </text:span><text:span text:style-name="T99">les messages </text:span></text:p>
              </text:list-item>
              <text:list-item>
                <text:p text:style-name="P33"><text:span text:style-name="T97"><text:s text:c="2"/></text:span><text:span text:style-name="T97">ConsumerRecords&lt;String</text:span><text:span text:style-name="T97">, String&gt; records = </text:span><text:span text:style-name="T98">consumer.poll(100)</text:span><text:span text:style-name="T97">;</text:span></text:p>
              </text:list-item>
              <text:list-item>
                <text:p text:style-name="P33"><text:span text:style-name="T97"><text:s text:c="2"/></text:span><text:span text:style-name="T97">for </text:span><text:span text:style-name="T97">(ConsumerRecord&lt;String</text:span><text:span text:style-name="T97">, String&gt; record : </text:span><text:span text:style-name="T97">records) {</text:span></text:p>
              </text:list-item>
              <text:list-item>
                <text:p text:style-name="P33"><text:span text:style-name="T97"><text:s text:c="4"/></text:span><text:span text:style-name="T97">log.debug("topic = </text:span><text:span text:style-name="T97">%s, partition = %s, </text:span><text:span text:style-name="T97">offset = %d,</text:span></text:p>
              </text:list-item>
              <text:list-item>
                <text:p text:style-name="P33"><text:span text:style-name="T97"><text:s text:c="6"/></text:span><text:span text:style-name="T97">customer = %s, </text:span><text:span text:style-name="T97">country = %s\n", </text:span><text:span text:style-name="T98">record.topic(), </text:span><text:span text:style-name="T98">record.partition(),</text:span><text:span text:style-name="T98"><text:line-break/></text:span><text:span text:style-name="T98"> <text:s text:c="4"/></text:span><text:span text:style-name="T98">record.offset(),record</text:span><text:span text:style-name="T98">.key(),record.value()</text:span><text:span text:style-name="T97">)</text:span><text:span text:style-name="T97">;</text:span></text:p>
              </text:list-item>
              <text:list-item>
                <text:p text:style-name="P33"><text:span text:style-name="T97"/></text:p>
              </text:list-item>
              <text:list-item>
                <text:p text:style-name="P33"><text:span text:style-name="T97"><text:s text:c="6"/></text:span><text:span text:style-name="T97">int updatedCount = </text:span><text:span text:style-name="T97">1;</text:span></text:p>
              </text:list-item>
              <text:list-item>
                <text:p text:style-name="P33"><text:span text:style-name="T97"><text:s text:c="6"/></text:span><text:span text:style-name="T97">if </text:span><text:span text:style-name="T97">(custCountryMap.contai</text:span><text:span text:style-name="T97">nsValue(record.value()</text:span><text:span text:style-name="T97">)) {</text:span></text:p>
              </text:list-item>
              <text:list-item>
                <text:p text:style-name="P33"><text:span text:style-name="T97"><text:s text:c="8"/></text:span><text:span text:style-name="T97">updatedCount = </text:span><text:span text:style-name="T97">custCountryMap.get(rec</text:span><text:span text:style-name="T97">ord.value()) + 1;</text:span></text:p>
              </text:list-item>
              <text:list-item>
                <text:p text:style-name="P33"><text:span text:style-name="T97"><text:s text:c="6"/></text:span><text:span text:style-name="T97">}</text:span></text:p>
              </text:list-item>
              <text:list-item>
                <text:p text:style-name="P33"><text:span text:style-name="T97"><text:s text:c="6"/></text:span><text:span text:style-name="T97">custCountryMap.put(rec</text:span><text:span text:style-name="T97">ord.value(), </text:span><text:span text:style-name="T97">updatedCount) ;</text:span></text:p>
              </text:list-item>
              <text:list-item>
                <text:p text:style-name="P33"><text:span text:style-name="T97"/></text:p>
              </text:list-item>
              <text:list-item>
                <text:p text:style-name="P33"><text:span text:style-name="T100"><text:s text:c="6"/></text:span><text:span text:style-name="T100">System.out.println(</text:span><text:span text:style-name="T97">cus</text:span><text:span text:style-name="T97">tCountryMap) ;</text:span></text:p>
              </text:list-item>
              <text:list-item>
                <text:p text:style-name="P33"><text:span text:style-name="T97"><text:s text:c="2"/></text:span><text:span text:style-name="T97">}</text:span></text:p>
              </text:list-item>
              <text:list-item>
                <text:p text:style-name="P33"><text:span text:style-name="T97">}</text:span></text:p>
              </text:list-item>
              <text:list-item>
                <text:p text:style-name="P33"><text:span text:style-name="T97">} finally {</text:span></text:p>
              </text:list-item>
              <text:list-item>
                <text:p text:style-name="P33"><text:span text:style-name="T97"><text:s text:c="2"/></text:span><text:span text:style-name="T97">consumer.close();</text:span></text:p>
              </text:list-item>
              <text:list-item>
                <text:p text:style-name="P33"><text:span text:style-name="T97">}</text:span></text:p>
              </text:list-item>
            </text:list>
          </draw:text-box>
        </draw:frame>
        <presentation:notes draw:style-name="dp8">
          <draw:page-thumbnail draw:style-name="gr2" draw:layer="layout" svg:width="15.597cm" svg:height="10.985cm" svg:x="2.623cm" svg:y="2.258cm" draw:page-number="101" presentation:class="page"/>
          <draw:frame presentation:style-name="pr6" draw:text-style-name="P18" draw:layer="layout" svg:width="14.362cm" svg:height="11.254cm" svg:x="3.25cm" svg:y="14.128cm" presentation:class="notes" presentation:placeholder="true">
            <draw:text-box/>
          </draw:frame>
        </presentation:notes>
      </draw:page>
      <draw:page draw:name="page102" draw:style-name="dp3" draw:master-page-name="Standard" presentation:presentation-page-layout-name="AL3T1">
        <draw:frame presentation:style-name="pr9" draw:layer="layout" svg:width="23.499cm" svg:height="3.575cm" svg:x="3.033cm" svg:y="2.367cm" presentation:class="title">
          <draw:text-box>
            <text:p>Offsets et Commits</text:p>
          </draw:text-box>
        </draw:frame>
        <draw:frame presentation:style-name="pr5" draw:layer="layout" svg:width="23.499cm" svg:height="12.18cm" svg:x="3.033cm" svg:y="6.283cm" presentation:class="outline">
          <draw:text-box>
            <text:list text:style-name="L2">
              <text:list-item>
                <text:p><text:span text:style-name="T26">Les consommateurs </text:span><text:span text:style-name="T26">synchronisent l’état </text:span><text:span text:style-name="T26">d’avancement de leur </text:span><text:span text:style-name="T26">consommation avec Kafka </text:span><text:span text:style-name="T26">en </text:span>indiquant périodiquement <text:s/>le dernier offset de messages qu’ils ont traité.</text:p>
              </text:list-item>
              <text:list-item>
                <text:p>Kafka appelle la mise à jour d’un offset : un <text:span text:style-name="T32">commit</text:span></text:p>
              </text:list-item>
              <text:list-item>
                <text:p>Pour committer, un consommateur envoie un message vers un <text:span text:style-name="T14">topic</text:span> particulier de Kafka : <text:span text:style-name="T32">__consumer_offsets</text:span></text:p>
                <text:list>
                  <text:list-item>
                    <text:p>Ce <text:span text:style-name="T14">topic</text:span> contient les offsets de chaque partition. </text:p>
                  </text:list-item>
                </text:list>
              </text:list-item>
              <text:list-item>
                <text:p>Lors d’une réaffectation de partitions, <text:s/>2 risques doivent être pris en compte :</text:p>
                <text:list>
                  <text:list-item>
                    <text:p>Traiter 2 fois le même message </text:p>
                  </text:list-item>
                  <text:list-item>
                    <text:p>Louper des messages </text:p>
                  </text:list-item>
                </text:list>
              </text:list-item>
            </text:list>
          </draw:text-box>
        </draw:frame>
        <presentation:notes draw:style-name="dp8">
          <draw:page-thumbnail draw:style-name="gr2" draw:layer="layout" svg:width="15.597cm" svg:height="10.985cm" svg:x="2.623cm" svg:y="2.258cm" draw:page-number="102" presentation:class="page"/>
          <draw:frame presentation:style-name="pr6" draw:text-style-name="P18" draw:layer="layout" svg:width="14.362cm" svg:height="11.254cm" svg:x="3.25cm" svg:y="14.128cm" presentation:class="notes" presentation:placeholder="true">
            <draw:text-box/>
          </draw:frame>
        </presentation:notes>
      </draw:page>
      <draw:page draw:name="page103" draw:style-name="dp3" draw:master-page-name="Standard" presentation:presentation-page-layout-name="AL3T1">
        <draw:frame presentation:style-name="pr11" draw:layer="layout" svg:width="23.499cm" svg:height="3.577cm" svg:x="3.033cm" svg:y="2.366cm" presentation:class="title">
          <draw:text-box>
            <text:p>Risques lors d’une réaffectation</text:p>
          </draw:text-box>
        </draw:frame>
        <draw:frame presentation:style-name="pr5" draw:layer="layout" svg:width="23.499cm" svg:height="4.463cm" svg:x="3.033cm" svg:y="14cm" presentation:class="outline" presentation:user-transformed="true">
          <draw:text-box>
            <text:list text:style-name="L2">
              <text:list-item>
                <text:p>Kafka propose plusieurs façons de gérer les commits via la propriété <text:span text:style-name="T14">enable.auto.commit </text:span><text:span text:style-name="T21">et </text:span><text:span text:style-name="T21">l’API</text:span></text:p>
              </text:list-item>
            </text:list>
          </draw:text-box>
        </draw:frame>
        <draw:frame draw:style-name="gr9" draw:text-style-name="P23" draw:layer="layout" svg:width="14.089cm" svg:height="6.079cm" svg:x="0.511cm" svg:y="6.576cm">
          <draw:image xlink:href="Pictures/10000001000003D2000001A6E9FDD1E2.png" xlink:type="simple" xlink:show="embed" xlink:actuate="onLoad" draw:mime-type="image/png">
            <text:p/>
          </draw:image>
        </draw:frame>
        <draw:frame draw:style-name="gr9" draw:text-style-name="P23" draw:layer="layout" svg:width="13.6cm" svg:height="6.737cm" svg:x="15.4cm" svg:y="6.463cm">
          <draw:image xlink:href="Pictures/10000001000003D3000001E5F6382571.png" xlink:type="simple" xlink:show="embed" xlink:actuate="onLoad" draw:mime-type="image/png">
            <text:p/>
          </draw:image>
        </draw:frame>
        <presentation:notes draw:style-name="dp8">
          <draw:page-thumbnail draw:style-name="gr2" draw:layer="layout" svg:width="15.597cm" svg:height="10.985cm" svg:x="2.623cm" svg:y="2.258cm" draw:page-number="103" presentation:class="page"/>
          <draw:frame presentation:style-name="pr6" draw:text-style-name="P18" draw:layer="layout" svg:width="14.362cm" svg:height="11.254cm" svg:x="3.25cm" svg:y="14.128cm" presentation:class="notes" presentation:placeholder="true">
            <draw:text-box/>
          </draw:frame>
        </presentation:notes>
      </draw:page>
      <draw:page draw:name="page104" draw:style-name="dp3" draw:master-page-name="Standard" presentation:presentation-page-layout-name="AL3T1">
        <draw:frame presentation:style-name="pr9" draw:layer="layout" svg:width="23.499cm" svg:height="3.575cm" svg:x="3.033cm" svg:y="2.367cm" presentation:class="title">
          <draw:text-box>
            <text:p>Commit automatique</text:p>
          </draw:text-box>
        </draw:frame>
        <draw:frame presentation:style-name="pr5" draw:layer="layout" svg:width="23.499cm" svg:height="12.18cm" svg:x="3.033cm" svg:y="6.283cm" presentation:class="outline">
          <draw:text-box>
            <text:list text:style-name="L2">
              <text:list-item>
                <text:p>Si <text:span text:style-name="T32">enable.auto.commit=tr</text:span><text:span text:style-name="T32">ue</text:span> , <text:line-break/>le consommateur valide toutes les <text:span text:style-name="T32">auto.commit.interval.m</text:span><text:span text:style-name="T32">s </text:span><text:s/>(par défaut 5000), les plus grands offset reçus par <text:span text:style-name="T14">poll() </text:span></text:p>
              </text:list-item>
              <text:list-item>
                <text:p/>
              </text:list-item>
              <text:list-item>
                <text:p text:style-name="P24"><text:span text:style-name="T26">=&gt; Cette approche (simple) </text:span><text:span text:style-name="T26">ne protège pas contre les </text:span><text:span text:style-name="T26">duplications en cas de ré-</text:span><text:span text:style-name="T26">affectation</text:span></text:p>
              </text:list-item>
              <text:list-item>
                <text:p text:style-name="P24"><text:span text:style-name="T26">=&gt; Si le traitement du </text:span><text:span text:style-name="T26">message est asynchrone, </text:span><text:span text:style-name="T26">cette approche ne protège </text:span><text:span text:style-name="T26">pas contre les pertes de </text:span><text:span text:style-name="T26">message en cas de ré-</text:span><text:span text:style-name="T26">affectation</text:span></text:p>
              </text:list-item>
              <text:list-item>
                <text:p text:style-name="P24"/>
              </text:list-item>
            </text:list>
          </draw:text-box>
        </draw:frame>
        <presentation:notes draw:style-name="dp8">
          <draw:page-thumbnail draw:style-name="gr2" draw:layer="layout" svg:width="15.597cm" svg:height="10.985cm" svg:x="2.623cm" svg:y="2.258cm" draw:page-number="104" presentation:class="page"/>
          <draw:frame presentation:style-name="pr6" draw:text-style-name="P18" draw:layer="layout" svg:width="14.362cm" svg:height="11.254cm" svg:x="3.25cm" svg:y="14.128cm" presentation:class="notes" presentation:placeholder="true">
            <draw:text-box/>
          </draw:frame>
        </presentation:notes>
      </draw:page>
      <draw:page draw:name="page105" draw:style-name="dp3" draw:master-page-name="Standard" presentation:presentation-page-layout-name="AL3T1">
        <draw:frame presentation:style-name="pr9" draw:layer="layout" svg:width="23.499cm" svg:height="3.575cm" svg:x="3.033cm" svg:y="2.367cm" presentation:class="title">
          <draw:text-box>
            <text:p>Commit contrôlé</text:p>
          </draw:text-box>
        </draw:frame>
        <draw:frame presentation:style-name="pr5" draw:layer="layout" svg:width="23.499cm" svg:height="12.18cm" svg:x="3.033cm" svg:y="6.283cm" presentation:class="outline">
          <draw:text-box>
            <text:list text:style-name="L2">
              <text:list-item>
                <text:p>L'API Consumer permet de contrôler le moment du commit </text:p>
              </text:list-item>
              <text:list-item>
                <text:p>Si <text:span text:style-name="T31">auto.commit.offset=fals</text:span><text:span text:style-name="T31">e</text:span> , l’application doit explicitement committer les offsets du dernier poll() </text:p>
                <text:list>
                  <text:list-item>
                    <text:p>Soit de façon bloquante avec <text:span text:style-name="T31">commitSync() </text:span></text:p>
                  </text:list-item>
                  <text:list-item>
                    <text:p>Soit en asynchrone avec <text:span text:style-name="T31">commitAsync()</text:span></text:p>
                  </text:list-item>
                </text:list>
              </text:list-item>
              <text:list-item>
                <text:p text:style-name="P24"><text:span text:style-name="T39">L’API permet également de </text:span><text:span text:style-name="T39">fournir en argument une </text:span><text:span text:style-name="T39">Map contenant les offsets </text:span><text:span text:style-name="T39">que l’on veut valider pour </text:span><text:span text:style-name="T39">chaque partition</text:span></text:p>
              </text:list-item>
              <text:list-item>
                <text:p/>
              </text:list-item>
            </text:list>
          </draw:text-box>
        </draw:frame>
        <presentation:notes draw:style-name="dp8">
          <draw:page-thumbnail draw:style-name="gr2" draw:layer="layout" svg:width="15.597cm" svg:height="10.985cm" svg:x="2.623cm" svg:y="2.258cm" draw:page-number="105" presentation:class="page"/>
          <draw:frame presentation:style-name="pr6" draw:text-style-name="P18" draw:layer="layout" svg:width="14.362cm" svg:height="11.254cm" svg:x="3.25cm" svg:y="14.128cm" presentation:class="notes" presentation:placeholder="true">
            <draw:text-box/>
          </draw:frame>
        </presentation:notes>
      </draw:page>
      <draw:page draw:name="page106" draw:style-name="dp3" draw:master-page-name="Standard" presentation:presentation-page-layout-name="AL3T1">
        <draw:frame presentation:style-name="pr9" draw:layer="layout" svg:width="23.499cm" svg:height="3.575cm" svg:x="3.033cm" svg:y="2.367cm" presentation:class="title">
          <draw:text-box>
            <text:p>Réagir aux réaffectations</text:p>
          </draw:text-box>
        </draw:frame>
        <draw:frame presentation:style-name="pr5" draw:layer="layout" svg:width="23.499cm" svg:height="12.18cm" svg:x="3.033cm" svg:y="6.283cm" presentation:class="outline">
          <draw:text-box>
            <text:list text:style-name="L2">
              <text:list-item>
                <text:p>Lors de réaffectations de partitions, les consommateurs peuvent être prévenus afin de prendre les mesures adéquates (commit, fermeture de ressources, positionnement à un offset spécifique…)</text:p>
              </text:list-item>
              <text:list-item>
                <text:p>=&gt; Une application peut donc très bien stocker les offsets hors de Kafka et lors d’une réaffectation lire les derniers offsets et se repositionner aux bons offset <text:line-break/>Solution possible pour l’Exactly Once</text:p>
                <text:p><text:span text:style-name="T101"/></text:p>
              </text:list-item>
            </text:list>
          </draw:text-box>
        </draw:frame>
        <presentation:notes draw:style-name="dp8">
          <draw:page-thumbnail draw:style-name="gr2" draw:layer="layout" svg:width="15.597cm" svg:height="10.985cm" svg:x="2.623cm" svg:y="2.258cm" draw:page-number="106" presentation:class="page"/>
          <draw:frame presentation:style-name="pr6" draw:text-style-name="P18" draw:layer="layout" svg:width="14.362cm" svg:height="11.254cm" svg:x="3.25cm" svg:y="14.128cm" presentation:class="notes" presentation:placeholder="true">
            <draw:text-box/>
          </draw:frame>
        </presentation:notes>
      </draw:page>
      <draw:page draw:name="page107" draw:style-name="dp3" draw:master-page-name="Standard" presentation:presentation-page-layout-name="AL3T1">
        <draw:frame presentation:style-name="pr11" draw:layer="layout" svg:width="23.499cm" svg:height="3.577cm" svg:x="3.033cm" svg:y="2.366cm" presentation:class="title">
          <draw:text-box>
            <text:p>Affectation statique des partitions</text:p>
          </draw:text-box>
        </draw:frame>
        <draw:frame presentation:style-name="pr5" draw:layer="layout" svg:width="23.499cm" svg:height="12.18cm" svg:x="3.033cm" svg:y="6.283cm" presentation:class="outline">
          <draw:text-box>
            <text:list text:style-name="L2">
              <text:list-item>
                <text:p>L’application peut également prendre en charge les affectations de partition</text:p>
              </text:list-item>
              <text:list-item>
                <text:p text:style-name="P24">Dans ce cas, l’application assigne explicitement les partitions à ses consommateurs et la fonctionnalité de groupe n’est alors plus nécessaire.</text:p>
              </text:list-item>
              <text:list-item>
                <text:p/>
              </text:list-item>
            </text:list>
          </draw:text-box>
        </draw:frame>
        <presentation:notes draw:style-name="dp2">
          <draw:page-thumbnail draw:style-name="gr2" draw:layer="layout" svg:width="15.597cm" svg:height="10.985cm" svg:x="2.623cm" svg:y="2.258cm" draw:page-number="107" presentation:class="page"/>
          <draw:frame presentation:style-name="pr6" draw:text-style-name="P13" draw:layer="layout" svg:width="14.362cm" svg:height="11.254cm" svg:x="3.25cm" svg:y="14.128cm" presentation:class="notes" presentation:placeholder="true">
            <draw:text-box/>
          </draw:frame>
        </presentation:notes>
      </draw:page>
      <draw:page draw:name="page108" draw:style-name="dp3" draw:master-page-name="Standard" presentation:presentation-page-layout-name="AL3T1">
        <draw:frame presentation:style-name="pr11" draw:layer="layout" svg:width="23.499cm" svg:height="3.577cm" svg:x="3.033cm" svg:y="2.366cm" presentation:class="title" presentation:user-transformed="true">
          <draw:text-box>
            <text:p>Configuration des consommateurs</text:p>
          </draw:text-box>
        </draw:frame>
        <draw:frame presentation:style-name="pr5" draw:layer="layout" svg:width="23.499cm" svg:height="12.18cm" svg:x="3.033cm" svg:y="6.283cm" presentation:class="outline" presentation:user-transformed="true">
          <draw:text-box>
            <text:list text:style-name="L2">
              <text:list-item>
                <text:p>Si le consommateur n’a pas d’offset défini dans Kafka, le comportement est piloté par la propriété <text:span text:style-name="T31">auto.offset.reset : </text:span></text:p>
                <text:list>
                  <text:list-item>
                    <text:p><text:span text:style-name="T102">latest</text:span><text:span text:style-name="T103"> (défaut), </text:span><text:span text:style-name="T103">l’offset est </text:span><text:span text:style-name="T103">initialisé au </text:span><text:span text:style-name="T103">dernier offset</text:span></text:p>
                  </text:list-item>
                  <text:list-item>
                    <text:p><text:span text:style-name="T102">earliest : </text:span><text:span text:style-name="T103">L’offset est </text:span><text:span text:style-name="T103">initialisé au </text:span><text:span text:style-name="T103">premier offset </text:span><text:span text:style-name="T103">disponible </text:span></text:p>
                  </text:list-item>
                </text:list>
              </text:list-item>
            </text:list>
          </draw:text-box>
        </draw:frame>
        <presentation:notes draw:style-name="dp8">
          <draw:page-thumbnail draw:style-name="gr2" draw:layer="layout" svg:width="15.597cm" svg:height="10.985cm" svg:x="2.623cm" svg:y="2.258cm" draw:page-number="108" presentation:class="page"/>
          <draw:frame presentation:style-name="pr6" draw:text-style-name="P13" draw:layer="layout" svg:width="14.362cm" svg:height="11.254cm" svg:x="3.25cm" svg:y="14.128cm" presentation:class="notes" presentation:placeholder="true">
            <draw:text-box/>
          </draw:frame>
        </presentation:notes>
      </draw:page>
      <draw:page draw:name="page109" draw:style-name="dp3" draw:master-page-name="Standard" presentation:presentation-page-layout-name="AL3T1">
        <draw:frame presentation:style-name="pr11" draw:layer="layout" svg:width="23.499cm" svg:height="3.577cm" svg:x="3.033cm" svg:y="2.366cm" presentation:class="title" presentation:user-transformed="true">
          <draw:text-box>
            <text:p>Configuration des consommateurs (2)</text:p>
          </draw:text-box>
        </draw:frame>
        <draw:frame presentation:style-name="pr5" draw:layer="layout" svg:width="23.499cm" svg:height="12.18cm" svg:x="3.033cm" svg:y="6.283cm" presentation:class="outline" presentation:user-transformed="true">
          <draw:text-box>
            <text:list text:style-name="L2">
              <text:list-item>
                <text:p>D’autres propriétés</text:p>
                <text:list>
                  <text:list-item>
                    <text:p text:style-name="P38"><text:span text:style-name="T31">fetch.min.bytes</text:span> : Volume minimum de données à recevoir. Permet de réduire la charge sur le broker et le consommateur</text:p>
                  </text:list-item>
                  <text:list-item>
                    <text:p text:style-name="P38"><text:span text:style-name="T31">fetch.max.wait.ms</text:span> : Attente maximale avant de récupérer les données</text:p>
                  </text:list-item>
                  <text:list-item>
                    <text:p text:style-name="P38"><text:span text:style-name="T31">max.partition.fetch.b</text:span><text:span text:style-name="T31">ytes</text:span> : Maximum de données par partition ramenées lors d’un poll. Par défaut 1Mo</text:p>
                  </text:list-item>
                  <text:list-item>
                    <text:p text:style-name="P38"><text:span text:style-name="T31">max.poll.records</text:span> : Maximum de record via un <text:span text:style-name="T14">poll()</text:span></text:p>
                  </text:list-item>
                  <text:list-item>
                    <text:p text:style-name="P38"><text:span text:style-name="T31">partition.assignment.</text:span><text:span text:style-name="T31">strategy</text:span> : Stratégie d’affectation des partitions <text:span text:style-name="T14">Range</text:span> (défaut), <text:span text:style-name="T14">RoundRobin</text:span> ou <text:span text:style-name="T14">Custom</text:span></text:p>
                  </text:list-item>
                  <text:list-item>
                    <text:p><text:span text:style-name="T31">client.id</text:span> : Une chaîne de caractère utilisé pour les métriques. </text:p>
                  </text:list-item>
                  <text:list-item>
                    <text:p><text:span text:style-name="T31">receive.buffer.bytes </text:span><text:span text:style-name="T39">et</text:span><text:span text:style-name="T31"> </text:span><text:span text:style-name="T31">send.buffer.bytes</text:span> : Taille des buffers TCP</text:p>
                  </text:list-item>
                </text:list>
              </text:list-item>
            </text:list>
          </draw:text-box>
        </draw:frame>
        <draw:frame draw:style-name="gr20" draw:text-style-name="P34" draw:layer="layout" svg:width="14.684cm" svg:height="1.216cm" svg:x="1.603cm" svg:y="19.4cm">
          <draw:text-box>
            <text:p><text:span text:style-name="T73">Atelier 2 : Consommation de messages</text:span></text:p>
          </draw:text-box>
        </draw:frame>
        <presentation:notes draw:style-name="dp8">
          <draw:page-thumbnail draw:style-name="gr2" draw:layer="layout" svg:width="15.597cm" svg:height="10.985cm" svg:x="2.623cm" svg:y="2.258cm" draw:page-number="109" presentation:class="page"/>
          <draw:frame presentation:style-name="pr6" draw:text-style-name="P13" draw:layer="layout" svg:width="14.362cm" svg:height="11.254cm" svg:x="3.25cm" svg:y="14.128cm" presentation:class="notes" presentation:placeholder="true">
            <draw:text-box/>
          </draw:frame>
        </presentation:notes>
      </draw:page>
      <draw:page draw:name="page110"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Clients</text:span></text:p>
              </text:list-header>
            </text:list>
          </draw:text-box>
        </draw:frame>
        <draw:frame presentation:style-name="pr21"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13"/></text:p>
              </text:list-item>
              <text:list-item>
                <text:p text:style-name="P19"><text:span text:style-name="T2">Types de clients</text:span></text:p>
              </text:list-item>
              <text:list-item>
                <text:p text:style-name="P19"><text:span text:style-name="T2">Production</text:span><text:span text:style-name="T12"> </text:span><text:span text:style-name="T2">de</text:span><text:span text:style-name="T12"> </text:span><text:span text:style-name="T2">messages</text:span></text:p>
              </text:list-item>
              <text:list-item>
                <text:p text:style-name="P19"><text:span text:style-name="T2">Consommation de messages</text:span></text:p>
              </text:list-item>
              <text:list-item>
                <text:p text:style-name="P28"><text:span text:style-name="T12">Garanties Kafka</text:span></text:p>
              </text:list-item>
              <text:list-item>
                <text:p text:style-name="P19"><text:span text:style-name="T30">Schema registry</text:span></text:p>
              </text:list-item>
              <text:list-item>
                <text:p text:style-name="P19"><text:span text:style-name="T2">Kafka Connect</text:span></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11" draw:style-name="dp3" draw:master-page-name="Standard" presentation:presentation-page-layout-name="AL3T1">
        <draw:frame presentation:style-name="pr9" draw:layer="layout" svg:width="23.499cm" svg:height="3.575cm" svg:x="3.033cm" svg:y="2.367cm" presentation:class="title">
          <draw:text-box>
            <text:p>Garantie sur l’ordre</text:p>
          </draw:text-box>
        </draw:frame>
        <draw:frame presentation:style-name="pr5" draw:layer="layout" svg:width="23.499cm" svg:height="12.18cm" svg:x="3.033cm" svg:y="6.283cm" presentation:class="outline" presentation:user-transformed="true">
          <draw:text-box>
            <text:list text:style-name="L2">
              <text:list-item>
                <text:p><text:span text:style-name="T21">En absence de failure,</text:span><text:span text:style-name="T14"> Kafka</text:span> préserve l'ordre des messages au sein d'une partition.</text:p>
                <text:list>
                  <text:list-item>
                    <text:p>Si des messages ont été envoyés par le producteur dans un ordre spécifique, le broker les écrit sur une partition dans cet ordre et tous les consommateurs les liront dans cet ordre … </text:p>
                  </text:list-item>
                </text:list>
              </text:list-item>
              <text:list-item>
                <text:p><text:span text:style-name="T26"/></text:p>
              </text:list-item>
              <text:list-item>
                <text:p><text:span text:style-name="T26">En cas de failure</text:span></text:p>
                <text:list>
                  <text:list-item>
                    <text:p><text:span text:style-name="T26">Si </text:span><text:span text:style-name="T58">retries</text:span><text:span text:style-name="T26"> &gt; 0 et </text:span><text:span text:style-name="T58">max.in.flights.requ</text:span><text:span text:style-name="T58">ests.per.session</text:span><text:span text:style-name="T26"> &gt; </text:span><text:span text:style-name="T26">1 . </text:span><text:span text:style-name="T26"><text:line-break/></text:span><text:span text:style-name="T26">Il se peut que lors </text:span><text:span text:style-name="T26">d’un renvoi l’ordre </text:span><text:span text:style-name="T26">initial soit inversé.</text:span></text:p>
                  </text:list-item>
                  <text:list-item>
                    <text:p><text:span text:style-name="T26">Pour avoir une </text:span><text:span text:style-name="T26">garantie sur </text:span><text:span text:style-name="T26">l’ordre avec </text:span><text:span text:style-name="T26">tolérance aux </text:span><text:span text:style-name="T26">fautes, on </text:span><text:span text:style-name="T26">configure </text:span><text:span text:style-name="T26"><text:line-break/></text:span><text:span text:style-name="T58">retries</text:span><text:span text:style-name="T26"> &gt; 0 et </text:span><text:span text:style-name="T102">max.in.flights.requ</text:span><text:span text:style-name="T102">ests.per.session</text:span> =1 <text:line-break/>(<text:span text:style-name="T103">au détriment du </text:span><text:span text:style-name="T103">débit global)</text:span></text:p>
                  </text:list-item>
                </text:list>
              </text:list-item>
            </text:list>
          </draw:text-box>
        </draw:frame>
        <presentation:notes draw:style-name="dp8">
          <draw:page-thumbnail draw:style-name="gr2" draw:layer="layout" svg:width="15.597cm" svg:height="10.985cm" svg:x="2.623cm" svg:y="2.258cm" draw:page-number="111" presentation:class="page"/>
          <draw:frame presentation:style-name="pr6" draw:text-style-name="P13" draw:layer="layout" svg:width="14.362cm" svg:height="11.254cm" svg:x="3.25cm" svg:y="14.128cm" presentation:class="notes" presentation:placeholder="true">
            <draw:text-box/>
          </draw:frame>
        </presentation:notes>
      </draw:page>
      <draw:page draw:name="page112" draw:style-name="dp3" draw:master-page-name="Standard" presentation:presentation-page-layout-name="AL3T1">
        <draw:frame presentation:style-name="pr9" draw:layer="layout" svg:width="23.499cm" svg:height="3.575cm" svg:x="3.033cm" svg:y="2.367cm" presentation:class="title">
          <draw:text-box>
            <text:p>Garanties de livraison</text:p>
          </draw:text-box>
        </draw:frame>
        <draw:frame presentation:style-name="pr5" draw:layer="layout" svg:width="23.499cm" svg:height="12.18cm" svg:x="3.033cm" svg:y="6.283cm" presentation:class="outline" presentation:user-transformed="true">
          <draw:text-box>
            <text:list text:style-name="L2">
              <text:list-item>
                <text:p>En fonction des configurations du topic, des producteurs et des consommateurs, Kafka peut garantir différents niveaux de livraison :</text:p>
                <text:list>
                  <text:list-item>
                    <text:p><text:span text:style-name="T72">At Most Once</text:span> : Un message est livré au plus une fois. On tolère les pertes de message</text:p>
                  </text:list-item>
                  <text:list-item>
                    <text:p><text:span text:style-name="T72">At Least Once</text:span> : Le message est livré au moins une fois. On tolère les doublons</text:p>
                  </text:list-item>
                  <text:list-item>
                    <text:p><text:span text:style-name="T72">Exactly once</text:span> : Le message est livré 1 et 1 seule fois.</text:p>
                  </text:list-item>
                </text:list>
              </text:list-item>
              <text:list-item>
                <text:p>Tout ceci avec des défaillances</text:p>
              </text:list-item>
            </text:list>
          </draw:text-box>
        </draw:frame>
        <presentation:notes draw:style-name="dp5">
          <draw:page-thumbnail draw:style-name="gr2" draw:layer="layout" svg:width="15.597cm" svg:height="10.985cm" svg:x="2.623cm" svg:y="2.258cm" draw:page-number="112" presentation:class="page"/>
          <draw:frame presentation:style-name="pr6" draw:text-style-name="P13" draw:layer="layout" svg:width="14.362cm" svg:height="11.254cm" svg:x="3.25cm" svg:y="14.128cm" presentation:class="notes" presentation:placeholder="true">
            <draw:text-box/>
          </draw:frame>
        </presentation:notes>
      </draw:page>
      <draw:page draw:name="page113" draw:style-name="dp3" draw:master-page-name="Standard" presentation:presentation-page-layout-name="AL3T1">
        <draw:frame presentation:style-name="pr9" draw:layer="layout" svg:width="23.499cm" svg:height="3.575cm" svg:x="3.033cm" svg:y="2.367cm" presentation:class="title">
          <draw:text-box>
            <text:p>Côté producteur</text:p>
          </draw:text-box>
        </draw:frame>
        <draw:frame presentation:style-name="pr5" draw:layer="layout" svg:width="23.499cm" svg:height="12.18cm" svg:x="3.033cm" svg:y="6.283cm" presentation:class="outline">
          <draw:text-box>
            <text:list text:style-name="L2">
              <text:list-item>
                <text:p>Du côté producteur, 2 premiers facteurs influencent la fiabilité de l’émission</text:p>
                <text:list>
                  <text:list-item>
                    <text:p>La configuration des <text:span text:style-name="T31">acks </text:span>en fonction du <text:span text:style-name="T14">min.insync.replica</text:span> du topic<text:span text:style-name="T31"><text:line-break/></text:span><text:span text:style-name="T104">3 valeurs possibles : </text:span><text:span text:style-name="T105">0,1,all</text:span></text:p>
                  </text:list-item>
                  <text:list-item>
                    <text:p>Les gestion des <text:span text:style-name="T38">erreurs</text:span> dans la configuration et dans le code</text:p>
                  </text:list-item>
                </text:list>
              </text:list-item>
            </text:list>
          </draw:text-box>
        </draw:frame>
        <presentation:notes draw:style-name="dp5">
          <draw:page-thumbnail draw:style-name="gr2" draw:layer="layout" svg:width="15.597cm" svg:height="10.985cm" svg:x="2.623cm" svg:y="2.258cm" draw:page-number="113" presentation:class="page"/>
          <draw:frame presentation:style-name="pr6" draw:text-style-name="P18" draw:layer="layout" svg:width="14.362cm" svg:height="11.254cm" svg:x="3.25cm" svg:y="14.128cm" presentation:class="notes" presentation:placeholder="true">
            <draw:text-box/>
          </draw:frame>
        </presentation:notes>
      </draw:page>
      <draw:page draw:name="page114" draw:style-name="dp3" draw:master-page-name="Standard" presentation:presentation-page-layout-name="AL3T1">
        <draw:frame presentation:style-name="pr9" draw:layer="layout" svg:width="23.499cm" svg:height="3.575cm" svg:x="3.033cm" svg:y="2.367cm" presentation:class="title">
          <draw:text-box>
            <text:p>Acquittement et durabilité</text:p>
          </draw:text-box>
        </draw:frame>
        <draw:frame presentation:style-name="pr5" draw:layer="layout" svg:width="23.499cm" svg:height="12.18cm" svg:x="3.033cm" svg:y="6.283cm" presentation:class="outline" presentation:placeholder="true">
          <draw:text-box/>
        </draw:frame>
        <draw:frame draw:style-name="gr9" draw:text-style-name="P23" draw:layer="layout" svg:width="24.031cm" svg:height="13.266cm" svg:x="2.283cm" svg:y="6.138cm">
          <draw:image xlink:href="Pictures/10000001000006600000038573250FF0.png" xlink:type="simple" xlink:show="embed" xlink:actuate="onLoad" draw:mime-type="image/png">
            <text:p/>
          </draw:image>
        </draw:frame>
        <presentation:notes draw:style-name="dp5">
          <draw:page-thumbnail draw:style-name="gr2" draw:layer="layout" svg:width="15.597cm" svg:height="10.985cm" svg:x="2.623cm" svg:y="2.258cm" draw:page-number="114" presentation:class="page"/>
          <draw:frame presentation:style-name="pr6" draw:text-style-name="P13" draw:layer="layout" svg:width="14.362cm" svg:height="11.254cm" svg:x="3.25cm" svg:y="14.128cm" presentation:class="notes" presentation:placeholder="true">
            <draw:text-box/>
          </draw:frame>
        </presentation:notes>
      </draw:page>
      <draw:page draw:name="page115" draw:style-name="dp3" draw:master-page-name="Standard" presentation:presentation-page-layout-name="AL3T1">
        <draw:frame presentation:style-name="pr9" draw:layer="layout" svg:width="23.499cm" svg:height="3.575cm" svg:x="3.033cm" svg:y="2.367cm" presentation:class="title">
          <draw:text-box>
            <text:p>Gestion des erreurs</text:p>
          </draw:text-box>
        </draw:frame>
        <draw:frame presentation:style-name="pr5" draw:layer="layout" svg:width="23.499cm" svg:height="12.18cm" svg:x="3.033cm" svg:y="6.283cm" presentation:class="outline">
          <draw:text-box>
            <text:list text:style-name="L2">
              <text:list-item>
                <text:p>2 types d’erreur pour le producteur: </text:p>
                <text:list>
                  <text:list-item>
                    <text:p>les erreurs que les producteurs gèrent automatiquement . <text:line-break/>Ce sont les erreurs ré-essayable (ex : LEADER_NOT_AVAILABLE, NOT_ENOUGH_REPLICA)<text:line-break/>Nombre d’essai configurable via <text:span text:style-name="T31">retries</text:span>. <text:line-break/>=&gt; Attention, peut générer des doublons</text:p>
                  </text:list-item>
                  <text:list-item>
                    <text:p>les erreurs qui doivent être traitées par le code. (ex : INVALID_CONFIG, SERIALIZATION_EXCEPTION)<text:line-break/></text:p>
                  </text:list-item>
                </text:list>
              </text:list-item>
            </text:list>
          </draw:text-box>
        </draw:frame>
        <presentation:notes draw:style-name="dp5">
          <draw:page-thumbnail draw:style-name="gr2" draw:layer="layout" svg:width="15.597cm" svg:height="10.985cm" svg:x="2.623cm" svg:y="2.258cm" draw:page-number="115" presentation:class="page"/>
          <draw:frame presentation:style-name="pr6" draw:text-style-name="P18" draw:layer="layout" svg:width="14.362cm" svg:height="11.254cm" svg:x="3.25cm" svg:y="14.128cm" presentation:class="notes" presentation:placeholder="true">
            <draw:text-box/>
          </draw:frame>
        </presentation:notes>
      </draw:page>
      <draw:page draw:name="page116" draw:style-name="dp3" draw:master-page-name="Standard" presentation:presentation-page-layout-name="AL3T1">
        <draw:frame presentation:style-name="pr9" draw:layer="layout" svg:width="23.499cm" svg:height="3.575cm" svg:x="3.033cm" svg:y="2.367cm" presentation:class="title">
          <draw:text-box>
            <text:p>Producteur idempotent</text:p>
          </draw:text-box>
        </draw:frame>
        <draw:frame presentation:style-name="pr5" draw:layer="layout" svg:width="23.499cm" svg:height="12.18cm" svg:x="3.033cm" svg:y="6.283cm" presentation:class="outline" presentation:placeholder="true">
          <draw:text-box/>
        </draw:frame>
        <draw:frame draw:style-name="gr9" draw:text-style-name="P23" draw:layer="layout" svg:width="19.907cm" svg:height="9.339cm" svg:x="5.032cm" svg:y="6.318cm">
          <draw:image xlink:href="Pictures/100000010000047F0000021CB0C6DDE3.png" xlink:type="simple" xlink:show="embed" xlink:actuate="onLoad" draw:mime-type="image/png">
            <text:p/>
          </draw:image>
        </draw:frame>
        <draw:frame draw:style-name="gr21" draw:text-style-name="P40" draw:layer="layout" svg:width="10.194cm" svg:height="3.146cm" svg:x="3.372cm" svg:y="16.005cm">
          <draw:text-box>
            <text:p><text:span text:style-name="T106">Le producteur ajoute une nombre séquentiel et un ID de producteur</text:span></text:p>
          </draw:text-box>
        </draw:frame>
        <draw:frame draw:style-name="gr22" draw:text-style-name="P40" draw:layer="layout" svg:width="10.194cm" svg:height="4.111cm" svg:x="17.372cm" svg:y="16.005cm">
          <draw:text-box>
            <text:p><text:span text:style-name="T106">Le broker détecte le doublon </text:span><text:span text:style-name="T106"><text:line-break/></text:span><text:span text:style-name="T106">=&gt; Il envoie un ack sans le commit</text:span></text:p>
          </draw:text-box>
        </draw:frame>
        <presentation:notes draw:style-name="dp5">
          <draw:page-thumbnail draw:style-name="gr2" draw:layer="layout" svg:width="15.597cm" svg:height="10.985cm" svg:x="2.623cm" svg:y="2.258cm" draw:page-number="116" presentation:class="page"/>
          <draw:frame presentation:style-name="pr6" draw:text-style-name="P18" draw:layer="layout" svg:width="14.362cm" svg:height="11.254cm" svg:x="3.25cm" svg:y="14.128cm" presentation:class="notes" presentation:placeholder="true">
            <draw:text-box/>
          </draw:frame>
        </presentation:notes>
      </draw:page>
      <draw:page draw:name="page117" draw:style-name="dp3" draw:master-page-name="Standard" presentation:presentation-page-layout-name="AL3T1">
        <draw:frame presentation:style-name="pr9" draw:layer="layout" svg:width="23.499cm" svg:height="3.575cm" svg:x="3.033cm" svg:y="2.367cm" presentation:class="title">
          <draw:text-box>
            <text:p>Configuration</text:p>
          </draw:text-box>
        </draw:frame>
        <draw:frame presentation:style-name="pr5" draw:layer="layout" svg:width="23.499cm" svg:height="12.18cm" svg:x="3.033cm" svg:y="6.283cm" presentation:class="outline">
          <draw:text-box>
            <text:list text:style-name="L2">
              <text:list-item>
                <text:p><text:span text:style-name="T14">enable.idempotence</text:span> </text:p>
              </text:list-item>
              <text:list-item>
                <text:p>L’idempotence nécessite les configurations suivantes :</text:p>
                <text:list>
                  <text:list-item>
                    <text:p><text:span text:style-name="T14">max.in.flight.requests.p</text:span><text:span text:style-name="T14">er.connection &lt;= 5</text:span></text:p>
                  </text:list-item>
                  <text:list-item>
                    <text:p><text:span text:style-name="T14">retries &gt; 0</text:span></text:p>
                  </text:list-item>
                  <text:list-item>
                    <text:p><text:span text:style-name="T14">acks = all</text:span></text:p>
                  </text:list-item>
                </text:list>
              </text:list-item>
              <text:list-item>
                <text:p>Si des valeurs incompatibles sont configurées, une <text:span text:style-name="T14">ConfigException</text:span> est lancée</text:p>
              </text:list-item>
            </text:list>
          </draw:text-box>
        </draw:frame>
        <presentation:notes draw:style-name="dp5">
          <draw:page-thumbnail draw:style-name="gr2" draw:layer="layout" svg:width="15.597cm" svg:height="10.985cm" svg:x="2.623cm" svg:y="2.258cm" draw:page-number="117" presentation:class="page"/>
          <draw:frame presentation:style-name="pr6" draw:text-style-name="P18" draw:layer="layout" svg:width="14.362cm" svg:height="11.254cm" svg:x="3.25cm" svg:y="14.128cm" presentation:class="notes" presentation:placeholder="true">
            <draw:text-box/>
          </draw:frame>
        </presentation:notes>
      </draw:page>
      <draw:page draw:name="page118" draw:style-name="dp3" draw:master-page-name="Standard" presentation:presentation-page-layout-name="AL3T1">
        <draw:frame presentation:style-name="pr9" draw:layer="layout" svg:width="23.499cm" svg:height="3.575cm" svg:x="3.033cm" svg:y="2.367cm" presentation:class="title">
          <draw:text-box>
            <text:p>Garanties de la production</text:p>
          </draw:text-box>
        </draw:frame>
        <draw:frame presentation:style-name="pr5" draw:layer="layout" svg:width="23.499cm" svg:height="12.18cm" svg:x="3.033cm" svg:y="6.283cm" presentation:class="outline">
          <draw:text-box>
            <text:list text:style-name="L2">
              <text:list-item>
                <text:p>Si acks=0,1 <text:line-break/>=&gt; At MostOnce (lors de la défaillance d’un leader)</text:p>
              </text:list-item>
              <text:list-item>
                <text:p>Si acks=all et retries suffisamment grand : <text:line-break/>=&gt; AtLeastOnce</text:p>
              </text:list-item>
              <text:list-item>
                <text:p>Si en plus, configuration idempotence : =&gt; Exactly Once </text:p>
              </text:list-item>
            </text:list>
          </draw:text-box>
        </draw:frame>
        <presentation:notes draw:style-name="dp5">
          <draw:page-thumbnail draw:style-name="gr2" draw:layer="layout" svg:width="15.597cm" svg:height="10.985cm" svg:x="2.623cm" svg:y="2.258cm" draw:page-number="118" presentation:class="page"/>
          <draw:frame presentation:style-name="pr6" draw:text-style-name="P13" draw:layer="layout" svg:width="14.362cm" svg:height="11.254cm" svg:x="3.25cm" svg:y="14.128cm" presentation:class="notes" presentation:placeholder="true">
            <draw:text-box/>
          </draw:frame>
        </presentation:notes>
      </draw:page>
      <draw:page draw:name="page119" draw:style-name="dp3" draw:master-page-name="Standard" presentation:presentation-page-layout-name="AL3T1">
        <draw:frame presentation:style-name="pr9" draw:layer="layout" svg:width="23.499cm" svg:height="3.575cm" svg:x="3.033cm" svg:y="2.367cm" presentation:class="title">
          <draw:text-box>
            <text:p>Rebalancing</text:p>
          </draw:text-box>
        </draw:frame>
        <draw:frame presentation:style-name="pr5" draw:layer="layout" svg:width="23.499cm" svg:height="12.18cm" svg:x="3.033cm" svg:y="6.283cm" presentation:class="outline" presentation:user-transformed="true">
          <draw:text-box>
            <text:list text:style-name="L2">
              <text:list-item>
                <text:p>En cas de crash ou d’ajout d’un consommateur, Kafka réaffecte les partitions.</text:p>
              </text:list-item>
              <text:list-item>
                <text:p>Lors d’une réaffectation, un consommateur récupère l’offset de lecture auprès de Kafka</text:p>
              </text:list-item>
              <text:list-item>
                <text:p>Si l’offset n’est pas synchronisé avec les traitements effectués, cela peut :</text:p>
                <text:list>
                  <text:list-item>
                    <text:p>Générer des traitements en doublon</text:p>
                  </text:list-item>
                  <text:list-item>
                    <text:p>Perdre des traitements de message</text:p>
                  </text:list-item>
                </text:list>
              </text:list-item>
              <text:list-item>
                <text:p/>
              </text:list-item>
            </text:list>
          </draw:text-box>
        </draw:frame>
        <presentation:notes draw:style-name="dp5">
          <draw:page-thumbnail draw:style-name="gr2" draw:layer="layout" svg:width="15.597cm" svg:height="10.985cm" svg:x="2.623cm" svg:y="2.258cm" draw:page-number="119" presentation:class="page"/>
          <draw:frame presentation:style-name="pr6" draw:text-style-name="P13" draw:layer="layout" svg:width="14.362cm" svg:height="11.254cm" svg:x="3.25cm" svg:y="14.128cm" presentation:class="notes" presentation:placeholder="true">
            <draw:text-box/>
          </draw:frame>
        </presentation:notes>
      </draw:page>
      <draw:page draw:name="page120" draw:style-name="dp3" draw:master-page-name="Standard" presentation:presentation-page-layout-name="AL3T1">
        <draw:frame presentation:style-name="pr9" draw:layer="layout" svg:width="23.499cm" svg:height="3.575cm" svg:x="3.033cm" svg:y="2.367cm" presentation:class="title">
          <draw:text-box>
            <text:p>Consommateur: At Most Once</text:p>
          </draw:text-box>
        </draw:frame>
        <draw:frame presentation:style-name="pr5" draw:layer="layout" svg:width="12.985cm" svg:height="6.734cm" svg:x="13.547cm" svg:y="6.283cm" presentation:class="outline" presentation:user-transformed="true">
          <draw:text-box>
            <text:list text:style-name="L2">
              <text:list-item>
                <text:p><text:span text:style-name="T107">- L’offset est commité</text:span></text:p>
              </text:list-item>
              <text:list-item>
                <text:p><text:span text:style-name="T107">- Traitement d’un ratio de message puis </text:span><text:span text:style-name="T107">plantage</text:span></text:p>
              </text:list-item>
              <text:list-item>
                <text:p><text:span text:style-name="T107"/></text:p>
              </text:list-item>
            </text:list>
          </draw:text-box>
        </draw:frame>
        <draw:frame draw:style-name="gr9" draw:text-style-name="P23" draw:layer="layout" svg:width="9.179cm" svg:height="7.04cm" svg:x="2.99cm" svg:y="6.525cm">
          <draw:image xlink:href="Pictures/10000001000002FC0000024A32DCC4C5.png" xlink:type="simple" xlink:show="embed" xlink:actuate="onLoad" draw:mime-type="image/png">
            <text:p/>
          </draw:image>
        </draw:frame>
        <draw:frame presentation:style-name="pr5" draw:layer="layout" svg:width="23.331cm" svg:height="6.734cm" svg:x="3.202cm" svg:y="13.783cm" presentation:class="outline" presentation:user-transformed="true">
          <draw:text-box>
            <text:p text:style-name="P24"><text:span text:style-name="T108">enable.auto.commit = true </text:span><text:span text:style-name="T109">MAIS </text:span><text:span text:style-name="T107">Traitement asynchrone dans la boucle </text:span><text:span text:style-name="T107">de poll</text:span></text:p>
            <text:list text:style-name="L2">
              <text:list-item>
                <text:p text:style-name="P24"><text:span text:style-name="T107">OU</text:span></text:p>
              </text:list-item>
              <text:list-item>
                <text:p text:style-name="P24"><text:span text:style-name="T107">Commit manuel avant le traitement des </text:span><text:span text:style-name="T107">messages</text:span></text:p>
              </text:list-item>
              <text:list-item>
                <text:p><text:span text:style-name="T107"/></text:p>
              </text:list-item>
            </text:list>
          </draw:text-box>
        </draw:frame>
        <presentation:notes draw:style-name="dp5">
          <draw:page-thumbnail draw:style-name="gr2" draw:layer="layout" svg:width="15.597cm" svg:height="10.985cm" svg:x="2.623cm" svg:y="2.258cm" draw:page-number="120" presentation:class="page"/>
          <draw:frame presentation:style-name="pr6" draw:text-style-name="P18" draw:layer="layout" svg:width="14.362cm" svg:height="11.254cm" svg:x="3.25cm" svg:y="14.128cm" presentation:class="notes" presentation:placeholder="true">
            <draw:text-box/>
          </draw:frame>
        </presentation:notes>
      </draw:page>
      <draw:page draw:name="page121" draw:style-name="dp3" draw:master-page-name="Standard" presentation:presentation-page-layout-name="AL3T1">
        <draw:frame presentation:style-name="pr9" draw:layer="layout" svg:width="23.499cm" svg:height="3.575cm" svg:x="3.033cm" svg:y="2.367cm" presentation:class="title">
          <draw:text-box>
            <text:p>Réception : <text:span text:style-name="T14">At Least Once</text:span></text:p>
          </draw:text-box>
        </draw:frame>
        <draw:frame presentation:style-name="pr5" draw:layer="layout" svg:width="13.17cm" svg:height="6.549cm" svg:x="13.362cm" svg:y="6.283cm" presentation:class="outline" presentation:user-transformed="true">
          <draw:text-box>
            <text:list text:style-name="L2">
              <text:list-item>
                <text:p><text:span text:style-name="T107">- Traitement d’un ratio de message puis </text:span><text:span text:style-name="T107">plantage</text:span></text:p>
              </text:list-item>
              <text:list-item>
                <text:p><text:span text:style-name="T107">- L’offset n’est pas commité</text:span></text:p>
              </text:list-item>
            </text:list>
          </draw:text-box>
        </draw:frame>
        <draw:frame draw:style-name="gr9" draw:text-style-name="P23" draw:layer="layout" svg:width="9.277cm" svg:height="7.488cm" svg:x="3.542cm" svg:y="6.402cm">
          <draw:image xlink:href="Pictures/100000010000030A00000274242AFF16.png" xlink:type="simple" xlink:show="embed" xlink:actuate="onLoad" draw:mime-type="image/png">
            <text:p/>
          </draw:image>
        </draw:frame>
        <draw:frame presentation:style-name="pr5" draw:layer="layout" svg:width="23.172cm" svg:height="6.549cm" svg:x="3.36cm" svg:y="13.784cm" presentation:class="outline" presentation:user-transformed="true">
          <draw:text-box>
            <text:list text:style-name="L2">
              <text:list-item>
                <text:p text:style-name="P24"><text:span text:style-name="T110">Configuration par défaut et traitement </text:span><text:span text:style-name="T110">synchrone </text:span></text:p>
              </text:list-item>
              <text:list-item>
                <text:p text:style-name="P24"><text:span text:style-name="T110">Ou</text:span></text:p>
              </text:list-item>
              <text:list-item>
                <text:p><text:span text:style-name="T111">enable.auto.commit</text:span><text:span text:style-name="T110"> à false ET </text:span><text:span text:style-name="T107">Commit</text:span><text:span text:style-name="T112"> </text:span><text:span text:style-name="T107">explicite après le traitement </text:span></text:p>
              </text:list-item>
            </text:list>
          </draw:text-box>
        </draw:frame>
        <presentation:notes draw:style-name="dp5">
          <draw:page-thumbnail draw:style-name="gr2" draw:layer="layout" svg:width="15.597cm" svg:height="10.985cm" svg:x="2.623cm" svg:y="2.258cm" draw:page-number="121" presentation:class="page"/>
          <draw:frame presentation:style-name="pr6" draw:text-style-name="P18" draw:layer="layout" svg:width="14.362cm" svg:height="11.254cm" svg:x="3.25cm" svg:y="14.128cm" presentation:class="notes" presentation:placeholder="true">
            <draw:text-box/>
          </draw:frame>
        </presentation:notes>
      </draw:page>
      <draw:page draw:name="page122" draw:style-name="dp3" draw:master-page-name="Standard" presentation:presentation-page-layout-name="AL3T1">
        <draw:frame presentation:style-name="pr9" draw:layer="layout" svg:width="23.499cm" svg:height="3.575cm" svg:x="3.033cm" svg:y="2.367cm" presentation:class="title">
          <draw:text-box>
            <text:p>Exactly Once</text:p>
          </draw:text-box>
        </draw:frame>
        <draw:frame presentation:style-name="pr5" draw:layer="layout" svg:width="23.499cm" svg:height="12.18cm" svg:x="3.033cm" svg:y="6.283cm" presentation:class="outline">
          <draw:text-box>
            <text:list text:style-name="L2">
              <text:list-item>
                <text:p>La sémantique <text:span text:style-name="T14">Exactly Once</text:span> est basée sur <text:span text:style-name="T14">At least </text:span><text:span text:style-name="T14">Once</text:span> et empêche les messages en double en cours de traitement par les applications clientes</text:p>
              </text:list-item>
              <text:list-item>
                <text:p/>
              </text:list-item>
              <text:list-item>
                <text:p>Pris en charge par les APIs <text:span text:style-name="T14">Kafka Producer, Consumer </text:span><text:span text:style-name="T14">et Streams</text:span></text:p>
              </text:list-item>
            </text:list>
          </draw:text-box>
        </draw:frame>
        <presentation:notes draw:style-name="dp5">
          <draw:page-thumbnail draw:style-name="gr2" draw:layer="layout" svg:width="15.597cm" svg:height="10.985cm" svg:x="2.623cm" svg:y="2.258cm" draw:page-number="122" presentation:class="page"/>
          <draw:frame presentation:style-name="pr6" draw:text-style-name="P13" draw:layer="layout" svg:width="14.362cm" svg:height="11.254cm" svg:x="3.25cm" svg:y="14.128cm" presentation:class="notes" presentation:placeholder="true">
            <draw:text-box/>
          </draw:frame>
        </presentation:notes>
      </draw:page>
      <draw:page draw:name="page123" draw:style-name="dp3" draw:master-page-name="Standard" presentation:presentation-page-layout-name="AL3T1">
        <draw:frame presentation:style-name="pr9" draw:layer="layout" svg:width="23.499cm" svg:height="3.575cm" svg:x="3.033cm" svg:y="2.367cm" presentation:class="title">
          <draw:text-box>
            <text:p>Consommateur</text:p>
          </draw:text-box>
        </draw:frame>
        <draw:frame presentation:style-name="pr5" draw:layer="layout" svg:width="23.499cm" svg:height="12.18cm" svg:x="3.033cm" svg:y="6.283cm" presentation:class="outline" presentation:user-transformed="true">
          <draw:text-box>
            <text:list text:style-name="L2">
              <text:list-item>
                <text:p>Du côté du consommateur, traiter une et une seule fois les messages consistent à :</text:p>
                <text:list>
                  <text:list-item>
                    <text:p><text:span text:style-name="T47">Gérer manuellement les </text:span><text:span text:style-name="T47">offsets des partitions </text:span><text:span text:style-name="T47">dans un support de </text:span><text:span text:style-name="T47">persistance </text:span>transactionnel et partagé par tous les consommateurs + gérer les rééquilibrages ou forcer des assignations statiques</text:p>
                  </text:list-item>
                  <text:list-item>
                    <text:p>Si le traitement consiste à produire un message vers le même cluster Kafka, on peut utiliser les transactions<text:span text:style-name="T15">1</text:span>.</text:p>
                  </text:list-item>
                </text:list>
              </text:list-item>
            </text:list>
          </draw:text-box>
        </draw:frame>
        <draw:frame draw:style-name="gr23" draw:text-style-name="P20" draw:layer="layout" svg:width="9.231cm" svg:height="1.056cm" svg:x="1.508cm" svg:y="19.685cm">
          <draw:text-box>
            <text:p><text:span text:style-name="T17">1. C’est le cas de KafkaStream</text:span></text:p>
          </draw:text-box>
        </draw:frame>
        <presentation:notes draw:style-name="dp5">
          <draw:page-thumbnail draw:style-name="gr2" draw:layer="layout" svg:width="15.597cm" svg:height="10.985cm" svg:x="2.623cm" svg:y="2.258cm" draw:page-number="123" presentation:class="page"/>
          <draw:frame presentation:style-name="pr6" draw:text-style-name="P13" draw:layer="layout" svg:width="14.362cm" svg:height="11.254cm" svg:x="3.25cm" svg:y="14.128cm" presentation:class="notes" presentation:placeholder="true">
            <draw:text-box/>
          </draw:frame>
        </presentation:notes>
      </draw:page>
      <draw:page draw:name="page124" draw:style-name="dp3" draw:master-page-name="Standard" presentation:presentation-page-layout-name="AL3T1">
        <draw:frame presentation:style-name="pr9" draw:layer="layout" svg:width="23.499cm" svg:height="3.575cm" svg:x="3.033cm" svg:y="2.367cm" presentation:class="title">
          <draw:text-box>
            <text:p>Transaction</text:p>
          </draw:text-box>
        </draw:frame>
        <draw:frame presentation:style-name="pr5" draw:layer="layout" svg:width="23.499cm" svg:height="12.18cm" svg:x="3.033cm" svg:y="6.283cm" presentation:class="outline">
          <draw:text-box>
            <text:list text:style-name="L2">
              <text:list-item>
                <text:p>Pour utiliser le mode transactionnel et l’API correspondante, il faut positionner la propriété <text:span text:style-name="T31">transactional.id</text:span> à une chaîne de caractères unique par producteur.</text:p>
              </text:list-item>
              <text:list-item>
                <text:p>L’utilisation des transactions a 2 usages :</text:p>
                <text:list>
                  <text:list-item>
                    <text:p>Englober dans une transaction l’envoi de plusieurs messages</text:p>
                  </text:list-item>
                  <text:list-item>
                    <text:p>Permettre la sémantique ExactlyOnce à un consommateur</text:p>
                  </text:list-item>
                </text:list>
              </text:list-item>
            </text:list>
          </draw:text-box>
        </draw:frame>
        <presentation:notes draw:style-name="dp8">
          <draw:page-thumbnail draw:style-name="gr2" draw:layer="layout" svg:width="15.597cm" svg:height="10.985cm" svg:x="2.623cm" svg:y="2.258cm" draw:page-number="124" presentation:class="page"/>
          <draw:frame presentation:style-name="pr6" draw:text-style-name="P18" draw:layer="layout" svg:width="14.362cm" svg:height="11.254cm" svg:x="3.25cm" svg:y="14.128cm" presentation:class="notes" presentation:placeholder="true">
            <draw:text-box/>
          </draw:frame>
        </presentation:notes>
      </draw:page>
      <draw:page draw:name="page125" draw:style-name="dp3" draw:master-page-name="Standard" presentation:presentation-page-layout-name="AL3T1">
        <draw:frame presentation:style-name="pr11" draw:layer="layout" svg:width="23.499cm" svg:height="3.577cm" svg:x="3.033cm" svg:y="2.366cm" presentation:class="title">
          <draw:text-box>
            <text:p>Production de messages transactionels</text:p>
          </draw:text-box>
        </draw:frame>
        <draw:frame presentation:style-name="pr5" draw:layer="layout" svg:width="23.499cm" svg:height="12.18cm" svg:x="3.033cm" svg:y="6.283cm" presentation:class="outline" presentation:user-transformed="true">
          <draw:text-box>
            <text:list text:style-name="L2">
              <text:list-item>
                <text:p>Le producteur :</text:p>
              </text:list-item>
            </text:list>
            <text:list text:style-name="L6">
              <text:list-item>
                <text:list>
                  <text:list-item>
                    <text:p><text:s/>Démarre une transaction</text:p>
                  </text:list-item>
                  <text:list-item>
                    <text:p><text:s/>Envois plusieurs messages</text:p>
                  </text:list-item>
                  <text:list-item>
                    <text:p><text:s/>Valide la transaction (commit)</text:p>
                  </text:list-item>
                </text:list>
              </text:list-item>
            </text:list>
            <text:p>Tant que la transaction n’est pas validée, les messages déjà stockés sur le cluster ont un statut « Non-committé »</text:p>
          </draw:text-box>
        </draw:frame>
        <presentation:notes draw:style-name="dp8">
          <draw:page-thumbnail draw:style-name="gr2" draw:layer="layout" svg:width="15.597cm" svg:height="10.985cm" svg:x="2.623cm" svg:y="2.258cm" draw:page-number="125" presentation:class="page"/>
          <draw:frame presentation:style-name="pr6" draw:text-style-name="P13" draw:layer="layout" svg:width="14.362cm" svg:height="11.254cm" svg:x="3.25cm" svg:y="14.128cm" presentation:class="notes" presentation:placeholder="true">
            <draw:text-box/>
          </draw:frame>
        </presentation:notes>
      </draw:page>
      <draw:page draw:name="page126" draw:style-name="dp3" draw:master-page-name="Standard" presentation:presentation-page-layout-name="AL3T1">
        <draw:frame presentation:style-name="pr11" draw:layer="layout" svg:width="23.499cm" svg:height="3.577cm" svg:x="3.033cm" svg:y="2.366cm" presentation:class="title">
          <draw:text-box>
            <text:p>Configuration du consommateur</text:p>
          </draw:text-box>
        </draw:frame>
        <draw:frame presentation:style-name="pr5" draw:layer="layout" svg:width="23.499cm" svg:height="12.18cm" svg:x="3.033cm" svg:y="6.283cm" presentation:class="outline">
          <draw:text-box>
            <text:list text:style-name="L2">
              <text:list-item>
                <text:p>Afin de ne lire que les messages transactionnels validés, les consommateurs doivent modifier la propriété <text:span text:style-name="T50">isolation.level</text:span><text:span text:style-name="T31"> </text:span></text:p>
                <text:list>
                  <text:list-item>
                    <text:p><text:span text:style-name="T50">read_committed</text:span>: Messages transactionnels validés ou messages non transactionnels</text:p>
                  </text:list-item>
                  <text:list-item>
                    <text:p><text:span text:style-name="T50">read_uncommitted</text:span>: Tous les messages (même les messages transactionnels non validés)</text:p>
                  </text:list-item>
                </text:list>
              </text:list-item>
            </text:list>
          </draw:text-box>
        </draw:frame>
        <presentation:notes draw:style-name="dp5">
          <draw:page-thumbnail draw:style-name="gr2" draw:layer="layout" svg:width="15.597cm" svg:height="10.985cm" svg:x="2.623cm" svg:y="2.258cm" draw:page-number="126" presentation:class="page"/>
          <draw:frame presentation:style-name="pr6" draw:text-style-name="P13" draw:layer="layout" svg:width="14.362cm" svg:height="11.254cm" svg:x="3.25cm" svg:y="14.128cm" presentation:class="notes" presentation:placeholder="true">
            <draw:text-box/>
          </draw:frame>
        </presentation:notes>
      </draw:page>
      <draw:page draw:name="page127" draw:style-name="dp3" draw:master-page-name="Standard" presentation:presentation-page-layout-name="AL3T1">
        <draw:frame presentation:style-name="pr9" draw:layer="layout" svg:width="23.499cm" svg:height="3.575cm" svg:x="3.033cm" svg:y="2.367cm" presentation:class="title">
          <draw:text-box>
            <text:p>Exactly Once et Transaction</text:p>
          </draw:text-box>
        </draw:frame>
        <draw:frame presentation:style-name="pr5" draw:layer="layout" svg:width="23.499cm" svg:height="7.554cm" svg:x="3.033cm" svg:y="6.283cm" presentation:class="outline" presentation:user-transformed="true">
          <draw:text-box>
            <text:list text:style-name="L2">
              <text:list-item>
                <text:p>Lorsque un consommateur produit des messages vers un autre topic, on peut utiliser les transactions afin d’écrire l’offset <text:s/>dans la même transaction que les messages de sortie</text:p>
              </text:list-item>
              <text:list-item>
                <text:p>Si la transaction est abandonnée, la position du consommateur reviendra à son ancienne valeur et les données produites sur les topics de sortie ne seront pas visibles pour les autres consommateurs, en fonction de leur "niveau d'isolement".</text:p>
              </text:list-item>
            </text:list>
          </draw:text-box>
        </draw:frame>
        <draw:custom-shape draw:style-name="gr24" draw:text-style-name="P41" draw:layer="layout" svg:width="6.112cm" svg:height="1.878cm" svg:x="1.56cm" svg:y="15.663cm">
          <text:p text:style-name="P41">Producteur</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41" draw:layer="layout" svg:width="1.878cm" svg:height="2.222cm" svg:x="10.213cm" svg:y="15.483cm">
          <text:p text:style-name="P41">I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41" draw:layer="layout" svg:width="1.878cm" svg:height="2.222cm" svg:x="21.697cm" svg:y="15.431cm">
          <text:p text:style-name="P41">Out</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41" draw:layer="layout" svg:width="6.112cm" svg:height="1.878cm" svg:x="13.679cm" svg:y="15.664cm">
          <text:p text:style-name="P41">Consom.</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6" draw:text-style-name="P23" draw:layer="layout" svg:x1="6.905cm" svg:y1="16.668cm" svg:x2="10.345cm" svg:y2="16.642cm">
          <text:p/>
        </draw:line>
        <draw:line draw:style-name="gr26" draw:text-style-name="P23" draw:layer="layout" svg:x1="12.144cm" svg:y1="16.642cm" svg:x2="14.446cm" svg:y2="16.642cm">
          <text:p/>
        </draw:line>
        <draw:line draw:style-name="gr26" draw:text-style-name="P23" draw:layer="layout" svg:x1="19.05cm" svg:y1="16.642cm" svg:x2="21.801cm" svg:y2="16.642cm">
          <text:p/>
        </draw:line>
        <draw:frame draw:style-name="gr27" draw:text-style-name="P34" draw:layer="layout" svg:width="9.519cm" svg:height="1.216cm" svg:x="1.605cm" svg:y="19.4cm">
          <draw:text-box>
            <text:p><text:span text:style-name="T73">Atelier 4.2 : Exactly Once</text:span></text:p>
          </draw:text-box>
        </draw:frame>
        <presentation:notes draw:style-name="dp5">
          <draw:page-thumbnail draw:style-name="gr2" draw:layer="layout" svg:width="15.597cm" svg:height="10.985cm" svg:x="2.623cm" svg:y="2.258cm" draw:page-number="127" presentation:class="page"/>
          <draw:frame presentation:style-name="pr6" draw:text-style-name="P13" draw:layer="layout" svg:width="14.362cm" svg:height="11.254cm" svg:x="3.25cm" svg:y="14.128cm" presentation:class="notes" presentation:placeholder="true">
            <draw:text-box/>
          </draw:frame>
        </presentation:notes>
      </draw:page>
      <draw:page draw:name="page128"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Clients Kafka</text:span></text:p>
              </text:list-header>
            </text:list>
          </draw:text-box>
        </draw:frame>
        <draw:frame presentation:style-name="pr22"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19"><text:span text:style-name="T2">Types de clients</text:span></text:p>
              </text:list-item>
              <text:list-item>
                <text:p text:style-name="P19"><text:span text:style-name="T2">Production</text:span><text:span text:style-name="T12"> </text:span><text:span text:style-name="T2">de</text:span><text:span text:style-name="T12"> </text:span><text:span text:style-name="T2">messages</text:span></text:p>
              </text:list-item>
              <text:list-item>
                <text:p text:style-name="P19"><text:span text:style-name="T2">Consommation de messages</text:span></text:p>
              </text:list-item>
              <text:list-item>
                <text:p text:style-name="P28"><text:span text:style-name="T2">Garanties Kafka</text:span></text:p>
              </text:list-item>
              <text:list-item>
                <text:p text:style-name="P19"><text:span text:style-name="T12">Schema registry</text:span></text:p>
              </text:list-item>
              <text:list-item>
                <text:p text:style-name="P19"><text:span text:style-name="T2">Kafka Connect</text:span></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29"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ors d’évolution des applications, le format des messages est susceptible de changer.</text:p>
              </text:list-item>
              <text:list-item>
                <text:p>=&gt; Afin de s’assurer que ses évolutions ne génèrent pas de problème chez les consommateurs, il est nécessaire d’utiliser un gestionnaire de schéma capable de détecter les problèmes de compatibilité.</text:p>
              </text:list-item>
              <text:list-item>
                <text:p>C’est le rôle de <text:span text:style-name="T50">Schema </text:span><text:span text:style-name="T50">Confluent Registry</text:span> qui supporte les formats de sérialisation JSON, Avro et ProtoBuf</text:p>
              </text:list-item>
              <text:list-item>
                <text:p/>
              </text:list-item>
            </text:list>
          </draw:text-box>
        </draw:frame>
        <presentation:notes draw:style-name="dp5">
          <draw:page-thumbnail draw:style-name="gr2" draw:layer="layout" svg:width="15.597cm" svg:height="10.985cm" svg:x="2.623cm" svg:y="2.258cm" draw:page-number="129" presentation:class="page"/>
          <draw:frame presentation:style-name="pr6" draw:text-style-name="P13" draw:layer="layout" svg:width="14.362cm" svg:height="11.254cm" svg:x="3.25cm" svg:y="14.128cm" presentation:class="notes" presentation:placeholder="true">
            <draw:text-box/>
          </draw:frame>
        </presentation:notes>
      </draw:page>
      <draw:page draw:name="page130" draw:style-name="dp3" draw:master-page-name="Standard" presentation:presentation-page-layout-name="AL3T1">
        <draw:frame presentation:style-name="pr9" draw:layer="layout" svg:width="23.499cm" svg:height="3.575cm" svg:x="3.033cm" svg:y="2.367cm" presentation:class="title">
          <draw:text-box>
            <text:p>Apache Avro</text:p>
          </draw:text-box>
        </draw:frame>
        <draw:frame presentation:style-name="pr5" draw:layer="layout" svg:width="23.499cm" svg:height="12.18cm" svg:x="3.033cm" svg:y="6.283cm" presentation:class="outline" presentation:user-transformed="true">
          <draw:text-box>
            <text:list text:style-name="L2">
              <text:list-item>
                <text:p><text:span text:style-name="T14">Apache Avro</text:span> est un système de sérialisation de données.</text:p>
                <text:list>
                  <text:list-item>
                    <text:p>Il utilise une structure JSON pour définir le <text:span text:style-name="T18">schéma</text:span>, permettant la sérialisation entre les octets et les données structurées.</text:p>
                  </text:list-item>
                  <text:list-item>
                    <text:p>Les outils associés à Avro sont capables de générer les classes Java<text:span text:style-name="T15">1</text:span> <text:s/>correspondantes au schéma.</text:p>
                  </text:list-item>
                </text:list>
              </text:list-item>
            </text:list>
          </draw:text-box>
        </draw:frame>
        <draw:frame draw:style-name="gr28" draw:text-style-name="P20" draw:layer="layout" svg:width="20.39cm" svg:height="1.216cm" svg:x="1.111cm" svg:y="19.447cm">
          <draw:text-box>
            <text:p><text:span text:style-name="T14">1. Avro supporte C, C++, C#, Java, PHP, Python, et Ruby</text:span></text:p>
          </draw:text-box>
        </draw:frame>
        <presentation:notes draw:style-name="dp5">
          <draw:page-thumbnail draw:style-name="gr2" draw:layer="layout" svg:width="15.597cm" svg:height="10.985cm" svg:x="2.623cm" svg:y="2.258cm" draw:page-number="130" presentation:class="page"/>
          <draw:frame presentation:style-name="pr6" draw:text-style-name="P13" draw:layer="layout" svg:width="14.362cm" svg:height="11.254cm" svg:x="3.25cm" svg:y="14.128cm" presentation:class="notes" presentation:placeholder="true">
            <draw:text-box/>
          </draw:frame>
        </presentation:notes>
      </draw:page>
      <draw:page draw:name="page131" draw:style-name="dp3" draw:master-page-name="Standard" presentation:presentation-page-layout-name="AL3T1">
        <draw:frame presentation:style-name="pr9" draw:layer="layout" svg:width="23.499cm" svg:height="3.575cm" svg:x="3.033cm" svg:y="2.367cm" presentation:class="title">
          <draw:text-box>
            <text:p>Schéma Avro</text:p>
          </draw:text-box>
        </draw:frame>
        <draw:frame presentation:style-name="pr5" draw:text-style-name="P33" draw:layer="layout" svg:width="23.499cm" svg:height="12.18cm" svg:x="3.033cm" svg:y="6.283cm" presentation:class="outline">
          <draw:text-box>
            <text:list text:style-name="L2">
              <text:list-item>
                <text:p text:style-name="P33"><text:span text:style-name="T24">{</text:span></text:p>
              </text:list-item>
              <text:list-item>
                <text:p text:style-name="P33"><text:span text:style-name="T24"><text:s text:c="4"/></text:span><text:span text:style-name="T24">"type": "record",</text:span></text:p>
              </text:list-item>
              <text:list-item>
                <text:p text:style-name="P33"><text:span text:style-name="T24"><text:s text:c="4"/></text:span><text:span text:style-name="T24">"name": "Courier",</text:span></text:p>
              </text:list-item>
              <text:list-item>
                <text:p text:style-name="P33"><text:span text:style-name="T24"><text:s text:c="4"/></text:span><text:span text:style-name="T24">"namespace": </text:span><text:span text:style-name="T24">"org.formation.model</text:span><text:span text:style-name="T24">",</text:span></text:p>
              </text:list-item>
              <text:list-item>
                <text:p text:style-name="P33"><text:span text:style-name="T24"><text:s text:c="4"/></text:span><text:span text:style-name="T24">"fields": [</text:span></text:p>
              </text:list-item>
              <text:list-item>
                <text:p text:style-name="P33"><text:span text:style-name="T24"><text:s text:c="4"/></text:span><text:span text:style-name="T24">{</text:span></text:p>
              </text:list-item>
              <text:list-item>
                <text:p text:style-name="P33"><text:span text:style-name="T24"><text:s text:c="8"/></text:span><text:span text:style-name="T24">"name": "id",</text:span></text:p>
              </text:list-item>
              <text:list-item>
                <text:p text:style-name="P33"><text:span text:style-name="T24"><text:s text:c="8"/></text:span><text:span text:style-name="T24">"type": "int" },</text:span></text:p>
              </text:list-item>
              <text:list-item>
                <text:p text:style-name="P33"><text:span text:style-name="T24"><text:s text:c="4"/></text:span><text:span text:style-name="T24">{</text:span></text:p>
              </text:list-item>
              <text:list-item>
                <text:p text:style-name="P33"><text:span text:style-name="T24"><text:s text:c="8"/></text:span><text:span text:style-name="T24">"name": </text:span><text:span text:style-name="T24">"firstName",</text:span></text:p>
              </text:list-item>
              <text:list-item>
                <text:p text:style-name="P33"><text:span text:style-name="T24"><text:s text:c="8"/></text:span><text:span text:style-name="T24">"type": "string" },</text:span></text:p>
              </text:list-item>
              <text:list-item>
                <text:p text:style-name="P33"><text:span text:style-name="T24"><text:s text:c="4"/></text:span><text:span text:style-name="T24">{</text:span></text:p>
              </text:list-item>
              <text:list-item>
                <text:p text:style-name="P33"><text:span text:style-name="T24"><text:s text:c="8"/></text:span><text:span text:style-name="T24">"name": </text:span><text:span text:style-name="T24">"lastName",</text:span></text:p>
              </text:list-item>
              <text:list-item>
                <text:p text:style-name="P33"><text:span text:style-name="T24"><text:s text:c="8"/></text:span><text:span text:style-name="T24">"type": "string" },</text:span></text:p>
              </text:list-item>
            </text:list>
            <text:p text:style-name="P33"><text:span text:style-name="T24"><text:s text:c="4"/></text:span><text:span text:style-name="T24">{</text:span></text:p>
            <text:p text:style-name="P33"><text:span text:style-name="T24"><text:s text:c="4"/></text:span><text:span text:style-name="T24"><text:tab/></text:span><text:span text:style-name="T24">"name": "position",</text:span></text:p>
            <text:p text:style-name="P33"><text:span text:style-name="T24"><text:s text:c="4"/></text:span><text:span text:style-name="T24"><text:tab/></text:span><text:span text:style-name="T24">"type": [</text:span></text:p>
            <text:p text:style-name="P33"><text:span text:style-name="T24"><text:s text:c="4"/></text:span><text:span text:style-name="T24"><text:tab/></text:span><text:span text:style-name="T24"><text:tab/></text:span><text:span text:style-name="T24">{</text:span></text:p>
            <text:p text:style-name="P33"><text:span text:style-name="T24"><text:s text:c="4"/></text:span><text:span text:style-name="T24"><text:tab/></text:span><text:span text:style-name="T24"><text:tab/></text:span><text:span text:style-name="T24"><text:tab/></text:span><text:span text:style-name="T24"> <text:s/></text:span><text:span text:style-name="T24">"type":</text:span><text:span text:style-name="T24"><text:tab/></text:span><text:span text:style-name="T24">"record",</text:span></text:p>
            <text:p text:style-name="P33"><text:span text:style-name="T24"><text:s text:c="4"/></text:span><text:span text:style-name="T24"><text:tab/></text:span><text:span text:style-name="T24"><text:tab/></text:span><text:span text:style-name="T24"> <text:s/></text:span><text:span text:style-name="T24">"name": </text:span><text:span text:style-name="T24">"Position",</text:span></text:p>
            <text:p text:style-name="P33"><text:span text:style-name="T24"><text:s text:c="4"/></text:span><text:span text:style-name="T24"><text:tab/></text:span><text:span text:style-name="T24"><text:tab/></text:span><text:span text:style-name="T24"> <text:s/></text:span><text:span text:style-name="T24">"namespace": <text:s/></text:span><text:span text:style-name="T24">"org.formation.model</text:span><text:span text:style-name="T24">",</text:span></text:p>
            <text:p text:style-name="P33"><text:span text:style-name="T24"><text:s text:c="4"/></text:span><text:span text:style-name="T24"><text:tab/></text:span><text:span text:style-name="T24"><text:tab/></text:span><text:span text:style-name="T24"> <text:s/></text:span><text:span text:style-name="T24">"fields": <text:s/>[</text:span></text:p>
            <text:p text:style-name="P33"><text:span text:style-name="T24"><text:s text:c="4"/></text:span><text:span text:style-name="T24"><text:tab/></text:span><text:span text:style-name="T24"><text:tab/></text:span><text:span text:style-name="T24"> <text:s/></text:span><text:span text:style-name="T24">{</text:span></text:p>
            <text:p text:style-name="P33"><text:span text:style-name="T24"><text:s text:c="4"/></text:span><text:span text:style-name="T24"><text:tab/></text:span><text:span text:style-name="T24"><text:tab/></text:span><text:span text:style-name="T24"><text:tab/></text:span><text:span text:style-name="T24"> <text:s text:c="3"/></text:span><text:span text:style-name="T24">"name": </text:span><text:span text:style-name="T24">"latitude", </text:span></text:p>
            <text:p text:style-name="P33"><text:span text:style-name="T24"><text:s text:c="4"/></text:span><text:span text:style-name="T24"><text:tab/></text:span><text:span text:style-name="T24"><text:tab/></text:span><text:span text:style-name="T24"><text:tab/></text:span><text:span text:style-name="T24"> <text:s text:c="3"/></text:span><text:span text:style-name="T24">"type":</text:span><text:span text:style-name="T24"><text:tab/></text:span><text:span text:style-name="T24">"double" </text:span><text:span text:style-name="T24"><text:tab/></text:span><text:span text:style-name="T24"><text:tab/></text:span><text:span text:style-name="T24">},</text:span></text:p>
            <text:p text:style-name="P33"><text:span text:style-name="T24"><text:s text:c="4"/></text:span><text:span text:style-name="T24"><text:tab/></text:span><text:span text:style-name="T24"><text:tab/></text:span><text:span text:style-name="T24"> <text:s/></text:span><text:span text:style-name="T24">{</text:span></text:p>
            <text:p text:style-name="P33"><text:span text:style-name="T24"><text:s text:c="4"/></text:span><text:span text:style-name="T24"><text:tab/></text:span><text:span text:style-name="T24"><text:tab/></text:span><text:span text:style-name="T24"><text:tab/></text:span><text:span text:style-name="T24"> <text:s text:c="3"/></text:span><text:span text:style-name="T24">"name": </text:span><text:span text:style-name="T24">"longitude",</text:span></text:p>
            <text:p text:style-name="P33"><text:span text:style-name="T24"><text:s text:c="4"/></text:span><text:span text:style-name="T24"><text:tab/></text:span><text:span text:style-name="T24"><text:tab/></text:span><text:span text:style-name="T24"><text:tab/></text:span><text:span text:style-name="T24"> <text:s text:c="3"/></text:span><text:span text:style-name="T24">"type": </text:span><text:span text:style-name="T24">"double" </text:span><text:span text:style-name="T24"><text:tab/></text:span><text:span text:style-name="T24"><text:tab/></text:span><text:span text:style-name="T24">} <text:s text:c="4"/></text:span><text:span text:style-name="T24"><text:tab/></text:span><text:span text:style-name="T24"><text:tab/></text:span><text:span text:style-name="T24">] <text:s text:c="4"/></text:span><text:span text:style-name="T24"><text:tab/></text:span><text:span text:style-name="T24"><text:tab/></text:span><text:span text:style-name="T24">} <text:s text:c="4"/></text:span><text:span text:style-name="T24"><text:tab/></text:span><text:span text:style-name="T24">] <text:s text:c="4"/>}] }</text:span></text:p>
          </draw:text-box>
        </draw:frame>
        <presentation:notes draw:style-name="dp8">
          <draw:page-thumbnail draw:style-name="gr2" draw:layer="layout" svg:width="15.597cm" svg:height="10.985cm" svg:x="2.623cm" svg:y="2.258cm" draw:page-number="131" presentation:class="page"/>
          <draw:frame presentation:style-name="pr6" draw:text-style-name="P18" draw:layer="layout" svg:width="14.362cm" svg:height="11.254cm" svg:x="3.25cm" svg:y="14.128cm" presentation:class="notes" presentation:placeholder="true">
            <draw:text-box/>
          </draw:frame>
        </presentation:notes>
      </draw:page>
      <draw:page draw:name="page132" draw:style-name="dp3" draw:master-page-name="Standard" presentation:presentation-page-layout-name="AL3T1">
        <draw:frame presentation:style-name="pr9" draw:layer="layout" svg:width="23.499cm" svg:height="3.575cm" svg:x="3.033cm" svg:y="2.367cm" presentation:class="title">
          <draw:text-box>
            <text:p>Utilisation du schéma</text:p>
          </draw:text-box>
        </draw:frame>
        <draw:frame presentation:style-name="pr5" draw:layer="layout" svg:width="23.499cm" svg:height="12.18cm" svg:x="3.033cm" svg:y="6.283cm" presentation:class="outline" presentation:user-transformed="true">
          <draw:text-box>
            <text:list text:style-name="L2">
              <text:list-item>
                <text:p><text:span text:style-name="T41">Confluent Schema </text:span><text:span text:style-name="T41">Registry</text:span> offre une API Rest </text:p>
                <text:list>
                  <text:list-item>
                    <text:p><text:span text:style-name="T2">Permettant</text:span><text:span text:style-name="T113"> de </text:span><text:span text:style-name="T113">configurer le mode </text:span><text:span text:style-name="T113">de compatibilité</text:span></text:p>
                  </text:list-item>
                  <text:list-item>
                    <text:p>Permettant de stocker des Schema</text:p>
                  </text:list-item>
                  <text:list-item>
                    <text:p>De détecter les incompatibilités entre schémas<text:line-break/>=&gt; Si le schéma est incompatible, le producteur est empêché de produire vers le topic<text:line-break/>Le nouveau format de message devra être publié vers un autre topic</text:p>
                  </text:list-item>
                </text:list>
              </text:list-item>
              <text:list-item>
                <text:p>Les sérialiseurs inclut l’id du schéma dans les messages et font appel à l’API </text:p>
              </text:list-item>
            </text:list>
          </draw:text-box>
        </draw:frame>
        <presentation:notes draw:style-name="dp8">
          <draw:page-thumbnail draw:style-name="gr2" draw:layer="layout" svg:width="15.597cm" svg:height="10.985cm" svg:x="2.623cm" svg:y="2.258cm" draw:page-number="132" presentation:class="page"/>
          <draw:frame presentation:style-name="pr6" draw:text-style-name="P13" draw:layer="layout" svg:width="14.362cm" svg:height="11.254cm" svg:x="3.25cm" svg:y="14.128cm" presentation:class="notes" presentation:placeholder="true">
            <draw:text-box/>
          </draw:frame>
        </presentation:notes>
      </draw:page>
      <draw:page draw:name="page133" draw:style-name="dp3" draw:master-page-name="Standard" presentation:presentation-page-layout-name="AL3T1">
        <draw:frame presentation:style-name="pr9" draw:layer="layout" svg:width="23.499cm" svg:height="3.575cm" svg:x="3.033cm" svg:y="2.367cm" presentation:class="title">
          <draw:text-box>
            <text:p>Schema Registry</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2.502cm" svg:height="12.723cm" svg:x="3.036cm" svg:y="6.694cm">
          <draw:image xlink:href="Pictures/10000001000003E9000002360842F6F0.png" xlink:type="simple" xlink:show="embed" xlink:actuate="onLoad" draw:mime-type="image/png">
            <text:p/>
          </draw:image>
        </draw:frame>
        <presentation:notes draw:style-name="dp8">
          <draw:page-thumbnail draw:style-name="gr2" draw:layer="layout" svg:width="15.597cm" svg:height="10.985cm" svg:x="2.623cm" svg:y="2.258cm" draw:page-number="133" presentation:class="page"/>
          <draw:frame presentation:style-name="pr6" draw:text-style-name="P13" draw:layer="layout" svg:width="14.362cm" svg:height="11.254cm" svg:x="3.25cm" svg:y="14.128cm" presentation:class="notes" presentation:placeholder="true">
            <draw:text-box/>
          </draw:frame>
        </presentation:notes>
      </draw:page>
      <draw:page draw:name="Modes de compatibilité" draw:style-name="dp9" draw:master-page-name="Vide_5f_">
        <draw:frame draw:name="Titre 2" presentation:style-name="pr23" draw:text-style-name="P43" draw:layer="layout" svg:width="23.499cm" svg:height="3.574cm" svg:x="3.033cm" svg:y="2.367cm" presentation:class="title" presentation:user-transformed="true">
          <draw:text-box>
            <text:p text:style-name="P42"><text:span text:style-name="T114">Modes de compatibilité</text:span></text:p>
          </draw:text-box>
        </draw:frame>
        <draw:frame draw:name="Espace réservé du texte 2" presentation:style-name="pr24" draw:text-style-name="P47" draw:layer="layout" svg:width="23.499cm" svg:height="12.18cm" svg:x="3.033cm" svg:y="6.508cm" presentation:class="outline" presentation:user-transformed="true">
          <draw:text-box>
            <text:p text:style-name="P44"><text:span text:style-name="T115">Trois niveaux de compatibilité </text:span><text:span text:style-name="T115">sont pris en charge par </text:span><text:span text:style-name="T116">Schema Registr</text:span><text:span text:style-name="T115">y :</text:span></text:p>
            <text:list text:style-name="L9">
              <text:list-item>
                <text:p text:style-name="P45"><text:span text:style-name="T117">Compatibilité </text:span><text:span text:style-name="T117">backward</text:span><text:span text:style-name="T115"> : Tous les </text:span><text:span text:style-name="T115">messages de la version </text:span><text:span text:style-name="T115">précédente du schéma </text:span><text:span text:style-name="T115">sont également valides </text:span><text:span text:style-name="T115">selon la nouvelle version</text:span></text:p>
              </text:list-item>
              <text:list-item>
                <text:p text:style-name="P45"><text:span text:style-name="T117">Compatibilité forward</text:span><text:span text:style-name="T115"> : </text:span><text:span text:style-name="T115">Tous les messages de la </text:span><text:span text:style-name="T115">nouvelle version sont </text:span><text:span text:style-name="T115">également valides selon </text:span><text:span text:style-name="T115">la version précédente du </text:span><text:span text:style-name="T115">schéma</text:span></text:p>
              </text:list-item>
              <text:list-item>
                <text:p text:style-name="P45"><text:span text:style-name="T117">Compatibilité full</text:span><text:span text:style-name="T115"> : La </text:span><text:span text:style-name="T115">version précédente du </text:span><text:span text:style-name="T115">schéma et la nouvelle </text:span><text:span text:style-name="T115">version sont toutes deux </text:span><text:span text:style-name="T115">compatibles ascendante </text:span><text:span text:style-name="T115">et descendante</text:span></text:p>
              </text:list-item>
            </text:list>
            <text:p text:style-name="P46"><text:span text:style-name="T115">Les vérifications de </text:span><text:span text:style-name="T115">compatibilité s’effectuent soit </text:span><text:span text:style-name="T115">juste avec la précédente </text:span><text:span text:style-name="T115">version, soit avec toutes les </text:span><text:span text:style-name="T115">versions précédentes.</text:span></text:p>
          </draw:text-box>
        </draw:frame>
        <draw:custom-shape draw:name="ZoneTexte 2" draw:style-name="gr29" draw:text-style-name="P49" draw:layer="layout" svg:width="24.405cm" svg:height="0.844cm" svg:x="0.809cm" svg:y="19.581cm">
          <text:p text:style-name="P48"><text:span text:style-name="T118">https://docs.confluent.io/platform/current/schema-registry/fundamentals/schema-evolution.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Espace réservé de l'image des diapositives 2" draw:style-name="gr2" draw:layer="layout" svg:width="15.535cm" svg:height="10.984cm" svg:x="2.655cm" svg:y="2.258cm" draw:page-number="134" presentation:class="page"/>
          <draw:frame draw:name="Espace réservé des notes 2" presentation:style-name="pr25" draw:text-style-name="P50" draw:layer="layout" svg:width="14.362cm" svg:height="11.253cm" svg:x="3.25cm" svg:y="14.128cm" presentation:class="notes" presentation:placeholder="true" presentation:user-transformed="true">
            <draw:text-box/>
          </draw:frame>
        </presentation:notes>
      </draw:page>
      <draw:page draw:name="Choix du mode" draw:style-name="dp9" draw:master-page-name="Vide_5f_">
        <draw:frame draw:name="Titre 3" presentation:style-name="pr23" draw:text-style-name="P43" draw:layer="layout" svg:width="23.499cm" svg:height="3.574cm" svg:x="3.033cm" svg:y="2.367cm" presentation:class="title" presentation:user-transformed="true">
          <draw:text-box>
            <text:p text:style-name="P42"><text:span text:style-name="T114">Choix du mode</text:span></text:p>
          </draw:text-box>
        </draw:frame>
        <draw:frame draw:name="Espace réservé du texte 1" presentation:style-name="pr24" draw:text-style-name="P47" draw:layer="layout" svg:width="23.499cm" svg:height="12.18cm" svg:x="3.033cm" svg:y="6.283cm" presentation:class="outline" presentation:user-transformed="true">
          <draw:text-box>
            <text:p text:style-name="P51"><text:span text:style-name="T115">La compatibilité backward, </text:span><text:span text:style-name="T115">configuration par défaut, </text:span><text:span text:style-name="T115">est à privilégier. </text:span></text:p>
            <text:list text:style-name="L11">
              <text:list-item>
                <text:p text:style-name="P52"><text:span text:style-name="T115">Elle permet à un </text:span><text:span text:style-name="T115">consommateur de lire les </text:span><text:span text:style-name="T115">anciens messages, ce qui </text:span><text:span text:style-name="T115">est compatible avec la </text:span><text:span text:style-name="T115">possibilité de Kafka de </text:span><text:span text:style-name="T115">s’abonner à posteriori.</text:span></text:p>
              </text:list-item>
              <text:list-item>
                <text:p text:style-name="P52"><text:span text:style-name="T115">Cependant, cela oblige à </text:span><text:span text:style-name="T115">upgrader les </text:span><text:span text:style-name="T115">consommateurs en </text:span><text:span text:style-name="T115">premier afin qu’il s’adapte </text:span><text:span text:style-name="T115">à la nouvelle version du </text:span><text:span text:style-name="T115">message.</text:span></text:p>
              </text:list-item>
            </text:list>
            <text:p text:style-name="P51"><text:span text:style-name="T115">Avec la compatibilité forward, </text:span><text:span text:style-name="T115">ce sont les producteurs qui </text:span><text:span text:style-name="T115">sont mis à jour en premier. </text:span><text:span text:style-name="T115">Par contre, les possibilités </text:span><text:span text:style-name="T115">de mises à jour sont très </text:span><text:span text:style-name="T115">restrictives pour le </text:span><text:span text:style-name="T115">producteur.</text:span></text:p>
          </draw:text-box>
        </draw:frame>
        <presentation:notes draw:style-name="dp8">
          <draw:page-thumbnail draw:name="Espace réservé de l'image des diapositives 3" draw:style-name="gr2" draw:layer="layout" svg:width="15.535cm" svg:height="10.984cm" svg:x="2.655cm" svg:y="2.258cm" draw:page-number="135" presentation:class="page"/>
          <draw:frame draw:name="Espace réservé des notes 1" presentation:style-name="pr26" draw:text-style-name="P50" draw:layer="layout" svg:width="14.362cm" svg:height="11.253cm" svg:x="3.25cm" svg:y="14.128cm" presentation:class="notes" presentation:placeholder="true" presentation:user-transformed="true">
            <draw:text-box/>
          </draw:frame>
        </presentation:notes>
      </draw:page>
      <draw:page draw:name="page136" draw:style-name="dp3" draw:master-page-name="Standard" presentation:presentation-page-layout-name="AL3T1">
        <draw:frame presentation:style-name="pr9" draw:layer="layout" svg:width="23.499cm" svg:height="3.575cm" svg:x="3.033cm" svg:y="2.367cm" presentation:class="title">
          <draw:text-box>
            <text:p>Dépendances Confluent</text:p>
          </draw:text-box>
        </draw:frame>
        <draw:frame presentation:style-name="pr5" draw:text-style-name="P53" draw:layer="layout" svg:width="23.499cm" svg:height="12.18cm" svg:x="3.033cm" svg:y="6.283cm" presentation:class="outline">
          <draw:text-box>
            <text:list text:style-name="L2">
              <text:list-item>
                <text:p text:style-name="P33"><text:span text:style-name="T79">&lt;dependencies&gt;</text:span></text:p>
              </text:list-item>
              <text:list-item>
                <text:p text:style-name="P33"><text:span text:style-name="T79"><text:s text:c="2"/></text:span><text:span text:style-name="T79">&lt;dependency&gt;</text:span></text:p>
              </text:list-item>
              <text:list-item>
                <text:p text:style-name="P33"><text:span text:style-name="T79"><text:s text:c="4"/></text:span><text:span text:style-name="T79">&lt;groupId&gt;io.confluent&lt;</text:span><text:span text:style-name="T79">/groupId&gt;</text:span></text:p>
              </text:list-item>
              <text:list-item>
                <text:p text:style-name="P33"><text:span text:style-name="T119"><text:s text:c="4"/></text:span><text:span text:style-name="T119">&lt;artifactId&gt;kafka-</text:span><text:span text:style-name="T119">schema-registry&lt;/artif</text:span><text:span text:style-name="T119">actId&gt;</text:span></text:p>
              </text:list-item>
              <text:list-item>
                <text:p text:style-name="P33"><text:span text:style-name="T79"><text:s text:c="4"/></text:span><text:span text:style-name="T79">&lt;version&gt;7.2.1&lt;/versio</text:span><text:span text:style-name="T79">n&gt;</text:span></text:p>
              </text:list-item>
              <text:list-item>
                <text:p text:style-name="P33"><text:span text:style-name="T79"><text:s text:c="2"/></text:span><text:span text:style-name="T79">&lt;/dependency&gt;</text:span></text:p>
              </text:list-item>
              <text:list-item>
                <text:p text:style-name="P33"><text:span text:style-name="T79"><text:s text:c="2"/></text:span><text:span text:style-name="T79">&lt;dependency&gt;</text:span></text:p>
              </text:list-item>
              <text:list-item>
                <text:p text:style-name="P33"><text:span text:style-name="T79"><text:s text:c="4"/></text:span><text:span text:style-name="T79">&lt;groupId&gt;io.confluent&lt;</text:span><text:span text:style-name="T79">/groupId&gt;</text:span></text:p>
              </text:list-item>
              <text:list-item>
                <text:p text:style-name="P33"><text:span text:style-name="T119"><text:s text:c="4"/></text:span><text:span text:style-name="T119">&lt;artifactId&gt;kafka-</text:span><text:span text:style-name="T119">avro-serializer&lt;/artif</text:span><text:span text:style-name="T119">actId&gt;</text:span></text:p>
              </text:list-item>
              <text:list-item>
                <text:p text:style-name="P33"><text:span text:style-name="T79"><text:s text:c="4"/></text:span><text:span text:style-name="T79">&lt;version&gt;7.2.1&lt;/versio</text:span><text:span text:style-name="T79">n&gt;</text:span></text:p>
              </text:list-item>
              <text:list-item>
                <text:p text:style-name="P33"><text:span text:style-name="T79"><text:s text:c="2"/></text:span><text:span text:style-name="T79">&lt;/dependency&gt;</text:span></text:p>
              </text:list-item>
              <text:list-item>
                <text:p text:style-name="P33"><text:span text:style-name="T79">&lt;/dependencies&gt;</text:span></text:p>
              </text:list-item>
              <text:list-item>
                <text:p text:style-name="P33"><text:span text:style-name="T79">&lt;repositories&gt;</text:span></text:p>
              </text:list-item>
              <text:list-item>
                <text:p text:style-name="P33"><text:span text:style-name="T79"><text:s text:c="2"/></text:span><text:span text:style-name="T79">&lt;repository&gt;</text:span></text:p>
              </text:list-item>
              <text:list-item>
                <text:p text:style-name="P33"><text:span text:style-name="T79"><text:s text:c="4"/></text:span><text:span text:style-name="T79">&lt;id&gt;confluent&lt;/id&gt;</text:span></text:p>
              </text:list-item>
              <text:list-item>
                <text:p text:style-name="P33"><text:span text:style-name="T119"><text:s text:c="4"/></text:span><text:span text:style-name="T119">&lt;url&gt;https://packages.</text:span><text:span text:style-name="T119">confluent.io/maven/&lt;/u</text:span><text:span text:style-name="T119">rl&gt;</text:span></text:p>
              </text:list-item>
              <text:list-item>
                <text:p text:style-name="P33"><text:span text:style-name="T79"><text:s text:c="2"/></text:span><text:span text:style-name="T79">&lt;/repository&gt;</text:span></text:p>
              </text:list-item>
              <text:list-item>
                <text:p text:style-name="P33"><text:span text:style-name="T79">&lt;/repositories&gt;</text:span></text:p>
              </text:list-item>
            </text:list>
          </draw:text-box>
        </draw:frame>
        <presentation:notes draw:style-name="dp8">
          <draw:page-thumbnail draw:style-name="gr2" draw:layer="layout" svg:width="15.597cm" svg:height="10.985cm" svg:x="2.623cm" svg:y="2.258cm" draw:page-number="136" presentation:class="page"/>
          <draw:frame presentation:style-name="pr6" draw:text-style-name="P13" draw:layer="layout" svg:width="14.362cm" svg:height="11.254cm" svg:x="3.25cm" svg:y="14.128cm" presentation:class="notes" presentation:placeholder="true">
            <draw:text-box/>
          </draw:frame>
        </presentation:notes>
      </draw:page>
      <draw:page draw:name="page137" draw:style-name="dp3" draw:master-page-name="Standard" presentation:presentation-page-layout-name="AL3T1">
        <draw:frame presentation:style-name="pr9" draw:layer="layout" svg:width="23.499cm" svg:height="3.575cm" svg:x="3.033cm" svg:y="2.367cm" presentation:class="title">
          <draw:text-box>
            <text:p>Maven plug-in Avro</text:p>
          </draw:text-box>
        </draw:frame>
        <draw:frame presentation:style-name="pr5" draw:layer="layout" svg:width="23.499cm" svg:height="12.18cm" svg:x="3.033cm" svg:y="6.283cm" presentation:class="outline">
          <draw:text-box>
            <text:list text:style-name="L2">
              <text:list-item>
                <text:p text:style-name="P33"><text:span text:style-name="T79"><text:s text:c="5"/></text:span><text:span text:style-name="T79">&lt;plugin&gt;</text:span></text:p>
              </text:list-item>
              <text:list-item>
                <text:p text:style-name="P33"><text:span text:style-name="T79"><text:s text:c="12"/></text:span><text:span text:style-name="T79">&lt;groupId&gt;org.apache.av</text:span><text:span text:style-name="T79">ro&lt;/groupId&gt;</text:span></text:p>
              </text:list-item>
              <text:list-item>
                <text:p text:style-name="P33"><text:span text:style-name="T119"><text:s text:c="12"/></text:span><text:span text:style-name="T119">&lt;artifactId&gt;avro-</text:span><text:span text:style-name="T119">maven-plugin&lt;/artifact</text:span><text:span text:style-name="T119">Id&gt;</text:span></text:p>
              </text:list-item>
              <text:list-item>
                <text:p text:style-name="P33"><text:span text:style-name="T79"><text:s text:c="12"/></text:span><text:span text:style-name="T79">&lt;version&gt;1.8.2&lt;/versio</text:span><text:span text:style-name="T79">n&gt;</text:span></text:p>
              </text:list-item>
              <text:list-item>
                <text:p text:style-name="P33"><text:span text:style-name="T79"><text:s text:c="12"/></text:span><text:span text:style-name="T79">&lt;executions&gt;</text:span></text:p>
              </text:list-item>
              <text:list-item>
                <text:p text:style-name="P33"><text:span text:style-name="T79"><text:s text:c="16"/></text:span><text:span text:style-name="T79">&lt;execution&gt;</text:span></text:p>
              </text:list-item>
              <text:list-item>
                <text:p text:style-name="P33"><text:span text:style-name="T79"><text:s text:c="20"/></text:span><text:span text:style-name="T79">&lt;id&gt;schemas&lt;/id&gt;</text:span></text:p>
              </text:list-item>
              <text:list-item>
                <text:p text:style-name="P33"><text:span text:style-name="T79"><text:s text:c="20"/></text:span><text:span text:style-name="T79">&lt;phase&gt;generate-</text:span><text:span text:style-name="T79">sources&lt;/phase&gt;</text:span></text:p>
              </text:list-item>
              <text:list-item>
                <text:p text:style-name="P33"><text:span text:style-name="T79"><text:s text:c="20"/></text:span><text:span text:style-name="T79">&lt;goals&gt;</text:span></text:p>
              </text:list-item>
              <text:list-item>
                <text:p text:style-name="P33"><text:span text:style-name="T119"><text:s text:c="24"/></text:span><text:span text:style-name="T119">&lt;goal&gt;schema&lt;/goal&gt;</text:span></text:p>
              </text:list-item>
              <text:list-item>
                <text:p text:style-name="P33"><text:span text:style-name="T79"><text:s text:c="24"/></text:span><text:span text:style-name="T79">&lt;goal&gt;protocol&lt;/goal&gt;</text:span></text:p>
              </text:list-item>
              <text:list-item>
                <text:p text:style-name="P33"><text:span text:style-name="T79"><text:s text:c="24"/></text:span><text:span text:style-name="T79">&lt;goal&gt;idl-protocol&lt;/go</text:span><text:span text:style-name="T79">al&gt;</text:span></text:p>
              </text:list-item>
              <text:list-item>
                <text:p text:style-name="P33"><text:span text:style-name="T79"><text:s text:c="20"/></text:span><text:span text:style-name="T79">&lt;/goals&gt;</text:span></text:p>
              </text:list-item>
              <text:list-item>
                <text:p text:style-name="P33"><text:span text:style-name="T79"><text:s text:c="20"/></text:span><text:span text:style-name="T79">&lt;configuration&gt; <text:s text:c="7"/></text:span><text:span text:style-name="T79"><text:s text:c="16"/></text:span></text:p>
              </text:list-item>
              <text:list-item>
                <text:p text:style-name="P33"><text:span text:style-name="T79"><text:s text:c="21"/></text:span><text:span text:style-name="T79">&lt;sourceDirectory&gt;./src</text:span><text:span text:style-name="T79">/main/resources/&lt;/sour</text:span><text:span text:style-name="T79">ceDirectory&gt;</text:span></text:p>
              </text:list-item>
              <text:list-item>
                <text:p text:style-name="P33"><text:span text:style-name="T79"><text:s text:c="24"/></text:span><text:span text:style-name="T79">&lt;outputDirectory&gt;./src</text:span><text:span text:style-name="T79">/main/java/&lt;/outputDir</text:span><text:span text:style-name="T79">ectory&gt;</text:span></text:p>
              </text:list-item>
              <text:list-item>
                <text:p text:style-name="P33"><text:span text:style-name="T79"><text:s text:c="20"/></text:span><text:span text:style-name="T79">&lt;/configuration&gt;</text:span></text:p>
              </text:list-item>
              <text:list-item>
                <text:p text:style-name="P33"><text:span text:style-name="T79"><text:s text:c="16"/></text:span><text:span text:style-name="T79">&lt;/execution&gt;</text:span></text:p>
              </text:list-item>
              <text:list-item>
                <text:p text:style-name="P33"><text:span text:style-name="T79"><text:s text:c="12"/></text:span><text:span text:style-name="T79">&lt;/executions&gt;</text:span></text:p>
              </text:list-item>
              <text:list-item>
                <text:p text:style-name="P33"><text:span text:style-name="T79"><text:s text:c="8"/></text:span><text:span text:style-name="T79">&lt;/plugin&gt;</text:span></text:p>
              </text:list-item>
              <text:list-item>
                <text:p text:style-name="P33"><text:span text:style-name="T79"/></text:p>
              </text:list-item>
              <text:list-item>
                <text:p><text:span text:style-name="T120">=&gt; </text:span><text:span text:style-name="T121">mvn compile</text:span><text:span text:style-name="T120"> </text:span><text:span text:style-name="T120">génère les classes </text:span><text:span text:style-name="T120">du modèle</text:span></text:p>
              </text:list-item>
            </text:list>
          </draw:text-box>
        </draw:frame>
        <presentation:notes draw:style-name="dp8">
          <draw:page-thumbnail draw:style-name="gr2" draw:layer="layout" svg:width="15.597cm" svg:height="10.985cm" svg:x="2.623cm" svg:y="2.258cm" draw:page-number="137" presentation:class="page"/>
          <draw:frame presentation:style-name="pr6" draw:text-style-name="P13" draw:layer="layout" svg:width="14.362cm" svg:height="11.254cm" svg:x="3.25cm" svg:y="14.128cm" presentation:class="notes" presentation:placeholder="true">
            <draw:text-box/>
          </draw:frame>
        </presentation:notes>
      </draw:page>
      <draw:page draw:name="page138" draw:style-name="dp3" draw:master-page-name="Standard" presentation:presentation-page-layout-name="AL3T1">
        <draw:frame presentation:style-name="pr9" draw:layer="layout" svg:width="23.499cm" svg:height="3.575cm" svg:x="3.033cm" svg:y="2.367cm" presentation:class="title">
          <draw:text-box>
            <text:p>Producteur (1)</text:p>
          </draw:text-box>
        </draw:frame>
        <draw:frame presentation:style-name="pr5" draw:layer="layout" svg:width="23.499cm" svg:height="12.18cm" svg:x="3.033cm" svg:y="6.283cm" presentation:class="outline" presentation:user-transformed="true">
          <draw:text-box>
            <text:list text:style-name="L2">
              <text:list-item>
                <text:p>Le producteur de message peut contenir du code permettant d’enregistrer le schéma en utilisant la librairie cliente de <text:span text:style-name="T14">Schema </text:span><text:span text:style-name="T14">Registry</text:span></text:p>
              </text:list-item>
              <text:list-item>
                <text:p/>
              </text:list-item>
            </text:list>
            <text:p text:style-name="P54"><text:span text:style-name="T122">// Lecture du schéma</text:span></text:p>
            <text:p text:style-name="P54"><text:span text:style-name="T123">Schema avroSchema = </text:span><text:span text:style-name="T124">new</text:span><text:span text:style-name="T123"> </text:span><text:span text:style-name="T123">Schema.Parser().parse(inputStream);</text:span></text:p>
            <text:p text:style-name="P54"><text:span text:style-name="T122">// Instanciation du client</text:span></text:p>
            <text:p text:style-name="P54"><text:span text:style-name="T123">CachedSchemaRegistryClient client = </text:span><text:span text:style-name="T124">new</text:span><text:span text:style-name="T123"> </text:span><text:span text:style-name="T123">CachedSchemaRegistryClient(REGISTRY_URL, 20);</text:span></text:p>
            <text:p text:style-name="P54"><text:span text:style-name="T122">// Enregistrement du sujet, le nom correspond au nom du </text:span><text:span text:style-name="T122">topic + suffixe </text:span></text:p>
            <text:p><text:span text:style-name="T125">client.register(topicName +"-value", </text:span><text:span text:style-name="T126">new</text:span><text:span text:style-name="T127"> </text:span><text:span text:style-name="T127">AvroSchema(</text:span><text:span text:style-name="T128">avroSchema</text:span><text:span text:style-name="T125">);</text:span></text:p>
          </draw:text-box>
        </draw:frame>
        <presentation:notes draw:style-name="dp8">
          <draw:page-thumbnail draw:style-name="gr2" draw:layer="layout" svg:width="15.597cm" svg:height="10.985cm" svg:x="2.623cm" svg:y="2.258cm" draw:page-number="138" presentation:class="page"/>
          <draw:frame presentation:style-name="pr6" draw:text-style-name="P13" draw:layer="layout" svg:width="14.362cm" svg:height="11.254cm" svg:x="3.25cm" svg:y="14.128cm" presentation:class="notes" presentation:placeholder="true">
            <draw:text-box/>
          </draw:frame>
        </presentation:notes>
      </draw:page>
      <draw:page draw:name="page139" draw:style-name="dp3" draw:master-page-name="Standard" presentation:presentation-page-layout-name="AL3T1">
        <draw:frame presentation:style-name="pr9" draw:layer="layout" svg:width="23.499cm" svg:height="3.575cm" svg:x="3.033cm" svg:y="2.367cm" presentation:class="title">
          <draw:text-box>
            <text:p>Producteur (2)</text:p>
          </draw:text-box>
        </draw:frame>
        <draw:frame presentation:style-name="pr5" draw:layer="layout" svg:width="23.499cm" svg:height="12.18cm" svg:x="3.033cm" svg:y="6.283cm" presentation:class="outline">
          <draw:text-box>
            <text:list text:style-name="L2">
              <text:list-item>
                <text:p>Les propriétés du <text:span text:style-name="T14">KafkaProducer</text:span> doivent contenir :</text:p>
                <text:list>
                  <text:list-item>
                    <text:p><text:span text:style-name="T74">schema.registry.url</text:span> :<text:line-break/> L’adresse du serveur de registry</text:p>
                  </text:list-item>
                  <text:list-item>
                    <text:p>Le sérialiseur de valeur :<text:line-break/><text:span text:style-name="T129">io.confluent.kafka.serializers.</text:span><text:span text:style-name="T129">KafkaAvroSerializer</text:span></text:p>
                  </text:list-item>
                </text:list>
              </text:list-item>
            </text:list>
          </draw:text-box>
        </draw:frame>
        <presentation:notes draw:style-name="dp8">
          <draw:page-thumbnail draw:style-name="gr2" draw:layer="layout" svg:width="15.597cm" svg:height="10.985cm" svg:x="2.623cm" svg:y="2.258cm" draw:page-number="139" presentation:class="page"/>
          <draw:frame presentation:style-name="pr6" draw:text-style-name="P13" draw:layer="layout" svg:width="14.362cm" svg:height="11.254cm" svg:x="3.25cm" svg:y="14.128cm" presentation:class="notes" presentation:placeholder="true">
            <draw:text-box/>
          </draw:frame>
        </presentation:notes>
      </draw:page>
      <draw:page draw:name="page140" draw:style-name="dp3" draw:master-page-name="Standard" presentation:presentation-page-layout-name="AL3T1">
        <draw:frame presentation:style-name="pr9" draw:layer="layout" svg:width="23.499cm" svg:height="3.575cm" svg:x="3.033cm" svg:y="2.367cm" presentation:class="title">
          <draw:text-box>
            <text:p>Consommateur</text:p>
          </draw:text-box>
        </draw:frame>
        <draw:frame presentation:style-name="pr5" draw:layer="layout" svg:width="23.499cm" svg:height="12.18cm" svg:x="3.033cm" svg:y="6.283cm" presentation:class="outline" presentation:user-transformed="true">
          <draw:text-box>
            <text:list text:style-name="L2">
              <text:list-item>
                <text:p><text:span text:style-name="T14">KafkaConsumer</text:span> doit également préciser l’URL et le désérialiseur à <text:line-break/><text:span text:style-name="T130">io.confluent.kafka.serializers.Kafk</text:span><text:span text:style-name="T130">aAvroDeserializer</text:span></text:p>
              </text:list-item>
              <text:list-item>
                <text:p>Il peut récupérer les messages sous la forme de <text:span text:style-name="T74">GenericRecord</text:span> plutôt que des classes spécialisés.</text:p>
              </text:list-item>
              <text:list-item>
                <text:p text:style-name="P33"><text:span text:style-name="T131">ConsumerRecords&lt;String, GenericRecord&gt; </text:span><text:span text:style-name="T131">records</text:span><text:span text:style-name="T132"> = </text:span><text:span text:style-name="T132">consumer.poll(Duration.ofMillis(sleep));</text:span></text:p>
              </text:list-item>
              <text:list-item>
                <text:p text:style-name="P33"><text:span text:style-name="T132">for (ConsumerRecord&lt;String, GenericRecord&gt; </text:span><text:span text:style-name="T132">record : records) {</text:span></text:p>
              </text:list-item>
              <text:list-item>
                <text:p text:style-name="P33"><text:span text:style-name="T132"><text:s text:c="2"/></text:span><text:span text:style-name="T132">System.out.println("Value is " + </text:span><text:span text:style-name="T131">record.value()</text:span><text:span text:style-name="T132">);</text:span></text:p>
              </text:list-item>
            </text:list>
          </draw:text-box>
        </draw:frame>
        <draw:frame draw:style-name="gr30" draw:text-style-name="P34" draw:layer="layout" svg:width="12.796cm" svg:height="1.216cm" svg:x="1.603cm" svg:y="19.4cm">
          <draw:text-box>
            <text:p><text:span text:style-name="T73">Atelier 5 : Schema Registry et Avro</text:span></text:p>
          </draw:text-box>
        </draw:frame>
        <presentation:notes draw:style-name="dp8">
          <draw:page-thumbnail draw:style-name="gr2" draw:layer="layout" svg:width="15.597cm" svg:height="10.985cm" svg:x="2.623cm" svg:y="2.258cm" draw:page-number="140" presentation:class="page"/>
          <draw:frame presentation:style-name="pr6" draw:text-style-name="P13" draw:layer="layout" svg:width="14.362cm" svg:height="11.254cm" svg:x="3.25cm" svg:y="14.128cm" presentation:class="notes" presentation:placeholder="true">
            <draw:text-box/>
          </draw:frame>
        </presentation:notes>
      </draw:page>
      <draw:page draw:name="page141"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Clients</text:span></text:p>
              </text:list-header>
            </text:list>
          </draw:text-box>
        </draw:frame>
        <draw:frame presentation:style-name="pr27"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13"/></text:p>
              </text:list-item>
              <text:list-item>
                <text:p text:style-name="P19"><text:span text:style-name="T2">Types de clients</text:span></text:p>
              </text:list-item>
              <text:list-item>
                <text:p text:style-name="P19"><text:span text:style-name="T2">Production</text:span><text:span text:style-name="T12"> </text:span><text:span text:style-name="T2">de</text:span><text:span text:style-name="T12"> </text:span><text:span text:style-name="T2">messages</text:span></text:p>
              </text:list-item>
              <text:list-item>
                <text:p text:style-name="P19"><text:span text:style-name="T2">Consommation de messages</text:span></text:p>
              </text:list-item>
              <text:list-item>
                <text:p text:style-name="P28"><text:span text:style-name="T2">Garanties Kafka</text:span></text:p>
              </text:list-item>
              <text:list-item>
                <text:p text:style-name="P19"><text:span text:style-name="T30">Schema registry</text:span></text:p>
              </text:list-item>
              <text:list-item>
                <text:p text:style-name="P19"><text:span text:style-name="T12">Kafka Connect</text:span></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42"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text:span text:style-name="T31">Kafka Connect</text:span> permet d’intégrer Apache Kafka avec d’autres systèmes en utilisant des connecteurs. </text:p>
                <text:list>
                  <text:list-header>
                    <text:p>=&gt; Ingérer des bases de données volumineuses, des données de monitoring dans des topics avec des latences minimales</text:p>
                    <text:p>=&gt; Exporter des topics vers des supports persistants</text:p>
                  </text:list-header>
                </text:list>
              </text:list-item>
              <text:list-item>
                <text:p>Kafka Connect est également utilisé dans <text:span text:style-name="T50">Kafka Mirrors </text:span><text:span text:style-name="T50">2</text:span> pour répliquer les données d’un cluster vers un autre cluster</text:p>
              </text:list-item>
            </text:list>
          </draw:text-box>
        </draw:frame>
        <presentation:notes draw:style-name="dp5">
          <draw:page-thumbnail draw:style-name="gr2" draw:layer="layout" svg:width="15.597cm" svg:height="10.985cm" svg:x="2.623cm" svg:y="2.258cm" draw:page-number="142" presentation:class="page"/>
          <draw:frame presentation:style-name="pr6" draw:text-style-name="P13" draw:layer="layout" svg:width="14.362cm" svg:height="11.254cm" svg:x="3.25cm" svg:y="14.128cm" presentation:class="notes" presentation:placeholder="true">
            <draw:text-box/>
          </draw:frame>
        </presentation:notes>
      </draw:page>
      <draw:page draw:name="page143" draw:style-name="dp3" draw:master-page-name="Standard" presentation:presentation-page-layout-name="AL3T1">
        <draw:frame presentation:style-name="pr9" draw:layer="layout" svg:width="23.499cm" svg:height="3.575cm" svg:x="3.033cm" svg:y="2.367cm" presentation:class="title">
          <draw:text-box>
            <text:p>Fonctionnalités</text:p>
          </draw:text-box>
        </draw:frame>
        <draw:frame presentation:style-name="pr5" draw:layer="layout" svg:width="23.499cm" svg:height="12.18cm" svg:x="3.033cm" svg:y="6.283cm" presentation:class="outline">
          <draw:text-box>
            <text:list text:style-name="L3">
              <text:list-item>
                <text:p>Un cadre commun pour les connecteurs qui standardisent l’intégration</text:p>
              </text:list-item>
              <text:list-item>
                <text:p>Mode distribué ou standalone</text:p>
              </text:list-item>
              <text:list-item>
                <text:p>Une interface REST permettant de gérer facilement les connecteurs</text:p>
              </text:list-item>
              <text:list-item>
                <text:p>Gestion automatique des offsets</text:p>
              </text:list-item>
              <text:list-item>
                <text:p>Distribué et scalable : Possibilité de scaler les workers, basé sur la gestion de groupe <text:s/></text:p>
              </text:list-item>
              <text:list-item>
                <text:p>Intégration vers les systèmes de streaming ou batch</text:p>
              </text:list-item>
            </text:list>
          </draw:text-box>
        </draw:frame>
        <presentation:notes draw:style-name="dp5">
          <draw:page-thumbnail draw:style-name="gr2" draw:layer="layout" svg:width="15.597cm" svg:height="10.985cm" svg:x="2.623cm" svg:y="2.258cm" draw:page-number="143" presentation:class="page"/>
          <draw:frame presentation:style-name="pr6" draw:text-style-name="P13" draw:layer="layout" svg:width="14.362cm" svg:height="11.254cm" svg:x="3.25cm" svg:y="14.128cm" presentation:class="notes" presentation:placeholder="true">
            <draw:text-box/>
          </draw:frame>
        </presentation:notes>
      </draw:page>
      <draw:page draw:name="page144" draw:style-name="dp3" draw:master-page-name="Standard" presentation:presentation-page-layout-name="AL3T1">
        <draw:frame presentation:style-name="pr9" draw:layer="layout" svg:width="23.499cm" svg:height="3.575cm" svg:x="3.033cm" svg:y="2.367cm" presentation:class="title">
          <draw:text-box>
            <text:p>Mode standalone</text:p>
          </draw:text-box>
        </draw:frame>
        <draw:frame presentation:style-name="pr5" draw:layer="layout" svg:width="23.499cm" svg:height="12.18cm" svg:x="3.033cm" svg:y="6.283cm" presentation:class="outline">
          <draw:text-box>
            <text:list text:style-name="L2">
              <text:list-item>
                <text:p>Pour démarrer <text:span text:style-name="T14">Kafka Connect</text:span> en mode standalone </text:p>
              </text:list-item>
              <text:list-item>
                <text:p><text:span text:style-name="T133">&gt; bin/connect-standalone.sh </text:span><text:span text:style-name="T133">config/connect-</text:span><text:span text:style-name="T133">standalone.properties </text:span><text:span text:style-name="T133">connector1.properties </text:span><text:span text:style-name="T133">[connector2.properties …]</text:span></text:p>
              </text:list-item>
              <text:list-item>
                <text:p text:style-name="P36"/>
              </text:list-item>
              <text:list-item>
                <text:p text:style-name="P36">Le premier paramètre contient la configuration pour le worker. Il inclut entre autres :</text:p>
                <text:list>
                  <text:list-item>
                    <text:p text:style-name="P36"><text:span text:style-name="T31">bootstrap.servers</text:span></text:p>
                  </text:list-item>
                  <text:list-item>
                    <text:p text:style-name="P36"><text:span text:style-name="T31">key.converter, </text:span><text:span text:style-name="T31">value.converter</text:span></text:p>
                  </text:list-item>
                  <text:list-item>
                    <text:p text:style-name="P36"><text:span text:style-name="T31">offset.storage.file.filena</text:span><text:span text:style-name="T31">me</text:span> : Fichier pour stocker les offsets</text:p>
                  </text:list-item>
                  <text:list-item>
                    <text:p text:style-name="P36"><text:span text:style-name="T31">plugin.path : </text:span><text:span text:style-name="T39">Une liste de </text:span><text:span text:style-name="T39">chemins qui contiennent </text:span><text:span text:style-name="T39">les plugins KafkaConnect </text:span><text:span text:style-name="T39">(connecteurs, </text:span><text:span text:style-name="T39">convertisseurs, </text:span><text:span text:style-name="T39">transformations).</text:span></text:p>
                  </text:list-item>
                </text:list>
              </text:list-item>
              <text:list-item>
                <text:p text:style-name="P36">Les autres paramètres définissent les configurations des différents connecteurs</text:p>
              </text:list-item>
              <text:list-item>
                <text:p/>
              </text:list-item>
              <text:list-item>
                <text:p/>
              </text:list-item>
            </text:list>
          </draw:text-box>
        </draw:frame>
        <presentation:notes draw:style-name="dp5">
          <draw:page-thumbnail draw:style-name="gr2" draw:layer="layout" svg:width="15.597cm" svg:height="10.985cm" svg:x="2.623cm" svg:y="2.258cm" draw:page-number="144" presentation:class="page"/>
          <draw:frame presentation:style-name="pr6" draw:text-style-name="P13" draw:layer="layout" svg:width="14.362cm" svg:height="11.254cm" svg:x="3.25cm" svg:y="14.128cm" presentation:class="notes" presentation:placeholder="true">
            <draw:text-box/>
          </draw:frame>
        </presentation:notes>
      </draw:page>
      <draw:page draw:name="page145" draw:style-name="dp3" draw:master-page-name="Standard" presentation:presentation-page-layout-name="AL3T1">
        <draw:frame presentation:style-name="pr9" draw:layer="layout" svg:width="23.499cm" svg:height="3.575cm" svg:x="3.033cm" svg:y="2.367cm" presentation:class="title">
          <draw:text-box>
            <text:p>Mode distribué</text:p>
          </draw:text-box>
        </draw:frame>
        <draw:frame presentation:style-name="pr5" draw:layer="layout" svg:width="23.499cm" svg:height="12.18cm" svg:x="3.033cm" svg:y="6.283cm" presentation:class="outline">
          <draw:text-box>
            <text:list text:style-name="L2">
              <text:list-item>
                <text:p>Le mode distribué gère le scaling dynamique et offre la tolérance aux pannes </text:p>
              </text:list-item>
              <text:list-item>
                <text:p>Pour démarrer en mode distribué :</text:p>
              </text:list-item>
              <text:list-item>
                <text:p><text:span text:style-name="T134">&gt; bin/connect-distributed.sh </text:span><text:span text:style-name="T134"><text:line-break/></text:span><text:span text:style-name="T134"> <text:s/>config/connect-</text:span><text:span text:style-name="T134">distributed.properties</text:span></text:p>
              </text:list-item>
              <text:list-item>
                <text:p>En mode distribué, <text:span text:style-name="T14">Kafka </text:span><text:span text:style-name="T14">Connect</text:span> stocke les offsets, les configuration et les statuts des taches dans des topics.</text:p>
                <text:list>
                  <text:list-item>
                    <text:p>Pour contrôler, le nombre de partitions et le facteur de réplication utilisés, il est recommandé de créer manuellement ces topics</text:p>
                  </text:list-item>
                </text:list>
              </text:list-item>
            </text:list>
          </draw:text-box>
        </draw:frame>
        <presentation:notes draw:style-name="dp5">
          <draw:page-thumbnail draw:style-name="gr2" draw:layer="layout" svg:width="15.597cm" svg:height="10.985cm" svg:x="2.623cm" svg:y="2.258cm" draw:page-number="145" presentation:class="page"/>
          <draw:frame presentation:style-name="pr6" draw:text-style-name="P13" draw:layer="layout" svg:width="14.362cm" svg:height="11.254cm" svg:x="3.25cm" svg:y="14.128cm" presentation:class="notes" presentation:placeholder="true">
            <draw:text-box/>
          </draw:frame>
        </presentation:notes>
      </draw:page>
      <draw:page draw:name="page146" draw:style-name="dp3" draw:master-page-name="Standard" presentation:presentation-page-layout-name="AL3T1">
        <draw:frame presentation:style-name="pr9" draw:layer="layout" svg:width="23.499cm" svg:height="3.575cm" svg:x="3.033cm" svg:y="2.367cm" presentation:class="title" presentation:user-transformed="true">
          <draw:text-box>
            <text:p><text:span text:style-name="T24">Configurations supplémentaires en mode distribué</text:span></text:p>
          </draw:text-box>
        </draw:frame>
        <draw:frame presentation:style-name="pr5" draw:layer="layout" svg:width="23.499cm" svg:height="12.18cm" svg:x="3.033cm" svg:y="6.283cm" presentation:class="outline" presentation:user-transformed="true">
          <draw:text-box>
            <text:list text:style-name="L2">
              <text:list-item>
                <text:p><text:span text:style-name="T31">group.id</text:span> (<text:span text:style-name="T14">connect-cluster</text:span> par défaut) : nom unique pour former le groupe </text:p>
              </text:list-item>
              <text:list-item>
                <text:p><text:span text:style-name="T31">config.storage.topic</text:span> (<text:span text:style-name="T14">connect-configs</text:span> par défaut) : <text:span text:style-name="T14">topic</text:span> utilisé pour stocker la configuration. <text:line-break/><text:span text:style-name="T135">Doit s'agir d'une rubrique à partition </text:span><text:span text:style-name="T135">unique, hautement répliquée et </text:span><text:span text:style-name="T135">compactée</text:span><text:span text:style-name="T136">.</text:span><text:span text:style-name="T136"><text:line-break/></text:span> </text:p>
              </text:list-item>
              <text:list-item>
                <text:p><text:span text:style-name="T31">offset.storage.topic</text:span> (<text:span text:style-name="T14">connect-offsets</text:span> par défaut) : <text:span text:style-name="T14">topic</text:span> utilisé pour stocker les offsets; <text:line-break/><text:span text:style-name="T27">Doit avoir de nombreuses partitions, </text:span><text:span text:style-name="T27">être répliquée et être configurée </text:span><text:span text:style-name="T27">pour le compactage</text:span><text:span text:style-name="T27"><text:line-break/></text:span><text:span text:style-name="T27"/></text:p>
              </text:list-item>
              <text:list-item>
                <text:p><text:span text:style-name="T31">status.storage.topic</text:span> (<text:span text:style-name="T14">connect-status</text:span> par défaut) : topic utilisé pour stocker les états; <text:line-break/><text:span text:style-name="T27">Peut</text:span><text:span text:style-name="T5"> </text:span><text:span text:style-name="T27">avoir plusieurs partitions et doit </text:span><text:span text:style-name="T27">être répliquée et configurée pour le </text:span><text:span text:style-name="T27">compactage</text:span></text:p>
              </text:list-item>
            </text:list>
          </draw:text-box>
        </draw:frame>
        <presentation:notes draw:style-name="dp5">
          <draw:page-thumbnail draw:style-name="gr2" draw:layer="layout" svg:width="15.597cm" svg:height="10.985cm" svg:x="2.623cm" svg:y="2.258cm" draw:page-number="146" presentation:class="page"/>
          <draw:frame presentation:style-name="pr6" draw:text-style-name="P13" draw:layer="layout" svg:width="14.362cm" svg:height="11.254cm" svg:x="3.25cm" svg:y="14.128cm" presentation:class="notes" presentation:placeholder="true">
            <draw:text-box/>
          </draw:frame>
        </presentation:notes>
      </draw:page>
      <draw:page draw:name="page147" draw:style-name="dp3" draw:master-page-name="Standard" presentation:presentation-page-layout-name="AL3T1">
        <draw:frame presentation:style-name="pr11" draw:layer="layout" svg:width="23.499cm" svg:height="3.577cm" svg:x="3.033cm" svg:y="2.366cm" presentation:class="title">
          <draw:text-box>
            <text:p>Configuration des connecteurs</text:p>
          </draw:text-box>
        </draw:frame>
        <draw:frame presentation:style-name="pr5" draw:layer="layout" svg:width="23.499cm" svg:height="12.18cm" svg:x="3.033cm" svg:y="6.283cm" presentation:class="outline">
          <draw:text-box>
            <text:list text:style-name="L2">
              <text:list-header>
                <text:p>Configuration :</text:p>
                <text:list>
                  <text:list-item>
                    <text:p>En mode standalone, via un fichier <text:span text:style-name="T14">.properties</text:span></text:p>
                  </text:list-item>
                  <text:list-item>
                    <text:p>En mode distribué, via une API Rest .</text:p>
                  </text:list-item>
                </text:list>
              </text:list-header>
              <text:list-item>
                <text:p>Les valeurs sont très dépendantes du type de connecteur. </text:p>
              </text:list-item>
              <text:list-item>
                <text:p>Comme valeur communes, on peut citer :</text:p>
                <text:list>
                  <text:list-item>
                    <text:p><text:span text:style-name="T31">name </text:span>: Nom unique.</text:p>
                  </text:list-item>
                  <text:list-item>
                    <text:p><text:span text:style-name="T31">connector.class</text:span> : Classe Java du connecteur</text:p>
                  </text:list-item>
                  <text:list-item>
                    <text:p><text:span text:style-name="T31">tasks.max</text:span> : Maximum de tâches créés pour le connecteur. (degré de parallélisme)</text:p>
                  </text:list-item>
                  <text:list-item>
                    <text:p><text:span text:style-name="T31">key.converter</text:span>, <text:span text:style-name="T31">value.converter</text:span></text:p>
                  </text:list-item>
                  <text:list-item>
                    <text:p><text:span text:style-name="T137">topics, </text:span><text:span text:style-name="T31">topics.regex, </text:span><text:span text:style-name="T31">topic.prefix : </text:span><text:span text:style-name="T39">Liste, </text:span><text:span text:style-name="T39">expression régulière </text:span><text:span text:style-name="T39">ou gabarit spécifiant </text:span><text:span text:style-name="T39">les topics </text:span></text:p>
                  </text:list-item>
                </text:list>
              </text:list-item>
            </text:list>
          </draw:text-box>
        </draw:frame>
        <presentation:notes draw:style-name="dp5">
          <draw:page-thumbnail draw:style-name="gr2" draw:layer="layout" svg:width="15.597cm" svg:height="10.985cm" svg:x="2.623cm" svg:y="2.258cm" draw:page-number="147" presentation:class="page"/>
          <draw:frame presentation:style-name="pr6" draw:text-style-name="P13" draw:layer="layout" svg:width="14.362cm" svg:height="11.254cm" svg:x="3.25cm" svg:y="14.128cm" presentation:class="notes" presentation:placeholder="true">
            <draw:text-box/>
          </draw:frame>
        </presentation:notes>
      </draw:page>
      <draw:page draw:name="page148" draw:style-name="dp3" draw:master-page-name="Standard" presentation:presentation-page-layout-name="AL3T1">
        <draw:frame presentation:style-name="pr9" draw:layer="layout" svg:width="23.499cm" svg:height="3.575cm" svg:x="3.033cm" svg:y="2.367cm" presentation:class="title">
          <draw:text-box>
            <text:p>Connecteurs</text:p>
          </draw:text-box>
        </draw:frame>
        <draw:frame presentation:style-name="pr5" draw:layer="layout" svg:width="23.499cm" svg:height="12.18cm" svg:x="3.033cm" svg:y="6.283cm" presentation:class="outline">
          <draw:text-box>
            <text:list text:style-name="L2">
              <text:list-item>
                <text:p><text:span text:style-name="T14">Confluent</text:span> offre de nombreux connecteurs<text:span text:style-name="T138">1</text:span> :</text:p>
                <text:list>
                  <text:list-item>
                    <text:p>Active MQ Source Connector</text:p>
                  </text:list-item>
                  <text:list-item>
                    <text:p>Amazon S3 Sink Connector</text:p>
                  </text:list-item>
                  <text:list-item>
                    <text:p>Elasticsearch Sink Connector</text:p>
                  </text:list-item>
                  <text:list-item>
                    <text:p>FileStream Connector (Development and Testing)</text:p>
                  </text:list-item>
                  <text:list-item>
                    <text:p>IBM MQ Source Connector</text:p>
                  </text:list-item>
                  <text:list-item>
                    <text:p>JDBC Connector (Source et Sink)</text:p>
                  </text:list-item>
                  <text:list-item>
                    <text:p>JMS Source Connector</text:p>
                  </text:list-item>
                  <text:list-item>
                    <text:p>...</text:p>
                  </text:list-item>
                </text:list>
              </text:list-item>
              <text:list-item>
                <text:p>De nombreux éditeurs fournissent également leur connecteurs Kafka (Amazon, Azure, Google, Salesforce, TIBCO, MongoDB, ...)</text:p>
              </text:list-item>
            </text:list>
          </draw:text-box>
        </draw:frame>
        <draw:frame draw:style-name="gr31" draw:text-style-name="P20" draw:layer="layout" svg:width="15.433cm" svg:height="1.056cm" svg:x="1.455cm" svg:y="19.446cm">
          <draw:text-box>
            <text:p><text:span text:style-name="T17">1. https://www.confluent.io/fr-fr/product/connectors/</text:span></text:p>
          </draw:text-box>
        </draw:frame>
        <presentation:notes draw:style-name="dp5">
          <draw:page-thumbnail draw:style-name="gr2" draw:layer="layout" svg:width="15.597cm" svg:height="10.985cm" svg:x="2.623cm" svg:y="2.258cm" draw:page-number="148" presentation:class="page"/>
          <draw:frame presentation:style-name="pr6" draw:text-style-name="P13" draw:layer="layout" svg:width="14.362cm" svg:height="11.254cm" svg:x="3.25cm" svg:y="14.128cm" presentation:class="notes" presentation:placeholder="true">
            <draw:text-box/>
          </draw:frame>
        </presentation:notes>
      </draw:page>
      <draw:page draw:name="page149" draw:style-name="dp3" draw:master-page-name="Standard" presentation:presentation-page-layout-name="AL3T1">
        <draw:frame presentation:style-name="pr9" draw:layer="layout" svg:width="23.499cm" svg:height="3.575cm" svg:x="3.033cm" svg:y="2.367cm" presentation:class="title">
          <draw:text-box>
            <text:p>Exemple Connecteur JDBC</text:p>
          </draw:text-box>
        </draw:frame>
        <draw:frame presentation:style-name="pr5" draw:text-style-name="P39" draw:layer="layout" svg:width="23.499cm" svg:height="12.18cm" svg:x="3.033cm" svg:y="6.283cm" presentation:class="outline" presentation:user-transformed="true">
          <draw:text-box>
            <text:list text:style-name="L2">
              <text:list-item>
                <text:p text:style-name="P33"><text:span text:style-name="T101">name=mysql-whitelist-timestamp-source</text:span></text:p>
              </text:list-item>
              <text:list-item>
                <text:p text:style-name="P33"><text:span text:style-name="T101">connector.class=io.confluent.connect.jdbc.Jdb</text:span><text:span text:style-name="T101">cSourceConnector</text:span></text:p>
              </text:list-item>
              <text:list-item>
                <text:p text:style-name="P33"><text:span text:style-name="T101">tasks.max=10</text:span></text:p>
              </text:list-item>
              <text:list-item>
                <text:p text:style-name="P33"><text:span text:style-name="T101"/></text:p>
              </text:list-item>
              <text:list-item>
                <text:p text:style-name="P33"><text:span text:style-name="T101">connection.url=jdbc:mysql://</text:span><text:span text:style-name="T101">mysql.example.com:3306/my_database?</text:span><text:span text:style-name="T101">user=alice&amp;password=secret</text:span></text:p>
              </text:list-item>
              <text:list-item>
                <text:p text:style-name="P33"><text:span text:style-name="T101">table.whitelist=users,products,transactions</text:span></text:p>
              </text:list-item>
              <text:list-item>
                <text:p text:style-name="P33"><text:span text:style-name="T139"/></text:p>
              </text:list-item>
              <text:list-item>
                <text:p text:style-name="P33"><text:span text:style-name="T139"># Pour détecter les nouveaux enregistrements</text:span></text:p>
              </text:list-item>
              <text:list-item>
                <text:p text:style-name="P33"><text:span text:style-name="T101">mode=timestamp+incrementing</text:span></text:p>
              </text:list-item>
              <text:list-item>
                <text:p text:style-name="P33"><text:span text:style-name="T101">timestamp.column.name=modified</text:span></text:p>
              </text:list-item>
              <text:list-item>
                <text:p text:style-name="P33"><text:span text:style-name="T101">incrementing.column.name=id</text:span></text:p>
              </text:list-item>
              <text:list-item>
                <text:p text:style-name="P33"><text:span text:style-name="T97"/></text:p>
              </text:list-item>
              <text:list-item>
                <text:p text:style-name="P33"><text:span text:style-name="T101">topic.prefix=mysql-</text:span></text:p>
              </text:list-item>
            </text:list>
          </draw:text-box>
        </draw:frame>
        <presentation:notes draw:style-name="dp5">
          <draw:page-thumbnail draw:style-name="gr2" draw:layer="layout" svg:width="15.597cm" svg:height="10.985cm" svg:x="2.623cm" svg:y="2.258cm" draw:page-number="149" presentation:class="page"/>
          <draw:frame presentation:style-name="pr6" draw:text-style-name="P13" draw:layer="layout" svg:width="14.362cm" svg:height="11.254cm" svg:x="3.25cm" svg:y="14.128cm" presentation:class="notes" presentation:placeholder="true">
            <draw:text-box/>
          </draw:frame>
        </presentation:notes>
      </draw:page>
      <draw:page draw:name="page150" draw:style-name="dp3" draw:master-page-name="Standard" presentation:presentation-page-layout-name="AL3T1">
        <draw:frame presentation:style-name="pr9" draw:layer="layout" svg:width="23.499cm" svg:height="3.575cm" svg:x="3.033cm" svg:y="2.367cm" presentation:class="title">
          <draw:text-box>
            <text:p>Transformations</text:p>
          </draw:text-box>
        </draw:frame>
        <draw:frame presentation:style-name="pr5" draw:layer="layout" svg:width="23.499cm" svg:height="12.18cm" svg:x="3.033cm" svg:y="6.283cm" presentation:class="outline">
          <draw:text-box>
            <text:list text:style-name="L2">
              <text:list-item>
                <text:p text:style-name="P11">Une chaîne de transformation, s’appuyant sur des <text:span text:style-name="T140">transformers</text:span> prédéfinis, est spécifiée dans la configuration d’un connecteur.</text:p>
                <text:list>
                  <text:list-item>
                    <text:p><text:span text:style-name="T31">transforms </text:span>: Liste d’aliases spécifiant la séquence des transformations</text:p>
                  </text:list-item>
                  <text:list-item>
                    <text:p><text:span text:style-name="T31">transforms.</text:span><text:span text:style-name="T31">$alias.type</text:span> : La classe utilisée pour la transformation.</text:p>
                  </text:list-item>
                  <text:list-item>
                    <text:p><text:span text:style-name="T31">transforms.$alias.</text:span><text:span text:style-name="T31">$transformationSp</text:span><text:span text:style-name="T31">ecificConfig</text:span> : Propriété spécifique d’un <text:span text:style-name="T14">Transformer</text:span></text:p>
                  </text:list-item>
                </text:list>
              </text:list-item>
            </text:list>
          </draw:text-box>
        </draw:frame>
        <presentation:notes draw:style-name="dp5">
          <draw:page-thumbnail draw:style-name="gr2" draw:layer="layout" svg:width="15.597cm" svg:height="10.985cm" svg:x="2.623cm" svg:y="2.258cm" draw:page-number="150" presentation:class="page"/>
          <draw:frame presentation:style-name="pr6" draw:text-style-name="P13" draw:layer="layout" svg:width="14.362cm" svg:height="11.254cm" svg:x="3.25cm" svg:y="14.128cm" presentation:class="notes" presentation:placeholder="true">
            <draw:text-box/>
          </draw:frame>
        </presentation:notes>
      </draw:page>
      <draw:page draw:name="page151" draw:style-name="dp3" draw:master-page-name="Standard" presentation:presentation-page-layout-name="AL3T1">
        <draw:frame presentation:style-name="pr9" draw:layer="layout" svg:width="23.499cm" svg:height="3.575cm" svg:x="3.033cm" svg:y="2.367cm" presentation:class="title">
          <draw:text-box>
            <text:p>Exemple de configuration</text:p>
          </draw:text-box>
        </draw:frame>
        <draw:frame presentation:style-name="pr5" draw:text-style-name="P39" draw:layer="layout" svg:width="23.499cm" svg:height="12.18cm" svg:x="3.033cm" svg:y="6.283cm" presentation:class="outline">
          <draw:text-box>
            <text:list text:style-name="L2">
              <text:list-item>
                <text:p text:style-name="P33"><text:span text:style-name="T141">name=local-file-source</text:span></text:p>
              </text:list-item>
              <text:list-item>
                <text:p text:style-name="P33"><text:span text:style-name="T141">connector.class=FileStreamSource</text:span></text:p>
              </text:list-item>
              <text:list-item>
                <text:p text:style-name="P33"><text:span text:style-name="T141">tasks.max=1</text:span></text:p>
              </text:list-item>
              <text:list-item>
                <text:p text:style-name="P33"><text:span text:style-name="T141">file=test.txt</text:span></text:p>
              </text:list-item>
              <text:list-item>
                <text:p text:style-name="P33"><text:span text:style-name="T142"># Un sink défini un topic de destination</text:span></text:p>
              </text:list-item>
              <text:list-item>
                <text:p text:style-name="P33"><text:span text:style-name="T141">topic=connect-test</text:span></text:p>
              </text:list-item>
              <text:list-item>
                <text:p text:style-name="P33"><text:span text:style-name="T142"># 2 transformers nommés MakeMap et InsertSource</text:span></text:p>
              </text:list-item>
              <text:list-item>
                <text:p text:style-name="P33"><text:span text:style-name="T141">transforms=MakeMap, InsertSource</text:span></text:p>
              </text:list-item>
              <text:list-item>
                <text:p text:style-name="P33"><text:span text:style-name="T142"># La ligne du fichier devient le champ line</text:span></text:p>
              </text:list-item>
              <text:list-item>
                <text:p text:style-name="P33"><text:span text:style-name="T141">transforms.MakeMap.type=org.apache.kafka.connect.transforms.</text:span><text:span text:style-name="T141">HoistField$Value</text:span></text:p>
              </text:list-item>
              <text:list-item>
                <text:p text:style-name="P33"><text:span text:style-name="T141">transforms.MakeMap.field=line</text:span></text:p>
              </text:list-item>
              <text:list-item>
                <text:p text:style-name="P33"><text:span text:style-name="T142"># Le champ data-source est ajouté avec une valeur statique</text:span></text:p>
              </text:list-item>
              <text:list-item>
                <text:p text:style-name="P33"><text:span text:style-name="T141">transforms.InsertSource.type=org.apache.kafka.connect.transf</text:span><text:span text:style-name="T141">orms.InsertField$Value</text:span></text:p>
              </text:list-item>
              <text:list-item>
                <text:p text:style-name="P33"><text:span text:style-name="T141">transforms.InsertSource.static.field=data_source</text:span></text:p>
              </text:list-item>
              <text:list-item>
                <text:p text:style-name="P33"><text:span text:style-name="T141">transforms.InsertSource.static.value=test-file-source</text:span></text:p>
              </text:list-item>
            </text:list>
          </draw:text-box>
        </draw:frame>
        <presentation:notes draw:style-name="dp5">
          <draw:page-thumbnail draw:style-name="gr2" draw:layer="layout" svg:width="15.597cm" svg:height="10.985cm" svg:x="2.623cm" svg:y="2.258cm" draw:page-number="151" presentation:class="page"/>
          <draw:frame presentation:style-name="pr6" draw:text-style-name="P13" draw:layer="layout" svg:width="14.362cm" svg:height="11.254cm" svg:x="3.25cm" svg:y="14.128cm" presentation:class="notes" presentation:placeholder="true">
            <draw:text-box/>
          </draw:frame>
        </presentation:notes>
      </draw:page>
      <draw:page draw:name="page152" draw:style-name="dp3" draw:master-page-name="Standard" presentation:presentation-page-layout-name="AL3T1">
        <draw:frame presentation:style-name="pr9" draw:layer="layout" svg:width="23.499cm" svg:height="3.575cm" svg:x="3.033cm" svg:y="2.367cm" presentation:class="title">
          <draw:text-box>
            <text:p><text:span text:style-name="T14">Transformers</text:span> disponibles</text:p>
          </draw:text-box>
        </draw:frame>
        <draw:frame presentation:style-name="pr5" draw:layer="layout" svg:width="23.499cm" svg:height="12.18cm" svg:x="3.033cm" svg:y="6.283cm" presentation:class="outline" presentation:user-transformed="true">
          <draw:text-box>
            <text:list text:style-name="L2">
              <text:list-item>
                <text:p text:style-name="P24"><text:span text:style-name="T31">HoistField : </text:span><text:span text:style-name="T39">Encapsule </text:span><text:span text:style-name="T39">l’événement entier dans </text:span><text:span text:style-name="T39">un champ unique de type </text:span><text:span text:style-name="T39">Struct ou Map</text:span></text:p>
              </text:list-item>
              <text:list-item>
                <text:p><text:span text:style-name="T31">InsertField </text:span>: Ajout d’un champ avec des données statiques ou des méta-données de l’enregistrement</text:p>
              </text:list-item>
              <text:list-item>
                <text:p><text:span text:style-name="T31">ReplaceField</text:span> : Filtrer ou renommer des champs </text:p>
              </text:list-item>
              <text:list-item>
                <text:p><text:span text:style-name="T31">MaskField</text:span> : Remplace le champ avec une valeur nulle</text:p>
              </text:list-item>
              <text:list-item>
                <text:p><text:span text:style-name="T31">ValueToKey</text:span> : Échange clé/valeur</text:p>
              </text:list-item>
              <text:list-item>
                <text:p><text:span text:style-name="T31">ExtractField</text:span> : Construit le résultat à partir de l’extraction d’un champ spécifique </text:p>
              </text:list-item>
              <text:list-item>
                <text:p><text:span text:style-name="T31">SetSchemaMetadata</text:span> : Modifie le nom du schéma ou la version</text:p>
              </text:list-item>
              <text:list-item>
                <text:p><text:span text:style-name="T31">TimestampRouter</text:span> : Route le message en fonction du timestamp</text:p>
              </text:list-item>
              <text:list-item>
                <text:p><text:span text:style-name="T31">RegexRouter</text:span> : Modifie le nom du topic le destination via une <text:span text:style-name="T14">regexp</text:span></text:p>
              </text:list-item>
            </text:list>
          </draw:text-box>
        </draw:frame>
        <presentation:notes draw:style-name="dp5">
          <draw:page-thumbnail draw:style-name="gr2" draw:layer="layout" svg:width="15.597cm" svg:height="10.985cm" svg:x="2.623cm" svg:y="2.258cm" draw:page-number="152" presentation:class="page"/>
          <draw:frame presentation:style-name="pr6" draw:text-style-name="P13" draw:layer="layout" svg:width="14.362cm" svg:height="11.254cm" svg:x="3.25cm" svg:y="14.128cm" presentation:class="notes" presentation:placeholder="true">
            <draw:text-box/>
          </draw:frame>
        </presentation:notes>
      </draw:page>
      <draw:page draw:name="page153" draw:style-name="dp3" draw:master-page-name="Standard" presentation:presentation-page-layout-name="AL3T1">
        <draw:frame presentation:style-name="pr9" draw:layer="layout" svg:width="23.499cm" svg:height="3.575cm" svg:x="3.033cm" svg:y="2.367cm" presentation:class="title">
          <draw:text-box>
            <text:p>API Rest</text:p>
          </draw:text-box>
        </draw:frame>
        <draw:frame presentation:style-name="pr5" draw:layer="layout" svg:width="23.499cm" svg:height="12.18cm" svg:x="3.033cm" svg:y="6.283cm" presentation:class="outline">
          <draw:text-box>
            <text:list text:style-name="L2">
              <text:list-item>
                <text:p>L’adresse d’écoute de l’API REST peut être configuré via la propriété listeners<text:line-break/><text:span text:style-name="T101">listeners=http://localhost:8080,</text:span><text:span text:style-name="T101"><text:a xlink:href="https://localhost:8443/" xlink:type="simple">https://localhost:8443</text:a></text:span></text:p>
              </text:list-item>
              <text:list-item>
                <text:p/>
              </text:list-item>
              <text:list-item>
                <text:p>Ces listeners sont également utilisés par la communication intra-cluster</text:p>
                <text:list>
                  <text:list-item>
                    <text:p text:style-name="P36">Pour utiliser d’autres Ips pour le cluster, positionner :<text:line-break/><text:span text:style-name="T101">rest.advertised.listener</text:span></text:p>
                  </text:list-item>
                </text:list>
              </text:list-item>
              <text:list-item>
                <text:p/>
              </text:list-item>
            </text:list>
          </draw:text-box>
        </draw:frame>
        <presentation:notes draw:style-name="dp5">
          <draw:page-thumbnail draw:style-name="gr2" draw:layer="layout" svg:width="15.597cm" svg:height="10.985cm" svg:x="2.623cm" svg:y="2.258cm" draw:page-number="153" presentation:class="page"/>
          <draw:frame presentation:style-name="pr6" draw:text-style-name="P13" draw:layer="layout" svg:width="14.362cm" svg:height="11.254cm" svg:x="3.25cm" svg:y="14.128cm" presentation:class="notes" presentation:placeholder="true">
            <draw:text-box/>
          </draw:frame>
        </presentation:notes>
      </draw:page>
      <draw:page draw:name="page154" draw:style-name="dp3" draw:master-page-name="Standard" presentation:presentation-page-layout-name="AL3T1">
        <draw:frame presentation:style-name="pr9" draw:layer="layout" svg:width="23.499cm" svg:height="3.575cm" svg:x="3.033cm" svg:y="2.367cm" presentation:class="title">
          <draw:text-box>
            <text:p>API</text:p>
          </draw:text-box>
        </draw:frame>
        <draw:frame presentation:style-name="pr5" draw:layer="layout" svg:width="23.499cm" svg:height="12.18cm" svg:x="3.033cm" svg:y="6.283cm" presentation:class="outline">
          <draw:text-box>
            <text:list text:style-name="L2">
              <text:list-item>
                <text:p><text:span text:style-name="T31">GET /connectors</text:span> : Liste des connecteurs actifs</text:p>
              </text:list-item>
              <text:list-item>
                <text:p><text:span text:style-name="T31">POST</text:span> <text:span text:style-name="T31">/connectors</text:span> : Création d’un nouveau connecteur</text:p>
              </text:list-item>
              <text:list-item>
                <text:p><text:span text:style-name="T31">GET</text:span> <text:span text:style-name="T31">/connectors/{name}</text:span> : Information sur un connecteur (config et statuts et tasks)</text:p>
              </text:list-item>
              <text:list-item>
                <text:p><text:span text:style-name="T31">PUT</text:span> <text:span text:style-name="T31">/connectors/{name}/co</text:span><text:span text:style-name="T31">nfig </text:span>: Mise à jour de la configuration</text:p>
              </text:list-item>
              <text:list-item>
                <text:p><text:span text:style-name="T31">GET </text:span><text:span text:style-name="T31">/connectors/{name}/tas</text:span><text:span text:style-name="T31">ks/{taskid}/status</text:span> : Statut d’une tâche</text:p>
              </text:list-item>
              <text:list-item>
                <text:p><text:span text:style-name="T31">PUT</text:span> <text:span text:style-name="T31">/connectors/{name}/pa</text:span><text:span text:style-name="T31">use</text:span> : Mettre en pause le connecteur</text:p>
              </text:list-item>
              <text:list-item>
                <text:p><text:span text:style-name="T31">PUT</text:span> <text:span text:style-name="T31">/connectors/{name}/res</text:span><text:span text:style-name="T31">ume</text:span> : Réactiver un connecteur</text:p>
              </text:list-item>
              <text:list-item>
                <text:p><text:span text:style-name="T31">POST</text:span> <text:span text:style-name="T31">/connectors/{name}/res</text:span><text:span text:style-name="T31">tart</text:span> : Redémarrage après un plantage</text:p>
              </text:list-item>
              <text:list-item>
                <text:p><text:span text:style-name="T31">DELETE</text:span> <text:span text:style-name="T31">/connectors/{name} </text:span>: Supprimer un connecteur</text:p>
              </text:list-item>
            </text:list>
          </draw:text-box>
        </draw:frame>
        <draw:frame draw:style-name="gr32" draw:text-style-name="P34" draw:layer="layout" svg:width="8.74cm" svg:height="1.216cm" svg:x="1.602cm" svg:y="19.4cm">
          <draw:text-box>
            <text:p><text:span text:style-name="T73">Atelier 6 : Connect API</text:span></text:p>
          </draw:text-box>
        </draw:frame>
        <presentation:notes draw:style-name="dp5">
          <draw:page-thumbnail draw:style-name="gr2" draw:layer="layout" svg:width="15.597cm" svg:height="10.985cm" svg:x="2.623cm" svg:y="2.258cm" draw:page-number="154" presentation:class="page"/>
          <draw:frame presentation:style-name="pr6" draw:text-style-name="P18" draw:layer="layout" svg:width="14.362cm" svg:height="11.254cm" svg:x="3.25cm" svg:y="14.128cm" presentation:class="notes" presentation:placeholder="true">
            <draw:text-box/>
          </draw:frame>
        </presentation:notes>
      </draw:page>
      <draw:page draw:name="page155"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Sécurité</text:span></text:p>
              </text:list-header>
            </text:list>
          </draw:text-box>
        </draw:frame>
        <draw:frame presentation:style-name="pr28" draw:text-style-name="P16" draw:layer="layout" svg:width="23.499cm" svg:height="12.18cm" svg:x="3.033cm" svg:y="6.283cm" presentation:class="subtitle">
          <draw:text-box>
            <text:list text:style-name="L1">
              <text:list-item>
                <text:p text:style-name="P28"><text:span text:style-name="T143"/></text:p>
              </text:list-item>
              <text:list-item>
                <text:p text:style-name="P28"><text:span text:style-name="T143"/></text:p>
              </text:list-item>
              <text:list-item>
                <text:p text:style-name="P19"><text:span text:style-name="T144">Configuration des listeners</text:span></text:p>
              </text:list-item>
              <text:list-item>
                <text:p text:style-name="P28"><text:span text:style-name="T2">SSL/TLS</text:span></text:p>
              </text:list-item>
              <text:list-item>
                <text:p text:style-name="P28"><text:span text:style-name="T13">Authentification via SASL</text:span></text:p>
              </text:list-item>
              <text:list-item>
                <text:p text:style-name="P28"><text:span text:style-name="T145">ACLs</text:span></text:p>
              </text:list-item>
              <text:list-item>
                <text:p text:style-name="P28"><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56"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Différentes alternatives supportées pour la sécurité :</text:p>
                <text:list>
                  <text:list-item>
                    <text:p>Authentification des connections clients vers les brokers via SSL ou SASL</text:p>
                  </text:list-item>
                  <text:list-item>
                    <text:p>Authentification des connections entre contrôleurs Kraft OU des brokers vers <text:span text:style-name="T14">Zookeeper</text:span></text:p>
                  </text:list-item>
                  <text:list-item>
                    <text:p>Cryptage des données transférées avec les clients/brokers via TLS/SSL</text:p>
                  </text:list-item>
                  <text:list-item>
                    <text:p>Autorisation des opérations read/write/create/delete/... par client</text:p>
                  </text:list-item>
                  <text:list-item>
                    <text:p>Possibilité d’intégration avec d’autres mécanismes d’authentification et d’autorisation</text:p>
                  </text:list-item>
                </text:list>
              </text:list-item>
              <text:list-item>
                <text:p>Naturellement, dégradation des performances avec SSL/TLS</text:p>
              </text:list-item>
            </text:list>
          </draw:text-box>
        </draw:frame>
        <presentation:notes draw:style-name="dp5">
          <draw:page-thumbnail draw:style-name="gr2" draw:layer="layout" svg:width="15.597cm" svg:height="10.985cm" svg:x="2.623cm" svg:y="2.258cm" draw:page-number="156" presentation:class="page"/>
          <draw:frame presentation:style-name="pr6" draw:text-style-name="P13" draw:layer="layout" svg:width="14.362cm" svg:height="11.254cm" svg:x="3.25cm" svg:y="14.128cm" presentation:class="notes" presentation:placeholder="true">
            <draw:text-box/>
          </draw:frame>
        </presentation:notes>
      </draw:page>
      <draw:page draw:name="page157" draw:style-name="dp3" draw:master-page-name="Standard" presentation:presentation-page-layout-name="AL3T1">
        <draw:frame presentation:style-name="pr9" draw:layer="layout" svg:width="23.499cm" svg:height="3.575cm" svg:x="3.033cm" svg:y="2.367cm" presentation:class="title">
          <draw:text-box>
            <text:p>Listeners</text:p>
          </draw:text-box>
        </draw:frame>
        <draw:frame presentation:style-name="pr5" draw:layer="layout" svg:width="23.499cm" svg:height="12.18cm" svg:x="3.033cm" svg:y="6.283cm" presentation:class="outline">
          <draw:text-box>
            <text:list text:style-name="L2">
              <text:list-item>
                <text:p>Chaque serveur doit définir l'ensemble des <text:span text:style-name="T14">listeners</text:span> utilisés (i.e. ports TCP ouverts) pour recevoir les requêtes des clients ainsi que des autres serveurs. </text:p>
              </text:list-item>
              <text:list-item>
                <text:p>Chaque listener peut être configuré pour authentifier les clients et pour garantir que le trafic entre le serveur et le client est crypté.</text:p>
              </text:list-item>
              <text:list-item>
                <text:p><text:span text:style-name="T67"/></text:p>
              </text:list-item>
            </text:list>
          </draw:text-box>
        </draw:frame>
        <presentation:notes draw:style-name="dp5">
          <draw:page-thumbnail draw:style-name="gr2" draw:layer="layout" svg:width="15.597cm" svg:height="10.985cm" svg:x="2.623cm" svg:y="2.258cm" draw:page-number="157" presentation:class="page"/>
          <draw:frame presentation:style-name="pr6" draw:text-style-name="P13" draw:layer="layout" svg:width="14.362cm" svg:height="11.254cm" svg:x="3.25cm" svg:y="14.128cm" presentation:class="notes" presentation:placeholder="true">
            <draw:text-box/>
          </draw:frame>
        </presentation:notes>
      </draw:page>
      <draw:page draw:name="page158" draw:style-name="dp3" draw:master-page-name="Standard" presentation:presentation-page-layout-name="AL3T1">
        <draw:frame presentation:style-name="pr9" draw:layer="layout" svg:width="23.499cm" svg:height="3.575cm" svg:x="3.033cm" svg:y="2.367cm" presentation:class="title">
          <draw:text-box>
            <text:p>Combinaisons des protocoles</text:p>
          </draw:text-box>
        </draw:frame>
        <draw:frame presentation:style-name="pr5" draw:layer="layout" svg:width="23.499cm" svg:height="12.18cm" svg:x="3.033cm" svg:y="6.283cm" presentation:class="outline" presentation:user-transformed="true">
          <draw:text-box>
            <text:list text:style-name="L2">
              <text:list-item>
                <text:p>Chaque protocole combine une couche de transport (PLAINTEXT ou SSL) avec une couche d'authentification optionnelle (SSL ou SASL) :</text:p>
                <text:list>
                  <text:list-item>
                    <text:p><text:span text:style-name="T72">PLAIN_TEXT</text:span> : En clair sans authentification. Ne convient qu'à une utilisation au sein de réseaux privés pour le traitement de données non sensibles </text:p>
                  </text:list-item>
                  <text:list-item>
                    <text:p><text:span text:style-name="T72">SSL</text:span> : Couche de transport SSL avec authentification client SSL en option. Convient pour une utilisation dans réseaux non sécurisés car l'authentification client et serveur ainsi que le chiffrement sont prise en charge.</text:p>
                  </text:list-item>
                  <text:list-item>
                    <text:p><text:span text:style-name="T72">SASL</text:span>_<text:span text:style-name="T72">PLAINTEXT</text:span> : Couche de transport PLAINTEXT avec authentification client SASL. Ne prend pas en charge le cryptage et convient donc uniquement pour une utilisation dans des réseaux privés.</text:p>
                  </text:list-item>
                  <text:list-item>
                    <text:p><text:span text:style-name="T72">SASL_SSL</text:span> : Couche de transport SSL avec authentification SASL. Convient pour une utilisation dans des réseaux non sécurisés.</text:p>
                  </text:list-item>
                </text:list>
              </text:list-item>
            </text:list>
          </draw:text-box>
        </draw:frame>
        <presentation:notes draw:style-name="dp5">
          <draw:page-thumbnail draw:style-name="gr2" draw:layer="layout" svg:width="15.597cm" svg:height="10.985cm" svg:x="2.623cm" svg:y="2.258cm" draw:page-number="158" presentation:class="page"/>
          <draw:frame presentation:style-name="pr6" draw:text-style-name="P13" draw:layer="layout" svg:width="14.362cm" svg:height="11.254cm" svg:x="3.25cm" svg:y="14.128cm" presentation:class="notes" presentation:placeholder="true">
            <draw:text-box/>
          </draw:frame>
        </presentation:notes>
      </draw:page>
      <draw:page draw:name="page159" draw:style-name="dp3" draw:master-page-name="Standard" presentation:presentation-page-layout-name="AL3T1">
        <draw:frame presentation:style-name="pr9" draw:layer="layout" svg:width="23.499cm" svg:height="3.575cm" svg:x="3.033cm" svg:y="2.367cm" presentation:class="title">
          <draw:text-box>
            <text:p>Configuration des listeners</text:p>
          </draw:text-box>
        </draw:frame>
        <draw:frame presentation:style-name="pr5" draw:layer="layout" svg:width="23.499cm" svg:height="12.18cm" svg:x="3.033cm" svg:y="6.283cm" presentation:class="outline">
          <draw:text-box>
            <text:list text:style-name="L2">
              <text:list-item>
                <text:p>Les listeners sont déclarés via la propriété <text:span text:style-name="T31">listeners </text:span>:</text:p>
              </text:list-item>
              <text:list-item>
                <text:p><text:span text:style-name="T67">{LISTENER_NAME}://:{port}</text:span></text:p>
              </text:list-item>
              <text:list-item>
                <text:p>Ou LISTENER_NAME est un nom descriptif</text:p>
              </text:list-item>
              <text:list-item>
                <text:p>Exemple :</text:p>
              </text:list-item>
              <text:list-item>
                <text:p><text:span text:style-name="T67"><text:s text:c="2"/></text:span><text:span text:style-name="T67">listeners=CLIENT://:9092,B</text:span><text:span text:style-name="T67">ROKER://:9095</text:span></text:p>
              </text:list-item>
              <text:list-item>
                <text:p/>
              </text:list-item>
              <text:list-item>
                <text:p>Le protocole utilisé pour chaque listener est spécifié dans la propriété <text:span text:style-name="T31">listener.security.protoc</text:span><text:span text:style-name="T31">ol.map</text:span></text:p>
              </text:list-item>
              <text:list-item>
                <text:p>Exemple : <text:span text:style-name="T67">listener.security.protocol</text:span><text:span text:style-name="T67">.map=CLIENT:SSL,BROKER:PLA</text:span><text:span text:style-name="T67">INTEXT</text:span></text:p>
              </text:list-item>
              <text:list-item>
                <text:p/>
              </text:list-item>
              <text:list-item>
                <text:p>Il faut également déclarer les listener utilisés pour les communications inter broker via <text:span text:style-name="T31">inter.broker.listener.na</text:span><text:span text:style-name="T31">me </text:span><text:span text:style-name="T39">et</text:span><text:span text:style-name="T31"> </text:span><text:span text:style-name="T31">controller.listener.name</text:span><text:span text:style-name="T31">s</text:span></text:p>
              </text:list-item>
            </text:list>
          </draw:text-box>
        </draw:frame>
        <draw:frame draw:style-name="gr33" draw:text-style-name="P34" draw:layer="layout" svg:width="14.942cm" svg:height="1.216cm" svg:x="1.602cm" svg:y="19.4cm">
          <draw:text-box>
            <text:p><text:span text:style-name="T73">Atelier 7.1 : Séparation des trafics réseau</text:span></text:p>
          </draw:text-box>
        </draw:frame>
        <presentation:notes draw:style-name="dp5">
          <draw:page-thumbnail draw:style-name="gr2" draw:layer="layout" svg:width="15.597cm" svg:height="10.985cm" svg:x="2.623cm" svg:y="2.258cm" draw:page-number="159" presentation:class="page"/>
          <draw:frame presentation:style-name="pr6" draw:text-style-name="P13" draw:layer="layout" svg:width="14.362cm" svg:height="11.254cm" svg:x="3.25cm" svg:y="14.128cm" presentation:class="notes" presentation:placeholder="true">
            <draw:text-box/>
          </draw:frame>
        </presentation:notes>
      </draw:page>
      <draw:page draw:name="page160"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Sécurité</text:span></text:p>
              </text:list-header>
            </text:list>
          </draw:text-box>
        </draw:frame>
        <draw:frame presentation:style-name="pr29" draw:text-style-name="P16" draw:layer="layout" svg:width="23.499cm" svg:height="12.18cm" svg:x="3.033cm" svg:y="6.283cm" presentation:class="subtitle">
          <draw:text-box>
            <text:list text:style-name="L1">
              <text:list-item>
                <text:p text:style-name="P28"><text:span text:style-name="T143"/></text:p>
              </text:list-item>
              <text:list-item>
                <text:p text:style-name="P28"><text:span text:style-name="T143"/></text:p>
              </text:list-item>
              <text:list-item>
                <text:p text:style-name="P19"><text:span text:style-name="T2">Configuration des listeners</text:span></text:p>
              </text:list-item>
              <text:list-item>
                <text:p text:style-name="P19"><text:span text:style-name="T144">SSL/TLS</text:span></text:p>
              </text:list-item>
              <text:list-item>
                <text:p text:style-name="P28"><text:span text:style-name="T13">Authentification via SASL</text:span></text:p>
              </text:list-item>
              <text:list-item>
                <text:p text:style-name="P28"><text:span text:style-name="T145">ACLs</text:span></text:p>
              </text:list-item>
              <text:list-item>
                <text:p text:style-name="P28"><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61" draw:style-name="dp3" draw:master-page-name="Standard" presentation:presentation-page-layout-name="AL3T1">
        <draw:frame presentation:style-name="pr9" draw:layer="layout" svg:width="23.499cm" svg:height="3.575cm" svg:x="3.033cm" svg:y="2.367cm" presentation:class="title">
          <draw:text-box>
            <text:p>Certificats </text:p>
          </draw:text-box>
        </draw:frame>
        <draw:frame presentation:style-name="pr5" draw:layer="layout" svg:width="23.499cm" svg:height="12.18cm" svg:x="3.033cm" svg:y="6.283cm" presentation:class="outline" presentation:user-transformed="true">
          <draw:text-box>
            <text:list text:style-name="L2">
              <text:list-item>
                <text:p>SSL pour le cryptage et l’authentification</text:p>
              </text:list-item>
            </text:list>
          </draw:text-box>
        </draw:frame>
        <draw:frame draw:style-name="gr9" draw:text-style-name="P23" draw:layer="layout" svg:width="20.912cm" svg:height="10.546cm" svg:x="3.8cm" svg:y="9.2cm">
          <draw:image xlink:href="Pictures/10000001000004FB00000283DDBC7E5B.png" xlink:type="simple" xlink:show="embed" xlink:actuate="onLoad" draw:mime-type="image/png">
            <text:p/>
          </draw:image>
        </draw:frame>
        <presentation:notes draw:style-name="dp5">
          <draw:page-thumbnail draw:style-name="gr2" draw:layer="layout" svg:width="15.597cm" svg:height="10.985cm" svg:x="2.623cm" svg:y="2.258cm" draw:page-number="161" presentation:class="page"/>
          <draw:frame presentation:style-name="pr6" draw:text-style-name="P13" draw:layer="layout" svg:width="14.362cm" svg:height="11.254cm" svg:x="3.25cm" svg:y="14.128cm" presentation:class="notes" presentation:placeholder="true">
            <draw:text-box/>
          </draw:frame>
        </presentation:notes>
      </draw:page>
      <draw:page draw:name="page162" draw:style-name="dp3" draw:master-page-name="Standard" presentation:presentation-page-layout-name="AL3T1">
        <draw:frame presentation:style-name="pr11" draw:layer="layout" svg:width="23.499cm" svg:height="3.577cm" svg:x="3.033cm" svg:y="2.366cm" presentation:class="title">
          <draw:text-box>
            <text:p>Configuration TLS et Vérification d’hôte</text:p>
          </draw:text-box>
        </draw:frame>
        <draw:frame presentation:style-name="pr5" draw:layer="layout" svg:width="23.499cm" svg:height="12.18cm" svg:x="3.033cm" svg:y="6.283cm" presentation:class="outline">
          <draw:text-box>
            <text:list text:style-name="L2">
              <text:list-item>
                <text:p>Les certificats des brokers doivent contenir le nom d'hôte du broker en tant que nom alternatif du sujet (SAN) extension ou comme nom commun (CN) pour permettre aux clients de vérifier l'hôte du serveur.</text:p>
              </text:list-item>
              <text:list-item>
                <text:p/>
              </text:list-item>
              <text:list-item>
                <text:p>Les certificats génériques utilisant les wildcards peuvent être utilisés pour simplifier l'administration en utilisant le même keystore pour tous les brokers d'un domaine</text:p>
              </text:list-item>
            </text:list>
          </draw:text-box>
        </draw:frame>
        <presentation:notes draw:style-name="dp5">
          <draw:page-thumbnail draw:style-name="gr2" draw:layer="layout" svg:width="15.597cm" svg:height="10.985cm" svg:x="2.623cm" svg:y="2.258cm" draw:page-number="162" presentation:class="page"/>
          <draw:frame presentation:style-name="pr6" draw:text-style-name="P13" draw:layer="layout" svg:width="14.362cm" svg:height="11.254cm" svg:x="3.25cm" svg:y="14.128cm" presentation:class="notes" presentation:placeholder="true">
            <draw:text-box/>
          </draw:frame>
        </presentation:notes>
      </draw:page>
      <draw:page draw:name="page163" draw:style-name="dp3" draw:master-page-name="Standard" presentation:presentation-page-layout-name="AL3T1">
        <draw:frame presentation:style-name="pr9" draw:layer="layout" svg:width="23.499cm" svg:height="3.575cm" svg:x="3.033cm" svg:y="2.367cm" presentation:class="title">
          <draw:text-box>
            <text:p>Configuration du broker</text:p>
          </draw:text-box>
        </draw:frame>
        <draw:frame presentation:style-name="pr5" draw:layer="layout" svg:width="23.499cm" svg:height="12.18cm" svg:x="3.033cm" svg:y="6.283cm" presentation:class="outline">
          <draw:text-box>
            <text:list text:style-name="L2">
              <text:list-item>
                <text:p><text:span text:style-name="T14">server.properties</text:span> :</text:p>
              </text:list-item>
              <text:list-item>
                <text:p><text:span text:style-name="T65">listeners=SSL://:port</text:span></text:p>
              </text:list-item>
              <text:list-item>
                <text:p><text:span text:style-name="T65">listener.security.protocol.map=SSL</text:span><text:span text:style-name="T65">:SSL</text:span></text:p>
              </text:list-item>
              <text:list-item>
                <text:p><text:span text:style-name="T79"/></text:p>
              </text:list-item>
              <text:list-item>
                <text:p text:style-name="P26"><text:span text:style-name="T146">ssl.keystore.location=/home/ubuntu/ssl/</text:span><text:span text:style-name="T146">server.keystore.jks</text:span></text:p>
              </text:list-item>
              <text:list-item>
                <text:p text:style-name="P26"><text:span text:style-name="T146">ssl.keystore.password=servpass</text:span></text:p>
              </text:list-item>
              <text:list-item>
                <text:p text:style-name="P26"><text:span text:style-name="T146">ssl.key.password=servpass</text:span></text:p>
              </text:list-item>
              <text:list-item>
                <text:p text:style-name="P26"><text:span text:style-name="T146">ssl.truststore.location=/home/ubuntu/ssl/</text:span><text:span text:style-name="T146">server.truststore.jks</text:span></text:p>
              </text:list-item>
              <text:list-item>
                <text:p text:style-name="P26"><text:span text:style-name="T146">ssl.truststore.password=servpass</text:span></text:p>
              </text:list-item>
            </text:list>
          </draw:text-box>
        </draw:frame>
        <presentation:notes draw:style-name="dp8">
          <draw:page-thumbnail draw:style-name="gr2" draw:layer="layout" svg:width="15.597cm" svg:height="10.985cm" svg:x="2.623cm" svg:y="2.258cm" draw:page-number="163" presentation:class="page"/>
          <draw:frame presentation:style-name="pr6" draw:text-style-name="P13" draw:layer="layout" svg:width="14.362cm" svg:height="11.254cm" svg:x="3.25cm" svg:y="14.128cm" presentation:class="notes" presentation:placeholder="true">
            <draw:text-box/>
          </draw:frame>
        </presentation:notes>
      </draw:page>
      <draw:page draw:name="page164" draw:style-name="dp3" draw:master-page-name="Standard" presentation:presentation-page-layout-name="AL3T1">
        <draw:frame presentation:style-name="pr9" draw:layer="layout" svg:width="23.499cm" svg:height="3.575cm" svg:x="3.033cm" svg:y="2.367cm" presentation:class="title">
          <draw:text-box>
            <text:p>Configuration des clients</text:p>
          </draw:text-box>
        </draw:frame>
        <draw:frame presentation:style-name="pr5" draw:text-style-name="P55" draw:layer="layout" svg:width="23.499cm" svg:height="12.18cm" svg:x="3.033cm" svg:y="6.283cm" presentation:class="outline" presentation:user-transformed="true">
          <draw:text-box>
            <text:list text:style-name="L2">
              <text:list-item>
                <text:p text:style-name="P26"><text:span text:style-name="T65">security.protocol=SSL</text:span></text:p>
              </text:list-item>
              <text:list-item>
                <text:p text:style-name="P26"><text:span text:style-name="T65">ssl.truststore.location=/var/</text:span><text:span text:style-name="T65">private/ssl/</text:span><text:span text:style-name="T65">client.truststore.jks</text:span></text:p>
              </text:list-item>
              <text:list-item>
                <text:p text:style-name="P26"><text:span text:style-name="T65">ssl.truststore.password=clipass</text:span></text:p>
              </text:list-item>
              <text:list-item>
                <text:p text:style-name="P26"><text:span text:style-name="T65"/></text:p>
              </text:list-item>
              <text:list-item>
                <text:p text:style-name="P26"><text:span text:style-name="T65"/></text:p>
              </text:list-item>
              <text:list-item>
                <text:p text:style-name="P26"><text:span text:style-name="T65"/></text:p>
              </text:list-item>
            </text:list>
          </draw:text-box>
        </draw:frame>
        <presentation:notes draw:style-name="dp8">
          <draw:page-thumbnail draw:style-name="gr2" draw:layer="layout" svg:width="15.597cm" svg:height="10.985cm" svg:x="2.623cm" svg:y="2.258cm" draw:page-number="164" presentation:class="page"/>
          <draw:frame presentation:style-name="pr6" draw:text-style-name="P13" draw:layer="layout" svg:width="14.362cm" svg:height="11.254cm" svg:x="3.25cm" svg:y="14.128cm" presentation:class="notes" presentation:placeholder="true">
            <draw:text-box/>
          </draw:frame>
        </presentation:notes>
      </draw:page>
      <draw:page draw:name="page165" draw:style-name="dp3" draw:master-page-name="Standard" presentation:presentation-page-layout-name="AL3T1">
        <draw:frame presentation:style-name="pr11" draw:layer="layout" svg:width="23.499cm" svg:height="3.577cm" svg:x="3.033cm" svg:y="2.366cm" presentation:class="title">
          <draw:text-box>
            <text:p>Authentification des clients via SSL</text:p>
          </draw:text-box>
        </draw:frame>
        <draw:frame presentation:style-name="pr5" draw:layer="layout" svg:width="23.499cm" svg:height="12.18cm" svg:x="3.033cm" svg:y="6.283cm" presentation:class="outline">
          <draw:text-box>
            <text:list text:style-name="L2">
              <text:list-item>
                <text:p>Si l'authentification du client est requise, un <text:span text:style-name="T14">keystore</text:span> doit également être créé et la configuration de <text:span text:style-name="T14">client.properties</text:span> doit contenir :</text:p>
              </text:list-item>
              <text:list-item>
                <text:p text:style-name="P33"><text:span text:style-name="T147">ssl.keystore.location=/var/private/</text:span><text:span text:style-name="T147">client.keystore.jks</text:span></text:p>
              </text:list-item>
              <text:list-item>
                <text:p text:style-name="P33"><text:span text:style-name="T147">ssl.keystore.password=test1234</text:span></text:p>
              </text:list-item>
              <text:list-item>
                <text:p text:style-name="P33"><text:span text:style-name="T147">ssl.key.password=test1234</text:span></text:p>
              </text:list-item>
            </text:list>
          </draw:text-box>
        </draw:frame>
        <draw:frame draw:style-name="gr34" draw:text-style-name="P34" draw:layer="layout" svg:width="11.733cm" svg:height="1.216cm" svg:x="1.603cm" svg:y="19.4cm">
          <draw:text-box>
            <text:p><text:span text:style-name="T73">Atelier 7.2 : Mise en place SSL</text:span></text:p>
          </draw:text-box>
        </draw:frame>
        <presentation:notes draw:style-name="dp8">
          <draw:page-thumbnail draw:style-name="gr2" draw:layer="layout" svg:width="15.597cm" svg:height="10.985cm" svg:x="2.623cm" svg:y="2.258cm" draw:page-number="165" presentation:class="page"/>
          <draw:frame presentation:style-name="pr6" draw:text-style-name="P13" draw:layer="layout" svg:width="14.362cm" svg:height="11.254cm" svg:x="3.25cm" svg:y="14.128cm" presentation:class="notes" presentation:placeholder="true">
            <draw:text-box/>
          </draw:frame>
        </presentation:notes>
      </draw:page>
      <draw:page draw:name="page166"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Sécurité</text:span></text:p>
              </text:list-header>
            </text:list>
          </draw:text-box>
        </draw:frame>
        <draw:frame presentation:style-name="pr30" draw:text-style-name="P16" draw:layer="layout" svg:width="23.499cm" svg:height="12.18cm" svg:x="3.033cm" svg:y="6.283cm" presentation:class="subtitle">
          <draw:text-box>
            <text:list text:style-name="L1">
              <text:list-item>
                <text:p text:style-name="P28"><text:span text:style-name="T143"/></text:p>
              </text:list-item>
              <text:list-item>
                <text:p text:style-name="P28"><text:span text:style-name="T143"/></text:p>
              </text:list-item>
              <text:list-item>
                <text:p text:style-name="P19"><text:span text:style-name="T2">Configuration des listeners</text:span></text:p>
              </text:list-item>
              <text:list-item>
                <text:p text:style-name="P28"><text:span text:style-name="T2">SSL/TLS</text:span></text:p>
              </text:list-item>
              <text:list-item>
                <text:p text:style-name="P19"><text:span text:style-name="T144">Authentification via SASL</text:span></text:p>
              </text:list-item>
              <text:list-item>
                <text:p text:style-name="P28"><text:span text:style-name="T145">ACLs</text:span></text:p>
              </text:list-item>
              <text:list-item>
                <text:p text:style-name="P28"><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67" draw:style-name="dp3" draw:master-page-name="Standard" presentation:presentation-page-layout-name="AL3T1">
        <draw:frame presentation:style-name="pr9" draw:layer="layout" svg:width="23.499cm" svg:height="3.575cm" svg:x="3.033cm" svg:y="2.367cm" presentation:class="title">
          <draw:text-box>
            <text:p>SASL</text:p>
          </draw:text-box>
        </draw:frame>
        <draw:frame presentation:style-name="pr5" draw:layer="layout" svg:width="23.499cm" svg:height="12.18cm" svg:x="3.033cm" svg:y="6.283cm" presentation:class="outline">
          <draw:text-box>
            <text:list text:style-name="L2">
              <text:list-item>
                <text:p><text:span text:style-name="T14">Simple Authentication and </text:span><text:span text:style-name="T14">Security Layer</text:span> pour <text:span text:style-name="T38">l’authentification</text:span></text:p>
              </text:list-item>
              <text:list-item>
                <text:p>Kafka utilise JAAS pour la configuration SASL.</text:p>
              </text:list-item>
              <text:list-item>
                <text:p>Mécanismes:</text:p>
                <text:list>
                  <text:list-item>
                    <text:p>GSSAPI: Kerberos</text:p>
                  </text:list-item>
                  <text:list-item>
                    <text:p>SCRAM-SHA-256, SCRAM-SHA-512: hashed passwords</text:p>
                  </text:list-item>
                  <text:list-item>
                    <text:p>PLAIN: <text:s/>username/password en clair</text:p>
                  </text:list-item>
                  <text:list-item>
                    <text:p>OAUTHBEARER (Depuis Kafka 3.x)</text:p>
                  </text:list-item>
                </text:list>
              </text:list-item>
            </text:list>
          </draw:text-box>
        </draw:frame>
        <presentation:notes draw:style-name="dp8">
          <draw:page-thumbnail draw:style-name="gr2" draw:layer="layout" svg:width="15.597cm" svg:height="10.985cm" svg:x="2.623cm" svg:y="2.258cm" draw:page-number="167" presentation:class="page"/>
          <draw:frame presentation:style-name="pr6" draw:text-style-name="P13" draw:layer="layout" svg:width="14.362cm" svg:height="11.254cm" svg:x="3.25cm" svg:y="14.128cm" presentation:class="notes" presentation:placeholder="true">
            <draw:text-box/>
          </draw:frame>
        </presentation:notes>
      </draw:page>
      <draw:page draw:name="page168" draw:style-name="dp3" draw:master-page-name="Standard" presentation:presentation-page-layout-name="AL3T1">
        <draw:frame presentation:style-name="pr9" draw:layer="layout" svg:width="23.499cm" svg:height="3.575cm" svg:x="3.033cm" svg:y="2.367cm" presentation:class="title">
          <draw:text-box>
            <text:p>Configuration JAAS</text:p>
          </draw:text-box>
        </draw:frame>
        <draw:frame presentation:style-name="pr5" draw:layer="layout" svg:width="23.499cm" svg:height="12.18cm" svg:x="3.033cm" svg:y="6.283cm" presentation:class="outline" presentation:user-transformed="true">
          <draw:text-box>
            <text:list text:style-name="L2">
              <text:list-item>
                <text:p>La configuration JAAS s’effectue :</text:p>
                <text:list>
                  <text:list-item>
                    <text:p>Soit via un <text:span text:style-name="T82">fichier jaas</text:span> </text:p>
                    <text:list>
                      <text:list-item>
                        <text:p>La propriété JVM <text:span text:style-name="T148">java.security.au</text:span><text:span text:style-name="T148">th.login.config</text:span> référence l’emplacement du fichier:</text:p>
                      </text:list-item>
                      <text:list-item>
                        <text:p>Le fichier contient une section <text:span text:style-name="T148">KafkaServer</text:span> pour l’authentification auprès d’un broker</text:p>
                      </text:list-item>
                    </text:list>
                  </text:list-item>
                  <text:list-item>
                    <text:p>Soit par la propriété :<text:line-break/> <text:span text:style-name="T149">listener.name.&lt;listener-</text:span><text:span text:style-name="T149">name&gt;.&lt;mechanism&gt;.sasl.jaas.</text:span><text:span text:style-name="T149">config </text:span></text:p>
                  </text:list-item>
                </text:list>
              </text:list-item>
              <text:list-item>
                <text:p><text:span text:style-name="T132"/></text:p>
              </text:list-item>
            </text:list>
          </draw:text-box>
        </draw:frame>
        <presentation:notes draw:style-name="dp8">
          <draw:page-thumbnail draw:style-name="gr2" draw:layer="layout" svg:width="15.597cm" svg:height="10.985cm" svg:x="2.623cm" svg:y="2.258cm" draw:page-number="168" presentation:class="page"/>
          <draw:frame presentation:style-name="pr6" draw:text-style-name="P13" draw:layer="layout" svg:width="14.362cm" svg:height="11.254cm" svg:x="3.25cm" svg:y="14.128cm" presentation:class="notes" presentation:placeholder="true">
            <draw:text-box/>
          </draw:frame>
        </presentation:notes>
      </draw:page>
      <draw:page draw:name="page169" draw:style-name="dp3" draw:master-page-name="Standard" presentation:presentation-page-layout-name="AL3T1">
        <draw:frame presentation:style-name="pr9" draw:layer="layout" svg:width="23.499cm" svg:height="3.575cm" svg:x="3.033cm" svg:y="2.367cm" presentation:class="title">
          <draw:text-box>
            <text:p>Fichier JAAS</text:p>
          </draw:text-box>
        </draw:frame>
        <draw:frame presentation:style-name="pr5" draw:layer="layout" svg:width="23.499cm" svg:height="12.18cm" svg:x="3.033cm" svg:y="6.283cm" presentation:class="outline" presentation:user-transformed="true">
          <draw:text-box>
            <text:list text:style-name="L2">
              <text:list-item>
                <text:p text:style-name="P24">L’exemple suivant définit 2 utilisateurs admin et alice <text:s/>qui pourront accéder au broker et l’identité avec laquelle le broker initiera les requêtes inter-broker</text:p>
              </text:list-item>
              <text:list-item>
                <text:p text:style-name="P56"><text:span text:style-name="T132">KafkaServer {</text:span></text:p>
              </text:list-item>
              <text:list-item>
                <text:p text:style-name="P56"><text:span text:style-name="T132"><text:s text:c="4"/></text:span><text:span text:style-name="T132">org.apache.kafka.common.security.plain.Pl</text:span><text:span text:style-name="T132">ainLoginModule required</text:span></text:p>
              </text:list-item>
              <text:list-item>
                <text:p text:style-name="P56"><text:span text:style-name="T132"><text:s text:c="4"/></text:span><text:span text:style-name="T132">username="admin"</text:span></text:p>
              </text:list-item>
              <text:list-item>
                <text:p text:style-name="P56"><text:span text:style-name="T132"><text:s text:c="4"/></text:span><text:span text:style-name="T132">password="admin-secret"</text:span></text:p>
              </text:list-item>
              <text:list-item>
                <text:p text:style-name="P56"><text:span text:style-name="T132"><text:s text:c="4"/></text:span><text:span text:style-name="T132">user_admin="admin-secret"</text:span></text:p>
              </text:list-item>
              <text:list-item>
                <text:p text:style-name="P56"><text:span text:style-name="T132"><text:s text:c="4"/></text:span><text:span text:style-name="T132">user_alice="alice-secret";</text:span></text:p>
              </text:list-item>
              <text:list-item>
                <text:p text:style-name="P56"><text:span text:style-name="T132">};</text:span></text:p>
                <text:list>
                  <text:list-item>
                    <text:p><text:span text:style-name="T132"/></text:p>
                  </text:list-item>
                </text:list>
              </text:list-item>
            </text:list>
          </draw:text-box>
        </draw:frame>
        <presentation:notes draw:style-name="dp8">
          <draw:page-thumbnail draw:style-name="gr2" draw:layer="layout" svg:width="15.597cm" svg:height="10.985cm" svg:x="2.623cm" svg:y="2.258cm" draw:page-number="169" presentation:class="page"/>
          <draw:frame presentation:style-name="pr6" draw:text-style-name="P13" draw:layer="layout" svg:width="14.362cm" svg:height="11.254cm" svg:x="3.25cm" svg:y="14.128cm" presentation:class="notes" presentation:placeholder="true">
            <draw:text-box/>
          </draw:frame>
        </presentation:notes>
      </draw:page>
      <draw:page draw:name="page170" draw:style-name="dp3" draw:master-page-name="Standard" presentation:presentation-page-layout-name="AL3T1">
        <draw:frame presentation:style-name="pr9" draw:layer="layout" svg:width="23.499cm" svg:height="3.575cm" svg:x="3.033cm" svg:y="2.367cm" presentation:class="title">
          <draw:text-box>
            <text:p>Propriété <text:span text:style-name="T14">sasl.jaas.config</text:span></text:p>
          </draw:text-box>
        </draw:frame>
        <draw:frame presentation:style-name="pr5" draw:layer="layout" svg:width="23.499cm" svg:height="12.18cm" svg:x="3.033cm" svg:y="6.283cm" presentation:class="outline" presentation:user-transformed="true">
          <draw:text-box>
            <text:list text:style-name="L2">
              <text:list-item>
                <text:p>La configuration JAAS peut également s’effectuer dans les propriétés Kafka</text:p>
              </text:list-item>
              <text:list-item>
                <text:p>L’exemple suivant configure le listener SASL_SSL utilisant le mécanisme scram-sha-256</text:p>
              </text:list-item>
              <text:list-item>
                <text:p text:style-name="P33"><text:span text:style-name="T132">listener.name.</text:span><text:span text:style-name="T150">sasl_ssl.scram-sha-</text:span><text:span text:style-name="T150">256.sasl</text:span><text:span text:style-name="T132">.jaas.config=org.apache.kafka.com</text:span><text:span text:style-name="T132">mon.security.scram.ScramLoginModule </text:span><text:span text:style-name="T132">required \</text:span></text:p>
              </text:list-item>
              <text:list-item>
                <text:p text:style-name="P33"><text:span text:style-name="T132"><text:s text:c="4"/></text:span><text:span text:style-name="T132">username="admin" \</text:span></text:p>
              </text:list-item>
              <text:list-item>
                <text:p text:style-name="P33"><text:span text:style-name="T132"><text:s text:c="4"/></text:span><text:span text:style-name="T132">password="admin-secret";</text:span></text:p>
              </text:list-item>
            </text:list>
          </draw:text-box>
        </draw:frame>
        <presentation:notes draw:style-name="dp8">
          <draw:page-thumbnail draw:style-name="gr2" draw:layer="layout" svg:width="15.597cm" svg:height="10.985cm" svg:x="2.623cm" svg:y="2.258cm" draw:page-number="170" presentation:class="page"/>
          <draw:frame presentation:style-name="pr6" draw:text-style-name="P13" draw:layer="layout" svg:width="14.362cm" svg:height="11.254cm" svg:x="3.25cm" svg:y="14.128cm" presentation:class="notes" presentation:placeholder="true">
            <draw:text-box/>
          </draw:frame>
        </presentation:notes>
      </draw:page>
      <draw:page draw:name="page171" draw:style-name="dp3" draw:master-page-name="Standard" presentation:presentation-page-layout-name="AL3T1">
        <draw:frame presentation:style-name="pr9" draw:layer="layout" svg:width="23.499cm" svg:height="3.575cm" svg:x="3.033cm" svg:y="2.367cm" presentation:class="title">
          <draw:text-box>
            <text:p>Mécanismes</text:p>
          </draw:text-box>
        </draw:frame>
        <draw:frame presentation:style-name="pr5" draw:layer="layout" svg:width="23.499cm" svg:height="12.18cm" svg:x="3.033cm" svg:y="6.283cm" presentation:class="outline" presentation:user-transformed="true">
          <draw:text-box>
            <text:list text:style-name="L2">
              <text:list-item>
                <text:p><text:span text:style-name="T31">SASL/Kerberos</text:span> : Nécessite un serveur (Active Directory par exemple), d’y créer les Principals représentant les brokers. Tous les hosts kafka doivent être atteignables via leur FQDNs</text:p>
              </text:list-item>
              <text:list-item>
                <text:p><text:span text:style-name="T31">SASL/PLAIN</text:span> est un mécanisme simple d'authentification par login/mot de passe. Il doit être utilisé avec TLS. Kafka fournit une implémentation par défaut qui peut être étendue pour la production</text:p>
              </text:list-item>
              <text:list-item>
                <text:p><text:span text:style-name="T31">SASL/SCRAM (256/512)</text:span> (Salted Challenge Response Authentication Mechanism) : Mot de passe haché stocké dans Zookeeper</text:p>
              </text:list-item>
              <text:list-item>
                <text:p><text:span text:style-name="T31">SASL/OAUTHBEARER</text:span> : Basé sur oAuth2 </text:p>
              </text:list-item>
            </text:list>
          </draw:text-box>
        </draw:frame>
        <presentation:notes draw:style-name="dp8">
          <draw:page-thumbnail draw:style-name="gr2" draw:layer="layout" svg:width="15.597cm" svg:height="10.985cm" svg:x="2.623cm" svg:y="2.258cm" draw:page-number="171" presentation:class="page"/>
          <draw:frame presentation:style-name="pr6" draw:text-style-name="P13" draw:layer="layout" svg:width="14.362cm" svg:height="11.254cm" svg:x="3.25cm" svg:y="14.128cm" presentation:class="notes" presentation:placeholder="true">
            <draw:text-box/>
          </draw:frame>
        </presentation:notes>
      </draw:page>
      <draw:page draw:name="page172" draw:style-name="dp3" draw:master-page-name="Standard" presentation:presentation-page-layout-name="AL3T1">
        <draw:frame presentation:style-name="pr9" draw:layer="layout" svg:width="23.499cm" svg:height="3.575cm" svg:x="3.033cm" svg:y="2.367cm" presentation:class="title">
          <draw:text-box>
            <text:p>SASL PLAIN</text:p>
          </draw:text-box>
        </draw:frame>
        <draw:frame presentation:style-name="pr5" draw:layer="layout" svg:width="23.499cm" svg:height="12.18cm" svg:x="3.033cm" svg:y="6.283cm" presentation:class="outline" presentation:user-transformed="true">
          <draw:text-box>
            <text:list text:style-name="L2">
              <text:list-item>
                <text:p>1. Configurer le fichier JAAS</text:p>
              </text:list-item>
              <text:list-item>
                <text:p text:style-name="P33">2. Passer l'emplacement du fichier de configuration JAAS en tant que paramètre JVM à chaque broker <text:line-break/><text:span text:style-name="T64">-</text:span><text:span text:style-name="T64">Djava.security.auth.login.config=</text:span><text:span text:style-name="T64">/etc/kafka/kafka_server_jaas.conf</text:span></text:p>
              </text:list-item>
              <text:list-item>
                <text:p text:style-name="P33"><text:span text:style-name="T64"/></text:p>
              </text:list-item>
              <text:list-item>
                <text:p>3. Configurer SASL dans <text:span text:style-name="T14">server.properties</text:span></text:p>
              </text:list-item>
              <text:list-item>
                <text:p text:style-name="P33"><text:span text:style-name="T64">listeners=SASL_SSL://host.name:port</text:span></text:p>
              </text:list-item>
              <text:list-item>
                <text:p text:style-name="P33"><text:span text:style-name="T64">security.inter.broker.protocol=SASL_</text:span><text:span text:style-name="T64">SSL</text:span></text:p>
              </text:list-item>
              <text:list-item>
                <text:p text:style-name="P33"><text:span text:style-name="T64">sasl.mechanism.inter.broker.protocol</text:span><text:span text:style-name="T64">=PLAIN</text:span></text:p>
              </text:list-item>
              <text:list-item>
                <text:p text:style-name="P33"><text:span text:style-name="T64">sasl.enabled.mechanisms=PLAIN</text:span></text:p>
              </text:list-item>
            </text:list>
          </draw:text-box>
        </draw:frame>
        <presentation:notes draw:style-name="dp8">
          <draw:page-thumbnail draw:style-name="gr2" draw:layer="layout" svg:width="15.597cm" svg:height="10.985cm" svg:x="2.623cm" svg:y="2.258cm" draw:page-number="172" presentation:class="page"/>
          <draw:frame presentation:style-name="pr6" draw:text-style-name="P13" draw:layer="layout" svg:width="14.362cm" svg:height="11.254cm" svg:x="3.25cm" svg:y="14.128cm" presentation:class="notes" presentation:placeholder="true">
            <draw:text-box/>
          </draw:frame>
        </presentation:notes>
      </draw:page>
      <draw:page draw:name="page173" draw:style-name="dp3" draw:master-page-name="Standard" presentation:presentation-page-layout-name="AL3T1">
        <draw:frame presentation:style-name="pr9" draw:layer="layout" svg:width="23.499cm" svg:height="3.575cm" svg:x="3.033cm" svg:y="2.367cm" presentation:class="title">
          <draw:text-box>
            <text:p>Configuration du client</text:p>
          </draw:text-box>
        </draw:frame>
        <draw:frame presentation:style-name="pr5" draw:layer="layout" svg:width="23.499cm" svg:height="12.18cm" svg:x="3.033cm" svg:y="6.283cm" presentation:class="outline">
          <draw:text-box>
            <text:list text:style-name="L2">
              <text:list-item>
                <text:p>Créer le fichier Jaas</text:p>
              </text:list-item>
              <text:list-item>
                <text:p><text:span text:style-name="T67">KafkaClient {</text:span></text:p>
              </text:list-item>
              <text:list-item>
                <text:p><text:span text:style-name="T70"><text:s text:c="2"/></text:span><text:span text:style-name="T70">org.apache.kafka.common.se</text:span><text:span text:style-name="T70">curity.plain.PlainLoginMod</text:span><text:span text:style-name="T70">ule required</text:span><text:span text:style-name="T70"><text:line-break/></text:span><text:span text:style-name="T70">username="alice"</text:span><text:span text:style-name="T70"><text:line-break/></text:span><text:span text:style-name="T70">password="</text:span><text:span text:style-name="T67">alice-secret" </text:span></text:p>
              </text:list-item>
              <text:list-item>
                <text:p><text:span text:style-name="T67">} ;</text:span></text:p>
              </text:list-item>
              <text:list-item>
                <text:p/>
              </text:list-item>
              <text:list-item>
                <text:p>Ajouter un paramètre JVM </text:p>
              </text:list-item>
              <text:list-item>
                <text:p><text:span text:style-name="T151">-</text:span><text:span text:style-name="T151">Djava.security.auth.login.c</text:span><text:span text:style-name="T151">onfig=/home/ubuntu/ssl/</text:span><text:span text:style-name="T151">client_jaas.conf</text:span></text:p>
              </text:list-item>
              <text:list-item>
                <text:p><text:span text:style-name="T14">client.properties</text:span></text:p>
              </text:list-item>
              <text:list-item>
                <text:p text:style-name="P26"><text:span text:style-name="T67"><text:s/></text:span><text:span text:style-name="T67">security.protocol=SASL_SSL</text:span></text:p>
              </text:list-item>
              <text:list-item>
                <text:p text:style-name="P26"><text:span text:style-name="T67"><text:s/></text:span><text:span text:style-name="T67">sasl.mechanisms=PLAIN</text:span></text:p>
              </text:list-item>
            </text:list>
          </draw:text-box>
        </draw:frame>
        <presentation:notes draw:style-name="dp8">
          <draw:page-thumbnail draw:style-name="gr2" draw:layer="layout" svg:width="15.597cm" svg:height="10.985cm" svg:x="2.623cm" svg:y="2.258cm" draw:page-number="173" presentation:class="page"/>
          <draw:frame presentation:style-name="pr6" draw:text-style-name="P13" draw:layer="layout" svg:width="14.362cm" svg:height="11.254cm" svg:x="3.25cm" svg:y="14.128cm" presentation:class="notes" presentation:placeholder="true">
            <draw:text-box/>
          </draw:frame>
        </presentation:notes>
      </draw:page>
      <draw:page draw:name="page174" draw:style-name="dp3" draw:master-page-name="Standard" presentation:presentation-page-layout-name="AL3T1">
        <draw:frame presentation:style-name="pr9" draw:layer="layout" svg:width="23.499cm" svg:height="3.575cm" svg:x="3.033cm" svg:y="2.367cm" presentation:class="title">
          <draw:text-box>
            <text:p>SASL / PLAIN en production</text:p>
          </draw:text-box>
        </draw:frame>
        <draw:frame presentation:style-name="pr5" draw:layer="layout" svg:width="23.499cm" svg:height="12.18cm" svg:x="3.033cm" svg:y="6.283cm" presentation:class="outline" presentation:user-transformed="true">
          <draw:text-box>
            <text:list text:style-name="L2">
              <text:list-item>
                <text:p>Doit être utilisé avec SSL</text:p>
              </text:list-item>
              <text:list-item>
                <text:p>Possibilité d’éviter de stocker des mots de passe clairs en configurant des <text:span text:style-name="T14">callback handler</text:span> qui obtiennent le nom d'utilisateur et le mot de passe d'une source externe via :<text:line-break/><text:span text:style-name="T31">sasl.server.callback.han</text:span><text:span text:style-name="T31">dler.class</text:span> <text:line-break/>et <text:line-break/><text:span text:style-name="T31">sasl.client.callback.han</text:span><text:span text:style-name="T31">dler.class.</text:span></text:p>
              </text:list-item>
              <text:list-item>
                <text:p>Possibilité d’intégrer des <text:span text:style-name="T14">callback handler</text:span> utilisant des serveurs d'authentification externes pour la vérification du mot de passe via<text:span text:style-name="T31"> </text:span><text:span text:style-name="T31"><text:line-break/></text:span><text:span text:style-name="T31">sasl.server.callback.han</text:span><text:span text:style-name="T31">dler.class</text:span></text:p>
              </text:list-item>
            </text:list>
          </draw:text-box>
        </draw:frame>
        <presentation:notes draw:style-name="dp8">
          <draw:page-thumbnail draw:style-name="gr2" draw:layer="layout" svg:width="15.597cm" svg:height="10.985cm" svg:x="2.623cm" svg:y="2.258cm" draw:page-number="174" presentation:class="page"/>
          <draw:frame presentation:style-name="pr6" draw:text-style-name="P13" draw:layer="layout" svg:width="14.362cm" svg:height="11.254cm" svg:x="3.25cm" svg:y="14.128cm" presentation:class="notes" presentation:placeholder="true">
            <draw:text-box/>
          </draw:frame>
        </presentation:notes>
      </draw:page>
      <draw:page draw:name="page175" draw:style-name="dp3" draw:master-page-name="Standard" presentation:presentation-page-layout-name="AL3T1">
        <draw:frame presentation:style-name="pr9" draw:layer="layout" svg:width="23.499cm" svg:height="3.575cm" svg:x="3.033cm" svg:y="2.367cm" presentation:class="title">
          <draw:text-box>
            <text:p>SASL / oAuth</text:p>
          </draw:text-box>
        </draw:frame>
        <draw:frame presentation:style-name="pr5" draw:text-style-name="P53" draw:layer="layout" svg:width="23.499cm" svg:height="12.18cm" svg:x="3.033cm" svg:y="6.283cm" presentation:class="outline" presentation:user-transformed="true">
          <draw:text-box>
            <text:list text:style-name="L2">
              <text:list-item>
                <text:p text:style-name="P33"><text:span text:style-name="T152"># Activer SASL</text:span></text:p>
              </text:list-item>
              <text:list-item>
                <text:p text:style-name="P33"><text:span text:style-name="T65">listeners=SASL_PLAINTEXT://:9092</text:span></text:p>
              </text:list-item>
              <text:list-item>
                <text:p text:style-name="P33"><text:span text:style-name="T65">listener.security.protocol.map=SAS</text:span><text:span text:style-name="T65">L_PLAINTEXT:SASL_PLAINTEXT</text:span></text:p>
              </text:list-item>
              <text:list-item>
                <text:p text:style-name="P33"><text:span text:style-name="T153">sasl.enabled.mechanisms=OAUTHBEARE</text:span><text:span text:style-name="T153">R</text:span></text:p>
              </text:list-item>
              <text:list-item>
                <text:p text:style-name="P33"><text:span text:style-name="T65">inter.broker.listener.name=SASL_PL</text:span><text:span text:style-name="T65">AINTEXT</text:span></text:p>
              </text:list-item>
              <text:list-item>
                <text:p text:style-name="P33"><text:span text:style-name="T79"/></text:p>
              </text:list-item>
              <text:list-item>
                <text:p text:style-name="P33"><text:span text:style-name="T152"># Config OAuth</text:span></text:p>
              </text:list-item>
              <text:list-item>
                <text:p text:style-name="P33"><text:span text:style-name="T153">sasl.server.callback.handler.class</text:span><text:span text:style-name="T153">=org.apache.kafka.common.securi</text:span><text:span text:style-name="T153">ty.oauthbearer.OAuthBearerValid</text:span><text:span text:style-name="T153">atorCallbackHandler</text:span></text:p>
              </text:list-item>
              <text:list-item>
                <text:p text:style-name="P33"><text:span text:style-name="T79"/></text:p>
              </text:list-item>
              <text:list-item>
                <text:p text:style-name="P33"><text:span text:style-name="T152"># Vérification des JWT avec JWKS </text:span><text:span text:style-name="T152">de Keycloak</text:span></text:p>
              </text:list-item>
              <text:list-item>
                <text:p text:style-name="P33"><text:span text:style-name="T153">oauthbearer.jwks.endpoint.url=http</text:span><text:span text:style-name="T153">s://&lt;keycloak-host&gt;/realms/</text:span><text:span text:style-name="T153">&lt;realm&gt;/protocol/openid-</text:span><text:span text:style-name="T153">connect/certs</text:span></text:p>
              </text:list-item>
              <text:list-item>
                <text:p text:style-name="P33"><text:span text:style-name="T79"/></text:p>
              </text:list-item>
              <text:list-item>
                <text:p text:style-name="P33"><text:span text:style-name="T152"># Optionnel : audience/issuer</text:span></text:p>
              </text:list-item>
              <text:list-item>
                <text:p text:style-name="P33"><text:span text:style-name="T65">oauthbearer.jwks.endpoint.refresh.</text:span><text:span text:style-name="T65">ms=3600000</text:span></text:p>
              </text:list-item>
              <text:list-item>
                <text:p text:style-name="P33"><text:span text:style-name="T65">oauthbearer.expected.audience=kafk</text:span><text:span text:style-name="T65">a-clients</text:span></text:p>
              </text:list-item>
              <text:list-item>
                <text:p text:style-name="P33"><text:span text:style-name="T65">oauthbearer.expected.issuer=https:</text:span><text:span text:style-name="T65">//&lt;keycloak-host&gt;/realms/</text:span><text:span text:style-name="T65">&lt;realm&gt;</text:span></text:p>
              </text:list-item>
            </text:list>
          </draw:text-box>
        </draw:frame>
        <presentation:notes draw:style-name="dp8">
          <draw:page-thumbnail draw:style-name="gr2" draw:layer="layout" svg:width="15.597cm" svg:height="10.985cm" svg:x="2.623cm" svg:y="2.258cm" draw:page-number="175" presentation:class="page"/>
          <draw:frame presentation:style-name="pr6" draw:text-style-name="P13" draw:layer="layout" svg:width="14.362cm" svg:height="11.254cm" svg:x="3.25cm" svg:y="14.128cm" presentation:class="notes" presentation:placeholder="true">
            <draw:text-box/>
          </draw:frame>
        </presentation:notes>
      </draw:page>
      <draw:page draw:name="page176"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Sécurité</text:span></text:p>
              </text:list-header>
            </text:list>
          </draw:text-box>
        </draw:frame>
        <draw:frame presentation:style-name="pr31" draw:text-style-name="P16" draw:layer="layout" svg:width="23.499cm" svg:height="12.18cm" svg:x="3.033cm" svg:y="6.283cm" presentation:class="subtitle">
          <draw:text-box>
            <text:list text:style-name="L1">
              <text:list-item>
                <text:p text:style-name="P28"><text:span text:style-name="T143"/></text:p>
              </text:list-item>
              <text:list-item>
                <text:p text:style-name="P28"><text:span text:style-name="T143"/></text:p>
              </text:list-item>
              <text:list-item>
                <text:p text:style-name="P19"><text:span text:style-name="T2">Configuration des listeners</text:span></text:p>
              </text:list-item>
              <text:list-item>
                <text:p text:style-name="P28"><text:span text:style-name="T2">SSL/TLS</text:span></text:p>
              </text:list-item>
              <text:list-item>
                <text:p text:style-name="P19"><text:span text:style-name="T2">Authentification via SASL</text:span></text:p>
              </text:list-item>
              <text:list-item>
                <text:p text:style-name="P19"><text:span text:style-name="T144">ACLs</text:span></text:p>
              </text:list-item>
              <text:list-item>
                <text:p text:style-name="P28"><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77"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es brokers Kafka gèrent le contrôle d'accès à l'aide d'une API définie par l’interface <text:span text:style-name="T14">org.apache.kafka.server.a</text:span><text:span text:style-name="T14">uthorizer.Authorizer</text:span></text:p>
              </text:list-item>
              <text:list-item>
                <text:p>L’implémentation est configurée via la propriété : <text:span text:style-name="T72">authorizer.class.name</text:span></text:p>
              </text:list-item>
              <text:list-item>
                <text:p>Kafka fournit 2 implémentations</text:p>
                <text:list>
                  <text:list-item>
                    <text:p>Pour Zookeeper, <text:line-break/><text:span text:style-name="T154">kafka.security.authorize</text:span><text:span text:style-name="T154">r.AclAuthorizer</text:span></text:p>
                  </text:list-item>
                  <text:list-item>
                    <text:p>En kraft mode<text:line-break/><text:span text:style-name="T154">org.apache.kafka.metad</text:span><text:span text:style-name="T154">ata.authorizer.Standard</text:span><text:span text:style-name="T154">Authorizer</text:span><text:line-break/></text:p>
                  </text:list-item>
                </text:list>
              </text:list-item>
            </text:list>
          </draw:text-box>
        </draw:frame>
        <presentation:notes draw:style-name="dp5">
          <draw:page-thumbnail draw:style-name="gr2" draw:layer="layout" svg:width="15.597cm" svg:height="10.985cm" svg:x="2.623cm" svg:y="2.258cm" draw:page-number="177" presentation:class="page"/>
          <draw:frame presentation:style-name="pr6" draw:text-style-name="P13" draw:layer="layout" svg:width="14.362cm" svg:height="11.254cm" svg:x="3.25cm" svg:y="14.128cm" presentation:class="notes" presentation:placeholder="true">
            <draw:text-box/>
          </draw:frame>
        </presentation:notes>
      </draw:page>
      <draw:page draw:name="page178" draw:style-name="dp3" draw:master-page-name="Standard" presentation:presentation-page-layout-name="AL3T1">
        <draw:frame presentation:style-name="pr9" draw:layer="layout" svg:width="23.499cm" svg:height="3.575cm" svg:x="3.033cm" svg:y="2.367cm" presentation:class="title">
          <draw:text-box>
            <text:p>Contrôleurs</text:p>
          </draw:text-box>
        </draw:frame>
        <draw:frame presentation:style-name="pr5" draw:layer="layout" svg:width="23.499cm" svg:height="12.18cm" svg:x="3.033cm" svg:y="6.283cm" presentation:class="outline">
          <draw:text-box>
            <text:list text:style-name="L2">
              <text:list-item>
                <text:p>Dés lors que les ACLs sont activées, les contrôleurs doivent s’identifier pour communiquer.</text:p>
              </text:list-item>
              <text:list-item>
                <text:p>Par exemple pour SASL_PLAIN :</text:p>
              </text:list-item>
              <text:list-item>
                <text:p text:style-name="P33"><text:span text:style-name="T79">controller.listener.name</text:span><text:span text:style-name="T79">s=CONTROLLER</text:span></text:p>
              </text:list-item>
              <text:list-item>
                <text:p text:style-name="P33"><text:span text:style-name="T79">listener.security.protoc</text:span><text:span text:style-name="T79">ol.map=CONTROLLER:SASL</text:span><text:span text:style-name="T79">_SSL,…</text:span></text:p>
              </text:list-item>
              <text:list-item>
                <text:p text:style-name="P33"><text:span text:style-name="T79">sasl.mechanism.controlle</text:span><text:span text:style-name="T79">r.protocol=PLAIN</text:span></text:p>
              </text:list-item>
              <text:list-item>
                <text:p/>
              </text:list-item>
              <text:list-item>
                <text:p>Le fichier JAAS contient une section pour le contrôleur préfixé avec le nom du listener</text:p>
              </text:list-item>
              <text:list-item>
                <text:p text:style-name="P33"><text:span text:style-name="T67">controller.KafkaServer {</text:span></text:p>
              </text:list-item>
              <text:list-item>
                <text:p text:style-name="P33"><text:span text:style-name="T67"><text:s text:c="4"/></text:span><text:span text:style-name="T67">org.apache.kafka.common.se</text:span><text:span text:style-name="T67">curity.plain.PlainLoginMod</text:span><text:span text:style-name="T67">ule required</text:span></text:p>
              </text:list-item>
              <text:list-item>
                <text:p text:style-name="P33"><text:span text:style-name="T67"><text:s text:c="4"/></text:span><text:span text:style-name="T67">username="admin"</text:span></text:p>
              </text:list-item>
              <text:list-item>
                <text:p text:style-name="P33"><text:span text:style-name="T67"><text:s text:c="4"/></text:span><text:span text:style-name="T67">password="admin-secret"</text:span></text:p>
              </text:list-item>
              <text:list-item>
                <text:p text:style-name="P33"><text:span text:style-name="T67"><text:s text:c="4"/></text:span><text:span text:style-name="T67">user_admin="admin-</text:span><text:span text:style-name="T67">secret";</text:span></text:p>
              </text:list-item>
              <text:list-item>
                <text:p text:style-name="P33"><text:span text:style-name="T67">};</text:span></text:p>
              </text:list-item>
            </text:list>
          </draw:text-box>
        </draw:frame>
        <presentation:notes draw:style-name="dp5">
          <draw:page-thumbnail draw:style-name="gr2" draw:layer="layout" svg:width="15.597cm" svg:height="10.985cm" svg:x="2.623cm" svg:y="2.258cm" draw:page-number="178" presentation:class="page"/>
          <draw:frame presentation:style-name="pr6" draw:text-style-name="P13" draw:layer="layout" svg:width="14.362cm" svg:height="11.254cm" svg:x="3.25cm" svg:y="14.128cm" presentation:class="notes" presentation:placeholder="true">
            <draw:text-box/>
          </draw:frame>
        </presentation:notes>
      </draw:page>
      <draw:page draw:name="page179" draw:style-name="dp3" draw:master-page-name="Standard" presentation:presentation-page-layout-name="AL3T1">
        <draw:frame presentation:style-name="pr9" draw:layer="layout" svg:width="23.499cm" svg:height="3.575cm" svg:x="3.033cm" svg:y="2.367cm" presentation:class="title">
          <draw:text-box>
            <text:p>Autorisation</text:p>
          </draw:text-box>
        </draw:frame>
        <draw:frame presentation:style-name="pr5" draw:layer="layout" svg:width="23.499cm" svg:height="12.18cm" svg:x="3.033cm" svg:y="6.283cm" presentation:class="outline" presentation:user-transformed="true">
          <draw:text-box>
            <text:list text:style-name="L2">
              <text:list-item>
                <text:p text:style-name="P24"><text:span text:style-name="T26">Les ACLs sont stockées dans </text:span><text:span text:style-name="T26">les méta-données gérées </text:span><text:span text:style-name="T26">par les contrôleurs et </text:span><text:span text:style-name="T26">peuvent être gérées par </text:span><text:span text:style-name="T26">l’</text:span>utilitaire <text:span text:style-name="T148">kafka-acls.sh</text:span> </text:p>
              </text:list-item>
              <text:list-item>
                <text:p>Chaque requête Kafka est autorisée si le <text:span text:style-name="T14">KafkaPrincipal</text:span> associé à la connexion a les autorisations pour effectuer l'opération demandée sur les ressources demandées.</text:p>
              </text:list-item>
              <text:list-item>
                <text:p>Les règles peuvent être exprimées comme suit :</text:p>
              </text:list-item>
              <text:list-item>
                <text:p><text:span text:style-name="T14">Principal P is </text:span><text:span text:style-name="T14">[Allowed/Denied] </text:span><text:span text:style-name="T14">Operation O From Host H </text:span><text:span text:style-name="T14">on any Resource R </text:span><text:span text:style-name="T14">matching ResourcePattern </text:span><text:span text:style-name="T14">RP</text:span></text:p>
                <text:p/>
              </text:list-item>
            </text:list>
          </draw:text-box>
        </draw:frame>
        <presentation:notes draw:style-name="dp8">
          <draw:page-thumbnail draw:style-name="gr2" draw:layer="layout" svg:width="15.597cm" svg:height="10.985cm" svg:x="2.623cm" svg:y="2.258cm" draw:page-number="179" presentation:class="page"/>
          <draw:frame presentation:style-name="pr6" draw:text-style-name="P13" draw:layer="layout" svg:width="14.362cm" svg:height="11.254cm" svg:x="3.25cm" svg:y="14.128cm" presentation:class="notes" presentation:placeholder="true">
            <draw:text-box/>
          </draw:frame>
        </presentation:notes>
      </draw:page>
      <draw:page draw:name="page180" draw:style-name="dp3" draw:master-page-name="Standard" presentation:presentation-page-layout-name="AL3T1">
        <draw:frame presentation:style-name="pr9" draw:layer="layout" svg:width="23.499cm" svg:height="3.575cm" svg:x="3.033cm" svg:y="2.367cm" presentation:class="title">
          <draw:text-box>
            <text:p>Exemple</text:p>
          </draw:text-box>
        </draw:frame>
        <draw:frame presentation:style-name="pr5" draw:layer="layout" svg:width="23.499cm" svg:height="12.18cm" svg:x="3.033cm" svg:y="6.283cm" presentation:class="outline">
          <draw:text-box>
            <text:list text:style-name="L2">
              <text:list-item>
                <text:p><text:span text:style-name="T14">Principals User:Bob et </text:span><text:span text:style-name="T14">User:Alice sont autorisés à </text:span><text:span text:style-name="T14">effectuer les opérations </text:span><text:span text:style-name="T14">Read et Write sur le Topic </text:span><text:span text:style-name="T14">Test-Topic à partir des IP </text:span><text:span text:style-name="T14">198.51.100.0 et IP </text:span><text:span text:style-name="T14">198.51.100.1</text:span></text:p>
              </text:list-item>
              <text:list-item>
                <text:p/>
              </text:list-item>
              <text:list-item>
                <text:p><text:s/><text:span text:style-name="T79">bin/kafka-acls.sh –</text:span><text:span text:style-name="T79">bootstrap-servers </text:span><text:span text:style-name="T79">localhost:9092 --add </text:span><text:span text:style-name="T79">--allow-principal </text:span><text:span text:style-name="T79">User:Bob --allow-</text:span><text:span text:style-name="T79">principal User:Alice </text:span><text:span text:style-name="T79">--allow-host </text:span><text:span text:style-name="T79">198.51.100.0 --allow-</text:span><text:span text:style-name="T79">host 198.51.100.1 --</text:span><text:span text:style-name="T79">operation Read --</text:span><text:span text:style-name="T79">operation Write --</text:span><text:span text:style-name="T79">topic Test-topic</text:span></text:p>
              </text:list-item>
            </text:list>
          </draw:text-box>
        </draw:frame>
        <presentation:notes draw:style-name="dp8">
          <draw:page-thumbnail draw:style-name="gr2" draw:layer="layout" svg:width="15.597cm" svg:height="10.985cm" svg:x="2.623cm" svg:y="2.258cm" draw:page-number="180" presentation:class="page"/>
          <draw:frame presentation:style-name="pr6" draw:text-style-name="P13" draw:layer="layout" svg:width="14.362cm" svg:height="11.254cm" svg:x="3.25cm" svg:y="14.128cm" presentation:class="notes" presentation:placeholder="true">
            <draw:text-box/>
          </draw:frame>
        </presentation:notes>
      </draw:page>
      <draw:page draw:name="page181" draw:style-name="dp3" draw:master-page-name="Standard" presentation:presentation-page-layout-name="AL3T1">
        <draw:frame presentation:style-name="pr9" draw:layer="layout" svg:width="23.499cm" svg:height="3.575cm" svg:x="3.033cm" svg:y="2.367cm" presentation:class="title">
          <draw:text-box>
            <text:p>Ressources et opérations</text:p>
          </draw:text-box>
        </draw:frame>
        <draw:frame presentation:style-name="pr5" draw:layer="layout" svg:width="23.499cm" svg:height="12.18cm" svg:x="3.033cm" svg:y="6.283cm" presentation:class="outline">
          <draw:text-box>
            <text:list text:style-name="L2">
              <text:list-item>
                <text:p>Chaque ACL consiste en :</text:p>
                <text:list>
                  <text:list-item>
                    <text:p><text:span text:style-name="T155">Type de ressource</text:span> : <text:span text:style-name="T14">Cluster | Topic | </text:span><text:span text:style-name="T14">Group | </text:span><text:span text:style-name="T14">TransactionalId</text:span></text:p>
                  </text:list-item>
                  <text:list-item>
                    <text:p><text:span text:style-name="T155">Type</text:span> <text:span text:style-name="T155">de</text:span> <text:span text:style-name="T155">pattern</text:span> : <text:span text:style-name="T14">Literal | Prefixed</text:span></text:p>
                  </text:list-item>
                  <text:list-item>
                    <text:p><text:span text:style-name="T155">Nom</text:span> <text:span text:style-name="T155">de la ressource</text:span> : Possibilité d’utiliser les wildcards</text:p>
                  </text:list-item>
                  <text:list-item>
                    <text:p><text:span text:style-name="T155">Opération</text:span> : <text:span text:style-name="T14">Describe | </text:span><text:span text:style-name="T14">Create | Delete | Alter </text:span><text:span text:style-name="T14">| Read | Write | </text:span><text:span text:style-name="T14">DescribeConfigs | </text:span><text:span text:style-name="T14">AlterConfigs</text:span></text:p>
                  </text:list-item>
                  <text:list-item>
                    <text:p><text:span text:style-name="T155">Type de permission</text:span> : <text:span text:style-name="T14">Allow | Deny</text:span></text:p>
                  </text:list-item>
                  <text:list-item>
                    <text:p><text:span text:style-name="T155">Principal</text:span> : De la forme <text:span text:style-name="T14">&lt;principalType&gt;:&lt;pri</text:span><text:span text:style-name="T14">ncipalName&gt;</text:span><text:line-break/>Exemple : <text:span text:style-name="T14">User:Alice, </text:span><text:span text:style-name="T14">Group:Sales, User :*</text:span></text:p>
                  </text:list-item>
                  <text:list-item>
                    <text:p><text:span text:style-name="T155">Host</text:span> : Adresse IP du client, * si tout le monde</text:p>
                  </text:list-item>
                </text:list>
              </text:list-item>
              <text:list-item>
                <text:p>Exemple Complet :<text:line-break/><text:span text:style-name="T14">User:Alice has Allow </text:span><text:span text:style-name="T14">permission for Write to </text:span><text:span text:style-name="T14">Prefixed Topic:customer </text:span><text:span text:style-name="T14">from 192.168.0.1</text:span></text:p>
              </text:list-item>
            </text:list>
          </draw:text-box>
        </draw:frame>
        <presentation:notes draw:style-name="dp2">
          <draw:page-thumbnail draw:style-name="gr2" draw:layer="layout" svg:width="15.597cm" svg:height="10.985cm" svg:x="2.623cm" svg:y="2.258cm" draw:page-number="181" presentation:class="page"/>
          <draw:frame presentation:style-name="pr6" draw:text-style-name="P13" draw:layer="layout" svg:width="14.362cm" svg:height="11.254cm" svg:x="3.25cm" svg:y="14.128cm" presentation:class="notes" presentation:placeholder="true">
            <draw:text-box/>
          </draw:frame>
        </presentation:notes>
      </draw:page>
      <draw:page draw:name="page182" draw:style-name="dp3" draw:master-page-name="Standard" presentation:presentation-page-layout-name="AL3T1">
        <draw:frame presentation:style-name="pr9" draw:layer="layout" svg:width="23.499cm" svg:height="3.575cm" svg:x="3.033cm" svg:y="2.367cm" presentation:class="title">
          <draw:text-box>
            <text:p>Règles</text:p>
          </draw:text-box>
        </draw:frame>
        <draw:frame presentation:style-name="pr5" draw:layer="layout" svg:width="23.499cm" svg:height="12.18cm" svg:x="3.033cm" svg:y="6.283cm" presentation:class="outline" presentation:user-transformed="true">
          <draw:text-box>
            <text:list text:style-name="L2">
              <text:list-item>
                <text:p>AclAuthorizer autorise une action s'il n'y a pas d'ACL de DENY qui corresponde à l'action et qu'il y a au moins une ACL ALLOW qui correspond à l'action.</text:p>
                <text:list>
                  <text:list-item>
                    <text:p>L'autorisation Describe est implicitement accordée si l'autorisation Read, Write, Alter ou Delete est accordée.</text:p>
                  </text:list-item>
                  <text:list-item>
                    <text:p>L'autorisation Describe Configs est implicitement accordée si l'autorisation AlterConfigs est accordée.</text:p>
                  </text:list-item>
                </text:list>
              </text:list-item>
            </text:list>
          </draw:text-box>
        </draw:frame>
        <presentation:notes draw:style-name="dp2">
          <draw:page-thumbnail draw:style-name="gr2" draw:layer="layout" svg:width="15.597cm" svg:height="10.985cm" svg:x="2.623cm" svg:y="2.258cm" draw:page-number="182" presentation:class="page"/>
          <draw:frame presentation:style-name="pr6" draw:text-style-name="P13" draw:layer="layout" svg:width="14.362cm" svg:height="11.254cm" svg:x="3.25cm" svg:y="14.128cm" presentation:class="notes" presentation:placeholder="true">
            <draw:text-box/>
          </draw:frame>
        </presentation:notes>
      </draw:page>
      <draw:page draw:name="page183" draw:style-name="dp3" draw:master-page-name="Standard" presentation:presentation-page-layout-name="AL3T1">
        <draw:frame presentation:style-name="pr9" draw:layer="layout" svg:width="23.499cm" svg:height="3.575cm" svg:x="3.033cm" svg:y="2.367cm" presentation:class="title">
          <draw:text-box>
            <text:p>Permissions clientes</text:p>
          </draw:text-box>
        </draw:frame>
        <draw:frame presentation:style-name="pr5" draw:layer="layout" svg:width="23.499cm" svg:height="12.18cm" svg:x="3.033cm" svg:y="6.283cm" presentation:class="outline">
          <draw:text-box>
            <text:list text:style-name="L2">
              <text:list-item>
                <text:p>Brokers : <text:span text:style-name="T72">Cluster:ClusterAction</text:span> pour autoriser les requêtes de contrôleur et les requêtes de fetch des répliques. </text:p>
              </text:list-item>
              <text:list-item>
                <text:p>Producteurs simples : <text:span text:style-name="T72">Topic:Write</text:span><text:span text:style-name="T155"> </text:span></text:p>
                <text:list>
                  <text:list-item>
                    <text:p>idempotents sans transactions : <text:span text:style-name="T72">Cluster:Idempotent</text:span><text:span text:style-name="T72">Write</text:span>.</text:p>
                  </text:list-item>
                  <text:list-item>
                    <text:p>Transactionnels : <text:span text:style-name="T72">TransactionalId:Wri</text:span><text:span text:style-name="T72">te</text:span> à la transaction et <text:span text:style-name="T72">Group:Read</text:span> pour que les groupes de consommateurs valident les offsets. </text:p>
                  </text:list-item>
                </text:list>
              </text:list-item>
              <text:list-item>
                <text:p>Consommateurs : <text:span text:style-name="T72">Topic:Read</text:span> et <text:span text:style-name="T72">Group:Read</text:span> s'ils utilisent la gestion de groupe ou la gestion des offsets. </text:p>
              </text:list-item>
              <text:list-item>
                <text:p>Clients admin : <text:span text:style-name="T72">Create, </text:span><text:span text:style-name="T72">Delete, Describe, Alter, </text:span><text:span text:style-name="T72">DescribeConfigs, </text:span><text:span text:style-name="T72">AlterConfigs</text:span> .</text:p>
              </text:list-item>
            </text:list>
          </draw:text-box>
        </draw:frame>
        <presentation:notes draw:style-name="dp2">
          <draw:page-thumbnail draw:style-name="gr2" draw:layer="layout" svg:width="15.597cm" svg:height="10.985cm" svg:x="2.623cm" svg:y="2.258cm" draw:page-number="183" presentation:class="page"/>
          <draw:frame presentation:style-name="pr6" draw:text-style-name="P13" draw:layer="layout" svg:width="14.362cm" svg:height="11.254cm" svg:x="3.25cm" svg:y="14.128cm" presentation:class="notes" presentation:placeholder="true">
            <draw:text-box/>
          </draw:frame>
        </presentation:notes>
      </draw:page>
      <draw:page draw:name="page184" draw:style-name="dp3" draw:master-page-name="Standard" presentation:presentation-page-layout-name="AL3T1">
        <draw:frame presentation:style-name="pr9" draw:layer="layout" svg:width="23.499cm" svg:height="3.575cm" svg:x="3.033cm" svg:y="2.367cm" presentation:class="title">
          <draw:text-box>
            <text:p>Exceptions</text:p>
          </draw:text-box>
        </draw:frame>
        <draw:frame presentation:style-name="pr5" draw:layer="layout" svg:width="23.499cm" svg:height="12.18cm" svg:x="3.033cm" svg:y="6.283cm" presentation:class="outline">
          <draw:text-box>
            <text:list text:style-name="L2">
              <text:list-item>
                <text:p>2 options de configuration permettant d’accorder un large accès aux ressources permet de simplifier la <text:s/>mise en place d’ACL à des clusters existants :</text:p>
                <text:list>
                  <text:list-item>
                    <text:p><text:span text:style-name="T72">super.users</text:span> : Pemet de définir les utilisateurs ayant droit à tout</text:p>
                  </text:list-item>
                  <text:list-item>
                    <text:p><text:span text:style-name="T72">allow.everyone.if.no.</text:span><text:span text:style-name="T72">acl.found=true</text:span> : <text:line-break/>Tous les utilisateurs ont accès aux ressources sans ACL.</text:p>
                  </text:list-item>
                </text:list>
              </text:list-item>
            </text:list>
          </draw:text-box>
        </draw:frame>
        <presentation:notes draw:style-name="dp2">
          <draw:page-thumbnail draw:style-name="gr2" draw:layer="layout" svg:width="15.597cm" svg:height="10.985cm" svg:x="2.623cm" svg:y="2.258cm" draw:page-number="184" presentation:class="page"/>
          <draw:frame presentation:style-name="pr6" draw:text-style-name="P13" draw:layer="layout" svg:width="14.362cm" svg:height="11.254cm" svg:x="3.25cm" svg:y="14.128cm" presentation:class="notes" presentation:placeholder="true">
            <draw:text-box/>
          </draw:frame>
        </presentation:notes>
      </draw:page>
      <draw:page draw:name="page185" draw:style-name="dp3" draw:master-page-name="Standard" presentation:presentation-page-layout-name="AL3T1">
        <draw:frame presentation:style-name="pr9" draw:layer="layout" svg:width="23.499cm" svg:height="3.575cm" svg:x="3.033cm" svg:y="2.367cm" presentation:class="title">
          <draw:text-box>
            <text:p>Exemple</text:p>
          </draw:text-box>
        </draw:frame>
        <draw:frame presentation:style-name="pr5" draw:layer="layout" svg:width="23.499cm" svg:height="12.18cm" svg:x="3.033cm" svg:y="6.283cm" presentation:class="outline">
          <draw:text-box>
            <text:list text:style-name="L2">
              <text:list-item>
                <text:p><text:span text:style-name="T14">Principals User:Bob et </text:span><text:span text:style-name="T14">User:Alice sont autorisés à </text:span><text:span text:style-name="T14">effectuer les opérations </text:span><text:span text:style-name="T14">Read et Write sur le Topic </text:span><text:span text:style-name="T14">Test-Topic à partir des IP </text:span><text:span text:style-name="T14">198.51.100.0 et IP </text:span><text:span text:style-name="T14">198.51.100.1</text:span></text:p>
              </text:list-item>
              <text:list-item>
                <text:p/>
              </text:list-item>
              <text:list-item>
                <text:p><text:s/><text:span text:style-name="T79">bin/kafka-acls.sh --</text:span><text:span text:style-name="T79">authorizer-properties </text:span><text:span text:style-name="T79">zookeeper.connect=loca</text:span><text:span text:style-name="T79">lhost:2181 --add --</text:span><text:span text:style-name="T79">allow-principal </text:span><text:span text:style-name="T79">User:Bob --allow-</text:span><text:span text:style-name="T79">principal User:Alice </text:span><text:span text:style-name="T79">--allow-host </text:span><text:span text:style-name="T79">198.51.100.0 --allow-</text:span><text:span text:style-name="T79">host 198.51.100.1 --</text:span><text:span text:style-name="T79">operation Read --</text:span><text:span text:style-name="T79">operation Write --</text:span><text:span text:style-name="T79">topic Test-topic</text:span></text:p>
              </text:list-item>
            </text:list>
          </draw:text-box>
        </draw:frame>
        <presentation:notes draw:style-name="dp8">
          <draw:page-thumbnail draw:style-name="gr2" draw:layer="layout" svg:width="15.597cm" svg:height="10.985cm" svg:x="2.623cm" svg:y="2.258cm" draw:page-number="185" presentation:class="page"/>
          <draw:frame presentation:style-name="pr6" draw:text-style-name="P13" draw:layer="layout" svg:width="14.362cm" svg:height="11.254cm" svg:x="3.25cm" svg:y="14.128cm" presentation:class="notes" presentation:placeholder="true">
            <draw:text-box/>
          </draw:frame>
        </presentation:notes>
      </draw:page>
      <draw:page draw:name="page186" draw:style-name="dp3" draw:master-page-name="Standard" presentation:presentation-page-layout-name="AL3T1">
        <draw:frame presentation:style-name="pr9" draw:layer="layout" svg:width="23.499cm" svg:height="3.575cm" svg:x="3.033cm" svg:y="2.367cm" presentation:class="title">
          <draw:text-box>
            <text:p>Audit</text:p>
          </draw:text-box>
        </draw:frame>
        <draw:frame presentation:style-name="pr5" draw:layer="layout" svg:width="23.499cm" svg:height="12.18cm" svg:x="3.033cm" svg:y="6.283cm" presentation:class="outline">
          <draw:text-box>
            <text:list text:style-name="L2">
              <text:list-item>
                <text:p>Les brokers peuvent être configurés pour générés des traces d’audit.</text:p>
              </text:list-item>
              <text:list-item>
                <text:p>La configuration s’effectue dans <text:span text:style-name="T14">conf/log4j.properties</text:span></text:p>
                <text:list>
                  <text:list-item>
                    <text:p>Le fichier par défaut est <text:span text:style-name="T14">kafka-authorizer.log</text:span></text:p>
                  </text:list-item>
                  <text:list-item>
                    <text:p>Le niveau INFO trace les entrées pour chaque refus</text:p>
                  </text:list-item>
                  <text:list-item>
                    <text:p>Le niveau DEBUG pour chaque requête acceptée</text:p>
                  </text:list-item>
                </text:list>
              </text:list-item>
              <text:list-item>
                <text:p/>
              </text:list-item>
            </text:list>
          </draw:text-box>
        </draw:frame>
        <draw:frame draw:style-name="gr35" draw:text-style-name="P34" draw:layer="layout" svg:width="13.901cm" svg:height="1.216cm" svg:x="1.604cm" svg:y="19.4cm">
          <draw:text-box>
            <text:p><text:span text:style-name="T73">Atelier 7.4 : Autorisation</text:span></text:p>
          </draw:text-box>
        </draw:frame>
        <presentation:notes draw:style-name="dp2">
          <draw:page-thumbnail draw:style-name="gr2" draw:layer="layout" svg:width="15.597cm" svg:height="10.985cm" svg:x="2.623cm" svg:y="2.258cm" draw:page-number="186" presentation:class="page"/>
          <draw:frame presentation:style-name="pr6" draw:text-style-name="P13" draw:layer="layout" svg:width="14.362cm" svg:height="11.254cm" svg:x="3.25cm" svg:y="14.128cm" presentation:class="notes" presentation:placeholder="true">
            <draw:text-box/>
          </draw:frame>
        </presentation:notes>
      </draw:page>
      <draw:page draw:name="page187"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Sécurité</text:span></text:p>
              </text:list-header>
            </text:list>
          </draw:text-box>
        </draw:frame>
        <draw:frame presentation:style-name="pr32" draw:text-style-name="P16" draw:layer="layout" svg:width="23.499cm" svg:height="12.18cm" svg:x="3.033cm" svg:y="6.283cm" presentation:class="subtitle">
          <draw:text-box>
            <text:list text:style-name="L1">
              <text:list-item>
                <text:p text:style-name="P28"><text:span text:style-name="T143"/></text:p>
              </text:list-item>
              <text:list-item>
                <text:p text:style-name="P28"><text:span text:style-name="T143"/></text:p>
              </text:list-item>
              <text:list-item>
                <text:p text:style-name="P19"><text:span text:style-name="T2">Configuration des listeners</text:span></text:p>
              </text:list-item>
              <text:list-item>
                <text:p text:style-name="P28"><text:span text:style-name="T2">SSL/TLS</text:span></text:p>
              </text:list-item>
              <text:list-item>
                <text:p text:style-name="P19"><text:span text:style-name="T2">Authentification via SASL</text:span></text:p>
              </text:list-item>
              <text:list-item>
                <text:p text:style-name="P19"><text:span text:style-name="T2">ACLs</text:span></text:p>
              </text:list-item>
              <text:list-item>
                <text:p text:style-name="P28"><text:span text:style-name="T12">Quotas</text:span></text:p>
              </text:list-item>
              <text:list-item>
                <text:p text:style-name="P28"><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88"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Kafka permet d'appliquer des quotas sur les requêtes pour contrôler les ressources du broker utilisées par les clients. </text:p>
              </text:list-item>
              <text:list-item>
                <text:p>Deux types de quotas peuvent être appliqués par groupe de client :</text:p>
                <text:list>
                  <text:list-item>
                    <text:p>Les quotas de bande passante réseau définissent des seuils de débit </text:p>
                  </text:list-item>
                  <text:list-item>
                    <text:p>Les quotas de taux de requête définissent les seuils d'utilisation du processeur en pourcentage du réseau et des threads d'E/S</text:p>
                  </text:list-item>
                  <text:list-item>
                    <text:p>Quotas du taux de connexion par IP</text:p>
                  </text:list-item>
                </text:list>
              </text:list-item>
              <text:list-item>
                <text:p>L’identité du client correspond au KafkaPrincipal dans un cluster sécurisé ou la propriété applicative client-id. </text:p>
              </text:list-item>
              <text:list-item>
                <text:p>Tous les clients ayant la même identité partagent leur configuration de quotas</text:p>
              </text:list-item>
            </text:list>
          </draw:text-box>
        </draw:frame>
        <presentation:notes draw:style-name="dp5">
          <draw:page-thumbnail draw:style-name="gr2" draw:layer="layout" svg:width="15.597cm" svg:height="10.985cm" svg:x="2.623cm" svg:y="2.258cm" draw:page-number="188" presentation:class="page"/>
          <draw:frame presentation:style-name="pr6" draw:text-style-name="P13" draw:layer="layout" svg:width="14.362cm" svg:height="11.254cm" svg:x="3.25cm" svg:y="14.128cm" presentation:class="notes" presentation:placeholder="true">
            <draw:text-box/>
          </draw:frame>
        </presentation:notes>
      </draw:page>
      <draw:page draw:name="page189" draw:style-name="dp3" draw:master-page-name="Standard" presentation:presentation-page-layout-name="AL3T1">
        <draw:frame presentation:style-name="pr9" draw:layer="layout" svg:width="23.499cm" svg:height="3.575cm" svg:x="3.033cm" svg:y="2.367cm" presentation:class="title">
          <draw:text-box>
            <text:p text:style-name="P22">Quota de bande passante</text:p>
          </draw:text-box>
        </draw:frame>
        <draw:frame presentation:style-name="pr5" draw:layer="layout" svg:width="23.499cm" svg:height="12.18cm" svg:x="3.033cm" svg:y="6.283cm" presentation:class="outline" presentation:user-transformed="true">
          <draw:text-box>
            <text:list text:style-name="L2">
              <text:list-item>
                <text:p>Le seuil de débit d'octets pour chaque groupe de clients.</text:p>
              </text:list-item>
              <text:list-item>
                <text:p>Chaque groupe peut publier/consommer un maximum de X octets/sec par broker avant d’être limités.</text:p>
              </text:list-item>
              <text:list-item>
                <text:p/>
              </text:list-item>
              <text:list-item>
                <text:p><text:span text:style-name="T65">kafka-configs.sh --bootstrap-</text:span><text:span text:style-name="T65">server $BOOT --alter --add-</text:span><text:span text:style-name="T65">config </text:span><text:span text:style-name="T156">'producer_byte_rate=1024,consum</text:span><text:span text:style-name="T156">er_byte_rate=1024'</text:span><text:span text:style-name="T65"> --entity-</text:span><text:span text:style-name="T65">type users --entity-name </text:span><text:span text:style-name="T65">&lt;authenticated-principal&gt; --</text:span><text:span text:style-name="T65">command-config </text:span><text:span text:style-name="T65">/tmp/client.properties</text:span></text:p>
              </text:list-item>
            </text:list>
          </draw:text-box>
        </draw:frame>
        <presentation:notes draw:style-name="dp5">
          <draw:page-thumbnail draw:style-name="gr2" draw:layer="layout" svg:width="15.597cm" svg:height="10.985cm" svg:x="2.623cm" svg:y="2.258cm" draw:page-number="189" presentation:class="page"/>
          <draw:frame presentation:style-name="pr6" draw:text-style-name="P13" draw:layer="layout" svg:width="14.362cm" svg:height="11.254cm" svg:x="3.25cm" svg:y="14.128cm" presentation:class="notes" presentation:placeholder="true">
            <draw:text-box/>
          </draw:frame>
        </presentation:notes>
      </draw:page>
      <draw:page draw:name="page190" draw:style-name="dp3" draw:master-page-name="Standard" presentation:presentation-page-layout-name="AL3T1">
        <draw:frame presentation:style-name="pr9" draw:layer="layout" svg:width="23.499cm" svg:height="3.575cm" svg:x="3.033cm" svg:y="2.367cm" presentation:class="title">
          <draw:text-box>
            <text:p>Taux de requêtes</text:p>
          </draw:text-box>
        </draw:frame>
        <draw:frame presentation:style-name="pr5" draw:layer="layout" svg:width="23.499cm" svg:height="12.18cm" svg:x="3.033cm" svg:y="6.283cm" presentation:class="outline" presentation:user-transformed="true">
          <draw:text-box>
            <text:list text:style-name="L2">
              <text:list-item>
                <text:p><text:span text:style-name="T26">Définis en pourcentage de </text:span><text:span text:style-name="T26">temps </text:span>sur les threads d'I/O et de réseau de chaque broker dans une fenêtre temporelle.</text:p>
              </text:list-item>
              <text:list-item>
                <text:p/>
              </text:list-item>
              <text:list-item>
                <text:p><text:span text:style-name="T65">kafka-configs.sh --bootstrap-</text:span><text:span text:style-name="T65">server $BOOT --alter --add-</text:span><text:span text:style-name="T65">config </text:span><text:span text:style-name="T156">'request_percentage=150'</text:span><text:span text:style-name="T65"> </text:span><text:span text:style-name="T65">--entity-type users --entity-</text:span><text:span text:style-name="T65">name big-time-tv-show-host --</text:span><text:span text:style-name="T65">command-config </text:span><text:span text:style-name="T65">/tmp/client.properties</text:span></text:p>
              </text:list-item>
            </text:list>
          </draw:text-box>
        </draw:frame>
        <presentation:notes draw:style-name="dp5">
          <draw:page-thumbnail draw:style-name="gr2" draw:layer="layout" svg:width="15.597cm" svg:height="10.985cm" svg:x="2.623cm" svg:y="2.258cm" draw:page-number="190" presentation:class="page"/>
          <draw:frame presentation:style-name="pr6" draw:text-style-name="P13" draw:layer="layout" svg:width="14.362cm" svg:height="11.254cm" svg:x="3.25cm" svg:y="14.128cm" presentation:class="notes" presentation:placeholder="true">
            <draw:text-box/>
          </draw:frame>
        </presentation:notes>
      </draw:page>
      <draw:page draw:name="page191" draw:style-name="dp3" draw:master-page-name="Standard" presentation:presentation-page-layout-name="AL3T1">
        <draw:frame presentation:style-name="pr9" draw:layer="layout" svg:width="23.499cm" svg:height="3.575cm" svg:x="3.033cm" svg:y="2.367cm" presentation:class="title">
          <draw:text-box>
            <text:p>Application des quotas</text:p>
          </draw:text-box>
        </draw:frame>
        <draw:frame presentation:style-name="pr5" draw:layer="layout" svg:width="23.499cm" svg:height="12.18cm" svg:x="3.033cm" svg:y="6.283cm" presentation:class="outline">
          <draw:text-box>
            <text:list text:style-name="L2">
              <text:list-item>
                <text:p>Lorsqu'un broker constate une violation de quota, il calcule une estimation du délai nécessaire pour ramener le client sous son quota.</text:p>
              </text:list-item>
              <text:list-item>
                <text:p>Le broker peut alors :</text:p>
                <text:list>
                  <text:list-item>
                    <text:p>Répondre au client avec une demande de délai</text:p>
                  </text:list-item>
                  <text:list-item>
                    <text:p>Désactiver le canal de la socket</text:p>
                  </text:list-item>
                </text:list>
              </text:list-item>
              <text:list-item>
                <text:p/>
              </text:list-item>
              <text:list-item>
                <text:p>Selon le client (récent ou non), le client peut soit respecter ce délai, soit l'ignorer.</text:p>
              </text:list-item>
            </text:list>
          </draw:text-box>
        </draw:frame>
        <presentation:notes draw:style-name="dp5">
          <draw:page-thumbnail draw:style-name="gr2" draw:layer="layout" svg:width="15.597cm" svg:height="10.985cm" svg:x="2.623cm" svg:y="2.258cm" draw:page-number="191" presentation:class="page"/>
          <draw:frame presentation:style-name="pr6" draw:text-style-name="P13" draw:layer="layout" svg:width="14.362cm" svg:height="11.254cm" svg:x="3.25cm" svg:y="14.128cm" presentation:class="notes" presentation:placeholder="true">
            <draw:text-box/>
          </draw:frame>
        </presentation:notes>
      </draw:page>
      <draw:page draw:name="page192"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Administration</text:span></text:p>
              </text:list-header>
            </text:list>
          </draw:text-box>
        </draw:frame>
        <draw:frame presentation:style-name="pr33" draw:text-style-name="P16" draw:layer="layout" svg:width="23.499cm" svg:height="12.18cm" svg:x="3.033cm" svg:y="6.283cm" presentation:class="subtitle">
          <draw:text-box>
            <text:list text:style-name="L1">
              <text:list-item>
                <text:p text:style-name="P28"><text:span text:style-name="T143"/></text:p>
              </text:list-item>
              <text:list-item>
                <text:p text:style-name="P28"><text:span text:style-name="T143"/></text:p>
              </text:list-item>
              <text:list-item>
                <text:p text:style-name="P28"><text:span text:style-name="T12">Gestion des topics</text:span></text:p>
              </text:list-item>
              <text:list-item>
                <text:p text:style-name="P19"><text:span text:style-name="T2">Stockage et rétention des partitions</text:span></text:p>
              </text:list-item>
              <text:list-item>
                <text:p text:style-name="P28"><text:span text:style-name="T13">Gestion du cluster</text:span></text:p>
              </text:list-item>
              <text:list-item>
                <text:p text:style-name="P28"><text:span text:style-name="T145">Dimensionnement</text:span></text:p>
              </text:list-item>
              <text:list-item>
                <text:p text:style-name="P28"><text:span text:style-name="T145">Monitoring</text:span></text:p>
              </text:list-item>
              <text:list-item>
                <text:p text:style-name="P28"><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93"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outil <text:span text:style-name="T72">kafka-topics.sh</text:span> permet d'effectuer facilement la plupart des opérations sur les topics (créer, supprimer, décrire)</text:p>
              </text:list-item>
              <text:list-item>
                <text:p/>
              </text:list-item>
              <text:list-item>
                <text:p>Les commandes de modification de la configuration ont été dépréciées au profit de l’outil générique <text:span text:style-name="T72">kafka-</text:span><text:span text:style-name="T72">config.sh</text:span><text:span text:style-name="T157"> </text:span></text:p>
              </text:list-item>
            </text:list>
          </draw:text-box>
        </draw:frame>
        <presentation:notes draw:style-name="dp5">
          <draw:page-thumbnail draw:style-name="gr2" draw:layer="layout" svg:width="15.597cm" svg:height="10.985cm" svg:x="2.623cm" svg:y="2.258cm" draw:page-number="193" presentation:class="page"/>
          <draw:frame presentation:style-name="pr6" draw:text-style-name="P13" draw:layer="layout" svg:width="14.362cm" svg:height="11.254cm" svg:x="3.25cm" svg:y="14.128cm" presentation:class="notes" presentation:placeholder="true">
            <draw:text-box/>
          </draw:frame>
        </presentation:notes>
      </draw:page>
      <draw:page draw:name="page194" draw:style-name="dp3" draw:master-page-name="Standard" presentation:presentation-page-layout-name="AL3T1">
        <draw:frame presentation:style-name="pr9" draw:text-style-name="P57" draw:layer="layout" svg:width="23.499cm" svg:height="3.575cm" svg:x="3.033cm" svg:y="2.367cm" presentation:class="title">
          <draw:text-box>
            <text:p><text:span text:style-name="T14">describe</text:span></text:p>
          </draw:text-box>
        </draw:frame>
        <draw:frame presentation:style-name="pr5" draw:layer="layout" svg:width="23.499cm" svg:height="12.18cm" svg:x="3.033cm" svg:y="6.283cm" presentation:class="outline" presentation:user-transformed="true">
          <draw:text-box>
            <text:list text:style-name="L2">
              <text:list-item>
                <text:p/>
              </text:list-item>
              <text:list-item>
                <text:p/>
              </text:list-item>
              <text:list-item>
                <text:p text:style-name="P33"><text:span text:style-name="T158">./kafka-topics.sh --bootstrap-servers localhost:9092 --</text:span><text:span text:style-name="T158">describe --topic position</text:span></text:p>
              </text:list-item>
              <text:list-item>
                <text:p text:style-name="P33"><text:span text:style-name="T158">Topic: position</text:span><text:span text:style-name="T158"><text:tab/></text:span><text:span text:style-name="T158">PartitionCount: 3</text:span><text:span text:style-name="T158"><text:tab/></text:span><text:span text:style-name="T158">ReplicationFactor: </text:span><text:span text:style-name="T158">2</text:span><text:span text:style-name="T158"><text:tab/></text:span><text:span text:style-name="T158">Configs: </text:span></text:p>
              </text:list-item>
              <text:list-item>
                <text:p text:style-name="P33"><text:span text:style-name="T158">Topic: position</text:span><text:span text:style-name="T158"><text:tab/></text:span><text:span text:style-name="T158">Partition: 0</text:span><text:span text:style-name="T158"><text:tab/></text:span><text:span text:style-name="T158">Leader: 3</text:span><text:span text:style-name="T158"><text:tab/></text:span><text:span text:style-name="T158">Replicas: 3,1</text:span><text:span text:style-name="T158"><text:tab/></text:span><text:span text:style-name="T158">Isr: 3,1</text:span></text:p>
              </text:list-item>
              <text:list-item>
                <text:p text:style-name="P33"><text:span text:style-name="T158">Topic: position</text:span><text:span text:style-name="T158"><text:tab/></text:span><text:span text:style-name="T158">Partition: 1</text:span><text:span text:style-name="T158"><text:tab/></text:span><text:span text:style-name="T158">Leader: 1</text:span><text:span text:style-name="T158"><text:tab/></text:span><text:span text:style-name="T158">Replicas: 1,2</text:span><text:span text:style-name="T158"><text:tab/></text:span><text:span text:style-name="T158">Isr: 1,2</text:span></text:p>
              </text:list-item>
              <text:list-item>
                <text:p text:style-name="P33"><text:span text:style-name="T158">Topic: position</text:span><text:span text:style-name="T158"><text:tab/></text:span><text:span text:style-name="T158">Partition: 2</text:span><text:span text:style-name="T158"><text:tab/></text:span><text:span text:style-name="T158">Leader: 2</text:span><text:span text:style-name="T158"><text:tab/></text:span><text:span text:style-name="T158">Replicas: 2,3</text:span><text:span text:style-name="T158"><text:tab/></text:span><text:span text:style-name="T158">Isr: 2,3</text:span></text:p>
              </text:list-item>
              <text:list-item>
                <text:p/>
              </text:list-item>
            </text:list>
          </draw:text-box>
        </draw:frame>
        <presentation:notes draw:style-name="dp5">
          <draw:page-thumbnail draw:style-name="gr2" draw:layer="layout" svg:width="15.597cm" svg:height="10.985cm" svg:x="2.623cm" svg:y="2.258cm" draw:page-number="194" presentation:class="page"/>
          <draw:frame presentation:style-name="pr6" draw:text-style-name="P13" draw:layer="layout" svg:width="14.362cm" svg:height="11.254cm" svg:x="3.25cm" svg:y="14.128cm" presentation:class="notes" presentation:placeholder="true">
            <draw:text-box/>
          </draw:frame>
        </presentation:notes>
      </draw:page>
      <draw:page draw:name="page195" draw:style-name="dp3" draw:master-page-name="Standard" presentation:presentation-page-layout-name="AL3T1">
        <draw:frame presentation:style-name="pr11" draw:layer="layout" svg:width="23.499cm" svg:height="3.577cm" svg:x="3.033cm" svg:y="2.366cm" presentation:class="title">
          <draw:text-box>
            <text:p>Gestion des groupes de consommations</text:p>
          </draw:text-box>
        </draw:frame>
        <draw:frame presentation:style-name="pr5" draw:layer="layout" svg:width="23.499cm" svg:height="12.18cm" svg:x="3.033cm" svg:y="6.283cm" presentation:class="outline" presentation:user-transformed="true">
          <draw:text-box>
            <text:list text:style-name="L2">
              <text:list-item>
                <text:p><text:span text:style-name="T72">kafka-consumer-</text:span><text:span text:style-name="T72">groups.sh</text:span> peut être utilisé pour : </text:p>
                <text:list>
                  <text:list-item>
                    <text:p>Lister les groupes </text:p>
                  </text:list-item>
                  <text:list-item>
                    <text:p>Décrire un groupe </text:p>
                  </text:list-item>
                  <text:list-item>
                    <text:p>Supprimer des groupes </text:p>
                  </text:list-item>
                  <text:list-item>
                    <text:p>Réinitialiser les informations d’offsets </text:p>
                  </text:list-item>
                </text:list>
              </text:list-item>
              <text:list-item>
                <text:p>Exemple : <text:line-break/>Exporter les offsets en CSV<text:line-break/><text:span text:style-name="T65">kafka-consumer-groups.sh --</text:span><text:span text:style-name="T65">bootstrap-server localhost:9092 </text:span><text:span text:style-name="T65">--export --group my-consumer --</text:span><text:span text:style-name="T65">topic my-topic --reset-offsets </text:span><text:span text:style-name="T65">--to-current --dry-run &gt; </text:span><text:span text:style-name="T65">offsets.csv</text:span></text:p>
              </text:list-item>
              <text:list-item>
                <text:p>Importer à partir de CSV<text:line-break/><text:span text:style-name="T65">kafka-consumer-groups.sh</text:span> <text:span text:style-name="T65">--</text:span><text:span text:style-name="T65">bootstrap-server localhost:9092 </text:span><text:span text:style-name="T65">--reset-offsets --group my-</text:span><text:span text:style-name="T65">consumer --from-file </text:span><text:span text:style-name="T65">offsets.csv --execute</text:span></text:p>
              </text:list-item>
            </text:list>
          </draw:text-box>
        </draw:frame>
        <presentation:notes draw:style-name="dp8">
          <draw:page-thumbnail draw:style-name="gr2" draw:layer="layout" svg:width="15.597cm" svg:height="10.985cm" svg:x="2.623cm" svg:y="2.258cm" draw:page-number="195" presentation:class="page"/>
          <draw:frame presentation:style-name="pr6" draw:text-style-name="P13" draw:layer="layout" svg:width="14.362cm" svg:height="11.254cm" svg:x="3.25cm" svg:y="14.128cm" presentation:class="notes" presentation:placeholder="true">
            <draw:text-box/>
          </draw:frame>
        </presentation:notes>
      </draw:page>
      <draw:page draw:name="page196" draw:style-name="dp3" draw:master-page-name="Standard" presentation:presentation-page-layout-name="AL3T1">
        <draw:frame presentation:style-name="pr9" draw:layer="layout" svg:width="23.499cm" svg:height="3.575cm" svg:x="3.033cm" svg:y="2.367cm" presentation:class="title">
          <draw:text-box>
            <text:p>Détection de problème</text:p>
          </draw:text-box>
        </draw:frame>
        <draw:frame presentation:style-name="pr5" draw:layer="layout" svg:width="23.499cm" svg:height="12.18cm" svg:x="3.033cm" svg:y="6.283cm" presentation:class="outline">
          <draw:text-box>
            <text:list text:style-name="L2">
              <text:list-item>
                <text:p>Certaines options utilisées conjointement avec <text:span text:style-name="T14">--</text:span><text:span text:style-name="T14">describe</text:span> permet de mettre en lumière des problèmes</text:p>
                <text:list>
                  <text:list-item>
                    <text:p><text:span text:style-name="T31">--unavailable-</text:span><text:span text:style-name="T31">partitions </text:span>: Seulement les partitions qui n’ont plus de leader</text:p>
                  </text:list-item>
                  <text:list-item>
                    <text:p><text:span text:style-name="T31">--under-min-isr-</text:span><text:span text:style-name="T31">partitions</text:span> : Seulement les partitions dont l’ISR est inférieur à une valeur</text:p>
                  </text:list-item>
                  <text:list-item>
                    <text:p><text:span text:style-name="T31">--under-replicated-</text:span><text:span text:style-name="T31">partitions</text:span> : Les partitions sous-répliquées</text:p>
                  </text:list-item>
                </text:list>
              </text:list-item>
            </text:list>
          </draw:text-box>
        </draw:frame>
        <presentation:notes draw:style-name="dp5">
          <draw:page-thumbnail draw:style-name="gr2" draw:layer="layout" svg:width="15.597cm" svg:height="10.985cm" svg:x="2.623cm" svg:y="2.258cm" draw:page-number="196" presentation:class="page"/>
          <draw:frame presentation:style-name="pr6" draw:text-style-name="P13" draw:layer="layout" svg:width="14.362cm" svg:height="11.254cm" svg:x="3.25cm" svg:y="14.128cm" presentation:class="notes" presentation:placeholder="true">
            <draw:text-box/>
          </draw:frame>
        </presentation:notes>
      </draw:page>
      <draw:page draw:name="page197" draw:style-name="dp3" draw:master-page-name="Standard" presentation:presentation-page-layout-name="AL3T1">
        <draw:frame presentation:style-name="pr9" draw:layer="layout" svg:width="23.499cm" svg:height="3.575cm" svg:x="3.033cm" svg:y="2.367cm" presentation:class="title">
          <draw:text-box>
            <text:p>Modification entités</text:p>
          </draw:text-box>
        </draw:frame>
        <draw:frame presentation:style-name="pr5" draw:layer="layout" svg:width="23.499cm" svg:height="12.18cm" svg:x="3.033cm" svg:y="6.283cm" presentation:class="outline" presentation:user-transformed="true">
          <draw:text-box>
            <text:list text:style-name="L2">
              <text:list-item>
                <text:p>Le script <text:span text:style-name="T31">kafka-configs.sh</text:span> permet de visualiser, modifier la configuration d’un topic, broker, client</text:p>
              </text:list-item>
              <text:list-item>
                <text:p/>
              </text:list-item>
              <text:list-item>
                <text:p>Exemple, modification propriété d’un topic</text:p>
              </text:list-item>
              <text:list-item>
                <text:p><text:span text:style-name="T65">./kafka-configs.sh --bootstrap-</text:span><text:span text:style-name="T65">server localhost:9092 --entity-</text:span><text:span text:style-name="T65">type topics --entity-name </text:span><text:span text:style-name="T65">position --alter --add-config </text:span><text:span text:style-name="T65">retention.ms=-1</text:span></text:p>
              </text:list-item>
              <text:list-item>
                <text:p/>
              </text:list-item>
            </text:list>
          </draw:text-box>
        </draw:frame>
        <presentation:notes draw:style-name="dp2">
          <draw:page-thumbnail draw:style-name="gr2" draw:layer="layout" svg:width="15.597cm" svg:height="10.985cm" svg:x="2.623cm" svg:y="2.258cm" draw:page-number="197" presentation:class="page"/>
          <draw:frame presentation:style-name="pr6" draw:text-style-name="P13" draw:layer="layout" svg:width="14.362cm" svg:height="11.254cm" svg:x="3.25cm" svg:y="14.128cm" presentation:class="notes" presentation:placeholder="true">
            <draw:text-box/>
          </draw:frame>
        </presentation:notes>
      </draw:page>
      <draw:page draw:name="page198" draw:style-name="dp3" draw:master-page-name="Standard" presentation:presentation-page-layout-name="AL3T1">
        <draw:frame presentation:style-name="pr9" draw:layer="layout" svg:width="23.499cm" svg:height="3.575cm" svg:x="3.033cm" svg:y="2.367cm" presentation:class="title">
          <draw:text-box>
            <text:p>Suppression de Topic</text:p>
          </draw:text-box>
        </draw:frame>
        <draw:frame presentation:style-name="pr5" draw:layer="layout" svg:width="23.499cm" svg:height="12.18cm" svg:x="3.033cm" svg:y="6.283cm" presentation:class="outline" presentation:user-transformed="true">
          <draw:text-box>
            <text:list text:style-name="L2">
              <text:list-item>
                <text:p>La suppression doit être autorisée sur les brokers <text:line-break/><text:span text:style-name="T31">delete.topic.enable=tru</text:span><text:span text:style-name="T31">e</text:span></text:p>
              </text:list-item>
              <text:list-item>
                <text:p>Il faut arrêter tous les producteurs/consommateurs avant la suppression</text:p>
              </text:list-item>
              <text:list-item>
                <text:p>Les offsets des consommateurs ne sont pas supprimés immédiatement <text:s/></text:p>
              </text:list-item>
            </text:list>
          </draw:text-box>
        </draw:frame>
        <presentation:notes draw:style-name="dp2">
          <draw:page-thumbnail draw:style-name="gr2" draw:layer="layout" svg:width="15.597cm" svg:height="10.985cm" svg:x="2.623cm" svg:y="2.258cm" draw:page-number="198" presentation:class="page"/>
          <draw:frame presentation:style-name="pr6" draw:text-style-name="P18" draw:layer="layout" svg:width="14.362cm" svg:height="11.254cm" svg:x="3.25cm" svg:y="14.128cm" presentation:class="notes" presentation:placeholder="true">
            <draw:text-box/>
          </draw:frame>
        </presentation:notes>
      </draw:page>
      <draw:page draw:name="page199" draw:style-name="dp3" draw:master-page-name="Standard" presentation:presentation-page-layout-name="AL3T1">
        <draw:frame presentation:style-name="pr9" draw:layer="layout" svg:width="23.499cm" svg:height="3.575cm" svg:x="3.033cm" svg:y="2.367cm" presentation:class="title">
          <draw:text-box>
            <text:p>Ajout de partition</text:p>
          </draw:text-box>
        </draw:frame>
        <draw:frame presentation:style-name="pr5" draw:layer="layout" svg:width="23.499cm" svg:height="12.18cm" svg:x="3.033cm" svg:y="6.283cm" presentation:class="outline">
          <draw:text-box>
            <text:list text:style-name="L2">
              <text:list-item>
                <text:p>L’ajout de partition permet de scaler horizontalement et d’augmenter le parallélisme de la consommation </text:p>
                <text:list>
                  <text:list-item>
                    <text:p>Attention au topic contenant des messages avec des clés </text:p>
                  </text:list-item>
                </text:list>
              </text:list-item>
              <text:list-item>
                <text:p text:style-name="P33"><text:span text:style-name="T65">kafka-topics.sh --bootstrap-server </text:span><text:span text:style-name="T65">localhost:9092</text:span></text:p>
              </text:list-item>
              <text:list-item>
                <text:p text:style-name="P33"><text:span text:style-name="T65">--alter --topic my-topic --</text:span><text:span text:style-name="T65">partitions 16</text:span></text:p>
              </text:list-item>
              <text:list-item>
                <text:p text:style-name="P33"/>
              </text:list-item>
              <text:list-item>
                <text:p text:style-name="P33">Il n’est pas possible de réduire le nombre de partitions</text:p>
              </text:list-item>
            </text:list>
          </draw:text-box>
        </draw:frame>
        <presentation:notes draw:style-name="dp2">
          <draw:page-thumbnail draw:style-name="gr2" draw:layer="layout" svg:width="15.597cm" svg:height="10.985cm" svg:x="2.623cm" svg:y="2.258cm" draw:page-number="199" presentation:class="page"/>
          <draw:frame presentation:style-name="pr6" draw:text-style-name="P13" draw:layer="layout" svg:width="14.362cm" svg:height="11.254cm" svg:x="3.25cm" svg:y="14.128cm" presentation:class="notes" presentation:placeholder="true">
            <draw:text-box/>
          </draw:frame>
        </presentation:notes>
      </draw:page>
      <draw:page draw:name="page200" draw:style-name="dp3" draw:master-page-name="Standard" presentation:presentation-page-layout-name="AL3T1">
        <draw:frame presentation:style-name="pr9" draw:layer="layout" svg:width="23.499cm" svg:height="3.575cm" svg:x="3.033cm" svg:y="2.367cm" presentation:class="title">
          <draw:text-box>
            <text:p>Extension du cluster</text:p>
          </draw:text-box>
        </draw:frame>
        <draw:frame presentation:style-name="pr5" draw:layer="layout" svg:width="23.499cm" svg:height="12.18cm" svg:x="3.033cm" svg:y="6.283cm" presentation:class="outline" presentation:user-transformed="true">
          <draw:text-box>
            <text:list text:style-name="L2">
              <text:list-item>
                <text:p>Kafka ne déplace pas automatiquement les données vers les Brokers ajoutés au cluster</text:p>
              </text:list-item>
              <text:list-item>
                <text:p/>
              </text:list-item>
              <text:list-item>
                <text:p>Il faut manuellement exécuter <text:line-break/><text:span text:style-name="T31">kafka-reassign-</text:span><text:span text:style-name="T31">partitions</text:span></text:p>
                <text:list>
                  <text:list-item>
                    <text:p>Il n’y a pas d’interruption de service</text:p>
                  </text:list-item>
                  <text:list-item>
                    <text:p>Il est impossible d’annuler le processus</text:p>
                  </text:list-item>
                  <text:list-item>
                    <text:p>A un temps T, une seule réaffectation est possible</text:p>
                  </text:list-item>
                </text:list>
              </text:list-item>
            </text:list>
          </draw:text-box>
        </draw:frame>
        <presentation:notes draw:style-name="dp8">
          <draw:page-thumbnail draw:style-name="gr2" draw:layer="layout" svg:width="15.597cm" svg:height="10.985cm" svg:x="2.623cm" svg:y="2.258cm" draw:page-number="200" presentation:class="page"/>
          <draw:frame presentation:style-name="pr6" draw:text-style-name="P18" draw:layer="layout" svg:width="14.362cm" svg:height="11.254cm" svg:x="3.25cm" svg:y="14.128cm" presentation:class="notes" presentation:placeholder="true">
            <draw:text-box/>
          </draw:frame>
        </presentation:notes>
      </draw:page>
      <draw:page draw:name="page201" draw:style-name="dp3" draw:master-page-name="Standard" presentation:presentation-page-layout-name="AL3T1">
        <draw:frame presentation:style-name="pr11" draw:layer="layout" svg:width="23.499cm" svg:height="3.577cm" svg:x="3.033cm" svg:y="2.366cm" presentation:class="title">
          <draw:text-box>
            <text:p>Usage de <text:line-break/><text:span text:style-name="T14">kafka-reassign-partition</text:span></text:p>
          </draw:text-box>
        </draw:frame>
        <draw:frame presentation:style-name="pr5" draw:layer="layout" svg:width="23.499cm" svg:height="12.18cm" svg:x="3.033cm" svg:y="6.283cm" presentation:class="outline" presentation:user-transformed="true">
          <draw:text-box>
            <text:list text:style-name="L2">
              <text:list-item>
                <text:p><text:span text:style-name="T14">kafka-reassign-partition</text:span> peut être utilisé pour :</text:p>
                <text:list>
                  <text:list-item>
                    <text:p>Réduire ou étendre le cluster</text:p>
                  </text:list-item>
                  <text:list-item>
                    <text:p>Augmenter le facteur de réplication d’un <text:span text:style-name="T14">topic</text:span></text:p>
                  </text:list-item>
                  <text:list-item>
                    <text:p>Résoudre un déséquilibre de stockage entre brokers ou entre répertoire d’un même broker</text:p>
                  </text:list-item>
                </text:list>
              </text:list-item>
              <text:list-item>
                <text:p/>
              </text:list-item>
              <text:list-item>
                <text:p/>
              </text:list-item>
            </text:list>
          </draw:text-box>
        </draw:frame>
        <presentation:notes draw:style-name="dp2">
          <draw:page-thumbnail draw:style-name="gr2" draw:layer="layout" svg:width="15.597cm" svg:height="10.985cm" svg:x="2.623cm" svg:y="2.258cm" draw:page-number="201" presentation:class="page"/>
          <draw:frame presentation:style-name="pr6" draw:text-style-name="P13" draw:layer="layout" svg:width="14.362cm" svg:height="11.254cm" svg:x="3.25cm" svg:y="14.128cm" presentation:class="notes" presentation:placeholder="true">
            <draw:text-box/>
          </draw:frame>
        </presentation:notes>
      </draw:page>
      <draw:page draw:name="page202" draw:style-name="dp1" draw:master-page-name="Standard" presentation:presentation-page-layout-name="AL3T1">
        <draw:frame presentation:style-name="pr9" draw:layer="layout" svg:width="23.499cm" svg:height="3.575cm" svg:x="3.033cm" svg:y="2.367cm" presentation:class="title" presentation:user-transformed="true">
          <draw:text-box>
            <text:p>Étape 1<text:line-break/><text:span text:style-name="T103">Génération proposition</text:span></text:p>
          </draw:text-box>
        </draw:frame>
        <draw:frame presentation:style-name="pr5" draw:text-style-name="P53" draw:layer="layout" svg:width="23.499cm" svg:height="12.18cm" svg:x="3.033cm" svg:y="6.283cm" presentation:class="outline">
          <draw:text-box>
            <text:list text:style-name="L2">
              <text:list-item>
                <text:p text:style-name="P33"><text:span text:style-name="T132">$ cat topics-to-move.json</text:span></text:p>
              </text:list-item>
              <text:list-item>
                <text:p text:style-name="P33"><text:span text:style-name="T132">{"topics":[{"topic" :"foo1"},</text:span><text:span text:style-name="T132">{"topic" :"foo2"}], "version":1}</text:span></text:p>
              </text:list-item>
              <text:list-item>
                <text:p text:style-name="P33"><text:span text:style-name="T132"/></text:p>
              </text:list-item>
              <text:list-item>
                <text:p text:style-name="P33"><text:span text:style-name="T159">$ ./</text:span><text:span text:style-name="T132">kafka-reassign-partitions.sh --bootstrap-</text:span><text:span text:style-name="T132">servers localhost:9092 \</text:span></text:p>
              </text:list-item>
              <text:list-item>
                <text:p text:style-name="P33"><text:span text:style-name="T132">--topics-to-move-json-file topics-to-</text:span><text:span text:style-name="T132">move.json \</text:span></text:p>
              </text:list-item>
              <text:list-item>
                <text:p text:style-name="P33"><text:span text:style-name="T132">--broker-list "0,1,2" </text:span><text:span text:style-name="T160">--generate</text:span></text:p>
              </text:list-item>
              <text:list-item>
                <text:p text:style-name="P33"><text:span text:style-name="T132"/></text:p>
              </text:list-item>
              <text:list-item>
                <text:p text:style-name="P33"><text:span text:style-name="T132">Current partition replica assignment</text:span></text:p>
              </text:list-item>
              <text:list-item>
                <text:p text:style-name="P33"><text:span text:style-name="T132">{"version" : 1, "partitions" : [</text:span></text:p>
              </text:list-item>
              <text:list-item>
                <text:p text:style-name="P33"><text:span text:style-name="T132">{"topic" :"foo1", "partition" : 0, </text:span><text:span text:style-name="T132">"replicas":[0,1]}, </text:span></text:p>
              </text:list-item>
              <text:list-item>
                <text:p text:style-name="P33"><text:span text:style-name="T132">{"topic" : "foo2", "partition" : 0, </text:span><text:span text:style-name="T132">"replicas":[1,0]}, … }</text:span></text:p>
              </text:list-item>
              <text:list-item>
                <text:p text:style-name="P33"><text:span text:style-name="T132"/></text:p>
              </text:list-item>
              <text:list-item>
                <text:p text:style-name="P33"><text:span text:style-name="T132">Proposed partition reassignment configuration</text:span></text:p>
              </text:list-item>
              <text:list-item>
                <text:p text:style-name="P33"><text:span text:style-name="T159">{"version" : 1, "partitions" : [</text:span></text:p>
              </text:list-item>
              <text:list-item>
                <text:p text:style-name="P33"><text:span text:style-name="T159">{"topic" :"foo1", "partition" : 0, </text:span><text:span text:style-name="T159">"replicas":[0,1]}, </text:span></text:p>
              </text:list-item>
              <text:list-item>
                <text:p text:style-name="P33"><text:span text:style-name="T132">{"topic" : "foo2", "partition" : 0, </text:span><text:span text:style-name="T132">"replicas":[1,2]}</text:span></text:p>
              </text:list-item>
            </text:list>
          </draw:text-box>
        </draw:frame>
        <presentation:notes draw:style-name="dp2">
          <draw:page-thumbnail draw:style-name="gr2" draw:layer="layout" svg:width="15.597cm" svg:height="10.985cm" svg:x="2.623cm" svg:y="2.258cm" draw:page-number="202" presentation:class="page"/>
          <draw:frame presentation:style-name="pr6" draw:text-style-name="P13" draw:layer="layout" svg:width="14.362cm" svg:height="11.254cm" svg:x="3.25cm" svg:y="14.128cm" presentation:class="notes" presentation:placeholder="true">
            <draw:text-box/>
          </draw:frame>
        </presentation:notes>
      </draw:page>
      <draw:page draw:name="page203" draw:style-name="dp3" draw:master-page-name="Standard" presentation:presentation-page-layout-name="AL3T1">
        <draw:frame presentation:style-name="pr9" draw:layer="layout" svg:width="23.499cm" svg:height="3.575cm" svg:x="3.033cm" svg:y="2.367cm" presentation:class="title" presentation:user-transformed="true">
          <draw:text-box>
            <text:p>Etape 2 <text:line-break/><text:span text:style-name="T29">Exécution</text:span></text:p>
          </draw:text-box>
        </draw:frame>
        <draw:frame presentation:style-name="pr5" draw:layer="layout" svg:width="23.499cm" svg:height="12.18cm" svg:x="3.033cm" svg:y="6.283cm" presentation:class="outline" presentation:user-transformed="true">
          <draw:text-box>
            <text:list text:style-name="L2">
              <text:list-item>
                <text:p text:style-name="P56"><text:span text:style-name="T159">$ ./kafka-reassign-partition.sh </text:span><text:span text:style-name="T132">--bootstrap-</text:span><text:span text:style-name="T132">servers localhost:9092 <text:s/>\</text:span></text:p>
              </text:list-item>
              <text:list-item>
                <text:p text:style-name="P56"><text:span text:style-name="T132">--reassignment-json-file expand-cluster-</text:span><text:span text:style-name="T132">reassignment.json \</text:span></text:p>
              </text:list-item>
              <text:list-item>
                <text:p><text:span text:style-name="T160">--execute</text:span></text:p>
              </text:list-item>
              <text:list-item>
                <text:p><text:span text:style-name="T132"/></text:p>
              </text:list-item>
              <text:list-item>
                <text:p text:style-name="P56"><text:span text:style-name="T132">Current partition replica assignment</text:span></text:p>
              </text:list-item>
              <text:list-item>
                <text:p text:style-name="P56"><text:span text:style-name="T132">{"version" : 1, "partitions" : [</text:span></text:p>
              </text:list-item>
              <text:list-item>
                <text:p text:style-name="P56"><text:span text:style-name="T132">{"topic" :"foo1", "partition" : 0, </text:span><text:span text:style-name="T132">"replicas":[0,1]}, </text:span></text:p>
              </text:list-item>
              <text:list-item>
                <text:p><text:span text:style-name="T132">{"topic" : "foo2", "partition" : 0, </text:span><text:span text:style-name="T132">"replicas":[1,0]}, … }</text:span></text:p>
              </text:list-item>
              <text:list-item>
                <text:p><text:span text:style-name="T132"/></text:p>
              </text:list-item>
              <text:list-item>
                <text:p text:style-name="P33"><text:span text:style-name="T159">Save this to use as the </text:span><text:span text:style-name="T132">--reassignment-json-</text:span><text:span text:style-name="T132">file option during rollback </text:span></text:p>
              </text:list-item>
              <text:list-item>
                <text:p text:style-name="P33"><text:span text:style-name="T132">Succesfully started reassignments of </text:span><text:span text:style-name="T132">partitions</text:span></text:p>
              </text:list-item>
              <text:list-item>
                <text:p text:style-name="P33"><text:span text:style-name="T159">{"version" : 1, "partitions" : [</text:span></text:p>
              </text:list-item>
              <text:list-item>
                <text:p text:style-name="P33"><text:span text:style-name="T159">{"topic" :"foo1", "partition" : 0, </text:span><text:span text:style-name="T159">"replicas":[0,1]}, </text:span></text:p>
              </text:list-item>
              <text:list-item>
                <text:p text:style-name="P33"><text:span text:style-name="T132">{"topic" : "foo2", "partition" : 0, </text:span><text:span text:style-name="T132">"replicas":[1,2]}</text:span></text:p>
              </text:list-item>
              <text:list-item>
                <text:p><text:span text:style-name="T132"/></text:p>
              </text:list-item>
            </text:list>
          </draw:text-box>
        </draw:frame>
        <presentation:notes draw:style-name="dp2">
          <draw:page-thumbnail draw:style-name="gr2" draw:layer="layout" svg:width="15.597cm" svg:height="10.985cm" svg:x="2.623cm" svg:y="2.258cm" draw:page-number="203" presentation:class="page"/>
          <draw:frame presentation:style-name="pr6" draw:text-style-name="P13" draw:layer="layout" svg:width="14.362cm" svg:height="11.254cm" svg:x="3.25cm" svg:y="14.128cm" presentation:class="notes" presentation:placeholder="true">
            <draw:text-box/>
          </draw:frame>
        </presentation:notes>
      </draw:page>
      <draw:page draw:name="page204" draw:style-name="dp3" draw:master-page-name="Standard" presentation:presentation-page-layout-name="AL3T1">
        <draw:frame presentation:style-name="pr9" draw:layer="layout" svg:width="23.499cm" svg:height="3.575cm" svg:x="3.033cm" svg:y="2.367cm" presentation:class="title" presentation:user-transformed="true">
          <draw:text-box>
            <text:p>Exemple<text:line-break/><text:span text:style-name="T103">Vérification</text:span></text:p>
          </draw:text-box>
        </draw:frame>
        <draw:frame presentation:style-name="pr5" draw:layer="layout" svg:width="23.499cm" svg:height="12.18cm" svg:x="3.033cm" svg:y="6.283cm" presentation:class="outline">
          <draw:text-box>
            <text:list text:style-name="L2">
              <text:list-item>
                <text:p text:style-name="P56"><text:span text:style-name="T159">./kafka-reassign-partition.sh \</text:span><text:span text:style-name="T159"><text:line-break/></text:span><text:span text:style-name="T132">--bootstrap-servers localhost:9092 <text:s/>\</text:span></text:p>
              </text:list-item>
              <text:list-item>
                <text:p text:style-name="P56"><text:span text:style-name="T132">--reassignment-json-file expand-cluster-</text:span><text:span text:style-name="T132">reassignment.json \</text:span></text:p>
              </text:list-item>
              <text:list-item>
                <text:p><text:span text:style-name="T160">--verify</text:span></text:p>
              </text:list-item>
              <text:list-item>
                <text:p><text:span text:style-name="T132"/></text:p>
              </text:list-item>
              <text:list-item>
                <text:p><text:span text:style-name="T132">Status of partition reassignment :</text:span></text:p>
              </text:list-item>
              <text:list-item>
                <text:p text:style-name="P33"><text:span text:style-name="T132">Reassignment of partition [foo1,0] completed </text:span><text:span text:style-name="T132">succesfully</text:span></text:p>
              </text:list-item>
              <text:list-item>
                <text:p text:style-name="P33"><text:span text:style-name="T132">Reassignment of partition [foo1,1] is in </text:span><text:span text:style-name="T132">progress</text:span></text:p>
              </text:list-item>
              <text:list-item>
                <text:p text:style-name="P33"><text:span text:style-name="T132">Reassignment of partition [foo1,2] is in </text:span><text:span text:style-name="T132">progress</text:span></text:p>
              </text:list-item>
              <text:list-item>
                <text:p text:style-name="P33"><text:span text:style-name="T132">Reassignment of partition [foo2,0] completed </text:span><text:span text:style-name="T132">succesfully</text:span></text:p>
              </text:list-item>
              <text:list-item>
                <text:p text:style-name="P33"><text:span text:style-name="T132">Reassignment of partition [foo2,1] completed </text:span><text:span text:style-name="T132">succesfully</text:span></text:p>
              </text:list-item>
              <text:list-item>
                <text:p text:style-name="P33"><text:span text:style-name="T132">Reassignment of partition [foo2,2] completed </text:span><text:span text:style-name="T132">succesfully</text:span></text:p>
              </text:list-item>
              <text:list-item>
                <text:p><text:span text:style-name="T132"/></text:p>
              </text:list-item>
            </text:list>
          </draw:text-box>
        </draw:frame>
        <draw:frame draw:style-name="gr20" draw:text-style-name="P34" draw:layer="layout" svg:width="14.684cm" svg:height="1.216cm" svg:x="1.603cm" svg:y="19.4cm">
          <draw:text-box>
            <text:p><text:span text:style-name="T73">Atelier 9.1 : Réaffectation de partitions</text:span></text:p>
          </draw:text-box>
        </draw:frame>
        <presentation:notes draw:style-name="dp2">
          <draw:page-thumbnail draw:style-name="gr2" draw:layer="layout" svg:width="15.597cm" svg:height="10.985cm" svg:x="2.623cm" svg:y="2.258cm" draw:page-number="204" presentation:class="page"/>
          <draw:frame presentation:style-name="pr6" draw:text-style-name="P13" draw:layer="layout" svg:width="14.362cm" svg:height="11.254cm" svg:x="3.25cm" svg:y="14.128cm" presentation:class="notes" presentation:placeholder="true">
            <draw:text-box/>
          </draw:frame>
        </presentation:notes>
      </draw:page>
      <draw:page draw:name="page205"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Administration</text:span></text:p>
              </text:list-header>
            </text:list>
          </draw:text-box>
        </draw:frame>
        <draw:frame presentation:style-name="pr34" draw:text-style-name="P16" draw:layer="layout" svg:width="23.499cm" svg:height="12.18cm" svg:x="3.033cm" svg:y="6.283cm" presentation:class="subtitle">
          <draw:text-box>
            <text:list text:style-name="L1">
              <text:list-item>
                <text:p text:style-name="P28"><text:span text:style-name="T143"/></text:p>
              </text:list-item>
              <text:list-item>
                <text:p text:style-name="P28"><text:span text:style-name="T143"/></text:p>
              </text:list-item>
              <text:list-item>
                <text:p text:style-name="P19"><text:span text:style-name="T2">Gestion des topics</text:span></text:p>
              </text:list-item>
              <text:list-item>
                <text:p text:style-name="P28"><text:span text:style-name="T161">Stockage </text:span><text:span text:style-name="T12">et rétention des partitions</text:span></text:p>
              </text:list-item>
              <text:list-item>
                <text:p text:style-name="P28"><text:span text:style-name="T13">Gestion du cluster</text:span></text:p>
              </text:list-item>
              <text:list-item>
                <text:p text:style-name="P28"><text:span text:style-name="T145">Dimensionnement</text:span></text:p>
              </text:list-item>
              <text:list-item>
                <text:p text:style-name="P28"><text:span text:style-name="T145">Monitoring</text:span></text:p>
              </text:list-item>
              <text:list-item>
                <text:p text:style-name="P28"><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06"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unité de stockage de Kafka est une réplique de partition. </text:p>
                <text:list>
                  <text:list-item>
                    <text:p>=&gt; Les partitions ne peuvent pas être divisées entre plusieurs brokers ni entre plusieurs disques du même broker</text:p>
                  </text:list-item>
                </text:list>
              </text:list-item>
              <text:list-item>
                <text:p>La propriété <text:span text:style-name="T31">log.dirs</text:span> définit les répertoires de stockage des partitions</text:p>
              </text:list-item>
            </text:list>
          </draw:text-box>
        </draw:frame>
        <presentation:notes draw:style-name="dp5">
          <draw:page-thumbnail draw:style-name="gr2" draw:layer="layout" svg:width="15.597cm" svg:height="10.985cm" svg:x="2.623cm" svg:y="2.258cm" draw:page-number="206" presentation:class="page"/>
          <draw:frame presentation:style-name="pr6" draw:text-style-name="P13" draw:layer="layout" svg:width="14.362cm" svg:height="11.254cm" svg:x="3.25cm" svg:y="14.128cm" presentation:class="notes" presentation:placeholder="true">
            <draw:text-box/>
          </draw:frame>
        </presentation:notes>
      </draw:page>
      <draw:page draw:name="page207" draw:style-name="dp3" draw:master-page-name="Standard" presentation:presentation-page-layout-name="AL3T1">
        <draw:frame presentation:style-name="pr9" draw:layer="layout" svg:width="23.499cm" svg:height="3.575cm" svg:x="3.033cm" svg:y="2.367cm" presentation:class="title">
          <draw:text-box>
            <text:p>Allocation des partitions</text:p>
          </draw:text-box>
        </draw:frame>
        <draw:frame presentation:style-name="pr5" draw:layer="layout" svg:width="23.499cm" svg:height="12.18cm" svg:x="3.033cm" svg:y="6.283cm" presentation:class="outline">
          <draw:text-box>
            <text:list text:style-name="L2">
              <text:list-item>
                <text:p>A la création des <text:span text:style-name="T14">topics</text:span>, Kafka décide comment allouer les partitions sur les brokers</text:p>
              </text:list-item>
              <text:list-item>
                <text:p>Ses objectifs sont :</text:p>
                <text:list>
                  <text:list-item>
                    <text:p><text:span text:style-name="T47">Répartir </text:span>uniformément les répliques entre les brokers</text:p>
                  </text:list-item>
                  <text:list-item>
                    <text:p>S’assurer que chaque réplica d’une partition se trouve sur un broker différent</text:p>
                  </text:list-item>
                  <text:list-item>
                    <text:p>Si les brokers ont des informations sur le rack, s’assurer que les répliques sont affectés à des racks différents si possible</text:p>
                  </text:list-item>
                </text:list>
              </text:list-item>
            </text:list>
          </draw:text-box>
        </draw:frame>
        <presentation:notes draw:style-name="dp5">
          <draw:page-thumbnail draw:style-name="gr2" draw:layer="layout" svg:width="15.597cm" svg:height="10.985cm" svg:x="2.623cm" svg:y="2.258cm" draw:page-number="207" presentation:class="page"/>
          <draw:frame presentation:style-name="pr6" draw:text-style-name="P13" draw:layer="layout" svg:width="14.362cm" svg:height="11.254cm" svg:x="3.25cm" svg:y="14.128cm" presentation:class="notes" presentation:placeholder="true">
            <draw:text-box/>
          </draw:frame>
        </presentation:notes>
      </draw:page>
      <draw:page draw:name="page208" draw:style-name="dp3" draw:master-page-name="Standard" presentation:presentation-page-layout-name="AL3T1">
        <draw:frame presentation:style-name="pr9" draw:layer="layout" svg:width="23.499cm" svg:height="3.575cm" svg:x="3.033cm" svg:y="2.367cm" presentation:class="title">
          <draw:text-box>
            <text:p>Rétention des données</text:p>
          </draw:text-box>
        </draw:frame>
        <draw:frame presentation:style-name="pr5" draw:layer="layout" svg:width="23.499cm" svg:height="12.18cm" svg:x="3.033cm" svg:y="6.283cm" presentation:class="outline">
          <draw:text-box>
            <text:list text:style-name="L2">
              <text:list-item>
                <text:p>L'administrateur Kafka configure une période de rétention pour chaque topic</text:p>
                <text:list>
                  <text:list-item>
                    <text:p>Soit une durée</text:p>
                  </text:list-item>
                  <text:list-item>
                    <text:p>Soit un volume</text:p>
                  </text:list-item>
                </text:list>
              </text:list-item>
              <text:list-item>
                <text:p>Pour accélérer la purge, Kafka utilise les <text:span text:style-name="T31">segments</text:span></text:p>
                <text:list>
                  <text:list-item>
                    <text:p>Les segments sont des fragments de partition au maximum de 1Go et au maximum d’une semaine de données </text:p>
                  </text:list-item>
                  <text:list-item>
                    <text:p>Lors de l’écriture d’un segment, lorsque la limite est atteinte, le broker ferme le fichier. Il devient éligible pour la purge</text:p>
                  </text:list-item>
                  <text:list-item>
                    <text:p>Il existe donc un seul <text:span text:style-name="T14">segment actif</text:span> qui d’ailleurs ne peut pas être purgé</text:p>
                  </text:list-item>
                </text:list>
              </text:list-item>
            </text:list>
          </draw:text-box>
        </draw:frame>
        <presentation:notes draw:style-name="dp5">
          <draw:page-thumbnail draw:style-name="gr2" draw:layer="layout" svg:width="15.597cm" svg:height="10.985cm" svg:x="2.623cm" svg:y="2.258cm" draw:page-number="208" presentation:class="page"/>
          <draw:frame presentation:style-name="pr6" draw:text-style-name="P13" draw:layer="layout" svg:width="14.362cm" svg:height="11.254cm" svg:x="3.25cm" svg:y="14.128cm" presentation:class="notes" presentation:placeholder="true">
            <draw:text-box/>
          </draw:frame>
        </presentation:notes>
      </draw:page>
      <draw:page draw:name="page209" draw:style-name="dp3" draw:master-page-name="Standard" presentation:presentation-page-layout-name="AL3T1">
        <draw:frame presentation:style-name="pr9" draw:layer="layout" svg:width="23.499cm" svg:height="3.575cm" svg:x="3.033cm" svg:y="2.367cm" presentation:class="title">
          <draw:text-box>
            <text:p>Segments</text:p>
          </draw:text-box>
        </draw:frame>
        <draw:frame presentation:style-name="pr5" draw:layer="layout" svg:width="23.499cm" svg:height="12.18cm" svg:x="3.033cm" svg:y="6.283cm" presentation:class="outline" presentation:placeholder="true">
          <draw:text-box/>
        </draw:frame>
        <draw:frame draw:style-name="gr9" draw:text-style-name="P23" draw:layer="layout" svg:width="25.432cm" svg:height="13.834cm" svg:x="2.153cm" svg:y="6.33cm">
          <draw:image xlink:href="Pictures/100000010000062000000355C8F34CC3.png" xlink:type="simple" xlink:show="embed" xlink:actuate="onLoad" draw:mime-type="image/png">
            <text:p/>
          </draw:image>
        </draw:frame>
        <presentation:notes draw:style-name="dp8">
          <draw:page-thumbnail draw:style-name="gr2" draw:layer="layout" svg:width="15.597cm" svg:height="10.985cm" svg:x="2.623cm" svg:y="2.258cm" draw:page-number="209" presentation:class="page"/>
          <draw:frame presentation:style-name="pr6" draw:text-style-name="P18" draw:layer="layout" svg:width="14.362cm" svg:height="11.254cm" svg:x="3.25cm" svg:y="14.128cm" presentation:class="notes" presentation:placeholder="true">
            <draw:text-box/>
          </draw:frame>
        </presentation:notes>
      </draw:page>
      <draw:page draw:name="page210" draw:style-name="dp3" draw:master-page-name="Standard" presentation:presentation-page-layout-name="AL3T1">
        <draw:frame presentation:style-name="pr9" draw:layer="layout" svg:width="23.499cm" svg:height="3.575cm" svg:x="3.033cm" svg:y="2.367cm" presentation:class="title">
          <draw:text-box>
            <text:p>Indexation</text:p>
          </draw:text-box>
        </draw:frame>
        <draw:frame presentation:style-name="pr5" draw:layer="layout" svg:width="23.499cm" svg:height="12.18cm" svg:x="3.033cm" svg:y="6.283cm" presentation:class="outline">
          <draw:text-box>
            <text:list text:style-name="L2">
              <text:list-item>
                <text:p>Kafka permet de récupérer des messages à partir de n'importe quel offset disponible. </text:p>
              </text:list-item>
              <text:list-item>
                <text:p>Pour accélérer cette opération, Kafka maintient un <text:span text:style-name="T31">index</text:span> pour chaque partition </text:p>
                <text:list>
                  <text:list-item>
                    <text:p>L'index associe les offsets aux segments et aux positions dans le fichier </text:p>
                  </text:list-item>
                  <text:list-item>
                    <text:p>Les index sont également divisés en segments</text:p>
                  </text:list-item>
                  <text:list-item>
                    <text:p>En cas de suppression, ils peuvent être régénérés automatiquement par Kafka</text:p>
                  </text:list-item>
                </text:list>
              </text:list-item>
            </text:list>
          </draw:text-box>
        </draw:frame>
        <presentation:notes draw:style-name="dp5">
          <draw:page-thumbnail draw:style-name="gr2" draw:layer="layout" svg:width="15.597cm" svg:height="10.985cm" svg:x="2.623cm" svg:y="2.258cm" draw:page-number="210" presentation:class="page"/>
          <draw:frame presentation:style-name="pr6" draw:text-style-name="P18" draw:layer="layout" svg:width="14.362cm" svg:height="11.254cm" svg:x="3.25cm" svg:y="14.128cm" presentation:class="notes" presentation:placeholder="true">
            <draw:text-box/>
          </draw:frame>
        </presentation:notes>
      </draw:page>
      <draw:page draw:name="page211" draw:style-name="dp3" draw:master-page-name="Standard" presentation:presentation-page-layout-name="AL3T1">
        <draw:frame presentation:style-name="pr9" draw:layer="layout" svg:width="23.499cm" svg:height="3.575cm" svg:x="3.033cm" svg:y="2.367cm" presentation:class="title">
          <draw:text-box>
            <text:p>Nettoyage des logs</text:p>
          </draw:text-box>
        </draw:frame>
        <draw:frame presentation:style-name="pr5" draw:layer="layout" svg:width="23.499cm" svg:height="12.18cm" svg:x="3.033cm" svg:y="6.283cm" presentation:class="outline" presentation:user-transformed="true">
          <draw:text-box>
            <text:list text:style-name="L2">
              <text:list-item>
                <text:p>Propriété log.cleanup.policy, 2 stratégies disponible :</text:p>
              </text:list-item>
              <text:list-item>
                <text:p/>
                <text:list>
                  <text:list-item>
                    <text:p><text:span text:style-name="T31">delete</text:span> (défaut) :</text:p>
                    <text:list>
                      <text:list-item>
                        <text:p>Suppression des vieux segments en fonction de l’âge et la taille du log (partition)</text:p>
                      </text:list-item>
                    </text:list>
                  </text:list-item>
                  <text:list-item>
                    <text:p><text:span text:style-name="T31">compact</text:span> </text:p>
                    <text:list>
                      <text:list-item>
                        <text:p>Suppression basée sur les clés des messages quelque soit l’âge et la taille des données</text:p>
                      </text:list-item>
                    </text:list>
                  </text:list-item>
                </text:list>
              </text:list-item>
              <text:list-item>
                <text:p/>
              </text:list-item>
              <text:list-item>
                <text:p>Possibilité de combiner les 2 stratégies (delete and compact)</text:p>
              </text:list-item>
            </text:list>
          </draw:text-box>
        </draw:frame>
        <presentation:notes draw:style-name="dp2">
          <draw:page-thumbnail draw:style-name="gr2" draw:layer="layout" svg:width="15.597cm" svg:height="10.985cm" svg:x="2.623cm" svg:y="2.258cm" draw:page-number="211" presentation:class="page"/>
          <draw:frame presentation:style-name="pr6" draw:text-style-name="P13" draw:layer="layout" svg:width="14.362cm" svg:height="11.254cm" svg:x="3.25cm" svg:y="14.128cm" presentation:class="notes" presentation:placeholder="true">
            <draw:text-box/>
          </draw:frame>
        </presentation:notes>
      </draw:page>
      <draw:page draw:name="page212" draw:style-name="dp3" draw:master-page-name="Standard" presentation:presentation-page-layout-name="AL3T1">
        <draw:frame presentation:style-name="pr9" draw:layer="layout" svg:width="23.499cm" svg:height="3.575cm" svg:x="3.033cm" svg:y="2.367cm" presentation:class="title">
          <draw:text-box>
            <text:p>Configuration stratégie delete</text:p>
          </draw:text-box>
        </draw:frame>
        <draw:frame presentation:style-name="pr5" draw:layer="layout" svg:width="23.499cm" svg:height="12.18cm" svg:x="3.033cm" svg:y="6.283cm" presentation:class="outline" presentation:user-transformed="true">
          <draw:text-box>
            <text:list text:style-name="L2">
              <text:list-item>
                <text:p><text:span text:style-name="T162">log.retention.hours</text:span><text:span text:style-name="T26"> (défaut </text:span><text:span text:style-name="T26">168 : 7 jours), </text:span><text:span text:style-name="T162">log.retention.minutes </text:span>(défaut null)<text:span text:style-name="T162">, </text:span><text:span text:style-name="T31">log.retention.ms </text:span>(défaut null, si -1 infini)<text:line-break/>Période de rétention des vieux segment avant de les supprimer </text:p>
              </text:list-item>
              <text:list-item>
                <text:p><text:span text:style-name="T31">log.retention.bytes </text:span><text:span text:style-name="T31">(défaut -1) </text:span><text:span text:style-name="T31"><text:line-break/></text:span>La<text:span text:style-name="T31"> </text:span>taille<text:span text:style-name="T31"> </text:span>maximale du log</text:p>
              </text:list-item>
              <text:list-item>
                <text:p/>
              </text:list-item>
              <text:list-item>
                <text:p><text:span text:style-name="T31">offsets.retention.minutes</text:span> (défaut 10080 : 7 jours)<text:line-break/>Le nombre de minutes pour conserver l’index d’offset d’un groupe n’ayant plus de consommateurs</text:p>
              </text:list-item>
              <text:list-item>
                <text:p/>
              </text:list-item>
              <text:list-item>
                <text:p/>
              </text:list-item>
            </text:list>
          </draw:text-box>
        </draw:frame>
        <presentation:notes draw:style-name="dp8">
          <draw:page-thumbnail draw:style-name="gr2" draw:layer="layout" svg:width="15.597cm" svg:height="10.985cm" svg:x="2.623cm" svg:y="2.258cm" draw:page-number="212" presentation:class="page"/>
          <draw:frame presentation:style-name="pr6" draw:text-style-name="P18" draw:layer="layout" svg:width="14.362cm" svg:height="11.254cm" svg:x="3.25cm" svg:y="14.128cm" presentation:class="notes" presentation:placeholder="true">
            <draw:text-box/>
          </draw:frame>
        </presentation:notes>
      </draw:page>
      <draw:page draw:name="page213" draw:style-name="dp3" draw:master-page-name="Standard" presentation:presentation-page-layout-name="AL3T1">
        <draw:frame presentation:style-name="pr9" draw:layer="layout" svg:width="23.499cm" svg:height="3.575cm" svg:x="3.033cm" svg:y="2.367cm" presentation:class="title">
          <draw:text-box>
            <text:p>Compactage</text:p>
          </draw:text-box>
        </draw:frame>
        <draw:frame presentation:style-name="pr5" draw:layer="layout" svg:width="23.499cm" svg:height="12.18cm" svg:x="3.033cm" svg:y="6.283cm" presentation:class="outline">
          <draw:text-box>
            <text:list text:style-name="L2">
              <text:list-item>
                <text:p>Kafka autorise également la stratégie de rétention <text:span text:style-name="T31">compact</text:span>, qui ne stocke que la valeur la plus récente pour chaque clé du <text:span text:style-name="T14">topic</text:span>.</text:p>
                <text:list>
                  <text:list-item>
                    <text:p>Propriétés <text:span text:style-name="T31">cleanup.policy=co</text:span><text:span text:style-name="T31">mpact </text:span>et <text:span text:style-name="T31">log.cleaner.enable</text:span><text:span text:style-name="T31">d=true</text:span></text:p>
                  </text:list-item>
                  <text:list-item>
                    <text:p>Les événements doivent alors contenir une clé</text:p>
                  </text:list-item>
                  <text:list-item>
                    <text:p>Le compactage est effectué par une thread séparé qui périodiquement purge les messages <text:span text:style-name="T14">dirty</text:span></text:p>
                  </text:list-item>
                  <text:list-item>
                    <text:p><text:span text:style-name="T21">Lors du nettoyage, le </text:span><text:span text:style-name="T21">segment actif est </text:span><text:span text:style-name="T21">fermé (un nouveau </text:span><text:span text:style-name="T21">segment est créé)</text:span></text:p>
                  </text:list-item>
                </text:list>
              </text:list-item>
              <text:list-item>
                <text:p/>
              </text:list-item>
            </text:list>
          </draw:text-box>
        </draw:frame>
        <presentation:notes draw:style-name="dp5">
          <draw:page-thumbnail draw:style-name="gr2" draw:layer="layout" svg:width="15.597cm" svg:height="10.985cm" svg:x="2.623cm" svg:y="2.258cm" draw:page-number="213" presentation:class="page"/>
          <draw:frame presentation:style-name="pr6" draw:text-style-name="P18" draw:layer="layout" svg:width="14.362cm" svg:height="11.254cm" svg:x="3.25cm" svg:y="14.128cm" presentation:class="notes" presentation:placeholder="true">
            <draw:text-box/>
          </draw:frame>
        </presentation:notes>
      </draw:page>
      <draw:page draw:name="page214" draw:style-name="dp3" draw:master-page-name="Standard" presentation:presentation-page-layout-name="AL3T1">
        <draw:frame presentation:style-name="pr9" draw:layer="layout" svg:width="23.499cm" svg:height="3.575cm" svg:x="3.033cm" svg:y="2.367cm" presentation:class="title">
          <draw:text-box>
            <text:p>Exemple <text:span text:style-name="T14">compact</text:span></text:p>
          </draw:text-box>
        </draw:frame>
        <draw:frame presentation:style-name="pr5" draw:layer="layout" svg:width="23.499cm" svg:height="12.18cm" svg:x="3.033cm" svg:y="6.283cm" presentation:class="outline" presentation:placeholder="true">
          <draw:text-box/>
        </draw:frame>
        <draw:frame draw:style-name="gr9" draw:text-style-name="P23" draw:layer="layout" svg:width="14.078cm" svg:height="13.319cm" svg:x="7.522cm" svg:y="6.473cm">
          <draw:image xlink:href="Pictures/10000001000002E6000002BEDC997BE6.png" xlink:type="simple" xlink:show="embed" xlink:actuate="onLoad" draw:mime-type="image/png">
            <text:p/>
          </draw:image>
        </draw:frame>
        <presentation:notes draw:style-name="dp2">
          <draw:page-thumbnail draw:style-name="gr2" draw:layer="layout" svg:width="15.597cm" svg:height="10.985cm" svg:x="2.623cm" svg:y="2.258cm" draw:page-number="214" presentation:class="page"/>
          <draw:frame presentation:style-name="pr6" draw:text-style-name="P13" draw:layer="layout" svg:width="14.362cm" svg:height="11.254cm" svg:x="3.25cm" svg:y="14.128cm" presentation:class="notes" presentation:placeholder="true">
            <draw:text-box/>
          </draw:frame>
        </presentation:notes>
      </draw:page>
      <draw:page draw:name="page215" draw:style-name="dp3" draw:master-page-name="Standard" presentation:presentation-page-layout-name="AL3T1">
        <draw:frame presentation:style-name="pr9" draw:layer="layout" svg:width="23.499cm" svg:height="3.575cm" svg:x="3.033cm" svg:y="2.367cm" presentation:class="title">
          <draw:text-box>
            <text:p>Configuration compact</text:p>
          </draw:text-box>
        </draw:frame>
        <draw:frame presentation:style-name="pr5" draw:layer="layout" svg:width="23.499cm" svg:height="12.18cm" svg:x="3.033cm" svg:y="6.283cm" presentation:class="outline">
          <draw:text-box>
            <text:list text:style-name="L2">
              <text:list-item>
                <text:p text:style-name="P24">Le pool de threads effectuant le nettoyage est configurable :</text:p>
                <text:list>
                  <text:list-item>
                    <text:p><text:span text:style-name="T148">log.cleaner.threads</text:span><text:span text:style-name="T14"> : </text:span><text:span text:style-name="T14">Le nombre de threads</text:span></text:p>
                  </text:list-item>
                  <text:list-item>
                    <text:p><text:span text:style-name="T148">log.cleaner.backoff.m</text:span><text:span text:style-name="T148">s</text:span><text:span text:style-name="T14"> </text:span>: Le temps de pause lorsqu’il n’y pas de travail (défaut 15 secondes)</text:p>
                  </text:list-item>
                  <text:list-item>
                    <text:p>….</text:p>
                  </text:list-item>
                </text:list>
              </text:list-item>
              <text:list-item>
                <text:p>2 propriétés détermine éligibilité d’un message pour la purge:</text:p>
                <text:list>
                  <text:list-item>
                    <text:p><text:span text:style-name="T148">cleaner.min.compacti</text:span><text:span text:style-name="T148">on.lag.ms</text:span> : Le temps minimum qu’un message reste non compacté </text:p>
                  </text:list-item>
                  <text:list-item>
                    <text:p><text:span text:style-name="T148">cleaner.max.compact</text:span><text:span text:style-name="T148">ion.lag.ms</text:span> : Le temps maximum qu’un message reste inéligible pour la compactage</text:p>
                  </text:list-item>
                </text:list>
              </text:list-item>
              <text:list-item>
                <text:p/>
              </text:list-item>
              <text:list-item>
                <text:p/>
              </text:list-item>
            </text:list>
          </draw:text-box>
        </draw:frame>
        <draw:frame draw:style-name="gr36" draw:text-style-name="P34" draw:layer="layout" svg:width="11.195cm" svg:height="1.216cm" svg:x="1.604cm" svg:y="19.4cm">
          <draw:text-box>
            <text:p><text:span text:style-name="T73">Atelier 8.2 : Rétention des logs</text:span></text:p>
          </draw:text-box>
        </draw:frame>
        <presentation:notes draw:style-name="dp8">
          <draw:page-thumbnail draw:style-name="gr2" draw:layer="layout" svg:width="15.597cm" svg:height="10.985cm" svg:x="2.623cm" svg:y="2.258cm" draw:page-number="215" presentation:class="page"/>
          <draw:frame presentation:style-name="pr6" draw:text-style-name="P18" draw:layer="layout" svg:width="14.362cm" svg:height="11.254cm" svg:x="3.25cm" svg:y="14.128cm" presentation:class="notes" presentation:placeholder="true">
            <draw:text-box/>
          </draw:frame>
        </presentation:notes>
      </draw:page>
      <draw:page draw:name="page216"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Administration</text:span></text:p>
              </text:list-header>
            </text:list>
          </draw:text-box>
        </draw:frame>
        <draw:frame presentation:style-name="pr35" draw:text-style-name="P16" draw:layer="layout" svg:width="23.499cm" svg:height="12.18cm" svg:x="3.033cm" svg:y="6.283cm" presentation:class="subtitle">
          <draw:text-box>
            <text:list text:style-name="L1">
              <text:list-item>
                <text:p text:style-name="P28"><text:span text:style-name="T143"/></text:p>
              </text:list-item>
              <text:list-item>
                <text:p text:style-name="P28"><text:span text:style-name="T143"/></text:p>
              </text:list-item>
              <text:list-item>
                <text:p text:style-name="P28"><text:span text:style-name="T145">Gestion des topics</text:span></text:p>
              </text:list-item>
              <text:list-item>
                <text:p text:style-name="P28"><text:span text:style-name="T145">Stockage et rétention des partitions</text:span></text:p>
              </text:list-item>
              <text:list-item>
                <text:p text:style-name="P28"><text:span text:style-name="T12">Gestion du cluster</text:span></text:p>
              </text:list-item>
              <text:list-item>
                <text:p text:style-name="P28"><text:span text:style-name="T145">Dimensionnement</text:span></text:p>
              </text:list-item>
              <text:list-item>
                <text:p text:style-name="P28"><text:span text:style-name="T145">Monitoring</text:span></text:p>
              </text:list-item>
              <text:list-item>
                <text:p text:style-name="P28"><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17" draw:style-name="dp3" draw:master-page-name="Standard" presentation:presentation-page-layout-name="AL3T1">
        <draw:frame presentation:style-name="pr9" draw:layer="layout" svg:width="23.499cm" svg:height="3.575cm" svg:x="3.033cm" svg:y="2.367cm" presentation:class="title">
          <draw:text-box>
            <text:p>Redémarrage du cluster</text:p>
          </draw:text-box>
        </draw:frame>
        <draw:frame presentation:style-name="pr5" draw:layer="layout" svg:width="23.499cm" svg:height="12.18cm" svg:x="3.033cm" svg:y="6.283cm" presentation:class="outline" presentation:user-transformed="true">
          <draw:text-box>
            <text:list text:style-name="L2">
              <text:list-item>
                <text:p>Redémarrage progressif, broker par broker</text:p>
              </text:list-item>
              <text:list-item>
                <text:p>Attendre que l’état se stabilise (isr=replicas)</text:p>
              </text:list-item>
              <text:list-item>
                <text:p>Vérification de l’état des topics </text:p>
              </text:list-item>
              <text:list-item>
                <text:p><text:span text:style-name="T65">bin/kafka-topics.sh –bootstap-</text:span><text:span text:style-name="T65">servers locahost:9092 --</text:span><text:span text:style-name="T65">describe --topic my_topic_name</text:span></text:p>
              </text:list-item>
              <text:list-item>
                <text:p>Exemple d’outillage :</text:p>
              </text:list-item>
              <text:list-item>
                <text:p><text:span text:style-name="T65">https://github.com/deviceinsight/</text:span><text:span text:style-name="T65">kafkactl</text:span></text:p>
              </text:list-item>
            </text:list>
          </draw:text-box>
        </draw:frame>
        <presentation:notes draw:style-name="dp5">
          <draw:page-thumbnail draw:style-name="gr2" draw:layer="layout" svg:width="15.597cm" svg:height="10.985cm" svg:x="2.623cm" svg:y="2.258cm" draw:page-number="217" presentation:class="page"/>
          <draw:frame presentation:style-name="pr6" draw:text-style-name="P13" draw:layer="layout" svg:width="14.362cm" svg:height="11.254cm" svg:x="3.25cm" svg:y="14.128cm" presentation:class="notes" presentation:placeholder="true">
            <draw:text-box/>
          </draw:frame>
        </presentation:notes>
      </draw:page>
      <draw:page draw:name="page218" draw:style-name="dp3" draw:master-page-name="Standard" presentation:presentation-page-layout-name="AL3T1">
        <draw:frame presentation:style-name="pr9" draw:layer="layout" svg:width="23.499cm" svg:height="3.575cm" svg:x="3.033cm" svg:y="2.367cm" presentation:class="title">
          <draw:text-box>
            <text:p>Mise à jour du cluster </text:p>
          </draw:text-box>
        </draw:frame>
        <draw:frame presentation:style-name="pr5" draw:layer="layout" svg:width="23.499cm" svg:height="12.18cm" svg:x="3.033cm" svg:y="6.283cm" presentation:class="outline">
          <draw:text-box>
            <text:list text:style-name="L2">
              <text:list-item>
                <text:p>Avant la mise à niveau:</text:p>
                <text:list>
                  <text:list-item>
                    <text:p>Pour toutes les partitions: <text:line-break/>liste de répliques = liste ISR</text:p>
                  </text:list-item>
                </text:list>
              </text:list-item>
              <text:list-item>
                <text:p>Garanties:</text:p>
                <text:list>
                  <text:list-item>
                    <text:p>Pas de temps d'arrêt pour les clients (producteurs et consommateurs)</text:p>
                  </text:list-item>
                  <text:list-item>
                    <text:p>Les nouveaux brokers sont compatibles avec les anciens clients Kafka</text:p>
                  </text:list-item>
                </text:list>
              </text:list-item>
            </text:list>
          </draw:text-box>
        </draw:frame>
        <presentation:notes draw:style-name="dp5">
          <draw:page-thumbnail draw:style-name="gr2" draw:layer="layout" svg:width="15.597cm" svg:height="10.985cm" svg:x="2.623cm" svg:y="2.258cm" draw:page-number="218" presentation:class="page"/>
          <draw:frame presentation:style-name="pr6" draw:text-style-name="P13" draw:layer="layout" svg:width="14.362cm" svg:height="11.254cm" svg:x="3.25cm" svg:y="14.128cm" presentation:class="notes" presentation:placeholder="true">
            <draw:text-box/>
          </draw:frame>
        </presentation:notes>
      </draw:page>
      <draw:page draw:name="page219" draw:style-name="dp3" draw:master-page-name="Standard" presentation:presentation-page-layout-name="AL3T1">
        <draw:frame presentation:style-name="pr9" draw:layer="layout" svg:width="23.499cm" svg:height="3.575cm" svg:x="3.033cm" svg:y="2.367cm" presentation:class="title">
          <draw:text-box>
            <text:p>Étapes de mise à jour </text:p>
          </draw:text-box>
        </draw:frame>
        <draw:frame presentation:style-name="pr5" draw:layer="layout" svg:width="23.499cm" svg:height="12.18cm" svg:x="3.033cm" svg:y="6.283cm" presentation:class="outline">
          <draw:text-box>
            <text:list text:style-name="L2">
              <text:list-item>
                <text:p><text:span text:style-name="T14">server.properties</text:span>: définissez la configuration suivante (redémarrage progressif)</text:p>
                <text:list>
                  <text:list-item>
                    <text:p><text:span text:style-name="T14">inter.broker.protocol.ver</text:span><text:span text:style-name="T14">sion</text:span> : version actuelle </text:p>
                  </text:list-item>
                  <text:list-item>
                    <text:p><text:span text:style-name="T14">log.message.format.ver</text:span><text:span text:style-name="T14">sion</text:span> : version actuelle du format de message</text:p>
                  </text:list-item>
                </text:list>
              </text:list-item>
              <text:list-item>
                <text:p/>
              </text:list-item>
              <text:list-item>
                <text:p>Mettre à niveau les brokers un par un (redémarrage)</text:p>
                <text:list>
                  <text:list-item>
                    <text:p>Attendre l'état stable (isr = réplicas)</text:p>
                  </text:list-item>
                </text:list>
              </text:list-item>
              <text:list-item>
                <text:p>Mettre à jour en dernier le contrôleur </text:p>
              </text:list-item>
              <text:list-item>
                <text:p>Mettre à jour <text:span text:style-name="T14">inter.broker.protocol.versio</text:span><text:span text:style-name="T14">n</text:span> (redémarrage progressif)</text:p>
              </text:list-item>
              <text:list-item>
                <text:p>Mettre à niveau les clients</text:p>
              </text:list-item>
              <text:list-item>
                <text:p>Mettre à jour <text:span text:style-name="T14">log.message.format.versio</text:span><text:span text:style-name="T14">n</text:span> (redémarrage progressif)</text:p>
              </text:list-item>
            </text:list>
          </draw:text-box>
        </draw:frame>
        <draw:frame draw:style-name="gr37" draw:text-style-name="P34" draw:layer="layout" svg:width="12.114cm" svg:height="1.216cm" svg:x="1.603cm" svg:y="19.4cm">
          <draw:text-box>
            <text:p><text:span text:style-name="T73">Atelier 9.2 : Redémarrage cluster</text:span></text:p>
          </draw:text-box>
        </draw:frame>
        <presentation:notes draw:style-name="dp5">
          <draw:page-thumbnail draw:style-name="gr2" draw:layer="layout" svg:width="15.597cm" svg:height="10.985cm" svg:x="2.623cm" svg:y="2.258cm" draw:page-number="219" presentation:class="page"/>
          <draw:frame presentation:style-name="pr6" draw:text-style-name="P13" draw:layer="layout" svg:width="14.362cm" svg:height="11.254cm" svg:x="3.25cm" svg:y="14.128cm" presentation:class="notes" presentation:placeholder="true">
            <draw:text-box/>
          </draw:frame>
        </presentation:notes>
      </draw:page>
      <draw:page draw:name="page220"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Administration</text:span></text:p>
              </text:list-header>
            </text:list>
          </draw:text-box>
        </draw:frame>
        <draw:frame presentation:style-name="pr36" draw:text-style-name="P16" draw:layer="layout" svg:width="23.499cm" svg:height="12.18cm" svg:x="3.033cm" svg:y="6.283cm" presentation:class="subtitle" presentation:user-transformed="true">
          <draw:text-box>
            <text:list text:style-name="L1">
              <text:list-item>
                <text:p text:style-name="P28"><text:span text:style-name="T143"/></text:p>
              </text:list-item>
              <text:list-item>
                <text:p text:style-name="P28"><text:span text:style-name="T143"/></text:p>
              </text:list-item>
              <text:list-item>
                <text:p text:style-name="P19"><text:span text:style-name="T2">Gestion des topics</text:span></text:p>
              </text:list-item>
              <text:list-item>
                <text:p text:style-name="P28"><text:span text:style-name="T2">Stockage et rétention des partitions</text:span></text:p>
              </text:list-item>
              <text:list-item>
                <text:p text:style-name="P28"><text:span text:style-name="T2">Quotas</text:span></text:p>
              </text:list-item>
              <text:list-item>
                <text:p text:style-name="P28"><text:span text:style-name="T13">Gestion du cluster</text:span></text:p>
              </text:list-item>
              <text:list-item>
                <text:p text:style-name="P19"><text:span text:style-name="T12">Dimensionnement</text:span></text:p>
              </text:list-item>
              <text:list-item>
                <text:p text:style-name="P19"><text:span text:style-name="T145">Monitoring</text:span></text:p>
              </text:list-item>
              <text:list-item>
                <text:p text:style-name="P28"><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21" draw:style-name="dp3" draw:master-page-name="Standard" presentation:presentation-page-layout-name="AL3T1">
        <draw:frame presentation:style-name="pr9" draw:layer="layout" svg:width="23.499cm" svg:height="3.575cm" svg:x="3.033cm" svg:y="2.367cm" presentation:class="title">
          <draw:text-box>
            <text:p>Kafka Broker</text:p>
          </draw:text-box>
        </draw:frame>
        <draw:frame presentation:style-name="pr5" draw:layer="layout" svg:width="23.499cm" svg:height="12.18cm" svg:x="3.033cm" svg:y="6.283cm" presentation:class="outline" presentation:user-transformed="true">
          <draw:text-box>
            <text:list text:style-name="L2">
              <text:list-item>
                <text:p><text:span text:style-name="T66">CPU</text:span> : Pas d’utilisation intensive du CPU</text:p>
              </text:list-item>
              <text:list-item>
                <text:p><text:span text:style-name="T66">Disque</text:span> :</text:p>
                <text:list>
                  <text:list-item>
                    <text:p>RAID 10 est mieux</text:p>
                  </text:list-item>
                  <text:list-item>
                    <text:p>SSD n’est pas plus efficace•</text:p>
                  </text:list-item>
                </text:list>
              </text:list-item>
              <text:list-item>
                <text:p><text:span text:style-name="T66">Mémoire</text:span> : Pas d’utilisation intensive (sauf pour le compactage)</text:p>
                <text:list>
                  <text:list-item>
                    <text:p>16 Gb – 64 Gb</text:p>
                  </text:list-item>
                </text:list>
              </text:list-item>
              <text:list-item>
                <text:p><text:span text:style-name="T66">JVM</text:span> :</text:p>
                <text:list>
                  <text:list-item>
                    <text:p>4 Gb – 6 Gb</text:p>
                  </text:list-item>
                </text:list>
              </text:list-item>
              <text:list-item>
                <text:p><text:span text:style-name="T66">Réseau</text:span>:</text:p>
                <text:list>
                  <text:list-item>
                    <text:p>1 Gb - 10 Gb Ethernet (pour les gros cluster)</text:p>
                  </text:list-item>
                  <text:list-item>
                    <text:p>La bande passante ne doit pas être partagée avec d’autres applications</text:p>
                  </text:list-item>
                </text:list>
              </text:list-item>
            </text:list>
          </draw:text-box>
        </draw:frame>
        <presentation:notes draw:style-name="dp2">
          <draw:page-thumbnail draw:style-name="gr2" draw:layer="layout" svg:width="15.597cm" svg:height="10.985cm" svg:x="2.623cm" svg:y="2.258cm" draw:page-number="221" presentation:class="page"/>
          <draw:frame presentation:style-name="pr6" draw:text-style-name="P13" draw:layer="layout" svg:width="14.362cm" svg:height="11.254cm" svg:x="3.25cm" svg:y="14.128cm" presentation:class="notes" presentation:placeholder="true">
            <draw:text-box/>
          </draw:frame>
        </presentation:notes>
      </draw:page>
      <draw:page draw:name="page222" draw:style-name="dp3" draw:master-page-name="Standard" presentation:presentation-page-layout-name="AL3T1">
        <draw:frame presentation:style-name="pr9" draw:layer="layout" svg:width="23.499cm" svg:height="3.575cm" svg:x="3.033cm" svg:y="2.367cm" presentation:class="title">
          <draw:text-box>
            <text:p>Configuration système</text:p>
          </draw:text-box>
        </draw:frame>
        <draw:frame presentation:style-name="pr5" draw:layer="layout" svg:width="23.499cm" svg:height="12.18cm" svg:x="3.033cm" svg:y="6.283cm" presentation:class="outline" presentation:user-transformed="true">
          <draw:text-box>
            <text:list text:style-name="L2">
              <text:list-item>
                <text:p>Étendre la limite du nombre de fichiers ouverts :</text:p>
                <text:list>
                  <text:list-item>
                    <text:p><text:span text:style-name="T14">ulimit -n 100000</text:span></text:p>
                  </text:list-item>
                </text:list>
              </text:list-item>
              <text:list-item>
                <text:p/>
              </text:list-item>
              <text:list-item>
                <text:p>Configuration Virtual Memory <text:line-break/>(<text:span text:style-name="T14">/etc/sysctl.conf pour </text:span><text:span text:style-name="T14">ubuntu</text:span>)</text:p>
                <text:list>
                  <text:list-item>
                    <text:p><text:span text:style-name="T14">vm.swappiness=1</text:span></text:p>
                  </text:list-item>
                  <text:list-item>
                    <text:p><text:span text:style-name="T14">vm.dirty_background_ra</text:span><text:span text:style-name="T14">tio=5</text:span></text:p>
                  </text:list-item>
                  <text:list-item>
                    <text:p><text:span text:style-name="T14">vm.dirty_ratio=60</text:span></text:p>
                  </text:list-item>
                </text:list>
              </text:list-item>
            </text:list>
          </draw:text-box>
        </draw:frame>
        <presentation:notes draw:style-name="dp2">
          <draw:page-thumbnail draw:style-name="gr2" draw:layer="layout" svg:width="15.597cm" svg:height="10.985cm" svg:x="2.623cm" svg:y="2.258cm" draw:page-number="222" presentation:class="page"/>
          <draw:frame presentation:style-name="pr6" draw:text-style-name="P13" draw:layer="layout" svg:width="14.362cm" svg:height="11.254cm" svg:x="3.25cm" svg:y="14.128cm" presentation:class="notes" presentation:placeholder="true">
            <draw:text-box/>
          </draw:frame>
        </presentation:notes>
      </draw:page>
      <draw:page draw:name="page223" draw:style-name="dp3" draw:master-page-name="Standard" presentation:presentation-page-layout-name="AL3T1">
        <draw:frame presentation:style-name="pr9" draw:layer="layout" svg:width="23.499cm" svg:height="3.575cm" svg:x="3.033cm" svg:y="2.367cm" presentation:class="title" presentation:user-transformed="true">
          <draw:text-box>
            <text:p>JVM</text:p>
          </draw:text-box>
        </draw:frame>
        <draw:frame presentation:style-name="pr5" draw:layer="layout" svg:width="23.499cm" svg:height="12.18cm" svg:x="3.033cm" svg:y="6.283cm" presentation:class="outline" presentation:user-transformed="true">
          <draw:text-box>
            <text:list text:style-name="L2">
              <text:list-item>
                <text:p>KAFKA_HEAP_OPTS peut être utilisée</text:p>
              </text:list-item>
              <text:list-item>
                <text:p>Heap size :</text:p>
                <text:list>
                  <text:list-item>
                    <text:p>-Xms4G -Xmx4G or -Xms6G -Xmx6G</text:p>
                  </text:list-item>
                </text:list>
              </text:list-item>
              <text:list-item>
                <text:p/>
              </text:list-item>
              <text:list-item>
                <text:p>Options JVM </text:p>
              </text:list-item>
              <text:list-item>
                <text:p>-XX:MetaspaceSize=96m -XX:+UseG1GC -XX:MaxGCPauseMillis=20</text:p>
              </text:list-item>
              <text:list-item>
                <text:p>-XX:InitiatingHeapOccupancyPercent=35 -XX:G1HeapRegionSize=16M</text:p>
              </text:list-item>
              <text:list-item>
                <text:p>-XX:MinMetaspaceFreeRatio=50 -XX:MaxMetaspaceFreeRatio=80</text:p>
              </text:list-item>
            </text:list>
          </draw:text-box>
        </draw:frame>
        <presentation:notes draw:style-name="dp2">
          <draw:page-thumbnail draw:style-name="gr2" draw:layer="layout" svg:width="15.597cm" svg:height="10.985cm" svg:x="2.623cm" svg:y="2.258cm" draw:page-number="223" presentation:class="page"/>
          <draw:frame presentation:style-name="pr6" draw:text-style-name="P13" draw:layer="layout" svg:width="14.362cm" svg:height="11.254cm" svg:x="3.25cm" svg:y="14.128cm" presentation:class="notes" presentation:placeholder="true">
            <draw:text-box/>
          </draw:frame>
        </presentation:notes>
      </draw:page>
      <draw:page draw:name="page224" draw:style-name="dp3" draw:master-page-name="Standard" presentation:presentation-page-layout-name="AL3T1">
        <draw:frame presentation:style-name="pr9" draw:layer="layout" svg:width="23.499cm" svg:height="3.575cm" svg:x="3.033cm" svg:y="2.367cm" presentation:class="title">
          <draw:text-box>
            <text:p>Dimensionnement cluster</text:p>
          </draw:text-box>
        </draw:frame>
        <draw:frame presentation:style-name="pr5" draw:layer="layout" svg:width="23.499cm" svg:height="12.18cm" svg:x="3.033cm" svg:y="6.283cm" presentation:class="outline" presentation:user-transformed="true">
          <draw:text-box>
            <text:list text:style-name="L2">
              <text:list-item>
                <text:p>Généralement basée sur les capacités de stockage :</text:p>
              </text:list-item>
              <text:list-item>
                <text:p><text:span text:style-name="T4">Nbre de msg-jour * Taille moyenne </text:span><text:span text:style-name="T4">* Rétention * Replication / </text:span><text:span text:style-name="T4">stockage par Broker</text:span></text:p>
              </text:list-item>
              <text:list-item>
                <text:p/>
              </text:list-item>
              <text:list-item>
                <text:p>Les ressources doivent être surveillées et le cluster doit être étendu plus de 70% est atteint pour :</text:p>
                <text:list>
                  <text:list-item>
                    <text:p>CPU</text:p>
                  </text:list-item>
                  <text:list-item>
                    <text:p>L’espace de stockage</text:p>
                  </text:list-item>
                  <text:list-item>
                    <text:p>La bande passante</text:p>
                  </text:list-item>
                </text:list>
              </text:list-item>
            </text:list>
          </draw:text-box>
        </draw:frame>
        <presentation:notes draw:style-name="dp2">
          <draw:page-thumbnail draw:style-name="gr2" draw:layer="layout" svg:width="15.597cm" svg:height="10.985cm" svg:x="2.623cm" svg:y="2.258cm" draw:page-number="224" presentation:class="page"/>
          <draw:frame presentation:style-name="pr6" draw:text-style-name="P13" draw:layer="layout" svg:width="14.362cm" svg:height="11.254cm" svg:x="3.25cm" svg:y="14.128cm" presentation:class="notes" presentation:placeholder="true">
            <draw:text-box/>
          </draw:frame>
        </presentation:notes>
      </draw:page>
      <draw:page draw:name="page225" draw:style-name="dp3" draw:master-page-name="Standard" presentation:presentation-page-layout-name="AL3T1">
        <draw:frame presentation:style-name="pr9" draw:layer="layout" svg:width="23.499cm" svg:height="3.575cm" svg:x="3.033cm" svg:y="2.367cm" presentation:class="title">
          <draw:text-box>
            <text:p>Contrôleur</text:p>
          </draw:text-box>
        </draw:frame>
        <draw:frame presentation:style-name="pr5" draw:layer="layout" svg:width="23.499cm" svg:height="12.18cm" svg:x="3.033cm" svg:y="6.283cm" presentation:class="outline">
          <draw:text-box>
            <text:list text:style-name="L2">
              <text:list-item>
                <text:p>Un nombre impair de serveurs <text:span text:style-name="T21">contrôleurs pour </text:span><text:span text:style-name="T21">le </text:span>Quorum </text:p>
                <text:list>
                  <text:list-item>
                    <text:p>3 nœuds permet une panne</text:p>
                  </text:list-item>
                  <text:list-item>
                    <text:p>5 nœuds permet 2 pannes </text:p>
                  </text:list-item>
                </text:list>
              </text:list-item>
            </text:list>
          </draw:text-box>
        </draw:frame>
        <presentation:notes draw:style-name="dp2">
          <draw:page-thumbnail draw:style-name="gr2" draw:layer="layout" svg:width="15.597cm" svg:height="10.985cm" svg:x="2.623cm" svg:y="2.258cm" draw:page-number="225" presentation:class="page"/>
          <draw:frame presentation:style-name="pr6" draw:text-style-name="P13" draw:layer="layout" svg:width="14.362cm" svg:height="11.254cm" svg:x="3.25cm" svg:y="14.128cm" presentation:class="notes" presentation:placeholder="true">
            <draw:text-box/>
          </draw:frame>
        </presentation:notes>
      </draw:page>
      <draw:page draw:name="page226" draw:style-name="dp3" draw:master-page-name="Standard" presentation:presentation-page-layout-name="AL3T1">
        <draw:frame presentation:style-name="pr9" draw:layer="layout" svg:width="23.499cm" svg:height="3.575cm" svg:x="3.033cm" svg:y="2.367cm" presentation:class="title">
          <draw:text-box>
            <text:p>Partitionnement des topics</text:p>
          </draw:text-box>
        </draw:frame>
        <draw:frame presentation:style-name="pr5" draw:layer="layout" svg:width="23.499cm" svg:height="12.18cm" svg:x="3.033cm" svg:y="6.283cm" presentation:class="outline" presentation:user-transformed="true">
          <draw:text-box>
            <text:list text:style-name="L2">
              <text:list-item>
                <text:p>Augmenter le nombre de partitions permet plus de consommateurs</text:p>
              </text:list-item>
              <text:list-item>
                <text:p>Mais augmente généralement la taille du cluster</text:p>
              </text:list-item>
              <text:list-item>
                <text:p>Évaluer l’utilisation d’un autre topic ?</text:p>
              </text:list-item>
              <text:list-item>
                <text:p/>
              </text:list-item>
              <text:list-item>
                <text:p>Généralement 24 est suffisant</text:p>
              </text:list-item>
            </text:list>
          </draw:text-box>
        </draw:frame>
        <presentation:notes draw:style-name="dp2">
          <draw:page-thumbnail draw:style-name="gr2" draw:layer="layout" svg:width="15.597cm" svg:height="10.985cm" svg:x="2.623cm" svg:y="2.258cm" draw:page-number="226" presentation:class="page"/>
          <draw:frame presentation:style-name="pr6" draw:text-style-name="P13" draw:layer="layout" svg:width="14.362cm" svg:height="11.254cm" svg:x="3.25cm" svg:y="14.128cm" presentation:class="notes" presentation:placeholder="true">
            <draw:text-box/>
          </draw:frame>
        </presentation:notes>
      </draw:page>
      <draw:page draw:name="page227"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Administration</text:span></text:p>
              </text:list-header>
            </text:list>
          </draw:text-box>
        </draw:frame>
        <draw:frame presentation:style-name="pr37" draw:text-style-name="P16" draw:layer="layout" svg:width="23.499cm" svg:height="12.18cm" svg:x="3.033cm" svg:y="6.283cm" presentation:class="subtitle">
          <draw:text-box>
            <text:list text:style-name="L1">
              <text:list-item>
                <text:p text:style-name="P28"><text:span text:style-name="T143"/></text:p>
              </text:list-item>
              <text:list-item>
                <text:p text:style-name="P28"><text:span text:style-name="T143"/></text:p>
              </text:list-item>
              <text:list-item>
                <text:p text:style-name="P19"><text:span text:style-name="T2">Gestion des topics</text:span></text:p>
              </text:list-item>
              <text:list-item>
                <text:p text:style-name="P28"><text:span text:style-name="T2">Stockage et rétention des partitions</text:span></text:p>
              </text:list-item>
              <text:list-item>
                <text:p text:style-name="P28"><text:span text:style-name="T13">Gestion du cluster</text:span></text:p>
              </text:list-item>
              <text:list-item>
                <text:p text:style-name="P19"><text:span text:style-name="T145">Dimensionnement</text:span></text:p>
              </text:list-item>
              <text:list-item>
                <text:p text:style-name="P19"><text:span text:style-name="T12">Monitoring</text:span></text:p>
              </text:list-item>
              <text:list-item>
                <text:p text:style-name="P28"><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28"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Un cluster Kafka peut gérer une quantité importante de données, il est important de monitorer pour maintenir des performances fiables des applications qui en dépendent.</text:p>
              </text:list-item>
              <text:list-item>
                <text:p>3 types de métriques sont à surveiller :</text:p>
                <text:list>
                  <text:list-item>
                    <text:p>Métriques des serveurs Kafka</text:p>
                    <text:list>
                      <text:list-item>
                        <text:p>Métriques JMX émis par Kafka</text:p>
                      </text:list-item>
                      <text:list-item>
                        <text:p>Métriques hôtes</text:p>
                      </text:list-item>
                      <text:list-item>
                        <text:p>Métriques JVM </text:p>
                      </text:list-item>
                    </text:list>
                  </text:list-item>
                  <text:list-item>
                    <text:p>Métriques des producteurs</text:p>
                  </text:list-item>
                  <text:list-item>
                    <text:p>Métriques des consommateurs</text:p>
                  </text:list-item>
                </text:list>
              </text:list-item>
            </text:list>
          </draw:text-box>
        </draw:frame>
        <presentation:notes draw:style-name="dp5">
          <draw:page-thumbnail draw:style-name="gr2" draw:layer="layout" svg:width="15.597cm" svg:height="10.985cm" svg:x="2.623cm" svg:y="2.258cm" draw:page-number="228" presentation:class="page"/>
          <draw:frame presentation:style-name="pr6" draw:text-style-name="P13" draw:layer="layout" svg:width="14.362cm" svg:height="11.254cm" svg:x="3.25cm" svg:y="14.128cm" presentation:class="notes" presentation:placeholder="true">
            <draw:text-box/>
          </draw:frame>
        </presentation:notes>
      </draw:page>
      <draw:page draw:name="page229" draw:style-name="dp3" draw:master-page-name="Standard" presentation:presentation-page-layout-name="AL3T1">
        <draw:frame presentation:style-name="pr11" draw:layer="layout" svg:width="23.499cm" svg:height="3.577cm" svg:x="3.033cm" svg:y="2.366cm" presentation:class="title">
          <draw:text-box>
            <text:p>Principaux métriques JMX des brokers</text:p>
          </draw:text-box>
        </draw:frame>
        <draw:frame draw:style-name="gr38" draw:layer="layout" svg:width="26.999cm" svg:height="10.653cm" svg:x="1.6cm" svg:y="6.283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bg-none">
              <table:table-cell>
                <text:p>Métrique</text:p>
              </table:table-cell>
              <table:table-cell>
                <text:p>Description</text:p>
              </table:table-cell>
              <table:table-cell>
                <text:p>Alerte</text:p>
              </table:table-cell>
            </table:table-row>
            <table:table-row table:style-name="ro2" table:default-cell-style-name="bg-none">
              <table:table-cell>
                <text:p><text:span text:style-name="T112">kafka.server:type=ReplicaManager,name=</text:span></text:p>
                <text:p><text:span text:style-name="T163">UnderReplicatedPartitions</text:span></text:p>
              </table:table-cell>
              <table:table-cell>
                <text:p>Nombre de partition sous-répliquée</text:p>
              </table:table-cell>
              <table:table-cell>
                <text:p>Si &gt; 0</text:p>
              </table:table-cell>
            </table:table-row>
            <table:table-row table:style-name="ro3" table:default-cell-style-name="bg-none">
              <table:table-cell table:style-name="ce1">
                <text:p text:style-name="P58"><text:span text:style-name="T164">kafka.controller:type=KafkaController,nam</text:span></text:p>
                <text:p text:style-name="P58"><text:span text:style-name="T164">e=</text:span><text:span text:style-name="T165">OfflinePartitionsCount</text:span></text:p>
              </table:table-cell>
              <table:table-cell>
                <text:p>Nombre de partitions qui n’ont pas de leader actif</text:p>
              </table:table-cell>
              <table:table-cell>
                <text:p>Si &gt; 0</text:p>
              </table:table-cell>
            </table:table-row>
            <table:table-row table:style-name="ro3" table:default-cell-style-name="bg-none">
              <table:table-cell table:style-name="ce1">
                <text:p text:style-name="P58"><text:span text:style-name="T164">kafka.controller:type=KafkaController,nam</text:span></text:p>
                <text:p text:style-name="P58"><text:span text:style-name="T164">e=</text:span><text:span text:style-name="T165">ActiveControllerCount</text:span></text:p>
              </table:table-cell>
              <table:table-cell>
                <text:p>Nombre de contrôleur actif dans le cluster</text:p>
              </table:table-cell>
              <table:table-cell>
                <text:p>Si!= 1</text:p>
              </table:table-cell>
            </table:table-row>
            <table:table-row table:style-name="ro3">
              <table:table-cell table:style-name="ce1">
                <text:p text:style-name="P58"><text:span text:style-name="T164">kafka.server:type=ReplicaFetcherManager,</text:span></text:p>
                <text:p text:style-name="P58"><text:span text:style-name="T164">name=</text:span><text:span text:style-name="T165">MaxLag</text:span><text:span text:style-name="T164">,clientId=Replica</text:span></text:p>
              </table:table-cell>
              <table:table-cell table:style-name="ce2">
                <text:p text:style-name="P59"><text:span text:style-name="T166">Retard maximal des messages entre</text:span></text:p>
                <text:p text:style-name="P59"><text:span text:style-name="T166">les répliques et le leader</text:span></text:p>
              </table:table-cell>
              <table:table-cell table:style-name="bg-none"/>
            </table:table-row>
            <table:table-row table:style-name="ro3">
              <table:table-cell table:style-name="ce1">
                <text:p text:style-name="P58"><text:span text:style-name="T164">kafka.server:type=ReplicaManager,name=</text:span><text:span text:style-name="T165">I</text:span></text:p>
                <text:p text:style-name="P58"><text:span text:style-name="T165">srShrinksPerSec/IsrExpandsPerSec</text:span></text:p>
              </table:table-cell>
              <table:table-cell table:style-name="ce2">
                <text:p text:style-name="P59"><text:span text:style-name="T166">Cadence de shrink/expansion des ISR</text:span></text:p>
              </table:table-cell>
              <table:table-cell table:style-name="bg-none">
                <text:p>Si!=0</text:p>
              </table:table-cell>
            </table:table-row>
          </table:table>
          <draw:image xlink:href="Pictures/TablePreview1.svm" xlink:type="simple" xlink:show="embed" xlink:actuate="onLoad"/>
        </draw:frame>
        <presentation:notes draw:style-name="dp5">
          <draw:page-thumbnail draw:style-name="gr2" draw:layer="layout" svg:width="15.597cm" svg:height="10.985cm" svg:x="2.623cm" svg:y="2.258cm" draw:page-number="229" presentation:class="page"/>
          <draw:frame presentation:style-name="pr6" draw:text-style-name="P13" draw:layer="layout" svg:width="14.362cm" svg:height="11.254cm" svg:x="3.25cm" svg:y="14.128cm" presentation:class="notes" presentation:placeholder="true">
            <draw:text-box/>
          </draw:frame>
        </presentation:notes>
      </draw:page>
      <draw:page draw:name="page230" draw:style-name="dp3" draw:master-page-name="Standard" presentation:presentation-page-layout-name="AL3T1">
        <draw:frame presentation:style-name="pr11" draw:layer="layout" svg:width="23.499cm" svg:height="3.577cm" svg:x="3.033cm" svg:y="2.366cm" presentation:class="title">
          <draw:text-box>
            <text:p>Principaux métriques JMX des brokers</text:p>
          </draw:text-box>
        </draw:frame>
        <draw:frame draw:style-name="gr38" draw:layer="layout" svg:width="26.999cm" svg:height="14.61cm" svg:x="1.6cm" svg:y="6.283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4" table:default-cell-style-name="bg-none">
              <table:table-cell>
                <text:p>Métrique</text:p>
              </table:table-cell>
              <table:table-cell>
                <text:p>Description</text:p>
              </table:table-cell>
              <table:table-cell>
                <text:p>Alerte</text:p>
              </table:table-cell>
            </table:table-row>
            <table:table-row table:style-name="ro5" table:default-cell-style-name="ce3">
              <table:table-cell table:style-name="bg-none">
                <text:p><text:span text:style-name="T112">kafka.controller:type=ControllerStats,name=</text:span><text:span text:style-name="T163">LeaderElectionRateAndTimeMs</text:span></text:p>
              </table:table-cell>
              <table:table-cell>
                <text:p text:style-name="P60"><text:span text:style-name="T112">Cadence d’élection de leaders</text:span></text:p>
              </table:table-cell>
              <table:table-cell>
                <text:p text:style-name="P61"><text:span text:style-name="T112">Si &gt; 0</text:span></text:p>
              </table:table-cell>
            </table:table-row>
            <table:table-row table:style-name="ro2" table:default-cell-style-name="ce3">
              <table:table-cell table:style-name="ce1">
                <text:p text:style-name="P58"><text:span text:style-name="T164">kafka.controller:type=ControllerStats,name=</text:span><text:span text:style-name="T165">UncleanLeaderElectionsPerSec</text:span></text:p>
                <text:p text:style-name="P58"><text:span text:style-name="T164"/></text:p>
              </table:table-cell>
              <table:table-cell>
                <text:p text:style-name="P61"><text:span text:style-name="T112">Cadence d’élection de leades parmi les répliques non synchronisée</text:span></text:p>
              </table:table-cell>
              <table:table-cell>
                <text:p text:style-name="P61"><text:span text:style-name="T112">Si &gt; 0</text:span></text:p>
              </table:table-cell>
            </table:table-row>
            <table:table-row table:style-name="ro2" table:default-cell-style-name="ce3">
              <table:table-cell table:style-name="ce1">
                <text:p text:style-name="P58"><text:span text:style-name="T164">kafka.network:type=RequestMetrics,name=</text:span><text:span text:style-name="T165">TotalTimeMs</text:span><text:span text:style-name="T164">,request={Produce|FetchConsumer|FetchFollower}</text:span></text:p>
              </table:table-cell>
              <table:table-cell>
                <text:p text:style-name="P61"><text:span text:style-name="T112">Total en ms pour les requêtes de production ou du fetch</text:span></text:p>
              </table:table-cell>
              <table:table-cell>
                <text:p text:style-name="P61"><text:span text:style-name="T112">Si changement significatif</text:span></text:p>
              </table:table-cell>
            </table:table-row>
            <table:table-row table:style-name="ro6">
              <table:table-cell table:style-name="ce1">
                <text:p text:style-name="P58"><text:span text:style-name="T164">kafka.network:type=RequestMetrics,name</text:span></text:p>
                <text:p text:style-name="P58"><text:span text:style-name="T164">=</text:span><text:span text:style-name="T165">RequestsPerSec</text:span><text:span text:style-name="T164">,request={Produce|Fetch</text:span></text:p>
                <text:p text:style-name="P58"><text:span text:style-name="T164">Consumer|FetchFollower}</text:span></text:p>
              </table:table-cell>
              <table:table-cell table:style-name="ce4">
                <text:p text:style-name="P62"><text:span text:style-name="T167">Nombre de requêtes par seconde, pour</text:span></text:p>
                <text:p text:style-name="P62"><text:span text:style-name="T167">produire et récupérer </text:span></text:p>
              </table:table-cell>
              <table:table-cell table:style-name="ce3">
                <text:p text:style-name="P61"><text:span text:style-name="T112">Si changement significatif</text:span></text:p>
              </table:table-cell>
            </table:table-row>
            <table:table-row table:style-name="ro7">
              <table:table-cell table:style-name="ce1">
                <text:p text:style-name="P58"><text:span text:style-name="T164">kafka.server:type=DelayedOperationPurgatory,delayedOperation=Produce,name=</text:span><text:span text:style-name="T165">PurgatorySize</text:span></text:p>
                <text:p text:style-name="P58"><text:span text:style-name="T164"/></text:p>
              </table:table-cell>
              <table:table-cell table:style-name="ce4">
                <text:p text:style-name="P62"><text:span text:style-name="T167">Nombre de requêtes d’émission <text:s/>en attente dans le purgatoire. !=0 lorsque acks=all </text:span></text:p>
              </table:table-cell>
              <table:table-cell table:style-name="ce3">
                <text:p text:style-name="P61"><text:span text:style-name="T112">Si élevé</text:span></text:p>
              </table:table-cell>
            </table:table-row>
            <table:table-row table:style-name="ro8">
              <table:table-cell table:style-name="ce1">
                <text:p text:style-name="P58"><text:span text:style-name="T164">kafka.server:type=BrokerTopicMetrics,name=</text:span><text:span text:style-name="T165">BytesInPerSec/BytesOutPerSec</text:span></text:p>
              </table:table-cell>
              <table:table-cell table:style-name="ce4">
                <text:p text:style-name="P62"><text:span text:style-name="T167">Débit In/Out du point de vue des clients</text:span></text:p>
              </table:table-cell>
              <table:table-cell table:style-name="ce3">
                <text:p text:style-name="P61"><text:span text:style-name="T112">Si pas bon, compression ?</text:span></text:p>
              </table:table-cell>
            </table:table-row>
          </table:table>
          <draw:image xlink:href="Pictures/TablePreview2.svm" xlink:type="simple" xlink:show="embed" xlink:actuate="onLoad"/>
        </draw:frame>
        <presentation:notes draw:style-name="dp5">
          <draw:page-thumbnail draw:style-name="gr2" draw:layer="layout" svg:width="15.597cm" svg:height="10.985cm" svg:x="2.623cm" svg:y="2.258cm" draw:page-number="230" presentation:class="page"/>
          <draw:frame presentation:style-name="pr6" draw:text-style-name="P13" draw:layer="layout" svg:width="14.362cm" svg:height="11.254cm" svg:x="3.25cm" svg:y="14.128cm" presentation:class="notes" presentation:placeholder="true">
            <draw:text-box/>
          </draw:frame>
        </presentation:notes>
      </draw:page>
      <draw:page draw:name="page231" draw:style-name="dp3" draw:master-page-name="Standard" presentation:presentation-page-layout-name="AL3T1">
        <draw:frame presentation:style-name="pr9" draw:layer="layout" svg:width="23.499cm" svg:height="3.575cm" svg:x="3.033cm" svg:y="2.367cm" presentation:class="title">
          <draw:text-box>
            <text:p>Métriques des hôtes</text:p>
          </draw:text-box>
        </draw:frame>
        <draw:frame presentation:style-name="pr5" draw:layer="layout" svg:width="23.499cm" svg:height="12.18cm" svg:x="3.033cm" svg:y="6.283cm" presentation:class="outline">
          <draw:text-box>
            <text:list text:style-name="L2">
              <text:list-item>
                <text:p>4 principaux métriques à surveiller :</text:p>
                <text:list>
                  <text:list-item>
                    <text:p><text:span text:style-name="T155">Page cache reads </text:span><text:span text:style-name="T155">ratio</text:span> : Ratio lecture page cache/disque, une valeur élevée équivaut à des meilleures performances. Si le taux de lecture reste inférieur à 80 %, pensez à ajouter des brokers.</text:p>
                  </text:list-item>
                  <text:list-item>
                    <text:p><text:span text:style-name="T155">Usage disque</text:span> : Surveiller le pourcentage utilisé et anticiper</text:p>
                  </text:list-item>
                  <text:list-item>
                    <text:p><text:span text:style-name="T155">Usage CPU</text:span> : Rarement la source du problème à part si usage intensif de la compression</text:p>
                  </text:list-item>
                  <text:list-item>
                    <text:p><text:span text:style-name="T155">Traffic réseau</text:span> : Une utilisation élevée peut être le symptôme d’une performance dégradée (retransmissions TCP, perte de paquets).</text:p>
                  </text:list-item>
                </text:list>
              </text:list-item>
            </text:list>
          </draw:text-box>
        </draw:frame>
        <presentation:notes draw:style-name="dp5">
          <draw:page-thumbnail draw:style-name="gr2" draw:layer="layout" svg:width="15.597cm" svg:height="10.985cm" svg:x="2.623cm" svg:y="2.258cm" draw:page-number="231" presentation:class="page"/>
          <draw:frame presentation:style-name="pr6" draw:text-style-name="P13" draw:layer="layout" svg:width="14.362cm" svg:height="11.254cm" svg:x="3.25cm" svg:y="14.128cm" presentation:class="notes" presentation:placeholder="true">
            <draw:text-box/>
          </draw:frame>
        </presentation:notes>
      </draw:page>
      <draw:page draw:name="page232" draw:style-name="dp3" draw:master-page-name="Standard" presentation:presentation-page-layout-name="AL3T1">
        <draw:frame presentation:style-name="pr9" draw:layer="layout" svg:width="23.499cm" svg:height="3.575cm" svg:x="3.033cm" svg:y="2.367cm" presentation:class="title">
          <draw:text-box>
            <text:p>Métriques JVM</text:p>
          </draw:text-box>
        </draw:frame>
        <draw:frame presentation:style-name="pr5" draw:layer="layout" svg:width="23.499cm" svg:height="12.18cm" svg:x="3.033cm" svg:y="6.283cm" presentation:class="outline" presentation:user-transformed="true">
          <draw:text-box>
            <text:list text:style-name="L2">
              <text:list-item>
                <text:p>Le principal métrique à surveiller concerne la collecte et les temps de pause qu’elle peut imposer.</text:p>
              </text:list-item>
              <text:list-item>
                <text:p>Les métriques JMX concernés sont :<text:line-break/><text:span text:style-name="T28">java.lang:type=GarbageCollector,na</text:span><text:span text:style-name="T28">me=G1 (Young|Old) Generation : </text:span><text:span text:style-name="T168">CollectionTime/CollectionCount</text:span></text:p>
              </text:list-item>
              <text:list-item>
                <text:p>Remède : Upgrade du JDK et de l’algorithme de collecte, Tuning des options JVM</text:p>
              </text:list-item>
            </text:list>
          </draw:text-box>
        </draw:frame>
        <presentation:notes draw:style-name="dp5">
          <draw:page-thumbnail draw:style-name="gr2" draw:layer="layout" svg:width="15.597cm" svg:height="10.985cm" svg:x="2.623cm" svg:y="2.258cm" draw:page-number="232" presentation:class="page"/>
          <draw:frame presentation:style-name="pr6" draw:text-style-name="P13" draw:layer="layout" svg:width="14.362cm" svg:height="11.254cm" svg:x="3.25cm" svg:y="14.128cm" presentation:class="notes" presentation:placeholder="true">
            <draw:text-box/>
          </draw:frame>
        </presentation:notes>
      </draw:page>
      <draw:page draw:name="page233" draw:style-name="dp3" draw:master-page-name="Standard" presentation:presentation-page-layout-name="AL3T1">
        <draw:frame presentation:style-name="pr9" draw:layer="layout" svg:width="23.499cm" svg:height="3.575cm" svg:x="3.033cm" svg:y="2.367cm" presentation:class="title">
          <draw:text-box>
            <text:p>Métriques producteur</text:p>
          </draw:text-box>
        </draw:frame>
        <draw:frame presentation:style-name="pr5" draw:layer="layout" svg:width="23.499cm" svg:height="12.18cm" svg:x="3.033cm" svg:y="6.283cm" presentation:class="outline">
          <draw:text-box>
            <text:list text:style-name="L2">
              <text:list-item>
                <text:p>Les processus de production expose des métriques JMX permettant de surveiller le débit :</text:p>
                <text:list>
                  <text:list-item>
                    <text:p><text:span text:style-name="T72">compression-rate-</text:span><text:span text:style-name="T72">avg</text:span> : Taux de compression moyen des lots envoyés<text:line-break/>=&gt; Plus c’est faible plus c’est performant. <text:line-break/>=&gt; Si cette métrique augmente, peut indiquer un problème avec la forme des données</text:p>
                  </text:list-item>
                  <text:list-item>
                    <text:p><text:span text:style-name="T72">response-rate </text:span>: Moyenne du nombre de réponses reçues par seconde<text:line-break/>Dépend de la configuration <text:span text:style-name="T14">ack</text:span></text:p>
                  </text:list-item>
                  <text:list-item>
                    <text:p><text:span text:style-name="T72">request-rate</text:span> : Moyenne du nombre de requêtes envoyées par seconde<text:line-break/>Un taux élevé sans limitation de quota peut surcharger les brokers</text:p>
                  </text:list-item>
                  <text:list-item>
                    <text:p><text:span text:style-name="T72">request-latency-avg</text:span> : Moyenne de la latence des requêtes en ms<text:line-break/>Dépendant de <text:span text:style-name="T14">linger.ms</text:span> et <text:span text:style-name="T14">batch.size </text:span></text:p>
                  </text:list-item>
                  <text:list-item>
                    <text:p>...</text:p>
                  </text:list-item>
                </text:list>
              </text:list-item>
            </text:list>
          </draw:text-box>
        </draw:frame>
        <presentation:notes draw:style-name="dp5">
          <draw:page-thumbnail draw:style-name="gr2" draw:layer="layout" svg:width="15.597cm" svg:height="10.985cm" svg:x="2.623cm" svg:y="2.258cm" draw:page-number="233" presentation:class="page"/>
          <draw:frame presentation:style-name="pr6" draw:text-style-name="P13" draw:layer="layout" svg:width="14.362cm" svg:height="11.254cm" svg:x="3.25cm" svg:y="14.128cm" presentation:class="notes" presentation:placeholder="true">
            <draw:text-box/>
          </draw:frame>
        </presentation:notes>
      </draw:page>
      <draw:page draw:name="page234" draw:style-name="dp3" draw:master-page-name="Standard" presentation:presentation-page-layout-name="AL3T1">
        <draw:frame presentation:style-name="pr9" draw:layer="layout" svg:width="23.499cm" svg:height="3.575cm" svg:x="3.033cm" svg:y="2.367cm" presentation:class="title">
          <draw:text-box>
            <text:p>Métriques producteur (2)</text:p>
          </draw:text-box>
        </draw:frame>
        <draw:frame presentation:style-name="pr5" draw:layer="layout" svg:width="23.499cm" svg:height="12.18cm" svg:x="3.033cm" svg:y="6.283cm" presentation:class="outline">
          <draw:text-box>
            <text:list text:style-name="L2">
              <text:list-item>
                <text:p/>
                <text:list>
                  <text:list-item>
                    <text:p><text:span text:style-name="T169">outgoing-byte-rate </text:span><text:span text:style-name="T35">: </text:span><text:span text:style-name="T35">Moyenne du nombre </text:span><text:span text:style-name="T35">d’octets envoyés par </text:span><text:span text:style-name="T35">seconde</text:span><text:span text:style-name="T35"><text:line-break/></text:span><text:span text:style-name="T35">Permet de déterminer si il </text:span><text:span text:style-name="T35">faut améliorer le réseau et à </text:span><text:span text:style-name="T35">identifier les sources de </text:span><text:span text:style-name="T35">trafic excessif.</text:span></text:p>
                  </text:list-item>
                  <text:list-item>
                    <text:p><text:span text:style-name="T169">io-wait-time-ns-avg</text:span><text:span text:style-name="T35"><text:tab/></text:span><text:span text:style-name="T35"> : </text:span><text:span text:style-name="T35">Moyenne du temps passé </text:span><text:span text:style-name="T35">par la thread d’IO en attente </text:span><text:span text:style-name="T35">de socket (en ns)</text:span><text:span text:style-name="T35"><text:tab/></text:span><text:span text:style-name="T35"><text:line-break/></text:span><text:span text:style-name="T35">Si excessif, peut être </text:span><text:span text:style-name="T35">améliorer les vitesses de </text:span><text:span text:style-name="T35">disques</text:span></text:p>
                  </text:list-item>
                  <text:list-item>
                    <text:p><text:span text:style-name="T169">batch-size-avg</text:span><text:span text:style-name="T35"><text:tab/></text:span><text:span text:style-name="T35"> : Le nombre </text:span><text:span text:style-name="T35">moyen d’octets envoyé par </text:span><text:span text:style-name="T35">requête</text:span><text:span text:style-name="T35"><text:line-break/></text:span><text:span text:style-name="T35">Si différent de la </text:span><text:span text:style-name="T35">configuration batch.size, </text:span><text:span text:style-name="T35">diminuer linger.ms</text:span></text:p>
                  </text:list-item>
                </text:list>
              </text:list-item>
            </text:list>
          </draw:text-box>
        </draw:frame>
        <presentation:notes draw:style-name="dp5">
          <draw:page-thumbnail draw:style-name="gr2" draw:layer="layout" svg:width="15.597cm" svg:height="10.985cm" svg:x="2.623cm" svg:y="2.258cm" draw:page-number="234" presentation:class="page"/>
          <draw:frame presentation:style-name="pr6" draw:text-style-name="P13" draw:layer="layout" svg:width="14.362cm" svg:height="11.254cm" svg:x="3.25cm" svg:y="14.128cm" presentation:class="notes" presentation:placeholder="true">
            <draw:text-box/>
          </draw:frame>
        </presentation:notes>
      </draw:page>
      <draw:page draw:name="page235" draw:style-name="dp3" draw:master-page-name="Standard" presentation:presentation-page-layout-name="AL3T1">
        <draw:frame presentation:style-name="pr9" draw:layer="layout" svg:width="23.499cm" svg:height="3.575cm" svg:x="3.033cm" svg:y="2.367cm" presentation:class="title">
          <draw:text-box>
            <text:p>Métriques consommateur</text:p>
          </draw:text-box>
        </draw:frame>
        <draw:frame presentation:style-name="pr5" draw:layer="layout" svg:width="23.499cm" svg:height="12.18cm" svg:x="3.033cm" svg:y="6.283cm" presentation:class="outline">
          <draw:text-box>
            <text:list text:style-name="L2">
              <text:list-item>
                <text:p text:style-name="P24">Les consommateurs expose des métriques JMX permettant de surveiller le débit et la performance :</text:p>
                <text:list>
                  <text:list-item>
                    <text:p><text:span text:style-name="T72">records-lag</text:span> : Retard par rapport à la production<text:line-break/>=&gt; Pb pour le temps-réel</text:p>
                  </text:list-item>
                  <text:list-item>
                    <text:p text:style-name="P38"><text:span text:style-name="T170">records-lag-max</text:span><text:span text:style-name="T47"> : </text:span><text:span text:style-name="T47">Retard Max</text:span><text:span text:style-name="T47"><text:line-break/></text:span>=&gt; Pb pour le temps-réel</text:p>
                  </text:list-item>
                  <text:list-item>
                    <text:p><text:span text:style-name="T72">bytes-consumed-</text:span><text:span text:style-name="T72">rate</text:span> : Nombre moyen d'octets consommés par seconde</text:p>
                  </text:list-item>
                  <text:list-item>
                    <text:p><text:span text:style-name="T72">records-consumed-</text:span><text:span text:style-name="T72">rate</text:span><text:span text:style-name="T47"> : </text:span>Nombre moyen de messages consommés par seconde</text:p>
                  </text:list-item>
                  <text:list-item>
                    <text:p><text:span text:style-name="T72">fetch-rate</text:span><text:tab/> : Nombre de requêtes fetch par secondes<text:line-break/>=&gt; Si tend vers zéro pb sur le consommateur</text:p>
                  </text:list-item>
                </text:list>
              </text:list-item>
            </text:list>
          </draw:text-box>
        </draw:frame>
        <presentation:notes draw:style-name="dp5">
          <draw:page-thumbnail draw:style-name="gr2" draw:layer="layout" svg:width="15.597cm" svg:height="10.985cm" svg:x="2.623cm" svg:y="2.258cm" draw:page-number="235" presentation:class="page"/>
          <draw:frame presentation:style-name="pr6" draw:text-style-name="P13" draw:layer="layout" svg:width="14.362cm" svg:height="11.254cm" svg:x="3.25cm" svg:y="14.128cm" presentation:class="notes" presentation:placeholder="true">
            <draw:text-box/>
          </draw:frame>
        </presentation:notes>
      </draw:page>
      <draw:page draw:name="page236" draw:style-name="dp3" draw:master-page-name="Standard" presentation:presentation-page-layout-name="AL3T1">
        <draw:frame presentation:style-name="pr9" draw:layer="layout" svg:width="23.499cm" svg:height="3.575cm" svg:x="3.033cm" svg:y="2.367cm" presentation:class="title">
          <draw:text-box>
            <text:p>Collecte et visualisation</text:p>
          </draw:text-box>
        </draw:frame>
        <draw:frame presentation:style-name="pr5" draw:layer="layout" svg:width="23.499cm" svg:height="12.18cm" svg:x="3.033cm" svg:y="6.283cm" presentation:class="outline">
          <draw:text-box>
            <text:list text:style-name="L2">
              <text:list-item>
                <text:p>Pour visualiser les métriques JMX de Kafka, plusieurs outils</text:p>
                <text:list>
                  <text:list-item>
                    <text:p>JConsole </text:p>
                  </text:list-item>
                  <text:list-item>
                    <text:p>API JMX</text:p>
                  </text:list-item>
                  <text:list-item>
                    <text:p>Burrow (LinkedIn) dédié aux consommateurs</text:p>
                  </text:list-item>
                  <text:list-item>
                    <text:p>Confluent Control Center</text:p>
                  </text:list-item>
                  <text:list-item>
                    <text:p>Graphite</text:p>
                  </text:list-item>
                  <text:list-item>
                    <text:p>DataDog</text:p>
                  </text:list-item>
                  <text:list-item>
                    <text:p>SMM of Data Flow (Hortonworks)</text:p>
                  </text:list-item>
                  <text:list-item>
                    <text:p>Prometheus / Grafana</text:p>
                  </text:list-item>
                </text:list>
              </text:list-item>
            </text:list>
          </draw:text-box>
        </draw:frame>
        <presentation:notes draw:style-name="dp5">
          <draw:page-thumbnail draw:style-name="gr2" draw:layer="layout" svg:width="15.597cm" svg:height="10.985cm" svg:x="2.623cm" svg:y="2.258cm" draw:page-number="236" presentation:class="page"/>
          <draw:frame presentation:style-name="pr6" draw:text-style-name="P13" draw:layer="layout" svg:width="14.362cm" svg:height="11.254cm" svg:x="3.25cm" svg:y="14.128cm" presentation:class="notes" presentation:placeholder="true">
            <draw:text-box/>
          </draw:frame>
        </presentation:notes>
      </draw:page>
      <draw:page draw:name="page237" draw:style-name="dp3" draw:master-page-name="Standard" presentation:presentation-page-layout-name="AL3T1">
        <draw:frame presentation:style-name="pr9" draw:layer="layout" svg:width="23.499cm" svg:height="3.575cm" svg:x="3.033cm" svg:y="2.367cm" presentation:class="title">
          <draw:text-box>
            <text:p>Prometheus/Grafana</text:p>
          </draw:text-box>
        </draw:frame>
        <draw:frame presentation:style-name="pr5" draw:layer="layout" svg:width="13.932cm" svg:height="12.18cm" svg:x="12.6cm" svg:y="6.283cm" presentation:class="outline" presentation:user-transformed="true">
          <draw:text-box>
            <text:list text:style-name="L2">
              <text:list-item>
                <text:p text:style-name="P24"><text:span text:style-name="T35">Exportateur JMX </text:span><text:span text:style-name="T35">https://github.com/prometheus/jmx_expo</text:span><text:span text:style-name="T35">rter/blob/master/example_configs/kafka-</text:span><text:span text:style-name="T35">2_0_0.yml</text:span></text:p>
              </text:list-item>
              <text:list-item>
                <text:p>Tdb Grafana dispo :<text:line-break/><text:span text:style-name="T35"><text:a xlink:href="https://grafana.com/grafana/dashboards/721" xlink:type="simple">https://grafana.com/grafana/dashboards/721</text:a></text:span></text:p>
              </text:list-item>
              <text:list-item>
                <text:p><text:span text:style-name="T35"/></text:p>
              </text:list-item>
              <text:list-item>
                <text:p><text:span text:style-name="T35"/></text:p>
              </text:list-item>
              <text:list-item>
                <text:p><text:span text:style-name="T35"/></text:p>
              </text:list-item>
              <text:list-item>
                <text:p><text:span text:style-name="T35"/></text:p>
              </text:list-item>
            </text:list>
          </draw:text-box>
        </draw:frame>
        <draw:frame draw:style-name="gr9" draw:text-style-name="P23" draw:layer="layout" svg:width="7.661cm" svg:height="12.403cm" svg:x="3.452cm" svg:y="6.4cm">
          <draw:image xlink:href="Pictures/10000001000001FD00000338D9B9BD2F.png" xlink:type="simple" xlink:show="embed" xlink:actuate="onLoad" draw:mime-type="image/png">
            <text:p/>
          </draw:image>
        </draw:frame>
        <draw:frame draw:style-name="gr39" draw:text-style-name="P34" draw:layer="layout" svg:width="18.985cm" svg:height="1.216cm" svg:x="1.71cm" svg:y="19.612cm">
          <draw:text-box>
            <text:p><text:span text:style-name="T73">Atelier 7.4 : Monitoring JMX et Promeheus/Grafana</text:span></text:p>
          </draw:text-box>
        </draw:frame>
        <presentation:notes draw:style-name="dp5">
          <draw:page-thumbnail draw:style-name="gr2" draw:layer="layout" svg:width="15.597cm" svg:height="10.985cm" svg:x="2.623cm" svg:y="2.258cm" draw:page-number="237" presentation:class="page"/>
          <draw:frame presentation:style-name="pr6" draw:text-style-name="P13" draw:layer="layout" svg:width="14.362cm" svg:height="11.254cm" svg:x="3.25cm" svg:y="14.128cm" presentation:class="notes" presentation:placeholder="true">
            <draw:text-box/>
          </draw:frame>
        </presentation:notes>
      </draw:page>
      <draw:page draw:name="page238" draw:style-name="dp3" draw:master-page-name="Standard" presentation:presentation-page-layout-name="AL1T0">
        <draw:frame presentation:style-name="pr9" draw:layer="layout" svg:width="23.499cm" svg:height="3.575cm" svg:x="3.033cm" svg:y="2.367cm" presentation:class="title">
          <draw:text-box>
            <text:p>Annexes</text:p>
          </draw:text-box>
        </draw:frame>
        <draw:frame presentation:style-name="pr38" draw:text-style-name="P13" draw:layer="layout" svg:width="23.499cm" svg:height="12.18cm" svg:x="3.033cm" svg:y="6.283cm" presentation:class="subtitle">
          <draw:text-box>
            <text:p><text:span text:style-name="T41">Apache Zookeeper</text:span></text:p>
            <text:p>Contrôleur et Zookeeper</text:p>
            <text:p text:style-name="P63">SASL SCRAM</text:p>
            <text:p text:style-name="P63">Dimensionnement ZooKeeper</text:p>
          </draw:text-box>
        </draw:frame>
        <presentation:notes draw:style-name="dp5">
          <draw:page-thumbnail draw:style-name="gr2" draw:layer="layout" svg:width="15.597cm" svg:height="10.985cm" svg:x="2.623cm" svg:y="2.258cm" draw:page-number="238" presentation:class="page"/>
          <draw:frame presentation:style-name="pr6" draw:text-style-name="P13" draw:layer="layout" svg:width="14.362cm" svg:height="11.254cm" svg:x="3.25cm" svg:y="14.128cm" presentation:class="notes" presentation:placeholder="true">
            <draw:text-box/>
          </draw:frame>
        </presentation:notes>
      </draw:page>
      <draw:page draw:name="page239" draw:style-name="dp3" draw:master-page-name="Standard" presentation:presentation-page-layout-name="AL3T1">
        <draw:frame presentation:style-name="pr9" draw:layer="layout" svg:width="23.499cm" svg:height="3.575cm" svg:x="3.033cm" svg:y="2.367cm" presentation:class="title">
          <draw:text-box>
            <text:p>Kafka et Zookeeper</text:p>
          </draw:text-box>
        </draw:frame>
        <draw:frame presentation:style-name="pr5" draw:layer="layout" svg:width="23.499cm" svg:height="12.18cm" svg:x="3.033cm" svg:y="6.283cm" presentation:class="outline" presentation:placeholder="true">
          <draw:text-box/>
        </draw:frame>
        <draw:frame draw:style-name="gr9" draw:text-style-name="P23" draw:layer="layout" svg:width="24.103cm" svg:height="12.276cm" svg:x="3.6cm" svg:y="7.4cm">
          <draw:image xlink:href="Pictures/100000010000038F000001D048BCFD06.png" xlink:type="simple" xlink:show="embed" xlink:actuate="onLoad" draw:mime-type="image/png">
            <text:p/>
          </draw:image>
        </draw:frame>
        <presentation:notes draw:style-name="dp5">
          <draw:page-thumbnail draw:style-name="gr2" draw:layer="layout" svg:width="15.597cm" svg:height="10.985cm" svg:x="2.623cm" svg:y="2.258cm" draw:page-number="239" presentation:class="page"/>
          <draw:frame presentation:style-name="pr6" draw:text-style-name="P13" draw:layer="layout" svg:width="14.362cm" svg:height="11.254cm" svg:x="3.25cm" svg:y="14.128cm" presentation:class="notes" presentation:placeholder="true">
            <draw:text-box/>
          </draw:frame>
        </presentation:notes>
      </draw:page>
      <draw:page draw:name="page240" draw:style-name="dp3" draw:master-page-name="Standard" presentation:presentation-page-layout-name="AL3T1">
        <draw:frame presentation:style-name="pr11" draw:layer="layout" svg:width="23.499cm" svg:height="3.577cm" svg:x="3.033cm" svg:y="2.366cm" presentation:class="title" presentation:user-transformed="true">
          <draw:text-box>
            <text:p>Zookeeper<text:line-break/>Principes</text:p>
          </draw:text-box>
        </draw:frame>
        <draw:frame presentation:style-name="pr5" draw:layer="layout" svg:width="23.499cm" svg:height="12.938cm" svg:x="3.033cm" svg:y="6.283cm" presentation:class="outline" presentation:user-transformed="true">
          <draw:text-box>
            <text:list text:style-name="L2">
              <text:list-item>
                <text:p>“<text:span text:style-name="T14">High-performance </text:span><text:span text:style-name="T14">coordination service for </text:span><text:span text:style-name="T14">distributed applications</text:span>”</text:p>
              </text:list-item>
              <text:list-item>
                <text:p>Utilisé par Kafka pour la gestion de configuration <text:s/>et la synchronisation</text:p>
              </text:list-item>
              <text:list-item>
                <text:p>Stocke les méta-données du cluster Kafka </text:p>
              </text:list-item>
              <text:list-item>
                <text:p>Répliqué sur plusieurs hôtes formant un <text:span text:style-name="T14">ensemble</text:span></text:p>
              </text:list-item>
              <text:list-item>
                <text:p>Fournit un espace de noms hiérarchiques</text:p>
              </text:list-item>
              <text:list-item>
                <text:p>Exemples de nœuds pour Kafka :</text:p>
                <text:list>
                  <text:list-item>
                    <text:p><text:span text:style-name="T171">/controller</text:span></text:p>
                  </text:list-item>
                  <text:list-item>
                    <text:p><text:span text:style-name="T171">/brokers/topics/</text:span></text:p>
                  </text:list-item>
                  <text:list-item>
                    <text:p><text:span text:style-name="T171">/config</text:span></text:p>
                  </text:list-item>
                </text:list>
              </text:list-item>
            </text:list>
          </draw:text-box>
        </draw:frame>
        <draw:frame draw:style-name="gr9" draw:text-style-name="P23" draw:layer="layout" svg:width="9.047cm" svg:height="6.249cm" svg:x="20.181cm" svg:y="13.284cm">
          <draw:image xlink:href="Pictures/100000010000024600000192222575E2.png" xlink:type="simple" xlink:show="embed" xlink:actuate="onLoad" draw:mime-type="image/png">
            <text:p/>
          </draw:image>
        </draw:frame>
        <presentation:notes draw:style-name="dp5">
          <draw:page-thumbnail draw:style-name="gr2" draw:layer="layout" svg:width="15.597cm" svg:height="10.985cm" svg:x="2.623cm" svg:y="2.258cm" draw:page-number="240" presentation:class="page"/>
          <draw:frame presentation:style-name="pr6" draw:text-style-name="P13" draw:layer="layout" svg:width="14.362cm" svg:height="11.254cm" svg:x="3.25cm" svg:y="14.128cm" presentation:class="notes" presentation:placeholder="true">
            <draw:text-box/>
          </draw:frame>
        </presentation:notes>
      </draw:page>
      <draw:page draw:name="page241" draw:style-name="dp3" draw:master-page-name="Standard" presentation:presentation-page-layout-name="AL3T1">
        <draw:frame presentation:style-name="pr9" draw:layer="layout" svg:width="23.499cm" svg:height="3.575cm" svg:x="3.033cm" svg:y="2.367cm" presentation:class="title">
          <draw:text-box>
            <text:p>Vocabulaire Zookeeper</text:p>
          </draw:text-box>
        </draw:frame>
        <draw:frame presentation:style-name="pr5" draw:layer="layout" svg:width="23.499cm" svg:height="12.18cm" svg:x="3.033cm" svg:y="6.283cm" presentation:class="outline" presentation:user-transformed="true">
          <draw:text-box>
            <text:list text:style-name="L2">
              <text:list-item>
                <text:p><text:span text:style-name="T172">Nœud (zNode)</text:span> : Donnée identifiée par un chemin </text:p>
              </text:list-item>
              <text:list-item>
                <text:p><text:span text:style-name="T172">Client</text:span> : Utilisateur du service Zookeeper </text:p>
              </text:list-item>
              <text:list-item>
                <text:p><text:span text:style-name="T172">Session</text:span> : Établie entre le client et le service Zookeeper</text:p>
              </text:list-item>
              <text:list-item>
                <text:p><text:span text:style-name="T172">Noeud</text:span> <text:span text:style-name="T172">éphémère</text:span> : le nœud existe aussi longtemps que la session qui l’a créé est active</text:p>
              </text:list-item>
              <text:list-item>
                <text:p><text:span text:style-name="T172">Watch</text:span> :</text:p>
                <text:list>
                  <text:list-item>
                    <text:p>Déclenché et supprimé lorsque le nœud change</text:p>
                  </text:list-item>
                  <text:list-item>
                    <text:p>Clients peuvent positionné un watch sur un nœud <text:span text:style-name="T14">znode</text:span></text:p>
                  </text:list-item>
                </text:list>
              </text:list-item>
            </text:list>
          </draw:text-box>
        </draw:frame>
        <presentation:notes draw:style-name="dp5">
          <draw:page-thumbnail draw:style-name="gr2" draw:layer="layout" svg:width="15.597cm" svg:height="10.985cm" svg:x="2.623cm" svg:y="2.258cm" draw:page-number="241" presentation:class="page"/>
          <draw:frame presentation:style-name="pr6" draw:text-style-name="P13" draw:layer="layout" svg:width="14.362cm" svg:height="11.254cm" svg:x="3.25cm" svg:y="14.128cm" presentation:class="notes" presentation:placeholder="true">
            <draw:text-box/>
          </draw:frame>
        </presentation:notes>
      </draw:page>
      <draw:page draw:name="page242" draw:style-name="dp3" draw:master-page-name="Standard" presentation:presentation-page-layout-name="AL3T1">
        <draw:frame presentation:style-name="pr11" draw:layer="layout" svg:width="23.499cm" svg:height="3.577cm" svg:x="3.033cm" svg:y="2.366cm" presentation:class="title" presentation:user-transformed="true">
          <draw:text-box>
            <text:p><text:span text:style-name="T14">Zookeeper</text:span><text:span text:style-name="T14"><text:line-break/></text:span><text:span text:style-name="T21">Distribution</text:span></text:p>
          </draw:text-box>
        </draw:frame>
        <draw:frame presentation:style-name="pr5" draw:layer="layout" svg:width="23.499cm" svg:height="12.18cm" svg:x="3.033cm" svg:y="6.283cm" presentation:class="outline" presentation:user-transformed="true">
          <draw:text-box>
            <text:list text:style-name="L2">
              <text:list-item>
                <text:p><text:span text:style-name="T4">Kafka contient des scripts </text:span><text:span text:style-name="T4">permettant de démarrer une </text:span><text:span text:style-name="T4">instance de Zookeeper mais il </text:span><text:span text:style-name="T4">est préférable d’installer une </text:span><text:span text:style-name="T4">version complète à partir de la </text:span><text:span text:style-name="T4">distribution officielle de </text:span><text:span text:style-name="T94">Zookeeper</text:span></text:p>
              </text:list-item>
              <text:list-item>
                <text:p><text:span text:style-name="T94"/></text:p>
              </text:list-item>
              <text:list-item>
                <text:p><text:span text:style-name="T94">https://zookeeper.apache.org/</text:span></text:p>
              </text:list-item>
              <text:list-item>
                <text:p><text:span text:style-name="T107"/></text:p>
              </text:list-item>
              <text:list-item>
                <text:p text:style-name="P33"><text:span text:style-name="T133"/></text:p>
              </text:list-item>
            </text:list>
          </draw:text-box>
        </draw:frame>
        <presentation:notes draw:style-name="dp5">
          <draw:page-thumbnail draw:style-name="gr2" draw:layer="layout" svg:width="15.597cm" svg:height="10.985cm" svg:x="2.623cm" svg:y="2.258cm" draw:page-number="242" presentation:class="page"/>
          <draw:frame presentation:style-name="pr6" draw:text-style-name="P13" draw:layer="layout" svg:width="14.362cm" svg:height="11.254cm" svg:x="3.25cm" svg:y="14.128cm" presentation:class="notes" presentation:placeholder="true">
            <draw:text-box/>
          </draw:frame>
        </presentation:notes>
      </draw:page>
      <draw:page draw:name="page243" draw:style-name="dp3" draw:master-page-name="Standard" presentation:presentation-page-layout-name="AL3T1">
        <draw:frame presentation:style-name="pr11" draw:layer="layout" svg:width="23.499cm" svg:height="3.577cm" svg:x="3.033cm" svg:y="2.366cm" presentation:class="title">
          <draw:text-box>
            <text:p>Exemple installation standalone</text:p>
          </draw:text-box>
        </draw:frame>
        <draw:frame presentation:style-name="pr5" draw:layer="layout" svg:width="23.499cm" svg:height="12.18cm" svg:x="3.033cm" svg:y="6.283cm" presentation:class="outline" presentation:user-transformed="true">
          <draw:text-box>
            <text:list text:style-name="L2">
              <text:list-item>
                <text:p text:style-name="P56"><text:span text:style-name="T133"># tar -zxf zookeeper-3.4.6.tar.gz</text:span></text:p>
              </text:list-item>
              <text:list-item>
                <text:p text:style-name="P56"><text:span text:style-name="T133"># mv zookeeper-3.4.6 </text:span><text:span text:style-name="T133">/usr/local/zookeeper</text:span></text:p>
              </text:list-item>
              <text:list-item>
                <text:p text:style-name="P56"><text:span text:style-name="T133"># mkdir -p /var/lib/zookeeper</text:span></text:p>
              </text:list-item>
              <text:list-item>
                <text:p text:style-name="P56"><text:span text:style-name="T133"># cat &gt; </text:span><text:span text:style-name="T133">/usr/local/zookeeper/conf/zoo.cfg </text:span><text:span text:style-name="T133">&lt;&lt; EOF</text:span></text:p>
              </text:list-item>
              <text:list-item>
                <text:p text:style-name="P56"><text:span text:style-name="T133">&gt; tickTime=2000</text:span></text:p>
              </text:list-item>
              <text:list-item>
                <text:p text:style-name="P56"><text:span text:style-name="T133">&gt; dataDir=/var/lib/zookeeper</text:span></text:p>
              </text:list-item>
              <text:list-item>
                <text:p text:style-name="P56"><text:span text:style-name="T133">&gt; clientPort=2181</text:span></text:p>
              </text:list-item>
              <text:list-item>
                <text:p text:style-name="P56"><text:span text:style-name="T133">&gt; EOF</text:span></text:p>
              </text:list-item>
              <text:list-item>
                <text:p text:style-name="P56"><text:span text:style-name="T133"># export </text:span><text:span text:style-name="T133">JAVA_HOME=/usr/java/jdk1.8.0_51</text:span></text:p>
              </text:list-item>
              <text:list-item>
                <text:p text:style-name="P33"><text:span text:style-name="T173"># </text:span><text:span text:style-name="T173">/usr/local/zookeeper/bin/zkServer</text:span><text:span text:style-name="T173">.sh start</text:span></text:p>
              </text:list-item>
              <text:list-item>
                <text:p text:style-name="P56"><text:span text:style-name="T133">JMX enabled by default</text:span></text:p>
              </text:list-item>
              <text:list-item>
                <text:p text:style-name="P56"><text:span text:style-name="T133">Using config: </text:span><text:span text:style-name="T133">/usr/local/zookeeper/bin/../conf/</text:span><text:span text:style-name="T133">zoo.cfg</text:span></text:p>
              </text:list-item>
              <text:list-item>
                <text:p text:style-name="P56"><text:span text:style-name="T133">Starting zookeeper ... STARTED</text:span></text:p>
              </text:list-item>
              <text:list-item>
                <text:p><text:span text:style-name="T133">#</text:span></text:p>
              </text:list-item>
            </text:list>
          </draw:text-box>
        </draw:frame>
        <presentation:notes draw:style-name="dp5">
          <draw:page-thumbnail draw:style-name="gr2" draw:layer="layout" svg:width="15.597cm" svg:height="10.985cm" svg:x="2.623cm" svg:y="2.258cm" draw:page-number="243" presentation:class="page"/>
          <draw:frame presentation:style-name="pr6" draw:text-style-name="P13" draw:layer="layout" svg:width="14.362cm" svg:height="11.254cm" svg:x="3.25cm" svg:y="14.128cm" presentation:class="notes" presentation:placeholder="true">
            <draw:text-box/>
          </draw:frame>
        </presentation:notes>
      </draw:page>
      <draw:page draw:name="page244" draw:style-name="dp3" draw:master-page-name="Standard" presentation:presentation-page-layout-name="AL3T1">
        <draw:frame presentation:style-name="pr9" draw:layer="layout" svg:width="23.499cm" svg:height="3.575cm" svg:x="3.033cm" svg:y="2.367cm" presentation:class="title">
          <draw:text-box>
            <text:p>Vérification Zookeeper</text:p>
          </draw:text-box>
        </draw:frame>
        <draw:frame presentation:style-name="pr5" draw:text-style-name="P39" draw:layer="layout" svg:width="23.499cm" svg:height="12.18cm" svg:x="3.033cm" svg:y="6.283cm" presentation:class="outline" presentation:user-transformed="true">
          <draw:text-box>
            <text:list text:style-name="L2">
              <text:list-item>
                <text:p text:style-name="P33"><text:span text:style-name="T97"># </text:span><text:span text:style-name="T174">telnet localhost 2181</text:span></text:p>
              </text:list-item>
              <text:list-item>
                <text:p text:style-name="P33"><text:span text:style-name="T97">Trying ::1...</text:span></text:p>
              </text:list-item>
              <text:list-item>
                <text:p text:style-name="P33"><text:span text:style-name="T97">Connected to localhost.</text:span></text:p>
              </text:list-item>
              <text:list-item>
                <text:p text:style-name="P33"><text:span text:style-name="T97">Escape character is </text:span><text:span text:style-name="T97">'^]'.</text:span></text:p>
              </text:list-item>
              <text:list-item>
                <text:p text:style-name="P33"><text:span text:style-name="T174">srvr</text:span></text:p>
              </text:list-item>
              <text:list-item>
                <text:p text:style-name="P33"><text:span text:style-name="T97">Zookeeper version: </text:span><text:span text:style-name="T97">3.4.6-1569965, built </text:span><text:span text:style-name="T97">on 02/20/2014 09:09 </text:span><text:span text:style-name="T97">GMT</text:span></text:p>
              </text:list-item>
              <text:list-item>
                <text:p text:style-name="P33"><text:span text:style-name="T97">Latency min/avg/max: </text:span><text:span text:style-name="T97">0/0/0</text:span></text:p>
              </text:list-item>
              <text:list-item>
                <text:p text:style-name="P33"><text:span text:style-name="T97">Received: 1</text:span></text:p>
              </text:list-item>
              <text:list-item>
                <text:p text:style-name="P33"><text:span text:style-name="T97">Sent: 0</text:span></text:p>
              </text:list-item>
              <text:list-item>
                <text:p text:style-name="P33"><text:span text:style-name="T97">Connections: 1</text:span></text:p>
              </text:list-item>
              <text:list-item>
                <text:p text:style-name="P33"><text:span text:style-name="T97">Outstanding: 0</text:span></text:p>
              </text:list-item>
              <text:list-item>
                <text:p text:style-name="P33"><text:span text:style-name="T97">Zxid: 0x0</text:span></text:p>
              </text:list-item>
              <text:list-item>
                <text:p text:style-name="P33"><text:span text:style-name="T97">Mode: standalone</text:span></text:p>
              </text:list-item>
              <text:list-item>
                <text:p text:style-name="P33"><text:span text:style-name="T97">Node count: 4</text:span></text:p>
              </text:list-item>
              <text:list-item>
                <text:p text:style-name="P33"><text:span text:style-name="T97">Connection closed by </text:span><text:span text:style-name="T97">foreign host.</text:span></text:p>
              </text:list-item>
              <text:list-item>
                <text:p text:style-name="P33"><text:span text:style-name="T97">#</text:span></text:p>
              </text:list-item>
            </text:list>
          </draw:text-box>
        </draw:frame>
        <presentation:notes draw:style-name="dp5">
          <draw:page-thumbnail draw:style-name="gr2" draw:layer="layout" svg:width="15.597cm" svg:height="10.985cm" svg:x="2.623cm" svg:y="2.258cm" draw:page-number="244" presentation:class="page"/>
          <draw:frame presentation:style-name="pr6" draw:text-style-name="P13" draw:layer="layout" svg:width="14.362cm" svg:height="11.254cm" svg:x="3.25cm" svg:y="14.128cm" presentation:class="notes" presentation:placeholder="true">
            <draw:text-box/>
          </draw:frame>
        </presentation:notes>
      </draw:page>
      <draw:page draw:name="page245" draw:style-name="dp3" draw:master-page-name="Standard" presentation:presentation-page-layout-name="AL3T1">
        <draw:frame presentation:style-name="pr9" draw:layer="layout" svg:width="23.499cm" svg:height="3.575cm" svg:x="3.033cm" svg:y="2.367cm" presentation:class="title">
          <draw:text-box>
            <text:p>Ensemble Zookeeper</text:p>
          </draw:text-box>
        </draw:frame>
        <draw:frame presentation:style-name="pr5" draw:layer="layout" svg:width="23.499cm" svg:height="12.18cm" svg:x="3.033cm" svg:y="6.283cm" presentation:class="outline">
          <draw:text-box>
            <text:list text:style-name="L2">
              <text:list-item>
                <text:p>Un cluster Zookeeper est appelé un <text:span text:style-name="T40">ensemble</text:span></text:p>
              </text:list-item>
              <text:list-item>
                <text:p>Une instance est élue comme <text:span text:style-name="T32">leader</text:span></text:p>
              </text:list-item>
              <text:list-item>
                <text:p>L’ensemble contient un nombre impair d’instances (algorithme de consensus basé sur la notion de quorum). </text:p>
                <text:list>
                  <text:list-item>
                    <text:p>Le nombre dépend du niveau de tolérance aux pannes voulu :</text:p>
                    <text:list>
                      <text:list-item>
                        <text:p>3 nœuds =&gt; 1 défaillance</text:p>
                      </text:list-item>
                      <text:list-item>
                        <text:p>5 nœuds =&gt; 2 défaillances</text:p>
                      </text:list-item>
                    </text:list>
                  </text:list-item>
                </text:list>
              </text:list-item>
              <text:list-item>
                <text:p>Les clients peuvent s’adresser à n’importe quelle instance pour lire/écrire les données</text:p>
              </text:list-item>
              <text:list-item>
                <text:p>Lors d’une écriture, le <text:span text:style-name="T14">leader</text:span> coordonne les écritures sur les <text:span text:style-name="T14">followers</text:span></text:p>
              </text:list-item>
            </text:list>
          </draw:text-box>
        </draw:frame>
        <presentation:notes draw:style-name="dp5">
          <draw:page-thumbnail draw:style-name="gr2" draw:layer="layout" svg:width="15.597cm" svg:height="10.985cm" svg:x="2.623cm" svg:y="2.258cm" draw:page-number="245" presentation:class="page"/>
          <draw:frame presentation:style-name="pr6" draw:text-style-name="P13" draw:layer="layout" svg:width="14.362cm" svg:height="11.254cm" svg:x="3.25cm" svg:y="14.128cm" presentation:class="notes" presentation:placeholder="true">
            <draw:text-box/>
          </draw:frame>
        </presentation:notes>
      </draw:page>
      <draw:page draw:name="page246" draw:style-name="dp6" draw:master-page-name="Standard" presentation:presentation-page-layout-name="AL3T1">
        <draw:frame presentation:style-name="pr9" draw:layer="layout" svg:width="23.499cm" svg:height="3.575cm" svg:x="3.033cm" svg:y="2.367cm" presentation:class="title">
          <draw:text-box>
            <text:p>Architecture <text:span text:style-name="T14">ZooKeeper</text:span></text:p>
          </draw:text-box>
        </draw:frame>
        <draw:frame presentation:style-name="pr5" draw:layer="layout" svg:width="23.499cm" svg:height="12.18cm" svg:x="3.033cm" svg:y="6.283cm" presentation:class="outline" presentation:placeholder="true">
          <draw:text-box/>
        </draw:frame>
        <draw:frame draw:style-name="gr40" draw:text-style-name="P21" draw:layer="layout" svg:width="14.6cm" svg:height="11.266cm" svg:x="7cm" svg:y="6.6cm">
          <draw:image xlink:href="Pictures/1000000100000258000001CFDA410BBD.png" xlink:type="simple" xlink:show="embed" xlink:actuate="onLoad" draw:mime-type="image/png">
            <text:p/>
          </draw:image>
        </draw:frame>
        <presentation:notes draw:style-name="dp4">
          <draw:page-thumbnail draw:style-name="gr2" draw:layer="layout" svg:width="15.597cm" svg:height="10.985cm" svg:x="2.623cm" svg:y="2.258cm" draw:page-number="246" presentation:class="page"/>
          <draw:frame presentation:style-name="pr6" draw:text-style-name="P13" draw:layer="layout" svg:width="14.362cm" svg:height="11.254cm" svg:x="3.25cm" svg:y="14.128cm" presentation:class="notes" presentation:placeholder="true">
            <draw:text-box/>
          </draw:frame>
        </presentation:notes>
      </draw:page>
      <draw:page draw:name="page247" draw:style-name="dp3" draw:master-page-name="Standard" presentation:presentation-page-layout-name="AL3T1">
        <draw:frame presentation:style-name="pr9" draw:layer="layout" svg:width="23.499cm" svg:height="3.575cm" svg:x="3.033cm" svg:y="2.367cm" presentation:class="title">
          <draw:text-box>
            <text:p>Propriétés de config</text:p>
          </draw:text-box>
        </draw:frame>
        <draw:frame presentation:style-name="pr5" draw:layer="layout" svg:width="23.499cm" svg:height="12.18cm" svg:x="3.033cm" svg:y="6.283cm" presentation:class="outline" presentation:user-transformed="true">
          <draw:text-box>
            <text:list text:style-name="L2">
              <text:list-item>
                <text:p><text:span text:style-name="T31">tickTime : </text:span>L’unité<text:span text:style-name="T31"> </text:span>de temps en ms</text:p>
              </text:list-item>
              <text:list-item>
                <text:p><text:span text:style-name="T31">initLimit </text:span>: nombre de tick autorisé pour la connexion des suiveurs au leader</text:p>
              </text:list-item>
              <text:list-item>
                <text:p><text:span text:style-name="T31">syncLimit </text:span>: nombre de tick autorisé pour la synchronisation suiveur/leader</text:p>
              </text:list-item>
              <text:list-item>
                <text:p><text:span text:style-name="T31">dataDir</text:span> : Répertoire de stockage des données</text:p>
              </text:list-item>
              <text:list-item>
                <text:p><text:span text:style-name="T31">clientPort</text:span> : Port utilisé par les clients</text:p>
              </text:list-item>
              <text:list-item>
                <text:p>La configuration répertorie également chaque sous la forme :<text:line-break/> <text:span text:style-name="T14">server.X = nom d'hôte: </text:span><text:span text:style-name="T14">peerPort: leaderPort</text:span></text:p>
                <text:list>
                  <text:list-item>
                    <text:p><text:span text:style-name="T31">X</text:span> : numéro d'identification du serveur.</text:p>
                  </text:list-item>
                  <text:list-item>
                    <text:p><text:span text:style-name="T31">nom</text:span> <text:span text:style-name="T31">d'hôte</text:span> : IP</text:p>
                  </text:list-item>
                  <text:list-item>
                    <text:p><text:span text:style-name="T31">peerPort</text:span> : Port TCP pour communication entre serveurs </text:p>
                  </text:list-item>
                  <text:list-item>
                    <text:p><text:span text:style-name="T31">leaderPort</text:span> : Port TCP pour l’élection.</text:p>
                  </text:list-item>
                </text:list>
              </text:list-item>
            </text:list>
            <text:p/>
            <text:p>Optionnel : </text:p>
            <text:p><text:span text:style-name="T31">4lw.commands.whitelist</text:span> : Les commandes d’administration autorisées </text:p>
          </draw:text-box>
        </draw:frame>
        <presentation:notes draw:style-name="dp5">
          <draw:page-thumbnail draw:style-name="gr2" draw:layer="layout" svg:width="15.597cm" svg:height="10.985cm" svg:x="2.623cm" svg:y="2.258cm" draw:page-number="247" presentation:class="page"/>
          <draw:frame presentation:style-name="pr6" draw:text-style-name="P18" draw:layer="layout" svg:width="14.362cm" svg:height="11.254cm" svg:x="3.25cm" svg:y="14.128cm" presentation:class="notes" presentation:placeholder="true">
            <draw:text-box/>
          </draw:frame>
        </presentation:notes>
      </draw:page>
      <draw:page draw:name="page248" draw:style-name="dp3" draw:master-page-name="Standard" presentation:presentation-page-layout-name="AL3T1">
        <draw:frame presentation:style-name="pr9" draw:layer="layout" svg:width="23.499cm" svg:height="3.575cm" svg:x="3.033cm" svg:y="2.367cm" presentation:class="title">
          <draw:text-box>
            <text:p>Configuration d’un ensemble</text:p>
          </draw:text-box>
        </draw:frame>
        <draw:frame presentation:style-name="pr5" draw:layer="layout" svg:width="23.499cm" svg:height="12.18cm" svg:x="3.033cm" svg:y="6.283cm" presentation:class="outline" presentation:user-transformed="true">
          <draw:text-box>
            <text:list text:style-name="L2">
              <text:list-item>
                <text:p>Les serveurs doivent partager une configuration commune listant les serveurs et chaque serveur doit contenir un fichier <text:span text:style-name="T32">myid</text:span> dans son répertoire de données contenant son identifiant</text:p>
              </text:list-item>
              <text:list-item>
                <text:p/>
              </text:list-item>
              <text:list-item>
                <text:p>Exemple de config :</text:p>
              </text:list-item>
              <text:list-item>
                <text:p text:style-name="P33"><text:span text:style-name="T61">tickTime=2000</text:span></text:p>
              </text:list-item>
              <text:list-item>
                <text:p text:style-name="P33"><text:span text:style-name="T61">dataDir=/var/lib/zookeeper</text:span></text:p>
              </text:list-item>
              <text:list-item>
                <text:p text:style-name="P33"><text:span text:style-name="T61">clientPort=2181</text:span></text:p>
              </text:list-item>
              <text:list-item>
                <text:p text:style-name="P33"><text:span text:style-name="T61">initLimit=20</text:span></text:p>
              </text:list-item>
              <text:list-item>
                <text:p text:style-name="P33"><text:span text:style-name="T61">syncLimit=5</text:span></text:p>
              </text:list-item>
              <text:list-item>
                <text:p text:style-name="P33"><text:span text:style-name="T61">server.1=zoo1.example.com:2888:3888</text:span></text:p>
              </text:list-item>
              <text:list-item>
                <text:p text:style-name="P33"><text:span text:style-name="T61">server.2=zoo2.example.com:2888:3888</text:span></text:p>
              </text:list-item>
              <text:list-item>
                <text:p text:style-name="P33"><text:span text:style-name="T61">server.3=zoo3.example.com:2888:3888</text:span></text:p>
              </text:list-item>
            </text:list>
          </draw:text-box>
        </draw:frame>
        <presentation:notes draw:style-name="dp5">
          <draw:page-thumbnail draw:style-name="gr2" draw:layer="layout" svg:width="15.597cm" svg:height="10.985cm" svg:x="2.623cm" svg:y="2.258cm" draw:page-number="248" presentation:class="page"/>
          <draw:frame presentation:style-name="pr6" draw:text-style-name="P13" draw:layer="layout" svg:width="14.362cm" svg:height="11.254cm" svg:x="3.25cm" svg:y="14.128cm" presentation:class="notes" presentation:placeholder="true">
            <draw:text-box/>
          </draw:frame>
        </presentation:notes>
      </draw:page>
      <draw:page draw:name="page249" draw:style-name="dp3" draw:master-page-name="Standard" presentation:presentation-page-layout-name="AL3T1">
        <draw:frame presentation:style-name="pr11" draw:layer="layout" svg:width="23.499cm" svg:height="3.577cm" svg:x="3.033cm" svg:y="2.366cm" presentation:class="title">
          <draw:text-box>
            <text:p>Vérifications Ensemble Zookeeper</text:p>
          </draw:text-box>
        </draw:frame>
        <draw:frame presentation:style-name="pr5" draw:layer="layout" svg:width="23.499cm" svg:height="12.18cm" svg:x="3.033cm" svg:y="6.283cm" presentation:class="outline">
          <draw:text-box>
            <text:list text:style-name="L2">
              <text:list-item>
                <text:p>Se connecter à une instance :</text:p>
              </text:list-item>
              <text:list-item>
                <text:p><text:span text:style-name="T67">./zkCli.sh -server </text:span><text:span text:style-name="T67">127.0.0.1:2181</text:span></text:p>
              </text:list-item>
              <text:list-item>
                <text:p>Voir le mode (leader ou suiveur) d’une instance <text:line-break/><text:span text:style-name="T4">si la commande </text:span><text:span text:style-name="T94">stat</text:span><text:span text:style-name="T4"> est </text:span><text:span text:style-name="T4">autorisée</text:span> </text:p>
              </text:list-item>
              <text:list-item>
                <text:p><text:span text:style-name="T151">echo stat | nc localhost 2181 </text:span><text:span text:style-name="T151">| grep Mode</text:span></text:p>
              </text:list-item>
              <text:list-item>
                <text:p/>
              </text:list-item>
            </text:list>
          </draw:text-box>
        </draw:frame>
        <presentation:notes draw:style-name="dp5">
          <draw:page-thumbnail draw:style-name="gr2" draw:layer="layout" svg:width="15.597cm" svg:height="10.985cm" svg:x="2.623cm" svg:y="2.258cm" draw:page-number="249" presentation:class="page"/>
          <draw:frame presentation:style-name="pr6" draw:text-style-name="P13" draw:layer="layout" svg:width="14.362cm" svg:height="11.254cm" svg:x="3.25cm" svg:y="14.128cm" presentation:class="notes" presentation:placeholder="true">
            <draw:text-box/>
          </draw:frame>
        </presentation:notes>
      </draw:page>
      <draw:page draw:name="page250" draw:style-name="dp3" draw:master-page-name="Standard" presentation:presentation-page-layout-name="AL3T1">
        <draw:frame presentation:style-name="pr9" draw:layer="layout" svg:width="23.499cm" svg:height="3.575cm" svg:x="3.033cm" svg:y="2.367cm" presentation:class="title">
          <draw:text-box>
            <text:p>Quelques commandes</text:p>
          </draw:text-box>
        </draw:frame>
        <draw:frame presentation:style-name="pr5" draw:text-style-name="P64" draw:layer="layout" svg:width="23.499cm" svg:height="12.18cm" svg:x="3.033cm" svg:y="6.283cm" presentation:class="outline">
          <draw:text-box>
            <text:list text:style-name="L2">
              <text:list-item>
                <text:p text:style-name="P64"><text:span text:style-name="T175">ls [path] </text:span><text:span text:style-name="T4">: Lister un </text:span><text:span text:style-name="T94">zNode</text:span></text:p>
              </text:list-item>
              <text:list-item>
                <text:p text:style-name="P64"><text:span text:style-name="T175">create [zNode]</text:span><text:span text:style-name="T4"> : Créer un nœud</text:span></text:p>
              </text:list-item>
              <text:list-item>
                <text:p text:style-name="P64"><text:span text:style-name="T175">delete/deleteall</text:span><text:span text:style-name="T4"> : Suppression </text:span><text:span text:style-name="T4">(récursive) d’un nœud</text:span></text:p>
              </text:list-item>
              <text:list-item>
                <text:p text:style-name="P64"><text:span text:style-name="T175">get/set [zNode] </text:span><text:span text:style-name="T4">: Lire/écrire la </text:span><text:span text:style-name="T4">valeur du nœud</text:span></text:p>
              </text:list-item>
              <text:list-item>
                <text:p text:style-name="P64"><text:span text:style-name="T175">history</text:span><text:span text:style-name="T4"> : Historique des </text:span><text:span text:style-name="T4">commandes</text:span></text:p>
              </text:list-item>
              <text:list-item>
                <text:p text:style-name="P64"><text:span text:style-name="T175">quit</text:span><text:span text:style-name="T4"> : Quitter </text:span><text:span text:style-name="T94">zkCli</text:span></text:p>
              </text:list-item>
            </text:list>
          </draw:text-box>
        </draw:frame>
        <draw:frame draw:style-name="gr41" draw:text-style-name="P34" draw:layer="layout" svg:width="10.971cm" svg:height="1.216cm" svg:x="1.601cm" svg:y="19.4cm">
          <draw:text-box>
            <text:p><text:span text:style-name="T73">TP 1.1 : Ensemble ZooKeeper</text:span></text:p>
          </draw:text-box>
        </draw:frame>
        <presentation:notes draw:style-name="dp5">
          <draw:page-thumbnail draw:style-name="gr2" draw:layer="layout" svg:width="15.597cm" svg:height="10.985cm" svg:x="2.623cm" svg:y="2.258cm" draw:page-number="250" presentation:class="page"/>
          <draw:frame presentation:style-name="pr6" draw:text-style-name="P13" draw:layer="layout" svg:width="14.362cm" svg:height="11.254cm" svg:x="3.25cm" svg:y="14.128cm" presentation:class="notes" presentation:placeholder="true">
            <draw:text-box/>
          </draw:frame>
        </presentation:notes>
      </draw:page>
      <draw:page draw:name="page251"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Installation</text:span></text:p>
              </text:list-header>
            </text:list>
          </draw:text-box>
        </draw:frame>
        <draw:frame presentation:style-name="pr39" draw:text-style-name="P16"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3"><text:span text:style-name="T13">Pré-requis et ensemble </text:span><text:span text:style-name="T46">Zookeeper</text:span><text:span text:style-name="T13"> </text:span></text:p>
              </text:list-item>
              <text:list-item>
                <text:p text:style-name="P3"><text:span text:style-name="T13">Broker </text:span><text:span text:style-name="T46">Kafka</text:span></text:p>
              </text:list-item>
              <text:list-item>
                <text:p text:style-name="P3"><text:span text:style-name="T176">Utilitaires</text:span><text:span text:style-name="T177"> </text:span><text:span text:style-name="T46">Kafka</text:span></text:p>
              </text:list-item>
              <text:list-item>
                <text:p text:style-name="P19"><text:span text:style-name="T12">Cluster </text:span><text:span text:style-name="T178">Kafka</text:span></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52" draw:style-name="dp6" draw:master-page-name="Standard" presentation:presentation-page-layout-name="AL3T1">
        <draw:frame presentation:style-name="pr9" draw:layer="layout" svg:width="23.499cm" svg:height="3.575cm" svg:x="3.033cm" svg:y="2.367cm" presentation:class="title">
          <draw:text-box>
            <text:p>Configuration cluster</text:p>
          </draw:text-box>
        </draw:frame>
        <draw:frame presentation:style-name="pr5" draw:layer="layout" svg:width="23.499cm" svg:height="12.18cm" svg:x="3.033cm" svg:y="6.283cm" presentation:class="outline">
          <draw:text-box>
            <text:list text:style-name="L2">
              <text:list-item>
                <text:p>2 contraintes pour la configuration d’un cluster :</text:p>
                <text:list>
                  <text:list-item>
                    <text:p>Tous les brokers doivent avoir le même paramètre <text:span text:style-name="T31">zookeeper.connect</text:span>. </text:p>
                  </text:list-item>
                  <text:list-item>
                    <text:p>Chaque broker doit avoir une valeur unique pour <text:span text:style-name="T31">broker.id.</text:span></text:p>
                  </text:list-item>
                </text:list>
              </text:list-item>
              <text:list-item>
                <text:p/>
              </text:list-item>
            </text:list>
          </draw:text-box>
        </draw:frame>
        <draw:frame draw:style-name="gr42" draw:text-style-name="P65" draw:layer="layout" svg:width="4.172cm" svg:height="1.216cm" svg:x="22.78cm" svg:y="0.793cm">
          <draw:text-box>
            <text:p><text:span text:style-name="T179">Zookeeper</text:span></text:p>
          </draw:text-box>
        </draw:frame>
        <presentation:notes draw:style-name="dp4">
          <draw:page-thumbnail draw:style-name="gr2" draw:layer="layout" svg:width="15.597cm" svg:height="10.985cm" svg:x="2.623cm" svg:y="2.258cm" draw:page-number="252" presentation:class="page"/>
          <draw:frame presentation:style-name="pr6" draw:text-style-name="P18" draw:layer="layout" svg:width="14.362cm" svg:height="11.254cm" svg:x="3.25cm" svg:y="14.128cm" presentation:class="notes" presentation:placeholder="true">
            <draw:text-box/>
          </draw:frame>
        </presentation:notes>
      </draw:page>
      <draw:page draw:name="page253" draw:style-name="dp6" draw:master-page-name="Standard" presentation:presentation-page-layout-name="AL3T1">
        <draw:frame presentation:style-name="pr9" draw:layer="layout" svg:width="23.499cm" svg:height="3.575cm" svg:x="3.033cm" svg:y="2.367cm" presentation:class="title">
          <draw:text-box>
            <text:p>Configuration cluster</text:p>
          </draw:text-box>
        </draw:frame>
        <draw:frame presentation:style-name="pr5" draw:layer="layout" svg:width="23.499cm" svg:height="12.18cm" svg:x="3.033cm" svg:y="6.283cm" presentation:class="outline">
          <draw:text-box>
            <text:list text:style-name="L2">
              <text:list-item>
                <text:p>3 contraintes pour la configuration d’un cluster :</text:p>
                <text:list>
                  <text:list-item>
                    <text:p>Tous les brokers doivent avoir le même paramètre <text:span text:style-name="T31">cluster.id</text:span> </text:p>
                  </text:list-item>
                  <text:list-item>
                    <text:p>Chaque broker doit avoir une valeur unique pour <text:span text:style-name="T31">broker.id</text:span></text:p>
                  </text:list-item>
                  <text:list-item>
                    <text:p>Au<text:span text:style-name="T31"> </text:span>moins 1 broker doit avoir le rôle contrôleur</text:p>
                  </text:list-item>
                </text:list>
              </text:list-item>
              <text:list-item>
                <text:p/>
              </text:list-item>
            </text:list>
          </draw:text-box>
        </draw:frame>
        <draw:frame draw:style-name="gr43" draw:text-style-name="P65" draw:layer="layout" svg:width="2.339cm" svg:height="1.216cm" svg:x="22.78cm" svg:y="0.793cm">
          <draw:text-box>
            <text:p><text:span text:style-name="T179">Kraft</text:span></text:p>
          </draw:text-box>
        </draw:frame>
        <presentation:notes draw:style-name="dp4">
          <draw:page-thumbnail draw:style-name="gr2" draw:layer="layout" svg:width="15.597cm" svg:height="10.985cm" svg:x="2.623cm" svg:y="2.258cm" draw:page-number="253" presentation:class="page"/>
          <draw:frame presentation:style-name="pr6" draw:text-style-name="P18" draw:layer="layout" svg:width="14.362cm" svg:height="11.254cm" svg:x="3.25cm" svg:y="14.128cm" presentation:class="notes" presentation:placeholder="true">
            <draw:text-box/>
          </draw:frame>
        </presentation:notes>
      </draw:page>
      <draw:page draw:name="page254" draw:style-name="dp6" draw:master-page-name="Standard" presentation:presentation-page-layout-name="AL3T1">
        <draw:frame presentation:style-name="pr9" draw:layer="layout" svg:width="23.499cm" svg:height="3.575cm" svg:x="3.033cm" svg:y="2.367cm" presentation:class="title">
          <draw:text-box>
            <text:p>Nombre de brokers</text:p>
          </draw:text-box>
        </draw:frame>
        <draw:frame presentation:style-name="pr5" draw:layer="layout" svg:width="23.499cm" svg:height="12.18cm" svg:x="3.033cm" svg:y="6.283cm" presentation:class="outline">
          <draw:text-box>
            <text:list text:style-name="L2">
              <text:list-item>
                <text:p>Pour déterminer le nombre de brokers :</text:p>
                <text:list>
                  <text:list-item>
                    <text:p>Premier facteur :<text:line-break/>Le niveau de tolérance aux pannes requis</text:p>
                  </text:list-item>
                  <text:list-item>
                    <text:p>Second facteur : <text:line-break/>La capacité de disque requise pour conserver les messages et la quantité de stockage disponible sur chaque <text:span text:style-name="T14">broker</text:span>.</text:p>
                  </text:list-item>
                  <text:list-item>
                    <text:p>3ème facteur : <text:line-break/>La capacité du cluster à traiter le débit de requêtes en profitant du parallélisme.</text:p>
                  </text:list-item>
                </text:list>
              </text:list-item>
            </text:list>
          </draw:text-box>
        </draw:frame>
        <presentation:notes draw:style-name="dp4">
          <draw:page-thumbnail draw:style-name="gr2" draw:layer="layout" svg:width="15.597cm" svg:height="10.985cm" svg:x="2.623cm" svg:y="2.258cm" draw:page-number="254" presentation:class="page"/>
          <draw:frame presentation:style-name="pr6" draw:text-style-name="P13" draw:layer="layout" svg:width="14.362cm" svg:height="11.254cm" svg:x="3.25cm" svg:y="14.128cm" presentation:class="notes" presentation:placeholder="true">
            <draw:text-box/>
          </draw:frame>
        </presentation:notes>
      </draw:page>
      <draw:page draw:name="page255" draw:style-name="dp6" draw:master-page-name="Standard" presentation:presentation-page-layout-name="AL3T1">
        <draw:frame presentation:style-name="pr11" draw:layer="layout" svg:width="23.499cm" svg:height="3.577cm" svg:x="3.033cm" svg:y="2.366cm" presentation:class="title">
          <draw:text-box>
            <text:p>Cluster et ensemble Zookeeper</text:p>
          </draw:text-box>
        </draw:frame>
        <draw:frame presentation:style-name="pr5" draw:layer="layout" svg:width="23.499cm" svg:height="12.18cm" svg:x="3.033cm" svg:y="6.283cm" presentation:class="outline">
          <draw:text-box>
            <text:list text:style-name="L2">
              <text:list-item>
                <text:p>Kafka utilise <text:span text:style-name="T14">Zookeeper</text:span> pour stocker des informations de métadonnées sur les brokers, les topics et les partitions. </text:p>
              </text:list-item>
              <text:list-item>
                <text:p>Les écritures sont peu volumineuses et il n’est pas nécessaire de dédier un ensemble <text:span text:style-name="T14">Zookeeper</text:span> à un seul cluster Kafka. </text:p>
                <text:list>
                  <text:list-item>
                    <text:p><text:span text:style-name="T4">=&gt; Un seul ensemble </text:span><text:span text:style-name="T4">pour plusieurs clusters </text:span><text:span text:style-name="T4">Kafka.</text:span></text:p>
                  </text:list-item>
                </text:list>
              </text:list-item>
            </text:list>
          </draw:text-box>
        </draw:frame>
        <draw:frame draw:style-name="gr44" draw:text-style-name="P34" draw:layer="layout" svg:width="9.71cm" svg:height="1.216cm" svg:x="1.602cm" svg:y="19.4cm">
          <draw:text-box>
            <text:p><text:span text:style-name="T73">Atelier 1.3 : Cluster Kafka</text:span></text:p>
          </draw:text-box>
        </draw:frame>
        <draw:frame draw:style-name="gr42" draw:text-style-name="P65" draw:layer="layout" svg:width="4.172cm" svg:height="1.216cm" svg:x="22.78cm" svg:y="0.793cm">
          <draw:text-box>
            <text:p><text:span text:style-name="T179">Zookeeper</text:span></text:p>
          </draw:text-box>
        </draw:frame>
        <presentation:notes draw:style-name="dp4">
          <draw:page-thumbnail draw:style-name="gr2" draw:layer="layout" svg:width="15.597cm" svg:height="10.985cm" svg:x="2.623cm" svg:y="2.258cm" draw:page-number="255" presentation:class="page"/>
          <draw:frame presentation:style-name="pr6" draw:text-style-name="P13" draw:layer="layout" svg:width="14.362cm" svg:height="11.254cm" svg:x="3.25cm" svg:y="14.128cm" presentation:class="notes" presentation:placeholder="true">
            <draw:text-box/>
          </draw:frame>
        </presentation:notes>
      </draw:page>
      <draw:page draw:name="page256" draw:style-name="dp3" draw:master-page-name="Standard" presentation:presentation-page-layout-name="AL1T0">
        <draw:frame presentation:style-name="pr9" draw:layer="layout" svg:width="23.499cm" svg:height="3.575cm" svg:x="3.033cm" svg:y="2.367cm" presentation:class="title">
          <draw:text-box>
            <text:p>Annexes</text:p>
          </draw:text-box>
        </draw:frame>
        <draw:frame presentation:style-name="pr38" draw:text-style-name="P13" draw:layer="layout" svg:width="23.499cm" svg:height="12.18cm" svg:x="3.033cm" svg:y="6.283cm" presentation:class="subtitle">
          <draw:text-box>
            <text:p>Apache<text:span text:style-name="T41"> </text:span>Zookeeper</text:p>
            <text:p><text:span text:style-name="T41">Contrôleur et Zookeeper</text:span></text:p>
            <text:p>SASL SCRAM</text:p>
          </draw:text-box>
        </draw:frame>
        <presentation:notes draw:style-name="dp5">
          <draw:page-thumbnail draw:style-name="gr2" draw:layer="layout" svg:width="15.597cm" svg:height="10.985cm" svg:x="2.623cm" svg:y="2.258cm" draw:page-number="256" presentation:class="page"/>
          <draw:frame presentation:style-name="pr6" draw:text-style-name="P13" draw:layer="layout" svg:width="14.362cm" svg:height="11.254cm" svg:x="3.25cm" svg:y="14.128cm" presentation:class="notes" presentation:placeholder="true">
            <draw:text-box/>
          </draw:frame>
        </presentation:notes>
      </draw:page>
      <draw:page draw:name="page257" draw:style-name="dp3" draw:master-page-name="Standard" presentation:presentation-page-layout-name="AL3T1">
        <draw:frame presentation:style-name="pr9" draw:layer="layout" svg:width="23.499cm" svg:height="3.575cm" svg:x="3.033cm" svg:y="2.367cm" presentation:class="title">
          <draw:text-box>
            <text:p>Rôles du contrôleur</text:p>
          </draw:text-box>
        </draw:frame>
        <draw:frame presentation:style-name="pr5" draw:layer="layout" svg:width="23.499cm" svg:height="12.18cm" svg:x="3.033cm" svg:y="6.283cm" presentation:class="outline">
          <draw:text-box>
            <text:list text:style-name="L2">
              <text:list-item>
                <text:p>Un des brokers Kafka (nœud éphémère dans <text:span text:style-name="T14">Zookeeper</text:span>)<text:line-break/>Pour le visualiser :<text:line-break/><text:span text:style-name="T180">./bin/zookeeper-</text:span><text:span text:style-name="T180">shell.sh [ZK_IP] </text:span><text:span text:style-name="T180">get /controller</text:span></text:p>
                <text:list>
                  <text:list-item>
                    <text:p>Gère le cluster en plus des fonctionnalités habituelles d’un broker</text:p>
                  </text:list-item>
                  <text:list-item>
                    <text:p>Détecte le départ / l'arrivée de broker via <text:span text:style-name="T14">Zookeeper</text:span> (<text:span text:style-name="T14">/brokers </text:span><text:span text:style-name="T14">ids</text:span>)</text:p>
                  </text:list-item>
                  <text:list-item>
                    <text:p>Gère les changements de Leaders</text:p>
                  </text:list-item>
                </text:list>
              </text:list-item>
              <text:list-item>
                <text:p>Si le contrôleur échoue:</text:p>
                <text:list>
                  <text:list-item>
                    <text:p>un autre broker est désigné comme nouveau contrôleur</text:p>
                  </text:list-item>
                  <text:list-item>
                    <text:p>les états des partitions (liste des leaders et des ISR) sont récupérés à partir de Zookeeper</text:p>
                  </text:list-item>
                </text:list>
              </text:list-item>
            </text:list>
          </draw:text-box>
        </draw:frame>
        <presentation:notes draw:style-name="dp5">
          <draw:page-thumbnail draw:style-name="gr2" draw:layer="layout" svg:width="15.597cm" svg:height="10.985cm" svg:x="2.623cm" svg:y="2.258cm" draw:page-number="257" presentation:class="page"/>
          <draw:frame presentation:style-name="pr6" draw:text-style-name="P13" draw:layer="layout" svg:width="14.362cm" svg:height="11.254cm" svg:x="3.25cm" svg:y="14.128cm" presentation:class="notes" presentation:placeholder="true">
            <draw:text-box/>
          </draw:frame>
        </presentation:notes>
      </draw:page>
      <draw:page draw:name="page258" draw:style-name="dp3" draw:master-page-name="Standard" presentation:presentation-page-layout-name="AL3T1">
        <draw:frame presentation:style-name="pr9" draw:layer="layout" svg:width="23.499cm" svg:height="3.575cm" svg:x="3.033cm" svg:y="2.367cm" presentation:class="title" presentation:user-transformed="true">
          <draw:text-box>
            <text:p>Responsabilités</text:p>
          </draw:text-box>
        </draw:frame>
        <draw:frame presentation:style-name="pr5" draw:layer="layout" svg:width="23.499cm" svg:height="12.18cm" svg:x="3.033cm" svg:y="6.283cm" presentation:class="outline">
          <draw:text-box>
            <text:list text:style-name="L2">
              <text:list-item>
                <text:p><text:span text:style-name="T26">Lors d’un départ de broker, </text:span><text:span text:style-name="T26">pour toutes les partitions </text:span><text:span text:style-name="T26">dont il est le leader, le </text:span>contrôleur :</text:p>
                <text:list>
                  <text:list-item>
                    <text:p>Choisit un nouveau leader et met à jour l’ISR</text:p>
                  </text:list-item>
                  <text:list-item>
                    <text:p>Met à jour le nouveau Leader et l’ISR (État des partitions) dans <text:span text:style-name="T14">Zookeeper</text:span></text:p>
                  </text:list-item>
                  <text:list-item>
                    <text:p>Envoie le nouveau Leader/ISR à tous les brokers contenant le nouveau leader ou les followers existants</text:p>
                  </text:list-item>
                </text:list>
              </text:list-item>
              <text:list-item>
                <text:p>Lors de l’arrivée d’un broker, le contrôleur lui envoie le Leader et l’ISR</text:p>
              </text:list-item>
            </text:list>
          </draw:text-box>
        </draw:frame>
        <presentation:notes draw:style-name="dp5">
          <draw:page-thumbnail draw:style-name="gr2" draw:layer="layout" svg:width="15.597cm" svg:height="10.985cm" svg:x="2.623cm" svg:y="2.258cm" draw:page-number="258" presentation:class="page"/>
          <draw:frame presentation:style-name="pr6" draw:text-style-name="P13" draw:layer="layout" svg:width="14.362cm" svg:height="11.254cm" svg:x="3.25cm" svg:y="14.128cm" presentation:class="notes" presentation:placeholder="true">
            <draw:text-box/>
          </draw:frame>
        </presentation:notes>
      </draw:page>
      <draw:page draw:name="page259" draw:style-name="dp3" draw:master-page-name="Standard" presentation:presentation-page-layout-name="AL1T0">
        <draw:frame presentation:style-name="pr9" draw:layer="layout" svg:width="23.499cm" svg:height="3.575cm" svg:x="3.033cm" svg:y="2.367cm" presentation:class="title">
          <draw:text-box>
            <text:p>Annexes</text:p>
          </draw:text-box>
        </draw:frame>
        <draw:frame presentation:style-name="pr38" draw:text-style-name="P13" draw:layer="layout" svg:width="23.499cm" svg:height="12.18cm" svg:x="3.033cm" svg:y="6.283cm" presentation:class="subtitle">
          <draw:text-box>
            <text:p>Apache<text:span text:style-name="T41"> </text:span>Zookeeper</text:p>
            <text:p>Contrôleur et Zookeeper</text:p>
            <text:p><text:span text:style-name="T41">SASL SCRAM</text:span></text:p>
          </draw:text-box>
        </draw:frame>
        <presentation:notes draw:style-name="dp5">
          <draw:page-thumbnail draw:style-name="gr2" draw:layer="layout" svg:width="15.597cm" svg:height="10.985cm" svg:x="2.623cm" svg:y="2.258cm" draw:page-number="259" presentation:class="page"/>
          <draw:frame presentation:style-name="pr6" draw:text-style-name="P13" draw:layer="layout" svg:width="14.362cm" svg:height="11.254cm" svg:x="3.25cm" svg:y="14.128cm" presentation:class="notes" presentation:placeholder="true">
            <draw:text-box/>
          </draw:frame>
        </presentation:notes>
      </draw:page>
      <draw:page draw:name="page260" draw:style-name="dp3" draw:master-page-name="Standard" presentation:presentation-page-layout-name="AL3T1">
        <draw:frame presentation:style-name="pr9" draw:layer="layout" svg:width="23.499cm" svg:height="3.575cm" svg:x="3.033cm" svg:y="2.367cm" presentation:class="title">
          <draw:text-box>
            <text:p>SASL SCARM</text:p>
          </draw:text-box>
        </draw:frame>
        <draw:frame presentation:style-name="pr5" draw:layer="layout" svg:width="23.499cm" svg:height="12.18cm" svg:x="3.033cm" svg:y="6.283cm" presentation:class="outline" presentation:user-transformed="true">
          <draw:text-box>
            <text:list text:style-name="L2">
              <text:list-item>
                <text:p>Utilisé avec SSL pour une authentification sécurisée</text:p>
                <text:list>
                  <text:list-item>
                    <text:p><text:span text:style-name="T14">Zookeeper</text:span> est utilisé pour stocker les crédentiels</text:p>
                  </text:list-item>
                  <text:list-item>
                    <text:p>Sécurisé via l’utilisation d’un réseau privé</text:p>
                  </text:list-item>
                </text:list>
              </text:list-item>
            </text:list>
          </draw:text-box>
        </draw:frame>
        <presentation:notes draw:style-name="dp8">
          <draw:page-thumbnail draw:style-name="gr2" draw:layer="layout" svg:width="15.597cm" svg:height="10.985cm" svg:x="2.623cm" svg:y="2.258cm" draw:page-number="260" presentation:class="page"/>
          <draw:frame presentation:style-name="pr6" draw:text-style-name="P13" draw:layer="layout" svg:width="14.362cm" svg:height="11.254cm" svg:x="3.25cm" svg:y="14.128cm" presentation:class="notes" presentation:placeholder="true">
            <draw:text-box/>
          </draw:frame>
        </presentation:notes>
      </draw:page>
      <draw:page draw:name="page261" draw:style-name="dp3" draw:master-page-name="Standard" presentation:presentation-page-layout-name="AL3T1">
        <draw:frame presentation:style-name="pr11" draw:layer="layout" svg:width="23.499cm" svg:height="3.577cm" svg:x="3.033cm" svg:y="2.366cm" presentation:class="title" presentation:user-transformed="true">
          <draw:text-box>
            <text:p>Configuration des crédentiels SASL SCRAM</text:p>
          </draw:text-box>
        </draw:frame>
        <draw:frame presentation:style-name="pr5" draw:layer="layout" svg:width="23.499cm" svg:height="12.18cm" svg:x="3.033cm" svg:y="6.283cm" presentation:class="outline" presentation:user-transformed="true">
          <draw:text-box>
            <text:list text:style-name="L2">
              <text:list-item>
                <text:p>Communication Inter-Broker : user “admin”</text:p>
              </text:list-item>
              <text:list-item>
                <text:p text:style-name="P26"><text:span text:style-name="T67">kafka-configs.sh --zookeeper </text:span><text:span text:style-name="T67">host:port --alter \</text:span></text:p>
              </text:list-item>
              <text:list-item>
                <text:p text:style-name="P26"><text:span text:style-name="T67">--add-config 'SCRAM-SHA-</text:span><text:span text:style-name="T67">256=[password=adminpass],S</text:span><text:span text:style-name="T67">CRAM-SHA-</text:span><text:span text:style-name="T67">512=[password=adminpass]' </text:span><text:span text:style-name="T67">\</text:span></text:p>
              </text:list-item>
              <text:list-item>
                <text:p text:style-name="P26"><text:span text:style-name="T67">--entity-type users --</text:span><text:span text:style-name="T67">entity-name admin \</text:span></text:p>
              </text:list-item>
              <text:list-item>
                <text:p/>
              </text:list-item>
              <text:list-item>
                <text:p>Communication Client-Broker : user “user”</text:p>
              </text:list-item>
              <text:list-item>
                <text:p text:style-name="P26"><text:span text:style-name="T67">kafka-configs.sh</text:span> <text:span text:style-name="T67">--zookeeper </text:span><text:span text:style-name="T67">host:port --alter \</text:span></text:p>
              </text:list-item>
              <text:list-item>
                <text:p text:style-name="P26"><text:span text:style-name="T67">--add-config 'SCRAM-SHA-</text:span><text:span text:style-name="T67">256=[password=userpass],SC</text:span><text:span text:style-name="T67">RAM-SHA-</text:span><text:span text:style-name="T67">512=[password=userpass] </text:span><text:span text:style-name="T67">' \</text:span></text:p>
              </text:list-item>
              <text:list-item>
                <text:p text:style-name="P26"><text:span text:style-name="T67">--entity-type users --</text:span><text:span text:style-name="T67">entity-name user\</text:span></text:p>
              </text:list-item>
            </text:list>
          </draw:text-box>
        </draw:frame>
        <presentation:notes draw:style-name="dp8">
          <draw:page-thumbnail draw:style-name="gr2" draw:layer="layout" svg:width="15.597cm" svg:height="10.985cm" svg:x="2.623cm" svg:y="2.258cm" draw:page-number="261" presentation:class="page"/>
          <draw:frame presentation:style-name="pr6" draw:text-style-name="P18" draw:layer="layout" svg:width="14.362cm" svg:height="11.254cm" svg:x="3.25cm" svg:y="14.128cm" presentation:class="notes" presentation:placeholder="true">
            <draw:text-box/>
          </draw:frame>
        </presentation:notes>
      </draw:page>
      <draw:page draw:name="page262" draw:style-name="dp3" draw:master-page-name="Standard" presentation:presentation-page-layout-name="AL3T1">
        <draw:frame presentation:style-name="pr9" draw:layer="layout" svg:width="23.499cm" svg:height="3.575cm" svg:x="3.033cm" svg:y="2.367cm" presentation:class="title">
          <draw:text-box>
            <text:p>Configuration du broker</text:p>
          </draw:text-box>
        </draw:frame>
        <draw:frame presentation:style-name="pr5" draw:layer="layout" svg:width="23.499cm" svg:height="12.18cm" svg:x="3.033cm" svg:y="6.283cm" presentation:class="outline">
          <draw:text-box>
            <text:list text:style-name="L2">
              <text:list-item>
                <text:p>Créer le fichier Jaas</text:p>
              </text:list-item>
              <text:list-item>
                <text:p><text:span text:style-name="T67">KafkaServer {</text:span></text:p>
              </text:list-item>
              <text:list-item>
                <text:p><text:span text:style-name="T67"><text:s text:c="2"/></text:span><text:span text:style-name="T67">org.apache.kafka.common.se</text:span><text:span text:style-name="T67">curity.scram.ScramLoginMod</text:span><text:span text:style-name="T67">ule required</text:span><text:span text:style-name="T67"><text:line-break/></text:span><text:span text:style-name="T67">username="admin"</text:span><text:span text:style-name="T67"><text:line-break/></text:span><text:span text:style-name="T67">password="adminpass" </text:span></text:p>
              </text:list-item>
              <text:list-item>
                <text:p><text:span text:style-name="T67">} ;</text:span></text:p>
              </text:list-item>
              <text:list-item>
                <text:p/>
              </text:list-item>
              <text:list-item>
                <text:p>Ajouter un paramètre JVM </text:p>
              </text:list-item>
              <text:list-item>
                <text:p><text:span text:style-name="T151">-</text:span><text:span text:style-name="T151">Djava.security.auth.login.c</text:span><text:span text:style-name="T151">onfig=/home/ubuntu/ssl/</text:span><text:span text:style-name="T151">kafka_jaas.conf</text:span></text:p>
              </text:list-item>
              <text:list-item>
                <text:p><text:span text:style-name="T14">server.properties</text:span></text:p>
              </text:list-item>
              <text:list-item>
                <text:p text:style-name="P26"><text:s text:c="2"/><text:span text:style-name="T67">listeners=SASL_SSL://host.</text:span><text:span text:style-name="T67">name:port</text:span></text:p>
              </text:list-item>
              <text:list-item>
                <text:p text:style-name="P26"><text:span text:style-name="T67"><text:s/></text:span><text:span text:style-name="T67">security.inter.broker.prot</text:span><text:span text:style-name="T67">ocol=SASL_SSL</text:span></text:p>
              </text:list-item>
              <text:list-item>
                <text:p text:style-name="P26"><text:span text:style-name="T67"><text:s/></text:span><text:span text:style-name="T67">sasl.mechanism.inter.broke</text:span><text:span text:style-name="T67">r.protocol=SCRAM-SHA-512</text:span></text:p>
              </text:list-item>
              <text:list-item>
                <text:p text:style-name="P26"><text:span text:style-name="T67"><text:s/></text:span><text:span text:style-name="T67">sasl.enabled.mechanisms=SC</text:span><text:span text:style-name="T67">RAM-SHA-512</text:span></text:p>
              </text:list-item>
            </text:list>
          </draw:text-box>
        </draw:frame>
        <presentation:notes draw:style-name="dp8">
          <draw:page-thumbnail draw:style-name="gr2" draw:layer="layout" svg:width="15.597cm" svg:height="10.985cm" svg:x="2.623cm" svg:y="2.258cm" draw:page-number="262" presentation:class="page"/>
          <draw:frame presentation:style-name="pr6" draw:text-style-name="P13" draw:layer="layout" svg:width="14.362cm" svg:height="11.254cm" svg:x="3.25cm" svg:y="14.128cm" presentation:class="notes" presentation:placeholder="true">
            <draw:text-box/>
          </draw:frame>
        </presentation:notes>
      </draw:page>
      <draw:page draw:name="page263" draw:style-name="dp3" draw:master-page-name="Standard" presentation:presentation-page-layout-name="AL3T1">
        <draw:frame presentation:style-name="pr9" draw:layer="layout" svg:width="23.499cm" svg:height="3.575cm" svg:x="3.033cm" svg:y="2.367cm" presentation:class="title">
          <draw:text-box>
            <text:p>Configuration du client</text:p>
          </draw:text-box>
        </draw:frame>
        <draw:frame presentation:style-name="pr5" draw:layer="layout" svg:width="23.499cm" svg:height="12.18cm" svg:x="3.033cm" svg:y="6.283cm" presentation:class="outline">
          <draw:text-box>
            <text:list text:style-name="L2">
              <text:list-item>
                <text:p>Créer le fichier Jaas</text:p>
              </text:list-item>
              <text:list-item>
                <text:p><text:span text:style-name="T67">KafkaClient {</text:span></text:p>
              </text:list-item>
              <text:list-item>
                <text:p><text:span text:style-name="T70"><text:s text:c="2"/></text:span><text:span text:style-name="T70">org.apache.kafka.common.se</text:span><text:span text:style-name="T70">curity.scram.ScramLoginMod</text:span><text:span text:style-name="T70">ule required</text:span><text:span text:style-name="T70"><text:line-break/></text:span><text:span text:style-name="T70">username="alice"</text:span><text:span text:style-name="T70"><text:line-break/></text:span><text:span text:style-name="T70">password="</text:span><text:span text:style-name="T67">alice-secret" </text:span></text:p>
              </text:list-item>
              <text:list-item>
                <text:p><text:span text:style-name="T67">} ;</text:span></text:p>
              </text:list-item>
              <text:list-item>
                <text:p/>
              </text:list-item>
              <text:list-item>
                <text:p>Ajouter un paramètre JVM </text:p>
              </text:list-item>
              <text:list-item>
                <text:p><text:span text:style-name="T151">-</text:span><text:span text:style-name="T151">Djava.security.auth.login.c</text:span><text:span text:style-name="T151">onfig=/home/ubuntu/ssl/</text:span><text:span text:style-name="T151">client_jaas.conf</text:span></text:p>
              </text:list-item>
              <text:list-item>
                <text:p><text:span text:style-name="T14">client.properties</text:span></text:p>
              </text:list-item>
              <text:list-item>
                <text:p text:style-name="P26"><text:span text:style-name="T67"><text:s/></text:span><text:span text:style-name="T67">security.protocol=SASL_SSL</text:span></text:p>
              </text:list-item>
              <text:list-item>
                <text:p text:style-name="P26"><text:span text:style-name="T67"><text:s/></text:span><text:span text:style-name="T67">sasl.mechanisms=SCRAM-SHA-</text:span><text:span text:style-name="T67">512</text:span></text:p>
              </text:list-item>
            </text:list>
          </draw:text-box>
        </draw:frame>
        <presentation:notes draw:style-name="dp8">
          <draw:page-thumbnail draw:style-name="gr2" draw:layer="layout" svg:width="15.597cm" svg:height="10.985cm" svg:x="2.623cm" svg:y="2.258cm" draw:page-number="263" presentation:class="page"/>
          <draw:frame presentation:style-name="pr6" draw:text-style-name="P13" draw:layer="layout" svg:width="14.362cm" svg:height="11.254cm" svg:x="3.25cm" svg:y="14.128cm" presentation:class="notes" presentation:placeholder="true">
            <draw:text-box/>
          </draw:frame>
        </presentation:notes>
      </draw:page>
      <draw:page draw:name="page264"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Administration</text:span></text:p>
              </text:list-header>
            </text:list>
          </draw:text-box>
        </draw:frame>
        <draw:frame presentation:style-name="pr40" draw:text-style-name="P16" draw:layer="layout" svg:width="23.499cm" svg:height="12.18cm" svg:x="3.033cm" svg:y="6.283cm" presentation:class="subtitle" presentation:user-transformed="true">
          <draw:text-box>
            <text:list text:style-name="L1">
              <text:list-item>
                <text:p text:style-name="P28"><text:span text:style-name="T143"/></text:p>
              </text:list-item>
              <text:list-item>
                <text:p text:style-name="P28"><text:span text:style-name="T143"/></text:p>
              </text:list-item>
              <text:list-item>
                <text:p text:style-name="P19"><text:span text:style-name="T2">Gestion des topics</text:span></text:p>
              </text:list-item>
              <text:list-item>
                <text:p text:style-name="P28"><text:span text:style-name="T2">Stockage et rétention des partitions</text:span></text:p>
              </text:list-item>
              <text:list-item>
                <text:p text:style-name="P28"><text:span text:style-name="T2">Quotas</text:span></text:p>
              </text:list-item>
              <text:list-item>
                <text:p text:style-name="P28"><text:span text:style-name="T13">Gestion du cluster</text:span></text:p>
              </text:list-item>
              <text:list-item>
                <text:p text:style-name="P19"><text:span text:style-name="T12">Dimensionnement</text:span></text:p>
              </text:list-item>
              <text:list-item>
                <text:p text:style-name="P19"><text:span text:style-name="T145">Monitoring</text:span></text:p>
              </text:list-item>
              <text:list-item>
                <text:p text:style-name="P28"><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65" draw:style-name="dp3" draw:master-page-name="Standard" presentation:presentation-page-layout-name="AL3T1">
        <draw:frame presentation:style-name="pr9" draw:layer="layout" svg:width="23.499cm" svg:height="3.575cm" svg:x="3.033cm" svg:y="2.367cm" presentation:class="title">
          <draw:text-box>
            <text:p>ZooKeeper</text:p>
          </draw:text-box>
        </draw:frame>
        <draw:frame presentation:style-name="pr5" draw:layer="layout" svg:width="23.499cm" svg:height="12.18cm" svg:x="3.033cm" svg:y="6.283cm" presentation:class="outline" presentation:user-transformed="true">
          <draw:text-box>
            <text:list text:style-name="L2">
              <text:list-item>
                <text:p><text:span text:style-name="T66">CPU</text:span> : Typiquement pas un goulot d’étranglement </text:p>
                <text:list>
                  <text:list-item>
                    <text:p><text:s/>2 - 4 CPU</text:p>
                  </text:list-item>
                </text:list>
              </text:list-item>
              <text:list-item>
                <text:p><text:span text:style-name="T66">Disque</text:span> : Sensible à la latence I/O, Utilisation d’un disque dédié. De préférence SSD </text:p>
                <text:list>
                  <text:list-item>
                    <text:p>Au moins 64 Gb</text:p>
                  </text:list-item>
                </text:list>
              </text:list-item>
              <text:list-item>
                <text:p><text:span text:style-name="T66">Mémoire</text:span> : Pas d’utilisation intensive</text:p>
                <text:list>
                  <text:list-item>
                    <text:p>Dépend de l’état du cluster </text:p>
                  </text:list-item>
                  <text:list-item>
                    <text:p>4 Gb - 16 Gb (Pour les très grand cluster : plus de 2000 partitions)</text:p>
                  </text:list-item>
                </text:list>
              </text:list-item>
              <text:list-item>
                <text:p><text:span text:style-name="T66">JVM</text:span> : Pas d’utilisation intensive de la heap </text:p>
                <text:list>
                  <text:list-item>
                    <text:p>Au moins 1 Gb pour le cache de page </text:p>
                  </text:list-item>
                  <text:list-item>
                    <text:p>1 Gb - 4 Gb</text:p>
                  </text:list-item>
                </text:list>
              </text:list-item>
              <text:list-item>
                <text:p><text:span text:style-name="T66">Réseau</text:span> : La bande passante ne doit pas être partagée avec d’autres applications</text:p>
              </text:list-item>
            </text:list>
          </draw:text-box>
        </draw:frame>
        <presentation:notes draw:style-name="dp8">
          <draw:page-thumbnail draw:style-name="gr2" draw:layer="layout" svg:width="15.597cm" svg:height="10.985cm" svg:x="2.623cm" svg:y="2.258cm" draw:page-number="265" presentation:class="page"/>
          <draw:frame presentation:style-name="pr6" draw:text-style-name="P13" draw:layer="layout" svg:width="14.362cm" svg:height="11.254cm" svg:x="3.25cm" svg:y="14.128cm" presentation:class="notes" presentation:placeholder="true">
            <draw:text-box/>
          </draw:frame>
        </presentation:notes>
      </draw:page>
      <draw:page draw:name="page266" draw:style-name="dp3" draw:master-page-name="Standard" presentation:presentation-page-layout-name="AL3T1">
        <draw:frame presentation:style-name="pr9" draw:layer="layout" svg:width="23.499cm" svg:height="3.575cm" svg:x="3.033cm" svg:y="2.367cm" presentation:class="title">
          <draw:text-box>
            <text:p>Zookeeper</text:p>
          </draw:text-box>
        </draw:frame>
        <draw:frame presentation:style-name="pr5" draw:layer="layout" svg:width="23.499cm" svg:height="12.18cm" svg:x="3.033cm" svg:y="6.283cm" presentation:class="outline">
          <draw:text-box>
            <text:list text:style-name="L2">
              <text:list-item>
                <text:p>Un nombre impair de serveurs <text:span text:style-name="T14">Zookeeper</text:span> </text:p>
                <text:list>
                  <text:list-item>
                    <text:p>Nécessité d’un Quorum (vote majoritaire)</text:p>
                  </text:list-item>
                </text:list>
              </text:list-item>
              <text:list-item>
                <text:p>– 3 nœuds permet une panne</text:p>
              </text:list-item>
              <text:list-item>
                <text:p>– 5 nœuds permet 2 pannes </text:p>
              </text:list-item>
            </text:list>
          </draw:text-box>
        </draw:frame>
        <presentation:notes draw:style-name="dp8">
          <draw:page-thumbnail draw:style-name="gr2" draw:layer="layout" svg:width="15.597cm" svg:height="10.985cm" svg:x="2.623cm" svg:y="2.258cm" draw:page-number="266" presentation:class="page"/>
          <draw:frame presentation:style-name="pr6" draw:text-style-name="P13" draw:layer="layout" svg:width="14.362cm" svg:height="11.254cm" svg:x="3.25cm" svg:y="14.12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ce style:name="Courier New" svg:font-family="'Courier New'" style:font-family-generic="modern" style:font-pitch="fixed"/>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FreeSans" svg:font-family="FreeSans" style:font-family-generic="roman"/>
    <style:font-face style:name="FreeSans1" svg:font-family="FreeSans" style:font-pitch="variable"/>
    <style:font-face style:name="FreeSans2" svg:font-family="FreeSans" style:font-family-generic="swiss"/>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pitch="variable"/>
    <style:font-face style:name="Lohit Devanagari" svg:font-family="'Lohit Devanagari'" style:font-family-generic="system" style:font-pitch="variable"/>
    <style:font-face style:name="Lohit Hindi" svg:font-family="'Lohit Hindi'" style:font-family-generic="roman"/>
    <style:font-face style:name="Lohit Hindi1" svg:font-family="'Lohit Hindi'" style:font-family-generic="roman" style:font-pitch="variable"/>
    <style:font-face style:name="Lohit Hindi2" svg:font-family="'Lohit Hindi'"/>
    <style:font-face style:name="Lohit Hindi3" svg:font-family="'Lohit Hindi'" style:font-family-generic="system" style:font-pitch="variable"/>
    <style:font-face style:name="Lucida Sans Unicode" svg:font-family="'Lucida Sans Unicode'" style:font-family-generic="roman" style:font-pitch="variable"/>
    <style:font-face style:name="Lucida Sans Unicode1" svg:font-family="'Lucida Sans Unicode'" style:font-family-generic="swiss" style:font-pitch="variable"/>
    <style:font-face style:name="Lucida Sans Unicode2" svg:font-family="'Lucida Sans Unicode'" style:font-family-generic="modern" style:font-pitch="fixed"/>
    <style:font-face style:name="Monospace"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Tahoma" svg:font-family="Tahoma" style:font-family-generic="swiss"/>
    <style:font-face style:name="Tahoma1" svg:font-family="Tahoma" style:font-family-generic="swiss" style:font-pitch="variable"/>
    <style:font-face style:name="Times New Roman" svg:font-family="'Times New Roman'" style:font-family-generic="roman" style:font-pitch="variable"/>
    <style:font-face style:name="WenQuanYi Micro Hei" svg:font-family="'WenQuanYi Micro Hei'" style:font-pitch="variable"/>
    <style:font-face style:name="WenQuanYi Micro Hei1" svg:font-family="'WenQuanYi Micro Hei'"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 draw:display-name="Gradient 1" draw:style="linear" draw:start-color="#3333cc" draw:end-color="#ffffff" draw:start-intensity="100%" draw:end-intensity="100%" draw:angle="27deg" draw:border="0%">
      <loext:gradient-stop svg:offset="0" loext:color-type="rgb" loext:color-value="#3333cc"/>
      <loext:gradient-stop svg:offset="1" loext:color-type="rgb" loext:color-value="#ffffff"/>
    </draw:gradient>
    <draw:gradient draw:name="Gradient_20_10" draw:display-name="Gradient 10" draw:style="linear" draw:start-color="#1c1c1c" draw:end-color="#ffffff" draw:start-intensity="100%" draw:end-intensity="100%" draw:angle="270deg" draw:border="0%">
      <loext:gradient-stop svg:offset="0" loext:color-type="rgb" loext:color-value="#1c1c1c"/>
      <loext:gradient-stop svg:offset="1" loext:color-type="rgb" loext:color-value="#ffffff"/>
    </draw:gradient>
    <draw:gradient draw:name="Gradient_20_2" draw:display-name="Gradient 2" draw:style="linear" draw:start-color="#ffcf01" draw:end-color="#ffffff" draw:start-intensity="100%" draw:end-intensity="100%" draw:angle="27deg" draw:border="0%">
      <loext:gradient-stop svg:offset="0" loext:color-type="rgb" loext:color-value="#ffcf01"/>
      <loext:gradient-stop svg:offset="1" loext:color-type="rgb" loext:color-value="#ffffff"/>
    </draw:gradient>
    <draw:gradient draw:name="Gradient_20_3" draw:display-name="Gradient 3" draw:style="linear" draw:start-color="#ffffff" draw:end-color="#ff0000" draw:start-intensity="100%" draw:end-intensity="100%" draw:angle="31.5deg" draw:border="0%">
      <loext:gradient-stop svg:offset="0" loext:color-type="rgb" loext:color-value="#ffffff"/>
      <loext:gradient-stop svg:offset="1" loext:color-type="rgb" loext:color-value="#ff0000"/>
    </draw:gradient>
    <draw:gradient draw:name="Gradient_20_4" draw:display-name="Gradient 4" draw:style="linear" draw:start-color="#1c1c1c" draw:end-color="#ffffff" draw:start-intensity="100%" draw:end-intensity="100%" draw:angle="207deg" draw:border="0%">
      <loext:gradient-stop svg:offset="0" loext:color-type="rgb" loext:color-value="#1c1c1c"/>
      <loext:gradient-stop svg:offset="1" loext:color-type="rgb" loext:color-value="#ffffff"/>
    </draw:gradient>
    <draw:gradient draw:name="Gradient_20_7" draw:display-name="Gradient 7" draw:style="linear" draw:start-color="#3333cc" draw:end-color="#ffffff" draw:start-intensity="100%" draw:end-intensity="100%" draw:angle="270deg" draw:border="0%">
      <loext:gradient-stop svg:offset="0" loext:color-type="rgb" loext:color-value="#3333cc"/>
      <loext:gradient-stop svg:offset="1" loext:color-type="rgb" loext:color-value="#ffffff"/>
    </draw:gradient>
    <draw:gradient draw:name="Gradient_20_8" draw:display-name="Gradient 8" draw:style="linear" draw:start-color="#ffcf01" draw:end-color="#ffffff" draw:start-intensity="100%" draw:end-intensity="100%" draw:angle="270deg" draw:border="0%">
      <loext:gradient-stop svg:offset="0" loext:color-type="rgb" loext:color-value="#ffcf01"/>
      <loext:gradient-stop svg:offset="1" loext:color-type="rgb" loext:color-value="#ffffff"/>
    </draw:gradient>
    <draw:gradient draw:name="Gradient_20_9" draw:display-name="Gradient 9" draw:style="linear" draw:start-color="#ffffff" draw:end-color="#ff0000" draw:start-intensity="100%" draw:end-intensity="100%" draw:angle="315deg" draw:border="0%">
      <loext:gradient-stop svg:offset="0" loext:color-type="rgb" loext:color-value="#ffffff"/>
      <loext:gradient-stop svg:offset="1" loext:color-type="rgb" loext:color-value="#ff0000"/>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fr" fo:country="FR" style:letter-kerning="true" style:font-name-asian="FreeSans1" style:font-family-asian="FreeSan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Titre_20_2" style:display-name="Titre 2"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Titre_20_3" style:display-name="Titre 3"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Titre_20_4" style:display-name="Titre 4"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Texte_20_source" style:display-name="Texte sourc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en_20_Internet" style:display-name="Lien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ractères_20_de_20_numérotation" style:display-name="Caractères de numérotation"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andard_5f_2" style:display-name="Standard_2" style:family="graphic">
      <style:paragraph-properties fo:margin-top="0cm" fo:margin-bottom="0cm" fo:line-height="95%" fo:text-align="start" style:text-autospace="none" loext:tab-stop-distance="0cm">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Hintergrund" style:display-name="Standard 2~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Hintergrundobjekte" style:display-name="Standard 2~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Notizen" style:display-name="Standard 2~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1"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Untertitel" style:display-name="Standard 2~LT~Untertitel" style:family="graphic">
      <style:paragraph-properties fo:text-align="center" style:text-autospace="none"/>
      <style:text-properties fo:color="#000000" loext:opacity="100%" style:text-outline="false" style:text-line-through-style="none" style:text-line-through-type="none" style:font-name="Lohit Hindi1"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Titel" style:display-name="Standard 2~LT~Titel" style:family="graphic">
      <style:paragraph-properties fo:text-align="center" style:text-autospace="none"/>
      <style:text-properties fo:color="#000000" loext:opacity="100%" style:text-outline="false" style:text-line-through-style="none" style:text-line-through-type="none" style:font-name="Lohit Hindi1"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Gliederung_20_9" style:display-name="Standard 2~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8" style:display-name="Standard 2~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7" style:display-name="Standard 2~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6" style:display-name="Standard 2~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5" style:display-name="Standard 2~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4" style:display-name="Standard 2~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3" style:display-name="Standard 2~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2" style:display-name="Standard 2~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1" style:display-name="Standard 2~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3" style:display-name="Standard_1_3"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2" style:display-name="Standard_1_2"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_5f_1" style:display-name="Standard_1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 style:display-name="Standard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 style:display-name="Standard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Hintergrund" style:display-name="Blank Slide~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Hintergrundobjekte" style:display-name="Blank Slide~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Notizen" style:display-name="Blank Slide~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1"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Untertitel" style:display-name="Blank Slide~LT~Untertitel" style:family="graphic">
      <style:paragraph-properties fo:text-align="center" style:text-autospace="none"/>
      <style:text-properties fo:color="#000000" loext:opacity="100%" style:text-outline="false" style:text-line-through-style="none" style:text-line-through-type="none" style:font-name="Lohit Hindi1"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Titel" style:display-name="Blank Slide~LT~Titel" style:family="graphic">
      <style:paragraph-properties fo:text-align="center" style:text-autospace="none"/>
      <style:text-properties fo:color="#000000" loext:opacity="100%" style:text-outline="false" style:text-line-through-style="none" style:text-line-through-type="none" style:font-name="Lohit Hindi1"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Gliederung_20_9" style:display-name="Blank Slide~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8" style:display-name="Blank Slide~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7" style:display-name="Blank Slide~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6" style:display-name="Blank Slide~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5" style:display-name="Blank Slide~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4" style:display-name="Blank Slide~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3" style:display-name="Blank Slide~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2" style:display-name="Blank Slide~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1" style:display-name="Blank Slide~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Contenu_20_de_20_cadre" style:display-name="Contenu de cadre" style:family="graphic">
      <style:paragraph-properties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itre_20_10" style:display-name="Titre 10"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Citations" style:family="graphic">
      <style:paragraph-properties style:text-autospace="none"/>
    </style:style>
    <style:style style:name="Standard_20_1_7e_LT_7e_Hintergrund" style:display-name="Standard 1~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Hintergrundobjekte" style:display-name="Standard 1~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Notizen" style:display-name="Standard 1~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FreeSans" fo:font-family="FreeSans"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Untertitel" style:display-name="Standard 1~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FreeSans" fo:font-family="FreeSans"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Titel" style:display-name="Standard 1~LT~Titel" style:family="graphic">
      <style:paragraph-properties fo:text-align="center" style:text-autospace="none"/>
      <style:text-properties fo:color="#000000" loext:opacity="100%" style:text-outline="false" style:text-line-through-style="none" style:text-line-through-type="none" style:font-name="FreeSans" fo:font-family="FreeSans"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Gliederung_20_9" style:display-name="Standard 1~LT~Gliederung 9"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8" style:display-name="Standard 1~LT~Gliederung 8"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7" style:display-name="Standard 1~LT~Gliederung 7"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6" style:display-name="Standard 1~LT~Gliederung 6"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5" style:display-name="Standard 1~LT~Gliederung 5"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4" style:display-name="Standard 1~LT~Gliederung 4" style:family="graphic">
      <style:paragraph-properties fo:margin-left="0cm" fo:margin-right="0cm" fo:margin-top="0cm" fo:margin-bottom="0.388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3" style:display-name="Standard 1~LT~Gliederung 3" style:family="graphic">
      <style:paragraph-properties fo:margin-left="0cm" fo:margin-right="0cm" fo:margin-top="0cm" fo:margin-bottom="0.582cm" fo:text-align="start" fo:text-indent="0cm" style:text-autospace="none"/>
      <style:text-properties fo:color="#000000" loext:opacity="1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2" style:display-name="Standard 1~LT~Gliederung 2" style:family="graphic">
      <style:paragraph-properties fo:margin-left="0cm" fo:margin-right="0cm" fo:margin-top="0cm" fo:margin-bottom="0.774cm" fo:text-align="start" fo:text-indent="0cm" style:text-autospace="none"/>
      <style:text-properties fo:color="#000000" loext:opacity="1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1" style:display-name="Standard 1~LT~Gliederung 1" style:family="graphic">
      <style:paragraph-properties fo:margin-left="0cm" fo:margin-right="0cm" fo:margin-top="0cm" fo:margin-bottom="0.968cm" fo:text-align="start" fo:text-indent="0cm" style:text-autospace="none"/>
      <style:text-properties fo:color="#000000" loext:opacity="100%" style:text-outline="false" style:text-line-through-style="none" style:text-line-through-type="none" style:font-name="FreeSans" fo:font-family="FreeSans"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Hintergrund" style:display-name="Title and Content~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Hintergrundobjekte" style:display-name="Title and Content~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Notizen" style:display-name="Title and Content~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 fo:font-family="'Lohit Hindi'"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Untertitel" style:display-name="Title and Content~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Lohit Hindi" fo:font-family="'Lohit Hindi'"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Titel" style:display-name="Title and Content~LT~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Gliederung_20_9" style:display-name="Title and Content~LT~Gliederung 9"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8" style:display-name="Title and Content~LT~Gliederung 8"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7" style:display-name="Title and Content~LT~Gliederung 7"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6" style:display-name="Title and Content~LT~Gliederung 6"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5" style:display-name="Title and Content~LT~Gliederung 5"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4" style:display-name="Title and Content~LT~Gliederung 4" style:family="graphic">
      <style:paragraph-properties fo:margin-left="0cm" fo:margin-right="0cm" fo:margin-top="0cm" fo:margin-bottom="0.351cm" fo:text-align="start" fo:text-indent="0cm" style:text-autospace="none"/>
      <style:text-properties fo:color="#000000" loext:opacity="1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3" style:display-name="Title and Content~LT~Gliederung 3" style:family="graphic">
      <style:paragraph-properties fo:margin-left="0cm" fo:margin-right="0cm" fo:margin-top="0cm" fo:margin-bottom="0.529cm" fo:text-align="start" fo:text-indent="0cm" style:text-autospace="none"/>
      <style:text-properties fo:color="#000000" loext:opacity="100%" style:text-outline="false" style:text-line-through-style="none" style:text-line-through-type="none" style:font-name="Lohit Hindi" fo:font-family="'Lohit Hindi'"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2" style:display-name="Title and Content~LT~Gliederung 2" style:family="graphic">
      <style:paragraph-properties fo:margin-left="0cm" fo:margin-right="0cm" fo:margin-top="0cm" fo:margin-bottom="0.704cm" fo:text-align="start" fo:text-indent="0cm" style:text-autospace="none"/>
      <style:text-properties fo:color="#000000" loext:opacity="100%" style:text-outline="false" style:text-line-through-style="none" style:text-line-through-type="none" style:font-name="Lohit Hindi" fo:font-family="'Lohit Hindi'"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1" style:display-name="Title and Content~LT~Gliederung 1" style:family="graphic">
      <style:paragraph-properties fo:margin-left="0cm" fo:margin-right="0cm" fo:margin-top="0cm" fo:margin-bottom="0.88cm" fo:text-align="start" fo:text-indent="0cm" style:text-autospace="none"/>
      <style:text-properties fo:color="#000000" loext:opacity="100%" style:text-outline="false" style:text-line-through-style="none" style:text-line-through-type="none" style:font-name="Lohit Hindi" fo:font-family="'Lohit Hindi'"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Index" style:family="graphic">
      <style:paragraph-properties style:text-autospace="none"/>
      <style:text-properties style:font-name-asian="FreeSans2" style:font-family-asian="FreeSans" style:font-family-generic-asian="swiss"/>
    </style:style>
    <style:style style:name="Légende"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FreeSans2" style:font-family-asian="FreeSans" style:font-family-generic-asian="swiss"/>
    </style:style>
    <style:style style:name="Objet_20_sans_20_remplissage_20_et_20_sans_20_ligne_5f_1" style:display-name="Objet sans remplissage et sans ligne_1" style:family="graphic">
      <style:graphic-properties draw:stroke="none" draw:fill="none"/>
    </style:style>
    <style:style style:name="Objet_20_sans_20_remplissage_20_et_20_sans_20_ligne_5f_1_5f_1" style:display-name="Objet sans remplissage et sans ligne_1_1" style:family="graphic">
      <style:graphic-properties draw:stroke="none" draw:fill="none"/>
    </style:style>
    <style:style style:name="Objet_20_sans_20_remplissage_20_et_20_sans_20_ligne_5f_2_5f_1" style:display-name="Objet sans remplissage et sans ligne_2_1" style:family="graphic">
      <style:graphic-properties draw:stroke="none" draw:fill="none"/>
    </style:style>
    <style:style style:name="Standard_5f_3" style:display-name="Standard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t_20_sans_20_remplissage_20_et_20_sans_20_ligne_5f_2" style:display-name="Objet sans remplissage et sans ligne_2" style:family="graphic">
      <style:graphic-properties draw:stroke="none" draw:fill="none"/>
    </style:style>
    <style:style style:name="Standard_5f_1_5f_4" style:display-name="Standard_1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1_5f_4" style:display-name="Standard_1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Saut_20_d_27_index" style:display-name="Saut d'index" style:family="graphic">
      <style:paragraph-properties style:text-autospace="none"/>
    </style:style>
    <style:style style:name="Lien_20_Internet_20_visité" style:display-name="Lien Internet visité"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Table_20_des_20_matières_20_niveau_20_3" style:display-name="Table des matières niveau 3" style:family="graphic">
      <style:paragraph-properties fo:margin-left="1.76cm" fo:margin-right="0cm" fo:text-indent="0cm" style:text-autospace="none" loext:tab-stop-distance="0cm">
        <style:tab-stops>
          <style:tab-stop style:position="28.226cm" style:type="right" style:leader-style="dotted" style:leader-text="."/>
        </style:tab-stops>
      </style:paragraph-properties>
      <style:text-properties style:font-name-complex="Lohit Hindi2" style:font-family-complex="'Lohit Hindi'"/>
    </style:style>
    <style:style style:name="Table_20_des_20_matières_20_niveau_20_4" style:display-name="Table des matières niveau 4" style:family="graphic">
      <style:paragraph-properties fo:margin-left="2.642cm" fo:margin-right="0cm" fo:text-indent="0cm" style:text-autospace="none" loext:tab-stop-distance="0cm">
        <style:tab-stops>
          <style:tab-stop style:position="27.346cm" style:type="right" style:leader-style="dotted" style:leader-text="."/>
        </style:tab-stops>
      </style:paragraph-properties>
      <style:text-properties style:font-name-complex="Lohit Hindi2" style:font-family-complex="'Lohit Hindi'"/>
    </style:style>
    <style:style style:name="Table_20_des_20_matières_20_niveau_20_2" style:display-name="Table des matières niveau 2" style:family="graphic">
      <style:paragraph-properties fo:margin-left="0.88cm" fo:margin-right="0cm" fo:text-indent="0cm" style:text-autospace="none" loext:tab-stop-distance="0cm">
        <style:tab-stops>
          <style:tab-stop style:position="29.106cm" style:type="right" style:leader-style="dotted" style:leader-text="."/>
        </style:tab-stops>
      </style:paragraph-properties>
      <style:text-properties style:font-name-complex="Lohit Hindi2" style:font-family-complex="'Lohit Hindi'"/>
    </style:style>
    <style:style style:name="Table_20_des_20_matières_20_niveau_20_1" style:display-name="Table des matières niveau 1" style:family="graphic">
      <style:paragraph-properties fo:margin-left="0cm" fo:margin-right="0cm" fo:text-indent="0cm" style:text-autospace="none" loext:tab-stop-distance="0cm">
        <style:tab-stops>
          <style:tab-stop style:position="29.986cm" style:type="right" style:leader-style="dotted" style:leader-text="."/>
        </style:tab-stops>
      </style:paragraph-properties>
      <style:text-properties style:font-name-complex="Lohit Hindi2" style:font-family-complex="'Lohit Hindi'"/>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font-weight="bold" style:font-name-asian="WenQuanYi Micro Hei"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Index_20_lexical_20__3a__20_titre" style:display-name="Index lexical : titre"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font-weight="bold" style:font-name-asian="WenQuanYi Micro Hei"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Contenu_20_de_20_tableau" style:display-name="Contenu de tableau" style:family="graphic">
      <style:paragraph-properties style:text-autospace="none"/>
    </style:style>
    <style:style style:name="Titre_20_principal" style:display-name="Titre principal" style:family="graphic">
      <style:paragraph-properties fo:margin-top="0.746cm" fo:margin-bottom="0.374cm" fo:text-align="center" style:text-autospace="none"/>
      <style:text-properties style:font-name="Arial" fo:font-family="Arial" style:font-family-generic="swiss" style:font-pitch="variable" fo:font-size="28pt" fo:font-weight="bold" style:font-name-asian="WenQuanYi Micro Hei" style:font-family-asian="'WenQuanYi Micro Hei'" style:font-pitch-asian="variable" style:font-name-complex="Arial" style:font-family-complex="Arial" style:font-family-generic-complex="swiss" style:font-pitch-complex="variable" style:font-size-complex="28pt" style:font-weight-complex="bold"/>
    </style:style>
    <style:style style:name="Corps_20_de_20_texte" style:display-name="Corps de texte" style:family="graphic">
      <style:paragraph-properties fo:margin-top="0cm" fo:margin-bottom="0.374cm" style:text-autospace="none"/>
    </style:style>
    <style:style style:name="Objet_20_sans_20_remplissage_20_et_20_sans_20_ligne_5f_3" style:display-name="Objet sans remplissage et sans ligne_3" style:family="graphic">
      <style:graphic-properties draw:stroke="none" draw:fill="none"/>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1_5f_1" style:display-name="Style de dessin par défau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_5f_1" style:display-name="Style de dessin par défau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1" style:font-family-asian="'WenQuanYi Micro Hei'" style:font-family-generic-asian="system" style:font-pitch-asian="variable" style:font-size-asian="12pt" style:font-style-asian="normal" style:font-weight-asian="normal" style:font-name-complex="Lohit Hindi3"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6%" fo:text-align="start"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1" fo:font-family="Tahoma" style:font-family-generic="swiss" style:font-pitch="variable" fo:font-size="32pt" fo:font-style="normal" fo:text-shadow="none" style:text-underline-style="none" fo:font-weight="normal" style:font-name-asian="Lucida Sans Unicode1" style:font-family-asian="'Lucida Sans Unicode'" style:font-family-generic-asian="swiss" style:font-pitch-asian="variable" style:font-size-asian="32pt" style:font-style-asian="normal" style:font-weight-asian="normal" style:font-name-complex="Lucida Sans Unicode1"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6%" fo:text-align="start" fo:text-indent="-0.793cm" style:punctuation-wrap="simple" style:line-break="strict" loext:tab-stop-distance="0cm"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loext:opacity="100%" style:text-line-through-style="none" style:text-line-through-type="none" style:text-position="0% 100%" style:font-name="Tahoma1" fo:font-family="Tahoma" style:font-family-generic="swiss" style:font-pitch="variable" fo:font-size="28pt" fo:font-style="normal" fo:text-shadow="none" style:text-underline-style="none" fo:font-weight="normal" style:font-name-asian="Lucida Sans Unicode1" style:font-family-asian="'Lucida Sans Unicode'" style:font-family-generic-asian="swiss" style:font-pitch-asian="variable" style:font-size-asian="28pt" style:font-style-asian="normal" style:font-weight-asian="normal" style:font-name-complex="Lucida Sans Unicode1" style:font-family-complex="'Lucida Sans Unicode'" style:font-family-generic-complex="swis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6%" fo:text-align="start" fo:text-indent="-0.635cm" style:punctuation-wrap="simple" style:line-break="strict" loext:tab-stop-distance="0cm"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Tahoma1" fo:font-family="Tahoma" style:font-family-generic="swiss"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6%" fo:text-align="start" fo:text-indent="-0.635cm" style:punctuation-wrap="simple" style:line-break="strict" loext:tab-stop-distance="0cm"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6%" fo:text-align="center"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1" fo:font-family="Tahoma" style:font-family-generic="swiss" style:font-pitch="variable" fo:font-size="32pt" fo:font-style="normal" fo:text-shadow="none" style:text-underline-style="none" fo:font-weight="normal" style:font-name-asian="Lucida Sans Unicode1" style:font-family-asian="'Lucida Sans Unicode'" style:font-family-generic-asian="swiss" style:font-pitch-asian="variable" style:font-size-asian="32pt" style:font-style-asian="normal" style:font-weight-asian="normal" style:font-name-complex="Lucida Sans Unicode1"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center" fo:text-indent="0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ahoma1" fo:font-family="Tahoma" style:font-family-generic="swiss" style:font-pitch="variable" fo:font-size="44pt" fo:font-style="normal" fo:text-shadow="none" style:text-underline-style="none" fo:font-weight="normal" style:font-name-asian="Lucida Sans Unicode1" style:font-family-asian="'Lucida Sans Unicode'" style:font-family-generic-asian="swiss" style:font-pitch-asian="variable" style:font-size-asian="44pt" style:font-style-asian="normal" style:font-weight-asian="normal" style:font-name-complex="Lucida Sans Unicode1" style:font-family-complex="'Lucida Sans Unicode'"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none"/>
      <style:text-properties style:letter-kerning="true"/>
    </style:style>
    <style:style style:name="Titre1-backgroundobjects" style:family="presentation">
      <style:graphic-properties draw:textarea-horizontal-align="justify" draw:shadow="hidden" draw:shadow-offset-x="0.2cm" draw:shadow-offset-y="0.2cm" draw:shadow-color="#808080"/>
      <style:text-properties style:letter-kerning="true"/>
    </style:style>
    <style:style style:name="Titr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auto-grow-height="false" draw:fit-to-size="false" style:shrink-to-fit="true">
        <text:list-style style:name="Titr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top="0.4cm" fo:margin-bottom="0cm"/>
      <style:text-properties fo:font-size="28pt" style:font-size-asian="28pt" style:font-size-complex="28pt"/>
    </style:style>
    <style:style style:name="Titre1-outline3" style:family="presentation" style:parent-style-name="Titre1-outline2">
      <style:paragraph-properties fo:margin-top="0.3cm" fo:margin-bottom="0cm"/>
      <style:text-properties fo:font-size="24pt" style:font-size-asian="24pt" style:font-size-complex="24pt"/>
    </style:style>
    <style:style style:name="Titre1-outline4" style:family="presentation" style:parent-style-name="Titre1-outline3">
      <style:paragraph-properties fo:margin-top="0.2cm" fo:margin-bottom="0cm"/>
      <style:text-properties fo:font-size="20pt" style:font-size-asian="20pt" style:font-size-complex="20pt"/>
    </style:style>
    <style:style style:name="Titre1-outline5" style:family="presentation" style:parent-style-name="Titre1-outline4">
      <style:paragraph-properties fo:margin-top="0.1cm" fo:margin-bottom="0cm"/>
      <style:text-properties fo:font-size="20pt" style:font-size-asian="20pt" style:font-size-complex="20pt"/>
    </style:style>
    <style:style style:name="Titre1-outline6" style:family="presentation" style:parent-style-name="Titre1-outline5">
      <style:paragraph-properties fo:margin-top="0.1cm" fo:margin-bottom="0cm"/>
      <style:text-properties fo:font-size="20pt" style:font-size-asian="20pt" style:font-size-complex="20pt"/>
    </style:style>
    <style:style style:name="Titre1-outline7" style:family="presentation" style:parent-style-name="Titre1-outline6">
      <style:paragraph-properties fo:margin-top="0.1cm" fo:margin-bottom="0cm"/>
      <style:text-properties fo:font-size="20pt" style:font-size-asian="20pt" style:font-size-complex="20pt"/>
    </style:style>
    <style:style style:name="Titre1-outline8" style:family="presentation" style:parent-style-name="Titre1-outline7">
      <style:paragraph-properties fo:margin-top="0.1cm" fo:margin-bottom="0cm"/>
      <style:text-properties fo:font-size="20pt" style:font-size-asian="20pt" style:font-size-complex="20pt"/>
    </style:style>
    <style:style style:name="Titre1-outline9" style:family="presentation" style:parent-style-name="Titre1-outline8">
      <style:paragraph-properties fo:margin-top="0.1cm" fo:margin-bottom="0cm"/>
      <style:text-properties fo:font-size="20pt" style:font-size-asian="20pt" style:font-size-complex="20pt"/>
    </style:style>
    <style:style style:name="Titre1-subtitle" style:family="presentation">
      <style:graphic-properties draw:stroke="none" draw:fill="none" draw:textarea-vertical-align="middle">
        <text:list-style style:name="Titr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vertical-align="middle">
        <text:list-style style:name="Titr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de_5f_-background" style:display-name="Vide_-background" style:family="presentation">
      <style:graphic-properties draw:stroke="none" draw:fill="solid" draw:fill-color="#ffffff"/>
      <style:text-properties style:letter-kerning="true"/>
    </style:style>
    <style:style style:name="Vide_5f_-backgroundobjects" style:display-name="Vide_-backgroundobjects" style:family="presentation">
      <style:graphic-properties draw:textarea-horizontal-align="justify" draw:shadow="hidden" draw:shadow-offset-x="0.2cm" draw:shadow-offset-y="0.2cm" draw:shadow-color="#808080"/>
      <style:text-properties style:letter-kerning="true"/>
    </style:style>
    <style:style style:name="Vide_5f_-notes" style:display-name="V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_5f_-outline1" style:display-name="Vide_-outline1" style:family="presentation">
      <style:graphic-properties draw:stroke="none" draw:fill="none" draw:auto-grow-height="false" draw:fit-to-size="false" style:shrink-to-fit="true" style:writing-mode="lr-tb">
        <text:list-style style:name="Vide_5f_-outline1" style:display-name="Vid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6%"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32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 Unicode1"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fo:hyphenate="false"/>
    </style:style>
    <style:style style:name="Vide_5f_-outline2" style:display-name="Vide_-outline2" style:family="presentation" style:parent-style-name="Vide_5f_-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_5f_-outline3" style:display-name="Vide_-outline3" style:family="presentation" style:parent-style-name="Vide_5f_-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4" style:display-name="Vide_-outline4" style:family="presentation" style:parent-style-name="Vide_5f_-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5" style:display-name="Vide_-outline5" style:family="presentation" style:parent-style-name="Vide_5f_-outline4">
      <style:paragraph-properties fo:margin-left="0cm" fo:margin-right="0cm" fo:margin-top="0.1cm" fo:margin-bottom="0cm" fo:text-indent="0cm"/>
      <style:text-properties fo:font-size="20pt" style:font-size-asian="20pt" style:font-size-complex="20pt"/>
    </style:style>
    <style:style style:name="Vide_5f_-outline6" style:display-name="Vide_-outline6" style:family="presentation" style:parent-style-name="Vide_5f_-outline5">
      <style:paragraph-properties fo:margin-left="0cm" fo:margin-right="0cm" fo:margin-top="0.1cm" fo:margin-bottom="0cm" fo:text-indent="0cm"/>
      <style:text-properties fo:font-size="20pt" style:font-size-asian="20pt" style:font-size-complex="20pt"/>
    </style:style>
    <style:style style:name="Vide_5f_-outline7" style:display-name="Vide_-outline7" style:family="presentation" style:parent-style-name="Vide_5f_-outline6">
      <style:paragraph-properties fo:margin-left="0cm" fo:margin-right="0cm" fo:margin-top="0.1cm" fo:margin-bottom="0cm" fo:text-indent="0cm"/>
      <style:text-properties fo:font-size="20pt" style:font-size-asian="20pt" style:font-size-complex="20pt"/>
    </style:style>
    <style:style style:name="Vide_5f_-outline8" style:display-name="Vide_-outline8" style:family="presentation" style:parent-style-name="Vide_5f_-outline7">
      <style:paragraph-properties fo:margin-left="0cm" fo:margin-right="0cm" fo:margin-top="0.1cm" fo:margin-bottom="0cm" fo:text-indent="0cm"/>
      <style:text-properties fo:font-size="20pt" style:font-size-asian="20pt" style:font-size-complex="20pt"/>
    </style:style>
    <style:style style:name="Vide_5f_-outline9" style:display-name="Vide_-outline9" style:family="presentation" style:parent-style-name="Vide_5f_-outline8">
      <style:paragraph-properties fo:margin-left="0cm" fo:margin-right="0cm" fo:margin-top="0.1cm" fo:margin-bottom="0cm" fo:text-indent="0cm"/>
      <style:text-properties fo:font-size="20pt" style:font-size-asian="20pt" style:font-size-complex="20pt"/>
    </style:style>
    <style:style style:name="Vide_5f_-subtitle" style:display-name="Vide_-subtitle" style:family="presentation">
      <style:graphic-properties draw:stroke="none" draw:fill="none" draw:textarea-vertical-align="middle">
        <text:list-style style:name="Vide_5f_-subtitle" style:display-name="Vid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_5f_-title" style:display-name="Vide_-title" style:family="presentation">
      <style:graphic-properties draw:stroke="none" draw:fill="none" draw:textarea-vertical-align="middle" style:writing-mode="lr-tb">
        <text:list-style style:name="Vide_5f_-title" style:display-name="Vid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hanging"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ucida Sans Unicode1" style:font-family-complex="'Lucida Sans Unicode'"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style:writing-mode="lr-tb" loext:decorative="false"/>
    </style:style>
    <style:style style:name="Mgr5" style:family="graphic" style:parent-style-name="standard">
      <style:graphic-properties draw:stroke="none" draw:fill="gradient" draw:fill-color="#ffffff" draw:fill-gradient-name="Gradient_20_7" draw:textarea-horizontal-align="left" draw:textarea-vertical-align="middle" draw:auto-grow-height="false" fo:padding-top="0.13cm" fo:padding-bottom="0.13cm" fo:padding-left="0.25cm" fo:padding-right="0.25cm" fo:wrap-option="no-wrap" style:writing-mode="lr-tb" loext:decorative="false"/>
    </style:style>
    <style:style style:name="Mgr6" style:family="graphic" style:parent-style-name="standard">
      <style:graphic-properties draw:stroke="none" draw:fill="solid" draw:fill-color="#ffcf01" draw:textarea-horizontal-align="left" draw:textarea-vertical-align="middle" draw:auto-grow-height="false" fo:padding-top="0.13cm" fo:padding-bottom="0.13cm" fo:padding-left="0.25cm" fo:padding-right="0.25cm" fo:wrap-option="no-wrap" style:writing-mode="lr-tb" loext:decorative="false"/>
    </style:style>
    <style:style style:name="Mgr7" style:family="graphic" style:parent-style-name="standard">
      <style:graphic-properties draw:stroke="none" draw:fill="gradient" draw:fill-color="#ffffff" draw:fill-gradient-name="Gradient_20_8" draw:textarea-horizontal-align="left" draw:textarea-vertical-align="middle" draw:auto-grow-height="false" fo:padding-top="0.13cm" fo:padding-bottom="0.13cm" fo:padding-left="0.25cm" fo:padding-right="0.25cm" fo:wrap-option="no-wrap" style:writing-mode="lr-tb" loext:decorative="false"/>
    </style:style>
    <style:style style:name="Mgr8" style:family="graphic" style:parent-style-name="standard">
      <style:graphic-properties draw:stroke="none" draw:fill="gradient" draw:fill-color="#ff0000" draw:fill-gradient-name="Gradient_20_9" draw:textarea-horizontal-align="left" draw:textarea-vertical-align="middle" draw:auto-grow-height="false" fo:padding-top="0.13cm" fo:padding-bottom="0.13cm" fo:padding-left="0.25cm" fo:padding-right="0.25cm" fo:wrap-option="no-wrap" style:writing-mode="lr-tb" loext:decorative="false"/>
    </style:style>
    <style:style style:name="Mgr9"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no-wrap" style:writing-mode="lr-tb" loext:decorative="false"/>
    </style:style>
    <style:style style:name="Mgr10" style:family="graphic" style:parent-style-name="standard">
      <style:graphic-properties draw:stroke="none" draw:fill="gradient" draw:fill-color="#ffffff" draw:fill-gradient-name="Gradient_20_10" draw:textarea-horizontal-align="left" draw:textarea-vertical-align="middle" draw:auto-grow-height="false" fo:padding-top="0.13cm" fo:padding-bottom="0.13cm" fo:padding-left="0.25cm" fo:padding-right="0.25cm" fo:wrap-option="no-wrap" style:writing-mode="lr-tb" loext:decorative="false"/>
    </style:style>
    <style:style style:name="Mgr1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writing-mode="lr-tb" loext:decorative="false"/>
      <style:paragraph-properties style:writing-mode="lr-tb"/>
    </style:style>
    <style:style style:name="Mgr12" style:family="graphic" style:parent-style-name="standard">
      <style:graphic-properties draw:stroke="none" svg:stroke-width="0.026cm" svg:stroke-color="#000000" draw:stroke-linejoin="miter" draw:fill="solid" draw:fill-color="#ffffff" draw:textarea-horizontal-align="center" draw:textarea-vertical-align="middle" style:protect="position size" loext:decorative="false"/>
    </style:style>
    <style:style style:name="M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Mgr1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Mgr15" style:family="graphic" style:parent-style-name="standard">
      <style:graphic-properties draw:stroke="none" draw:fill="none" draw:fill-color="#ffffff" fo:min-height="3.735cm" loext:decorative="false"/>
    </style:style>
    <style:style style:name="Mgr16" style:family="graphic" style:parent-style-name="standard">
      <style:graphic-properties draw:stroke="none" draw:fill="none" draw:fill-color="#ffffff" fo:min-height="11.93cm" loext:decorative="false"/>
    </style:style>
    <style:style style:name="Mgr17"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18"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19"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20" style:family="graphic" style:parent-style-name="standard">
      <style:graphic-properties draw:stroke="none" draw:fill="none" draw:fill-color="#ffffff" fo:min-height="11.004cm" loext:decorative="false"/>
    </style:style>
    <style:style style:name="Mgr21" style:family="graphic" style:parent-style-name="standard">
      <style:graphic-properties draw:stroke="none" svg:stroke-width="0cm" draw:fill="solid" draw:fill-color="#3333cc" draw:textarea-horizontal-align="justify" draw:textarea-vertical-align="middle" draw:auto-grow-height="false" draw:fit-to-size="false" style:shrink-to-fit="false" fo:min-height="1.033cm" fo:min-width="0.701cm" fo:padding-top="0.13cm" fo:padding-bottom="0.13cm" fo:padding-left="0.25cm" fo:padding-right="0.25cm" fo:wrap-option="no-wrap" style:writing-mode="lr-tb" loext:decorative="false"/>
      <style:paragraph-properties style:writing-mode="lr-tb"/>
    </style:style>
    <style:style style:name="Mgr22" style:family="graphic" style:parent-style-name="standard">
      <style:graphic-properties draw:stroke="none" svg:stroke-width="0cm" draw:fill="gradient" draw:fill-gradient-name="Gradient_20_1" draw:textarea-horizontal-align="justify" draw:textarea-vertical-align="middle" draw:auto-grow-height="false" draw:fit-to-size="false" style:shrink-to-fit="false" fo:min-height="1.033cm" fo:min-width="0.401cm" fo:padding-top="0.13cm" fo:padding-bottom="0.13cm" fo:padding-left="0.25cm" fo:padding-right="0.25cm" fo:wrap-option="no-wrap" style:writing-mode="lr-tb" loext:decorative="false"/>
      <style:paragraph-properties style:writing-mode="lr-tb"/>
    </style:style>
    <style:style style:name="Mgr23" style:family="graphic" style:parent-style-name="standard">
      <style:graphic-properties draw:stroke="none" svg:stroke-width="0cm" draw:fill="solid" draw:fill-color="#ffcf01" draw:textarea-horizontal-align="justify" draw:textarea-vertical-align="middle" draw:auto-grow-height="false" draw:fit-to-size="false" style:shrink-to-fit="false" fo:min-height="1.038cm" fo:min-width="0.666cm" fo:padding-top="0.13cm" fo:padding-bottom="0.13cm" fo:padding-left="0.25cm" fo:padding-right="0.25cm" fo:wrap-option="no-wrap" style:writing-mode="lr-tb" loext:decorative="false"/>
      <style:paragraph-properties style:writing-mode="lr-tb"/>
    </style:style>
    <style:style style:name="Mgr24" style:family="graphic" style:parent-style-name="standard">
      <style:graphic-properties draw:stroke="none" svg:stroke-width="0cm" draw:fill="gradient" draw:fill-gradient-name="Gradient_20_2" draw:textarea-horizontal-align="justify" draw:textarea-vertical-align="middle" draw:auto-grow-height="false" draw:fit-to-size="false" style:shrink-to-fit="false" fo:min-height="1.038cm" fo:min-width="0.516cm" fo:padding-top="0.13cm" fo:padding-bottom="0.13cm" fo:padding-left="0.25cm" fo:padding-right="0.25cm" fo:wrap-option="no-wrap" style:writing-mode="lr-tb" loext:decorative="false"/>
      <style:paragraph-properties style:writing-mode="lr-tb"/>
    </style:style>
    <style:style style:name="Mgr25" style:family="graphic" style:parent-style-name="standard">
      <style:graphic-properties draw:stroke="none" svg:stroke-width="0cm" draw:fill="gradient" draw:fill-gradient-name="Gradient_20_3" draw:textarea-horizontal-align="justify" draw:textarea-vertical-align="middle" draw:auto-grow-height="false" draw:fit-to-size="false" style:shrink-to-fit="false" fo:min-height="0.906cm" fo:min-width="1.054cm" fo:padding-top="0.13cm" fo:padding-bottom="0.13cm" fo:padding-left="0.25cm" fo:padding-right="0.25cm" fo:wrap-option="no-wrap" style:writing-mode="lr-tb" loext:decorative="false"/>
      <style:paragraph-properties style:writing-mode="lr-tb"/>
    </style:style>
    <style:style style:name="Mgr26" style:family="graphic" style:parent-style-name="standard">
      <style:graphic-properties draw:stroke="none" svg:stroke-width="0cm" draw:fill="solid" draw:fill-color="#1c1c1c" draw:textarea-horizontal-align="justify" draw:textarea-vertical-align="middle" draw:auto-grow-height="false" draw:fit-to-size="false" style:shrink-to-fit="false" fo:min-height="2.647cm" fo:min-width="0cm" fo:padding-top="0.13cm" fo:padding-bottom="0.13cm" fo:padding-left="0.25cm" fo:padding-right="0.25cm" fo:wrap-option="no-wrap" style:writing-mode="lr-tb" loext:decorative="false"/>
      <style:paragraph-properties style:writing-mode="lr-tb"/>
    </style:style>
    <style:style style:name="Mgr27" style:family="graphic" style:parent-style-name="standard">
      <style:graphic-properties draw:stroke="none" svg:stroke-width="0cm" draw:fill="gradient" draw:fill-gradient-name="Gradient_20_4" draw:textarea-horizontal-align="justify" draw:textarea-vertical-align="middle" draw:auto-grow-height="false" draw:fit-to-size="false" style:shrink-to-fit="false" fo:min-height="0cm" fo:min-width="23.623cm" fo:padding-top="0.076cm" fo:padding-bottom="0.076cm" fo:padding-left="0.25cm" fo:padding-right="0.25cm" fo:wrap-option="no-wrap" style:writing-mode="lr-tb" loext:decorative="false"/>
      <style:paragraph-properties style:writing-mode="lr-tb"/>
    </style:style>
    <style:style style:name="Mgr28"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1.195cm" fo:min-width="6.427cm" fo:padding-top="0.13cm" fo:padding-bottom="0.13cm" fo:padding-left="0.25cm" fo:padding-right="0.25cm" fo:wrap-option="wrap" style:writing-mode="lr-tb" loext:decorative="false"/>
      <style:paragraph-properties style:writing-mode="lr-tb"/>
    </style:style>
    <style:style style:name="Mpr1" style:family="presentation" style:parent-style-name="Vide_5f_-backgroundobjects">
      <style:graphic-properties draw:stroke="none" draw:fill="none" draw:fill-color="#ffffff" draw:auto-grow-height="false" fo:min-height="1.485cm" loext:decorative="false"/>
      <style:paragraph-properties style:writing-mode="lr-tb"/>
    </style:style>
    <style:style style:name="Mpr2" style:family="presentation" style:parent-style-name="Vid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333cc"/>
      <style:paragraph-properties style:writing-mode="lr-tb" style:font-independent-line-spacing="true"/>
    </style:style>
    <style:style style:name="MP6" style:family="paragraph">
      <loext:graphic-properties draw:fill="gradient" draw:fill-color="#ffffff" draw:fill-gradient-name="Gradient_20_7"/>
      <style:paragraph-properties style:writing-mode="lr-tb" style:font-independent-line-spacing="true"/>
    </style:style>
    <style:style style:name="MP7" style:family="paragraph">
      <loext:graphic-properties draw:fill="solid" draw:fill-color="#ffcf01"/>
      <style:paragraph-properties style:writing-mode="lr-tb" style:font-independent-line-spacing="true"/>
    </style:style>
    <style:style style:name="MP8" style:family="paragraph">
      <loext:graphic-properties draw:fill="gradient" draw:fill-color="#ffffff" draw:fill-gradient-name="Gradient_20_8"/>
      <style:paragraph-properties style:writing-mode="lr-tb" style:font-independent-line-spacing="true"/>
    </style:style>
    <style:style style:name="MP9" style:family="paragraph">
      <loext:graphic-properties draw:fill="gradient" draw:fill-color="#ff0000" draw:fill-gradient-name="Gradient_20_9"/>
      <style:paragraph-properties style:writing-mode="lr-tb" style:font-independent-line-spacing="true"/>
    </style:style>
    <style:style style:name="MP10" style:family="paragraph">
      <loext:graphic-properties draw:fill="solid" draw:fill-color="#1c1c1c"/>
      <style:paragraph-properties style:writing-mode="lr-tb" style:font-independent-line-spacing="true"/>
    </style:style>
    <style:style style:name="MP11" style:family="paragraph">
      <loext:graphic-properties draw:fill="gradient" draw:fill-color="#ffffff" draw:fill-gradient-name="Gradient_20_10"/>
      <style:paragraph-properties style:writing-mode="lr-tb" style:font-independent-line-spacing="true"/>
    </style:style>
    <style:style style:name="MP12" style:family="paragraph">
      <style:paragraph-properties fo:margin-left="0cm" fo:margin-right="0cm" fo:text-align="end" fo:text-indent="0cm" style:writing-mode="lr-tb"/>
    </style:style>
    <style:style style:name="MP13" style:family="paragraph">
      <loext:graphic-properties draw:fill="none" draw:fill-color="#ffffff"/>
      <style:paragraph-properties style:writing-mode="lr-tb" style:font-independent-line-spacing="true"/>
    </style:style>
    <style:style style:name="MP14" style:family="paragraph">
      <loext:graphic-properties draw:fill="solid" draw:fill-color="#ffffff"/>
      <style:paragraph-properties fo:text-align="center"/>
    </style:style>
    <style:style style:name="MP15" style:family="paragraph">
      <loext:graphic-properties draw:fill="solid" draw:fill-color="#ffffff"/>
      <style:paragraph-properties style:writing-mode="lr-tb" style:font-independent-line-spacing="true"/>
    </style:style>
    <style:style style:name="MP16" style:family="paragraph">
      <loext:graphic-properties draw:fill="none" draw:fill-color="#ffffff"/>
    </style:style>
    <style:style style:name="MP17" style:family="paragraph">
      <style:paragraph-properties fo:margin-left="0cm" fo:margin-right="0cm" fo:line-height="100%" fo:text-indent="0cm" style:line-break="strict" style:writing-mode="lr-tb"/>
    </style:style>
    <style:style style:name="MP18" style:family="paragraph">
      <loext:graphic-properties draw:fill="none" draw:fill-color="#ffffff"/>
      <style:paragraph-properties fo:margin-left="0cm" fo:margin-right="0cm" fo:line-height="100%" fo:text-indent="0cm" style:line-break="strict" style:font-independent-line-spacing="true"/>
    </style:style>
    <style:style style:name="MP19" style:family="paragraph">
      <style:paragraph-properties fo:margin-left="0cm" fo:margin-right="0cm" fo:line-height="100%" fo:text-align="center" fo:text-indent="0cm" style:line-break="strict" style:writing-mode="lr-tb"/>
    </style:style>
    <style:style style:name="MP20" style:family="paragraph">
      <loext:graphic-properties draw:fill="none" draw:fill-color="#ffffff"/>
      <style:paragraph-properties fo:margin-left="0cm" fo:margin-right="0cm" fo:line-height="100%" fo:text-align="center" fo:text-indent="0cm" style:line-break="strict" style:font-independent-line-spacing="true"/>
    </style:style>
    <style:style style:name="MP21" style:family="paragraph">
      <style:paragraph-properties fo:margin-left="0cm" fo:margin-right="0cm" fo:line-height="100%" fo:text-align="end" fo:text-indent="0cm" style:line-break="strict" style:writing-mode="lr-tb"/>
    </style:style>
    <style:style style:name="MP22" style:family="paragraph">
      <loext:graphic-properties draw:fill="none" draw:fill-color="#ffffff"/>
      <style:paragraph-properties fo:margin-left="0cm" fo:margin-right="0cm" fo:line-height="100%" fo:text-align="end" fo:text-indent="0cm" style:line-break="strict" style:font-independent-line-spacing="true"/>
    </style:style>
    <style:style style:name="MP23" style:family="paragraph">
      <loext:graphic-properties draw:fill="solid" draw:fill-color="#3333cc"/>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2" style:font-size-asian="24pt" style:font-style-asian="normal" style:font-weight-asian="normal" style:font-name-complex="Lucida Sans Unicode1" style:font-size-complex="24pt" style:font-style-complex="normal" style:font-weight-complex="normal"/>
    </style:style>
    <style:style style:name="MP24" style:family="paragraph">
      <loext:graphic-properties draw:fill="gradient" draw:fill-gradient-name="Gradient_20_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2" style:font-size-asian="24pt" style:font-style-asian="normal" style:font-weight-asian="normal" style:font-name-complex="Lucida Sans Unicode1" style:font-size-complex="24pt" style:font-style-complex="normal" style:font-weight-complex="normal"/>
    </style:style>
    <style:style style:name="MP25" style:family="paragraph">
      <loext:graphic-properties draw:fill="solid" draw:fill-color="#ffcf0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2" style:font-size-asian="24pt" style:font-style-asian="normal" style:font-weight-asian="normal" style:font-name-complex="Lucida Sans Unicode1" style:font-size-complex="24pt" style:font-style-complex="normal" style:font-weight-complex="normal"/>
    </style:style>
    <style:style style:name="MP26" style:family="paragraph">
      <loext:graphic-properties draw:fill="gradient" draw:fill-gradient-name="Gradient_20_2"/>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2" style:font-size-asian="24pt" style:font-style-asian="normal" style:font-weight-asian="normal" style:font-name-complex="Lucida Sans Unicode1" style:font-size-complex="24pt" style:font-style-complex="normal" style:font-weight-complex="normal"/>
    </style:style>
    <style:style style:name="MP27" style:family="paragraph">
      <loext:graphic-properties draw:fill="gradient" draw:fill-gradient-name="Gradient_20_3"/>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2" style:font-size-asian="24pt" style:font-style-asian="normal" style:font-weight-asian="normal" style:font-name-complex="Lucida Sans Unicode1" style:font-size-complex="24pt" style:font-style-complex="normal" style:font-weight-complex="normal"/>
    </style:style>
    <style:style style:name="MP28" style:family="paragraph">
      <loext:graphic-properties draw:fill="solid" draw:fill-color="#1c1c1c"/>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2" style:font-size-asian="24pt" style:font-style-asian="normal" style:font-weight-asian="normal" style:font-name-complex="Lucida Sans Unicode1" style:font-size-complex="24pt" style:font-style-complex="normal" style:font-weight-complex="normal"/>
    </style:style>
    <style:style style:name="MP29" style:family="paragraph">
      <loext:graphic-properties draw:fill="gradient" draw:fill-gradient-name="Gradient_20_4"/>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2" style:font-size-asian="24pt" style:font-style-asian="normal" style:font-weight-asian="normal" style:font-name-complex="Lucida Sans Unicode1" style:font-size-complex="24pt" style:font-style-complex="normal" style:font-weight-complex="normal"/>
    </style:style>
    <style:style style:name="MP30" style:family="paragraph">
      <style:paragraph-properties fo:margin-left="0cm" fo:margin-right="0cm" fo:margin-top="0cm" fo:margin-bottom="0cm" fo:line-height="95%" fo:text-align="end" fo:text-indent="0cm" style:punctuation-wrap="simple" loext:tab-stop-distance="2.54cm" style:writing-mode="lr-tb">
        <style:tab-stops>
          <style:tab-stop style:position="0cm"/>
        </style:tab-stops>
      </style:paragraph-properties>
      <style:text-properties fo:font-size="18pt" fo:hyphenate="false"/>
    </style:style>
    <style:style style:name="MP31" style:family="paragraph">
      <loext:graphic-properties draw:fill="none"/>
      <style:paragraph-properties fo:margin-left="0cm" fo:margin-right="0cm" fo:margin-top="0cm" fo:margin-bottom="0cm" fo:line-height="95%" fo:text-align="end" fo:text-indent="0cm" style:punctuation-wrap="simple" loext:tab-stop-distance="2.54cm" style:writing-mode="lr-tb" style:font-independent-line-spacing="true">
        <style:tab-stops>
          <style:tab-stop style:position="0cm"/>
        </style:tab-stops>
      </style:paragraph-properties>
      <style:text-properties fo:font-size="18pt" fo:hyphenate="false"/>
    </style:style>
    <style:style style:name="MP32" style:family="paragraph">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fr" fo:country="FR" style:font-size-asian="14pt" style:font-size-complex="14pt"/>
    </style:style>
    <style:style style:name="MT3" style:family="text">
      <style:text-properties fo:font-size="14pt" fo:language="fr" fo:country="FR" style:font-name-asian="DejaVu Sans1" style:font-size-asian="14pt" style:font-name-complex="DejaVu Sans1" style:font-size-complex="14pt"/>
    </style:style>
    <style:style style:name="MT4" style:family="text">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3.499cm" svg:height="3.575cm" svg:x="3.033cm" svg:y="2.367cm" presentation:class="title" presentation:placeholder="true">
        <draw:text-box/>
      </draw:frame>
      <draw:frame presentation:style-name="Standard-outline1" draw:layer="backgroundobjects" svg:width="23.499cm" svg:height="12.18cm" svg:x="3.033cm" svg:y="6.283cm" presentation:class="outline" presentation:placeholder="true">
        <draw:text-box/>
      </draw:frame>
      <draw:g draw:style-name="Mgr3">
        <draw:g draw:style-name="Mgr3">
          <draw:custom-shape draw:style-name="Mgr4" draw:text-style-name="MP5" draw:layer="backgroundobjects" svg:width="1.204cm" svg:height="1.296cm" svg:x="0.807cm" svg:y="3.88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0.904cm" svg:height="1.296cm" svg:x="1.856cm" svg:y="3.881cm">
            <text:p/>
            <draw:enhanced-geometry svg:viewBox="0 0 21600 21600" draw:path-stretchpoint-x="10800" draw:path-stretchpoint-y="10800" draw:text-areas="?f3 ?f4 ?f5 ?f6" draw:type="round-rectangle" draw:modifiers="1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style-name="Mgr3">
          <draw:custom-shape draw:style-name="Mgr6" draw:text-style-name="MP7" draw:layer="backgroundobjects" svg:width="1.169cm" svg:height="1.301cm" svg:x="1.151cm" svg:y="5.04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1.019cm" svg:height="1.301cm" svg:x="2.165cm" svg:y="5.04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8" draw:text-style-name="MP9" draw:layer="backgroundobjects" svg:width="1.557cm" svg:height="1.169cm" svg:x="0cm" svg:y="4.837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0.088cm" svg:height="2.91cm" svg:x="1.764cm" svg:y="3.581cm">
          <text:p/>
          <draw:enhanced-geometry svg:viewBox="0 0 21600 21600" draw:path-stretchpoint-x="10800" draw:path-stretchpoint-y="10800" draw:text-areas="?f3 ?f4 ?f5 ?f6" draw:type="round-rectangle" draw:modifiers="10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24.125cm" svg:height="0.154cm" draw:transform="rotate (-3.14159265358979) translate (25.156cm 6.319cm)">
          <text:p/>
          <draw:enhanced-geometry svg:viewBox="0 0 21600 21600" draw:path-stretchpoint-x="10800" draw:path-stretchpoint-y="10800" draw:text-areas="?f3 ?f4 ?f5 ?f6" draw:type="round-rectangle" draw:modifiers="6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11" draw:text-style-name="MP13" draw:layer="backgroundobjects" svg:width="6.927cm" svg:height="1.455cm" svg:x="21.286cm" svg:y="19.125cm">
        <text:list text:style-name="ML1">
          <text:list-header>
            <text:p text:style-name="MP12"><text:span text:style-name="MT2"><text:page-number>&lt;numéro&gt;</text:page-number></text:span></text:p>
          </text:list-header>
        </text:list>
        <draw:enhanced-geometry svg:viewBox="0 0 21600 21600" draw:type="rectangle" draw:enhanced-path="M 0 0 L 21600 0 21600 21600 0 21600 0 0 Z N"/>
      </draw:custom-shape>
      <presentation:notes style:page-layout-name="PM0">
        <draw:rect draw:style-name="Mgr12" draw:text-style-name="MP14" draw:layer="backgroundobjects" svg:width="21cm" svg:height="29.7cm" svg:x="0cm" svg:y="0cm">
          <text:p/>
        </draw:rect>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5" draw:layer="backgroundobjects" svg:width="13.705cm" svg:height="10.279cm" svg:x="3.647cm" svg:y="2.853cm">
          <text:p/>
          <draw:enhanced-geometry svg:viewBox="0 0 21600 21600" draw:type="mso-spt202" draw:enhanced-path="M 0 0 L 21600 0 21600 21600 0 21600 0 0 Z N"/>
        </draw:custom-shape>
        <draw:frame presentation:style-name="Standard-notes" draw:layer="backgroundobjects" svg:width="14.362cm" svg:height="11.254cm" svg:x="3.25cm" svg:y="14.128cm" presentation:class="notes" presentation:placeholder="true">
          <draw:text-box/>
        </draw:frame>
        <draw:page-thumbnail presentation:style-name="Standard-title" draw:layer="backgroundobjects" svg:width="15.597cm" svg:height="10.985cm" svg:x="2.623cm" svg:y="2.258cm" presentation:class="page"/>
      </presentation:notes>
    </style:master-page>
    <style:master-page style:name="Titr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15" draw:text-style-name="MP16" draw:layer="backgroundobjects" svg:width="26.622cm" svg:height="3.985cm" svg:x="1.486cm" svg:y="0.545cm">
        <draw:text-box>
          <text:p/>
        </draw:text-box>
      </draw:frame>
      <draw:frame draw:style-name="Mgr16" draw:text-style-name="MP16" draw:layer="backgroundobjects" svg:width="26.622cm" svg:height="12.18cm" svg:x="1.486cm" svg:y="4.899cm">
        <draw:text-box>
          <text:p/>
        </draw:text-box>
      </draw:frame>
      <draw:frame draw:style-name="Mgr17" draw:text-style-name="MP18" draw:layer="backgroundobjects" svg:width="6.822cm" svg:height="1.35cm" svg:x="1.486cm" svg:y="19.124cm" presentation:class="date-time">
        <draw:text-box>
          <text:list text:style-name="ML1">
            <text:list-header>
              <text:p text:style-name="MP17"><text:span text:style-name="MT3"><presentation:date-time/></text:span></text:p>
            </text:list-header>
          </text:list>
        </draw:text-box>
      </draw:frame>
      <draw:frame draw:style-name="Mgr18" draw:text-style-name="MP20" draw:layer="backgroundobjects" svg:width="9.3cm" svg:height="1.35cm" svg:x="10.147cm" svg:y="19.124cm" presentation:class="footer">
        <draw:text-box>
          <text:list text:style-name="ML1">
            <text:list-header>
              <text:p text:style-name="MP19"><text:span text:style-name="MT3"><presentation:footer/></text:span></text:p>
            </text:list-header>
          </text:list>
        </draw:text-box>
      </draw:frame>
      <draw:frame draw:style-name="Mgr19" draw:text-style-name="MP22" draw:layer="backgroundobjects" svg:width="6.822cm" svg:height="1.35cm" svg:x="21.286cm" svg:y="19.124cm" presentation:class="page-number">
        <draw:text-box>
          <text:list text:style-name="ML1">
            <text:list-header>
              <text:p text:style-name="MP21"><text:span text:style-name="MT3"><text:page-number>&lt;numéro&gt;</text:page-number></text:span></text:p>
            </text:list-header>
          </text:list>
        </draw:text-box>
      </draw:frame>
      <presentation:notes style:page-layout-name="PM0">
        <draw:rect draw:style-name="Mgr12" draw:text-style-name="MP14" draw:layer="backgroundobjects" svg:width="21cm" svg:height="29.7cm" svg:x="0cm" svg:y="0cm">
          <text:p/>
        </draw:rect>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5" draw:layer="backgroundobjects" svg:width="13.705cm" svg:height="10.279cm" svg:x="3.647cm" svg:y="2.853cm">
          <text:p/>
          <draw:enhanced-geometry svg:viewBox="0 0 21600 21600" draw:type="mso-spt202" draw:enhanced-path="M 0 0 L 21600 0 21600 21600 0 21600 0 0 Z N"/>
        </draw:custom-shape>
        <draw:frame draw:style-name="Mgr20" draw:text-style-name="MP16" draw:layer="backgroundobjects" svg:width="14.362cm" svg:height="11.254cm" svg:x="3.25cm" svg:y="14.128cm">
          <draw:text-box>
            <text:p/>
          </draw:text-box>
        </draw:frame>
        <draw:page-thumbnail draw:style-name="standard" draw:layer="backgroundobjects" svg:width="15.597cm" svg:height="10.985cm" svg:x="2.623cm" svg:y="2.258cm" presentation:class="page"/>
      </presentation:notes>
    </style:master-page>
    <style:master-page style:name="Vide_5f_" style:display-name="Vide_" style:page-layout-name="PM1" draw:style-name="Mdp1">
      <loext:theme loext:name="Standard">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g draw:name="Groupe 3" draw:style-name="Mgr3">
        <draw:g draw:name="Groupe 4" draw:style-name="Mgr3">
          <draw:custom-shape draw:name="Forme libre 5" draw:style-name="Mgr21" draw:text-style-name="MP23" draw:layer="backgroundobjects" svg:width="1.203cm" svg:height="1.295cm" svg:x="0.807cm" svg:y="3.881cm">
            <text:p/>
            <draw:enhanced-geometry draw:mirror-horizontal="false" draw:mirror-vertical="false" svg:viewBox="0 0 0 0" draw:glue-points="?f99 0 ?f100 ?f101 ?f99 ?f102 0 ?f101" draw:text-areas="?f96 ?f96 ?f97 ?f98" draw:type="ooxml-non-primitive" draw:modifiers="78"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6" draw:style-name="Mgr22" draw:text-style-name="MP24" draw:layer="backgroundobjects" svg:width="0.903cm" svg:height="1.295cm" svg:x="1.856cm" svg:y="3.881cm">
            <text:p/>
            <draw:enhanced-geometry draw:mirror-horizontal="false" draw:mirror-vertical="false" svg:viewBox="0 0 0 0" draw:glue-points="?f99 0 ?f100 ?f101 ?f99 ?f102 0 ?f101" draw:text-areas="?f96 ?f96 ?f97 ?f98" draw:type="ooxml-non-primitive" draw:modifiers="104"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g draw:name="Groupe 7" draw:style-name="Mgr3">
          <draw:custom-shape draw:name="Forme libre 8" draw:style-name="Mgr23" draw:text-style-name="MP25" draw:layer="backgroundobjects" svg:width="1.168cm" svg:height="1.3cm" svg:x="1.151cm" svg:y="5.04cm">
            <text:p/>
            <draw:enhanced-geometry draw:mirror-horizontal="false" draw:mirror-vertical="false" svg:viewBox="0 0 0 0" draw:glue-points="?f99 0 ?f100 ?f101 ?f99 ?f102 0 ?f101" draw:text-areas="?f96 ?f96 ?f97 ?f98" draw:type="ooxml-non-primitive" draw:modifiers="81"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9" draw:style-name="Mgr24" draw:text-style-name="MP26" draw:layer="backgroundobjects" svg:width="1.018cm" svg:height="1.3cm" svg:x="2.165cm" svg:y="5.04cm">
            <text:p/>
            <draw:enhanced-geometry draw:mirror-horizontal="false" draw:mirror-vertical="false" svg:viewBox="0 0 0 0" draw:glue-points="?f99 0 ?f100 ?f101 ?f99 ?f102 0 ?f101" draw:text-areas="?f96 ?f96 ?f97 ?f98" draw:type="ooxml-non-primitive" draw:modifiers="93"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Forme libre 10" draw:style-name="Mgr25" draw:text-style-name="MP27" draw:layer="backgroundobjects" svg:width="1.556cm" svg:height="1.168cm" svg:x="0cm" svg:y="4.837cm">
          <text:p/>
          <draw:enhanced-geometry draw:mirror-horizontal="false" draw:mirror-vertical="false" svg:viewBox="0 0 0 0" draw:glue-points="?f99 0 ?f100 ?f101 ?f99 ?f102 0 ?f101" draw:text-areas="?f96 ?f96 ?f97 ?f98" draw:type="ooxml-non-primitive" draw:modifiers="81"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11" draw:style-name="Mgr26" draw:text-style-name="MP28" draw:layer="backgroundobjects" svg:width="0.087cm" svg:height="2.909cm" svg:x="1.764cm" svg:y="3.581cm">
          <text:p/>
          <draw:enhanced-geometry draw:mirror-horizontal="false" draw:mirror-vertical="false" svg:viewBox="0 0 0 0" draw:glue-points="?f99 0 ?f100 ?f101 ?f99 ?f102 0 ?f101" draw:text-areas="?f96 ?f96 ?f97 ?f98" draw:type="ooxml-non-primitive" draw:modifiers="1080"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12" draw:style-name="Mgr27" draw:text-style-name="MP29" draw:layer="backgroundobjects" svg:width="24.125cm" svg:height="0.153cm" draw:transform="rotate (-3.14159265358979) translate (25.157cm 6.319cm)">
          <text:p/>
          <draw:enhanced-geometry draw:mirror-horizontal="false" draw:mirror-vertical="false" svg:viewBox="0 0 0 0" draw:glue-points="?f99 0 ?f100 ?f101 ?f99 ?f102 0 ?f101" draw:text-areas="?f96 ?f96 ?f97 ?f98" draw:type="ooxml-non-primitive" draw:modifiers="635"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Forme libre 13" draw:style-name="Mgr28" draw:text-style-name="MP31" draw:layer="backgroundobjects" svg:width="6.926cm" svg:height="1.454cm" svg:x="21.286cm" svg:y="19.125cm">
        <text:p text:style-name="MP30"><text:span text:style-name="MT4"><text:page-number>&lt;numéro&gt;</text:page-number></text:span></text:p>
        <draw:enhanced-geometry draw:mirror-horizontal="false" draw:mirror-vertical="false" svg:viewBox="0 0 0 0" draw:glue-points="?f2 0 ?f3 ?f4 ?f2 ?f5 0 ?f4"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presentation:style-name="Vide_5f_-title" draw:layer="backgroundobjects" svg:width="26.729cm" svg:height="3.505cm" svg:x="1.484cm" svg:y="0.837cm" presentation:class="title" presentation:placeholder="true">
        <draw:text-box/>
      </draw:frame>
      <draw:frame presentation:style-name="Vide_5f_-outline1" draw:layer="backgroundobjects" svg:width="26.729cm" svg:height="12.179cm" svg:x="1.484cm" svg:y="4.913cm" presentation:class="outline" presentation:placeholder="true">
        <draw:text-box/>
      </draw:frame>
      <presentation:notes style:page-layout-name="PM0">
        <draw:page-thumbnail presentation:style-name="Vide_5f_-title" draw:layer="backgroundobjects" svg:width="0.048cm" svg:height="0.001cm" svg:x="0.001cm" svg:y="2.257cm" presentation:class="page"/>
        <draw:frame presentation:style-name="Vide_5f_-notes" draw:layer="backgroundobjects" svg:width="16.8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32"><text:span text:style-name="MT1"><presentation:header/></text:span></text:p>
          </draw:text-box>
        </draw:frame>
        <draw:frame presentation:style-name="Mpr1" draw:text-style-name="MP4" draw:layer="backgroundobjects" svg:width="9.113cm" svg:height="1.484cm" svg:x="11.886cm" svg:y="0cm" presentation:class="date-time">
          <draw:text-box>
            <text:p text:style-name="MP33"><text:span text:style-name="MT1"><presentation:date-time/></text:span></text:p>
          </draw:text-box>
        </draw:frame>
        <draw:frame presentation:style-name="Mpr2" draw:text-style-name="MP2" draw:layer="backgroundobjects" svg:width="9.113cm" svg:height="1.484cm" svg:x="0cm" svg:y="28.215cm" presentation:class="footer">
          <draw:text-box>
            <text:p text:style-name="MP32"><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Messagerie distribuée avec Kafka</dc:title>
    <dc:date>2026-05-04T17:07:51.026394904</dc:date>
    <meta:editing-cycles>3831</meta:editing-cycles>
    <meta:editing-duration>P74DT21H25M11S</meta:editing-duration>
    <meta:generator>LibreOffice/24.2.7.2$Linux_X86_64 LibreOffice_project/420$Build-2</meta:generator>
    <meta:print-date>2025-09-17T08:59:23.584446954</meta:print-date>
    <meta:printed-by>Fichiers PDF</meta:printed-by>
    <meta:document-statistic meta:object-count="1271"/>
  </office:meta>
</office:document-meta>
</file>