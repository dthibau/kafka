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nsolas2" svg:font-family="Consolas, Monaco, 'Andale Mono', 'Ubuntu Mono', monospac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Droid Sans Mono" svg:font-family="'Droid Sans Mono', monospace"/>
    <style:font-face style:name="Droid Sans Mono1" svg:font-family="'Droid Sans Mono', monospace, monospac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JetBrains Mono1" svg:font-family="'JetBrains Mono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Mono3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family-generic="system" style:font-pitch="variable"/>
    <style:font-face style:name="OpenSymbol3" svg:font-family="OpenSymbol" style:font-adornments="Regular" style:font-pitch="variable"/>
    <style:font-face style:name="OpenSymbol4" svg:font-family="OpenSymbol, 'Arial Unicode MS'" style:font-family-generic="system" style:font-pitch="variable"/>
    <style:font-face style:name="RedHatText" svg:font-family="RedHatText, helvetica, arial, sans-serif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inconsolata" svg:font-family="inconsolata, sans-serif"/>
    <style:font-face style:name="var font-mono" svg:font-family="'var font-mono'"/>
    <style:font-face style:name="var font-mono1" svg:font-family="'var font-mono'" style:font-family-generic="roman" style:font-pitch="variable"/>
  </office:font-face-decls>
  <office:automatic-styles>
    <style:style style:name="P1" style:family="paragraph" style:parent-style-name="Text_20_body">
      <style:text-properties officeooo:rsid="005c91dd" officeooo:paragraph-rsid="0076eb9f"/>
    </style:style>
    <style:style style:name="P2" style:family="paragraph" style:parent-style-name="Text_20_body">
      <style:text-properties fo:font-style="italic" officeooo:rsid="005c91dd" officeooo:paragraph-rsid="0076eb9f" style:font-style-asian="italic" style:font-style-complex="italic"/>
    </style:style>
    <style:style style:name="P3" style:family="paragraph" style:parent-style-name="Text_20_body">
      <style:text-properties fo:font-style="italic" officeooo:rsid="01a8bab4" officeooo:paragraph-rsid="01e526c1" style:font-style-asian="italic" style:font-style-complex="italic"/>
    </style:style>
    <style:style style:name="P4" style:family="paragraph" style:parent-style-name="Text_20_body">
      <style:text-properties fo:font-style="italic" style:text-underline-style="none" style:font-style-asian="italic" style:font-style-complex="italic"/>
    </style:style>
    <style:style style:name="P5" style:family="paragraph" style:parent-style-name="Text_20_body">
      <style:text-properties fo:font-style="italic" fo:font-weight="bold" officeooo:rsid="01beba6f" officeooo:paragraph-rsid="01beba6f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fo:font-style="italic" fo:font-weight="bold" officeooo:rsid="01e600e1" officeooo:paragraph-rsid="01e600e1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fo:font-style="italic" fo:font-weight="bold" officeooo:rsid="01c84eaa" officeooo:paragraph-rsid="01c84eaa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fo:font-style="italic" fo:font-weight="normal" officeooo:rsid="00dd3f97" officeooo:paragraph-rsid="0182dce3" style:font-style-asian="italic" style:font-weight-asian="normal" style:font-style-complex="italic" style:font-weight-complex="normal"/>
    </style:style>
    <style:style style:name="P10" style:family="paragraph" style:parent-style-name="Text_20_body">
      <style:text-properties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style="normal" fo:font-weight="normal" officeooo:rsid="011152ad" officeooo:paragraph-rsid="00ce615c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normal" officeooo:rsid="011152ad" officeooo:paragraph-rsid="0182dce3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normal" officeooo:rsid="00cd76d4" officeooo:paragraph-rsid="017c14fa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17c63d6" officeooo:paragraph-rsid="017c63d6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17c63d6" officeooo:paragraph-rsid="0180917a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182dce3" officeooo:paragraph-rsid="0182dce3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normal" officeooo:rsid="00dd3f97" officeooo:paragraph-rsid="0182dce3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15fbfae" officeooo:paragraph-rsid="01a4cc4c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1a4cc4c" officeooo:paragraph-rsid="01a4cc4c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19a2dc4" officeooo:paragraph-rsid="019e1818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normal" officeooo:rsid="01beba6f" officeooo:paragraph-rsid="01beba6f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fo:font-weight="normal" officeooo:rsid="01f55303" officeooo:paragraph-rsid="01f55303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officeooo:rsid="00e5cefd" officeooo:paragraph-rsid="00e12903" style:font-style-asian="normal" style:font-style-complex="normal"/>
    </style:style>
    <style:style style:name="P24" style:family="paragraph" style:parent-style-name="Text_20_body">
      <style:text-properties fo:font-style="normal" officeooo:rsid="00e03516" officeooo:paragraph-rsid="019e1818" style:font-style-asian="normal" style:font-style-complex="normal"/>
    </style:style>
    <style:style style:name="P25" style:family="paragraph" style:parent-style-name="Text_20_body">
      <style:text-properties fo:font-style="normal" officeooo:rsid="019e1818" officeooo:paragraph-rsid="019e1818" style:font-style-asian="normal" style:font-style-complex="normal"/>
    </style:style>
    <style:style style:name="P26" style:family="paragraph" style:parent-style-name="Text_20_body">
      <style:text-properties fo:font-style="normal" style:text-underline-style="solid" style:text-underline-width="auto" style:text-underline-color="font-color" fo:font-weight="normal" officeooo:rsid="017c63d6" officeooo:paragraph-rsid="017c63d6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style:font-name="Times New Roman" fo:font-size="12pt" fo:font-style="normal" style:text-underline-style="none" fo:font-weight="normal" officeooo:rsid="017c14fa" officeooo:paragraph-rsid="017c14fa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text-properties style:font-name="Times New Roman" fo:font-size="12pt" fo:font-style="normal" style:text-underline-style="none" fo:font-weight="normal" officeooo:rsid="019e1818" officeooo:paragraph-rsid="019e181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9" style:family="paragraph" style:parent-style-name="Text_20_body">
      <style:text-properties style:font-name="Times New Roman" fo:font-size="12pt" fo:font-style="normal" fo:font-weight="normal" officeooo:rsid="01870321" officeooo:paragraph-rsid="01870321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style:font-name="Times New Roman" fo:font-size="12pt" fo:font-style="italic" fo:font-weight="normal" officeooo:rsid="00a5219a" officeooo:paragraph-rsid="0182e9eb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Text_20_body">
      <style:text-properties style:font-name="Times New Roman" fo:font-size="12pt" fo:font-style="italic" fo:font-weight="bold" officeooo:rsid="00d240a6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32" style:family="paragraph" style:parent-style-name="Text_20_body">
      <style:text-properties style:font-name="Times New Roman" fo:font-size="11.8000001907349pt" fo:font-weight="normal" officeooo:rsid="01081e95" officeooo:paragraph-rsid="01081e95" style:font-size-asian="11.8000001907349pt" style:font-weight-asian="normal" style:font-size-complex="11.8000001907349pt" style:font-weight-complex="normal"/>
    </style:style>
    <style:style style:name="P33" style:family="paragraph" style:parent-style-name="Text_20_body">
      <style:text-properties style:font-name="Times New Roman" fo:font-size="11.8000001907349pt" fo:font-weight="normal" officeooo:rsid="01081e95" officeooo:paragraph-rsid="0225956e" style:font-size-asian="11.8000001907349pt" style:font-weight-asian="normal" style:font-size-complex="11.8000001907349pt" style:font-weight-complex="normal"/>
    </style:style>
    <style:style style:name="P34" style:family="paragraph" style:parent-style-name="Text_20_body">
      <style:text-properties style:font-name="Times New Roman" fo:font-size="11.8000001907349pt" fo:font-weight="normal" officeooo:rsid="01dd64d9" officeooo:paragraph-rsid="01dd64d9" style:font-size-asian="11.8000001907349pt" style:font-weight-asian="normal" style:font-size-complex="11.8000001907349pt" style:font-weight-complex="normal"/>
    </style:style>
    <style:style style:name="P35" style:family="paragraph" style:parent-style-name="Text_20_body">
      <style:text-properties style:font-name="Times New Roman" fo:font-size="11.8000001907349pt" fo:font-weight="normal" officeooo:rsid="00fc47ef" officeooo:paragraph-rsid="0103065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6" style:family="paragraph" style:parent-style-name="Text_20_body">
      <style:text-properties style:font-name="Times New Roman" fo:font-size="11.8000001907349pt" fo:font-weight="normal" officeooo:rsid="00fc47ef" officeooo:paragraph-rsid="0152128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7" style:family="paragraph" style:parent-style-name="Text_20_body">
      <style:text-properties style:font-name="Times New Roman" fo:font-size="11.8000001907349pt" fo:font-weight="normal" officeooo:rsid="01041c13" officeooo:paragraph-rsid="01041c1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8" style:family="paragraph" style:parent-style-name="Text_20_body">
      <style:text-properties style:font-name="Times New Roman" fo:font-size="11.8000001907349pt" fo:font-weight="normal" officeooo:rsid="01171120" officeooo:paragraph-rsid="01aec918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9" style:family="paragraph" style:parent-style-name="Text_20_body">
      <style:text-properties style:font-name="Times New Roman" fo:font-size="11.8000001907349pt" fo:font-weight="normal" officeooo:rsid="01b2b0c8" officeooo:paragraph-rsid="01b2b0c8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0" style:family="paragraph" style:parent-style-name="Text_20_body">
      <style:text-properties style:font-name="Times New Roman" fo:font-size="11.8000001907349pt" fo:font-weight="normal" officeooo:rsid="01b2b0c8" officeooo:paragraph-rsid="01c8c640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1" style:family="paragraph" style:parent-style-name="Text_20_body">
      <style:text-properties style:font-name="Times New Roman" fo:font-size="11.8000001907349pt" fo:font-weight="normal" officeooo:rsid="01c8c640" officeooo:paragraph-rsid="01c8c640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2" style:family="paragraph" style:parent-style-name="Text_20_body">
      <style:text-properties style:font-name="Times New Roman" fo:font-size="11.8000001907349pt" fo:font-weight="normal" officeooo:rsid="0106ea35" officeooo:paragraph-rsid="0106ea35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3" style:family="paragraph" style:parent-style-name="Text_20_body">
      <style:text-properties style:font-name="Times New Roman" fo:font-size="11.8000001907349pt" fo:font-weight="normal" officeooo:rsid="0225956e" officeooo:paragraph-rsid="0225956e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4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81477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45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1e7f9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46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97bd3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47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a1c56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48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cc1945" officeooo:paragraph-rsid="01cc1945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49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cd9776" officeooo:paragraph-rsid="01cd9776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50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1aec918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51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212d54e" officeooo:paragraph-rsid="0212d54e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52" style:family="paragraph" style:parent-style-name="Text_20_body">
      <style:text-properties style:font-name="Times New Roman" fo:font-weight="normal" officeooo:rsid="0106ea35" officeooo:paragraph-rsid="0106ea35" style:font-weight-asian="normal" style:font-weight-complex="normal"/>
    </style:style>
    <style:style style:name="P53" style:family="paragraph" style:parent-style-name="Text_20_body">
      <style:text-properties style:font-name="Times New Roman" fo:font-weight="normal" officeooo:paragraph-rsid="01e064eb"/>
    </style:style>
    <style:style style:name="P54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55" style:family="paragraph" style:parent-style-name="Text_20_body">
      <style:text-properties style:text-underline-style="solid" style:text-underline-width="auto" style:text-underline-color="font-color" fo:font-weight="bold" officeooo:paragraph-rsid="0182e9eb" style:font-weight-asian="bold" style:font-weight-complex="bold"/>
    </style:style>
    <style:style style:name="P56" style:family="paragraph" style:parent-style-name="Standard">
      <style:text-properties style:text-underline-style="solid" style:text-underline-width="auto" style:text-underline-color="font-color" officeooo:rsid="01e339e5" officeooo:paragraph-rsid="01e339e5"/>
    </style:style>
    <style:style style:name="P57" style:family="paragraph" style:parent-style-name="Text_20_body">
      <style:text-properties style:text-underline-style="solid" style:text-underline-width="auto" style:text-underline-color="font-color" officeooo:rsid="0214c47c" officeooo:paragraph-rsid="01f67752"/>
    </style:style>
    <style:style style:name="P58" style:family="paragraph" style:parent-style-name="Standard">
      <style:text-properties style:text-underline-style="solid" style:text-underline-width="auto" style:text-underline-color="font-color" officeooo:rsid="02327a09" officeooo:paragraph-rsid="02327a09"/>
    </style:style>
    <style:style style:name="P59" style:family="paragraph" style:parent-style-name="Standard">
      <style:text-properties style:font-name="Courier New" fo:font-size="10pt" officeooo:rsid="01e600e1" officeooo:paragraph-rsid="01e6888c"/>
    </style:style>
    <style:style style:name="P60" style:family="paragraph" style:parent-style-name="Standard">
      <style:text-properties style:font-name="Courier New" fo:font-size="10pt" officeooo:rsid="01e600e1" officeooo:paragraph-rsid="01e600e1"/>
    </style:style>
    <style:style style:name="P61" style:family="paragraph" style:parent-style-name="Text_20_body">
      <style:text-properties style:font-name="Courier New" officeooo:rsid="0106ea35" officeooo:paragraph-rsid="0106ea35"/>
    </style:style>
    <style:style style:name="P6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63" style:family="paragraph" style:parent-style-name="Text_20_body">
      <style:text-properties style:font-name="Courier New" fo:font-size="8pt"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64" style:family="paragraph" style:parent-style-name="Text_20_body">
      <style:text-properties style:font-name="Courier New" fo:font-size="8pt" fo:font-style="normal" fo:font-weight="normal" officeooo:rsid="00ce615c" officeooo:paragraph-rsid="00dd3f97" style:font-style-asian="normal" style:font-weight-asian="normal" style:font-style-complex="normal" style:font-weight-complex="normal"/>
    </style:style>
    <style:style style:name="P65" style:family="paragraph" style:parent-style-name="Text_20_body">
      <style:text-properties style:font-name="Courier New" fo:font-size="8pt" fo:font-style="normal" fo:font-weight="normal" officeooo:rsid="00ce615c" style:font-style-asian="normal" style:font-weight-asian="normal" style:font-style-complex="normal" style:font-weight-complex="normal"/>
    </style:style>
    <style:style style:name="P6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fo:font-style="normal" fo:font-weight="normal" officeooo:rsid="01bcb8d3" officeooo:paragraph-rsid="01bcb8d3" style:font-style-asian="normal" style:font-weight-asian="normal" style:font-style-complex="normal" style:font-weight-complex="normal"/>
    </style:style>
    <style:style style:name="P67" style:family="paragraph" style:parent-style-name="Text_20_body">
      <style:text-properties style:font-name="Courier New" fo:font-size="8pt" fo:font-style="normal" fo:font-weight="normal" officeooo:rsid="0241a9a2" officeooo:paragraph-rsid="0241a9a2" style:font-style-asian="normal" style:font-weight-asian="normal" style:font-style-complex="normal" style:font-weight-complex="normal"/>
    </style:style>
    <style:style style:name="P68" style:family="paragraph" style:parent-style-name="Text_20_body">
      <style:text-properties style:font-name="Courier New" officeooo:paragraph-rsid="0182e9eb"/>
    </style:style>
    <style:style style:name="P69" style:family="paragraph" style:parent-style-name="Text_20_body">
      <style:text-properties style:font-name="Arial1" fo:font-size="11.8000001907349pt" fo:font-weight="bold" officeooo:rsid="0106ea35" officeooo:paragraph-rsid="0106ea35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70" style:family="paragraph" style:parent-style-name="Text_20_body">
      <style:text-properties style:font-name="Arial1" fo:font-size="11.8000001907349pt" fo:font-weight="bold" officeooo:rsid="01030653" officeooo:paragraph-rsid="01030653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71" style:family="paragraph" style:parent-style-name="Text_20_body">
      <style:text-properties style:font-name="Arial1" fo:font-size="11.8000001907349pt" fo:font-weight="bold" officeooo:rsid="0182e9eb" officeooo:paragraph-rsid="0182e9eb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72" style:family="paragraph" style:parent-style-name="Text_20_body">
      <style:text-properties style:font-name="Arial1" fo:font-size="11.8000001907349pt" fo:font-weight="bold" officeooo:rsid="00a76619" officeooo:paragraph-rsid="0182e9eb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73" style:family="paragraph" style:parent-style-name="Text_20_body">
      <style:text-properties style:font-name="Arial1" fo:font-size="11.8000001907349pt" fo:font-style="italic" fo:font-weight="bold" officeooo:rsid="0106ea35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P74" style:family="paragraph" style:parent-style-name="Text_20_body">
      <style:text-properties style:font-name="Arial1" fo:font-size="11.8999996185303pt" fo:font-style="italic" fo:font-weight="bold" officeooo:rsid="00cf3b2e" officeooo:paragraph-rsid="00705e42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75" style:family="paragraph" style:parent-style-name="Text_20_body">
      <style:text-properties style:font-name="Arial1" fo:font-weight="bold" officeooo:rsid="01afc20c" officeooo:paragraph-rsid="01afc20c" style:font-weight-asian="bold" style:font-weight-complex="bold"/>
    </style:style>
    <style:style style:name="P76" style:family="paragraph" style:parent-style-name="Text_20_body">
      <style:text-properties officeooo:rsid="00e03516" officeooo:paragraph-rsid="00e03516"/>
    </style:style>
    <style:style style:name="P77" style:family="paragraph" style:parent-style-name="Text_20_body">
      <style:text-properties officeooo:rsid="01030653" officeooo:paragraph-rsid="01030653"/>
    </style:style>
    <style:style style:name="P78" style:family="paragraph" style:parent-style-name="Text_20_body">
      <style:text-properties officeooo:rsid="0106ea35" officeooo:paragraph-rsid="0106ea35"/>
    </style:style>
    <style:style style:name="P79" style:family="paragraph" style:parent-style-name="Text_20_body">
      <style:text-properties officeooo:rsid="010714ca" officeooo:paragraph-rsid="010714ca"/>
    </style:style>
    <style:style style:name="P80" style:family="paragraph" style:parent-style-name="Text_20_body">
      <style:text-properties officeooo:paragraph-rsid="01081e95"/>
    </style:style>
    <style:style style:name="P81" style:family="paragraph" style:parent-style-name="Text_20_body">
      <style:text-properties fo:color="#000000" loext:opacity="100%" style:font-name="Times New Roman" fo:font-size="12pt" officeooo:rsid="0190248e" officeooo:paragraph-rsid="019127c0" fo:background-color="transparent" style:font-size-asian="12pt" style:font-size-complex="12pt"/>
    </style:style>
    <style:style style:name="P82" style:family="paragraph" style:parent-style-name="Text_20_body">
      <style:text-properties fo:color="#000000" loext:opacity="100%" style:font-name="Times New Roman" fo:font-size="12pt" officeooo:rsid="018e3abc" officeooo:paragraph-rsid="019127c0" fo:background-color="transparent" style:font-size-asian="12pt" style:font-size-complex="12pt"/>
    </style:style>
    <style:style style:name="P83" style:family="paragraph" style:parent-style-name="Text_20_body">
      <style:text-properties fo:color="#000000" loext:opacity="100%" style:font-name="Times New Roman" fo:font-size="12pt" officeooo:rsid="019556e0" officeooo:paragraph-rsid="019556e0" fo:background-color="transparent" style:font-size-asian="12pt" style:font-size-complex="12pt"/>
    </style:style>
    <style:style style:name="P84" style:family="paragraph" style:parent-style-name="Text_20_body">
      <style:text-properties fo:color="#000000" loext:opacity="100%" style:font-name="Times New Roman" fo:font-size="12pt" fo:font-style="italic" fo:font-weight="bold" officeooo:rsid="0190248e" officeooo:paragraph-rsid="019127c0" fo:background-color="transparent" style:font-size-asian="12pt" style:font-style-asian="italic" style:font-weight-asian="bold" style:font-size-complex="12pt" style:font-style-complex="italic" style:font-weight-complex="bold"/>
    </style:style>
    <style:style style:name="P85" style:family="paragraph" style:parent-style-name="Text_20_body">
      <style:text-properties fo:color="#000000" loext:opacity="100%" style:font-name="Times New Roman" fo:font-size="12pt" fo:font-style="italic" fo:font-weight="bold" officeooo:rsid="0190248e" officeooo:paragraph-rsid="019e1818" fo:background-color="transparent" style:font-size-asian="12pt" style:font-style-asian="italic" style:font-weight-asian="bold" style:font-size-complex="12pt" style:font-style-complex="italic" style:font-weight-complex="bold"/>
    </style:style>
    <style:style style:name="P86" style:family="paragraph" style:parent-style-name="Text_20_body">
      <style:text-properties fo:color="#000000" loext:opacity="100%" style:font-name="Times New Roman" fo:font-size="12pt" fo:font-style="italic" style:text-underline-style="none" fo:font-weight="bold" officeooo:rsid="0190248e" officeooo:paragraph-rsid="019fc817" fo:background-color="transparent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87" style:family="paragraph" style:parent-style-name="Standard">
      <style:text-properties fo:color="#000000" loext:opacity="100%" style:font-name="Times New Roman" fo:font-size="12pt" fo:font-style="normal" style:text-underline-style="none" fo:font-weight="normal" officeooo:rsid="01830471" officeooo:paragraph-rsid="01830471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1830471" officeooo:paragraph-rsid="01830471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0d240a6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0d21738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ext_20_body">
      <style:text-properties fo:color="#000000" loext:opacity="100%" style:font-name="Times New Roman" fo:font-size="12pt" fo:font-style="normal" style:text-underline-style="solid" style:text-underline-width="auto" style:text-underline-color="font-color" fo:font-weight="normal" officeooo:rsid="017c63d6" officeooo:paragraph-rsid="017c63d6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text-properties fo:color="#000000" loext:opacity="100%" style:font-name="Times New Roman" fo:font-size="11.8999996185303pt" fo:font-style="normal" fo:font-weight="normal" officeooo:rsid="01a49154" officeooo:paragraph-rsid="01a49154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93" style:family="paragraph" style:parent-style-name="Standard">
      <style:text-properties fo:color="#000000" loext:opacity="100%" style:font-name="Times New Roman" fo:font-size="11.8999996185303pt" fo:font-style="italic" fo:font-weight="bold" officeooo:rsid="01a49154" officeooo:paragraph-rsid="01a49154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94" style:family="paragraph" style:parent-style-name="Text_20_body">
      <style:text-properties fo:color="#000000" loext:opacity="100%" style:font-name="Times New Roman" fo:font-size="11.8999996185303pt" fo:font-style="italic" fo:font-weight="bold" officeooo:rsid="01a49154" officeooo:paragraph-rsid="0207dd43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95" style:family="paragraph" style:parent-style-name="Standard">
      <style:text-properties fo:color="#000000" loext:opacity="100%" style:font-name="Times New Roman" fo:font-size="11.8000001907349pt" fo:font-style="italic" fo:font-weight="normal" officeooo:rsid="01cd9776" officeooo:paragraph-rsid="01d0aff0" fo:background-color="#ffffff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96" style:family="paragraph" style:parent-style-name="Text_20_body">
      <style:text-properties fo:color="#000000" loext:opacity="100%" style:font-name="Arial1" fo:font-size="10.5pt" fo:font-style="italic" style:text-underline-style="none" fo:font-weight="bold" officeooo:rsid="015ccb1c" officeooo:paragraph-rsid="015ccb1c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P97" style:family="paragraph" style:parent-style-name="Text_20_body">
      <style:text-properties fo:color="#000000" loext:opacity="100%" style:font-name="Arial1" fo:font-size="10.5pt" fo:font-style="italic" style:text-underline-style="none" fo:font-weight="normal" officeooo:rsid="015ccb1c" officeooo:paragraph-rsid="015ccb1c" style:font-name-asian="WenQuanYi Micro Hei" style:font-size-asian="14pt" style:font-style-asian="italic" style:font-weight-asian="normal" style:font-name-complex="Lohit Hindi2" style:font-size-complex="14pt" style:font-style-complex="italic" style:font-weight-complex="normal" style:text-overline-style="none" style:text-overline-color="font-color"/>
    </style:style>
    <style:style style:name="P98" style:family="paragraph" style:parent-style-name="Text_20_body">
      <style:text-properties fo:color="#000000" loext:opacity="100%" style:font-name="Arial1" fo:font-size="10.5pt" fo:font-style="normal" style:text-underline-style="none" fo:font-weight="normal" officeooo:rsid="01870321" officeooo:paragraph-rsid="01870321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99" style:family="paragraph" style:parent-style-name="Text_20_body">
      <style:text-properties fo:color="#000000" loext:opacity="100%" style:font-name="Arial1" fo:font-size="10.5pt" fo:font-style="normal" style:text-underline-style="none" fo:font-weight="normal" officeooo:rsid="02426d6a" officeooo:paragraph-rsid="02426d6a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100" style:family="paragraph" style:parent-style-name="Text_20_body">
      <style:text-properties fo:color="#000000" loext:opacity="100%" style:font-name="Courier New" fo:font-size="10.5pt" fo:font-style="normal" style:text-underline-style="none" fo:font-weight="normal" officeooo:rsid="01870321" officeooo:paragraph-rsid="01870321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1.8999996185303pt" style:font-name-asian="WenQuanYi Micro Hei" style:font-size-asian="11.8999996185303pt" style:font-name-complex="Lohit Hindi2" style:font-size-complex="11.8999996185303pt"/>
    </style:style>
    <style:style style:name="P102" style:family="paragraph" style:parent-style-name="Standard">
      <style:text-properties officeooo:rsid="0002d88f" officeooo:paragraph-rsid="006f4cb2"/>
    </style:style>
    <style:style style:name="P103" style:family="paragraph" style:parent-style-name="Text_20_body">
      <style:text-properties fo:font-weight="bold" officeooo:rsid="018cbe8f" officeooo:paragraph-rsid="018dfa69" style:font-weight-asian="bold" style:font-weight-complex="bold"/>
    </style:style>
    <style:style style:name="P104" style:family="paragraph" style:parent-style-name="Standard">
      <style:text-properties fo:font-size="11.8999996185303pt" style:font-name-asian="WenQuanYi Micro Hei" style:font-size-asian="11.8999996185303pt" style:font-name-complex="Lohit Hindi2" style:font-size-complex="11.8999996185303pt"/>
    </style:style>
    <style:style style:name="P105" style:family="paragraph" style:parent-style-name="Standard">
      <style:text-properties fo:font-size="11.8999996185303pt" fo:font-weight="normal" officeooo:rsid="01a3ac4f" style:font-name-asian="WenQuanYi Micro Hei" style:font-size-asian="11.8999996185303pt" style:font-weight-asian="normal" style:font-name-complex="Lohit Hindi2" style:font-size-complex="11.8999996185303pt" style:font-weight-complex="normal"/>
    </style:style>
    <style:style style:name="P106" style:family="paragraph" style:parent-style-name="Standard">
      <style:text-properties fo:font-size="11.8999996185303pt" fo:font-style="normal" fo:font-weight="normal" officeooo:rsid="01c31d8c" officeooo:paragraph-rsid="01a4cc4c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07" style:family="paragraph" style:parent-style-name="Standard">
      <style:text-properties officeooo:rsid="015fbfae" officeooo:paragraph-rsid="015fbfae"/>
    </style:style>
    <style:style style:name="P108" style:family="paragraph" style:parent-style-name="Title">
      <style:paragraph-properties fo:text-align="center" style:justify-single-word="false"/>
      <style:text-properties fo:font-size="18pt" officeooo:paragraph-rsid="006f4cb2" style:font-size-asian="18pt" style:font-size-complex="18pt"/>
    </style:style>
    <style:style style:name="P109" style:family="paragraph" style:parent-style-name="Text_20_body">
      <style:text-properties officeooo:paragraph-rsid="0182e9eb"/>
    </style:style>
    <style:style style:name="P110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rsid="00a2819c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11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rsid="00a5219a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12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paragraph-rsid="0182e9eb" style:font-size-asian="12pt" style:font-weight-asian="normal" style:font-size-complex="12pt" style:font-weight-complex="normal"/>
    </style:style>
    <style:style style:name="P113" style:family="paragraph" style:parent-style-name="Preformatted_20_Text">
      <style:text-properties fo:font-variant="normal" fo:text-transform="none" fo:color="#000000" loext:opacity="100%" style:font-name="Liberation Sans1" fo:font-size="12pt" fo:letter-spacing="normal" fo:font-style="normal" fo:font-weight="normal" officeooo:rsid="00a2819c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14" style:family="paragraph" style:parent-style-name="Preformatted_20_Text">
      <style:text-properties fo:font-variant="normal" fo:text-transform="none" fo:color="#000000" loext:opacity="100%" style:font-name="Liberation Sans1" fo:font-size="12pt" fo:letter-spacing="normal" fo:font-style="normal" fo:font-weight="normal" officeooo:rsid="00a5219a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15" style:family="paragraph" style:parent-style-name="Preformatted_20_Text">
      <style:text-properties fo:font-variant="normal" fo:text-transform="none" fo:color="#000000" loext:opacity="100%" style:font-name="Liberation Sans1" fo:font-size="12pt" fo:letter-spacing="normal" fo:font-style="normal" style:text-underline-style="solid" style:text-underline-width="auto" style:text-underline-color="font-color" fo:font-weight="bold" officeooo:rsid="00a5219a" officeooo:paragraph-rsid="0182e9eb" style:font-name-asian="Droid Sans Fallback1" style:font-size-asian="12pt" style:font-weight-asian="bold" style:font-name-complex="FreeSans" style:font-size-complex="12pt" style:font-weight-complex="bold"/>
    </style:style>
    <style:style style:name="P116" style:family="paragraph" style:parent-style-name="Text_20_body">
      <style:text-properties fo:font-variant="normal" fo:text-transform="none" fo:color="#000000" loext:opacity="100%" style:text-line-through-style="none" style:text-line-through-type="none" style:font-name="inconsolata" fo:font-size="10pt" fo:letter-spacing="normal" fo:font-style="normal" style:text-underline-style="none" fo:font-weight="normal" officeooo:rsid="01081e95" officeooo:paragraph-rsid="01081e95" style:text-blinking="false" style:font-size-asian="10pt" style:font-size-complex="10pt" loext:padding="0cm" loext:border="none"/>
    </style:style>
    <style:style style:name="P117" style:family="paragraph" style:parent-style-name="Text_20_body">
      <style:text-properties fo:font-size="12pt" fo:font-weight="normal" officeooo:rsid="00d311f0" officeooo:paragraph-rsid="0182e9eb" style:font-size-asian="12pt" style:font-weight-asian="normal" style:font-size-complex="12pt" style:font-weight-complex="normal"/>
    </style:style>
    <style:style style:name="P118" style:family="paragraph" style:parent-style-name="Text_20_body">
      <style:text-properties fo:font-size="12pt" fo:font-weight="normal" officeooo:rsid="00a5219a" officeooo:paragraph-rsid="0182e9eb" style:font-size-asian="12pt" style:font-weight-asian="normal" style:font-size-complex="12pt" style:font-weight-complex="normal"/>
    </style:style>
    <style:style style:name="P119" style:family="paragraph" style:parent-style-name="Text_20_body">
      <style:text-properties officeooo:rsid="00cd76d4" officeooo:paragraph-rsid="00cd76d4"/>
    </style:style>
    <style:style style:name="P120" style:family="paragraph" style:parent-style-name="Text_20_body">
      <style:text-properties officeooo:rsid="017c14fa" officeooo:paragraph-rsid="017c14fa"/>
    </style:style>
    <style:style style:name="P121" style:family="paragraph" style:parent-style-name="Text_20_body">
      <style:text-properties officeooo:rsid="00d311f0" officeooo:paragraph-rsid="0182e9eb"/>
    </style:style>
    <style:style style:name="P122" style:family="paragraph" style:parent-style-name="Text_20_body">
      <style:text-properties officeooo:rsid="00d4e481" officeooo:paragraph-rsid="0182e9eb"/>
    </style:style>
    <style:style style:name="P123" style:family="paragraph" style:parent-style-name="Text_20_body">
      <style:text-properties officeooo:rsid="00a76619" officeooo:paragraph-rsid="0182e9eb"/>
    </style:style>
    <style:style style:name="P124" style:family="paragraph" style:parent-style-name="Text_20_body">
      <style:text-properties officeooo:rsid="018cbe8f" officeooo:paragraph-rsid="018cbe8f"/>
    </style:style>
    <style:style style:name="P125" style:family="paragraph" style:parent-style-name="Text_20_body">
      <style:text-properties officeooo:rsid="018cbe8f" officeooo:paragraph-rsid="019838fd"/>
    </style:style>
    <style:style style:name="P126" style:family="paragraph" style:parent-style-name="Standard">
      <style:text-properties officeooo:paragraph-rsid="0080df97"/>
    </style:style>
    <style:style style:name="P127" style:family="paragraph" style:parent-style-name="Text_20_body">
      <style:text-properties officeooo:rsid="019127c0" officeooo:paragraph-rsid="019127c0"/>
    </style:style>
    <style:style style:name="P128" style:family="paragraph" style:parent-style-name="Text_20_body">
      <style:text-properties officeooo:rsid="019838fd" officeooo:paragraph-rsid="019838fd"/>
    </style:style>
    <style:style style:name="P129" style:family="paragraph" style:parent-style-name="Text_20_body">
      <style:text-properties officeooo:rsid="019838fd" officeooo:paragraph-rsid="019b665f"/>
    </style:style>
    <style:style style:name="P130" style:family="paragraph" style:parent-style-name="Standard">
      <style:text-properties officeooo:rsid="00ce615c" officeooo:paragraph-rsid="00ea8470"/>
    </style:style>
    <style:style style:name="P131" style:family="paragraph" style:parent-style-name="Standard">
      <style:text-properties officeooo:paragraph-rsid="01a3e481"/>
    </style:style>
    <style:style style:name="P132" style:family="paragraph" style:parent-style-name="Standard">
      <style:text-properties officeooo:rsid="01a3e481" officeooo:paragraph-rsid="01a4cc4c"/>
    </style:style>
    <style:style style:name="P133" style:family="paragraph" style:parent-style-name="Standard">
      <style:text-properties officeooo:rsid="01a49154" officeooo:paragraph-rsid="01a49154"/>
    </style:style>
    <style:style style:name="P134" style:family="paragraph" style:parent-style-name="Text_20_body">
      <style:text-properties officeooo:rsid="01a49154" officeooo:paragraph-rsid="02046e19"/>
    </style:style>
    <style:style style:name="P135" style:family="paragraph" style:parent-style-name="Standard">
      <style:text-properties officeooo:paragraph-rsid="01a4cc4c"/>
    </style:style>
    <style:style style:name="P136" style:family="paragraph" style:parent-style-name="Standard">
      <style:text-properties officeooo:rsid="01d00433" officeooo:paragraph-rsid="01d00433"/>
    </style:style>
    <style:style style:name="P137" style:family="paragraph" style:parent-style-name="Text_20_body">
      <style:text-properties officeooo:rsid="019e1818" officeooo:paragraph-rsid="019e1818"/>
    </style:style>
    <style:style style:name="P138" style:family="paragraph" style:parent-style-name="Text_20_body">
      <style:text-properties officeooo:paragraph-rsid="00e5cefd"/>
    </style:style>
    <style:style style:name="P139" style:family="paragraph" style:parent-style-name="Text_20_body">
      <style:text-properties officeooo:rsid="01a0b522" officeooo:paragraph-rsid="01a0b522"/>
    </style:style>
    <style:style style:name="P140" style:family="paragraph" style:parent-style-name="Text_20_body">
      <style:text-properties officeooo:rsid="01a251c9" officeooo:paragraph-rsid="01a251c9"/>
    </style:style>
    <style:style style:name="P141" style:family="paragraph" style:parent-style-name="Text_20_body">
      <style:paragraph-properties fo:margin-top="0cm" fo:margin-bottom="0.101cm" style:contextual-spacing="false"/>
      <style:text-properties style:font-name="Courier new" fo:font-size="7.80000019073486pt" fo:font-style="italic" fo:font-weight="normal" officeooo:rsid="01171120" officeooo:paragraph-rsid="01aec918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142" style:family="paragraph" style:parent-style-name="Text_20_body">
      <style:paragraph-properties fo:margin-top="0cm" fo:margin-bottom="0.101cm" style:contextual-spacing="false"/>
      <style:text-properties style:font-name="Courier new" fo:font-size="7.80000019073486pt" fo:font-style="italic" fo:font-weight="normal" officeooo:rsid="01171120" officeooo:paragraph-rsid="020eae23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143" style:family="paragraph" style:parent-style-name="Text_20_body">
      <style:text-properties officeooo:rsid="01beba6f" officeooo:paragraph-rsid="01beba6f"/>
    </style:style>
    <style:style style:name="P144" style:family="paragraph" style:parent-style-name="Text_20_body">
      <style:text-properties officeooo:paragraph-rsid="01c0662b"/>
    </style:style>
    <style:style style:name="P145" style:family="paragraph" style:parent-style-name="Text_20_body">
      <style:text-properties officeooo:rsid="01d1e3ad" officeooo:paragraph-rsid="01d1e3ad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1e526c1" style:font-size-asian="10pt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293182e" officeooo:paragraph-rsid="01e526c1" style:font-size-asian="10pt"/>
    </style:style>
    <style:style style:name="P148" style:family="paragraph" style:parent-style-name="Standard">
      <style:text-properties style:font-name="Monospace" fo:font-size="10pt" officeooo:paragraph-rsid="01e526c1" style:font-size-asian="10pt"/>
    </style:style>
    <style:style style:name="P1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e526c1"/>
    </style:style>
    <style:style style:name="P150" style:family="paragraph" style:parent-style-name="Standard">
      <style:text-properties officeooo:paragraph-rsid="01e526c1"/>
    </style:style>
    <style:style style:name="P151" style:family="paragraph" style:parent-style-name="Text_20_body">
      <style:text-properties officeooo:paragraph-rsid="01e526c1"/>
    </style:style>
    <style:style style:name="P152" style:family="paragraph" style:parent-style-name="Standard">
      <style:text-properties officeooo:rsid="01e600e1" officeooo:paragraph-rsid="01e600e1"/>
    </style:style>
    <style:style style:name="P153" style:family="paragraph" style:parent-style-name="Text_20_body">
      <style:text-properties officeooo:rsid="01e600e1" officeooo:paragraph-rsid="01e600e1"/>
    </style:style>
    <style:style style:name="P154" style:family="paragraph" style:parent-style-name="Standard">
      <style:text-properties officeooo:rsid="01e600e1" officeooo:paragraph-rsid="01e6888c"/>
    </style:style>
    <style:style style:name="P155" style:family="paragraph" style:parent-style-name="Text_20_body">
      <style:text-properties officeooo:rsid="01fe0912" officeooo:paragraph-rsid="01fe0912"/>
    </style:style>
    <style:style style:name="P156" style:family="paragraph" style:parent-style-name="Code">
      <style:text-properties officeooo:rsid="01fe0912" officeooo:paragraph-rsid="01ff3d8f"/>
    </style:style>
    <style:style style:name="P157" style:family="paragraph" style:parent-style-name="Text_20_body">
      <style:text-properties fo:font-weight="normal" officeooo:rsid="010efc1d" officeooo:paragraph-rsid="010efc1d" style:font-weight-asian="normal" style:font-weight-complex="normal"/>
    </style:style>
    <style:style style:name="P158" style:family="paragraph" style:parent-style-name="Text_20_body">
      <style:text-properties officeooo:rsid="021180ea" officeooo:paragraph-rsid="01f67752"/>
    </style:style>
    <style:style style:name="P159" style:family="paragraph" style:parent-style-name="Text_20_body">
      <style:text-properties officeooo:rsid="01fcfc09" officeooo:paragraph-rsid="01fcfc09"/>
    </style:style>
    <style:style style:name="P160" style:family="paragraph" style:parent-style-name="Text_20_body">
      <style:text-properties officeooo:paragraph-rsid="01f83c53"/>
    </style:style>
    <style:style style:name="P161" style:family="paragraph" style:parent-style-name="Text_20_body">
      <style:text-properties officeooo:paragraph-rsid="01fe0912"/>
    </style:style>
    <style:style style:name="P162" style:family="paragraph" style:parent-style-name="Text_20_body">
      <style:text-properties officeooo:rsid="01ff255d" officeooo:paragraph-rsid="01ff255d"/>
    </style:style>
    <style:style style:name="P163" style:family="paragraph" style:parent-style-name="Text_20_body">
      <style:text-properties officeooo:rsid="01ff3d8f" officeooo:paragraph-rsid="01ff3d8f"/>
    </style:style>
    <style:style style:name="P164" style:family="paragraph" style:parent-style-name="Text_20_body">
      <style:text-properties officeooo:rsid="02008497" officeooo:paragraph-rsid="02008497"/>
    </style:style>
    <style:style style:name="P165" style:family="paragraph" style:parent-style-name="Text_20_body">
      <style:text-properties officeooo:paragraph-rsid="0207dd43"/>
    </style:style>
    <style:style style:name="P166" style:family="paragraph" style:parent-style-name="Text_20_body">
      <style:text-properties officeooo:rsid="01c84eaa" officeooo:paragraph-rsid="01c84eaa"/>
    </style:style>
    <style:style style:name="P167" style:family="paragraph" style:parent-style-name="Text_20_body">
      <style:text-properties officeooo:rsid="020cedef" officeooo:paragraph-rsid="020cedef"/>
    </style:style>
    <style:style style:name="P168" style:family="paragraph" style:parent-style-name="Text_20_body">
      <style:text-properties officeooo:rsid="01f83c53" officeooo:paragraph-rsid="01f83c53"/>
    </style:style>
    <style:style style:name="P169" style:family="paragraph" style:parent-style-name="Standard">
      <style:text-properties officeooo:rsid="01e339e5" officeooo:paragraph-rsid="01e339e5"/>
    </style:style>
    <style:style style:name="P170" style:family="paragraph" style:parent-style-name="Text_20_body">
      <style:text-properties officeooo:rsid="001e5a7e" officeooo:paragraph-rsid="008a61ff"/>
    </style:style>
    <style:style style:name="P171" style:family="paragraph" style:parent-style-name="Standard_20__28_WW_29_" style:list-style-name="L2">
      <style:text-properties officeooo:paragraph-rsid="026013b4"/>
    </style:style>
    <style:style style:name="P172" style:family="paragraph" style:parent-style-name="Code">
      <style:text-properties officeooo:rsid="01fe0912" officeooo:paragraph-rsid="027ab65e"/>
    </style:style>
    <style:style style:name="P173" style:family="paragraph" style:parent-style-name="Code">
      <style:text-properties officeooo:paragraph-rsid="029a1e7c"/>
    </style:style>
    <style:style style:name="P174" style:family="paragraph" style:parent-style-name="Code">
      <style:text-properties fo:font-size="10pt" style:font-size-asian="10pt" style:font-size-complex="10pt"/>
    </style:style>
    <style:style style:name="P175" style:family="paragraph" style:parent-style-name="Code">
      <style:paragraph-properties fo:margin-top="0cm" fo:margin-bottom="0.212cm" style:contextual-spacing="false"/>
    </style:style>
    <style:style style:name="P176" style:family="paragraph" style:parent-style-name="Code">
      <style:paragraph-properties fo:margin-top="0cm" fo:margin-bottom="0.212cm" style:contextual-spacing="false"/>
      <style:text-properties officeooo:paragraph-rsid="02b062fe"/>
    </style:style>
    <style:style style:name="P177" style:family="paragraph" style:parent-style-name="Code">
      <style:text-properties officeooo:paragraph-rsid="02b062fe"/>
    </style:style>
    <style:style style:name="P17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9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80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81" style:family="paragraph" style:parent-style-name="Heading_20_1" style:list-style-name=""/>
    <style:style style:name="P182" style:family="paragraph" style:parent-style-name="Heading_20_1" style:list-style-name="">
      <style:text-properties officeooo:paragraph-rsid="0076eb9f"/>
    </style:style>
    <style:style style:name="P183" style:family="paragraph" style:parent-style-name="Heading_20_1" style:list-style-name="">
      <style:text-properties officeooo:paragraph-rsid="026e8db5"/>
    </style:style>
    <style:style style:name="P184" style:family="paragraph" style:parent-style-name="Heading_20_1">
      <style:paragraph-properties fo:break-before="page"/>
      <style:text-properties officeooo:paragraph-rsid="01830471"/>
    </style:style>
    <style:style style:name="P185" style:family="paragraph" style:parent-style-name="Heading_20_1">
      <style:paragraph-properties fo:break-before="page"/>
      <style:text-properties officeooo:paragraph-rsid="0076eb9f"/>
    </style:style>
    <style:style style:name="P186" style:family="paragraph" style:parent-style-name="Heading_20_1">
      <style:paragraph-properties fo:break-before="page"/>
      <style:text-properties officeooo:paragraph-rsid="0080df97"/>
    </style:style>
    <style:style style:name="P187" style:family="paragraph" style:parent-style-name="Heading_20_1">
      <style:paragraph-properties fo:break-before="page"/>
      <style:text-properties officeooo:rsid="01f67752" officeooo:paragraph-rsid="01f67752"/>
    </style:style>
    <style:style style:name="P188" style:family="paragraph" style:parent-style-name="Heading_20_1">
      <style:paragraph-properties fo:break-before="page"/>
      <style:text-properties officeooo:paragraph-rsid="013a2b1b"/>
    </style:style>
    <style:style style:name="P189" style:family="paragraph" style:parent-style-name="Heading_20_1" style:list-style-name="">
      <style:text-properties officeooo:rsid="001e5a7e" officeooo:paragraph-rsid="008a61ff"/>
    </style:style>
    <style:style style:name="P190" style:family="paragraph" style:parent-style-name="Heading_20_1">
      <style:paragraph-properties fo:break-before="page"/>
      <style:text-properties style:font-name="Arial1" fo:font-size="16.1000003814697pt" fo:font-weight="bold" officeooo:rsid="00f469e8" officeooo:paragraph-rsid="01030653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P191" style:family="paragraph" style:parent-style-name="Heading_20_1">
      <style:paragraph-properties fo:break-before="page"/>
    </style:style>
    <style:style style:name="P192" style:family="paragraph" style:parent-style-name="Heading_20_1">
      <style:paragraph-properties fo:margin-top="0cm" fo:margin-bottom="0.212cm" style:contextual-spacing="false" fo:break-before="page"/>
      <style:text-properties officeooo:paragraph-rsid="026c56ca"/>
    </style:style>
    <style:style style:name="P193" style:family="paragraph" style:parent-style-name="Heading_20_1">
      <style:paragraph-properties fo:break-before="page"/>
      <style:text-properties officeooo:paragraph-rsid="026e8db5"/>
    </style:style>
    <style:style style:name="P194" style:family="paragraph" style:parent-style-name="Heading_20_2">
      <style:text-properties officeooo:paragraph-rsid="018aa2c4"/>
    </style:style>
    <style:style style:name="P195" style:family="paragraph" style:parent-style-name="Heading_20_2">
      <style:text-properties officeooo:paragraph-rsid="01870321"/>
    </style:style>
    <style:style style:name="P196" style:family="paragraph" style:parent-style-name="Heading_20_2">
      <style:text-properties officeooo:paragraph-rsid="01ff255d"/>
    </style:style>
    <style:style style:name="P197" style:family="paragraph" style:parent-style-name="Heading_20_2">
      <style:text-properties officeooo:paragraph-rsid="01aefbe5"/>
    </style:style>
    <style:style style:name="P198" style:family="paragraph" style:parent-style-name="Heading_20_2">
      <style:text-properties officeooo:paragraph-rsid="01aec918"/>
    </style:style>
    <style:style style:name="P199" style:family="paragraph" style:parent-style-name="Heading_20_2">
      <style:text-properties officeooo:paragraph-rsid="025e9e4b"/>
    </style:style>
    <style:style style:name="P200" style:family="paragraph" style:parent-style-name="Heading_20_2">
      <style:text-properties officeooo:paragraph-rsid="0182e9eb"/>
    </style:style>
    <style:style style:name="P201" style:family="paragraph" style:parent-style-name="Heading_20_2">
      <style:text-properties officeooo:paragraph-rsid="026c56ca"/>
    </style:style>
    <style:style style:name="P202" style:family="paragraph" style:parent-style-name="Heading_20_2">
      <style:text-properties officeooo:paragraph-rsid="027445df"/>
    </style:style>
    <style:style style:name="P203" style:family="paragraph" style:parent-style-name="Heading_20_3">
      <style:text-properties officeooo:paragraph-rsid="01fcfc09"/>
    </style:style>
    <style:style style:name="P204" style:family="paragraph" style:parent-style-name="Heading_20_3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81477" officeooo:paragraph-rsid="020eae23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05" style:family="paragraph" style:parent-style-name="Heading_20_3">
      <style:text-properties officeooo:paragraph-rsid="029f525f"/>
    </style:style>
    <style:style style:name="P206" style:family="paragraph" style:parent-style-name="Heading_20_3">
      <style:text-properties officeooo:paragraph-rsid="02a2bca6"/>
    </style:style>
    <style:style style:name="P207" style:family="paragraph" style:parent-style-name="Heading_20_3">
      <style:text-properties officeooo:paragraph-rsid="02aa406d"/>
    </style:style>
    <style:style style:name="P208" style:family="paragraph" style:parent-style-name="Heading_20_3">
      <style:paragraph-properties fo:keep-with-next="always"/>
      <style:text-properties style:font-name="Arial1" style:font-name-asian="WenQuanYi Micro Hei" style:font-name-complex="Lohit Hindi2"/>
    </style:style>
    <style:style style:name="P209" style:family="paragraph" style:parent-style-name="Heading_20_3">
      <style:text-properties officeooo:paragraph-rsid="02b71fa2"/>
    </style:style>
    <style:style style:name="P210" style:family="paragraph" style:parent-style-name="List_20_Paragraph" style:list-style-name="WWNum2">
      <style:paragraph-properties fo:margin-top="0cm" fo:margin-bottom="0.106cm" style:contextual-spacing="false"/>
      <style:text-properties officeooo:paragraph-rsid="026d45fc"/>
    </style:style>
    <style:style style:name="P211" style:family="paragraph" style:parent-style-name="Preformatted_20_Text">
      <loext:graphic-properties draw:fill="none" draw:fill-color="#ffffff"/>
      <style:paragraph-properties fo:background-color="transparent"/>
    </style:style>
    <style:style style:name="P212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</style:style>
    <style:style style:name="P213" style:family="paragraph" style:parent-style-name="Preformatted_20_Text">
      <loext:graphic-properties draw:fill="none" draw:fill-color="#ffffff"/>
      <style:paragraph-properties fo:margin-left="0cm" fo:margin-right="0cm" fo:margin-top="0cm" fo:margin-bottom="0.499cm" style:contextual-spacing="false" fo:text-indent="0cm" style:auto-text-indent="false" fo:background-color="transparent"/>
    </style:style>
    <style:style style:name="P214" style:family="paragraph" style:parent-style-name="Preformatted_20_Text">
      <loext:graphic-properties draw:fill="none" draw:fill-color="#ffffff"/>
      <style:paragraph-properties fo:margin-left="0cm" fo:margin-right="0cm" fo:text-indent="0cm" style:auto-text-indent="false" fo:background-color="transparent"/>
    </style:style>
    <style:style style:name="P215" style:family="paragraph" style:parent-style-name="Preformatted_20_Text">
      <style:text-properties officeooo:paragraph-rsid="026e8db5"/>
    </style:style>
    <style:style style:name="P216" style:family="paragraph" style:parent-style-name="Preformatted_20_Text">
      <style:paragraph-properties fo:margin-top="0cm" fo:margin-bottom="0.499cm" style:contextual-spacing="false"/>
      <style:text-properties officeooo:paragraph-rsid="026e8db5"/>
    </style:style>
    <style:style style:name="P217" style:family="paragraph" style:parent-style-name="Standard" style:list-style-name="L1">
      <style:text-properties officeooo:rsid="00071684" officeooo:paragraph-rsid="006f4cb2"/>
    </style:style>
    <style:style style:name="P218" style:family="paragraph" style:parent-style-name="Standard" style:list-style-name="L1">
      <style:text-properties officeooo:rsid="0046be32" officeooo:paragraph-rsid="006f4cb2"/>
    </style:style>
    <style:style style:name="P219" style:family="paragraph" style:parent-style-name="Standard" style:list-style-name="L1">
      <style:text-properties officeooo:rsid="006f4cb2" officeooo:paragraph-rsid="006f4cb2"/>
    </style:style>
    <style:style style:name="P220" style:family="paragraph" style:parent-style-name="Standard" style:list-style-name="L1">
      <style:text-properties officeooo:rsid="016b81c2" officeooo:paragraph-rsid="006f4cb2"/>
    </style:style>
    <style:style style:name="P221" style:family="paragraph" style:parent-style-name="Standard" style:list-style-name="L1">
      <style:text-properties officeooo:rsid="00ce615c" officeooo:paragraph-rsid="00ea8470"/>
    </style:style>
    <style:style style:name="P222" style:family="paragraph" style:parent-style-name="Standard" style:list-style-name="L2">
      <style:text-properties officeooo:paragraph-rsid="026013b4"/>
    </style:style>
    <style:style style:name="P223" style:family="paragraph" style:parent-style-name="Standard" style:list-style-name="L2">
      <style:text-properties officeooo:rsid="02327a09" officeooo:paragraph-rsid="02327a09"/>
    </style:style>
    <style:style style:name="P224" style:family="paragraph" style:parent-style-name="Standard" style:list-style-name="L1">
      <style:text-properties officeooo:rsid="017278c8" officeooo:paragraph-rsid="006f4cb2"/>
    </style:style>
    <style:style style:name="P225" style:family="paragraph" style:parent-style-name="Standard" style:list-style-name="">
      <style:text-properties style:font-name="Times New Roman" fo:font-size="11.8999996185303pt" fo:font-style="normal" fo:font-weight="normal" officeooo:rsid="015ebe13" officeooo:paragraph-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226" style:family="paragraph" style:parent-style-name="Standard" style:list-style-name="">
      <style:text-properties fo:color="#000000" loext:opacity="100%" style:font-name="Times New Roman" fo:font-size="11.8999996185303pt" fo:font-style="normal" fo:font-weight="normal" officeooo:rsid="015ebe13" officeooo:paragraph-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227" style:family="paragraph" style:parent-style-name="Standard">
      <style:text-properties fo:color="#000000" loext:opacity="100%" style:font-name="Times New Roman" fo:font-size="11.8000001907349pt" fo:font-style="italic" fo:font-weight="normal" officeooo:rsid="01cd9776" officeooo:paragraph-rsid="01d0aff0" fo:background-color="#ffffff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228" style:family="paragraph" style:parent-style-name="Standard" style:list-style-name="">
      <style:text-properties fo:color="#000000" loext:opacity="100%" style:font-name="Monospace" fo:font-size="16pt" fo:font-style="normal" fo:font-weight="normal" officeooo:rsid="0140333d" officeooo:paragraph-rsid="0140333d" style:font-size-asian="16pt" style:font-style-asian="normal" style:font-weight-asian="normal" style:font-style-complex="normal" style:font-weight-complex="normal"/>
    </style:style>
    <style:style style:name="P22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#ffffff"/>
    </style:style>
    <style:style style:name="P230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231" style:family="paragraph" style:parent-style-name="Standard">
      <style:text-properties fo:color="#000000" loext:opacity="100%" style:font-name="Droid Sans Mono1" fo:font-size="10.5pt" fo:font-weight="normal" officeooo:rsid="0212d54e" fo:background-color="#ffffff"/>
    </style:style>
    <style:style style:name="P232" style:family="paragraph" style:parent-style-name="Standard" style:list-style-name="L2">
      <style:text-properties fo:color="#0000ff" loext:opacity="100%" style:font-name="Droid Sans Mono" fo:font-size="10.5pt" fo:font-style="italic" fo:font-weight="normal" officeooo:paragraph-rsid="026013b4" fo:background-color="#ffffff" style:font-style-asian="italic" style:font-style-complex="italic"/>
    </style:style>
    <style:style style:name="P233" style:family="paragraph" style:parent-style-name="Standard" style:list-style-name="L2">
      <style:text-properties fo:color="#0000ff" loext:opacity="100%" style:font-name="Droid Sans Mono" fo:font-size="10.5pt" fo:font-weight="normal" officeooo:rsid="02327a09" officeooo:paragraph-rsid="02327a09" fo:background-color="#ffffff"/>
    </style:style>
    <style:style style:name="P234" style:family="paragraph" style:parent-style-name="Standard" style:list-style-name="L2">
      <style:text-properties fo:font-style="italic" officeooo:paragraph-rsid="026013b4" style:font-style-asian="italic" style:font-style-complex="italic"/>
    </style:style>
    <style:style style:name="P235" style:family="paragraph" style:parent-style-name="Standard">
      <style:text-properties officeooo:rsid="0089b706" officeooo:paragraph-rsid="026c56ca"/>
    </style:style>
    <style:style style:name="P236" style:family="paragraph" style:parent-style-name="Standard">
      <style:paragraph-properties fo:margin-top="0cm" fo:margin-bottom="0.353cm" style:contextual-spacing="false" fo:text-align="start" style:justify-single-word="false"/>
      <style:text-properties officeooo:paragraph-rsid="026d45fc"/>
    </style:style>
    <style:style style:name="P237" style:family="paragraph" style:parent-style-name="Standard">
      <loext:graphic-properties draw:fill="solid" draw:fill-color="#f2f2f2"/>
      <style:paragraph-properties fo:margin-left="0.353cm" fo:margin-top="0cm" fo:margin-bottom="0cm" style:contextual-spacing="false" fo:line-height="0.459cm" fo:background-color="#f2f2f2" fo:padding-left="0cm" fo:padding-right="0cm" fo:padding-top="0.141cm" fo:padding-bottom="0cm" fo:border-left="none" fo:border-right="none" fo:border-top="0.51pt solid #dddddd" fo:border-bottom="none"/>
      <style:text-properties officeooo:paragraph-rsid="026d45fc"/>
    </style:style>
    <style:style style:name="P238" style:family="paragraph" style:parent-style-name="Standard">
      <loext:graphic-properties draw:fill="solid" draw:fill-color="#f2f2f2"/>
      <style:paragraph-properties fo:margin-left="0.353cm" fo:margin-top="0cm" fo:margin-bottom="0cm" style:contextual-spacing="false" fo:line-height="0.459cm" fo:background-color="#f2f2f2"/>
      <style:text-properties officeooo:paragraph-rsid="026d45fc"/>
    </style:style>
    <style:style style:name="P239" style:family="paragraph" style:parent-style-name="Standard">
      <loext:graphic-properties draw:fill="solid" draw:fill-color="#f2f2f2"/>
      <style:paragraph-properties fo:margin-left="0.353cm" fo:margin-top="0cm" fo:margin-bottom="0cm" style:contextual-spacing="false" fo:line-height="0.459cm" fo:background-color="#f2f2f2" fo:padding-left="0cm" fo:padding-right="0cm" fo:padding-top="0cm" fo:padding-bottom="0.141cm" fo:border-left="none" fo:border-right="none" fo:border-top="none" fo:border-bottom="0.51pt solid #dddddd"/>
      <style:text-properties officeooo:paragraph-rsid="026d45fc"/>
    </style:style>
    <style:style style:name="P240" style:family="paragraph" style:parent-style-name="Standard">
      <loext:graphic-properties draw:fill="solid" draw:fill-color="#f2f2f2"/>
      <style:paragraph-properties fo:margin-left="0.353cm" fo:margin-top="0cm" fo:margin-bottom="0cm" style:contextual-spacing="false" fo:line-height="0.459cm" fo:background-color="#f2f2f2"/>
      <style:text-properties officeooo:paragraph-rsid="02875a1d"/>
    </style:style>
    <style:style style:name="P241" style:family="paragraph" style:parent-style-name="Standard">
      <style:paragraph-properties fo:margin-top="0cm" fo:margin-bottom="0.141cm" style:contextual-spacing="false"/>
      <style:text-properties officeooo:paragraph-rsid="026d45fc"/>
    </style:style>
    <style:style style:name="P242" style:family="paragraph" style:parent-style-name="Standard">
      <style:paragraph-properties fo:margin-top="0cm" fo:margin-bottom="0.176cm" style:contextual-spacing="false"/>
      <style:text-properties officeooo:paragraph-rsid="026d45fc"/>
    </style:style>
    <style:style style:name="P243" style:family="paragraph" style:parent-style-name="Standard">
      <style:text-properties officeooo:rsid="026e8db5" officeooo:paragraph-rsid="026e8db5"/>
    </style:style>
    <style:style style:name="P244" style:family="paragraph" style:parent-style-name="Standard">
      <style:text-properties officeooo:paragraph-rsid="02855d4e"/>
    </style:style>
    <style:style style:name="P245" style:family="paragraph" style:parent-style-name="Standard">
      <style:text-properties officeooo:rsid="0288756e" officeooo:paragraph-rsid="0288756e"/>
    </style:style>
    <style:style style:name="P246" style:family="paragraph" style:parent-style-name="Standard">
      <style:paragraph-properties fo:margin-left="0.353cm" fo:margin-top="0cm" fo:margin-bottom="0cm" style:contextual-spacing="false" fo:line-height="0.459cm"/>
      <style:text-properties style:font-name="Consolas" fo:font-size="9pt" officeooo:paragraph-rsid="026d45fc" style:font-name-asian="Consolas1" style:font-size-asian="9pt" style:font-name-complex="Consolas1" style:font-size-complex="9pt"/>
    </style:style>
    <style:style style:name="P247" style:family="paragraph" style:parent-style-name="Standard">
      <loext:graphic-properties draw:fill="solid" draw:fill-color="#dddddd"/>
      <style:paragraph-properties fo:margin-left="0.353cm" fo:margin-top="0cm" fo:margin-bottom="0cm" style:contextual-spacing="false" fo:line-height="0.459cm" fo:background-color="#dddddd"/>
      <style:text-properties style:font-name="Consolas" fo:font-size="9pt" officeooo:paragraph-rsid="026d45fc" style:font-name-asian="Consolas1" style:font-size-asian="9pt" style:font-name-complex="Consolas1" style:font-size-complex="9pt"/>
    </style:style>
    <style:style style:name="P248" style:family="paragraph" style:parent-style-name="Standard">
      <style:paragraph-properties fo:margin-left="0.353cm" fo:margin-top="0cm" fo:margin-bottom="0cm" style:contextual-spacing="false" fo:line-height="0.459cm" fo:padding-left="0cm" fo:padding-right="0cm" fo:padding-top="0.141cm" fo:padding-bottom="0cm" fo:border-left="none" fo:border-right="none" fo:border-top="0.51pt solid #dddddd" fo:border-bottom="none"/>
      <style:text-properties style:font-name="Consolas" fo:font-size="9pt" officeooo:paragraph-rsid="026d45fc" style:font-name-asian="Consolas1" style:font-size-asian="9pt" style:font-name-complex="Consolas1" style:font-size-complex="9pt"/>
    </style:style>
    <style:style style:name="P249" style:family="paragraph" style:parent-style-name="Standard">
      <loext:graphic-properties draw:fill="solid" draw:fill-color="#eeeeee"/>
      <style:paragraph-properties fo:margin-left="0.353cm" fo:margin-top="0cm" fo:margin-bottom="0cm" style:contextual-spacing="false" fo:line-height="0.459cm" fo:background-color="#eeeeee" fo:padding-left="0cm" fo:padding-right="0cm" fo:padding-top="0.141cm" fo:padding-bottom="0cm" fo:border-left="none" fo:border-right="none" fo:border-top="0.51pt solid #dddddd" fo:border-bottom="none"/>
      <style:text-properties style:font-name="Consolas" fo:font-size="9pt" officeooo:paragraph-rsid="026d45fc" style:font-name-asian="Consolas1" style:font-size-asian="9pt" style:font-name-complex="Consolas1" style:font-size-complex="9pt"/>
    </style:style>
    <style:style style:name="P250" style:family="paragraph" style:parent-style-name="Standard">
      <style:paragraph-properties fo:margin-left="0.353cm" fo:margin-top="0cm" fo:margin-bottom="0cm" style:contextual-spacing="false" fo:line-height="0.459cm"/>
      <style:text-properties style:font-name="Consolas" fo:font-size="9pt" officeooo:rsid="028ab722" officeooo:paragraph-rsid="028ab722" style:font-name-asian="Consolas1" style:font-size-asian="9pt" style:font-name-complex="Consolas1" style:font-size-complex="9pt"/>
    </style:style>
    <style:style style:name="P251" style:family="paragraph" style:parent-style-name="Standard">
      <style:text-properties officeooo:paragraph-rsid="028ee0bd"/>
    </style:style>
    <style:style style:name="P252" style:family="paragraph" style:parent-style-name="Standard">
      <style:text-properties officeooo:rsid="02902f24" officeooo:paragraph-rsid="02902f24"/>
    </style:style>
    <style:style style:name="P253" style:family="paragraph" style:parent-style-name="Standard">
      <style:text-properties officeooo:rsid="02911176" officeooo:paragraph-rsid="02911176"/>
    </style:style>
    <style:style style:name="P254" style:family="paragraph" style:parent-style-name="Standard">
      <style:paragraph-properties fo:margin-left="0cm" fo:margin-right="0cm" style:line-height-at-least="0.503cm" fo:text-indent="0cm" style:auto-text-indent="false"/>
      <style:text-properties fo:color="#008000" loext:opacity="100%" style:font-name="Droid Sans Mono" fo:font-size="10.5pt" fo:font-weight="normal" fo:background-color="#ffffff"/>
    </style:style>
    <style:style style:name="P255" style:family="paragraph" style:parent-style-name="Standard">
      <style:paragraph-properties fo:margin-top="0cm" fo:margin-bottom="0.101cm" style:contextual-spacing="false"/>
      <style:text-properties fo:color="#008000" loext:opacity="100%" style:font-name="Droid Sans Mono" fo:font-size="10.5pt" fo:font-style="normal" fo:font-weight="normal" officeooo:rsid="02a11ee5" officeooo:paragraph-rsid="02a11ee5" fo:background-color="#ffffff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56" style:family="paragraph" style:parent-style-name="Standard">
      <style:paragraph-properties style:line-height-at-least="0.503cm"/>
    </style:style>
    <style:style style:name="P257" style:family="paragraph" style:parent-style-name="Standard">
      <style:text-properties officeooo:rsid="01d0aff0" officeooo:paragraph-rsid="01d0aff0"/>
    </style:style>
    <style:style style:name="P258" style:family="paragraph" style:parent-style-name="Standard" style:list-style-name="L26"/>
    <style:style style:name="P259" style:family="paragraph" style:parent-style-name="Text_20_body" style:list-style-name="L3">
      <style:text-properties officeooo:paragraph-rsid="01811567"/>
    </style:style>
    <style:style style:name="P260" style:family="paragraph" style:parent-style-name="Text_20_body" style:list-style-name="L3">
      <style:text-properties officeooo:paragraph-rsid="02bc36ef"/>
    </style:style>
    <style:style style:name="P261" style:family="paragraph" style:parent-style-name="Text_20_body" style:list-style-name="L3">
      <style:text-properties fo:font-style="italic" fo:font-weight="bold" officeooo:rsid="0180917a" officeooo:paragraph-rsid="0180917a" style:font-style-asian="italic" style:font-weight-asian="bold" style:font-style-complex="italic" style:font-weight-complex="bold"/>
    </style:style>
    <style:style style:name="P262" style:family="paragraph" style:parent-style-name="Text_20_body" style:list-style-name="L3">
      <style:text-properties fo:font-style="italic" fo:font-weight="bold" officeooo:rsid="0180917a" officeooo:paragraph-rsid="01811567" style:font-style-asian="italic" style:font-weight-asian="bold" style:font-style-complex="italic" style:font-weight-complex="bold"/>
    </style:style>
    <style:style style:name="P263" style:family="paragraph" style:parent-style-name="Text_20_body">
      <style:text-properties fo:font-style="italic" fo:font-weight="bold" officeooo:rsid="017c14fa" officeooo:paragraph-rsid="0265d002" style:font-style-asian="italic" style:font-weight-asian="bold" style:font-style-complex="italic" style:font-weight-complex="bold"/>
    </style:style>
    <style:style style:name="P264" style:family="paragraph" style:parent-style-name="Text_20_body">
      <style:text-properties fo:font-style="italic" fo:font-weight="bold" officeooo:rsid="017c14fa" officeooo:paragraph-rsid="017c14fa" style:font-style-asian="italic" style:font-weight-asian="bold" style:font-style-complex="italic" style:font-weight-complex="bold"/>
    </style:style>
    <style:style style:name="P265" style:family="paragraph" style:parent-style-name="Text_20_body" style:list-style-name="L8">
      <style:text-properties fo:font-style="italic" officeooo:paragraph-rsid="01c0662b" style:font-style-asian="italic" style:font-style-complex="italic"/>
    </style:style>
    <style:style style:name="P266" style:family="paragraph" style:parent-style-name="Text_20_body" style:list-style-name="L18">
      <style:text-properties fo:font-style="italic" officeooo:rsid="00d4e481" officeooo:paragraph-rsid="0182e9eb" style:font-style-asian="italic" style:font-style-complex="italic"/>
    </style:style>
    <style:style style:name="P267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68" style:family="paragraph" style:parent-style-name="Text_20_body" style:list-style-name="L4">
      <style:text-properties officeooo:paragraph-rsid="02ba8ea1"/>
    </style:style>
    <style:style style:name="P269" style:family="paragraph" style:parent-style-name="Text_20_body" style:list-style-name="L4">
      <style:text-properties fo:color="#000000" loext:opacity="100%" style:font-name="Times New Roman" fo:font-size="12pt" fo:font-style="italic" fo:font-weight="bold" officeooo:rsid="019556e0" officeooo:paragraph-rsid="02ba8ea1" fo:background-color="transparent" style:font-size-asian="12pt" style:font-style-asian="italic" style:font-weight-asian="bold" style:font-size-complex="12pt" style:font-style-complex="italic" style:font-weight-complex="bold"/>
    </style:style>
    <style:style style:name="P270" style:family="paragraph" style:parent-style-name="Text_20_body" style:list-style-name="L4">
      <style:text-properties fo:color="#000000" loext:opacity="100%" style:font-name="Times New Roman" fo:font-size="12pt" officeooo:rsid="019556e0" officeooo:paragraph-rsid="019556e0" fo:background-color="transparent" style:font-size-asian="12pt" style:font-size-complex="12pt"/>
    </style:style>
    <style:style style:name="P271" style:family="paragraph" style:parent-style-name="Text_20_body" style:list-style-name="L4">
      <style:text-properties fo:color="#000000" loext:opacity="100%" style:font-name="Times New Roman" fo:font-size="12pt" officeooo:rsid="019556e0" officeooo:paragraph-rsid="02ba8ea1" fo:background-color="transparent" style:font-size-asian="12pt" style:font-size-complex="12pt"/>
    </style:style>
    <style:style style:name="P272" style:family="paragraph" style:parent-style-name="Text_20_body">
      <style:text-properties fo:color="#000000" loext:opacity="100%" style:font-name="Arial1" fo:font-size="10.5pt" fo:font-style="italic" style:text-underline-style="none" fo:font-weight="bold" officeooo:rsid="015ccb1c" officeooo:paragraph-rsid="015ccb1c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P273" style:family="paragraph" style:parent-style-name="Text_20_body">
      <style:text-properties fo:color="#000000" loext:opacity="100%" style:font-name="Courier New" fo:font-size="8pt" fo:font-style="normal" style:text-underline-style="none" fo:font-weight="normal" officeooo:rsid="00ce615c" officeooo:paragraph-rsid="01830471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274" style:family="paragraph" style:parent-style-name="Text_20_body" style:list-style-name="L5">
      <style:text-properties fo:font-style="normal" fo:font-weight="normal" officeooo:rsid="019e1818" officeooo:paragraph-rsid="019e1818" style:font-style-asian="normal" style:font-weight-asian="normal" style:font-style-complex="normal" style:font-weight-complex="normal"/>
    </style:style>
    <style:style style:name="P275" style:family="paragraph" style:parent-style-name="Text_20_body" style:list-style-name="L5">
      <style:text-properties fo:font-style="normal" fo:font-weight="normal" officeooo:rsid="01f55303" officeooo:paragraph-rsid="01f55303" style:font-style-asian="normal" style:font-weight-asian="normal" style:font-style-complex="normal" style:font-weight-complex="normal"/>
    </style:style>
    <style:style style:name="P276" style:family="paragraph" style:parent-style-name="Text_20_body">
      <style:text-properties fo:font-style="normal" fo:font-weight="normal" officeooo:rsid="0265d002" officeooo:paragraph-rsid="0265d002" style:font-style-asian="normal" style:font-weight-asian="normal" style:font-style-complex="normal" style:font-weight-complex="normal"/>
    </style:style>
    <style:style style:name="P277" style:family="paragraph" style:parent-style-name="Text_20_body">
      <style:text-properties fo:font-style="normal" fo:font-weight="normal" officeooo:rsid="017c63d6" officeooo:paragraph-rsid="017c63d6" style:font-style-asian="normal" style:font-weight-asian="normal" style:font-style-complex="normal" style:font-weight-complex="normal"/>
    </style:style>
    <style:style style:name="P278" style:family="paragraph" style:parent-style-name="Text_20_body">
      <style:text-properties fo:font-style="normal" fo:font-weight="normal" officeooo:rsid="00cd76d4" officeooo:paragraph-rsid="017c14fa" style:font-style-asian="normal" style:font-weight-asian="normal" style:font-style-complex="normal" style:font-weight-complex="normal"/>
    </style:style>
    <style:style style:name="P279" style:family="paragraph" style:parent-style-name="Text_20_body" style:list-style-name="L9">
      <style:text-properties fo:font-style="normal" officeooo:rsid="01fcfc09" officeooo:paragraph-rsid="01fcfc09" style:font-style-asian="normal" style:font-style-complex="normal"/>
    </style:style>
    <style:style style:name="P280" style:family="paragraph" style:parent-style-name="Text_20_body" style:list-style-name="L6"/>
    <style:style style:name="P281" style:family="paragraph" style:parent-style-name="Text_20_body" style:list-style-name="L7">
      <style:text-properties officeooo:rsid="019e1818" officeooo:paragraph-rsid="019e1818"/>
    </style:style>
    <style:style style:name="P282" style:family="paragraph" style:parent-style-name="Text_20_body" style:list-style-name="L9">
      <style:text-properties officeooo:rsid="0214c47c" officeooo:paragraph-rsid="01f67752"/>
    </style:style>
    <style:style style:name="P283" style:family="paragraph" style:parent-style-name="Text_20_body" style:list-style-name="L9">
      <style:text-properties officeooo:rsid="01fcfc09" officeooo:paragraph-rsid="01fcfc09"/>
    </style:style>
    <style:style style:name="P284" style:family="paragraph" style:parent-style-name="Text_20_body" style:list-style-name="L10">
      <style:text-properties officeooo:paragraph-rsid="02046e19"/>
    </style:style>
    <style:style style:name="P285" style:family="paragraph" style:parent-style-name="Text_20_body" style:list-style-name="L10">
      <style:text-properties officeooo:rsid="01a49154" officeooo:paragraph-rsid="02046e19"/>
    </style:style>
    <style:style style:name="P286" style:family="paragraph" style:parent-style-name="Text_20_body" style:list-style-name="L16">
      <style:text-properties style:font-name="Times New Roman" fo:font-size="11.8000001907349pt" fo:font-weight="normal" officeooo:rsid="01c8c640" officeooo:paragraph-rsid="01c8c640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87" style:family="paragraph" style:parent-style-name="Text_20_body">
      <style:text-properties style:font-name="Times New Roman" fo:font-size="11.8000001907349pt" fo:font-weight="normal" officeooo:rsid="00fc47ef" officeooo:paragraph-rsid="027445df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88" style:family="paragraph" style:parent-style-name="Text_20_body">
      <style:text-properties style:font-name="Times New Roman" fo:font-size="11.8000001907349pt" fo:font-weight="normal" officeooo:rsid="00fc47ef" officeooo:paragraph-rsid="0103065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89" style:family="paragraph" style:parent-style-name="Text_20_body">
      <style:text-properties style:font-name="Times New Roman" fo:font-size="11.8000001907349pt" fo:font-weight="normal" officeooo:rsid="012ec90e" officeooo:paragraph-rsid="027445df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0" style:family="paragraph" style:parent-style-name="Text_20_body">
      <style:text-properties style:font-name="Times New Roman" fo:font-size="11.8000001907349pt" fo:font-weight="normal" officeooo:rsid="010be942" officeooo:paragraph-rsid="010be94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1" style:family="paragraph" style:parent-style-name="Text_20_body">
      <style:text-properties style:font-name="Times New Roman" fo:font-size="11.8000001907349pt" fo:font-weight="normal" officeooo:rsid="02975a52" officeooo:paragraph-rsid="02975a5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2" style:family="paragraph" style:parent-style-name="Text_20_body">
      <style:text-properties style:font-name="Times New Roman" fo:font-size="11.8000001907349pt" fo:font-weight="normal" officeooo:rsid="02b4ae0f" officeooo:paragraph-rsid="02b4ae0f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3" style:family="paragraph" style:parent-style-name="Text_20_body">
      <style:text-properties style:font-name="Times New Roman" fo:font-size="11.8000001907349pt" fo:font-weight="normal" officeooo:rsid="02b5115a" officeooo:paragraph-rsid="02b5115a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4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2a11ee5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295" style:family="paragraph" style:parent-style-name="Text_20_body">
      <style:text-properties style:font-name="Times New Roman" fo:font-size="11.8000001907349pt" style:text-underline-style="none" fo:font-weight="normal" officeooo:rsid="020d3f47" officeooo:paragraph-rsid="020d3f47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6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1e7f9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97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81477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98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2975a52" officeooo:paragraph-rsid="02975a52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99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a1c56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00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29b680e" officeooo:paragraph-rsid="029b680e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01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2dea7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02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2dea7" officeooo:paragraph-rsid="029f525f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03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2a11ee5" officeooo:paragraph-rsid="02a11ee5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04" style:family="paragraph" style:parent-style-name="Text_20_body" style:list-style-name="L18">
      <style:text-properties fo:font-size="12pt" fo:font-weight="normal" officeooo:rsid="00d4e481" officeooo:paragraph-rsid="0182e9eb" style:font-size-asian="12pt" style:font-weight-asian="normal" style:font-size-complex="12pt" style:font-weight-complex="normal"/>
    </style:style>
    <style:style style:name="P305" style:family="paragraph" style:parent-style-name="Text_20_body">
      <style:paragraph-properties fo:margin-left="0cm" fo:margin-right="0cm" fo:text-indent="0cm" style:auto-text-indent="false"/>
    </style:style>
    <style:style style:name="P306" style:family="paragraph" style:parent-style-name="Text_20_body" style:list-style-name="L21"/>
    <style:style style:name="P307" style:family="paragraph" style:parent-style-name="Text_20_body" style:list-style-name="L21">
      <style:paragraph-properties fo:margin-top="0cm" fo:margin-bottom="0cm" style:contextual-spacing="false"/>
    </style:style>
    <style:style style:name="P308" style:family="paragraph" style:parent-style-name="Text_20_body">
      <style:text-properties style:text-underline-style="solid" style:text-underline-width="auto" style:text-underline-color="font-color"/>
    </style:style>
    <style:style style:name="P309" style:family="paragraph" style:parent-style-name="Text_20_body" style:list-style-name="L3">
      <style:text-properties officeooo:rsid="0265d002" officeooo:paragraph-rsid="0265d002"/>
    </style:style>
    <style:style style:name="P31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311" style:family="paragraph" style:parent-style-name="Text_20_body">
      <style:text-properties style:font-name="Courier New" fo:font-size="8pt" fo:font-style="normal" fo:font-weight="normal" officeooo:rsid="00ce615c" officeooo:paragraph-rsid="0267fe07" style:font-style-asian="normal" style:font-weight-asian="normal" style:font-style-complex="normal" style:font-weight-complex="normal"/>
    </style:style>
    <style:style style:name="P312" style:family="paragraph" style:parent-style-name="Text_20_body">
      <style:text-properties officeooo:paragraph-rsid="027445df"/>
    </style:style>
    <style:style style:name="P313" style:family="paragraph" style:parent-style-name="Text_20_body">
      <style:text-properties officeooo:paragraph-rsid="027ab65e"/>
    </style:style>
    <style:style style:name="P314" style:family="paragraph" style:parent-style-name="Text_20_body">
      <style:text-properties officeooo:paragraph-rsid="027f79fb"/>
    </style:style>
    <style:style style:name="P315" style:family="paragraph" style:parent-style-name="Text_20_body" style:list-style-name="L23">
      <style:text-properties officeooo:paragraph-rsid="027f79fb"/>
    </style:style>
    <style:style style:name="P316" style:family="paragraph" style:parent-style-name="Text_20_body">
      <style:text-properties officeooo:paragraph-rsid="02902f24"/>
    </style:style>
    <style:style style:name="P317" style:family="paragraph" style:parent-style-name="Text_20_body" style:list-style-name="L24"/>
    <style:style style:name="P318" style:family="paragraph" style:parent-style-name="Text_20_body" style:list-style-name="L25"/>
    <style:style style:name="P319" style:family="paragraph" style:parent-style-name="Text_20_body">
      <style:paragraph-properties fo:margin-top="0cm" fo:margin-bottom="0.101cm" style:contextual-spacing="false"/>
      <style:text-properties officeooo:paragraph-rsid="01cd9776"/>
    </style:style>
    <style:style style:name="P320" style:family="paragraph" style:parent-style-name="Text_20_body">
      <style:text-properties officeooo:rsid="02a2bca6" officeooo:paragraph-rsid="02a2bca6"/>
    </style:style>
    <style:style style:name="P321" style:family="paragraph" style:parent-style-name="Text_20_body">
      <style:text-properties officeooo:rsid="02a41fa7" officeooo:paragraph-rsid="02a41fa7"/>
    </style:style>
    <style:style style:name="P322" style:family="paragraph" style:parent-style-name="Text_20_body">
      <style:text-properties officeooo:rsid="02a5574e" officeooo:paragraph-rsid="02a5574e"/>
    </style:style>
    <style:style style:name="P323" style:family="paragraph" style:parent-style-name="Text_20_body">
      <style:text-properties officeooo:paragraph-rsid="01d1e3ad"/>
    </style:style>
    <style:style style:name="P324" style:family="paragraph" style:parent-style-name="Text_20_body">
      <style:text-properties officeooo:paragraph-rsid="02a8cdba"/>
    </style:style>
    <style:style style:name="P325" style:family="paragraph" style:parent-style-name="Text_20_body" style:list-style-name="L27">
      <style:text-properties officeooo:paragraph-rsid="02a8cdba"/>
    </style:style>
    <style:style style:name="P326" style:family="paragraph" style:parent-style-name="Text_20_body" style:list-style-name="L27">
      <style:text-properties officeooo:rsid="02a8cdba" officeooo:paragraph-rsid="02a8cdba"/>
    </style:style>
    <style:style style:name="P327" style:family="paragraph" style:parent-style-name="Text_20_body">
      <style:text-properties officeooo:rsid="01d1e3ad" officeooo:paragraph-rsid="01d1e3ad"/>
    </style:style>
    <style:style style:name="P328" style:family="paragraph" style:parent-style-name="Text_20_body">
      <style:text-properties officeooo:rsid="02aa406d" officeooo:paragraph-rsid="02aa406d"/>
    </style:style>
    <style:style style:name="P329" style:family="paragraph" style:parent-style-name="Text_20_body">
      <style:text-properties officeooo:rsid="02aa6804" officeooo:paragraph-rsid="02aa6804"/>
    </style:style>
    <style:style style:name="P330" style:family="paragraph" style:parent-style-name="Text_20_body">
      <style:text-properties officeooo:rsid="02acab1b" officeooo:paragraph-rsid="02acab1b"/>
    </style:style>
    <style:style style:name="P331" style:family="paragraph" style:parent-style-name="Text_20_body" style:list-style-name="L28"/>
    <style:style style:name="P332" style:family="paragraph" style:parent-style-name="Text_20_body" style:list-style-name="L28">
      <style:paragraph-properties fo:margin-top="0cm" fo:margin-bottom="0cm" style:contextual-spacing="false"/>
    </style:style>
    <style:style style:name="P333" style:family="paragraph" style:parent-style-name="Text_20_body" style:list-style-name="L29"/>
    <style:style style:name="P334" style:family="paragraph" style:parent-style-name="Text_20_body" style:list-style-name="L29">
      <style:paragraph-properties fo:margin-top="0cm" fo:margin-bottom="0cm" style:contextual-spacing="false"/>
    </style:style>
    <style:style style:name="P335" style:family="paragraph" style:parent-style-name="Text_20_body">
      <style:text-properties officeooo:rsid="02b23c62" officeooo:paragraph-rsid="02b23c62"/>
    </style:style>
    <style:style style:name="P336" style:family="paragraph" style:parent-style-name="Text_20_body" style:list-style-name="L30"/>
    <style:style style:name="P337" style:family="paragraph" style:parent-style-name="Text_20_body" style:list-style-name="L30">
      <style:paragraph-properties fo:margin-top="0cm" fo:margin-bottom="0cm" style:contextual-spacing="false"/>
    </style:style>
    <style:style style:name="P338" style:family="paragraph" style:parent-style-name="Text_20_body">
      <style:text-properties officeooo:paragraph-rsid="02bc36ef"/>
    </style:style>
    <style:style style:name="P339" style:family="paragraph" style:parent-style-name="Text_20_body_20__28_WW_29_">
      <style:text-properties fo:color="#000000" loext:opacity="100%" style:font-name="Arial" fo:font-size="14pt" fo:font-style="italic" fo:font-weight="bold" officeooo:paragraph-rsid="02684f36" style:font-size-asian="14pt" style:font-style-asian="italic" style:font-weight-asian="bold" style:font-size-complex="14pt" style:font-style-complex="italic" style:font-weight-complex="bold"/>
    </style:style>
    <style:style style:name="P340" style:family="paragraph" style:parent-style-name="Text_20_body_20__28_WW_29_">
      <style:text-properties officeooo:paragraph-rsid="02684f36"/>
    </style:style>
    <style:style style:name="P341" style:family="paragraph" style:parent-style-name="Text_20_body_20__28_WW_29_">
      <style:text-properties officeooo:rsid="02684f36" officeooo:paragraph-rsid="02684f36"/>
    </style:style>
    <style:style style:name="P342" style:family="paragraph" style:parent-style-name="Text_20_body_20__28_WW_29_" style:list-style-name="WWNum4">
      <style:text-properties officeooo:paragraph-rsid="026c56ca"/>
    </style:style>
    <style:style style:name="P343" style:family="paragraph" style:parent-style-name="Text_20_body_20__28_WW_29_" style:list-style-name="WWNum7">
      <style:text-properties officeooo:paragraph-rsid="026c56ca"/>
    </style:style>
    <style:style style:name="P344" style:family="paragraph" style:parent-style-name="Text_20_body_20__28_WW_29_">
      <style:text-properties officeooo:paragraph-rsid="026c56ca"/>
    </style:style>
    <style:style style:name="P345" style:family="paragraph" style:parent-style-name="Text_20_body_20__28_WW_29_">
      <style:paragraph-properties fo:margin-top="0cm" fo:margin-bottom="0cm" style:contextual-spacing="false"/>
      <style:text-properties officeooo:paragraph-rsid="026c56ca"/>
    </style:style>
    <style:style style:name="P346" style:family="paragraph" style:parent-style-name="Text_20_body_20__28_WW_29_" style:list-style-name="WWNum10">
      <style:paragraph-properties fo:margin-top="0cm" fo:margin-bottom="0cm" style:contextual-spacing="false"/>
      <style:text-properties officeooo:paragraph-rsid="026e8db5"/>
    </style:style>
    <style:style style:name="P347" style:family="paragraph" style:parent-style-name="Text_20_body_20__28_WW_29_" style:list-style-name="WWNum10">
      <style:text-properties officeooo:paragraph-rsid="026e8db5"/>
    </style:style>
    <style:style style:name="P348" style:family="paragraph" style:parent-style-name="Text_20_body_20__28_WW_29_" style:list-style-name="WWNum11">
      <style:paragraph-properties fo:margin-top="0cm" fo:margin-bottom="0cm" style:contextual-spacing="false"/>
      <style:text-properties officeooo:paragraph-rsid="026e8db5"/>
    </style:style>
    <style:style style:name="P349" style:family="paragraph" style:parent-style-name="Text_20_body_20__28_WW_29_" style:list-style-name="WWNum11">
      <style:text-properties officeooo:paragraph-rsid="026e8db5"/>
    </style:style>
    <style:style style:name="P350" style:family="paragraph" style:parent-style-name="Text_20_body_20__28_WW_29_">
      <style:text-properties officeooo:paragraph-rsid="026e8db5"/>
    </style:style>
    <style:style style:name="P351" style:family="paragraph" style:parent-style-name="Text_20_body_20__28_WW_29_">
      <style:paragraph-properties fo:margin-left="1cm" fo:margin-right="1cm"/>
      <style:text-properties officeooo:paragraph-rsid="026e8db5"/>
    </style:style>
    <style:style style:name="P352" style:family="paragraph" style:parent-style-name="Text_20_body_20__28_WW_29_">
      <style:text-properties officeooo:paragraph-rsid="027c1844"/>
    </style:style>
    <style:style style:name="P353" style:family="paragraph" style:parent-style-name="Text_20_body_20__28_WW_29_" style:list-style-name="L22">
      <style:text-properties officeooo:paragraph-rsid="027c1844"/>
    </style:style>
    <style:style style:name="P354" style:family="paragraph" style:parent-style-name="commande">
      <style:text-properties officeooo:paragraph-rsid="02684f36"/>
    </style:style>
    <style:style style:name="P355" style:family="paragraph" style:parent-style-name="commande">
      <style:text-properties officeooo:paragraph-rsid="026c56ca"/>
    </style:style>
    <style:style style:name="P356" style:family="paragraph" style:parent-style-name="commande">
      <style:paragraph-properties fo:margin-top="0cm" fo:margin-bottom="0cm" style:contextual-spacing="false"/>
      <style:text-properties officeooo:paragraph-rsid="026c56ca"/>
    </style:style>
    <style:style style:name="P357" style:family="paragraph" style:parent-style-name="commande">
      <style:text-properties officeooo:paragraph-rsid="026e8db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7c14fa" style:font-style-asian="italic" style:font-style-complex="italic"/>
    </style:style>
    <style:style style:name="T3" style:family="text">
      <style:text-properties fo:font-style="italic" officeooo:rsid="01a2e720" style:font-style-asian="italic" style:font-style-complex="italic"/>
    </style:style>
    <style:style style:name="T4" style:family="text">
      <style:text-properties fo:font-style="italic" officeooo:rsid="01bb3ae7" style:font-style-asian="italic" style:font-style-complex="italic"/>
    </style:style>
    <style:style style:name="T5" style:family="text">
      <style:text-properties fo:font-style="italic" officeooo:rsid="01eb7f02" style:font-style-asian="italic" style:font-style-complex="italic"/>
    </style:style>
    <style:style style:name="T6" style:family="text">
      <style:text-properties fo:font-style="italic" officeooo:rsid="0214b925" style:font-style-asian="italic" style:font-style-complex="italic"/>
    </style:style>
    <style:style style:name="T7" style:family="text">
      <style:text-properties fo:font-style="italic" officeooo:rsid="01ddbda3" style:font-style-asian="italic" style:font-style-complex="italic"/>
    </style:style>
    <style:style style:name="T8" style:family="text">
      <style:text-properties fo:font-style="italic" officeooo:rsid="0265d002" style:font-style-asian="italic" style:font-style-complex="italic"/>
    </style:style>
    <style:style style:name="T9" style:family="text">
      <style:text-properties fo:font-style="italic" officeooo:rsid="02aa406d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17c14fa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17c63d6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18dfa69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1f178a6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237e984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265d002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2902f24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190248e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19127c0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2ba8ea1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180917a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2bc7f90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style:font-name-asian="WenQuanYi Micro Hei" style:font-style-asian="italic" style:font-weight-asian="bold" style:font-style-complex="italic" style:font-weight-complex="bold"/>
    </style:style>
    <style:style style:name="T24" style:family="text">
      <style:text-properties fo:font-style="italic" style:font-name-asian="WenQuanYi Micro Hei" style:font-style-asian="italic" style:font-style-complex="itali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font-name="Times New Roman" fo:font-size="12pt" fo:font-style="normal" fo:font-weight="normal" officeooo:rsid="00d240a6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font-name="Times New Roman" fo:font-size="12pt" fo:font-weight="bold" officeooo:rsid="00d240a6" style:font-name-asian="WenQuanYi Micro Hei" style:font-size-asian="12pt" style:font-weight-asian="bold" style:font-name-complex="Lohit Hindi2" style:font-size-complex="12pt" style:font-weight-complex="bold" style:text-overline-style="none" style:text-overline-color="font-color"/>
    </style:style>
    <style:style style:name="T28" style:family="text">
      <style:text-properties fo:color="#000000" loext:opacity="100%" style:font-name="Times New Roman" fo:font-size="12pt" fo:font-style="italic" fo:font-weight="bold" officeooo:rsid="0190248e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fo:color="#000000" loext:opacity="100%" style:font-name="Times New Roman" fo:font-size="12pt" fo:font-style="italic" fo:font-weight="bold" officeooo:rsid="019127c0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fo:color="#000000" loext:opacity="100%" style:font-name="Times New Roman" fo:font-size="12pt" fo:font-style="italic" fo:font-weight="bold" officeooo:rsid="02ba8ea1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31" style:family="text">
      <style:text-properties fo:color="#000000" loext:opacity="100%" style:font-name="Times New Roman" fo:font-size="12pt" officeooo:rsid="0196acba" fo:background-color="transparent" loext:char-shading-value="0" style:font-size-asian="12pt" style:font-size-complex="12pt"/>
    </style:style>
    <style:style style:name="T32" style:family="text">
      <style:text-properties fo:color="#000000" loext:opacity="100%" style:font-name="Times New Roman" fo:font-size="11.8999996185303pt" fo:font-style="normal" fo:font-weight="normal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3" style:family="text">
      <style:text-properties fo:color="#000000" loext:opacity="100%" style:font-name="Times New Roman" fo:font-size="11.8999996185303pt" fo:font-style="normal" fo:font-weight="normal" officeooo:rsid="013df418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4" style:family="text">
      <style:text-properties fo:color="#000000" loext:opacity="100%" style:font-name="Times New Roman" fo:font-size="11.8999996185303pt" fo:font-style="normal" fo:font-weight="normal" officeooo: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5" style:family="text">
      <style:text-properties fo:color="#000000" loext:opacity="100%" style:font-name="Times New Roman" fo:font-size="11.8999996185303pt" fo:font-style="normal" fo:font-weight="normal" officeooo: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6" style:family="text">
      <style:text-properties fo:color="#000000" loext:opacity="100%" style:font-name="Times New Roman" fo:font-size="11.8999996185303pt" fo:font-style="normal" fo:font-weight="normal" officeooo:rsid="01a49154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7" style:family="text">
      <style:text-properties fo:color="#000000" loext:opacity="100%" style:font-name="Times New Roman" fo:font-size="11.8999996185303pt" fo:font-style="normal" fo:font-weight="normal" officeooo:rsid="01c31d8c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8" style:family="text">
      <style:text-properties fo:color="#000000" loext:opacity="100%" style:font-name="Times New Roman" fo:font-size="11.8999996185303pt" fo:font-style="normal" fo:font-weight="normal" officeooo:rsid="020606e7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9" style:family="text">
      <style:text-properties fo:color="#000000" loext:opacity="100%" style:font-name="Times New Roman" fo:font-size="11.8999996185303pt" fo:font-style="italic" fo:font-weight="bold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40" style:family="text">
      <style:text-properties fo:color="#000000" loext:opacity="100%" style:font-name="Times New Roman" fo:font-size="11.8999996185303pt" fo:font-style="italic" fo:font-weight="bold" officeooo:rsid="01a49154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41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color="#000000" loext:opacity="100%" fo:font-style="italic" fo:font-weight="bold" officeooo:rsid="02915030" style:font-style-asian="italic" style:font-weight-asian="bold" style:font-style-complex="italic" style:font-weight-complex="bold"/>
    </style:style>
    <style:style style:name="T43" style:family="text">
      <style:text-properties fo:color="#000000" loext:opacity="100%" fo:font-style="italic" fo:font-weight="bold" officeooo:rsid="02944c22" style:font-style-asian="italic" style:font-weight-asian="bold" style:font-style-complex="italic" style:font-weight-complex="bold"/>
    </style:style>
    <style:style style:name="T44" style:family="text">
      <style:text-properties fo:color="#000000" loext:opacity="100%" fo:font-style="italic" fo:font-weight="bold" style:font-name-asian="WenQuanYi Micro Hei" style:font-style-asian="italic" style:font-weight-asian="bold" style:font-name-complex="Lohit Hindi2" style:font-style-complex="italic" style:font-weight-complex="bold" style:text-overline-style="none" style:text-overline-color="font-color"/>
    </style:style>
    <style:style style:name="T45" style:family="text">
      <style:text-properties fo:color="#000000" loext:opacity="100%" fo:font-style="italic" fo:font-weight="bold" officeooo:rsid="0265d002" style:font-name-asian="WenQuanYi Micro Hei" style:font-style-asian="italic" style:font-weight-asian="bold" style:font-name-complex="Lohit Hindi2" style:font-style-complex="italic" style:font-weight-complex="bold" style:text-overline-style="none" style:text-overline-color="font-color"/>
    </style:style>
    <style:style style:name="T46" style:family="text">
      <style:text-properties fo:color="#000000" loext:opacity="100%" fo:font-style="italic" fo:font-weight="bold" style:font-name-asian="WenQuanYi Micro Hei" style:font-style-asian="italic" style:font-weight-asian="bold" style:font-style-complex="italic" style:font-weight-complex="bold"/>
    </style:style>
    <style:style style:name="T47" style:family="text">
      <style:text-properties fo:color="#000000" loext:opacity="100%" fo:font-style="italic" style:text-underline-style="none" fo:font-weight="bold" officeooo:rsid="02459518" style:font-name-asian="WenQuanYi Micro Hei" style:font-style-asian="italic" style:font-weight-asian="bold" style:font-name-complex="Lohit Hindi2" style:font-style-complex="italic" style:font-weight-complex="bold" style:text-overline-style="none" style:text-overline-color="font-color"/>
    </style:style>
    <style:style style:name="T48" style:family="text">
      <style:text-properties fo:color="#000000" loext:opacity="100%" style:font-name="Arial1" fo:font-size="10.5pt" fo:font-weight="bold" officeooo:rsid="015b0b2d" style:font-name-asian="WenQuanYi Micro Hei" style:font-size-asian="14pt" style:font-weight-asian="bold" style:font-name-complex="Lohit Hindi2" style:font-size-complex="14pt" style:font-weight-complex="bold" style:text-overline-style="none" style:text-overline-color="font-color"/>
    </style:style>
    <style:style style:name="T49" style:family="text">
      <style:text-properties fo:color="#000000" loext:opacity="100%" style:font-name-asian="WenQuanYi Micro Hei" style:font-name-complex="Lohit Hindi2" style:text-overline-style="none" style:text-overline-color="font-color"/>
    </style:style>
    <style:style style:name="T50" style:family="text">
      <style:text-properties fo:color="#000000" loext:opacity="100%" officeooo:rsid="01e7f05d" style:font-name-asian="WenQuanYi Micro Hei" style:font-name-complex="Lohit Hindi2" style:text-overline-style="none" style:text-overline-color="font-color"/>
    </style:style>
    <style:style style:name="T51" style:family="text">
      <style:text-properties fo:color="#000000" loext:opacity="100%" style:font-name-asian="WenQuanYi Micro Hei"/>
    </style:style>
    <style:style style:name="T52" style:family="text">
      <style:text-properties fo:color="#000000" loext:opacity="100%" style:text-underline-style="none" style:font-name-asian="WenQuanYi Micro Hei" style:font-name-complex="Lohit Hindi2" style:text-overline-style="none" style:text-overline-color="font-color"/>
    </style:style>
    <style:style style:name="T53" style:family="text">
      <style:text-properties fo:color="#000000" loext:opacity="100%" style:text-underline-style="none" officeooo:rsid="02426d6a" style:font-name-asian="WenQuanYi Micro Hei" style:font-name-complex="Lohit Hindi2" style:text-overline-style="none" style:text-overline-color="font-color"/>
    </style:style>
    <style:style style:name="T54" style:family="text">
      <style:text-properties fo:color="#000000" loext:opacity="100%" style:text-underline-style="none" officeooo:rsid="02459518" style:font-name-asian="WenQuanYi Micro Hei" style:font-name-complex="Lohit Hindi2" style:text-overline-style="none" style:text-overline-color="font-color"/>
    </style:style>
    <style:style style:name="T55" style:family="text">
      <style:text-properties fo:color="#000000" loext:opacity="100%" style:font-name="Droid Sans Mono1" fo:font-size="10.5pt" fo:font-weight="normal" fo:background-color="#ffffff" loext:char-shading-value="0"/>
    </style:style>
    <style:style style:name="T56" style:family="text">
      <style:text-properties fo:color="#000000" loext:opacity="100%" style:font-name="Droid Sans Mono1" fo:font-size="10.5pt" fo:font-weight="normal" officeooo:rsid="02a8cdba" fo:background-color="#ffffff" loext:char-shading-value="0"/>
    </style:style>
    <style:style style:name="T57" style:family="text">
      <style:text-properties fo:color="#000000" loext:opacity="100%" officeooo:rsid="0156cb9f"/>
    </style:style>
    <style:style style:name="T58" style:family="text">
      <style:text-properties fo:color="#000000" loext:opacity="100%" officeooo:rsid="02915030"/>
    </style:style>
    <style:style style:name="T59" style:family="text">
      <style:text-properties fo:color="#000000" loext:opacity="100%" officeooo:rsid="02944c22"/>
    </style:style>
    <style:style style:name="T60" style:family="text">
      <style:text-properties fo:color="#000000" loext:opacity="100%" style:font-name="Monospace" fo:font-size="10pt" style:text-underline-style="solid" style:text-underline-width="auto" style:text-underline-color="font-color" style:font-size-asian="10pt"/>
    </style:style>
    <style:style style:name="T61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style:font-name="Times New Roman" fo:font-size="12pt" fo:font-style="italic" officeooo:rsid="00d240a6" style:font-size-asian="12pt" style:font-style-asian="italic" style:font-size-complex="12pt" style:font-style-complex="italic"/>
    </style:style>
    <style:style style:name="T64" style:family="text">
      <style:text-properties style:font-name="Times New Roman" fo:font-size="12pt" fo:font-style="italic" officeooo:rsid="01d3561b" style:font-size-asian="12pt" style:font-style-asian="italic" style:font-size-complex="12pt" style:font-style-complex="italic"/>
    </style:style>
    <style:style style:name="T65" style:family="text">
      <style:text-properties style:font-name="Times New Roman" fo:font-size="12pt" fo:font-style="italic" officeooo:rsid="00cd76d4" style:font-name-asian="WenQuanYi Micro Hei" style:font-size-asian="12pt" style:font-style-asian="italic" style:font-name-complex="Lohit Hindi2" style:font-size-complex="12pt" style:font-style-complex="italic"/>
    </style:style>
    <style:style style:name="T66" style:family="text">
      <style:text-properties style:font-name="Times New Roman" fo:font-size="12pt" fo:font-style="italic" officeooo:rsid="0127d61b" style:font-name-asian="WenQuanYi Micro Hei" style:font-size-asian="12pt" style:font-style-asian="italic" style:font-name-complex="Lohit Hindi2" style:font-size-complex="12pt" style:font-style-complex="italic"/>
    </style:style>
    <style:style style:name="T67" style:family="text">
      <style:text-properties style:font-name="Times New Roman" fo:font-size="12pt" fo:font-style="italic" officeooo:rsid="018dfa69" style:font-name-asian="WenQuanYi Micro Hei" style:font-size-asian="12pt" style:font-style-asian="italic" style:font-name-complex="Lohit Hindi2" style:font-size-complex="12pt" style:font-style-complex="italic"/>
    </style:style>
    <style:style style:name="T68" style:family="text">
      <style:text-properties style:font-name="Times New Roman" fo:font-size="12pt" fo:font-style="italic" officeooo:rsid="01f0ed49" style:font-name-asian="WenQuanYi Micro Hei" style:font-size-asian="12pt" style:font-style-asian="italic" style:font-name-complex="Lohit Hindi2" style:font-size-complex="12pt" style:font-style-complex="italic"/>
    </style:style>
    <style:style style:name="T69" style:family="text">
      <style:text-properties style:font-name="Times New Roman" fo:font-size="12pt" fo:font-style="italic" officeooo:rsid="02796218" style:font-name-asian="WenQuanYi Micro Hei" style:font-size-asian="12pt" style:font-style-asian="italic" style:font-name-complex="Lohit Hindi2" style:font-size-complex="12pt" style:font-style-complex="italic"/>
    </style:style>
    <style:style style:name="T70" style:family="text">
      <style:text-properties style:font-name="Times New Roman" fo:font-size="11.8000001907349pt" fo:font-weight="bold" officeooo:rsid="00fc47ef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71" style:family="text">
      <style:text-properties style:font-name="Times New Roman" fo:font-size="11.8000001907349pt" fo:font-weight="normal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2" style:family="text">
      <style:text-properties style:font-name="Times New Roman" fo:font-size="11.8000001907349pt" fo:font-weight="normal" officeooo:rsid="00fc47ef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3" style:family="text">
      <style:text-properties style:font-name="Times New Roman" fo:font-size="11.8000001907349pt" fo:font-weight="normal" officeooo:rsid="010ef496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4" style:family="text">
      <style:text-properties style:font-name="Times New Roman" fo:font-size="11.8000001907349pt" fo:font-weight="normal" officeooo:rsid="012ec90e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5" style:family="text">
      <style:text-properties style:font-name="Times New Roman" fo:font-size="11.8000001907349pt" officeooo:rsid="010be942" style:font-name-asian="WenQuanYi Micro Hei" style:font-size-asian="11.8000001907349pt" style:font-name-complex="Lohit Hindi2" style:font-size-complex="11.8000001907349pt"/>
    </style:style>
    <style:style style:name="T76" style:family="text">
      <style:text-properties style:font-name="Times New Roman" fo:font-size="11.8000001907349pt" fo:font-style="italic" fo:font-weight="bold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77" style:family="text">
      <style:text-properties style:font-name="Times New Roman" fo:font-size="11.8000001907349pt" fo:font-style="italic" fo:font-weight="bold" officeooo:rsid="010be942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78" style:family="text">
      <style:text-properties style:font-name="Times New Roman" fo:font-size="11.8000001907349pt" fo:font-style="italic" fo:font-weight="bold" officeooo:rsid="00fc47ef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79" style:family="text">
      <style:text-properties fo:font-variant="normal" fo:text-transform="none" fo:color="#000000" loext:opacity="100%" style:text-line-through-style="none" style:text-line-through-type="none" style:font-name="inconsolata" fo:font-size="10pt" fo:letter-spacing="normal" fo:font-style="normal" style:text-underline-style="none" fo:font-weight="normal" officeooo:rsid="01081e95" style:text-blinking="false" style:font-size-asian="10pt" style:font-size-complex="10pt" loext:padding="0cm" loext:border="none"/>
    </style:style>
    <style:style style:name="T80" style:family="text">
      <style:text-properties fo:font-variant="normal" fo:text-transform="none" fo:color="#000000" loext:opacity="100%" style:text-line-through-style="none" style:text-line-through-type="none" style:font-name="inconsolata" fo:font-size="10pt" fo:letter-spacing="normal" fo:font-style="normal" style:text-underline-style="none" fo:font-weight="normal" officeooo:rsid="0224c6a5" style:text-blinking="false" style:font-size-asian="10pt" style:font-size-complex="10pt" loext:padding="0cm" loext:border="none"/>
    </style:style>
    <style:style style:name="T81" style:family="text">
      <style:text-properties fo:font-variant="normal" fo:text-transform="none" fo:color="#000000" loext:opacity="100%" style:font-name="Consolas2" fo:font-size="11.25pt" fo:letter-spacing="normal" fo:font-style="normal" fo:font-weight="normal" officeooo:rsid="01181477" style:font-size-asian="11.8000001907349pt" style:font-style-asian="normal" style:font-weight-asian="normal" style:font-size-complex="11.8000001907349pt" style:font-style-complex="normal" style:font-weight-complex="normal" loext:padding="0cm" loext:border="none"/>
    </style:style>
    <style:style style:name="T82" style:family="text">
      <style:text-properties fo:font-variant="normal" fo:text-transform="none" fo:color="#000000" loext:opacity="100%" style:font-name="Consolas2" fo:font-size="11.25pt" fo:letter-spacing="normal" fo:font-style="normal" fo:font-weight="normal" officeooo:rsid="01575f37" style:font-size-asian="11.8000001907349pt" style:font-style-asian="normal" style:font-weight-asian="normal" style:font-size-complex="11.8000001907349pt" style:font-style-complex="normal" style:font-weight-complex="normal" loext:padding="0cm" loext:border="none"/>
    </style:style>
    <style:style style:name="T83" style:family="text">
      <style:text-properties fo:font-variant="normal" fo:text-transform="none" fo:color="#000000" loext:opacity="100%" style:font-name="Consolas2" fo:font-size="11.25pt" fo:letter-spacing="normal" fo:font-style="normal" fo:font-weight="normal" officeooo:rsid="0296504c" style:font-size-asian="11.8000001907349pt" style:font-style-asian="normal" style:font-weight-asian="normal" style:font-size-complex="11.8000001907349pt" style:font-style-complex="normal" style:font-weight-complex="normal" loext:padding="0cm" loext:border="none"/>
    </style:style>
    <style:style style:name="T84" style:family="text">
      <style:text-properties fo:font-variant="normal" fo:text-transform="none" fo:color="#000000" loext:opacity="100%" style:font-name="Consolas2" fo:font-size="11.25pt" fo:letter-spacing="normal" fo:font-style="normal" fo:font-weight="normal" officeooo:rsid="0296504c" style:font-name-asian="Droid Sans Fallback" style:font-size-asian="11.8000001907349pt" style:font-style-asian="normal" style:font-weight-asian="normal" style:font-name-complex="Liberation Mono" style:font-size-complex="11.8000001907349pt" style:font-style-complex="normal" style:font-weight-complex="normal" loext:padding="0cm" loext:border="none"/>
    </style:style>
    <style:style style:name="T85" style:family="text">
      <style:text-properties fo:font-variant="normal" fo:text-transform="none" fo:color="#000000" loext:opacity="100%" style:font-name="Calibri" fo:font-size="11pt" fo:letter-spacing="normal" fo:font-style="normal" fo:font-weight="normal" officeooo:rsid="0035ebb4" fo:background-color="#ffffff" loext:char-shading-value="0" style:font-name-asian="Calibri1" style:font-size-asian="11pt" style:font-style-asian="normal" style:font-weight-asian="normal" style:font-name-complex="Calibri1" style:font-size-complex="11pt" style:font-style-complex="normal" style:font-weight-complex="normal" loext:padding="0cm" loext:border="none"/>
    </style:style>
    <style:style style:name="T86" style:family="text">
      <style:text-properties officeooo:rsid="0080df97"/>
    </style:style>
    <style:style style:name="T87" style:family="text">
      <style:text-properties fo:font-size="12pt" fo:font-weight="normal" style:font-size-asian="12pt" style:font-weight-asian="normal" style:font-size-complex="12pt" style:font-weight-complex="normal"/>
    </style:style>
    <style:style style:name="T88" style:family="text">
      <style:text-properties fo:font-size="12pt" fo:font-weight="normal" officeooo:rsid="00a5219a" style:font-size-asian="12pt" style:font-weight-asian="normal" style:font-size-complex="12pt" style:font-weight-complex="normal"/>
    </style:style>
    <style:style style:name="T89" style:family="text">
      <style:text-properties fo:font-size="12pt" fo:font-weight="normal" officeooo:rsid="00d4e481" style:font-size-asian="12pt" style:font-weight-asian="normal" style:font-size-complex="12pt" style:font-weight-complex="normal"/>
    </style:style>
    <style:style style:name="T90" style:family="text">
      <style:text-properties fo:font-size="12pt" fo:font-weight="normal" officeooo:rsid="0134dbad" style:font-size-asian="12pt" style:font-weight-asian="normal" style:font-size-complex="12pt" style:font-weight-complex="normal"/>
    </style:style>
    <style:style style:name="T91" style:family="text">
      <style:text-properties fo:font-size="12pt" fo:font-weight="normal" officeooo:rsid="0142ca69" style:font-size-asian="12pt" style:font-weight-asian="normal" style:font-size-complex="12pt" style:font-weight-complex="normal"/>
    </style:style>
    <style:style style:name="T9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3" style:family="text">
      <style:text-properties fo:font-size="12pt" fo:font-style="italic" fo:font-weight="normal" officeooo:rsid="00a5219a" style:font-size-asian="12pt" style:font-style-asian="italic" style:font-weight-asian="normal" style:font-size-complex="12pt" style:font-style-complex="italic" style:font-weight-complex="normal"/>
    </style:style>
    <style:style style:name="T9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5" style:family="text">
      <style:text-properties fo:font-size="12pt" fo:font-style="italic" fo:font-weight="bold" officeooo:rsid="00d4e481" style:font-size-asian="12pt" style:font-style-asian="italic" style:font-weight-asian="bold" style:font-size-complex="12pt" style:font-style-complex="italic" style:font-weight-complex="bold"/>
    </style:style>
    <style:style style:name="T96" style:family="text">
      <style:text-properties fo:font-size="12pt" fo:font-style="italic" fo:font-weight="bold" officeooo:rsid="00a5219a" style:font-size-asian="12pt" style:font-style-asian="italic" style:font-weight-asian="bold" style:font-size-complex="12pt" style:font-style-complex="italic" style:font-weight-complex="bold"/>
    </style:style>
    <style:style style:name="T9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officeooo:rsid="00c7c8d0"/>
    </style:style>
    <style:style style:name="T99" style:family="text">
      <style:text-properties officeooo:rsid="00a5219a"/>
    </style:style>
    <style:style style:name="T100" style:family="text">
      <style:text-properties fo:font-style="normal" officeooo:rsid="01a0b522" style:font-style-asian="normal" style:font-style-complex="normal"/>
    </style:style>
    <style:style style:name="T101" style:family="text">
      <style:text-properties fo:font-style="normal" officeooo:rsid="01c0662b" style:font-style-asian="normal" style:font-style-complex="normal"/>
    </style:style>
    <style:style style:name="T10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17c63d6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196acba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2bc36ef" style:font-style-asian="normal" style:font-weight-asian="normal" style:font-style-complex="normal" style:font-weight-complex="normal"/>
    </style:style>
    <style:style style:name="T106" style:family="text">
      <style:text-properties style:font-name-asian="WenQuanYi Micro Hei"/>
    </style:style>
    <style:style style:name="T107" style:family="text">
      <style:text-properties officeooo:rsid="00d311f0"/>
    </style:style>
    <style:style style:name="T108" style:family="text">
      <style:text-properties officeooo:rsid="00d4e481"/>
    </style:style>
    <style:style style:name="T109" style:family="text">
      <style:text-properties officeooo:rsid="00d84c6f"/>
    </style:style>
    <style:style style:name="T110" style:family="text">
      <style:text-properties officeooo:rsid="00d9af45"/>
    </style:style>
    <style:style style:name="T111" style:family="text">
      <style:text-properties officeooo:rsid="00dd3f97"/>
    </style:style>
    <style:style style:name="T112" style:family="text">
      <style:text-properties officeooo:rsid="00e03516"/>
    </style:style>
    <style:style style:name="T113" style:family="text">
      <style:text-properties officeooo:rsid="00e41927"/>
    </style:style>
    <style:style style:name="T114" style:family="text">
      <style:text-properties style:text-underline-style="solid" style:text-underline-width="auto" style:text-underline-color="font-color"/>
    </style:style>
    <style:style style:name="T115" style:family="text">
      <style:text-properties officeooo:rsid="00ea8470"/>
    </style:style>
    <style:style style:name="T116" style:family="text">
      <style:text-properties style:font-name="Courier New"/>
    </style:style>
    <style:style style:name="T117" style:family="text">
      <style:text-properties style:font-name="Courier New" officeooo:rsid="01db0c5b"/>
    </style:style>
    <style:style style:name="T118" style:family="text">
      <style:text-properties style:font-name="Courier New" officeooo:rsid="02228c1d"/>
    </style:style>
    <style:style style:name="T119" style:family="text">
      <style:text-properties fo:font-size="11.8000001907349pt" style:font-name-asian="WenQuanYi Micro Hei" style:font-size-asian="11.8000001907349pt" style:font-name-complex="Lohit Hindi2" style:font-size-complex="11.8000001907349pt"/>
    </style:style>
    <style:style style:name="T120" style:family="text">
      <style:text-properties fo:font-size="11.8000001907349pt" fo:font-style="italic" fo:font-weight="bold" officeooo:rsid="01dc100b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121" style:family="text">
      <style:text-properties fo:font-size="11.8000001907349pt" officeooo:rsid="01081e95" style:font-size-asian="11.8000001907349pt" style:font-weight-asian="normal" style:font-size-complex="11.8000001907349pt" style:font-weight-complex="normal"/>
    </style:style>
    <style:style style:name="T122" style:family="text">
      <style:text-properties fo:font-size="11.8000001907349pt" officeooo:rsid="01e07616" style:font-size-asian="11.8000001907349pt" style:font-weight-asian="normal" style:font-size-complex="11.8000001907349pt" style:font-weight-complex="normal"/>
    </style:style>
    <style:style style:name="T123" style:family="text">
      <style:text-properties style:font-name="Arial1" fo:font-size="11.8000001907349pt" style:font-name-asian="WenQuanYi Micro Hei" style:font-size-asian="11.8000001907349pt" style:font-name-complex="Lohit Hindi2" style:font-size-complex="11.8000001907349pt"/>
    </style:style>
    <style:style style:name="T124" style:family="text">
      <style:text-properties style:font-name="Arial1" fo:font-weight="bold" officeooo:rsid="01030653" style:font-name-asian="WenQuanYi Micro Hei" style:font-weight-asian="bold" style:font-name-complex="Lohit Hindi2" style:font-weight-complex="bold"/>
    </style:style>
    <style:style style:name="T125" style:family="text">
      <style:text-properties style:font-name="Arial1" fo:font-weight="bold" officeooo:rsid="010be942" style:font-name-asian="WenQuanYi Micro Hei" style:font-weight-asian="bold" style:font-name-complex="Lohit Hindi2" style:font-weight-complex="bold"/>
    </style:style>
    <style:style style:name="T126" style:family="text">
      <style:text-properties style:font-name="Arial1" fo:font-weight="bold" officeooo:rsid="01d49512" style:font-name-asian="WenQuanYi Micro Hei" style:font-weight-asian="bold" style:font-name-complex="Lohit Hindi2" style:font-weight-complex="bold"/>
    </style:style>
    <style:style style:name="T127" style:family="text">
      <style:text-properties style:font-name="Arial1" fo:font-weight="bold" officeooo:rsid="025e9e4b" style:font-name-asian="WenQuanYi Micro Hei" style:font-weight-asian="bold" style:font-name-complex="Lohit Hindi2" style:font-weight-complex="bold"/>
    </style:style>
    <style:style style:name="T128" style:family="text">
      <style:text-properties style:font-name="Arial1" fo:font-weight="bold" officeooo:rsid="0275256c" style:font-name-asian="WenQuanYi Micro Hei" style:font-weight-asian="bold" style:font-name-complex="Lohit Hindi2" style:font-weight-complex="bold"/>
    </style:style>
    <style:style style:name="T129" style:family="text">
      <style:text-properties style:font-name="Arial1" fo:font-weight="bold" officeooo:rsid="01030653" style:font-weight-asian="bold" style:font-weight-complex="bold"/>
    </style:style>
    <style:style style:name="T130" style:family="text">
      <style:text-properties style:font-name="Arial1" fo:font-weight="bold" officeooo:rsid="0113287e" style:font-weight-asian="bold" style:font-weight-complex="bold"/>
    </style:style>
    <style:style style:name="T131" style:family="text">
      <style:text-properties style:font-name="Arial1" fo:font-weight="bold" officeooo:rsid="016e4cfb" style:font-weight-asian="bold" style:font-weight-complex="bold"/>
    </style:style>
    <style:style style:name="T132" style:family="text">
      <style:text-properties style:font-name="Arial1" fo:font-weight="bold" officeooo:rsid="01aefbe5" style:font-weight-asian="bold" style:font-weight-complex="bold"/>
    </style:style>
    <style:style style:name="T133" style:family="text">
      <style:text-properties style:font-name="Arial1" fo:font-weight="bold" officeooo:rsid="01b1765a" style:font-weight-asian="bold" style:font-weight-complex="bold"/>
    </style:style>
    <style:style style:name="T134" style:family="text">
      <style:text-properties style:font-name="Arial1" fo:font-weight="bold" officeooo:rsid="02700474" style:font-weight-asian="bold" style:font-weight-complex="bold"/>
    </style:style>
    <style:style style:name="T135" style:family="text">
      <style:text-properties style:font-name="Arial1" fo:font-size="16.1000003814697pt" fo:font-weight="bold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36" style:family="text">
      <style:text-properties style:font-name="Arial1" fo:font-size="16.1000003814697pt" fo:font-weight="bold" officeooo:rsid="013a2b1b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37" style:family="text">
      <style:text-properties style:font-name="Arial1" fo:font-size="16.1000003814697pt" fo:font-weight="bold" officeooo:rsid="013bff24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38" style:family="text">
      <style:text-properties style:font-name="Arial1" fo:font-size="16.1000003814697pt" fo:font-weight="bold" officeooo:rsid="016e4cfb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39" style:family="text">
      <style:text-properties style:font-name="Arial1" fo:font-size="16.1000003814697pt" fo:font-weight="bold" officeooo:rsid="01ff3d8f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0" style:family="text">
      <style:text-properties style:font-name="Arial1" fo:font-size="16.1000003814697pt" fo:font-weight="bold" officeooo:rsid="02008497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1" style:family="text">
      <style:text-properties style:font-name="Arial1" fo:font-size="16.1000003814697pt" fo:font-weight="bold" officeooo:rsid="026e8db5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2" style:family="text">
      <style:text-properties style:font-name="Arial1" fo:font-size="16.1000003814697pt" fo:font-weight="bold" officeooo:rsid="02700474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3" style:family="text">
      <style:text-properties style:font-name="Arial1" fo:font-size="16.1000003814697pt" fo:font-weight="bold" officeooo:rsid="027530f8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4" style:family="text">
      <style:text-properties style:font-name="Arial1" fo:font-size="16.1000003814697pt" fo:font-style="italic" fo:font-weight="bold" officeooo:rsid="016f129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/>
    </style:style>
    <style:style style:name="T145" style:family="text">
      <style:text-properties style:font-name="Arial1" fo:font-size="16.1000003814697pt" fo:font-style="italic" fo:font-weight="bold" officeooo:rsid="01e5033a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/>
    </style:style>
    <style:style style:name="T146" style:family="text">
      <style:text-properties style:font-name="Arial1" fo:font-style="italic" fo:font-weight="bold" officeooo:rsid="016f129f" style:font-style-asian="italic" style:font-weight-asian="bold" style:font-style-complex="italic" style:font-weight-complex="bold"/>
    </style:style>
    <style:style style:name="T147" style:family="text">
      <style:text-properties officeooo:rsid="01081e95"/>
    </style:style>
    <style:style style:name="T148" style:family="text">
      <style:text-properties officeooo:rsid="0109ee0f"/>
    </style:style>
    <style:style style:name="T149" style:family="text">
      <style:text-properties officeooo:rsid="011152ad"/>
    </style:style>
    <style:style style:name="T150" style:family="text">
      <style:text-properties officeooo:rsid="01197bd3"/>
    </style:style>
    <style:style style:name="T151" style:family="text">
      <style:text-properties officeooo:rsid="011ba880"/>
    </style:style>
    <style:style style:name="T152" style:family="text">
      <style:text-properties officeooo:rsid="012747b8"/>
    </style:style>
    <style:style style:name="T153" style:family="text">
      <style:text-properties officeooo:rsid="01391e09"/>
    </style:style>
    <style:style style:name="T154" style:family="text">
      <style:text-properties fo:font-size="11.8999996185303pt" style:font-name-asian="WenQuanYi Micro Hei" style:font-size-asian="11.8999996185303pt" style:font-name-complex="Lohit Hindi2" style:font-size-complex="11.8999996185303pt"/>
    </style:style>
    <style:style style:name="T155" style:family="text">
      <style:text-properties fo:font-size="11.8999996185303pt" officeooo:rsid="01a3ac4f" style:font-name-asian="WenQuanYi Micro Hei" style:font-size-asian="11.8999996185303pt" style:font-name-complex="Lohit Hindi2" style:font-size-complex="11.8999996185303pt"/>
    </style:style>
    <style:style style:name="T156" style:family="text">
      <style:text-properties fo:font-size="11.8999996185303pt" officeooo:rsid="01a3e481" style:font-name-asian="WenQuanYi Micro Hei" style:font-size-asian="11.8999996185303pt" style:font-name-complex="Lohit Hindi2" style:font-size-complex="11.8999996185303pt"/>
    </style:style>
    <style:style style:name="T157" style:family="text">
      <style:text-properties fo:font-size="11.8999996185303pt" officeooo:rsid="01c31d8c" style:font-name-asian="WenQuanYi Micro Hei" style:font-size-asian="11.8999996185303pt" style:font-name-complex="Lohit Hindi2" style:font-size-complex="11.8999996185303pt"/>
    </style:style>
    <style:style style:name="T158" style:family="text">
      <style:text-properties fo:font-size="11.8999996185303pt" fo:font-style="italic" fo:font-weight="bold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59" style:family="text">
      <style:text-properties fo:font-size="11.8999996185303pt" fo:font-style="italic" fo:font-weight="bold" officeooo:rsid="01a3e481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60" style:family="text">
      <style:text-properties fo:font-size="11.8999996185303pt" fo:font-style="italic" fo:font-weight="bold" officeooo:rsid="01611fc4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61" style:family="text">
      <style:text-properties fo:font-size="11.8999996185303pt" fo:font-style="italic" fo:font-weight="bold" officeooo:rsid="01c31d8c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62" style:family="text">
      <style:text-properties fo:font-size="11.8999996185303pt" fo:font-style="italic" fo:font-weight="bold" officeooo:rsid="02bc7f90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63" style:family="text">
      <style:text-properties fo:font-size="11.8999996185303pt" fo:font-weight="bold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64" style:family="text">
      <style:text-properties fo:font-size="11.8999996185303pt" fo:font-weight="bold" officeooo:rsid="015fbfae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65" style:family="text">
      <style:text-properties fo:font-size="11.8999996185303pt" fo:font-weight="bold" officeooo:rsid="01a3ac4f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66" style:family="text">
      <style:text-properties fo:font-size="11.8999996185303pt" fo:font-style="normal" fo:font-weight="normal" officeooo:rsid="01a3e481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167" style:family="text">
      <style:text-properties fo:font-size="11.8999996185303pt" fo:font-weight="normal" style:font-name-asian="WenQuanYi Micro Hei" style:font-size-asian="11.8999996185303pt" style:font-weight-asian="normal" style:font-name-complex="Lohit Hindi2" style:font-size-complex="11.8999996185303pt" style:font-weight-complex="normal"/>
    </style:style>
    <style:style style:name="T168" style:family="text">
      <style:text-properties fo:font-size="11.8999996185303pt" fo:font-weight="normal" officeooo:rsid="01a3ac4f" style:font-name-asian="WenQuanYi Micro Hei" style:font-size-asian="11.8999996185303pt" style:font-weight-asian="normal" style:font-name-complex="Lohit Hindi2" style:font-size-complex="11.8999996185303pt" style:font-weight-complex="normal"/>
    </style:style>
    <style:style style:name="T169" style:family="text">
      <style:text-properties officeooo:rsid="014639d4"/>
    </style:style>
    <style:style style:name="T170" style:family="text">
      <style:text-properties officeooo:rsid="01736b89"/>
    </style:style>
    <style:style style:name="T171" style:family="text">
      <style:text-properties officeooo:rsid="017c14fa"/>
    </style:style>
    <style:style style:name="T172" style:family="text">
      <style:text-properties officeooo:rsid="0180917a"/>
    </style:style>
    <style:style style:name="T173" style:family="text">
      <style:text-properties officeooo:rsid="0182dce3"/>
    </style:style>
    <style:style style:name="T174" style:family="text">
      <style:text-properties officeooo:rsid="01830471"/>
    </style:style>
    <style:style style:name="T175" style:family="text">
      <style:text-properties officeooo:rsid="01870321"/>
    </style:style>
    <style:style style:name="T176" style:family="text">
      <style:text-properties officeooo:rsid="018aa2c4"/>
    </style:style>
    <style:style style:name="T177" style:family="text">
      <style:text-properties officeooo:rsid="018cbe8f"/>
    </style:style>
    <style:style style:name="T178" style:family="text">
      <style:text-properties officeooo:rsid="018d353e"/>
    </style:style>
    <style:style style:name="T179" style:family="text">
      <style:text-properties officeooo:rsid="018dfa69"/>
    </style:style>
    <style:style style:name="T180" style:family="text">
      <style:text-properties officeooo:rsid="018e3abc"/>
    </style:style>
    <style:style style:name="T181" style:family="text">
      <style:text-properties officeooo:rsid="019127c0"/>
    </style:style>
    <style:style style:name="T182" style:family="text">
      <style:text-properties officeooo:rsid="0196acba"/>
    </style:style>
    <style:style style:name="T183" style:family="text">
      <style:text-properties officeooo:rsid="019838fd"/>
    </style:style>
    <style:style style:name="T184" style:family="text">
      <style:text-properties officeooo:rsid="019e1818"/>
    </style:style>
    <style:style style:name="T185" style:family="text">
      <style:text-properties officeooo:rsid="019fc817"/>
    </style:style>
    <style:style style:name="T186" style:family="text">
      <style:text-properties officeooo:rsid="01a0b522"/>
    </style:style>
    <style:style style:name="T187" style:family="text">
      <style:text-properties officeooo:rsid="01a49154"/>
    </style:style>
    <style:style style:name="T188" style:family="text">
      <style:text-properties officeooo:rsid="01a6fd45"/>
    </style:style>
    <style:style style:name="T189" style:family="text">
      <style:text-properties officeooo:rsid="01b1765a"/>
    </style:style>
    <style:style style:name="T190" style:family="text">
      <style:text-properties officeooo:rsid="01bd0c45"/>
    </style:style>
    <style:style style:name="T191" style:family="text">
      <style:text-properties officeooo:rsid="01c22379"/>
    </style:style>
    <style:style style:name="T192" style:family="text">
      <style:text-properties officeooo:rsid="01d349a4"/>
    </style:style>
    <style:style style:name="T193" style:family="text">
      <style:text-properties officeooo:rsid="01d7546b"/>
    </style:style>
    <style:style style:name="T194" style:family="text">
      <style:text-properties officeooo:rsid="01e07616"/>
    </style:style>
    <style:style style:name="T195" style:family="text">
      <style:text-properties officeooo:rsid="01e19ce1"/>
    </style:style>
    <style:style style:name="T196" style:family="text">
      <style:text-properties officeooo:rsid="02915030"/>
    </style:style>
    <style:style style:name="T197" style:family="text">
      <style:text-properties officeooo:rsid="0233990a"/>
    </style:style>
    <style:style style:name="T198" style:family="text">
      <style:text-properties style:font-name="Monospace" fo:font-size="10pt" style:font-size-asian="10pt"/>
    </style:style>
    <style:style style:name="T199" style:family="text">
      <style:text-properties officeooo:rsid="01e526c1"/>
    </style:style>
    <style:style style:name="T200" style:family="text">
      <style:text-properties officeooo:rsid="01e6888c"/>
    </style:style>
    <style:style style:name="T201" style:family="text">
      <style:text-properties officeooo:rsid="01e8c606"/>
    </style:style>
    <style:style style:name="T202" style:family="text">
      <style:text-properties officeooo:rsid="01ea6494"/>
    </style:style>
    <style:style style:name="T203" style:family="text">
      <style:text-properties officeooo:rsid="01eaf719"/>
    </style:style>
    <style:style style:name="T204" style:family="text">
      <style:text-properties officeooo:rsid="01eb7f02"/>
    </style:style>
    <style:style style:name="T205" style:family="text">
      <style:text-properties officeooo:rsid="01f0bd4a"/>
    </style:style>
    <style:style style:name="T206" style:family="text">
      <style:text-properties officeooo:rsid="01f178a6"/>
    </style:style>
    <style:style style:name="T207" style:family="text">
      <style:text-properties officeooo:rsid="01f3b5d6"/>
    </style:style>
    <style:style style:name="T208" style:family="text">
      <style:text-properties officeooo:rsid="01f5155f"/>
    </style:style>
    <style:style style:name="T209" style:family="text">
      <style:text-properties officeooo:rsid="021180ea"/>
    </style:style>
    <style:style style:name="T210" style:family="text">
      <style:text-properties officeooo:rsid="0217a75d"/>
    </style:style>
    <style:style style:name="T211" style:family="text">
      <style:text-properties officeooo:rsid="01f83c53"/>
    </style:style>
    <style:style style:name="T212" style:family="text">
      <style:text-properties officeooo:rsid="01fcfc09"/>
    </style:style>
    <style:style style:name="T213" style:family="text">
      <style:text-properties officeooo:rsid="01fe0912"/>
    </style:style>
    <style:style style:name="T214" style:family="text">
      <style:text-properties officeooo:rsid="01ff255d"/>
    </style:style>
    <style:style style:name="T215" style:family="text">
      <style:text-properties officeooo:rsid="02008497"/>
    </style:style>
    <style:style style:name="T216" style:family="text">
      <style:text-properties officeooo:rsid="02046e19"/>
    </style:style>
    <style:style style:name="T217" style:family="text">
      <style:text-properties officeooo:rsid="0207dd43"/>
    </style:style>
    <style:style style:name="T218" style:family="text">
      <style:text-properties officeooo:rsid="020cedef"/>
    </style:style>
    <style:style style:name="T219" style:family="text">
      <style:text-properties officeooo:rsid="020eae23"/>
    </style:style>
    <style:style style:name="T220" style:family="text">
      <style:text-properties officeooo:rsid="020ff3fb"/>
    </style:style>
    <style:style style:name="T221" style:family="text">
      <style:text-properties officeooo:rsid="02109e59"/>
    </style:style>
    <style:style style:name="T222" style:family="text">
      <style:text-properties officeooo:rsid="0212403b"/>
    </style:style>
    <style:style style:name="T223" style:family="text">
      <style:text-properties officeooo:rsid="0212d54e"/>
    </style:style>
    <style:style style:name="T224" style:family="text">
      <style:text-properties officeooo:rsid="0214b925"/>
    </style:style>
    <style:style style:name="T225" style:family="text">
      <style:text-properties officeooo:rsid="02196887"/>
    </style:style>
    <style:style style:name="T226" style:family="text">
      <style:text-properties officeooo:rsid="0225956e"/>
    </style:style>
    <style:style style:name="T227" style:family="text">
      <style:text-properties officeooo:rsid="02286eb7"/>
    </style:style>
    <style:style style:name="T228" style:family="text">
      <style:text-properties officeooo:rsid="022a6ec0"/>
    </style:style>
    <style:style style:name="T229" style:family="text">
      <style:text-properties officeooo:rsid="022f67c8"/>
    </style:style>
    <style:style style:name="T230" style:family="text">
      <style:text-properties officeooo:rsid="022f9e75"/>
    </style:style>
    <style:style style:name="T231" style:family="text">
      <style:text-properties officeooo:rsid="0237e984"/>
    </style:style>
    <style:style style:name="T232" style:family="text">
      <style:text-properties officeooo:rsid="02394546"/>
    </style:style>
    <style:style style:name="T233" style:family="text">
      <style:text-properties officeooo:rsid="0241a9a2"/>
    </style:style>
    <style:style style:name="T234" style:family="text">
      <style:text-properties officeooo:rsid="02459518"/>
    </style:style>
    <style:style style:name="T235" style:family="text">
      <style:text-properties officeooo:rsid="0247bd8a"/>
    </style:style>
    <style:style style:name="T236" style:family="text">
      <style:text-properties officeooo:rsid="025e9e4b"/>
    </style:style>
    <style:style style:name="T237" style:family="text">
      <style:text-properties fo:color="#0000ff" loext:opacity="100%"/>
    </style:style>
    <style:style style:name="T238" style:family="text">
      <style:text-properties fo:color="#0000ff" loext:opacity="100%" style:font-name="Droid Sans Mono" fo:font-size="10.5pt" fo:font-weight="normal" fo:background-color="#ffffff" loext:char-shading-value="0"/>
    </style:style>
    <style:style style:name="T239" style:family="text">
      <style:text-properties fo:color="#14181f" loext:opacity="100%" style:font-name="var font-mono" fo:background-color="transparent" loext:char-shading-value="0"/>
    </style:style>
    <style:style style:name="T240" style:family="text">
      <style:text-properties fo:color="#14181f" loext:opacity="100%" fo:background-color="transparent" loext:char-shading-value="0"/>
    </style:style>
    <style:style style:name="T241" style:family="text">
      <style:text-properties fo:color="#14181f" loext:opacity="100%" style:font-name="var font-mono1"/>
    </style:style>
    <style:style style:name="T242" style:family="text">
      <style:text-properties fo:color="#14181f" loext:opacity="100%"/>
    </style:style>
    <style:style style:name="T243" style:family="text">
      <style:text-properties fo:color="#14181f" loext:opacity="100%" style:font-name="Times New Roman" fo:font-size="12pt" fo:font-style="italic" fo:font-weight="bold" officeooo:rsid="02ba8ea1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244" style:family="text">
      <style:text-properties fo:color="#14181f" loext:opacity="100%" fo:font-style="italic" fo:font-weight="bold" officeooo:rsid="02ba8ea1" style:font-style-asian="italic" style:font-weight-asian="bold" style:font-style-complex="italic" style:font-weight-complex="bold"/>
    </style:style>
    <style:style style:name="T245" style:family="text">
      <style:text-properties fo:color="#2b303b" loext:opacity="100%"/>
    </style:style>
    <style:style style:name="T246" style:family="text">
      <style:text-properties fo:color="#2b303b" loext:opacity="100%" style:font-name="var font-mono" fo:background-color="transparent" loext:char-shading-value="0"/>
    </style:style>
    <style:style style:name="T247" style:family="text">
      <style:text-properties fo:color="#2b303b" loext:opacity="100%" style:font-name="var font-mono1"/>
    </style:style>
    <style:style style:name="T248" style:family="text">
      <style:text-properties fo:color="#008080" loext:opacity="100%" style:font-name="var font-mono" fo:background-color="transparent" loext:char-shading-value="0"/>
    </style:style>
    <style:style style:name="T249" style:family="text">
      <style:text-properties fo:color="#008080" loext:opacity="100%" style:font-name="var font-mono1"/>
    </style:style>
    <style:style style:name="T250" style:family="text">
      <style:text-properties fo:color="#008080" loext:opacity="100%" style:font-name="Times New Roman" fo:font-size="12pt" fo:font-style="italic" fo:font-weight="bold" officeooo:rsid="02ba8ea1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251" style:family="text">
      <style:text-properties officeooo:rsid="02607733"/>
    </style:style>
    <style:style style:name="T252" style:family="text">
      <style:text-properties officeooo:rsid="02641767"/>
    </style:style>
    <style:style style:name="T253" style:family="text">
      <style:text-properties officeooo:rsid="0265d002"/>
    </style:style>
    <style:style style:name="T254" style:family="text">
      <style:text-properties officeooo:rsid="0267fe07"/>
    </style:style>
    <style:style style:name="T255" style:family="text">
      <style:text-properties officeooo:rsid="02684f36"/>
    </style:style>
    <style:style style:name="T256" style:family="text">
      <style:text-properties style:font-name="Liberation Mono1" fo:font-size="10pt" fo:font-weight="bold" style:font-name-asian="Droid Sans Fallback1" style:font-size-asian="10pt" style:font-weight-asian="bold" style:font-name-complex="Liberation Mono2" style:font-size-complex="10pt"/>
    </style:style>
    <style:style style:name="T257" style:family="text">
      <style:text-properties style:font-name="Liberation Mono1" fo:font-size="10pt" fo:font-weight="bold" officeooo:rsid="02684f36" style:font-name-asian="Droid Sans Fallback1" style:font-size-asian="10pt" style:font-weight-asian="bold" style:font-name-complex="Liberation Mono2" style:font-size-complex="10pt"/>
    </style:style>
    <style:style style:name="T258" style:family="text">
      <style:text-properties officeooo:rsid="026c56ca"/>
    </style:style>
    <style:style style:name="T259" style:family="text">
      <style:text-properties style:font-name="Calibri" fo:font-size="11pt" fo:font-style="normal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60" style:family="text">
      <style:text-properties style:font-name="Calibri" fo:font-size="22pt" fo:font-weight="bold" style:font-name-asian="Calibri1" style:font-size-asian="22pt" style:font-weight-asian="bold" style:font-name-complex="Calibri1" style:font-size-complex="22pt" style:font-weight-complex="bold"/>
    </style:style>
    <style:style style:name="T261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262" style:family="text">
      <style:text-properties style:font-name="Consolas" fo:font-size="9pt" style:font-name-asian="Consolas1" style:font-size-asian="9pt" style:font-name-complex="Consolas1" style:font-size-complex="9pt"/>
    </style:style>
    <style:style style:name="T263" style:family="text">
      <style:text-properties style:font-name="Consolas" fo:font-size="9pt" officeooo:rsid="02875a1d" style:font-name-asian="Consolas1" style:font-size-asian="9pt" style:font-name-complex="Consolas1" style:font-size-complex="9pt"/>
    </style:style>
    <style:style style:name="T264" style:family="text">
      <style:text-properties officeooo:rsid="026e8db5"/>
    </style:style>
    <style:style style:name="T265" style:family="text">
      <style:text-properties fo:color="#8100c2" loext:opacity="100%" style:font-name="var font-mono1"/>
    </style:style>
    <style:style style:name="T266" style:family="text">
      <style:text-properties fo:color="#008000" loext:opacity="100%"/>
    </style:style>
    <style:style style:name="T267" style:family="text">
      <style:text-properties fo:color="#008000" loext:opacity="100%" style:font-name="var font-mono1"/>
    </style:style>
    <style:style style:name="T268" style:family="text">
      <style:text-properties fo:color="#008000" loext:opacity="100%" style:font-name="var font-mono" fo:background-color="transparent" loext:char-shading-value="0"/>
    </style:style>
    <style:style style:name="T269" style:family="text">
      <style:text-properties fo:color="#0051c2" loext:opacity="100%" style:font-name="var font-mono1"/>
    </style:style>
    <style:style style:name="T270" style:family="text">
      <style:text-properties fo:color="#0051c2" loext:opacity="100%" style:font-name="var font-mono" fo:background-color="transparent" loext:char-shading-value="0"/>
    </style:style>
    <style:style style:name="T271" style:family="text">
      <style:text-properties fo:color="#6e7687" loext:opacity="100%"/>
    </style:style>
    <style:style style:name="T272" style:family="text">
      <style:text-properties fo:color="#6e7687" loext:opacity="100%" style:font-name="var font-mono1"/>
    </style:style>
    <style:style style:name="T273" style:family="text">
      <style:text-properties fo:color="#6e7687" loext:opacity="100%" style:font-name="var font-mono" fo:background-color="transparent" loext:char-shading-value="0"/>
    </style:style>
    <style:style style:name="T274" style:family="text">
      <style:text-properties officeooo:rsid="02700474"/>
    </style:style>
    <style:style style:name="T275" style:family="text">
      <style:text-properties officeooo:rsid="0272487e"/>
    </style:style>
    <style:style style:name="T276" style:family="text">
      <style:text-properties officeooo:rsid="027445df"/>
    </style:style>
    <style:style style:name="T277" style:family="text">
      <style:text-properties officeooo:rsid="027530f8"/>
    </style:style>
    <style:style style:name="T278" style:family="text">
      <style:text-properties officeooo:rsid="027ab65e"/>
    </style:style>
    <style:style style:name="T279" style:family="text">
      <style:text-properties officeooo:rsid="027f79fb"/>
    </style:style>
    <style:style style:name="T280" style:family="text">
      <style:text-properties officeooo:rsid="028fc616"/>
    </style:style>
    <style:style style:name="T281" style:family="text">
      <style:text-properties officeooo:rsid="02902f24"/>
    </style:style>
    <style:style style:name="T282" style:family="text">
      <style:text-properties fo:color="#6a8759" loext:opacity="100%" style:font-name="JetBrains Mono" fo:font-size="15pt" fo:font-style="normal" fo:font-weight="normal" style:font-size-asian="15pt" style:font-style-asian="normal" style:font-weight-asian="normal"/>
    </style:style>
    <style:style style:name="T283" style:family="text">
      <style:text-properties officeooo:rsid="029255e9"/>
    </style:style>
    <style:style style:name="T284" style:family="text">
      <style:text-properties officeooo:rsid="0293171a"/>
    </style:style>
    <style:style style:name="T285" style:family="text">
      <style:text-properties officeooo:rsid="029474f3"/>
    </style:style>
    <style:style style:name="T286" style:family="text">
      <style:text-properties officeooo:rsid="02975a52"/>
    </style:style>
    <style:style style:name="T287" style:family="text">
      <style:text-properties officeooo:rsid="02982a9b"/>
    </style:style>
    <style:style style:name="T288" style:family="text">
      <style:text-properties officeooo:rsid="029f525f"/>
    </style:style>
    <style:style style:name="T289" style:family="text">
      <style:text-properties officeooo:rsid="029fb7ef"/>
    </style:style>
    <style:style style:name="T290" style:family="text">
      <style:text-properties officeooo:rsid="02a11ee5"/>
    </style:style>
    <style:style style:name="T291" style:family="text">
      <style:text-properties fo:color="#a31515" loext:opacity="100%"/>
    </style:style>
    <style:style style:name="T292" style:family="text">
      <style:text-properties officeooo:rsid="02a2bca6"/>
    </style:style>
    <style:style style:name="T293" style:family="text">
      <style:text-properties officeooo:rsid="02a41fa7"/>
    </style:style>
    <style:style style:name="T294" style:family="text">
      <style:text-properties officeooo:rsid="02a5574e"/>
    </style:style>
    <style:style style:name="T295" style:family="text">
      <style:text-properties fo:color="#b34a00" loext:opacity="100%" style:font-name="var font-mono" fo:background-color="transparent" loext:char-shading-value="0"/>
    </style:style>
    <style:style style:name="T296" style:family="text">
      <style:text-properties fo:color="#bd0f1e" loext:opacity="100%"/>
    </style:style>
    <style:style style:name="T297" style:family="text">
      <style:text-properties fo:color="#bd0f1e" loext:opacity="100%" style:font-name="var font-mono" fo:background-color="transparent" loext:char-shading-value="0"/>
    </style:style>
    <style:style style:name="T298" style:family="text">
      <style:text-properties officeooo:rsid="02a8cdba"/>
    </style:style>
    <style:style style:name="T299" style:family="text">
      <style:text-properties officeooo:rsid="02aa406d"/>
    </style:style>
    <style:style style:name="T300" style:family="text">
      <style:text-properties style:font-name="Times New Roman" officeooo:rsid="01d1e3ad"/>
    </style:style>
    <style:style style:name="T301" style:family="text">
      <style:text-properties officeooo:rsid="02ab97a9"/>
    </style:style>
    <style:style style:name="T302" style:family="text">
      <style:text-properties officeooo:rsid="02acab1b"/>
    </style:style>
    <style:style style:name="T303" style:family="text">
      <style:text-properties officeooo:rsid="02adbbe5"/>
    </style:style>
    <style:style style:name="T304" style:family="text">
      <style:text-properties officeooo:rsid="02ae1364"/>
    </style:style>
    <style:style style:name="T305" style:family="text">
      <style:text-properties officeooo:rsid="02b062fe"/>
    </style:style>
    <style:style style:name="T306" style:family="text">
      <style:text-properties officeooo:rsid="02b4ae0f"/>
    </style:style>
    <style:style style:name="T307" style:family="text">
      <style:text-properties officeooo:rsid="02b5115a"/>
    </style:style>
    <style:style style:name="T308" style:family="text">
      <style:text-properties officeooo:rsid="02b5a02b"/>
    </style:style>
    <style:style style:name="T309" style:family="text">
      <style:text-properties officeooo:rsid="02b71fa2"/>
    </style:style>
    <style:style style:name="T310" style:family="text">
      <style:text-properties officeooo:rsid="0190248e"/>
    </style:style>
    <style:style style:name="T311" style:family="text">
      <style:text-properties officeooo:rsid="02ba8ea1"/>
    </style:style>
    <style:style style:name="T312" style:family="text">
      <style:text-properties fo:color="#e8bf6a" loext:opacity="100%" style:font-name="JetBrains Mono" fo:font-size="15pt" fo:font-style="normal" fo:font-weight="normal" style:font-size-asian="15pt" style:font-style-asian="normal" style:font-weight-asian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27cm" fo:text-indent="-0.635cm" fo:margin-left="1.4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62cm" fo:text-indent="-0.635cm" fo:margin-left="2.06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97cm" fo:text-indent="-0.635cm" fo:margin-left="2.69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32cm" fo:text-indent="-0.635cm" fo:margin-left="3.33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67cm" fo:text-indent="-0.635cm" fo:margin-left="3.96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02cm" fo:text-indent="-0.635cm" fo:margin-left="4.60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37cm" fo:text-indent="-0.635cm" fo:margin-left="5.23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72cm" fo:text-indent="-0.635cm" fo:margin-left="5.87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07cm" fo:text-indent="-0.635cm" fo:margin-left="6.50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42cm" fo:text-indent="-0.635cm" fo:margin-left="7.142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>Cahier de TP <text:line-break/>« <text:span text:style-name="T184">Administration Cluster Kafka</text:span><text:span text:style-name="T98"> </text:span>»</text:p>
      <text:p text:style-name="P102"/>
      <text:p text:style-name="P54">Pré-requis : </text:p>
      <text:list xml:id="list3665899728" text:style-name="L1">
        <text:list-item>
          <text:p text:style-name="P217">Bonne connexion Internet </text:p>
        </text:list-item>
        <text:list-item>
          <text:p text:style-name="P218">Linux</text:p>
        </text:list-item>
        <text:list-item>
          <text:p text:style-name="P219">JDK<text:span text:style-name="T205">2</text:span><text:span text:style-name="T153">1</text:span>+, <text:span text:style-name="T153">Maven</text:span></text:p>
        </text:list-item>
        <text:list-item>
          <text:p text:style-name="P220">IDE Recommandés : STS 4, IntelliJIDEA, VSCode</text:p>
        </text:list-item>
        <text:list-item>
          <text:p text:style-name="P221"><text:span text:style-name="T115">Docker, </text:span>Git</text:p>
        </text:list-item>
      </text:list>
      <text:p text:style-name="P130"/>
      <text:p text:style-name="P56">Solutions :</text:p>
      <text:p text:style-name="P169"><text:a xlink:type="simple" xlink:href="https://github.com/dthibau/kafka-admin-solutions" text:style-name="Internet_20_link" text:visited-style-name="Visited_20_Internet_20_Link">https://github.com/dthibau/kafka-admin-solutions</text:a></text:p>
      <text:p text:style-name="P169"/>
      <text:p text:style-name="P58">Images docker utilisées :</text:p>
      <text:list text:style-name="L2">
        <text:list-item>
          <text:p text:style-name="P171" loext:marker-style-name="T24"><text:span text:style-name="T24">apache/kafka:4.2.0</text:span></text:p>
        </text:list-item>
        <text:list-item>
          <text:p text:style-name="P223"><text:span text:style-name="T238">docker.redpanda.com/redpandadata/console:v3.2.1</text:span></text:p>
        </text:list-item>
        <text:list-item>
          <text:p text:style-name="P233">tchiotludo/akhq</text:p>
        </text:list-item>
        <text:list-item>
          <text:p text:style-name="P223"><text:span text:style-name="T238">digitsy/kafka-magic</text:span></text:p>
        </text:list-item>
        <text:list-item>
          <text:p text:style-name="P232">confluentinc/cp-kafka-rest:7.7.8</text:p>
        </text:list-item>
        <text:list-item>
          <text:p text:style-name="P232">confluentinc/cp-schema-registry:7.7.8</text:p>
        </text:list-item>
        <text:list-item>
          <text:p text:style-name="P234">postgres:15.1</text:p>
        </text:list-item>
        <text:list-item>
          <text:p text:style-name="P234">dpage/pgadmin4</text:p>
        </text:list-item>
        <text:list-item>
          <text:p text:style-name="P222"><text:span text:style-name="T7">docker.elastic.co/elasticsearch/elasticsearch:</text:span><text:span text:style-name="T238">8.13.0</text:span></text:p>
        </text:list-item>
        <text:list-item>
          <text:p text:style-name="P222"><text:span text:style-name="T7">docker.elastic.co/kibana/kibana:</text:span><text:span text:style-name="T238">8.13.0</text:span></text:p>
        </text:list-item>
        <text:list-item>
          <text:p text:style-name="P222"><text:span text:style-name="T238">quay.io/keycloak/keycloak:26.1</text:span></text:p>
        </text:list-item>
      </text:list>
      <text:list text:continue-list="list3665899728" text:style-name="L1">
        <text:list-header>
          <text:p text:style-name="P224"/>
        </text:list-header>
      </text:list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78"><text:a xlink:type="simple" xlink:href="#__RefHeading___Toc9766_3845367211" text:style-name="Index_20_Link" text:visited-style-name="Index_20_Link">Atelier 1: Mise en place<text:tab/>4</text:a></text:p>
          <text:p text:style-name="P179"><text:a xlink:type="simple" xlink:href="#__RefHeading___Toc2648_870239550" text:style-name="Index_20_Link" text:visited-style-name="Index_20_Link">1.1 Installation cluster<text:tab/>4</text:a></text:p>
          <text:p text:style-name="P180"><text:a xlink:type="simple" xlink:href="#__RefHeading___Toc2650_870239550" text:style-name="Index_20_Link" text:visited-style-name="Index_20_Link">1.1.1 Option archive<text:tab/>4</text:a></text:p>
          <text:p text:style-name="P180"><text:a xlink:type="simple" xlink:href="#__RefHeading___Toc9856_3845367211" text:style-name="Index_20_Link" text:visited-style-name="Index_20_Link">1.1.2 Option Docker<text:tab/>5</text:a></text:p>
          <text:p text:style-name="P180"><text:a xlink:type="simple" xlink:href="#__RefHeading___Toc20226_2913458575" text:style-name="Index_20_Link" text:visited-style-name="Index_20_Link">1.1.3 Vérifications<text:tab/>5</text:a></text:p>
          <text:p text:style-name="P179"><text:a xlink:type="simple" xlink:href="#__RefHeading___Toc14826_2913458575" text:style-name="Index_20_Link" text:visited-style-name="Index_20_Link">1.2 Utilitaires : Configuration dynamique et inspection du cluster<text:tab/>6</text:a></text:p>
          <text:p text:style-name="P180"><text:a xlink:type="simple" xlink:href="#__RefHeading___Toc14830_2913458575" text:style-name="Index_20_Link" text:visited-style-name="Index_20_Link">1.2.1 Inspection du quorum KRaft<text:tab/>6</text:a></text:p>
          <text:p text:style-name="P180"><text:a xlink:type="simple" xlink:href="#__RefHeading___Toc14832_2913458575" text:style-name="Index_20_Link" text:visited-style-name="Index_20_Link">1.2.2 Modifier la configuration d'un topic<text:tab/>6</text:a></text:p>
          <text:p text:style-name="P180"><text:a xlink:type="simple" xlink:href="#__RefHeading___Toc14834_2913458575" text:style-name="Index_20_Link" text:visited-style-name="Index_20_Link">1.2.3 Configuration dynamique du broker<text:tab/>7</text:a></text:p>
          <text:p text:style-name="P179"><text:a xlink:type="simple" xlink:href="#__RefHeading___Toc9858_3845367211" text:style-name="Index_20_Link" text:visited-style-name="Index_20_Link">1.3 Outils graphiques<text:tab/>7</text:a></text:p>
          <text:p text:style-name="P178"><text:a xlink:type="simple" xlink:href="#__RefHeading___Toc9782_3845367211" text:style-name="Index_20_Link" text:visited-style-name="Index_20_Link">Atelier 2: Production de messages<text:tab/>9</text:a></text:p>
          <text:p text:style-name="P178"><text:a xlink:type="simple" xlink:href="#__RefHeading___Toc9784_3845367211" text:style-name="Index_20_Link" text:visited-style-name="Index_20_Link">Atelier 3 : Consommation de messages<text:tab/>10</text:a></text:p>
          <text:p text:style-name="P179"><text:a xlink:type="simple" xlink:href="#__RefHeading___Toc9786_38453672111" text:style-name="Index_20_Link" text:visited-style-name="Index_20_Link">3.0 Mise en place BD<text:tab/>10</text:a></text:p>
          <text:p text:style-name="P179"><text:a xlink:type="simple" xlink:href="#__RefHeading___Toc9786_3845367211" text:style-name="Index_20_Link" text:visited-style-name="Index_20_Link">3.1 Performance<text:tab/>10</text:a></text:p>
          <text:p text:style-name="P179"><text:a xlink:type="simple" xlink:href="#__RefHeading___Toc9788_3845367211" text:style-name="Index_20_Link" text:visited-style-name="Index_20_Link">3.2 Rebalancing des consommateurs<text:tab/>11</text:a></text:p>
          <text:p text:style-name="P178"><text:a xlink:type="simple" xlink:href="#__RefHeading___Toc16950_1047798942" text:style-name="Index_20_Link" text:visited-style-name="Index_20_Link">Atelier 4 : Exactly Once et Transactions<text:tab/>12</text:a></text:p>
          <text:p text:style-name="P179"><text:a xlink:type="simple" xlink:href="#__RefHeading___Toc6412_3893618287" text:style-name="Index_20_Link" text:visited-style-name="Index_20_Link">4.1 Transaction et ISOLATION_LEVEL<text:tab/>12</text:a></text:p>
          <text:p text:style-name="P180"><text:a xlink:type="simple" xlink:href="#__RefHeading___Toc16952_1047798942" text:style-name="Index_20_Link" text:visited-style-name="Index_20_Link">4.1.1 Producteur transactionnel<text:tab/>12</text:a></text:p>
          <text:p text:style-name="P180"><text:a xlink:type="simple" xlink:href="#__RefHeading___Toc16954_1047798942" text:style-name="Index_20_Link" text:visited-style-name="Index_20_Link">4.1.2 Consommateur<text:tab/>12</text:a></text:p>
          <text:p text:style-name="P179"><text:a xlink:type="simple" xlink:href="#__RefHeading___Toc6412_38936182871" text:style-name="Index_20_Link" text:visited-style-name="Index_20_Link">4.2 Exactly Once<text:tab/>12</text:a></text:p>
          <text:p text:style-name="P178"><text:a xlink:type="simple" xlink:href="#__RefHeading___Toc9790_3845367211" text:style-name="Index_20_Link" text:visited-style-name="Index_20_Link">Atelier 5. Schema Registry et sérialisation Avro<text:tab/>14</text:a></text:p>
          <text:p text:style-name="P179"><text:a xlink:type="simple" xlink:href="#__RefHeading___Toc9792_3845367211" text:style-name="Index_20_Link" text:visited-style-name="Index_20_Link">5.1 Démarrage de Confuent Registry<text:tab/>14</text:a></text:p>
          <text:p text:style-name="P179"><text:a xlink:type="simple" xlink:href="#__RefHeading___Toc9794_3845367211" text:style-name="Index_20_Link" text:visited-style-name="Index_20_Link"><text:soft-page-break/>5.2 Producteur de message<text:tab/>14</text:a></text:p>
          <text:p text:style-name="P179"><text:a xlink:type="simple" xlink:href="#__RefHeading___Toc9796_3845367211" text:style-name="Index_20_Link" text:visited-style-name="Index_20_Link">5.3 Consommateur de message<text:tab/>14</text:a></text:p>
          <text:p text:style-name="P179"><text:a xlink:type="simple" xlink:href="#__RefHeading___Toc9798_38453672111" text:style-name="Index_20_Link" text:visited-style-name="Index_20_Link">5.4 Evolution du schéma compatible<text:tab/>15</text:a></text:p>
          <text:p text:style-name="P179"><text:a xlink:type="simple" xlink:href="#__RefHeading___Toc9798_38453672112" text:style-name="Index_20_Link" text:visited-style-name="Index_20_Link">5.5 Evolution du schéma incompatible<text:tab/>15</text:a></text:p>
          <text:p text:style-name="P178"><text:a xlink:type="simple" xlink:href="#__RefHeading___Toc20228_2913458575" text:style-name="Index_20_Link" text:visited-style-name="Index_20_Link">Atelier 6. Kafka Connect<text:tab/>16</text:a></text:p>
          <text:p text:style-name="P179"><text:a xlink:type="simple" xlink:href="#__RefHeading___Toc20230_2913458575" text:style-name="Index_20_Link" text:visited-style-name="Index_20_Link">6.1 Installation du plugin ElasticSearch dans kafka connect<text:tab/>16</text:a></text:p>
          <text:p text:style-name="P179"><text:a xlink:type="simple" xlink:href="#__RefHeading___Toc20232_2913458575" text:style-name="Index_20_Link" text:visited-style-name="Index_20_Link">6.2 Démarrage de la stack<text:tab/>16</text:a></text:p>
          <text:p text:style-name="P179"><text:a xlink:type="simple" xlink:href="#__RefHeading___Toc20234_2913458575" text:style-name="Index_20_Link" text:visited-style-name="Index_20_Link">6.3 Configuration du connecteur<text:tab/>16</text:a></text:p>
          <text:p text:style-name="P179"><text:a xlink:type="simple" xlink:href="#__RefHeading___Toc20236_2913458575" text:style-name="Index_20_Link" text:visited-style-name="Index_20_Link">6.4 Améliorations<text:tab/>17</text:a></text:p>
          <text:p text:style-name="P178"><text:a xlink:type="simple" xlink:href="#__RefHeading___Toc20238_2913458575" text:style-name="Index_20_Link" text:visited-style-name="Index_20_Link">Atelier 7. MirrorMaker 2<text:tab/>18</text:a></text:p>
          <text:p text:style-name="P179"><text:a xlink:type="simple" xlink:href="#__RefHeading___Toc20240_2913458575" text:style-name="Index_20_Link" text:visited-style-name="Index_20_Link">7.1 Démarrer le second cluster<text:tab/>18</text:a></text:p>
          <text:p text:style-name="P179"><text:a xlink:type="simple" xlink:href="#__RefHeading___Toc20242_2913458575" text:style-name="Index_20_Link" text:visited-style-name="Index_20_Link">7.2 Vérifier la disponibilité des connecteurs MM2<text:tab/>18</text:a></text:p>
          <text:p text:style-name="P179"><text:a xlink:type="simple" xlink:href="#__RefHeading___Toc20244_2913458575" text:style-name="Index_20_Link" text:visited-style-name="Index_20_Link">7.3 Créer le connecteur MirrorSource<text:tab/>18</text:a></text:p>
          <text:p text:style-name="P179"><text:a xlink:type="simple" xlink:href="#__RefHeading___Toc20246_2913458575" text:style-name="Index_20_Link" text:visited-style-name="Index_20_Link">7.4 Créer le connecteur MirrorCheckpoint<text:tab/>19</text:a></text:p>
          <text:p text:style-name="P179"><text:a xlink:type="simple" xlink:href="#__RefHeading___Toc20248_2913458575" text:style-name="Index_20_Link" text:visited-style-name="Index_20_Link">7.5 Créer le connecteur MirrorHeartbeat<text:tab/>19</text:a></text:p>
          <text:p text:style-name="P179"><text:a xlink:type="simple" xlink:href="#__RefHeading___Toc20250_2913458575" text:style-name="Index_20_Link" text:visited-style-name="Index_20_Link">7.6 Vérifier la réplication<text:tab/>20</text:a></text:p>
          <text:p text:style-name="P178"><text:a xlink:type="simple" xlink:href="#__RefHeading___Toc9889_3845367211" text:style-name="Index_20_Link" text:visited-style-name="Index_20_Link">Atelier 8 : kafkaStream et ksqlDB<text:tab/>21</text:a></text:p>
          <text:p text:style-name="P179"><text:a xlink:type="simple" xlink:href="#__RefHeading___Toc20252_2913458575" text:style-name="Index_20_Link" text:visited-style-name="Index_20_Link">8.1 Application KafkaStream<text:tab/>21</text:a></text:p>
          <text:p text:style-name="P179"><text:a xlink:type="simple" xlink:href="#__RefHeading___Toc20254_2913458575" text:style-name="Index_20_Link" text:visited-style-name="Index_20_Link">8.2 kSQLDb<text:tab/>21</text:a></text:p>
          <text:p text:style-name="P180"><text:a xlink:type="simple" xlink:href="#__RefHeading___Toc15343_2024334449" text:style-name="Index_20_Link" text:visited-style-name="Index_20_Link">8.2.1 Démarrage de la stack<text:tab/>21</text:a></text:p>
          <text:p text:style-name="P180"><text:a xlink:type="simple" xlink:href="#__RefHeading___Toc15345_2024334449" text:style-name="Index_20_Link" text:visited-style-name="Index_20_Link">8.2.1 Getting Started<text:tab/>22</text:a></text:p>
          <text:p text:style-name="P180"><text:a xlink:type="simple" xlink:href="#__RefHeading___Toc15351_2024334449" text:style-name="Index_20_Link" text:visited-style-name="Index_20_Link">8.2.2 Transformations et filtres<text:tab/>22</text:a></text:p>
          <text:p text:style-name="P180"><text:a xlink:type="simple" xlink:href="#__RefHeading___Toc15359_2024334449" text:style-name="Index_20_Link" text:visited-style-name="Index_20_Link">8.2.3 Requêtes<text:tab/>23</text:a></text:p>
          <text:p text:style-name="P180"><text:a xlink:type="simple" xlink:href="#__RefHeading___Toc15367_2024334449" text:style-name="Index_20_Link" text:visited-style-name="Index_20_Link">8.2.4 Pour aller plus loin<text:tab/>24</text:a></text:p>
          <text:p text:style-name="P178"><text:a xlink:type="simple" xlink:href="#__RefHeading___Toc20256_2913458575" text:style-name="Index_20_Link" text:visited-style-name="Index_20_Link">Atelier 9: Sécurité<text:tab/>26</text:a></text:p>
          <text:p text:style-name="P179"><text:a xlink:type="simple" xlink:href="#__RefHeading___Toc9834_38453672111" text:style-name="Index_20_Link" text:visited-style-name="Index_20_Link">9.1 Séparation des échanges réseaux<text:tab/>26</text:a></text:p>
          <text:p text:style-name="P179"><text:a xlink:type="simple" xlink:href="#__RefHeading___Toc9834_3845367211" text:style-name="Index_20_Link" text:visited-style-name="Index_20_Link">9.2 Mise en place de SSL pour crypter les données<text:tab/>26</text:a></text:p>
          <text:p text:style-name="P180"><text:a xlink:type="simple" xlink:href="#__RefHeading___Toc16956_1047798942" text:style-name="Index_20_Link" text:visited-style-name="Index_20_Link">9.2.1 SSL appliqué aux communications inter-broker<text:tab/>26</text:a></text:p>
          <text:p text:style-name="P180"><text:a xlink:type="simple" xlink:href="#__RefHeading___Toc16958_1047798942" text:style-name="Index_20_Link" text:visited-style-name="Index_20_Link">9.2.2 SSL appliqué aux communications externes<text:tab/>26</text:a></text:p>
          <text:p text:style-name="P179"><text:a xlink:type="simple" xlink:href="#__RefHeading___Toc9836_3845367211" text:style-name="Index_20_Link" text:visited-style-name="Index_20_Link">9.3 Authentification via SASL/oAuth2<text:tab/>27</text:a></text:p>
          <text:p text:style-name="P180"><text:a xlink:type="simple" xlink:href="#__RefHeading___Toc16960_1047798942%20Copie%201" text:style-name="Index_20_Link" text:visited-style-name="Index_20_Link">9.3.1 Démarrage Keycloak<text:tab/>27</text:a></text:p>
          <text:p text:style-name="P180"><text:a xlink:type="simple" xlink:href="#__RefHeading___Toc16960_1047798942" text:style-name="Index_20_Link" text:visited-style-name="Index_20_Link">9.3.2 Démarrage cluster<text:tab/>27</text:a></text:p>
          <text:p text:style-name="P180"><text:a xlink:type="simple" xlink:href="#__RefHeading___Toc16960_1047798942%20Copie%202" text:style-name="Index_20_Link" text:visited-style-name="Index_20_Link">9.3.2 Démarrage outils connexes<text:tab/>28</text:a></text:p>
          <text:p text:style-name="P180"><text:a xlink:type="simple" xlink:href="#__RefHeading___Toc16962_1047798942" text:style-name="Index_20_Link" text:visited-style-name="Index_20_Link">9.3.2 Authentification client<text:tab/>28</text:a></text:p>
          <text:p text:style-name="P179"><text:a xlink:type="simple" xlink:href="#__RefHeading___Toc9891_3845367211" text:style-name="Index_20_Link" text:visited-style-name="Index_20_Link">9.4 ACL<text:tab/>29</text:a></text:p>
          <text:p text:style-name="P180"><text:a xlink:type="simple" xlink:href="#__RefHeading___Toc16964_1047798942" text:style-name="Index_20_Link" text:visited-style-name="Index_20_Link">9.4.1 Activation des ACLs<text:tab/>29</text:a></text:p>
          <text:p text:style-name="P180"><text:a xlink:type="simple" xlink:href="#__RefHeading___Toc21110_2913458575" text:style-name="Index_20_Link" text:visited-style-name="Index_20_Link">9.4.2 Authentification du contrôleurs<text:tab/>29</text:a></text:p>
          <text:p text:style-name="P180"><text:a xlink:type="simple" xlink:href="#__RefHeading___Toc16966_1047798942" text:style-name="Index_20_Link" text:visited-style-name="Index_20_Link">9.4.3 Vérification et définition des ACLs<text:tab/>30</text:a></text:p>
          <text:p text:style-name="P179"><text:a xlink:type="simple" xlink:href="#__RefHeading___Toc16975_1047798942" text:style-name="Index_20_Link" text:visited-style-name="Index_20_Link">9.5 Quota<text:tab/>31</text:a></text:p>
          <text:p text:style-name="P180"><text:a xlink:type="simple" xlink:href="#__RefHeading___Toc21114_2913458575" text:style-name="Index_20_Link" text:visited-style-name="Index_20_Link">9.5.1 Définition d'un quota pour kafka-producer-client<text:tab/>31</text:a></text:p>
          <text:p text:style-name="P180"><text:a xlink:type="simple" xlink:href="#__RefHeading___Toc21116_2913458575" text:style-name="Index_20_Link" text:visited-style-name="Index_20_Link">9.5.2 Tester l'effet du quota<text:tab/>31</text:a></text:p>
          <text:p text:style-name="P180"><text:a xlink:type="simple" xlink:href="#__RefHeading___Toc21118_2913458575" text:style-name="Index_20_Link" text:visited-style-name="Index_20_Link">9.5.3 Modifier dynamiquement le quota<text:tab/>32</text:a></text:p>
          <text:p text:style-name="P180"><text:a xlink:type="simple" xlink:href="#__RefHeading___Toc21120_2913458575" text:style-name="Index_20_Link" text:visited-style-name="Index_20_Link">9.5.4 Supprimer le quota<text:tab/>32</text:a></text:p>
          <text:p text:style-name="P178"><text:a xlink:type="simple" xlink:href="#__RefHeading___Toc9828_3845367211" text:style-name="Index_20_Link" text:visited-style-name="Index_20_Link">Atelier 10 : Exploitation<text:tab/>34</text:a></text:p>
          <text:p text:style-name="P179"><text:a xlink:type="simple" xlink:href="#__RefHeading___Toc5300_3700672249" text:style-name="Index_20_Link" text:visited-style-name="Index_20_Link">10.1 Rétention et segments<text:tab/>34</text:a></text:p>
          <text:p text:style-name="P179"><text:a xlink:type="simple" xlink:href="#__RefHeading___Toc20373_2913458575" text:style-name="Index_20_Link" text:visited-style-name="Index_20_Link">10.2 Extension du cluster et réassignement des partitions<text:tab/>34</text:a></text:p>
          <text:p text:style-name="P180"><text:a xlink:type="simple" xlink:href="#__RefHeading___Toc21122_2913458575" text:style-name="Index_20_Link" text:visited-style-name="Index_20_Link">10.2.1 Augmenter le nombre de partitions<text:tab/>34</text:a></text:p>
          <text:p text:style-name="P180"><text:a xlink:type="simple" xlink:href="#__RefHeading___Toc21124_2913458575" text:style-name="Index_20_Link" text:visited-style-name="Index_20_Link">10.2.2 Ajout d’un nouveau nœud broker simple<text:tab/>34</text:a></text:p>
          <text:p text:style-name="P180"><text:a xlink:type="simple" xlink:href="#__RefHeading___Toc21126_2913458575" text:style-name="Index_20_Link" text:visited-style-name="Index_20_Link">10.2.3 Effectuer une réaffectation des partitions en 3 étapes<text:tab/>34</text:a></text:p>
          <text:p text:style-name="P179"><text:a xlink:type="simple" xlink:href="#__RefHeading___Toc9832_3845367211" text:style-name="Index_20_Link" text:visited-style-name="Index_20_Link">10.3 Rolling restart<text:tab/>35</text:a></text:p>
          <text:p text:style-name="P180"><text:a xlink:type="simple" xlink:href="#__RefHeading___Toc21128_2913458575" text:style-name="Index_20_Link" text:visited-style-name="Index_20_Link">10.3.1. Créer le topic de test<text:tab/>35</text:a></text:p>
          <text:p text:style-name="P180"><text:a xlink:type="simple" xlink:href="#__RefHeading___Toc21130_2913458575" text:style-name="Index_20_Link" text:visited-style-name="Index_20_Link">10.3.2. Lancer la charge<text:tab/>35</text:a></text:p>
          <text:p text:style-name="P180"><text:a xlink:type="simple" xlink:href="#__RefHeading___Toc21132_2913458575" text:style-name="Index_20_Link" text:visited-style-name="Index_20_Link"><text:soft-page-break/>10.3.3. État initial — à capturer dans un fichier<text:tab/>35</text:a></text:p>
          <text:p text:style-name="P180"><text:a xlink:type="simple" xlink:href="#__RefHeading___Toc21134_2913458575" text:style-name="Index_20_Link" text:visited-style-name="Index_20_Link">10.3.4. Observer la migration en temps réel<text:tab/>36</text:a></text:p>
          <text:p text:style-name="P180"><text:a xlink:type="simple" xlink:href="#__RefHeading___Toc21136_2913458575" text:style-name="Index_20_Link" text:visited-style-name="Index_20_Link">10.3.5. Le rolling restart proprement dit<text:tab/>36</text:a></text:p>
          <text:p text:style-name="P180"><text:a xlink:type="simple" xlink:href="#__RefHeading___Toc21138_2913458575" text:style-name="Index_20_Link" text:visited-style-name="Index_20_Link">10.3.6. Rééquilibrage des leaders<text:tab/>37</text:a></text:p>
          <text:p text:style-name="P180"><text:a xlink:type="simple" xlink:href="#__RefHeading___Toc21140_2913458575" text:style-name="Index_20_Link" text:visited-style-name="Index_20_Link">10.3.7. Métriques côté producer<text:tab/>37</text:a></text:p>
          <text:p text:style-name="P178"><text:a xlink:type="simple" xlink:href="#__RefHeading___Toc9838_3845367211" text:style-name="Index_20_Link" text:visited-style-name="Index_20_Link">Atelier 11. Monitoring avec Prometheus/Grafana<text:tab/>38</text:a></text:p>
          <text:p text:style-name="P179"><text:a xlink:type="simple" xlink:href="#__RefHeading___Toc2654_1126617678" text:style-name="Index_20_Link" text:visited-style-name="Index_20_Link">11.1 Exporter les informations JMX au format Prometheus<text:tab/>38</text:a></text:p>
          <text:p text:style-name="P179"><text:a xlink:type="simple" xlink:href="#__RefHeading___Toc2656_1126617678" text:style-name="Index_20_Link" text:visited-style-name="Index_20_Link">9.3 Mise en place Prometheus Grafana<text:tab/>38</text:a></text:p>
          <text:p text:style-name="P178"><text:a xlink:type="simple" xlink:href="#__RefHeading___Toc2658_1126617678" text:style-name="Index_20_Link" text:visited-style-name="Index_20_Link">A. Annexes <text:tab/>40</text:a></text:p>
          <text:p text:style-name="P179"><text:a xlink:type="simple" xlink:href="#__RefHeading___Toc9768_3845367211" text:style-name="Index_20_Link" text:visited-style-name="Index_20_Link">A.1. Installation Ensemble Zookeeper<text:tab/>40</text:a></text:p>
        </text:index-body>
      </text:table-of-content>
      <text:h text:style-name="Heading_20_1" text:outline-level="1"/>
      <text:h text:style-name="P181" text:outline-level="1"/>
      <text:h text:style-name="P184" text:outline-level="1"><text:bookmark-start text:name="__RefHeading___Toc9766_3845367211"/><text:span text:style-name="T86">Atelier 1</text:span>: Mise en place <text:bookmark-end text:name="__RefHeading___Toc9766_3845367211"/></text:h>
      <text:p text:style-name="Standard"/>
      <text:h text:style-name="P194" text:outline-level="2"><text:bookmark-start text:name="__RefHeading___Toc2648_870239550"/><text:span text:style-name="T170">1.</text:span><text:span text:style-name="T174">1</text:span> <text:span text:style-name="T176">Installation cluster </text:span><text:bookmark-end text:name="__RefHeading___Toc2648_870239550"/></text:h>
      <text:h text:style-name="Heading_20_3" text:outline-level="3"><text:bookmark-start text:name="__RefHeading___Toc2650_870239550"/><text:span text:style-name="T176">1.1.1 </text:span>Option archive<text:bookmark-end text:name="__RefHeading___Toc2650_870239550"/></text:h>
      <text:p text:style-name="Text_20_body"/>
      <text:p text:style-name="P91">Étape 1 : Création du cluster ID et formattage des répertoires de logs</text:p>
      <text:p text:style-name="P27"><text:span text:style-name="T49">Télécharger et dézipper la distribution de Kafka dans </text:span><text:span text:style-name="T50">un répertoire <text:s/></text:span><text:span text:style-name="T44">$KAFKA_</text:span><text:span text:style-name="T45">HOME</text:span><text:span text:style-name="T44"> </text:span></text:p>
      <text:p text:style-name="P120"><text:span text:style-name="T102">Créer un répertoire </text:span><text:span text:style-name="T10">$KAFKA_LOGS</text:span><text:span text:style-name="T102"> qui stockera les messages des 3 brokers</text:span></text:p>
      <text:p text:style-name="P119"><text:span text:style-name="T102">Créer un répertoire </text:span><text:span text:style-name="T11">$KAFKA_</text:span><text:span text:style-name="T16">CONFIG</text:span><text:span text:style-name="T102"> </text:span></text:p>
      <text:p text:style-name="P13">Copier le fichier <text:span text:style-name="T171">de la distribution </text:span><text:span text:style-name="T2">$KAFKA_</text:span><text:span text:style-name="T8">HOME</text:span><text:span text:style-name="T2">/config/</text:span><text:span text:style-name="T1">server.properties</text:span> dans <text:span text:style-name="T253">3 fichiers server1.properties, server2.properties, server3.properties placés dans le répertoire</text:span><text:span text:style-name="T149"> </text:span><text:span text:style-name="T171">$</text:span><text:span text:style-name="T11">KAFKA_C</text:span><text:span text:style-name="T16">ONFIG</text:span></text:p>
      <text:p text:style-name="P15">Éditer les 3 fichier <text:span text:style-name="T4">server</text:span><text:span text:style-name="T8">X</text:span><text:span text:style-name="T4">.</text:span><text:span text:style-name="T1">properties</text:span> afin de modifier l<text:span text:style-name="T172">es</text:span> propriété<text:span text:style-name="T172">s :</text:span></text:p>
      <text:list text:style-name="L3">
        <text:list-item>
          <text:p text:style-name="P261">node.id</text:p>
        </text:list-item>
        <text:list-item>
          <text:p text:style-name="P261">listeners <text:span text:style-name="T202">(utiliser les ports 9092,9192 et 9292 </text:span><text:span text:style-name="T253">ET 9093,9193 et 9293</text:span><text:span text:style-name="T202">)</text:span></text:p>
        </text:list-item>
        <text:list-item>
          <text:p text:style-name="P262">advertised.listeners</text:p>
        </text:list-item>
        <text:list-item>
          <text:p text:style-name="P262">controller.quorum.voters</text:p>
        </text:list-item>
        <text:list-item>
          <text:p text:style-name="P259"><text:span text:style-name="T12">log.dir</text:span><text:span text:style-name="T103"> à </text:span><text:span text:style-name="T12">$KAFKA_LOGS/broker-&lt;id&gt;</text:span></text:p>
        </text:list-item>
        <text:list-item>
          <text:p text:style-name="P309"><text:span text:style-name="T12">d</text:span><text:span text:style-name="T10">efault.replication.factor : 3</text:span></text:p>
        </text:list-item>
      </text:list>
      <text:p text:style-name="P276">Et d’autres propriétés de topic qui vous paraissent intéressantes.</text:p>
      <text:p text:style-name="P338"><text:span text:style-name="T105">En particulier augmenter les facteurs de réplication des topics internes pour avoir de la tolérance aux pannes :</text:span></text:p>
      <text:list text:continue-numbering="true" text:style-name="L3">
        <text:list-item>
          <text:p text:style-name="P260"><text:span text:style-name="T21">offsets.topic.replication.factor=3</text:span></text:p>
        </text:list-item>
        <text:list-item>
          <text:p text:style-name="P262">share.coordinator.state.topic.replication.factor=3</text:p>
        </text:list-item>
        <text:list-item>
          <text:p text:style-name="P262">share.coordinator.state.topic.min.isr=2</text:p>
        </text:list-item>
        <text:list-item>
          <text:p text:style-name="P262">transaction.state.log.replication.factor=3</text:p>
        </text:list-item>
        <text:list-item>
          <text:p text:style-name="P262">transaction.state.log.min.isr=2</text:p>
        </text:list-item>
      </text:list>
      <text:p text:style-name="P13"/>
      <text:p text:style-name="P13">Générer un id de cluster :</text:p>
      <text:p text:style-name="P264">$KAFKA_<text:span text:style-name="T253">HOME</text:span>/bin/kafka-storage.sh random-uuid</text:p>
      <text:p text:style-name="P14">Utiliser l’ID du cluster pour formatter les 3 répertoires </text:p>
      <text:p text:style-name="P14"/>
      <text:p text:style-name="P14">Pour chaque broker, formatter son répertoire de log avec :</text:p>
      <text:p text:style-name="P263">$KAFKA_<text:span text:style-name="T253">HOME</text:span>/bin/kafka-storage.sh format -t &lt;cluster_id&gt; -c $KAFKA_<text:span text:style-name="T253">CONFIG</text:span>/server<text:span text:style-name="T253">X</text:span>.properties</text:p>
      <text:p text:style-name="P10"/>
      <text:p text:style-name="P26"><text:soft-page-break/>Étape 2 : Mise au point d’un script de démarrage/<text:span text:style-name="T173">arrêt</text:span></text:p>
      <text:p text:style-name="P10">Mettre au point un script permettant de démarrer les 3 brokers <text:span text:style-name="T111">en mode daemon :</text:span></text:p>
      <text:p text:style-name="P16">Exemple :</text:p>
      <text:p text:style-name="P63">#!/bin/sh</text:p>
      <text:p text:style-name="P63"/>
      <text:p text:style-name="P66">export JAVA_HOME=/usr/lib/jvm/java-<text:span text:style-name="T233">2</text:span>1-openjdk-amd64/</text:p>
      <text:p text:style-name="P62">export KAFKA_<text:span text:style-name="T254">HOME</text:span>=&lt;<text:span text:style-name="T201">répertoire de la distribution&gt;</text:span></text:p>
      <text:p text:style-name="P62"/>
      <text:p text:style-name="P62"/>
      <text:p text:style-name="P62"/>
      <text:p text:style-name="P62">$KAFKA_<text:span text:style-name="T254">HOME</text:span>/bin/kafka-server-start.sh -daemon <text:span text:style-name="T254">config</text:span>/server<text:span text:style-name="T254">1</text:span>.properties </text:p>
      <text:p text:style-name="P62">$KAFKA_DIST/bin/kafka-server-start.sh -daemon <text:span text:style-name="T254">config</text:span>/server<text:span text:style-name="T254">2</text:span>.properties </text:p>
      <text:p text:style-name="P62">$KAFKA_DIST/bin/kafka-server-start.sh -daemon <text:span text:style-name="T254">config</text:span>/server<text:span text:style-name="T254">3</text:span>.properties </text:p>
      <text:p text:style-name="P10"/>
      <text:p text:style-name="P11"/>
      <text:p text:style-name="P17">Visualiser les traces de démarrages :</text:p>
      <text:p text:style-name="P9">tail -f $KAFKA_<text:span text:style-name="T229">DIST</text:span>/logs/server.log</text:p>
      <text:p text:style-name="P9"/>
      <text:p text:style-name="P12">M<text:span text:style-name="T173">ettre au point un script d’arrêt</text:span></text:p>
      <text:p text:style-name="P64">#!/bin/sh</text:p>
      <text:p text:style-name="P64"/>
      <text:p text:style-name="P311">export KAFKA_<text:span text:style-name="T254">HOME</text:span>=&lt;<text:span text:style-name="T201">répertoire de la distribution&gt;</text:span></text:p>
      <text:p text:style-name="P311">$KAFKA_<text:span text:style-name="T254">HOME</text:span>/kafka-server-stop.sh</text:p>
      <text:p text:style-name="P74"/>
      <text:p text:style-name="P88">Effectuer les vérifications de création de topic et envoi/réception de messages</text:p>
      <text:p text:style-name="P67">export PATH=$KAFKA_DIST/bin:$PATH</text:p>
      <text:p text:style-name="P65">kafka-topics.sh --create --bootstrap-server localhost:9092 --replication-factor 1 --partitions 1 --topic test</text:p>
      <text:p text:style-name="P65">kafka-console-producer.sh --bootstrap-server localhost:9092 --topic test</text:p>
      <text:p text:style-name="P65">kafka-console-consumer.sh --bootstrap-server localhost:9092 --topic test --from-beginning</text:p>
      <text:p text:style-name="P87"/>
      <text:p text:style-name="P31"/>
      <text:h text:style-name="Heading_20_3" text:outline-level="3"><text:bookmark-start text:name="__RefHeading___Toc9856_3845367211"/>1.<text:span text:style-name="T176">1.</text:span>2 Option Docker<text:bookmark-end text:name="__RefHeading___Toc9856_3845367211"/></text:h>
      <text:p text:style-name="P4"><text:span text:style-name="T26">Visualiser le fichier </text:span><text:span text:style-name="T27">docker-compose.yml</text:span><text:span text:style-name="T48"> </text:span></text:p>
      <text:p text:style-name="P89">Démarrer la stack et observer les logs de démarrages</text:p>
      <text:p text:style-name="P273"/>
      <text:p text:style-name="P96"/>
      <text:h text:style-name="Heading_20_3" text:outline-level="3"><text:bookmark-start text:name="__RefHeading___Toc20226_2913458575"/><text:span text:style-name="T255">1.1.3 </text:span>Vérifications<text:bookmark-end text:name="__RefHeading___Toc20226_2913458575"/></text:h>
      <text:p text:style-name="P341"><text:span text:style-name="T106">Si docker :<text:line-break/>docker exec -it kafka-0 bash</text:span></text:p>
      <text:p text:style-name="P341"><text:span text:style-name="T106">KAFKA_HOME est alors dans /opt/kafka/bin</text:span></text:p>
      <text:p text:style-name="P340"><text:span text:style-name="T106"/></text:p>
      <text:p text:style-name="P340"><text:span text:style-name="T106">Créer un topic </text:span><text:span text:style-name="T23">testing</text:span><text:span text:style-name="T106"> avec 5 partitions et 2 répliques :</text:span></text:p>
      <text:p text:style-name="P354"><text:span text:style-name="T255">$KAFKA_HOME/</text:span>bin/kafka-topics.sh --create --bootstrap-server localhost:9092 --replication-factor 2 --partitions 5 --topic testing</text:p>
      <text:p text:style-name="P340"><text:soft-page-break/></text:p>
      <text:p text:style-name="P340"><text:span text:style-name="T106">Lister les topics du cluster </text:span></text:p>
      <text:p text:style-name="P340"/>
      <text:p text:style-name="P340"><text:span text:style-name="T106">Accéder à la description détaillée du topic</text:span></text:p>
      <text:p text:style-name="P340"/>
      <text:p text:style-name="P340"><text:span text:style-name="T106">Démarrer un producteur de message</text:span></text:p>
      <text:p text:style-name="P340" loext:marker-style-name="T256"><text:span text:style-name="T257">$KAFKA_HOME/</text:span><text:span text:style-name="T256">bin/kafka-console-producer.sh -- bootstrap-server localhost:9092 --topic testing --property "parse.key=true" --property "key.separator=:"</text:span></text:p>
      <text:p text:style-name="P340"><text:span text:style-name="T106">Saisir quelques messages</text:span></text:p>
      <text:p text:style-name="P340"><text:span text:style-name="T106">Consommer les messages depuis le début</text:span></text:p>
      <text:p text:style-name="P354"><text:span text:style-name="T255">$KAFKA_HOME/</text:span>bin/kafka-console-consumer.sh --bootstrap-server localhost:9092 --topic testing --from-beginning</text:p>
      <text:p text:style-name="P340" loext:marker-style-name="T25"><text:span text:style-name="T51">Dans une autre fenêtre, lister les groupes de consommateurs et accéder au détail du groupe de consommateur en lecture sur le topic </text:span><text:span text:style-name="T46">testing</text:span></text:p>
      <text:p text:style-name="P339"/>
      <text:h text:style-name="Heading_20_2" text:outline-level="2"><text:bookmark-start text:name="__RefHeading___Toc14826_2913458575"/>1.2 Utilitaires : Configuration dynamique et inspection du cluster<text:bookmark-end text:name="__RefHeading___Toc14826_2913458575"/></text:h>
      <text:p text:style-name="P267"><text:bookmark-start text:name="__RefHeading___Toc14828_2913458575"/>Objectifs<text:bookmark-end text:name="__RefHeading___Toc14828_2913458575"/></text:p>
      <text:p text:style-name="Text_20_body">Utiliser <text:span text:style-name="Source_20_Text">kafka-configs.sh</text:span> pour modifier la configuration sans redémarrer le cluster, et <text:span text:style-name="Source_20_Text">kafka-metadata-quorum.sh</text:span> pour inspecter l'état du quorum KRaft.</text:p>
      <text:h text:style-name="Heading_20_3" text:outline-level="3"><text:bookmark-start text:name="__RefHeading___Toc14830_2913458575"/>1.<text:span text:style-name="T251">2.1 </text:span>Inspection du quorum KRaft<text:bookmark-end text:name="__RefHeading___Toc14830_2913458575"/></text:h>
      <text:p text:style-name="Text_20_body">Afficher l'identifiant du cluster :</text:p>
      <text:p text:style-name="commande"><text:span text:style-name="Source_20_Text">bin/kafka-cluster.sh cluster-id --bootstrap-server localhost:9092</text:span></text:p>
      <text:p text:style-name="Text_20_body"/>
      <text:p text:style-name="Text_20_body">Afficher le statut du quorum de controllers :</text:p>
      <text:p text:style-name="commande"><text:span text:style-name="Source_20_Text">bin/kafka-metadata-quorum.sh --bootstrap-server localhost:9092 \<text:line-break/> <text:s/>describe --status</text:span></text:p>
      <text:p text:style-name="Text_20_body">Questions :</text:p>
      <text:list text:style-name="L21">
        <text:list-item>
          <text:p text:style-name="P307">Quel est le nœud leader du quorum ? </text:p>
        </text:list-item>
        <text:list-item>
          <text:p text:style-name="P307">Quel est le <text:span text:style-name="Source_20_Text">LeaderEpoch</text:span> actuel ? </text:p>
        </text:list-item>
        <text:list-item>
          <text:p text:style-name="P306">Que signifie le champ <text:span text:style-name="Source_20_Text">HighWatermark</text:span> ? </text:p>
        </text:list-item>
      </text:list>
      <text:p text:style-name="Text_20_body">Afficher la réplication entre controllers :</text:p>
      <text:p text:style-name="commande"><text:span text:style-name="Source_20_Text">bin/kafka-metadata-quorum.sh --bootstrap-server localhost:9092 \<text:line-break/> <text:s/>describe --replication</text:span></text:p>
      <text:p text:style-name="Text_20_body">Question : quel est le <text:span text:style-name="Source_20_Text">Lag</text:span> de chaque follower ? Que se passerait-il s'il devenait élevé ?</text:p>
      <text:h text:style-name="Heading_20_3" text:outline-level="3"><text:bookmark-start text:name="__RefHeading___Toc14832_2913458575"/><text:span text:style-name="T251">1.2.2 </text:span>Modifier la configuration d'un topic<text:bookmark-end text:name="__RefHeading___Toc14832_2913458575"/></text:h>
      <text:p text:style-name="Text_20_body">Afficher la configuration actuelle d<text:span text:style-name="T251">u topic </text:span><text:span text:style-name="Source_20_Text"><text:span text:style-name="T251">testing</text:span></text:span> :</text:p>
      <text:p text:style-name="commande"><text:span text:style-name="Source_20_Text">bin/kafka-configs.sh --bootstrap-server localhost:9092 \<text:line-break/> <text:s/>--entity-type topics --entity-name my-topic \<text:line-break/> <text:s/>--describe</text:span></text:p>
      <text:p text:style-name="Text_20_body"><text:soft-page-break/>Question : la sortie est-elle vide ou contient-elle des paramètres ? Pourquoi ?</text:p>
      <text:p text:style-name="Text_20_body">Réduire la rétention à 1 heure (3 600 000 ms) sur ce topic uniquement :</text:p>
      <text:p text:style-name="commande"><text:span text:style-name="Source_20_Text">bin/kafka-configs.sh --bootstrap-server localhost:9092 \<text:line-break/> <text:s/>--entity-type topics --entity-name my-topic \<text:line-break/> <text:s/>--alter --add-config retention.ms=3600000</text:span></text:p>
      <text:p text:style-name="Text_20_body">Vérifier avec <text:span text:style-name="Source_20_Text">--describe</text:span> que la modification est prise en compte.</text:p>
      <text:p text:style-name="Text_20_body">Annuler cette surcharge (revenir à la valeur du broker) :</text:p>
      <text:p text:style-name="commande"><text:span text:style-name="Source_20_Text">bin/kafka-configs.sh --bootstrap-server localhost:9092 \<text:line-break/> <text:s/>--entity-type topics --entity-name my-topic \<text:line-break/> <text:s/>--alter --delete-config retention.ms</text:span></text:p>
      <text:p text:style-name="Text_20_body">Question : pourquoi est-il préférable de supprimer une surcharge plutôt que de la remettre à la valeur par défaut « manuellement » ?</text:p>
      <text:h text:style-name="Heading_20_3" text:outline-level="3"><text:bookmark-start text:name="__RefHeading___Toc14834_2913458575"/><text:span text:style-name="T251">1.2.3 </text:span>Configuration dynamique du broker<text:bookmark-end text:name="__RefHeading___Toc14834_2913458575"/></text:h>
      <text:p text:style-name="Text_20_body">Afficher les configurations dynamiques d'un broker :</text:p>
      <text:p text:style-name="commande"><text:span text:style-name="Source_20_Text">bin/kafka-configs.sh --bootstrap-server localhost:9092 \<text:line-break/> <text:s/>--entity-type brokers --entity-name 1 \<text:line-break/> <text:s/>--describe</text:span></text:p>
      <text:p text:style-name="Text_20_body">Modifier dynamiquement le niveau de log d'une classe Kafka, sans redémarrage :</text:p>
      <text:p text:style-name="commande"><text:span text:style-name="Source_20_Text">bin/kafka-configs.sh --bootstrap-server localhost:9092 \<text:line-break/> <text:s/>--entity-type broker-loggers --entity-name 1 \<text:line-break/> <text:s/>--alter --add-config kafka.controller.KafkaController=DEBUG</text:span></text:p>
      <text:p text:style-name="Text_20_body">Provoquer une activité (créer un topic, par exemple) puis observer les logs du broker. Les nouveaux messages DEBUG apparaissent.</text:p>
      <text:p text:style-name="Text_20_body">Revenir au niveau de log précédent :</text:p>
      <text:p text:style-name="commande"><text:span text:style-name="Source_20_Text">bin/kafka-configs.sh --bootstrap-server localhost:9092 \<text:line-break/> <text:s/>--entity-type broker-loggers --entity-name 1 \<text:line-break/> <text:s/>--alter --delete-config kafka.controller.KafkaController</text:span></text:p>
      <text:h text:style-name="P195" text:outline-level="2"><text:bookmark-start text:name="__RefHeading___Toc9858_3845367211"/>1.<text:span text:style-name="T176">3</text:span> <text:span text:style-name="T175">Outils graphique</text:span><text:span text:style-name="T252">s</text:span><text:bookmark-end text:name="__RefHeading___Toc9858_3845367211"/></text:h>
      <text:p text:style-name="P29"><text:span text:style-name="T53">Plusieurs </text:span><text:span text:style-name="T52">outil</text:span><text:span text:style-name="T53">s</text:span><text:span text:style-name="T52"> graphique </text:span><text:span text:style-name="T53">existent, </text:span><text:span text:style-name="T54">un docker compose est fourni pour démarrer </text:span><text:span text:style-name="T47">akhq, kafka-magic</text:span><text:span text:style-name="T54"> et </text:span><text:span text:style-name="T47">redpanda-console</text:span></text:p>
      <text:p text:style-name="P98"/>
      <text:p text:style-name="commande">cd $TP_Admin/1.3<text:span text:style-name="T234">_UI</text:span></text:p>
      <text:p text:style-name="commande">docker compose -f kafka-ui-docker-compose.yml up -d</text:p>
      <text:p text:style-name="P99"/>
      <text:p text:style-name="P100"/>
      <text:p text:style-name="P97"/>
      <text:p text:style-name="P97"/>
      <text:p text:style-name="P97"/>
      <text:p text:style-name="P90"/>
      <text:p text:style-name="P96"/>
      <text:h text:style-name="P182" text:outline-level="1"><text:soft-page-break/></text:h>
      <text:h text:style-name="P185" text:outline-level="1"><text:bookmark-start text:name="__RefHeading___Toc9782_3845367211"/><text:span text:style-name="T86">Atelier 2</text:span>: <text:span text:style-name="T112">Produc</text:span><text:span text:style-name="T177">tion de messages</text:span><text:bookmark-end text:name="__RefHeading___Toc9782_3845367211"/></text:h>
      <text:p text:style-name="P1"/>
      <text:p text:style-name="P124">Le projet fourni est un projet développé avec le framework Spring. </text:p>
      <text:p text:style-name="P124">Il modélise une flotte de 10<text:span text:style-name="T178">0</text:span> coursiers qui envoient 10000 fois leur position (latitude/longitude) toutes les <text:span text:style-name="T180">10 millisecondes. </text:span><text:span text:style-name="T203">Les messages sont numérotés par Coursier</text:span></text:p>
      <text:p text:style-name="P127">Lors du démarrage du programme, le producteur affiche sa configuration sur la console et démarre la production de message après que l’on ait appuyé sur la touche Enter.</text:p>
      <text:p text:style-name="P82">Le producteur peut être configuré via la ligne de commande <text:span text:style-name="T206">par la propriété </text:span><text:span text:style-name="T14">async</text:span><text:span text:style-name="T206"> activant ou désactiva</text:span><text:span text:style-name="T235">n</text:span><text:span text:style-name="T206">t le mode asynchrone d’envoi et </text:span>en préfixant les propriétés Kafka par <text:span text:style-name="T1">spring.kafka.producer</text:span></text:p>
      <text:p text:style-name="P81">Exemple :</text:p>
      <text:p text:style-name="P84">java -jar <text:span text:style-name="T181">SpringProducer.jar --spring.kafka.producer.acks=0 --</text:span><text:span text:style-name="T206">async=</text:span><text:span text:style-name="T235">true</text:span></text:p>
      <text:p text:style-name="P81"/>
      <text:p text:style-name="P124"><text:span text:style-name="T179">Créer le topic </text:span><text:span text:style-name="T13">position</text:span><text:span text:style-name="T179"> avec </text:span><text:span text:style-name="T204">5</text:span><text:span text:style-name="T179"> partitions et le facteur de réplication </text:span><text:span text:style-name="T204">de 3 et un </text:span><text:span text:style-name="T5">min.insync.replica</text:span><text:span text:style-name="T204"> de 2</text:span><text:span text:style-name="T179"> :</text:span></text:p>
      <text:p text:style-name="P103"><text:span text:style-name="T65">./kafka-topics.sh --create --</text:span><text:span text:style-name="T66">bootstrap-server</text:span><text:span text:style-name="T65"> localhost:</text:span><text:span text:style-name="T66">9092</text:span><text:span text:style-name="T65"> --partitions </text:span><text:span text:style-name="T68">5</text:span><text:span text:style-name="T65"> --replication-factor </text:span><text:span text:style-name="T68">3 --config min.insync.replicas=</text:span><text:span text:style-name="T69">2</text:span><text:span text:style-name="T68"> </text:span><text:span text:style-name="T65">--topic </text:span><text:span text:style-name="T67">position</text:span></text:p>
      <text:p text:style-name="P76"/>
      <text:p text:style-name="P83">Faire plusieurs essais de production de message <text:span text:style-name="T182">en réinitialisant le topic et </text:span>en changeant les paramètres par défaut, <text:span text:style-name="T190">Vérifier la configuration à chaque fois</text:span></text:p>
      <text:list text:style-name="L4">
        <text:list-item>
          <text:p text:style-name="P269">acks<text:line-break/><text:span text:style-name="T104">Pour comparer les valeurs de débits<text:line-break/></text:span><text:span text:style-name="T310">java -jar </text:span><text:span text:style-name="T181">SpringProducer.jar --spring.kafka.producer.acks=0 </text:span><text:span text:style-name="T311">| 1 | all</text:span></text:p>
        </text:list-item>
        <text:list-item>
          <text:p text:style-name="P270"><text:span text:style-name="T10">batch.size</text:span> et <text:span text:style-name="T10">linger.ms</text:span></text:p>
          <text:p text:style-name="P268"><text:span text:style-name="T31">Pour comparer les valeurs de débits<text:line-break/></text:span><text:span text:style-name="T28">java -jar </text:span><text:span text:style-name="T29">SpringProducer.jar –spring.kafka.producer.</text:span><text:span text:style-name="T30">batch-size</text:span><text:span text:style-name="T29">=</text:span><text:span text:style-name="T30">&lt;batch-size&gt; <text:line-break/>--spring.kafka.producer.properties.linger.ms</text:span><text:span text:style-name="T243">=</text:span><text:span text:style-name="T30">&lt;linger.ms&gt; </text:span></text:p>
        </text:list-item>
        <text:list-item>
          <text:p text:style-name="P271"><text:span text:style-name="T10">retries</text:span> / <text:span text:style-name="T10">max.in.flights.requests.per.session</text:span> <text:line-break/><text:span text:style-name="T182">A</text:span>vec arrêt/redémarrage d<text:span text:style-name="T182">u cluster ou d</text:span>’un serveur durant les test<text:span text:style-name="T182">s.<text:line-break/>Vérifier le nombre de messages produits<text:line-break/></text:span><text:span text:style-name="T18">java -jar </text:span><text:span text:style-name="T19">SpringProducer.jar –spring.kafka.producer.</text:span><text:span text:style-name="T20">retries</text:span><text:span text:style-name="T19">=</text:span><text:span text:style-name="T20">&lt;retries&gt; <text:line-break/>--spring.kafka.producer.properties.</text:span><text:span text:style-name="T10">max.in.flights.requests.per.session</text:span><text:span text:style-name="T244">=</text:span><text:span text:style-name="T20">&lt;mifrps&gt; </text:span></text:p>
        </text:list-item>
      </text:list>
      <text:p text:style-name="P2"/>
      <text:p text:style-name="P23"/>
      <text:h text:style-name="P186" text:outline-level="1"><text:bookmark-start text:name="__RefHeading___Toc9784_3845367211"/><text:span text:style-name="T86">Atelier 3 </text:span>: <text:span text:style-name="T113">Cons</text:span><text:span text:style-name="T183">ommation de messages</text:span><text:bookmark-end text:name="__RefHeading___Toc9784_3845367211"/></text:h>
      <text:p text:style-name="P126"/>
      <text:p text:style-name="P125">Le projet fourni est <text:span text:style-name="T183">également </text:span>un projet développé avec le framework Spring.</text:p>
      <text:p text:style-name="P128">Il permet de consommer le topic <text:span text:style-name="T10">position</text:span>.</text:p>
      <text:p text:style-name="P143">Le nom du groupe est <text:span text:style-name="T10">consumer</text:span></text:p>
      <text:p text:style-name="P21">Il peut être surchargé via la ligne de commande :</text:p>
      <text:p text:style-name="P5">--spring.kafka.consumer.group-id</text:p>
      <text:p text:style-name="P128">La propriété de configuration <text:span text:style-name="T10">spring.kafka.listener.concurrency</text:span> fixe le nombre de consommateur<text:span text:style-name="T207">s</text:span> du groupe.</text:p>
      <text:p text:style-name="P129">Elle est fixée à 3 et peut être surchargée via la ligne de commande.</text:p>
      <text:p text:style-name="P129">--<text:span text:style-name="T10">spring.kafka.listener.concurrency</text:span></text:p>
      <text:p text:style-name="P20">Le programme consomme les messages <text:span text:style-name="T208">et stocke dans une base postgres l’id du coursier et l’id de l’index du message</text:span>:</text:p>
      <text:list text:style-name="L5">
        <text:list-item>
          <text:p text:style-name="P274">En permanence, <text:span text:style-name="T208">il affiche </text:span>des informations sur le débit de traitement</text:p>
        </text:list-item>
        <text:list-item>
          <text:p text:style-name="P275">Si la base est réinitialisée, il détecte les doublons de traitements</text:p>
        </text:list-item>
      </text:list>
      <text:p text:style-name="P22"/>
      <text:h text:style-name="Heading_20_2" text:outline-level="2"><text:bookmark-start text:name="__RefHeading___Toc9786_38453672111"/>3.0 Mise en place BD<text:bookmark-end text:name="__RefHeading___Toc9786_38453672111"/></text:h>
      <text:p text:style-name="Code"><text:span text:style-name="T116">docker compose -f postgres-docker-compose.yml up -d</text:span> </text:p>
      <text:p text:style-name="Standard"/>
      <text:p text:style-name="Standard">Accéder à <text:span text:style-name="T10">localhost:81</text:span> et se logger avec <text:span text:style-name="T10">admin@admin.com/admin</text:span></text:p>
      <text:p text:style-name="Text_20_body"/>
      <text:p text:style-name="Text_20_body">Enregistre un serveur avec comme paramètres de connexion :</text:p>
      <text:list text:style-name="L6">
        <text:list-item>
          <text:p text:style-name="P280">host : <text:span text:style-name="T10">consumer-postgresql</text:span></text:p>
        </text:list-item>
        <text:list-item>
          <text:p text:style-name="P280">user : <text:span text:style-name="T10">postgres</text:span></text:p>
        </text:list-item>
        <text:list-item>
          <text:p text:style-name="P280">password : <text:span text:style-name="T10">postgres</text:span></text:p>
        </text:list-item>
      </text:list>
      <text:h text:style-name="Heading_20_2" text:outline-level="2"><text:bookmark-start text:name="__RefHeading___Toc9786_3845367211"/><text:span text:style-name="T169">3</text:span>.1 <text:span text:style-name="T184">Performance</text:span> <text:bookmark-end text:name="__RefHeading___Toc9786_3845367211"/></text:h>
      <text:p text:style-name="P137">Démarrer le programme avec les valeurs de concurrence par défaut :</text:p>
      <text:p text:style-name="P85">java -jar <text:span text:style-name="T181">Spring</text:span><text:span text:style-name="T184">Consumer</text:span><text:span text:style-name="T181">.jar </text:span></text:p>
      <text:p text:style-name="P137">Visualiser les logs de démarrage de l’application qui affichent :</text:p>
      <text:list text:style-name="L7">
        <text:list-item>
          <text:p text:style-name="P281">La configuration du consommateur </text:p>
        </text:list-item>
        <text:list-item>
          <text:p text:style-name="P281">Les allocations de partition</text:p>
        </text:list-item>
      </text:list>
      <text:p text:style-name="P24"/>
      <text:p text:style-name="P25">Supprimer les informations du groupe dans Kafka afin que les consommateurs repartent à zéro.</text:p>
      <text:p text:style-name="P144"><text:span text:style-name="T100">Modifier des paramètres pouvant affecter la performance </text:span><text:span text:style-name="T101">et les commits d’offset :</text:span></text:p>
      <text:list text:style-name="L8">
        <text:list-item>
          <text:p text:style-name="P265">max.poll.records</text:p>
        </text:list-item>
      </text:list>
      <text:p text:style-name="P144"/>
      <text:h text:style-name="Heading_20_2" text:outline-level="2"><text:bookmark-start text:name="__RefHeading___Toc9788_3845367211"/><text:soft-page-break/><text:span text:style-name="T169">3</text:span>.2 <text:span text:style-name="T186">Rebalancing des consommateurs</text:span><text:bookmark-end text:name="__RefHeading___Toc9788_3845367211"/></text:h>
      <text:p text:style-name="P28">Démarrer 3 processus avec un degré de concurrence à 1</text:p>
      <text:p text:style-name="P86">java -jar <text:span text:style-name="T181">Spring</text:span><text:span text:style-name="T184">Consumer</text:span><text:span text:style-name="T181">.jar </text:span><text:span text:style-name="T183">--spring.kafka.listener.concurrency</text:span><text:span text:style-name="T185">=1</text:span></text:p>
      <text:p text:style-name="P138"/>
      <text:p text:style-name="P139">Arrêter un processus et observer la réaffectation de partition</text:p>
      <text:p text:style-name="P140">Redémarrer le processus</text:p>
      <text:h text:style-name="P187" text:outline-level="1"><text:bookmark-start text:name="__RefHeading___Toc16950_1047798942"/>Atelier 4 : Exactly Once et Transactions<text:bookmark-end text:name="__RefHeading___Toc16950_1047798942"/></text:h>
      <text:p text:style-name="P57">Objectifs :</text:p>
      <text:list text:style-name="L9">
        <text:list-item>
          <text:p text:style-name="P282"><text:span text:style-name="T212">Visualiser des </text:span>messages <text:span text:style-name="T212">committés et non-committés</text:span></text:p>
        </text:list-item>
        <text:list-item>
          <text:p text:style-name="P283">Voir les effets de la propriétés <text:span text:style-name="T1">ISOLATION_LEVEL</text:span></text:p>
        </text:list-item>
        <text:list-item>
          <text:p text:style-name="P279"><text:span text:style-name="T209">I</text:span>mplémenter un consommateur <text:span text:style-name="T1">ExactlyOnce</text:span></text:p>
        </text:list-item>
      </text:list>
      <text:p text:style-name="P158"/>
      <text:h text:style-name="Heading_20_2" text:outline-level="2"><text:bookmark-start text:name="__RefHeading___Toc6412_3893618287"/><text:span text:style-name="T212">4</text:span><text:span text:style-name="T210">.1 </text:span><text:span text:style-name="T212">Transaction et ISOLATION_LEVEL</text:span><text:bookmark-end text:name="__RefHeading___Toc6412_3893618287"/></text:h>
      <text:p text:style-name="P159"/>
      <text:h text:style-name="Heading_20_3" text:outline-level="3"><text:bookmark-start text:name="__RefHeading___Toc16952_1047798942"/>4.1.1 Producteur transactionnel<text:bookmark-end text:name="__RefHeading___Toc16952_1047798942"/></text:h>
      <text:p text:style-name="P159">Le producteur fournit englobe dans une transaction des batchs de messages de taille 10.</text:p>
      <text:p text:style-name="P159"/>
      <text:p text:style-name="P159">Lancer le programme avec :</text:p>
      <text:p text:style-name="Code">java -jar producer-tx.jar 1 105 100 0 </text:p>
      <text:p text:style-name="P159">Ce qui signifie que 1 threads envoie 105 messages, les 100 premiers messages font partie de 10 transactions validées. Les 5 derniers messages ne sont pas validés.</text:p>
      <text:p text:style-name="P159"/>
      <text:p text:style-name="P168">Visualiser les messages dans une console d’administration.</text:p>
      <text:p text:style-name="P160"><text:span text:style-name="T213">Noter le nombre et les offsets, </text:span><text:span text:style-name="T211">Visualiser le flag transactionnel</text:span></text:p>
      <text:h text:style-name="P203" text:outline-level="3"><text:bookmark-start text:name="__RefHeading___Toc16954_1047798942"/>4.1.<text:span text:style-name="T213">2</text:span> <text:span text:style-name="T212">Consommateur</text:span><text:bookmark-end text:name="__RefHeading___Toc16954_1047798942"/></text:h>
      <text:p text:style-name="P159">Le programme consommateur peut être démarré en mode READ_COMMITTED ou READ_UNCOMMITED</text:p>
      <text:p text:style-name="P159">Faire un premier démarrage en mode READ_UNCOMMITED</text:p>
      <text:p text:style-name="Code">java -jar consumer.jar 1 false <text:span text:style-name="T278">position-tx</text:span></text:p>
      <text:p text:style-name="P155">Noter le nombre de messages consommés</text:p>
      <text:p text:style-name="P155"><text:span text:style-name="T278">Supprimer le groupe de consommateur et d</text:span>émarrer le message en mode READ_COMMITTED</text:p>
      <text:p text:style-name="P172">java -jar consumer.jar 1 true <text:span text:style-name="T278">position-tx</text:span></text:p>
      <text:p text:style-name="P155">Noter le nombre de messages consommés</text:p>
      <text:p text:style-name="P161"/>
      <text:h text:style-name="P196" text:outline-level="2"><text:bookmark-start text:name="__RefHeading___Toc6412_38936182871"/><text:span text:style-name="T212">4</text:span><text:span text:style-name="T210">.</text:span><text:span text:style-name="T214">2</text:span><text:span text:style-name="T210"> </text:span><text:span text:style-name="T214">Exactly Once</text:span><text:bookmark-end text:name="__RefHeading___Toc6412_38936182871"/></text:h>
      <text:p text:style-name="P162">Reprendre le nouveau consommateur.</text:p>
      <text:p text:style-name="P163">Ce nouveau programme lit le topic <text:span text:style-name="T10">position-tx</text:span>, ajoute une information de distance à l’enregistrement et publie un message vers le topic <text:span text:style-name="T10">position_distance</text:span>.</text:p>
      <text:p text:style-name="P163">Exécuter le programme :</text:p>
      <text:p text:style-name="P156">java -jar consumer-exactly-once.jar 1</text:p>
      <text:p text:style-name="Text_20_body"/>
      <text:p text:style-name="P313"><text:soft-page-break/><text:span text:style-name="T278">Tuer le processus pendant la consommation puis relancer le programme</text:span></text:p>
      <text:p text:style-name="P313">Vérifier les messages produits <text:span text:style-name="T278">en utilisant le programme précédent en READ_COMMITTED</text:span></text:p>
      <text:p text:style-name="P172">java -jar consumer.jar 1 true <text:span text:style-name="T278">position_distance</text:span></text:p>
      <text:h text:style-name="P188" text:outline-level="1"><text:bookmark-start text:name="__RefHeading___Toc9790_3845367211"/><text:span text:style-name="T151">Atelier </text:span><text:span text:style-name="T139">5</text:span><text:span text:style-name="T151">. </text:span><text:span text:style-name="T136">S</text:span><text:span text:style-name="T140">chema Registry et sérialisation Avro</text:span><text:bookmark-end text:name="__RefHeading___Toc9790_3845367211"/></text:h>
      <text:h text:style-name="Heading_20_2" text:outline-level="2"><text:bookmark-start text:name="__RefHeading___Toc9792_3845367211"/>5.1 Démarrage de Confuent Registry<text:bookmark-end text:name="__RefHeading___Toc9792_3845367211"/></text:h>
      <text:p text:style-name="Text_20_body"><text:bookmark-start text:name="__RefHeading___Toc9865_3845367211"/>Visualiser le fichier <text:span text:style-name="T10">docker-compose.yml</text:span> fourni <text:span text:style-name="T191">qui démarre Redpanda Console, </text:span><text:span text:style-name="T215">akhq</text:span><text:span text:style-name="T191"> et SchemaRegistry de confluent</text:span><text:bookmark-end text:name="__RefHeading___Toc9865_3845367211"/></text:p>
      <text:p text:style-name="Text_20_body"/>
      <text:p text:style-name="Text_20_body"><text:bookmark-start text:name="__RefHeading___Toc9867_3845367211"/>Démarrer la stack <text:span text:style-name="T215">via :</text:span><text:bookmark-end text:name="__RefHeading___Toc9867_3845367211"/></text:p>
      <text:p text:style-name="Code">docker compose up -d</text:p>
      <text:p text:style-name="P164">Vérifier le bon démarrage des containers</text:p>
      <text:p text:style-name="Text_20_body"><text:bookmark-start text:name="__RefHeading___Toc9869_3845367211"/>Accéder à <text:span text:style-name="T1">localhost:808</text:span><text:span text:style-name="T3">5</text:span><text:span text:style-name="T1">/subjects</text:span><text:bookmark-end text:name="__RefHeading___Toc9869_3845367211"/></text:p>
      <text:h text:style-name="P225" text:outline-level="1"/>
      <text:h text:style-name="Heading_20_2" text:outline-level="2"><text:bookmark-start text:name="__RefHeading___Toc9794_3845367211"/><text:span text:style-name="T228">5</text:span>.2 Producteur de message<text:bookmark-end text:name="__RefHeading___Toc9794_3845367211"/></text:h>
      <text:p text:style-name="P107"><text:span text:style-name="T155">Récupérer le projet</text:span><text:span text:style-name="T154"> </text:span><text:span text:style-name="T158">producer-avro</text:span></text:p>
      <text:p text:style-name="P105"/>
      <text:p text:style-name="Standard"><text:span text:style-name="T168">Visualiser le </text:span><text:span text:style-name="T167">schéma Avro : </text:span><text:span text:style-name="T163"><text:line-break/></text:span><text:span text:style-name="T165">src/main/resources/</text:span><text:span text:style-name="T164">Courier.avsc</text:span></text:p>
      <text:p text:style-name="P104"/>
      <text:p text:style-name="P131"><text:span text:style-name="T156">Lancer la commande</text:span><text:span text:style-name="T154"> ./</text:span><text:span text:style-name="T158">mvn</text:span><text:span text:style-name="T159">w</text:span><text:span text:style-name="T158"> compile</text:span><text:span text:style-name="T154"> et regarder les classes générées par le plugin Avro</text:span></text:p>
      <text:p text:style-name="Standard"/>
      <text:p text:style-name="P132">Lancer ensuite .<text:span text:style-name="T10">/mvnw </text:span><text:span text:style-name="T22">clean </text:span><text:span text:style-name="T10">package</text:span> pour construire l’exécutable</text:p>
      <text:p text:style-name="Standard"/>
      <text:p text:style-name="P92">Démarrer l’exécutable par </text:p>
      <text:p text:style-name="P93">java -jar target/producer-avro-0.0.1-SNAPSHOT-jar-with-dependencies.jar 10 500 10 0</text:p>
      <text:p text:style-name="P92"/>
      <text:p text:style-name="P133"><text:span text:style-name="T33">L</text:span><text:span text:style-name="T32">e programme, après avoir enregistré le schéma, envoie </text:span><text:span text:style-name="T37">10*</text:span><text:span text:style-name="T32">500 messages qui sont sérialisés avec Avro sur le topic </text:span><text:span text:style-name="T39">avro-position</text:span></text:p>
      <text:p text:style-name="P92"/>
      <text:p text:style-name="P134"><text:bookmark-start text:name="__RefHeading___Toc9871_3845367211"/>Après un premier démarrage, le schéma doit être consultable :<text:bookmark-end text:name="__RefHeading___Toc9871_3845367211"/></text:p>
      <text:list text:style-name="L10">
        <text:list-item>
          <text:p text:style-name="P284"><text:span text:style-name="T187">sur </text:span><text:span text:style-name="T216">schema-registry</text:span><text:span text:style-name="T187"> (</text:span>localhost:808<text:span text:style-name="T187">5</text:span>/subjects<text:span text:style-name="T216">)</text:span></text:p>
        </text:list-item>
        <text:list-item>
          <text:p text:style-name="P285">ou via votre outil d’admin</text:p>
        </text:list-item>
      </text:list>
      <text:h text:style-name="P226" text:outline-level="1"/>
      <text:p text:style-name="Text_20_body"><text:bookmark-start text:name="__RefHeading___Toc9875_3845367211"/><text:span text:style-name="T35">V</text:span><text:span text:style-name="T34">érifier que </text:span><text:span text:style-name="T36">l’outil graphique</text:span><text:span text:style-name="T40"> </text:span><text:span text:style-name="T34">puisse lire les messages </text:span><text:span text:style-name="T38">Avro</text:span><text:bookmark-end text:name="__RefHeading___Toc9875_3845367211"/></text:p>
      <text:p text:style-name="Standard"/>
      <text:h text:style-name="Heading_20_2" text:outline-level="2"><text:bookmark-start text:name="__RefHeading___Toc9796_3845367211"/><text:span text:style-name="T228">5</text:span>.3 Consommateur de message<text:bookmark-end text:name="__RefHeading___Toc9796_3845367211"/></text:h>
      <text:p text:style-name="P18"><text:span text:style-name="T155">Récupérer le projet </text:span><text:span text:style-name="T161">consumer</text:span><text:span text:style-name="T160">-avro </text:span></text:p>
      <text:p text:style-name="P19"><text:span text:style-name="T154">Visualiser le code source </text:span><text:span text:style-name="T157">et en particulier la boucle de poll et l’utilisation de </text:span><text:span text:style-name="T161">GenericMessage</text:span></text:p>
      <text:p text:style-name="P106"/>
      <text:p text:style-name="P135"><text:span text:style-name="T166">Lancer ensuite </text:span><text:span text:style-name="T159">./mvnw </text:span><text:span text:style-name="T162">clean </text:span><text:span text:style-name="T159">package</text:span><text:span text:style-name="T166"> pour construire l’exécutable</text:span></text:p>
      <text:p text:style-name="Standard"/>
      <text:p text:style-name="Standard">Consommer les messages du topic précédent <text:span text:style-name="T188">avec la commande </text:span></text:p>
      <text:p text:style-name="P7">java -jar target/consumer-0.0.1-SNAPSHOT-jar-with-dependencies.jar 2 1</text:p>
      <text:p text:style-name="P101"/>
      <text:p text:style-name="Standard">Laisser le programme tourner</text:p>
      <text:h text:style-name="P228" text:outline-level="1"><text:soft-page-break/></text:h>
      <text:h text:style-name="Heading_20_2" text:outline-level="2"><text:bookmark-start text:name="__RefHeading___Toc9798_38453672111"/><text:span text:style-name="T228">5</text:span><text:span text:style-name="T199">.4</text:span> <text:span text:style-name="T196">Evolution</text:span> du schéma <text:span text:style-name="T197">compatible</text:span><text:bookmark-end text:name="__RefHeading___Toc9798_38453672111"/></text:h>
      <text:p text:style-name="P151"><text:bookmark-start text:name="__RefHeading___Toc9800_38453672111"/><text:span text:style-name="T57">Mettre</text:span><text:span text:style-name="T25"> à jour le schéma </text:span><text:span text:style-name="T58">en ajoutant les champs optionnels : </text:span><text:span text:style-name="T25"><text:s/></text:span><text:span text:style-name="T41">firstName</text:span><text:span text:style-name="T25"> dans la structure </text:span><text:span text:style-name="T41">Cour</text:span><text:span text:style-name="T42">s</text:span><text:span text:style-name="T41">ier</text:span><text:span text:style-name="T25"> </text:span><text:bookmark-end text:name="__RefHeading___Toc9800_38453672111"/></text:p>
      <text:p text:style-name="P146"><text:bookmark-start text:name="__DdeLink__13624_1047798942"/>{ </text:p>
      <text:p text:style-name="P146"><text:tab/>"name": "first_name",</text:p>
      <text:p text:style-name="P146"><text:tab/>"type": "string",</text:p>
      <text:p text:style-name="P146"><text:tab/>"default": "undefined"</text:p>
      <text:p text:style-name="P148">},<text:bookmark-end text:name="__DdeLink__13624_1047798942"/></text:p>
      <text:p text:style-name="P151"/>
      <text:p text:style-name="P150">Fixer les problèmes de compilation :</text:p>
      <text:p text:style-name="P152">Dans <text:tab/><text:span text:style-name="T10">src/main/java/org/formation/KafkaProducerThread.java</text:span><text:tab/></text:p>
      <text:p text:style-name="P152"/>
      <text:p text:style-name="P152">Changer la ligne 29 par :</text:p>
      <text:p text:style-name="P60">this.courier = new Courier(id, "David", new Position(Math.random() + 45, Math.random() + 2));</text:p>
      <text:p text:style-name="P147"/>
      <text:p text:style-name="P153">Reconstruire l’application via :</text:p>
      <text:p text:style-name="P6">./mvnw clean package</text:p>
      <text:p text:style-name="P165"><text:bookmark-start text:name="__RefHeading___Toc9802_38453672111"/>Relancer le programme de production <text:bookmark-end text:name="__RefHeading___Toc9802_38453672111"/></text:p>
      <text:p text:style-name="P94">java -jar target/producer-avro-0.0.1-SNAPSHOT-jar-with-dependencies.jar 10 500 10 0</text:p>
      <text:p text:style-name="P165"><text:span text:style-name="T217">V</text:span>isualiser <text:span text:style-name="T217">ensuite </text:span>la nouvelle version du schéma dans le registre</text:p>
      <text:p text:style-name="P151"><text:bookmark-start text:name="__RefHeading___Toc9804_38453672111"/>Consommer les messages sans modifications du programme consommateur<text:bookmark-end text:name="__RefHeading___Toc9804_38453672111"/></text:p>
      <text:p text:style-name="P151"/>
      <text:h text:style-name="Heading_20_2" text:outline-level="2"><text:bookmark-start text:name="__RefHeading___Toc9798_38453672112"/><text:span text:style-name="T228">5</text:span><text:span text:style-name="T200">.</text:span>5 Evolution du schéma incompatible<text:bookmark-end text:name="__RefHeading___Toc9798_38453672112"/></text:h>
      <text:p text:style-name="P151"><text:bookmark-start text:name="__RefHeading___Toc9800_38453672112"/><text:span text:style-name="T57">Mettre</text:span><text:span text:style-name="T25"> à jour le schéma </text:span><text:span text:style-name="T58">en ajoutant </text:span><text:span text:style-name="T59">un</text:span><text:span text:style-name="T58"> champs </text:span><text:span text:style-name="T59">obligatoire</text:span><text:span text:style-name="T58"> : </text:span><text:span text:style-name="T25"><text:s/></text:span><text:span text:style-name="T43">vehicle_id</text:span><text:span text:style-name="T25"> dans la structure </text:span><text:span text:style-name="T41">Cour</text:span><text:span text:style-name="T42">s</text:span><text:span text:style-name="T41">ier</text:span><text:span text:style-name="T25"> </text:span><text:bookmark-end text:name="__RefHeading___Toc9800_38453672112"/></text:p>
      <text:p text:style-name="P146"><text:bookmark-start text:name="__DdeLink__13629_1047798942"/><text:tab/>{ </text:p>
      <text:p text:style-name="P146"><text:s text:c="3"/><text:tab/><text:tab/>"name": "vehicle_id",</text:p>
      <text:p text:style-name="P149"><text:span text:style-name="T198"><text:s text:c="3"/><text:tab/><text:tab/>"type": "</text:span><text:span text:style-name="T60">int</text:span><text:span text:style-name="T198">"</text:span></text:p>
      <text:p text:style-name="P146"><text:tab/>},<text:bookmark-end text:name="__DdeLink__13629_1047798942"/></text:p>
      <text:p text:style-name="P151"/>
      <text:p text:style-name="P150">Fixer les problèmes de compilation</text:p>
      <text:p text:style-name="P154">Dans <text:tab/><text:span text:style-name="T10">src/main/java/org/formation/KafkaProducerThread.java</text:span><text:tab/></text:p>
      <text:p text:style-name="P154">Changer la ligne 29 par :</text:p>
      <text:p text:style-name="P59">this.courier = new Courier(id, "David", <text:span text:style-name="T200">1, </text:span>new Position(Math.random() + 45, Math.random() + 2));</text:p>
      <text:p text:style-name="P154"/>
      <text:p text:style-name="P151"><text:bookmark-start text:name="__RefHeading___Toc9802_38453672112"/>Relancer le programme de production et visualiser l’exception au moment de l’enregistrement du nouveau schéma. <text:bookmark-end text:name="__RefHeading___Toc9802_38453672112"/></text:p>
      <text:p text:style-name="P3"/>
      <text:h text:style-name="P192" text:outline-level="1"><text:bookmark-start text:name="_Toc228290164"/><text:bookmark-start text:name="__RefHeading___Toc20228_2913458575"/>Atelier <text:span text:style-name="T258">6</text:span>. Kafka Connect<text:bookmark-end text:name="_Toc228290164"/><text:bookmark-end text:name="__RefHeading___Toc20228_2913458575"/></text:h>
      <text:p text:style-name="P352"><text:span text:style-name="T114">Objectif</text:span> : </text:p>
      <text:list text:style-name="L22">
        <text:list-item>
          <text:p text:style-name="P353">Déverser le topic position dans un index ElasticSearch</text:p>
        </text:list-item>
      </text:list>
      <text:h text:style-name="P201" text:outline-level="2"><text:bookmark-start text:name="__RefHeading___Toc20230_2913458575"/><text:span text:style-name="T258">6</text:span><text:bookmark-start text:name="_Toc228290165"/>.1 Installation du plugin ElasticSearch dans kafka connect<text:bookmark-end text:name="__RefHeading___Toc20230_2913458575"/><text:bookmark-end text:name="_Toc228290165"/></text:h>
      <text:p text:style-name="P344">Visualiser le fichier Dockerfile fourni et construire une image <text:span text:style-name="T10">my-kafka-connect-with-elasticsearch</text:span> via :</text:p>
      <text:p text:style-name="P355">docker build -t my-kafka-connect-with-elasticsearch .</text:p>
      <text:h text:style-name="P201" text:outline-level="2"><text:bookmark-start text:name="__RefHeading___Toc20232_2913458575"/><text:span text:style-name="T258">6</text:span><text:bookmark-start text:name="_Toc228290166"/>.2 Démarrage de la stack<text:bookmark-end text:name="__RefHeading___Toc20232_2913458575"/><text:bookmark-end text:name="_Toc228290166"/></text:h>
      <text:p text:style-name="P344">Démarrer la nouvelle stack qui ajoute l’image précédemment construite, ElasticSearch et Kibana</text:p>
      <text:p text:style-name="P355">docker-compose up -d</text:p>
      <text:p text:style-name="P344">Vérifier l’installation du plugin via :</text:p>
      <text:p text:style-name="P344">http://localhost:8083/connector-plugins</text:p>
      <text:p text:style-name="P344">Se connecter à kibana localhost:5601 et dans la DevConsole exécuter :</text:p>
      <text:p text:style-name="P356">PUT /position </text:p>
      <text:p text:style-name="P356">{</text:p>
      <text:p text:style-name="P356"><text:s text:c="2"/>"mappings":{</text:p>
      <text:p text:style-name="P356"><text:s text:c="4"/>"properties": {</text:p>
      <text:p text:style-name="P356"><text:s text:c="6"/>"@timestamp": {</text:p>
      <text:p text:style-name="P356"><text:s text:c="8"/>"type": "date",</text:p>
      <text:p text:style-name="P356"><text:s text:c="9"/>"format": "epoch_millis"</text:p>
      <text:p text:style-name="P356"><text:s text:c="6"/>}</text:p>
      <text:p text:style-name="P356"><text:s text:c="4"/>}</text:p>
      <text:p text:style-name="P356"><text:s text:c="2"/>}</text:p>
      <text:p text:style-name="P345">}</text:p>
      <text:p text:style-name="P344">La commande crée un index elasticsearch <text:span text:style-name="T10">position</text:span> avec pour l’instant un seul champ <text:span text:style-name="T10">@timestamp</text:span></text:p>
      <text:h text:style-name="P201" text:outline-level="2"><text:bookmark-start text:name="__RefHeading___Toc20234_2913458575"/><text:span text:style-name="T258">6</text:span><text:bookmark-start text:name="_Toc228290167"/>.3 Configuration du connecteur<text:bookmark-end text:name="__RefHeading___Toc20234_2913458575"/><text:bookmark-end text:name="_Toc228290167"/></text:h>
      <text:p text:style-name="P344">Définir un connecteur <text:span text:style-name="T10">elasticsearch-sink</text:span> qui déverse le topic position dans l’index position :</text:p>
      <text:p text:style-name="P356">curl -X POST http://localhost:8083/connectors \</text:p>
      <text:p text:style-name="P356">-H "Content-Type: application/json" \</text:p>
      <text:p text:style-name="P356">-d '{</text:p>
      <text:p text:style-name="P356"><text:s text:c="2"/>"name": "elasticsearch-sink",</text:p>
      <text:p text:style-name="P356"><text:s text:c="2"/>"config": {</text:p>
      <text:p text:style-name="P356"><text:s text:c="4"/>"connector.class": "io.confluent.connect.elasticsearch.ElasticsearchSinkConnector",</text:p>
      <text:p text:style-name="P356"><text:s text:c="4"/>"tasks.max": "1",</text:p>
      <text:p text:style-name="P356"><text:s text:c="4"/>"topics": "position",</text:p>
      <text:p text:style-name="P356"><text:s text:c="4"/>"topic.index.map": "position:position_index",</text:p>
      <text:p text:style-name="P356"><text:s text:c="4"/>"connection.url": "http://elasticsearch:9200",</text:p>
      <text:p text:style-name="P356"><text:s text:c="4"/>"type.name": "log",</text:p>
      <text:p text:style-name="P356"><text:s text:c="4"/>"key.ignore": "true",</text:p>
      <text:p text:style-name="P356"><text:s text:c="4"/>"schema.ignore": "true",</text:p>
      <text:p text:style-name="P356"><text:s text:c="4"/>"key.converter": "org.apache.kafka.connect.json.JsonConverter",</text:p>
      <text:p text:style-name="P356"><text:s text:c="4"/>"key.converter.schemas.enable": "false",</text:p>
      <text:p text:style-name="P356"><text:s text:c="4"/>"value.converter": "org.apache.kafka.connect.json.JsonConverter",</text:p>
      <text:p text:style-name="P356"><text:s text:c="4"/>"value.converter.schemas.enable": "false"</text:p>
      <text:p text:style-name="P356"><text:s text:c="2"/>}</text:p>
      <text:p text:style-name="P356">}'</text:p>
      <text:p text:style-name="P344">Vous pouvez vérifier la bonne installation du connecteur :</text:p>
      <text:list xml:id="list1018713683" text:style-name="WWNum4">
        <text:list-item>
          <text:p text:style-name="P342"><text:soft-page-break/>Via les logs de KafkaConnect</text:p>
        </text:list-item>
        <text:list-item>
          <text:p text:style-name="P342">Via <text:span text:style-name="T1">http://localhost:8083/connectors</text:span> : Liste des connecteurs actifs</text:p>
        </text:list-item>
        <text:list-item>
          <text:p text:style-name="P342">Via l’interface de RedPanda</text:p>
        </text:list-item>
      </text:list>
      <text:p text:style-name="P344">Alimenter le topic position</text:p>
      <text:p text:style-name="P344">Vous pouvez visualiser les effets du connecteur</text:p>
      <text:list text:style-name="WWNum7">
        <text:list-item>
          <text:p text:style-name="P343">Via ElasticSearch : http://localhost:9200/position/_search</text:p>
        </text:list-item>
        <text:list-item>
          <text:p text:style-name="P343">Via Kibana : <text:a xlink:type="simple" xlink:href="http://localhost:5601/" text:style-name="Internet_20_link" text:visited-style-name="Visited_20_Internet_20_Link"><text:span text:style-name="Internet_20_link">http://localhost:5601</text:span></text:a></text:p>
        </text:list-item>
      </text:list>
      <text:p text:style-name="P344"/>
      <text:h text:style-name="P201" text:outline-level="2"><text:bookmark-start text:name="__RefHeading___Toc20236_2913458575"/><text:span text:style-name="T258">6</text:span><text:bookmark-start text:name="_Toc228290168"/>.<text:span text:style-name="T258">4</text:span> Améliorations<text:bookmark-end text:name="__RefHeading___Toc20236_2913458575"/><text:bookmark-end text:name="_Toc228290168"/></text:h>
      <text:list text:continue-list="list1018713683" text:style-name="WWNum4">
        <text:list-item>
          <text:p text:style-name="P342">Améliorer le fichier de configuration afin d’introduire que le timestamp Kafka soit renseigné dans le champ @timestamp de l’index position d’ElasticSearch</text:p>
        </text:list-item>
        <text:list-item>
          <text:p text:style-name="P342">Déverser le topic <text:span text:style-name="T10">position-avro</text:span> dans un index <text:span text:style-name="T10">position-avro</text:span></text:p>
        </text:list-item>
      </text:list>
      <text:p text:style-name="P235"/>
      <text:p text:style-name="P236"><text:span text:style-name="T260"/></text:p>
      <text:h text:style-name="P191" text:outline-level="1"><text:bookmark-start text:name="__RefHeading___Toc20238_2913458575"/>Atelier 7. MirrorMaker 2<text:bookmark-end text:name="__RefHeading___Toc20238_2913458575"/></text:h>
      <text:p text:style-name="P314"><text:span text:style-name="T114">Objectifs</text:span> : </text:p>
      <text:list text:style-name="L23">
        <text:list-item>
          <text:p text:style-name="P315"><text:span text:style-name="T279">R</text:span>épliquer le topic position du cluster Kafka existant vers un second cluster mono-broker en utilisant les connecteurs MirrorMaker 2 </text:p>
        </text:list-item>
      </text:list>
      <text:h text:style-name="Heading_20_2" text:outline-level="2"><text:bookmark-start text:name="__RefHeading___Toc20240_2913458575"/>7.1 Démarrer le second cluster<text:bookmark-end text:name="__RefHeading___Toc20240_2913458575"/></text:h>
      <text:p text:style-name="Standard">On ajoute un cluster cible kafka-b au déploiement existant via un fichier d’override docker-compose.mm2.yml. </text:p>
      <text:p text:style-name="Standard">Ce cluster est mono-broker pour rester simple ; il rejoint le réseau kafka-net afin d’être joignable depuis le service kafka-connect.</text:p>
      <text:p text:style-name="P242"><text:span text:style-name="T259"><text:s/></text:span></text:p>
      <text:p text:style-name="P241"><text:span text:style-name="T259">Démarrer le second cluster en complément de la stack existante :</text:span></text:p>
      <text:p text:style-name="P237"><text:span text:style-name="T262">docker-compose -f docker-compose.yml -f docker-compose.mm2.yml up -d kafka-b</text:span></text:p>
      <text:p text:style-name="P242"><text:span text:style-name="T259"><text:s/></text:span></text:p>
      <text:p text:style-name="P241"><text:span text:style-name="T259">Vérifier que le broker est up :</text:span></text:p>
      <text:p text:style-name="P237"><text:span text:style-name="T262">docker exec -it kafka-b /opt/kafka/bin/kafka-broker-api-versions.sh \</text:span></text:p>
      <text:p text:style-name="P239"><text:span text:style-name="T262"><text:s text:c="2"/>--bootstrap-server localhost:</text:span><text:span text:style-name="T263">2</text:span><text:span text:style-name="T262">9092</text:span></text:p>
      <text:h text:style-name="Heading_20_2" text:outline-level="2"><text:bookmark-start text:name="__RefHeading___Toc20242_2913458575"/>7.2 Vérifier la disponibilité des connecteurs MM2<text:bookmark-end text:name="__RefHeading___Toc20242_2913458575"/></text:h>
      <text:p text:style-name="Standard">Les trois connecteurs MirrorMaker 2 sont fournis avec Apache Kafka. Lister les plugins disponibles dans Kafka Connect :</text:p>
      <text:p text:style-name="P237"><text:span text:style-name="T262">curl -s http://localhost:8083/connector-plugins | jq '.[] | select(.class | contains("Mirror"))'</text:span></text:p>
      <text:p text:style-name="P242"><text:span text:style-name="T259"><text:s/></text:span></text:p>
      <text:p text:style-name="P241"><text:span text:style-name="T259">On doit voir les trois classes :</text:span></text:p>
      <text:list text:style-name="WWNum2">
        <text:list-item text:start-value="1">
          <text:p text:style-name="P210"><text:span text:style-name="T261">org.apache.kafka.connect.mirror.MirrorSourceConnector</text:span></text:p>
        </text:list-item>
        <text:list-item>
          <text:p text:style-name="P210"><text:span text:style-name="T261">org.apache.kafka.connect.mirror.MirrorCheckpointConnector</text:span></text:p>
        </text:list-item>
        <text:list-item>
          <text:p text:style-name="P210"><text:span text:style-name="T261">org.apache.kafka.connect.mirror.MirrorHeartbeatConnector</text:span></text:p>
        </text:list-item>
      </text:list>
      <text:h text:style-name="Heading_20_2" text:outline-level="2"><text:bookmark-start text:name="__RefHeading___Toc20244_2913458575"/>7.3 Créer le connecteur MirrorSource<text:bookmark-end text:name="__RefHeading___Toc20244_2913458575"/></text:h>
      <text:p text:style-name="P244">Ce connecteur réplique le topic position du cluster A vers le cluster B. </text:p>
      <text:p text:style-name="P244">Le topic répliqué sera nommé A.position côté B (préfixe par alias source, défaut de DefaultReplicationPolicy).</text:p>
      <text:p text:style-name="P237"><text:span text:style-name="T262">curl -X POST http://localhost:8083/connectors \</text:span></text:p>
      <text:p text:style-name="P238"><text:span text:style-name="T262">-H "Content-Type: application/json" \</text:span></text:p>
      <text:p text:style-name="P238"><text:span text:style-name="T262">-d '{</text:span></text:p>
      <text:p text:style-name="P238"><text:span text:style-name="T262"><text:s text:c="2"/>"name": "mm2-source-A-to-B",</text:span></text:p>
      <text:p text:style-name="P238"><text:span text:style-name="T262"><text:s text:c="2"/>"config": {</text:span></text:p>
      <text:p text:style-name="P238"><text:span text:style-name="T262"><text:s text:c="4"/>"connector.class": "org.apache.kafka.connect.mirror.MirrorSourceConnector",</text:span></text:p>
      <text:p text:style-name="P238"><text:span text:style-name="T262"><text:s text:c="4"/>"tasks.max": "1",</text:span></text:p>
      <text:p text:style-name="P238"><text:span text:style-name="T262"><text:s text:c="4"/>"source.cluster.alias": "A",</text:span></text:p>
      <text:p text:style-name="P238"><text:span text:style-name="T262"><text:s text:c="4"/>"target.cluster.alias": "B",</text:span></text:p>
      <text:p text:style-name="P240"><text:span text:style-name="T262"><text:s text:c="4"/>"source.cluster.bootstrap.servers": "</text:span><text:span text:style-name="T263">localhost</text:span><text:span text:style-name="T262">:9092,</text:span><text:span text:style-name="T263">localhost</text:span><text:span text:style-name="T262">:9</text:span><text:span text:style-name="T263">1</text:span><text:span text:style-name="T262">92,</text:span><text:span text:style-name="T263">localhost</text:span><text:span text:style-name="T262">:9</text:span><text:span text:style-name="T263">2</text:span><text:span text:style-name="T262">92",</text:span></text:p>
      <text:p text:style-name="P238"><text:span text:style-name="T262"><text:s text:c="4"/>"target.cluster.bootstrap.servers": "</text:span><text:span text:style-name="T263">localhost</text:span><text:span text:style-name="T262">:</text:span><text:span text:style-name="T263">2</text:span><text:span text:style-name="T262">9092",</text:span></text:p>
      <text:p text:style-name="P238"><text:span text:style-name="T262"><text:s text:c="4"/>"producer.override.bootstrap.servers": "localhost:29092",</text:span></text:p>
      <text:p text:style-name="P238"><text:span text:style-name="T262"><text:s text:c="4"/>"topics": "position",</text:span></text:p>
      <text:p text:style-name="P238"><text:soft-page-break/><text:span text:style-name="T262"><text:s text:c="4"/>"replication.factor": "1",</text:span></text:p>
      <text:p text:style-name="P238"><text:span text:style-name="T262"><text:s text:c="4"/>"offset-syncs.topic.replication.factor": "1",</text:span></text:p>
      <text:p text:style-name="P238"><text:span text:style-name="T262"><text:s text:c="4"/>"key.converter": "org.apache.kafka.connect.converters.ByteArrayConverter",</text:span></text:p>
      <text:p text:style-name="P238"><text:span text:style-name="T262"><text:s text:c="4"/>"value.converter": "org.apache.kafka.connect.converters.ByteArrayConverter"</text:span></text:p>
      <text:p text:style-name="P238"><text:span text:style-name="T262"><text:s text:c="2"/>}</text:span></text:p>
      <text:p text:style-name="P239"><text:span text:style-name="T262">}'</text:span></text:p>
      <text:p text:style-name="P242"><text:span text:style-name="T259"><text:s/></text:span></text:p>
      <text:p text:style-name="Standard">Note : <text:span text:style-name="T1">ByteArrayConverter</text:span> est utilisé pour préserver le payload tel quel pendant la réplication, indépendamment du format métier.</text:p>
      <text:p text:style-name="Standard"/>
      <text:p text:style-name="P245">Vérifier avec :</text:p>
      <text:p text:style-name="P246">docker exec -it kafka-b /opt/kafka/bin/kafka-topics.sh <text:s text:c="2"/>--bootstrap-server localhost:29092 –list</text:p>
      <text:p text:style-name="P246"/>
      <text:p text:style-name="P245">Puis consommer avec :</text:p>
      <text:p text:style-name="P250">docker exec -it kafka-b /opt/kafka/bin/kafka-console-consumer.sh <text:s text:c="2"/>--bootstrap-server localhost:29092 --topic A.position --from-beginning</text:p>
      <text:p text:style-name="P250"/>
      <text:p text:style-name="P246"/>
      <text:h text:style-name="Heading_20_2" text:outline-level="2"><text:bookmark-start text:name="__RefHeading___Toc20246_2913458575"/>7.4 Créer le connecteur MirrorCheckpoint<text:bookmark-end text:name="__RefHeading___Toc20246_2913458575"/></text:h>
      <text:p text:style-name="Standard">Ce connecteur synchronise les offsets de consumer groups du cluster A vers le cluster B (utile pour le failover, mais pas indispensable pour la démo de réplication seule).</text:p>
      <text:p text:style-name="P237"><text:span text:style-name="T262">curl -X POST http://localhost:8083/connectors \</text:span></text:p>
      <text:p text:style-name="P238"><text:span text:style-name="T262">-H "Content-Type: application/json" \</text:span></text:p>
      <text:p text:style-name="P238"><text:span text:style-name="T262">-d '{</text:span></text:p>
      <text:p text:style-name="P238"><text:span text:style-name="T262"><text:s text:c="2"/>"name": "mm2-checkpoint-A-to-B",</text:span></text:p>
      <text:p text:style-name="P238"><text:span text:style-name="T262"><text:s text:c="2"/>"config": {</text:span></text:p>
      <text:p text:style-name="P238"><text:span text:style-name="T262"><text:s text:c="4"/>"connector.class": "org.apache.kafka.connect.mirror.MirrorCheckpointConnector",</text:span></text:p>
      <text:p text:style-name="P238"><text:span text:style-name="T262"><text:s text:c="4"/>"tasks.max": "1",</text:span></text:p>
      <text:p text:style-name="P238"><text:span text:style-name="T262"><text:s text:c="4"/>"source.cluster.alias": "A",</text:span></text:p>
      <text:p text:style-name="P238"><text:span text:style-name="T262"><text:s text:c="4"/>"target.cluster.alias": "B",</text:span></text:p>
      <text:p text:style-name="P238"><text:span text:style-name="T262"><text:s text:c="4"/>"source.cluster.bootstrap.servers": "localhost:9092,localhost:9192,localhost:9292", <text:s text:c="3"/><text:tab/>"target.cluster.bootstrap.servers": "localhost:29092", <text:tab/>"producer.override.bootstrap.servers": "localhost:29092",</text:span></text:p>
      <text:p text:style-name="P238"><text:span text:style-name="T262"><text:s text:c="4"/>"checkpoints.topic.replication.factor": "1",</text:span></text:p>
      <text:p text:style-name="P238"><text:span text:style-name="T262"><text:s text:c="4"/>"emit.checkpoints.interval.seconds": "5"</text:span></text:p>
      <text:p text:style-name="P238"><text:span text:style-name="T262"><text:s text:c="2"/>}</text:span></text:p>
      <text:p text:style-name="P239"><text:span text:style-name="T262">}'</text:span></text:p>
      <text:h text:style-name="Heading_20_2" text:outline-level="2"><text:bookmark-start text:name="__RefHeading___Toc20248_2913458575"/>7.5 Créer le connecteur MirrorHeartbeat<text:bookmark-end text:name="__RefHeading___Toc20248_2913458575"/></text:h>
      <text:p text:style-name="P251">Ce connecteur émet un heartbeat périodique sur le cluster source ; le MirrorSourceConnector répliquera ces heartbeats côté cible. </text:p>
      <text:p text:style-name="P251">Cela permet de mesurer la latence et la santé du lien.</text:p>
      <text:p text:style-name="P237"><text:span text:style-name="T262">curl -X POST http://localhost:8083/connectors \</text:span></text:p>
      <text:p text:style-name="P238"><text:span text:style-name="T262">-H "Content-Type: application/json" \</text:span></text:p>
      <text:p text:style-name="P238"><text:span text:style-name="T262">-d '{</text:span></text:p>
      <text:p text:style-name="P238"><text:span text:style-name="T262"><text:s text:c="2"/>"name": "mm2-heartbeat-A",</text:span></text:p>
      <text:p text:style-name="P238"><text:span text:style-name="T262"><text:s text:c="2"/>"config": {</text:span></text:p>
      <text:p text:style-name="P238"><text:span text:style-name="T262"><text:s text:c="4"/>"connector.class": "org.apache.kafka.connect.mirror.MirrorHeartbeatConnector",</text:span></text:p>
      <text:p text:style-name="P238"><text:span text:style-name="T262"><text:s text:c="4"/>"tasks.max": "1",</text:span></text:p>
      <text:p text:style-name="P238"><text:span text:style-name="T262"><text:s text:c="4"/>"source.cluster.alias": "A",</text:span></text:p>
      <text:p text:style-name="P238"><text:soft-page-break/><text:span text:style-name="T262"><text:s text:c="4"/>"target.cluster.alias": "B",</text:span></text:p>
      <text:p text:style-name="P238"><text:span text:style-name="T262"><text:s text:c="4"/>"source.cluster.bootstrap.servers": "localhost:9092,localhost:9192,localhost:9292", <text:tab/>"target.cluster.bootstrap.servers": "localhost:29092", <text:s/>"producer.override.bootstrap.servers": "localhost:9092,localhost:9192,localhost:9292",</text:span></text:p>
      <text:p text:style-name="P238"><text:span text:style-name="T262"><text:s text:c="4"/>"heartbeats.topic.replication.factor": "1",</text:span></text:p>
      <text:p text:style-name="P238"><text:span text:style-name="T262"><text:s text:c="4"/>"emit.heartbeats.interval.seconds": "5"</text:span></text:p>
      <text:p text:style-name="P238"><text:span text:style-name="T262"><text:s text:c="2"/>}</text:span></text:p>
      <text:p text:style-name="P239"><text:span text:style-name="T262">}'</text:span></text:p>
      <text:p text:style-name="P242"><text:span text:style-name="T259"><text:s/></text:span></text:p>
      <text:p text:style-name="Standard">Mettre à jour le connecteur afin qu’il réplique le topic heartbeats</text:p>
      <text:p text:style-name="P247">curl -X PUT http://localhost:8083/connectors/mm2-source-A-to-B/config \</text:p>
      <text:p text:style-name="P247">-H "Content-Type: application/json" \</text:p>
      <text:p text:style-name="P247">-d '{</text:p>
      <text:p text:style-name="P247"><text:s text:c="2"/>"connector.class": "org.apache.kafka.connect.mirror.MirrorSourceConnector",</text:p>
      <text:p text:style-name="P247"><text:s text:c="2"/>"tasks.max": "1",</text:p>
      <text:p text:style-name="P247"><text:s text:c="2"/>"source.cluster.alias": "A",</text:p>
      <text:p text:style-name="P247"><text:s text:c="2"/>"target.cluster.alias": "B",</text:p>
      <text:p text:style-name="P247"><text:s text:c="2"/>"source.cluster.bootstrap.servers": "localhost:9092,localhost:9192,localhost:9292",</text:p>
      <text:p text:style-name="P247"><text:s text:c="2"/>"target.cluster.bootstrap.servers": "localhost:29092",</text:p>
      <text:p text:style-name="P247"><text:s text:c="2"/>"producer.override.bootstrap.servers": "localhost:29092",</text:p>
      <text:p text:style-name="P247"><text:s text:c="2"/>"topics": "position|heartbeats",</text:p>
      <text:p text:style-name="P247"><text:s text:c="2"/>"replication.factor": "1",</text:p>
      <text:p text:style-name="P247"><text:s text:c="2"/>"offset-syncs.topic.replication.factor": "1",</text:p>
      <text:p text:style-name="P247"><text:s text:c="2"/>"key.converter": "org.apache.kafka.connect.converters.ByteArrayConverter",</text:p>
      <text:p text:style-name="P247"><text:s text:c="2"/>"value.converter": "org.apache.kafka.connect.converters.ByteArrayConverter"</text:p>
      <text:p text:style-name="P247">}'</text:p>
      <text:p text:style-name="P241"><text:span text:style-name="T259"/></text:p>
      <text:p text:style-name="Standard">Vérifier l’état des trois connecteurs :</text:p>
      <text:p text:style-name="P237"><text:span text:style-name="T262">curl -s "http://localhost:8083/connectors?expand=status" | jq</text:span></text:p>
      <text:h text:style-name="Heading_20_2" text:outline-level="2"><text:bookmark-start text:name="__RefHeading___Toc20250_2913458575"/>7.6 Vérifier la réplication<text:bookmark-end text:name="__RefHeading___Toc20250_2913458575"/></text:h>
      <text:p text:style-name="Standard">Lister les topics côté cluster B — on doit y trouver <text:span text:style-name="T280">__consumer_offsets,</text:span>A.position, <text:span text:style-name="T280">A.</text:span>heartbeats, <text:span text:style-name="T280">heartbeats (pour le fail-over) </text:span>et le topic interne mm2-offset-syncs.B.internal :</text:p>
      <text:p text:style-name="P237"><text:span text:style-name="T262">docker exec -it kafka-b /opt/kafka/bin/kafka-topics.sh \</text:span></text:p>
      <text:p text:style-name="P239"><text:span text:style-name="T262"><text:s text:c="2"/>--bootstrap-server kafka-b:9092 --list</text:span></text:p>
      <text:p text:style-name="P242"><text:span text:style-name="T259"><text:s/></text:span></text:p>
      <text:p text:style-name="P241">Produire des messages sur position côté A <text:span text:style-name="T259">:</text:span></text:p>
      <text:p text:style-name="P237"><text:span text:style-name="T262">docker exec -it kafka-0 /opt/kafka/bin/kafka-console-producer.sh \</text:span></text:p>
      <text:p text:style-name="P239"><text:span text:style-name="T262"><text:s text:c="2"/>--bootstrap-server kafka-0:9092 --topic position</text:span></text:p>
      <text:p text:style-name="P242"><text:span text:style-name="T259"><text:s/></text:span></text:p>
      <text:p text:style-name="Standard">Et lire en parallèle sur A.position côté B pour observer la réplication en quasi temps réel :</text:p>
      <text:p text:style-name="P237"><text:span text:style-name="T262">docker exec -it kafka-b /opt/kafka/bin/kafka-console-consumer.sh \</text:span></text:p>
      <text:p text:style-name="P239"><text:span text:style-name="T262"><text:s text:c="2"/>--bootstrap-server kafka-b:9092 --topic A.position --from-beginning</text:span><text:span text:style-name="Source_20_Text"><text:span text:style-name="T85">.</text:span></text:span></text:p>
      <text:h text:style-name="P189" text:outline-level="1"/>
      <text:p text:style-name="P170"/>
      <text:h text:style-name="P193" text:outline-level="1"><text:bookmark-start text:name="__RefHeading___Toc9889_3845367211"/><text:span text:style-name="T141">Atelier 8 : kafkaStream et ksqlDB </text:span><text:bookmark-end text:name="__RefHeading___Toc9889_3845367211"/></text:h>
      <text:h text:style-name="Heading_20_2" text:outline-level="2"><text:bookmark-start text:name="__RefHeading___Toc20252_2913458575"/>8.1 Application KafkaStream <text:bookmark-end text:name="__RefHeading___Toc20252_2913458575"/></text:h>
      <text:p text:style-name="P316">L’application KafkaStream fourni<text:span text:style-name="T281">e travaille à partir du topic </text:span><text:span text:style-name="T17">avro-position</text:span><text:span text:style-name="T281"> et effectue plusieurs transformations en interne :</text:span></text:p>
      <text:list text:style-name="L24">
        <text:list-item>
          <text:p text:style-name="P317">Arrondi les valeurs de latitude et de longitude à une valeur entière</text:p>
        </text:list-item>
        <text:list-item>
          <text:p text:style-name="P317">Transforme le flux en KTable</text:p>
        </text:list-item>
        <text:list-item>
          <text:p text:style-name="P317">Groupe par la position, plutôt que l’id du coursier</text:p>
        </text:list-item>
        <text:list-item>
          <text:p text:style-name="P317">Effectue une agrégation pour maintenir à jour une liste de coursiers pour un position donnée.<text:line-break/>Obtient une table</text:p>
        </text:list-item>
        <text:list-item>
          <text:p text:style-name="P317">Déverse le changelog de cette table dans le topic <text:span text:style-name="T10">coursiersParPosition</text:span></text:p>
        </text:list-item>
      </text:list>
      <text:p text:style-name="Standard"/>
      <text:p text:style-name="P252">Pour démarrer l’application : </text:p>
      <text:p text:style-name="P249">java -jar streams.jar</text:p>
      <text:p text:style-name="P248"/>
      <text:p text:style-name="P253">S’assurer que l’application <text:s/>ne plante pas. </text:p>
      <text:p text:style-name="P253">Au bout d’un certain temps le topic de sortie devrait apparaître avec les dernières positions des coursiers.</text:p>
      <text:p text:style-name="P253"/>
      <text:p text:style-name="P253">Relancer une production sur avro et visualiser les mises à jour sur la table.</text:p>
      <text:p text:style-name="P253"/>
      <text:p text:style-name="P249">java -jar target/producer-avro-0.0.1-SNAPSHOT-jar-with-dependencies.jar 100 100000 1000 2</text:p>
      <text:h text:style-name="Heading_20_2" text:outline-level="2"><text:bookmark-start text:name="__RefHeading___Toc20254_2913458575"/>8.2 kSQLDb<text:bookmark-end text:name="__RefHeading___Toc20254_2913458575"/></text:h>
      <text:p text:style-name="P350" loext:marker-style-name="T114"><text:span text:style-name="T114">Objectifs</text:span></text:p>
      <text:list text:style-name="WWNum10">
        <text:list-item>
          <text:p text:style-name="P346">Découvrir l'interface CLI de ksqlDB</text:p>
        </text:list-item>
        <text:list-item>
          <text:p text:style-name="P346">Créer des streams et des tables à partir du topic <text:span text:style-name="Source_20_Text">position</text:span> produit aux ateliers précédents</text:p>
        </text:list-item>
        <text:list-item>
          <text:p text:style-name="P346">Écrire des requêtes dérivées pour filtrer et agréger les positions des coursiers</text:p>
        </text:list-item>
        <text:list-item>
          <text:p text:style-name="P347">Comprendre la différence entre Push Query (temps réel) et Pull Query (snapshot)</text:p>
        </text:list-item>
      </text:list>
      <text:p text:style-name="P350" loext:marker-style-name="T114"><text:span text:style-name="T114">Contexte</text:span></text:p>
      <text:p text:style-name="P350">Dans cet atelier, ksqlDB consomme directement le topic <text:span text:style-name="Source_20_Text">position</text:span> produit par JMeter (atelier 2). Aucun code Java n'est nécessaire — tout se fait en SQL depuis la CLI ou via l'API REST.</text:p>
      <text:h text:style-name="Heading_20_3" text:outline-level="3"><text:bookmark-start text:name="__RefHeading___Toc15343_2024334449"/>8.<text:span text:style-name="T264">2.1</text:span> Démarrage de la stack<text:bookmark-end text:name="__RefHeading___Toc15343_2024334449"/></text:h>
      <text:p text:style-name="P350">Un fichier <text:span text:style-name="Source_20_Text">docker-compose-ksqldb.yml</text:span> vous est fourni. Il étend la stack existante avec :</text:p>
      <text:list text:style-name="WWNum11">
        <text:list-item>
          <text:p text:style-name="P348"><text:span text:style-name="Strong_20_Emphasis_20__28_WW_29_">ksqlDB Server</text:span> (port 8088)</text:p>
        </text:list-item>
        <text:list-item>
          <text:p text:style-name="P349"><text:span text:style-name="Strong_20_Emphasis_20__28_WW_29_">ksqlDB CLI</text:span> (client interactif)</text:p>
        </text:list-item>
      </text:list>
      <text:p text:style-name="P350"/>
      <text:p text:style-name="P357"><text:span text:style-name="Source_20_Text">docker compose -f docker-compose-ksqldb.yml up -d</text:span></text:p>
      <text:p text:style-name="P350">Vérifier que le serveur est opérationnel :</text:p>
      <text:p text:style-name="P357"><text:span text:style-name="Source_20_Text">curl http://localhost:8088/info</text:span></text:p>
      <text:h text:style-name="Heading_20_3" text:outline-level="3"><text:bookmark-start text:name="__RefHeading___Toc15345_2024334449"/><text:soft-page-break/>8.<text:span text:style-name="T264">2.</text:span>1 Getting Started<text:bookmark-end text:name="__RefHeading___Toc15345_2024334449"/></text:h>
      <text:p text:style-name="P350" loext:marker-style-name="T114"><text:bookmark-start text:name="__RefHeading___Toc15347_2024334449"/><text:span text:style-name="T114">Connexion à la CLI</text:span><text:bookmark-end text:name="__RefHeading___Toc15347_2024334449"/></text:p>
      <text:p text:style-name="P357"><text:span text:style-name="Source_20_Text">docker exec -it ksqldb-cli ksql http://ksqldb-server:8088</text:span></text:p>
      <text:p text:style-name="P350">Explorer l'environnement :</text:p>
      <text:p text:style-name="P215"><text:span text:style-name="Source_20_Text"><text:span text:style-name="T265">SHOW</text:span></text:span><text:span text:style-name="Source_20_Text"><text:span text:style-name="T241"> TOPICS</text:span></text:span><text:span text:style-name="Source_20_Text"><text:span text:style-name="T247">;</text:span></text:span></text:p>
      <text:p text:style-name="P215"><text:span text:style-name="Source_20_Text"><text:span text:style-name="T265">SHOW</text:span></text:span><text:span text:style-name="Source_20_Text"><text:span text:style-name="T241"> STREAMS</text:span></text:span><text:span text:style-name="Source_20_Text"><text:span text:style-name="T247">;</text:span></text:span></text:p>
      <text:p text:style-name="P216"><text:span text:style-name="Source_20_Text"><text:span text:style-name="T265">SHOW</text:span></text:span><text:span text:style-name="Source_20_Text"><text:span text:style-name="T241"> </text:span></text:span><text:span text:style-name="Source_20_Text"><text:span text:style-name="T265">TABLES</text:span></text:span><text:span text:style-name="Source_20_Text"><text:span text:style-name="T247">;</text:span></text:span></text:p>
      <text:p text:style-name="P350">Inspecter le topic <text:span text:style-name="Source_20_Text">position</text:span> pour voir les messages existants :</text:p>
      <text:p text:style-name="P216"><text:span text:style-name="Source_20_Text"><text:span text:style-name="T265">PRINT</text:span></text:span><text:span text:style-name="Source_20_Text"><text:span text:style-name="T241"> </text:span></text:span><text:span text:style-name="Source_20_Text"><text:span text:style-name="T267">'position'</text:span></text:span><text:span text:style-name="Source_20_Text"><text:span text:style-name="T241"> </text:span></text:span><text:span text:style-name="Source_20_Text"><text:span text:style-name="T265">FROM</text:span></text:span><text:span text:style-name="Source_20_Text"><text:span text:style-name="T241"> BEGINNING </text:span></text:span><text:span text:style-name="Source_20_Text"><text:span text:style-name="T265">LIMIT</text:span></text:span><text:span text:style-name="Source_20_Text"><text:span text:style-name="T241"> </text:span></text:span><text:span text:style-name="Source_20_Text"><text:span text:style-name="T249">5</text:span></text:span><text:span text:style-name="Source_20_Text"><text:span text:style-name="T247">;</text:span></text:span></text:p>
      <text:p text:style-name="P350">Observer la structure d'un message : <text:span text:style-name="Source_20_Text">coursierId</text:span>, <text:span text:style-name="Source_20_Text">latitude</text:span>, <text:span text:style-name="Source_20_Text">longitude</text:span>, <text:span text:style-name="Source_20_Text">timestamp</text:span>.</text:p>
      <text:p text:style-name="P350" loext:marker-style-name="T114"><text:bookmark-start text:name="__RefHeading___Toc15349_2024334449"/><text:span text:style-name="T114">Créer le stream de base</text:span><text:bookmark-end text:name="__RefHeading___Toc15349_2024334449"/></text:p>
      <text:p text:style-name="P350">Créer un stream <text:span text:style-name="Source_20_Text">positions</text:span> mappé sur le topic <text:span text:style-name="Source_20_Text">position</text:span> :</text:p>
      <text:p text:style-name="P215"><text:span text:style-name="Source_20_Text"><text:span text:style-name="T247">CREATE STREAM positions (</text:span></text:span></text:p>
      <text:p text:style-name="P215"><text:span text:style-name="Source_20_Text"><text:span text:style-name="T247"><text:s text:c="4"/>courierId VARCHAR,</text:span></text:span></text:p>
      <text:p text:style-name="P215"><text:span text:style-name="Source_20_Text"><text:span text:style-name="T247"><text:s text:c="4"/>latitude <text:s/>DOUBLE,</text:span></text:span></text:p>
      <text:p text:style-name="P215"><text:span text:style-name="Source_20_Text"><text:span text:style-name="T247"><text:s text:c="4"/>longitude DOUBLE</text:span></text:span></text:p>
      <text:p text:style-name="P215"><text:span text:style-name="Source_20_Text"><text:span text:style-name="T247">) WITH (</text:span></text:span></text:p>
      <text:p text:style-name="P215"><text:span text:style-name="Source_20_Text"><text:span text:style-name="T247"><text:s text:c="4"/>kafka_topic <text:s/>= 'position',</text:span></text:span></text:p>
      <text:p text:style-name="P215"><text:span text:style-name="Source_20_Text"><text:span text:style-name="T247"><text:s text:c="4"/>value_format = 'JSON'</text:span></text:span></text:p>
      <text:p text:style-name="P215"><text:span text:style-name="Source_20_Text"><text:span text:style-name="T247">);</text:span></text:span></text:p>
      <text:p text:style-name="P215"/>
      <text:p text:style-name="P350">Vérifier la création :</text:p>
      <text:p text:style-name="P216"><text:span text:style-name="Source_20_Text"><text:span text:style-name="T265">DESCRIBE</text:span></text:span><text:span text:style-name="Source_20_Text"><text:span text:style-name="T241"> positions</text:span></text:span><text:span text:style-name="Source_20_Text"><text:span text:style-name="T247">;</text:span></text:span></text:p>
      <text:p text:style-name="P350">Exécuter une première push query pour voir les messages en temps réel. <text:span text:style-name="Strong_20_Emphasis_20__28_WW_29_">Dans un autre terminal</text:span>, démarrer la production de message dans le topic position</text:p>
      <text:p text:style-name="P215"><text:span text:style-name="Source_20_Text"><text:span text:style-name="T265">SELECT</text:span></text:span><text:span text:style-name="Source_20_Text"><text:span text:style-name="T241"> courierId</text:span></text:span><text:span text:style-name="Source_20_Text"><text:span text:style-name="T247">,</text:span></text:span><text:span text:style-name="Source_20_Text"><text:span text:style-name="T241"> latitude</text:span></text:span><text:span text:style-name="Source_20_Text"><text:span text:style-name="T247">,</text:span></text:span><text:span text:style-name="Source_20_Text"><text:span text:style-name="T241"> longitude</text:span></text:span></text:p>
      <text:p text:style-name="P215"><text:span text:style-name="Source_20_Text"><text:span text:style-name="T265">FROM</text:span></text:span><text:span text:style-name="Source_20_Text"><text:span text:style-name="T241"> positions</text:span></text:span></text:p>
      <text:p text:style-name="P215"><text:span text:style-name="Source_20_Text"><text:span text:style-name="T241">EMIT CHANGES</text:span></text:span></text:p>
      <text:p text:style-name="P216"><text:span text:style-name="Source_20_Text"><text:span text:style-name="T265">LIMIT</text:span></text:span><text:span text:style-name="Source_20_Text"><text:span text:style-name="T241"> </text:span></text:span><text:span text:style-name="Source_20_Text"><text:span text:style-name="T249">10</text:span></text:span><text:span text:style-name="Source_20_Text"><text:span text:style-name="T247">;</text:span></text:span></text:p>
      <text:p text:style-name="P350">Observer les messages défiler. Appuyer sur <text:span text:style-name="Source_20_Text">Ctrl+C</text:span> pour arrêter.</text:p>
      <text:h text:style-name="Heading_20_3" text:outline-level="3"><text:bookmark-start text:name="__RefHeading___Toc15351_2024334449"/>8.2.<text:span text:style-name="T264">2</text:span> Transformations et filtres<text:bookmark-end text:name="__RefHeading___Toc15351_2024334449"/></text:h>
      <text:p text:style-name="P350" loext:marker-style-name="T114"><text:bookmark-start text:name="__RefHeading___Toc15353_2024334449"/><text:span text:style-name="T114">Stream dérivé — positions dans Paris</text:span><text:bookmark-end text:name="__RefHeading___Toc15353_2024334449"/></text:p>
      <text:p text:style-name="P350">Créer un stream ne contenant que les positions dans la zone parisienne (latitude entre 48.8 et 48.95, longitude entre 2.2 et 2.5) :</text:p>
      <text:p text:style-name="P350"/>
      <text:p text:style-name="P215"><text:span text:style-name="Source_20_Text"><text:span text:style-name="T247">CREATE STREAM positions_paris AS</text:span></text:span></text:p>
      <text:p text:style-name="P215"><text:span text:style-name="Source_20_Text"><text:span text:style-name="T247"><text:s text:c="4"/>SELECT courierId,</text:span></text:span></text:p>
      <text:p text:style-name="P215"><text:span text:style-name="Source_20_Text"><text:span text:style-name="T247"><text:s text:c="11"/>latitude,</text:span></text:span></text:p>
      <text:p text:style-name="P215"><text:span text:style-name="Source_20_Text"><text:span text:style-name="T247"><text:s text:c="11"/>longitude</text:span></text:span></text:p>
      <text:p text:style-name="P215"><text:span text:style-name="Source_20_Text"><text:span text:style-name="T247"><text:s text:c="4"/>FROM positions</text:span></text:span></text:p>
      <text:p text:style-name="P215"><text:span text:style-name="Source_20_Text"><text:span text:style-name="T247"><text:s text:c="4"/>WHERE latitude <text:s/>BETWEEN 48.80 AND 48.95</text:span></text:span></text:p>
      <text:p text:style-name="P215"><text:span text:style-name="Source_20_Text"><text:span text:style-name="T247"><text:s text:c="6"/>AND longitude BETWEEN 2.20 <text:s/>AND 2.50</text:span></text:span></text:p>
      <text:p text:style-name="P215"><text:span text:style-name="Source_20_Text"><text:span text:style-name="T247">EMIT CHANGES;</text:span></text:span></text:p>
      <text:p text:style-name="P215"/>
      <text:p text:style-name="P350">Vérifier que le topic correspondant a été créé :</text:p>
      <text:p text:style-name="P216"><text:soft-page-break/><text:span text:style-name="Source_20_Text"><text:span text:style-name="T265">SHOW</text:span></text:span><text:span text:style-name="Source_20_Text"><text:span text:style-name="T241"> TOPICS</text:span></text:span><text:span text:style-name="Source_20_Text"><text:span text:style-name="T247">;</text:span></text:span></text:p>
      <text:p text:style-name="P350">Constater que ksqlDB a créé automatiquement le topic <text:span text:style-name="Source_20_Text">POSITIONS_PARIS</text:span>.</text:p>
      <text:p text:style-name="P350">Exécuter une push query sur ce stream filtré :</text:p>
      <text:p text:style-name="P216"><text:span text:style-name="Source_20_Text"><text:span text:style-name="T265">SELECT</text:span></text:span><text:span text:style-name="Source_20_Text"><text:span text:style-name="T241"> * </text:span></text:span><text:span text:style-name="Source_20_Text"><text:span text:style-name="T265">FROM</text:span></text:span><text:span text:style-name="Source_20_Text"><text:span text:style-name="T241"> positions_paris EMIT CHANGES </text:span></text:span><text:span text:style-name="Source_20_Text"><text:span text:style-name="T265">LIMIT</text:span></text:span><text:span text:style-name="Source_20_Text"><text:span text:style-name="T241"> </text:span></text:span><text:span text:style-name="Source_20_Text"><text:span text:style-name="T249">5</text:span></text:span><text:span text:style-name="Source_20_Text"><text:span text:style-name="T247">;</text:span></text:span></text:p>
      <text:p text:style-name="P350" loext:marker-style-name="T114"><text:bookmark-start text:name="__RefHeading___Toc15355_2024334449"/><text:span text:style-name="T114">Table — dernière position connue par coursier</text:span><text:bookmark-end text:name="__RefHeading___Toc15355_2024334449"/></text:p>
      <text:p text:style-name="P350">Créer une table qui maintient en temps réel la <text:span text:style-name="Strong_20_Emphasis_20__28_WW_29_">dernière position connue</text:span> de chaque coursier :</text:p>
      <text:p text:style-name="P350"/>
      <text:p text:style-name="P215"><text:span text:style-name="Source_20_Text"><text:span text:style-name="T265">CREATE</text:span></text:span><text:span text:style-name="Source_20_Text"><text:span text:style-name="T241"> </text:span></text:span><text:span text:style-name="Source_20_Text"><text:span text:style-name="T265">TABLE</text:span></text:span><text:span text:style-name="Source_20_Text"><text:span text:style-name="T241"> last_position </text:span></text:span><text:span text:style-name="Source_20_Text"><text:span text:style-name="T265">AS</text:span></text:span></text:p>
      <text:p text:style-name="P215"><text:span text:style-name="Source_20_Text"><text:span text:style-name="T242"><text:s text:c="4"/></text:span></text:span><text:span text:style-name="Source_20_Text"><text:span text:style-name="T265">SELECT</text:span></text:span><text:span text:style-name="Source_20_Text"><text:span text:style-name="T241"> courierId</text:span></text:span><text:span text:style-name="Source_20_Text"><text:span text:style-name="T247">,</text:span></text:span></text:p>
      <text:p text:style-name="P215"><text:span text:style-name="Source_20_Text"><text:span text:style-name="T242"><text:s text:c="11"/></text:span></text:span><text:span text:style-name="Source_20_Text"><text:span text:style-name="T241">LATEST_BY_OFFSET</text:span></text:span><text:span text:style-name="Source_20_Text"><text:span text:style-name="T247">(</text:span></text:span><text:span text:style-name="Source_20_Text"><text:span text:style-name="T241">latitude</text:span></text:span><text:span text:style-name="Source_20_Text"><text:span text:style-name="T247">)</text:span></text:span><text:span text:style-name="Source_20_Text"><text:span text:style-name="T241"> <text:s/></text:span></text:span><text:span text:style-name="Source_20_Text"><text:span text:style-name="T265">AS</text:span></text:span><text:span text:style-name="Source_20_Text"><text:span text:style-name="T241"> last_lat</text:span></text:span><text:span text:style-name="Source_20_Text"><text:span text:style-name="T247">,</text:span></text:span></text:p>
      <text:p text:style-name="P215"><text:span text:style-name="Source_20_Text"><text:span text:style-name="T242"><text:s text:c="11"/></text:span></text:span><text:span text:style-name="Source_20_Text"><text:span text:style-name="T241">LATEST_BY_OFFSET</text:span></text:span><text:span text:style-name="Source_20_Text"><text:span text:style-name="T247">(</text:span></text:span><text:span text:style-name="Source_20_Text"><text:span text:style-name="T241">longitude</text:span></text:span><text:span text:style-name="Source_20_Text"><text:span text:style-name="T247">)</text:span></text:span><text:span text:style-name="Source_20_Text"><text:span text:style-name="T241"> </text:span></text:span><text:span text:style-name="Source_20_Text"><text:span text:style-name="T265">AS</text:span></text:span><text:span text:style-name="Source_20_Text"><text:span text:style-name="T241"> last_lon</text:span></text:span><text:span text:style-name="Source_20_Text"><text:span text:style-name="T247">,</text:span></text:span></text:p>
      <text:p text:style-name="P215"><text:span text:style-name="Source_20_Text"><text:span text:style-name="T242"><text:s text:c="11"/></text:span></text:span><text:span text:style-name="Source_20_Text"><text:span text:style-name="T269">COUNT</text:span></text:span><text:span text:style-name="Source_20_Text"><text:span text:style-name="T247">(</text:span></text:span><text:span text:style-name="Source_20_Text"><text:span text:style-name="T241">*</text:span></text:span><text:span text:style-name="Source_20_Text"><text:span text:style-name="T247">)</text:span></text:span><text:span text:style-name="Source_20_Text"><text:span text:style-name="T241"> </text:span></text:span><text:span text:style-name="Source_20_Text"><text:span text:style-name="T265">AS</text:span></text:span><text:span text:style-name="Source_20_Text"><text:span text:style-name="T241"> nb_messages</text:span></text:span></text:p>
      <text:p text:style-name="P215"><text:span text:style-name="Source_20_Text"><text:span text:style-name="T242"><text:s text:c="4"/></text:span></text:span><text:span text:style-name="Source_20_Text"><text:span text:style-name="T265">FROM</text:span></text:span><text:span text:style-name="Source_20_Text"><text:span text:style-name="T241"> positions</text:span></text:span></text:p>
      <text:p text:style-name="P215"><text:span text:style-name="Source_20_Text"><text:span text:style-name="T242"><text:s text:c="4"/></text:span></text:span><text:span text:style-name="Source_20_Text"><text:span text:style-name="T265">GROUP</text:span></text:span><text:span text:style-name="Source_20_Text"><text:span text:style-name="T241"> </text:span></text:span><text:span text:style-name="Source_20_Text"><text:span text:style-name="T265">BY</text:span></text:span><text:span text:style-name="Source_20_Text"><text:span text:style-name="T241"> courierId</text:span></text:span></text:p>
      <text:p text:style-name="P216"><text:span text:style-name="Source_20_Text"><text:span text:style-name="T241">EMIT CHANGES</text:span></text:span><text:span text:style-name="Source_20_Text"><text:span text:style-name="T247">;</text:span></text:span></text:p>
      <text:p text:style-name="P351">La table est mise à jour à chaque nouveau message reçu pour un coursier donné.</text:p>
      <text:p text:style-name="P350" loext:marker-style-name="T114"><text:bookmark-start text:name="__RefHeading___Toc15357_2024334449"/><text:span text:style-name="T114">Agrégation par zone — coursiers par secteur</text:span><text:bookmark-end text:name="__RefHeading___Toc15357_2024334449"/></text:p>
      <text:p text:style-name="P350">Arrondir les coordonnées à 1 décimale pour créer des secteurs géographiques, et compter combien de coursiers différents ont été vus dans chaque secteur :</text:p>
      <text:p text:style-name="P350"/>
      <text:p text:style-name="P215"><text:span text:style-name="Source_20_Text"><text:span text:style-name="T247">CREATE TABLE positions_par_secteur AS</text:span></text:span></text:p>
      <text:p text:style-name="P215"><text:span text:style-name="Source_20_Text"><text:span text:style-name="T247"><text:s text:c="4"/>SELECT CAST(ROUND(last_lat, 1) AS VARCHAR) + '_' +</text:span></text:span></text:p>
      <text:p text:style-name="P215"><text:span text:style-name="Source_20_Text"><text:span text:style-name="T247"><text:s text:c="11"/>CAST(ROUND(last_lon, 1) AS VARCHAR) AS secteur,</text:span></text:span></text:p>
      <text:p text:style-name="P215"><text:span text:style-name="Source_20_Text"><text:span text:style-name="T247"><text:s text:c="11"/>COUNT(*) <text:s text:c="15"/>AS nb_coursiers,</text:span></text:span></text:p>
      <text:p text:style-name="P215"><text:span text:style-name="Source_20_Text"><text:span text:style-name="T247"><text:s text:c="11"/>COLLECT_LIST(courierId) AS coursiers</text:span></text:span></text:p>
      <text:p text:style-name="P215"><text:span text:style-name="Source_20_Text"><text:span text:style-name="T247"><text:s text:c="4"/>FROM last_position</text:span></text:span></text:p>
      <text:p text:style-name="P215"><text:span text:style-name="Source_20_Text"><text:span text:style-name="T247"><text:s text:c="4"/>GROUP BY CAST(ROUND(last_lat, 1) AS VARCHAR) + '_' +</text:span></text:span></text:p>
      <text:p text:style-name="P215"><text:span text:style-name="Source_20_Text"><text:span text:style-name="T247"><text:s text:c="13"/>CAST(ROUND(last_lon, 1) AS VARCHAR)</text:span></text:span></text:p>
      <text:p text:style-name="P215"><text:span text:style-name="Source_20_Text"><text:span text:style-name="T247">EMIT CHANGES;</text:span></text:span></text:p>
      <text:p text:style-name="P215"/>
      <text:p text:style-name="P350"><text:span text:style-name="Source_20_Text">Faire une sélection sur la table</text:span></text:p>
      <text:h text:style-name="Heading_20_3" text:outline-level="3"><text:bookmark-start text:name="__RefHeading___Toc15359_2024334449"/>8.<text:span text:style-name="T264">2.</text:span>3 Requêtes<text:bookmark-end text:name="__RefHeading___Toc15359_2024334449"/></text:h>
      <text:p text:style-name="P350" loext:marker-style-name="T114"><text:bookmark-start text:name="__RefHeading___Toc15361_2024334449"/><text:span text:style-name="T114">Push Query — suivi en temps réel</text:span><text:bookmark-end text:name="__RefHeading___Toc15361_2024334449"/></text:p>
      <text:p text:style-name="P350"><text:span text:style-name="Strong_20_Emphasis_20__28_WW_29_">Démarrer la production de messages</text:span></text:p>
      <text:p text:style-name="P350">Dans la CLI, suivre en temps réel les mises à jour de la table <text:span text:style-name="Source_20_Text">last_position</text:span> :</text:p>
      <text:p text:style-name="P215"><text:span text:style-name="Source_20_Text"><text:span text:style-name="T265">SELECT</text:span></text:span><text:span text:style-name="Source_20_Text"><text:span text:style-name="T241"> courierId</text:span></text:span><text:span text:style-name="Source_20_Text"><text:span text:style-name="T247">,</text:span></text:span><text:span text:style-name="Source_20_Text"><text:span text:style-name="T241"> last_lat</text:span></text:span><text:span text:style-name="Source_20_Text"><text:span text:style-name="T247">,</text:span></text:span><text:span text:style-name="Source_20_Text"><text:span text:style-name="T241"> last_lon</text:span></text:span><text:span text:style-name="Source_20_Text"><text:span text:style-name="T247">,</text:span></text:span><text:span text:style-name="Source_20_Text"><text:span text:style-name="T241"> nb_messages</text:span></text:span></text:p>
      <text:p text:style-name="P215"><text:span text:style-name="Source_20_Text"><text:span text:style-name="T265">FROM</text:span></text:span><text:span text:style-name="Source_20_Text"><text:span text:style-name="T241"> last_position</text:span></text:span></text:p>
      <text:p text:style-name="P216"><text:span text:style-name="Source_20_Text"><text:span text:style-name="T241">EMIT CHANGES</text:span></text:span><text:span text:style-name="Source_20_Text"><text:span text:style-name="T247">;</text:span></text:span></text:p>
      <text:p text:style-name="P350">Observer les lignes se mettre à jour au fil des messages produits.</text:p>
      <text:p text:style-name="P350">Filtrer sur un seul coursier (remplacer <text:span text:style-name="Source_20_Text">courier-0</text:span> par un ID visible dans les logs) :</text:p>
      <text:p text:style-name="P215"><text:span text:style-name="Source_20_Text"><text:span text:style-name="T265">SELECT</text:span></text:span><text:span text:style-name="Source_20_Text"><text:span text:style-name="T241"> *</text:span></text:span></text:p>
      <text:p text:style-name="P215"><text:span text:style-name="Source_20_Text"><text:span text:style-name="T265">FROM</text:span></text:span><text:span text:style-name="Source_20_Text"><text:span text:style-name="T241"> last_position</text:span></text:span></text:p>
      <text:p text:style-name="P215"><text:span text:style-name="Source_20_Text"><text:span text:style-name="T265">WHERE</text:span></text:span><text:span text:style-name="Source_20_Text"><text:span text:style-name="T241"> courierId = </text:span></text:span><text:span text:style-name="Source_20_Text"><text:span text:style-name="T267">'courier-0'</text:span></text:span></text:p>
      <text:p text:style-name="P216"><text:span text:style-name="Source_20_Text"><text:span text:style-name="T241">EMIT CHANGES</text:span></text:span><text:span text:style-name="Source_20_Text"><text:span text:style-name="T247">;</text:span></text:span></text:p>
      <text:p text:style-name="P350" loext:marker-style-name="T114"><text:bookmark-start text:name="__RefHeading___Toc15363_2024334449"/><text:soft-page-break/><text:span text:style-name="T114">Pull Query — snapshot à l'instant T</text:span><text:bookmark-end text:name="__RefHeading___Toc15363_2024334449"/></text:p>
      <text:p text:style-name="P350">Une fois JMeter arrêté, interroger la table pour obtenir l'état courant :</text:p>
      <text:p text:style-name="P215"><text:span text:style-name="Source_20_Text"><text:span text:style-name="T272">-- Dernière position de tous les coursiers</text:span></text:span></text:p>
      <text:p text:style-name="P215"><text:span text:style-name="Source_20_Text"><text:span text:style-name="T265">SELECT</text:span></text:span><text:span text:style-name="Source_20_Text"><text:span text:style-name="T241"> courierId</text:span></text:span><text:span text:style-name="Source_20_Text"><text:span text:style-name="T247">,</text:span></text:span><text:span text:style-name="Source_20_Text"><text:span text:style-name="T241"> last_lat</text:span></text:span><text:span text:style-name="Source_20_Text"><text:span text:style-name="T247">,</text:span></text:span><text:span text:style-name="Source_20_Text"><text:span text:style-name="T241"> last_lon</text:span></text:span><text:span text:style-name="Source_20_Text"><text:span text:style-name="T247">,</text:span></text:span><text:span text:style-name="Source_20_Text"><text:span text:style-name="T241"> nb_messages</text:span></text:span></text:p>
      <text:p text:style-name="P216"><text:span text:style-name="Source_20_Text"><text:span text:style-name="T265">FROM</text:span></text:span><text:span text:style-name="Source_20_Text"><text:span text:style-name="T241"> last_position</text:span></text:span><text:span text:style-name="Source_20_Text"><text:span text:style-name="T247">;</text:span></text:span></text:p>
      <text:p text:style-name="P215"><text:span text:style-name="Source_20_Text"><text:span text:style-name="T272">-- Coursier ayant envoyé le plus de messages</text:span></text:span></text:p>
      <text:p text:style-name="P215"><text:span text:style-name="Source_20_Text"><text:span text:style-name="T265">SELECT</text:span></text:span><text:span text:style-name="Source_20_Text"><text:span text:style-name="T241"> courierId</text:span></text:span><text:span text:style-name="Source_20_Text"><text:span text:style-name="T247">,</text:span></text:span><text:span text:style-name="Source_20_Text"><text:span text:style-name="T241"> nb_messages</text:span></text:span></text:p>
      <text:p text:style-name="P215"><text:span text:style-name="Source_20_Text"><text:span text:style-name="T265">FROM</text:span></text:span><text:span text:style-name="Source_20_Text"><text:span text:style-name="T241"> last_position</text:span></text:span></text:p>
      <text:p text:style-name="P216"><text:span text:style-name="Source_20_Text"><text:span text:style-name="T265">WHERE</text:span></text:span><text:span text:style-name="Source_20_Text"><text:span text:style-name="T241"> nb_messages &gt; </text:span></text:span><text:span text:style-name="Source_20_Text"><text:span text:style-name="T249">50</text:span></text:span><text:span text:style-name="Source_20_Text"><text:span text:style-name="T247">;</text:span></text:span></text:p>
      <text:p text:style-name="P351"><text:span text:style-name="Strong_20_Emphasis_20__28_WW_29_">Pull Query vs Push Query</text:span> : la pull query retourne un snapshot et se termine immédiatement. La push query reste ouverte et pousse les mises à jour en continu.</text:p>
      <text:p text:style-name="P350" loext:marker-style-name="T114"><text:bookmark-start text:name="__RefHeading___Toc15365_2024334449"/><text:span text:style-name="T114">Push Query avec fenêtre temporelle</text:span><text:bookmark-end text:name="__RefHeading___Toc15365_2024334449"/></text:p>
      <text:p text:style-name="P350">Compter les messages par coursier sur des fenêtres glissantes de 1 minute :</text:p>
      <text:p text:style-name="P215"><text:span text:style-name="Source_20_Text"><text:span text:style-name="T265">SELECT</text:span></text:span><text:span text:style-name="Source_20_Text"><text:span text:style-name="T241"> courierId</text:span></text:span><text:span text:style-name="Source_20_Text"><text:span text:style-name="T247">,</text:span></text:span></text:p>
      <text:p text:style-name="P215"><text:span text:style-name="Source_20_Text"><text:span text:style-name="T242"><text:s text:c="7"/></text:span></text:span><text:span text:style-name="Source_20_Text"><text:span text:style-name="T241">WINDOWSTART </text:span></text:span><text:span text:style-name="Source_20_Text"><text:span text:style-name="T265">AS</text:span></text:span><text:span text:style-name="Source_20_Text"><text:span text:style-name="T241"> debut</text:span></text:span><text:span text:style-name="Source_20_Text"><text:span text:style-name="T247">,</text:span></text:span></text:p>
      <text:p text:style-name="P215"><text:span text:style-name="Source_20_Text"><text:span text:style-name="T242"><text:s text:c="7"/></text:span></text:span><text:span text:style-name="Source_20_Text"><text:span text:style-name="T241">WINDOWEND <text:s text:c="2"/></text:span></text:span><text:span text:style-name="Source_20_Text"><text:span text:style-name="T265">AS</text:span></text:span><text:span text:style-name="Source_20_Text"><text:span text:style-name="T241"> fin</text:span></text:span><text:span text:style-name="Source_20_Text"><text:span text:style-name="T247">,</text:span></text:span></text:p>
      <text:p text:style-name="P215"><text:span text:style-name="Source_20_Text"><text:span text:style-name="T242"><text:s text:c="7"/></text:span></text:span><text:span text:style-name="Source_20_Text"><text:span text:style-name="T269">COUNT</text:span></text:span><text:span text:style-name="Source_20_Text"><text:span text:style-name="T247">(</text:span></text:span><text:span text:style-name="Source_20_Text"><text:span text:style-name="T241">*</text:span></text:span><text:span text:style-name="Source_20_Text"><text:span text:style-name="T247">)</text:span></text:span><text:span text:style-name="Source_20_Text"><text:span text:style-name="T241"> <text:s text:c="3"/></text:span></text:span><text:span text:style-name="Source_20_Text"><text:span text:style-name="T265">AS</text:span></text:span><text:span text:style-name="Source_20_Text"><text:span text:style-name="T241"> nb</text:span></text:span></text:p>
      <text:p text:style-name="P215"><text:span text:style-name="Source_20_Text"><text:span text:style-name="T265">FROM</text:span></text:span><text:span text:style-name="Source_20_Text"><text:span text:style-name="T241"> positions</text:span></text:span></text:p>
      <text:p text:style-name="P215"><text:span text:style-name="Source_20_Text"><text:span text:style-name="T241">WINDOW TUMBLING </text:span></text:span><text:span text:style-name="Source_20_Text"><text:span text:style-name="T247">(</text:span></text:span><text:span text:style-name="Source_20_Text"><text:span text:style-name="T241">SIZE </text:span></text:span><text:span text:style-name="Source_20_Text"><text:span text:style-name="T249">1</text:span></text:span><text:span text:style-name="Source_20_Text"><text:span text:style-name="T241"> </text:span></text:span><text:span text:style-name="Source_20_Text"><text:span text:style-name="T265">MINUTE</text:span></text:span><text:span text:style-name="Source_20_Text"><text:span text:style-name="T247">)</text:span></text:span></text:p>
      <text:p text:style-name="P215"><text:span text:style-name="Source_20_Text"><text:span text:style-name="T265">GROUP</text:span></text:span><text:span text:style-name="Source_20_Text"><text:span text:style-name="T241"> </text:span></text:span><text:span text:style-name="Source_20_Text"><text:span text:style-name="T265">BY</text:span></text:span><text:span text:style-name="Source_20_Text"><text:span text:style-name="T241"> courierId</text:span></text:span></text:p>
      <text:p text:style-name="P216"><text:span text:style-name="Source_20_Text"><text:span text:style-name="T241">EMIT CHANGES</text:span></text:span><text:span text:style-name="Source_20_Text"><text:span text:style-name="T247">;</text:span></text:span></text:p>
      <text:p text:style-name="P350">Relancer la production et observer les compteurs se réinitialiser à chaque nouvelle fenêtre.</text:p>
      <text:h text:style-name="Heading_20_3" text:outline-level="3"><text:bookmark-start text:name="__RefHeading___Toc15367_2024334449"/>8.<text:span text:style-name="T264">2.</text:span>4 Pour aller plus loin<text:bookmark-end text:name="__RefHeading___Toc15367_2024334449"/></text:h>
      <text:p text:style-name="P350" loext:marker-style-name="T114"><text:bookmark-start text:name="__RefHeading___Toc15369_2024334449"/><text:span text:style-name="T114">Requête de proximité avec GEO_DISTANCE</text:span><text:bookmark-end text:name="__RefHeading___Toc15369_2024334449"/></text:p>
      <text:p text:style-name="P350">Créer une table des coursiers proches de la Place de la République (48.8672, 2.3628) :</text:p>
      <text:p text:style-name="P215"><text:span text:style-name="Source_20_Text"><text:span text:style-name="T265">CREATE</text:span></text:span><text:span text:style-name="Source_20_Text"><text:span text:style-name="T241"> </text:span></text:span><text:span text:style-name="Source_20_Text"><text:span text:style-name="T265">TABLE</text:span></text:span><text:span text:style-name="Source_20_Text"><text:span text:style-name="T241"> coursiers_proche_republique </text:span></text:span><text:span text:style-name="Source_20_Text"><text:span text:style-name="T265">AS</text:span></text:span></text:p>
      <text:p text:style-name="P215"><text:span text:style-name="Source_20_Text"><text:span text:style-name="T242"><text:s text:c="4"/></text:span></text:span><text:span text:style-name="Source_20_Text"><text:span text:style-name="T265">SELECT</text:span></text:span><text:span text:style-name="Source_20_Text"><text:span text:style-name="T241"> courierId</text:span></text:span><text:span text:style-name="Source_20_Text"><text:span text:style-name="T247">,</text:span></text:span></text:p>
      <text:p text:style-name="P215"><text:span text:style-name="Source_20_Text"><text:span text:style-name="T242"><text:s text:c="11"/></text:span></text:span><text:span text:style-name="Source_20_Text"><text:span text:style-name="T241">last_lat</text:span></text:span><text:span text:style-name="Source_20_Text"><text:span text:style-name="T247">,</text:span></text:span></text:p>
      <text:p text:style-name="P215"><text:span text:style-name="Source_20_Text"><text:span text:style-name="T242"><text:s text:c="11"/></text:span></text:span><text:span text:style-name="Source_20_Text"><text:span text:style-name="T241">last_lon</text:span></text:span><text:span text:style-name="Source_20_Text"><text:span text:style-name="T247">,</text:span></text:span></text:p>
      <text:p text:style-name="P215"><text:span text:style-name="Source_20_Text"><text:span text:style-name="T242"><text:s text:c="11"/></text:span></text:span><text:span text:style-name="Source_20_Text"><text:span text:style-name="T269">ROUND</text:span></text:span><text:span text:style-name="Source_20_Text"><text:span text:style-name="T247">(</text:span></text:span><text:span text:style-name="Source_20_Text"><text:span text:style-name="T241">GEO_DISTANCE</text:span></text:span><text:span text:style-name="Source_20_Text"><text:span text:style-name="T247">(</text:span></text:span><text:span text:style-name="Source_20_Text"><text:span text:style-name="T241">last_lat</text:span></text:span><text:span text:style-name="Source_20_Text"><text:span text:style-name="T247">,</text:span></text:span><text:span text:style-name="Source_20_Text"><text:span text:style-name="T241"> last_lon</text:span></text:span><text:span text:style-name="Source_20_Text"><text:span text:style-name="T247">,</text:span></text:span><text:span text:style-name="Source_20_Text"><text:span text:style-name="T241"> </text:span></text:span><text:span text:style-name="Source_20_Text"><text:span text:style-name="T249">48.8672</text:span></text:span><text:span text:style-name="Source_20_Text"><text:span text:style-name="T247">,</text:span></text:span><text:span text:style-name="Source_20_Text"><text:span text:style-name="T241"> </text:span></text:span><text:span text:style-name="Source_20_Text"><text:span text:style-name="T249">2.3628</text:span></text:span><text:span text:style-name="Source_20_Text"><text:span text:style-name="T247">),</text:span></text:span><text:span text:style-name="Source_20_Text"><text:span text:style-name="T241"> </text:span></text:span><text:span text:style-name="Source_20_Text"><text:span text:style-name="T249">2</text:span></text:span><text:span text:style-name="Source_20_Text"><text:span text:style-name="T247">)</text:span></text:span><text:span text:style-name="Source_20_Text"><text:span text:style-name="T241"> </text:span></text:span><text:span text:style-name="Source_20_Text"><text:span text:style-name="T265">AS</text:span></text:span><text:span text:style-name="Source_20_Text"><text:span text:style-name="T241"> distance_km</text:span></text:span></text:p>
      <text:p text:style-name="P215"><text:span text:style-name="Source_20_Text"><text:span text:style-name="T242"><text:s text:c="4"/></text:span></text:span><text:span text:style-name="Source_20_Text"><text:span text:style-name="T265">FROM</text:span></text:span><text:span text:style-name="Source_20_Text"><text:span text:style-name="T241"> last_position</text:span></text:span></text:p>
      <text:p text:style-name="P215"><text:span text:style-name="Source_20_Text"><text:span text:style-name="T242"><text:s text:c="4"/></text:span></text:span><text:span text:style-name="Source_20_Text"><text:span text:style-name="T265">WHERE</text:span></text:span><text:span text:style-name="Source_20_Text"><text:span text:style-name="T241"> GEO_DISTANCE</text:span></text:span><text:span text:style-name="Source_20_Text"><text:span text:style-name="T247">(</text:span></text:span><text:span text:style-name="Source_20_Text"><text:span text:style-name="T241">last_lat</text:span></text:span><text:span text:style-name="Source_20_Text"><text:span text:style-name="T247">,</text:span></text:span><text:span text:style-name="Source_20_Text"><text:span text:style-name="T241"> last_lon</text:span></text:span><text:span text:style-name="Source_20_Text"><text:span text:style-name="T247">,</text:span></text:span><text:span text:style-name="Source_20_Text"><text:span text:style-name="T241"> </text:span></text:span><text:span text:style-name="Source_20_Text"><text:span text:style-name="T249">48.8672</text:span></text:span><text:span text:style-name="Source_20_Text"><text:span text:style-name="T247">,</text:span></text:span><text:span text:style-name="Source_20_Text"><text:span text:style-name="T241"> </text:span></text:span><text:span text:style-name="Source_20_Text"><text:span text:style-name="T249">2.3628</text:span></text:span><text:span text:style-name="Source_20_Text"><text:span text:style-name="T247">)</text:span></text:span><text:span text:style-name="Source_20_Text"><text:span text:style-name="T241"> &lt;= </text:span></text:span><text:span text:style-name="Source_20_Text"><text:span text:style-name="T249">5.0</text:span></text:span></text:p>
      <text:p text:style-name="P216"><text:span text:style-name="Source_20_Text"><text:span text:style-name="T241">EMIT CHANGES</text:span></text:span><text:span text:style-name="Source_20_Text"><text:span text:style-name="T247">;</text:span></text:span></text:p>
      <text:p text:style-name="P350">Pull query pour voir les coursiers actuellement proches :</text:p>
      <text:p text:style-name="P216"><text:span text:style-name="Source_20_Text"><text:span text:style-name="T265">SELECT</text:span></text:span><text:span text:style-name="Source_20_Text"><text:span text:style-name="T241"> * </text:span></text:span><text:span text:style-name="Source_20_Text"><text:span text:style-name="T265">FROM</text:span></text:span><text:span text:style-name="Source_20_Text"><text:span text:style-name="T241"> coursiers_proche_republique</text:span></text:span><text:span text:style-name="Source_20_Text"><text:span text:style-name="T247">;</text:span></text:span></text:p>
      <text:p text:style-name="P350" loext:marker-style-name="T114"><text:bookmark-start text:name="__RefHeading___Toc15371_2024334449"/><text:span text:style-name="T114">Explorer les objets créés</text:span><text:bookmark-end text:name="__RefHeading___Toc15371_2024334449"/></text:p>
      <text:p text:style-name="P215"><text:span text:style-name="Source_20_Text"><text:span text:style-name="T265">DESCRIBE</text:span></text:span><text:span text:style-name="Source_20_Text"><text:span text:style-name="T241"> </text:span></text:span><text:span text:style-name="Source_20_Text"><text:span text:style-name="T265">EXTENDED</text:span></text:span><text:span text:style-name="Source_20_Text"><text:span text:style-name="T241"> last_position</text:span></text:span><text:span text:style-name="Source_20_Text"><text:span text:style-name="T247">;</text:span></text:span></text:p>
      <text:p text:style-name="P215"><text:span text:style-name="Source_20_Text"><text:span text:style-name="T265">SHOW</text:span></text:span><text:span text:style-name="Source_20_Text"><text:span text:style-name="T241"> QUERIES</text:span></text:span><text:span text:style-name="Source_20_Text"><text:span text:style-name="T247">;</text:span></text:span></text:p>
      <text:p text:style-name="P216"><text:span text:style-name="Source_20_Text"><text:span text:style-name="T265">EXPLAIN</text:span></text:span><text:span text:style-name="Source_20_Text"><text:span text:style-name="T241"> &lt;query_id&gt;</text:span></text:span><text:span text:style-name="Source_20_Text"><text:span text:style-name="T247">;</text:span></text:span></text:p>
      <text:p text:style-name="P350"><text:span text:style-name="Source_20_Text">DESCRIBE EXTENDED</text:span> affiche les statistiques d'exécution de la requête sous-jacente.</text:p>
      <text:p text:style-name="P350"><text:span text:style-name="Source_20_Text">SHOW QUERIES</text:span> liste toutes les requêtes persistantes en cours d'exécution.</text:p>
      <text:p text:style-name="P350" loext:marker-style-name="T114"><text:bookmark-start text:name="__RefHeading___Toc15373_2024334449"/><text:span text:style-name="T114">Nettoyage</text:span><text:bookmark-end text:name="__RefHeading___Toc15373_2024334449"/></text:p>
      <text:p text:style-name="P215"><text:span text:style-name="Source_20_Text"><text:span text:style-name="T265">DROP</text:span></text:span><text:span text:style-name="Source_20_Text"><text:span text:style-name="T241"> </text:span></text:span><text:span text:style-name="Source_20_Text"><text:span text:style-name="T265">TABLE</text:span></text:span><text:span text:style-name="Source_20_Text"><text:span text:style-name="T241"> <text:s/>coursiers_proche_republique </text:span></text:span><text:span text:style-name="Source_20_Text"><text:span text:style-name="T265">DELETE</text:span></text:span><text:span text:style-name="Source_20_Text"><text:span text:style-name="T241"> TOPIC</text:span></text:span><text:span text:style-name="Source_20_Text"><text:span text:style-name="T247">;</text:span></text:span></text:p>
      <text:p text:style-name="P215"><text:span text:style-name="Source_20_Text"><text:span text:style-name="T265">DROP</text:span></text:span><text:span text:style-name="Source_20_Text"><text:span text:style-name="T241"> </text:span></text:span><text:span text:style-name="Source_20_Text"><text:span text:style-name="T265">TABLE</text:span></text:span><text:span text:style-name="Source_20_Text"><text:span text:style-name="T241"> <text:s/>positions_par_secteur <text:s text:c="6"/></text:span></text:span><text:span text:style-name="Source_20_Text"><text:span text:style-name="T265">DELETE</text:span></text:span><text:span text:style-name="Source_20_Text"><text:span text:style-name="T241"> TOPIC</text:span></text:span><text:span text:style-name="Source_20_Text"><text:span text:style-name="T247">;</text:span></text:span></text:p>
      <text:p text:style-name="P215"><text:soft-page-break/><text:span text:style-name="Source_20_Text"><text:span text:style-name="T265">DROP</text:span></text:span><text:span text:style-name="Source_20_Text"><text:span text:style-name="T241"> </text:span></text:span><text:span text:style-name="Source_20_Text"><text:span text:style-name="T265">TABLE</text:span></text:span><text:span text:style-name="Source_20_Text"><text:span text:style-name="T241"> <text:s/>last_position <text:s text:c="14"/></text:span></text:span><text:span text:style-name="Source_20_Text"><text:span text:style-name="T265">DELETE</text:span></text:span><text:span text:style-name="Source_20_Text"><text:span text:style-name="T241"> TOPIC</text:span></text:span><text:span text:style-name="Source_20_Text"><text:span text:style-name="T247">;</text:span></text:span></text:p>
      <text:p text:style-name="P215"><text:span text:style-name="Source_20_Text"><text:span text:style-name="T265">DROP</text:span></text:span><text:span text:style-name="Source_20_Text"><text:span text:style-name="T241"> STREAM positions_paris <text:s text:c="12"/></text:span></text:span><text:span text:style-name="Source_20_Text"><text:span text:style-name="T265">DELETE</text:span></text:span><text:span text:style-name="Source_20_Text"><text:span text:style-name="T241"> TOPIC</text:span></text:span><text:span text:style-name="Source_20_Text"><text:span text:style-name="T247">;</text:span></text:span></text:p>
      <text:p text:style-name="P216"><text:span text:style-name="Source_20_Text"><text:span text:style-name="T265">DROP</text:span></text:span><text:span text:style-name="Source_20_Text"><text:span text:style-name="T241"> STREAM positions</text:span></text:span><text:span text:style-name="Source_20_Text"><text:span text:style-name="T247">;</text:span></text:span></text:p>
      <text:p text:style-name="P243"><text:span text:style-name="T135"/></text:p>
      <text:h text:style-name="P183" text:outline-level="1"><text:span text:style-name="T137"/></text:h>
      <text:h text:style-name="P193" text:outline-level="1"><text:bookmark-start text:name="__RefHeading___Toc20256_2913458575"/><text:span text:style-name="T137">Atelier </text:span><text:span text:style-name="T142">9</text:span><text:span text:style-name="T137">: </text:span><text:span text:style-name="T138">Sécurité</text:span><text:bookmark-end text:name="__RefHeading___Toc20256_2913458575"/></text:h>
      <text:h text:style-name="P197" text:outline-level="2"><text:bookmark-start text:name="__RefHeading___Toc9834_38453672111"/><text:span text:style-name="T134">9</text:span><text:span text:style-name="T129">.</text:span><text:span text:style-name="T131">1</text:span><text:span text:style-name="T129"> </text:span><text:span text:style-name="T132">Séparation des échanges réseaux</text:span><text:bookmark-end text:name="__RefHeading___Toc9834_38453672111"/></text:h>
      <text:p text:style-name="Text_20_body">Créer 3 listeners plain text dénommé <text:span text:style-name="T283">BROKER</text:span>, CONTROLLER et EXTERNAL en leur affectant des ports différents</text:p>
      <text:p text:style-name="Text_20_body">Pour l’instant utiliser des communications en clair <text:span text:style-name="T189">pour les 3</text:span></text:p>
      <text:p text:style-name="P166">Avec un programme précédent utiliser le listener EXTERNAL. <text:span text:style-name="T218">Par exemple :</text:span></text:p>
      <text:p text:style-name="P8">java -jar SpringProducer.jar --spring.kafka.producer.bootstrap-servers=localhost:9094</text:p>
      <text:p text:style-name="P167">et </text:p>
      <text:p text:style-name="P8">java -jar SpringConsumer.jar --spring.kafka.consumer.bootstrap-servers=localhost:9094</text:p>
      <text:p text:style-name="P75"/>
      <text:h text:style-name="P198" text:outline-level="2"><text:bookmark-start text:name="__RefHeading___Toc9834_3845367211"/><text:span text:style-name="T134">9</text:span><text:span text:style-name="T129">.</text:span><text:span text:style-name="T133">2</text:span><text:span text:style-name="T129"> </text:span><text:span text:style-name="T130">Mise en place de SSL</text:span><text:span text:style-name="T131"> pour crypter les données</text:span><text:bookmark-end text:name="__RefHeading___Toc9834_3845367211"/></text:h>
      <text:p text:style-name="P295"><text:span text:style-name="T219">Récupérer le répertoire ssl, </text:span><text:span text:style-name="T284">il contient </text:span><text:span text:style-name="T219">des certificats pour localhost valable jusqu’en 2033</text:span></text:p>
      <text:p text:style-name="P39"/>
      <text:h text:style-name="Heading_20_3" text:outline-level="3"><text:bookmark-start text:name="__RefHeading___Toc16956_1047798942"/><text:span text:style-name="T274">9</text:span>.2.1 SSL appliqué aux communications inter-broker<text:bookmark-end text:name="__RefHeading___Toc16956_1047798942"/></text:h>
      <text:p text:style-name="P291">Arrêter les processus qui se connecter au listener PLAINTEXT</text:p>
      <text:p text:style-name="P41">Configurer <text:span text:style-name="T219">ensuite </text:span>les fichiers <text:span text:style-name="T1">server.properties</text:span></text:p>
      <text:list text:style-name="L16">
        <text:list-item>
          <text:p text:style-name="P286">Ajouter un listener <text:span text:style-name="T15">BROKER</text:span> et l’utiliser pour la communication inter-broker </text:p>
        </text:list-item>
      </text:list>
      <text:p text:style-name="P40"/>
      <text:p text:style-name="P38">Configurer le listener <text:span text:style-name="T232">BROKER (port, etc..)</text:span> et les propriétés SSL suivante dans <text:span text:style-name="T1">server.properties</text:span></text:p>
      <text:p text:style-name="P142">ssl.keystore.location=&lt;<text:span text:style-name="T219">path-to&gt;</text:span>//server.keystore.jks</text:p>
      <text:p text:style-name="P141">ssl.keystore.password=secret</text:p>
      <text:p text:style-name="P141">ssl.key.password=secret</text:p>
      <text:p text:style-name="P141">ssl.truststore.location=&lt;<text:span text:style-name="T219">path-to&gt;</text:span>/server.truststore.jks</text:p>
      <text:p text:style-name="P141">ssl.truststore.password=secret</text:p>
      <text:p text:style-name="P141">ssl.endpoint.identification.algorithm=</text:p>
      <text:p text:style-name="P141">ssl.client.auth=<text:span text:style-name="T285">requested</text:span></text:p>
      <text:p text:style-name="P141"/>
      <text:p text:style-name="P44">Démarrer le cluster kafka <text:span text:style-name="T150">et vérifier son bon démarrages</text:span></text:p>
      <text:p text:style-name="P45"/>
      <text:p text:style-name="P45"><text:span text:style-name="T286">V</text:span>érifier l’affichage du certificat avec :</text:p>
      <text:p text:style-name="Code"><text:span text:style-name="Source_20_Text"><text:span text:style-name="T81">openssl s_client -debug -connect localhost:9</text:span></text:span><text:span text:style-name="Source_20_Text"><text:span text:style-name="T84">0</text:span></text:span><text:span text:style-name="Source_20_Text"><text:span text:style-name="T81">9</text:span></text:span><text:span text:style-name="Source_20_Text"><text:span text:style-name="T82">2</text:span></text:span><text:span text:style-name="Source_20_Text"><text:span text:style-name="T81"> -tls1_</text:span></text:span><text:span text:style-name="Source_20_Text"><text:span text:style-name="T83">3</text:span></text:span></text:p>
      <text:p text:style-name="P44"/>
      <text:h text:style-name="P204" text:outline-level="3"><text:bookmark-start text:name="__RefHeading___Toc16958_1047798942"/><text:span text:style-name="T274">9</text:span>.2.<text:span text:style-name="T274">2</text:span> SSL appliqué aux communications <text:span text:style-name="T219">externes</text:span><text:bookmark-end text:name="__RefHeading___Toc16958_1047798942"/></text:h>
      <text:p text:style-name="P44"/>
      <text:p text:style-name="P44">Utiliser également <text:span text:style-name="T231">le protocole</text:span> SSL pour le listener EXTERNAL, il suffit de modifier la propriété <text:span text:style-name="T10">listener.security.protocol.map</text:span></text:p>
      <text:p text:style-name="P44"/>
      <text:p text:style-name="P298">Faire un démarrage du cluster</text:p>
      <text:p text:style-name="P44"/>
      <text:p text:style-name="P46">Mettre au point un fichier <text:span text:style-name="T10">client-ssl.properties</text:span> avec :</text:p>
      <text:p text:style-name="P50"><text:soft-page-break/>security.protocol=SSL</text:p>
      <text:p text:style-name="P50">ssl.truststore.location=&lt;<text:span text:style-name="T220">path-to&gt;</text:span>/<text:span text:style-name="T220">kafka</text:span>.truststore.jks</text:p>
      <text:p text:style-name="P50">ssl.truststore.password=secret</text:p>
      <text:p text:style-name="P141"/>
      <text:p text:style-name="P47">Vérifier la connexion cliente avec <text:span text:style-name="T221">les outils Kafka</text:span></text:p>
      <text:p text:style-name="Code">$KAFKA_HOME/bin/kafka-console-producer.sh --bootstrap-server localhost:9094 --topic ssl --command-config client-ssl.properties </text:p>
      <text:p text:style-name="P47"/>
      <text:p text:style-name="P173">$KAFKA_<text:span text:style-name="T287">HOME</text:span>/bin/kafka-console-consumer.sh --bootstrap-server localhost:9094 --topic ssl --command .config client-ssl.properties --from-beginning</text:p>
      <text:p text:style-name="P47"/>
      <text:p text:style-name="P48">Ou en utilisant un des programmes clients précédents</text:p>
      <text:p text:style-name="P47"/>
      <text:p text:style-name="P300"/>
      <text:h text:style-name="P198" text:outline-level="2"><text:bookmark-start text:name="__RefHeading___Toc9836_3845367211"/><text:span text:style-name="T274">9</text:span>.3 Authentification via SASL/<text:span text:style-name="T288">oAuth2</text:span><text:span text:style-name="T146"> </text:span><text:bookmark-end text:name="__RefHeading___Toc9836_3845367211"/></text:h>
      <text:p text:style-name="P301"/>
      <text:h text:style-name="P205" text:outline-level="3"><text:bookmark-start text:name="__RefHeading___Toc16960_1047798942 Copie 1"/><text:span text:style-name="T274">9</text:span>.3.1 <text:span text:style-name="T288">Démarrage Keycloak</text:span><text:bookmark-end text:name="__RefHeading___Toc16960_1047798942 Copie 1"/></text:h>
      <text:p text:style-name="Text_20_body">Le docker compose fourni démarre un serveur Keycloak ou est défini un realm kafka comprendant :</text:p>
      <text:list text:style-name="L25">
        <text:list-item>
          <text:p text:style-name="P318">Un client kafka-broker (mdp broker-secret) destiné à être utilisé par les brokers et par les clients d’administration (redpanda et schema-registry)</text:p>
        </text:list-item>
        <text:list-item>
          <text:p text:style-name="P318">Un client kafka-producer-client (mdp producer-secret) destiné à un client producteur </text:p>
        </text:list-item>
        <text:list-item>
          <text:p text:style-name="P318">Un client kafka-consumer-client (mdp consumer-secret) destiné à un client producteur </text:p>
        </text:list-item>
      </text:list>
      <text:p text:style-name="Text_20_body"/>
      <text:p text:style-name="Text_20_body">Démarrer via :</text:p>
      <text:p text:style-name="commande">docker compose -f docker-compose-keycloak.yml up -d</text:p>
      <text:p text:style-name="Text_20_body"/>
      <text:p text:style-name="Text_20_body">Accéder à l’interface d’administration <text:a xlink:type="simple" xlink:href="http://localhost:9090/" text:style-name="Internet_20_link" text:visited-style-name="Visited_20_Internet_20_Link">http://localhost:9090</text:a> admin/admin et visualiser le realm</text:p>
      <text:p text:style-name="P302"/>
      <text:h text:style-name="Heading_20_3" text:outline-level="3"><text:bookmark-start text:name="__RefHeading___Toc16960_1047798942"/><text:span text:style-name="T274">9</text:span>.3.<text:span text:style-name="T289">2</text:span> <text:span text:style-name="T289">Démarrage cluster</text:span><text:bookmark-end text:name="__RefHeading___Toc16960_1047798942"/></text:h>
      <text:p text:style-name="P301"/>
      <text:p text:style-name="P303">Ajouter dans la configuration des brokers la configuration oAuth :</text:p>
      <text:p text:style-name="P303"/>
      <text:p text:style-name="P255">############################# SASL Global #############################</text:p>
      <text:p text:style-name="P229">sasl.mechanism.inter.broker.protocol=<text:span text:style-name="T291">OAUTHBEARER</text:span></text:p>
      <text:p text:style-name="P229">sasl.enabled.mechanisms=<text:span text:style-name="T291">OAUTHBEARER</text:span></text:p>
      <text:p text:style-name="P256"/>
      <text:p text:style-name="P254">############################# OAUTHBEARER endpoints (global) #############################</text:p>
      <text:p text:style-name="P229">sasl.oauthbearer.token.endpoint.url=<text:span text:style-name="T291">http://localhost:9090/realms/kafka/protocol/openid-connect/token</text:span></text:p>
      <text:p text:style-name="P229"><text:soft-page-break/>sasl.oauthbearer.jwks.endpoint.url=<text:span text:style-name="T291">http://localhost:9090/realms/kafka/protocol/openid-connect/certs</text:span></text:p>
      <text:p text:style-name="P229">sasl.oauthbearer.expected.issuer=<text:span text:style-name="T291">http://localhost:9090/realms/kafka</text:span></text:p>
      <text:p text:style-name="P229">sasl.oauthbearer.expected.audience=<text:span text:style-name="T291">kafka-broker</text:span></text:p>
      <text:p text:style-name="P256"/>
      <text:p text:style-name="P254">############################# BROKER listener (inter-broker SASL/OAUTHBEARER) #############################</text:p>
      <text:p text:style-name="P229">listener.name.broker.oauthbearer.sasl.jaas.config=<text:span text:style-name="T291">org.apache.kafka.common.security.oauthbearer.OAuthBearerLoginModule required;</text:span></text:p>
      <text:p text:style-name="P229">listener.name.broker.oauthbearer.sasl.login.callback.handler.class=<text:span text:style-name="T291">org.apache.kafka.common.security.oauthbearer.OAuthBearerLoginCallbackHandler</text:span></text:p>
      <text:p text:style-name="P229">listener.name.broker.oauthbearer.sasl.server.callback.handler.class=<text:span text:style-name="T291">org.apache.kafka.common.security.oauthbearer.OAuthBearerValidatorCallbackHandler</text:span></text:p>
      <text:p text:style-name="P256"/>
      <text:p text:style-name="P254"># Credentials inter-broker (Kafka 4.x — remplace les options JAAS dépréciées)</text:p>
      <text:p text:style-name="P229">listener.name.broker.sasl.oauthbearer.client.credentials.client.id=<text:span text:style-name="T291">kafka-broker</text:span></text:p>
      <text:p text:style-name="P229">listener.name.broker.sasl.oauthbearer.client.credentials.client.secret=<text:span text:style-name="T291">broker-secret</text:span></text:p>
      <text:p text:style-name="P229">listener.name.broker.sasl.oauthbearer.scope=<text:span text:style-name="T291">openid</text:span></text:p>
      <text:p text:style-name="P256"/>
      <text:p text:style-name="P254">############################# EXTERNAL listener (clients SASL_SSL/OAUTHBEARER) #############################</text:p>
      <text:p text:style-name="P229">listener.name.external.oauthbearer.sasl.jaas.config=<text:span text:style-name="T291">org.apache.kafka.common.security.oauthbearer.OAuthBearerLoginModule required;</text:span></text:p>
      <text:p text:style-name="P229">listener.name.external.oauthbearer.sasl.server.callback.handler.class=<text:span text:style-name="T291">org.apache.kafka.common.security.oauthbearer.OAuthBearerValidatorCallbackHandler</text:span></text:p>
      <text:p text:style-name="P294"/>
      <text:p text:style-name="P49">Modifier le script de démarrage afin qu’il <text:span text:style-name="T290">autorise la connexion au serveur Keycloak </text:span>:</text:p>
      <text:p text:style-name="P174"><text:span text:style-name="T237">export</text:span> KAFKA_OPTS=<text:span text:style-name="T291">"-Dorg.apache.kafka.sasl.oauthbearer.allowed.urls=http://localhost:9090/realms/kafka/protocol/openid-connect/certs,http://localhost:9090/realms/kafka/protocol/openid-connect/token"</text:span> </text:p>
      <text:p text:style-name="P230"/>
      <text:p text:style-name="P49">Redémarrer le cluster et vérifier son bon démarrage</text:p>
      <text:p text:style-name="P319"/>
      <text:h text:style-name="P206" text:outline-level="3"><text:bookmark-start text:name="__RefHeading___Toc16960_1047798942 Copie 2"/><text:span text:style-name="T274">9</text:span>.3.<text:span text:style-name="T289">2</text:span> <text:span text:style-name="T289">Démarrage </text:span><text:span text:style-name="T292">outils connexes</text:span><text:bookmark-end text:name="__RefHeading___Toc16960_1047798942 Copie 2"/></text:h>
      <text:p text:style-name="P320">Visualiser le fichier <text:span text:style-name="T293">docker-compose-kafka-tools.yml et regarder la configuration.</text:span></text:p>
      <text:p text:style-name="P321">Démarre la stack via :</text:p>
      <text:p text:style-name="commande">docker compose -f <text:span text:style-name="T294">docker-compose-kafka-tools up -d </text:span></text:p>
      <text:p text:style-name="P321"/>
      <text:p text:style-name="P322">Vérifier le bon démarrage des containers et se connecter sur la console redapanda</text:p>
      <text:p text:style-name="P322"/>
      <text:h text:style-name="Heading_20_3" text:outline-level="3"><text:bookmark-start text:name="__RefHeading___Toc16962_1047798942"/><text:span text:style-name="T274">9</text:span>.3.2 Authentification client<text:bookmark-end text:name="__RefHeading___Toc16962_1047798942"/></text:h>
      <text:p text:style-name="Standard"/>
      <text:p text:style-name="P136">Configurer le listener EXTERNAL pour qu’il utilise également SASL_SSL comme protocole</text:p>
      <text:p text:style-name="P136"/>
      <text:p text:style-name="P257">Mettre à jour le fichier <text:span text:style-name="T10">client-ssl.properties</text:span> comme suit :</text:p>
      <text:list text:style-name="L26">
        <text:list-item>
          <text:p text:style-name="P258"><text:span text:style-name="T294">P</text:span>asser le security.protocol à SASL_SSL</text:p>
        </text:list-item>
        <text:list-item>
          <text:p text:style-name="P258">Le mécanisme à OAUTHBEARER</text:p>
        </text:list-item>
        <text:list-item>
          <text:p text:style-name="P258"><text:soft-page-break/>Le Jaas Config à org.apache.kafka.common.security.oauthbearer.OauthBearerLoginModule avec le clientId de kafka-producer-client </text:p>
        </text:list-item>
        <text:list-item>
          <text:p text:style-name="P258">La classe handler à org.apache.kafka.common.security.oauthbearer.OauthBearerLoginCallbackHandler</text:p>
        </text:list-item>
        <text:list-item>
          <text:p text:style-name="P258">Et la propriété <text:span text:style-name="T61">sasl.oauthbearer.token.endpoint.url</text:span></text:p>
        </text:list-item>
      </text:list>
      <text:p text:style-name="P95"/>
      <text:p text:style-name="P95"/>
      <text:p text:style-name="Standard">Tester avec :</text:p>
      <text:p text:style-name="P175"><text:span text:style-name="Source_20_Text">export KAFKA_OPTS="-Dorg.apache.kafka.sasl.oauthbearer.allowed.urls=http://localhost:9090/realms/kafka/protocol/openid-connect/token"</text:span></text:p>
      <text:p text:style-name="P175">$KAFKA_HOME/bin/kafka-console-producer.sh --bootstrap-server localhost:<text:span text:style-name="T222">9094</text:span> --topic ssl --<text:span text:style-name="T294">command-</text:span>config client-ssl.properties </text:p>
      <text:p text:style-name="P51"/>
      <text:h text:style-name="Heading_20_2" text:outline-level="2"><text:bookmark-start text:name="__RefHeading___Toc9891_3845367211"/><text:span text:style-name="T274">9</text:span>.4 ACL<text:bookmark-end text:name="__RefHeading___Toc9891_3845367211"/></text:h>
      <text:p text:style-name="Text_20_body"/>
      <text:h text:style-name="Heading_20_3" text:outline-level="3"><text:bookmark-start text:name="__RefHeading___Toc16964_1047798942"/><text:span text:style-name="T274">9</text:span>.4.1 Activation des ACLs<text:bookmark-end text:name="__RefHeading___Toc16964_1047798942"/></text:h>
      <text:p text:style-name="P323">Modifier <text:span text:style-name="Source_20_Text">serverN.properties</text:span> sur les <text:span text:style-name="Strong_20_Emphasis">trois brokers</text:span> en ajoutant :</text:p>
      <text:p text:style-name="P305"/>
      <text:p text:style-name="P214"><text:span text:style-name="Source_20_Text"><text:span text:style-name="T273">############################# ACL #############################</text:span></text:span></text:p>
      <text:p text:style-name="P214"><text:span text:style-name="Source_20_Text"><text:span text:style-name="T297">authorizer.class.name</text:span></text:span><text:span text:style-name="Source_20_Text"><text:span text:style-name="T246">=</text:span></text:span><text:span text:style-name="Source_20_Text"><text:span text:style-name="T268">org.apache.kafka.metadata.authorizer.StandardAuthorizer</text:span></text:span></text:p>
      <text:p text:style-name="P211"/>
      <text:p text:style-name="P214"><text:span text:style-name="Source_20_Text"><text:span text:style-name="T273"># Volontairement à false : aucune opération n'est autorisée sans ACL explicite</text:span></text:span></text:p>
      <text:p text:style-name="P214"><text:span text:style-name="Source_20_Text"><text:span text:style-name="T297">allow.everyone.if.no.acl.found</text:span></text:span><text:span text:style-name="Source_20_Text"><text:span text:style-name="T246">=</text:span></text:span><text:span text:style-name="Source_20_Text"><text:span text:style-name="T268">false</text:span></text:span></text:p>
      <text:p text:style-name="P211"/>
      <text:p text:style-name="P214"><text:span text:style-name="Source_20_Text"><text:span text:style-name="T273"># Le client OAuth utilisé pour les communications inter-broker et controller</text:span></text:span></text:p>
      <text:p text:style-name="P214"><text:span text:style-name="Source_20_Text"><text:span text:style-name="T297">super.users</text:span></text:span><text:span text:style-name="Source_20_Text"><text:span text:style-name="T246">=</text:span></text:span><text:span text:style-name="Source_20_Text"><text:span text:style-name="T268">User:kafka-broker</text:span></text:span></text:p>
      <text:p text:style-name="P211"/>
      <text:p text:style-name="P214"><text:span text:style-name="Source_20_Text"><text:span text:style-name="T273"># Mapping du principal : on utilise le claim 'azp' (= client_id Keycloak)</text:span></text:span></text:p>
      <text:p text:style-name="P213"><text:span text:style-name="Source_20_Text"><text:span text:style-name="T297">sasl.oauthbearer.sub.claim.name</text:span></text:span><text:span text:style-name="Source_20_Text"><text:span text:style-name="T246">=</text:span></text:span><text:span text:style-name="Source_20_Text"><text:span text:style-name="T268">azp</text:span></text:span></text:p>
      <text:p text:style-name="P323"/>
      <text:h text:style-name="P208" text:outline-level="3"><text:bookmark-start text:name="__RefHeading___Toc21110_2913458575"/>9.4.2 Authentification du contrôleurs<text:bookmark-end text:name="__RefHeading___Toc21110_2913458575"/></text:h>
      <text:p text:style-name="P324"><text:span text:style-name="T56">Dés lors que l’on active les ACLs, le contrôleur doit s’authentifier et avoir les droits super.users</text:span></text:p>
      <text:list text:style-name="L27">
        <text:list-item>
          <text:p text:style-name="P325"><text:span text:style-name="T56">Changer le protocole du listener CONTROLLER en </text:span><text:span text:style-name="T55">SASL_PLAINTEXT</text:span></text:p>
        </text:list-item>
        <text:list-item>
          <text:p text:style-name="P326"><text:span text:style-name="T56">A</text:span><text:span text:style-name="T55">jouter la config oauth suivante</text:span></text:p>
        </text:list-item>
      </text:list>
      <text:p text:style-name="P324"><text:span text:style-name="T56"><text:line-break/></text:span><text:span text:style-name="T271">############################# SASL CONTROLLER #############################</text:span> <text:span text:style-name="T296">sasl.mechanism.controller.protocol</text:span><text:span text:style-name="T245">=</text:span><text:span text:style-name="T266">OAUTHBEARER</text:span> <text:span text:style-name="T296">listener.name.controller.sasl.enabled.mechanisms</text:span><text:span text:style-name="T245">=</text:span><text:span text:style-name="T266">OAUTHBEARER</text:span> <text:span text:style-name="T271"># JAAS du CONTROLLER (sur une seule ligne !)</text:span> <text:span text:style-name="T296">listener.name.controller.oauthbearer.sasl.jaas.config</text:span><text:span text:style-name="T245">=</text:span><text:span text:style-name="T266">org.apache.kafka.common.security.oauthbearer.OAuthBearerLoginModule required;</text:span> <text:span text:style-name="T296">listener.name.controller.oauthbearer.sasl.login.callback.handler.class</text:span><text:span text:style-name="T245">=</text:span><text:span text:style-name="T266">org.apache.kafka.common.security.oauthbearer.OAuthBearerLoginCallbackHandler</text:span> <text:span text:style-name="T296">listener.name.controller.oauthbearer.sasl.server.callback.handler.class</text:span><text:span text:style-name="T245">=</text:span><text:span text:style-name="T266">org.apache.kafka.common.se</text:span><text:soft-page-break/><text:span text:style-name="T266">curity.oauthbearer.OAuthBearerValidatorCallbackHandler</text:span> <text:span text:style-name="T271"># Credentials utilisés par le CONTROLLER pour s'authentifier auprès de Keycloak</text:span> <text:span text:style-name="T296">listener.name.controller.sasl.oauthbearer.client.credentials.client.id</text:span><text:span text:style-name="T245">=</text:span><text:span text:style-name="T266">kafka-broker</text:span> <text:span text:style-name="T296">listener.name.controller.sasl.oauthbearer.client.credentials.client.secret</text:span><text:span text:style-name="T245">=</text:span><text:span text:style-name="T266">broker-secret</text:span> <text:span text:style-name="T296">listener.name.controller.sasl.oauthbearer.scope</text:span><text:span text:style-name="T245">=</text:span><text:span text:style-name="T266">openid</text:span></text:p>
      <text:p text:style-name="P231"/>
      <text:p text:style-name="P145">Démarrer le cluster <text:span text:style-name="T298">et vérifier le bon démarrage</text:span></text:p>
      <text:p text:style-name="P145"/>
      <text:p text:style-name="P329">Vérifier dans redpanda console que vous avez bien accès à la configuration des ACLs</text:p>
      <text:h text:style-name="P207" text:outline-level="3"><text:bookmark text:name="__RefHeading___Toc16966_1047798942 Copie 1"/></text:h>
      <text:h text:style-name="Heading_20_3" text:outline-level="3"><text:bookmark-start text:name="__RefHeading___Toc16966_1047798942"/><text:span text:style-name="T274">9</text:span><text:span text:style-name="T223">.4.</text:span><text:span text:style-name="T299">3</text:span><text:span text:style-name="T223"> </text:span><text:span text:style-name="T299">Vérification et d</text:span>éfinition <text:span text:style-name="T299">des </text:span>ACLs<text:bookmark-end text:name="__RefHeading___Toc16966_1047798942"/></text:h>
      <text:p text:style-name="P328">Mettre en place <text:span text:style-name="T10">client-producer.properties</text:span> qui contient l’identification de <text:span text:style-name="T10">kafka-producer-client</text:span></text:p>
      <text:p text:style-name="Code">security.protocol=SASL_SSL<text:line-break/>ssl.truststore.location=/home/dthibau/Formations/Kafka/kafka-solutions/ssl/mount/kafka.truststore.jks<text:line-break/>ssl.truststore.password=secret<text:line-break/>ssl.endpoint.identification.algorithm=</text:p>
      <text:p text:style-name="Code"/>
      <text:p text:style-name="Code">sasl.mechanism=OAUTHBEARER<text:line-break/>sasl.jaas.config=org.apache.kafka.common.security.oauthbearer.OAuthBearerLoginModule required clientId="kafka-producer-client" clientSecret="producer-secret" scope="openid";<text:line-break/>sasl.login.callback.handler.class=org.apache.kafka.common.security.oauthbearer.OauthBearerLoginCallbackHandler<text:line-break/>sasl.oauthbearer.token.endpoint.url=<text:a xlink:type="simple" xlink:href="http://localhost:9090/realms/kafka/protocol/openid-connect/token" text:style-name="Internet_20_link" text:visited-style-name="Visited_20_Internet_20_Link">http://localhost:9090/realms/kafka/protocol/openid-connect/token</text:a></text:p>
      <text:p text:style-name="P328"/>
      <text:p text:style-name="P328">Essayer de produire des messages :<text:line-break/></text:p>
      <text:p text:style-name="Code">export KAFKA_OPTS="-Dorg.apache.kafka.sasl.oauthbearer.allowed.urls=http://localhost:9090/realms/kafka/protocol/openid-connect/token,http://localhost:9090/realms/kafka/protocol/openid-connect/certs"</text:p>
      <text:p text:style-name="Code"/>
      <text:p text:style-name="Code">$KAFKA_HOME/bin/kafka-console-producer.sh \<text:line-break/> --bootstrap-server localhost:909<text:span text:style-name="T302">4</text:span> \<text:line-break/> --topic ssl \<text:line-break/> --<text:span text:style-name="T301">command-</text:span>config client-producer.properties</text:p>
      <text:p text:style-name="P328"/>
      <text:p text:style-name="P330">Vérifier que ce n’est pas possible, vous pouvez également regarder les logs de <text:span text:style-name="T10">kafka-authorizer.log</text:span></text:p>
      <text:p text:style-name="commande">cat $KAFKA_HOME/logs/kafka-authorizer.log </text:p>
      <text:p text:style-name="P330"/>
      <text:p text:style-name="P145">Définir une ACL via Redpanda Console <text:span text:style-name="T224">ou via </text:span><text:span text:style-name="T6">$KAFKA_</text:span><text:span text:style-name="T9">HOME</text:span><text:span text:style-name="T6">/bin/kafka-acls.sh</text:span><text:span text:style-name="T224"> </text:span><text:span text:style-name="T299">autorisant kafka-producer-client à produire sur le topic ssl </text:span></text:p>
      <text:p text:style-name="P145"><text:soft-page-break/></text:p>
      <text:p text:style-name="Code">$KAFKA_HOME/bin/kafka-acls.sh \</text:p>
      <text:p text:style-name="Code"><text:s text:c="2"/>--bootstrap-server localhost:909<text:span text:style-name="T304">2</text:span> \</text:p>
      <text:p text:style-name="Code"><text:s text:c="2"/>--command-config client-<text:span text:style-name="T303">admin-</text:span>ssl.properties \</text:p>
      <text:p text:style-name="Code"><text:s text:c="2"/>--add \</text:p>
      <text:p text:style-name="Code"><text:s text:c="2"/>--allow-principal User:kafka-producer-client \</text:p>
      <text:p text:style-name="Code"><text:s text:c="2"/>--operation Write \</text:p>
      <text:p text:style-name="Code"><text:s text:c="2"/>--operation Describe \</text:p>
      <text:p text:style-name="Code"><text:s text:c="2"/>--topic ssl</text:p>
      <text:p text:style-name="P145"/>
      <text:p text:style-name="P323"><text:span text:style-name="Source_20_Text"><text:span text:style-name="T300">Réessayer de produire des messages</text:span></text:span></text:p>
      <text:h text:style-name="P199" text:outline-level="2"><text:bookmark-start text:name="__RefHeading___Toc16975_1047798942"/><text:span text:style-name="T274">9</text:span>.<text:span text:style-name="T236">5</text:span> Quota<text:bookmark-end text:name="__RefHeading___Toc16975_1047798942"/></text:h>
      <text:p text:style-name="P308"><text:bookmark-start text:name="__RefHeading___Toc21112_2913458575"/>Objectifs<text:bookmark-end text:name="__RefHeading___Toc21112_2913458575"/></text:p>
      <text:list text:style-name="L28">
        <text:list-item>
          <text:p text:style-name="P332">Définir un quota de bande passante sur l'utilisateur <text:span text:style-name="Source_20_Text">kafka-producer-client</text:span> </text:p>
        </text:list-item>
        <text:list-item>
          <text:p text:style-name="P332">Observer l'effet du throttling lors d'une production intensive </text:p>
        </text:list-item>
        <text:list-item>
          <text:p text:style-name="P331">Modifier puis supprimer le quota dynamiquement </text:p>
        </text:list-item>
      </text:list>
      <text:p text:style-name="Horizontal_20_Line"/>
      <text:h text:style-name="Heading_20_3" text:outline-level="3"><text:bookmark-start text:name="__RefHeading___Toc21114_2913458575"/>9.5.1 Définition d'un quota pour <text:span text:style-name="Source_20_Text">kafka-producer-client</text:span><text:bookmark-end text:name="__RefHeading___Toc21114_2913458575"/></text:h>
      <text:p text:style-name="P305"/>
      <text:p text:style-name="Code"><text:span text:style-name="Source_20_Text">$KAFKA_HOME/bin/kafka-configs.sh \</text:span></text:p>
      <text:p text:style-name="Code"><text:span text:style-name="Source_20_Text"><text:s text:c="2"/>--bootstrap-server localhost:9094 \</text:span></text:p>
      <text:p text:style-name="Code"><text:span text:style-name="Source_20_Text"><text:s text:c="2"/>--command-config client-</text:span><text:span text:style-name="Source_20_Text"><text:span text:style-name="T305">admin-</text:span></text:span><text:span text:style-name="Source_20_Text">ssl.properties \</text:span></text:p>
      <text:p text:style-name="Code"><text:span text:style-name="Source_20_Text"><text:s text:c="2"/>--alter \</text:span></text:p>
      <text:p text:style-name="Code"><text:span text:style-name="Source_20_Text"><text:s text:c="2"/>--add-config 'producer_byte_rate=1024,consumer_byte_rate=1024' \</text:span></text:p>
      <text:p text:style-name="Code"><text:span text:style-name="Source_20_Text"><text:s text:c="2"/>--entity-type users --entity-name kafka-producer-client</text:span></text:p>
      <text:p text:style-name="Text_20_body">→ Limite : 1 Ko/s en production et en consommation. Volontairement très bas pour rendre l'effet visible.</text:p>
      <text:p text:style-name="Text_20_body">Vérifier :</text:p>
      <text:p text:style-name="P175"><text:span text:style-name="Source_20_Text">$KAFKA_HOME/bin/kafka-configs.sh \</text:span></text:p>
      <text:p text:style-name="P175"><text:span text:style-name="Source_20_Text"><text:s text:c="2"/>--bootstrap-server localhost:9094 \</text:span></text:p>
      <text:p text:style-name="P176"><text:span text:style-name="Source_20_Text"><text:s text:c="2"/>--command-config client-</text:span><text:span text:style-name="Source_20_Text"><text:span text:style-name="T305">admin-</text:span></text:span><text:span text:style-name="Source_20_Text">ssl.properties \</text:span></text:p>
      <text:p text:style-name="P175"><text:span text:style-name="Source_20_Text"><text:s text:c="2"/>--describe \</text:span></text:p>
      <text:p text:style-name="P175"><text:span text:style-name="Source_20_Text"><text:s text:c="2"/>--entity-type users --entity-name kafka-producer-client</text:span></text:p>
      <text:p text:style-name="P175"><text:span text:style-name="Source_20_Text"/></text:p>
      <text:h text:style-name="Heading_20_3" text:outline-level="3"><text:bookmark-start text:name="__RefHeading___Toc21116_2913458575"/>9.5.2 Tester l'effet du quota<text:bookmark-end text:name="__RefHeading___Toc21116_2913458575"/></text:h>
      <text:p text:style-name="Text_20_body">Lancer une production intensive avec <text:span text:style-name="Source_20_Text">kafka-producer-perf-test.sh</text:span> :</text:p>
      <text:p text:style-name="P175"><text:soft-page-break/><text:span text:style-name="Source_20_Text">$KAFKA_HOME/bin/kafka-producer-perf-test.sh \</text:span></text:p>
      <text:p text:style-name="P175"><text:span text:style-name="Source_20_Text"><text:s text:c="2"/>--topic ssl \</text:span></text:p>
      <text:p text:style-name="P175"><text:span text:style-name="Source_20_Text"><text:s text:c="2"/>--num-records 10000 \</text:span></text:p>
      <text:p text:style-name="P175"><text:span text:style-name="Source_20_Text"><text:s text:c="2"/>--record-size 1024 \</text:span></text:p>
      <text:p text:style-name="P175"><text:span text:style-name="Source_20_Text"><text:s text:c="2"/>--throughput -1 \</text:span></text:p>
      <text:p text:style-name="P175"><text:span text:style-name="Source_20_Text"><text:s text:c="2"/>--producer.config client-producer.properties \</text:span></text:p>
      <text:p text:style-name="P175"><text:span text:style-name="Source_20_Text"><text:s text:c="2"/>--producer-props bootstrap.servers=localhost:9094</text:span></text:p>
      <text:p text:style-name="Text_20_body">Le <text:span text:style-name="Source_20_Text">--throughput -1</text:span> signifie "sans limite côté client" : on laisse le quota broker se manifester.</text:p>
      <text:p text:style-name="Text_20_body">Observer dans la sortie les colonnes :</text:p>
      <text:list text:style-name="L29">
        <text:list-item>
          <text:p text:style-name="P334"><text:span text:style-name="Strong_20_Emphasis">records/sec</text:span> : le débit réel observé, plafonné par le quota </text:p>
        </text:list-item>
        <text:list-item>
          <text:p text:style-name="P334"><text:span text:style-name="Strong_20_Emphasis">avg latency</text:span> et <text:span text:style-name="Strong_20_Emphasis">max latency</text:span> : artificiellement élevées à cause du throttling </text:p>
        </text:list-item>
        <text:list-item>
          <text:p text:style-name="P333"><text:span text:style-name="Strong_20_Emphasis">produce throttle time</text:span> : temps que le broker a fait attendre le client </text:p>
        </text:list-item>
      </text:list>
      <text:h text:style-name="Heading_20_3" text:outline-level="3"><text:bookmark-start text:name="__RefHeading___Toc21118_2913458575"/>9.5.3 Modifier dynamiquement le quota<text:bookmark-end text:name="__RefHeading___Toc21118_2913458575"/></text:h>
      <text:p text:style-name="Text_20_body">Augmenter à 1 Mo/s sans redémarrer le cluster :</text:p>
      <text:p text:style-name="P305"/>
      <text:p text:style-name="P175"><text:span text:style-name="Source_20_Text">$KAFKA_HOME/bin/kafka-configs.sh \</text:span></text:p>
      <text:p text:style-name="P175"><text:span text:style-name="Source_20_Text"><text:s text:c="2"/>--bootstrap-server localhost:9094 \</text:span></text:p>
      <text:p text:style-name="P176"><text:span text:style-name="Source_20_Text"><text:s text:c="2"/>--command-config client-</text:span><text:span text:style-name="Source_20_Text"><text:span text:style-name="T305">admin-ssl</text:span></text:span><text:span text:style-name="Source_20_Text">.properties \</text:span></text:p>
      <text:p text:style-name="P175"><text:span text:style-name="Source_20_Text"><text:s text:c="2"/>--alter \</text:span></text:p>
      <text:p text:style-name="P175"><text:span text:style-name="Source_20_Text"><text:s text:c="2"/>--add-config 'producer_byte_rate=1048576,consumer_byte_rate=1048576' \</text:span></text:p>
      <text:p text:style-name="P175"><text:span text:style-name="Source_20_Text"><text:s text:c="2"/>--entity-type users --entity-name kafka-producer-client</text:span></text:p>
      <text:p text:style-name="Text_20_body">Relancer la même commande <text:span text:style-name="Source_20_Text">kafka-producer-perf-test.sh</text:span> → observer que le débit a fortement augmenté.</text:p>
      <text:h text:style-name="Heading_20_3" text:outline-level="3"><text:bookmark-start text:name="__RefHeading___Toc21120_2913458575"/>9.5.4 Supprimer le quota<text:bookmark-end text:name="__RefHeading___Toc21120_2913458575"/></text:h>
      <text:p text:style-name="P305"/>
      <text:p text:style-name="P175"><text:span text:style-name="Source_20_Text">$KAFKA_HOME/bin/kafka-configs.sh \</text:span></text:p>
      <text:p text:style-name="P175"><text:span text:style-name="Source_20_Text"><text:s text:c="2"/>--bootstrap-server localhost:9094 \</text:span></text:p>
      <text:p text:style-name="P176"><text:span text:style-name="Source_20_Text"><text:s text:c="2"/>--command-config client-</text:span><text:span text:style-name="Source_20_Text"><text:span text:style-name="T305">admin-</text:span></text:span><text:span text:style-name="Source_20_Text">ssl.properties \</text:span></text:p>
      <text:p text:style-name="P175"><text:span text:style-name="Source_20_Text"><text:s text:c="2"/>--alter \</text:span></text:p>
      <text:p text:style-name="P175"><text:span text:style-name="Source_20_Text"><text:s text:c="2"/>--delete-config 'producer_byte_rate,consumer_byte_rate' \</text:span></text:p>
      <text:p text:style-name="P175"><text:span text:style-name="Source_20_Text"><text:s text:c="2"/>--entity-type users --entity-name kafka-producer-client</text:span></text:p>
      <text:p text:style-name="Text_20_body">Vérifier qu'il n'y a plus de quota :</text:p>
      <text:p text:style-name="P305"/>
      <text:p text:style-name="Code"><text:span text:style-name="Source_20_Text">$KAFKA_HOME/bin/kafka-configs.sh \</text:span></text:p>
      <text:p text:style-name="Code"><text:span text:style-name="Source_20_Text"><text:s text:c="2"/>--bootstrap-server localhost:9094 \</text:span></text:p>
      <text:p text:style-name="P177"><text:span text:style-name="Source_20_Text"><text:s text:c="2"/>--command-config client-</text:span><text:span text:style-name="Source_20_Text"><text:span text:style-name="T305">admin-</text:span></text:span><text:span text:style-name="Source_20_Text">ssl.properties \</text:span></text:p>
      <text:p text:style-name="Code"><text:soft-page-break/><text:span text:style-name="Source_20_Text"><text:s text:c="2"/>--describe \</text:span></text:p>
      <text:p text:style-name="Code"><text:span text:style-name="Source_20_Text"><text:s text:c="2"/>--entity-type users --entity-name kafka-producer-client</text:span></text:p>
      <text:h text:style-name="P190" text:outline-level="1"><text:bookmark-start text:name="__RefHeading___Toc9828_3845367211"/>Atelier <text:span text:style-name="T275">10</text:span> : <text:span text:style-name="T225">Exploitation</text:span><text:bookmark-end text:name="__RefHeading___Toc9828_3845367211"/></text:h>
      <text:p text:style-name="P77"><text:span text:style-name="T72">Exécuter les producteurs et les consommateurs</text:span><text:span text:style-name="T70"> </text:span><text:span text:style-name="T71">pendant les opérations </text:span><text:span text:style-name="T73">d’administration</text:span></text:p>
      <text:h text:style-name="P202" text:outline-level="2"><text:bookmark-start text:name="__RefHeading___Toc5300_3700672249"/><text:span text:style-name="T276">10</text:span><text:span text:style-name="T192">.</text:span><text:span text:style-name="T276">1</text:span><text:span text:style-name="T192"> </text:span>Rétention <text:span text:style-name="T276">et segments</text:span><text:bookmark-end text:name="__RefHeading___Toc5300_3700672249"/></text:h>
      <text:p text:style-name="P287">Visualiser les segments et apprécier la taille</text:p>
      <text:p text:style-name="P289">Pour le topic <text:span text:style-name="T10">position</text:span> modifier le <text:span text:style-name="T10">segment.bytes</text:span> à <text:span text:style-name="T193">512ko</text:span></text:p>
      <text:p text:style-name="P312"><text:span text:style-name="T72">Diminuer le </text:span><text:span text:style-name="T78">retention.bytes</text:span><text:span text:style-name="T72"> </text:span></text:p>
      <text:p text:style-name="P312"><text:span text:style-name="T74"/></text:p>
      <text:p text:style-name="P335"><text:span text:style-name="T74">G</text:span><text:span text:style-name="T71">énérer des messages </text:span><text:span text:style-name="T74">afin de voir des segments disparaître</text:span></text:p>
      <text:h text:style-name="Heading_20_2" text:outline-level="2"><text:bookmark-start text:name="__RefHeading___Toc20373_2913458575"/>10.<text:span text:style-name="T276">2</text:span> Extension du cluster et réassignement des partitions<text:bookmark-end text:name="__RefHeading___Toc20373_2913458575"/></text:h>
      <text:h text:style-name="Heading_20_3" text:outline-level="3"><text:bookmark-start text:name="__RefHeading___Toc21122_2913458575"/>10.2.1 Augmenter le nombre de partitions<text:bookmark-end text:name="__RefHeading___Toc21122_2913458575"/></text:h>
      <text:p text:style-name="P36">Modifier le nombre de partitions de position à 8</text:p>
      <text:p text:style-name="P37">Vérifier avec </text:p>
      <text:p text:style-name="Code">./kafka-topics.sh <text:span text:style-name="T63">--bootstrap-server localhost:909</text:span><text:span text:style-name="T64">2</text:span> <text:span text:style-name="Source_20_Text">\</text:span></text:p>
      <text:p text:style-name="Code"><text:span text:style-name="Source_20_Text"><text:s text:c="2"/>--command-config client-</text:span><text:span text:style-name="Source_20_Text"><text:span text:style-name="T305">admin-</text:span></text:span><text:span text:style-name="Source_20_Text">ssl.properties \</text:span></text:p>
      <text:p text:style-name="Code"><text:span text:style-name="Source_20_Text"><text:s text:c="2"/></text:span>--describe --topic position</text:p>
      <text:p text:style-name="P35"/>
      <text:h text:style-name="Heading_20_3" text:outline-level="3"><text:bookmark-start text:name="__RefHeading___Toc21124_2913458575"/>10.2.2 Ajout d’un nouveau nœud <text:span text:style-name="T307">broker simple</text:span><text:bookmark-end text:name="__RefHeading___Toc21124_2913458575"/></text:h>
      <text:p text:style-name="P292"/>
      <text:p text:style-name="P292">Mettre au point un fichier <text:span text:style-name="T10">server4.properties</text:span></text:p>
      <text:p text:style-name="P292">Récupérer l’id du cluster :</text:p>
      <text:p text:style-name="Code"><text:span text:style-name="Source_20_Text">cat </text:span><text:span text:style-name="Source_20_Text"><text:span text:style-name="T306">$KAFKA_LOGS</text:span></text:span><text:span text:style-name="Source_20_Text">/broker-1/meta.properties | grep cluster.id</text:span></text:p>
      <text:p text:style-name="P292">Formatter le répertoire de logs </text:p>
      <text:p text:style-name="Code">bin/kafka-storage.sh format \</text:p>
      <text:p text:style-name="Code"><text:s text:c="2"/>--config config/server4.properties \</text:p>
      <text:p text:style-name="Code"><text:s text:c="2"/>--cluster-id &lt;CLUSTER_ID_RECUPERE&gt; \</text:p>
      <text:p text:style-name="Code"><text:s text:c="2"/>--no-initial-controllers</text:p>
      <text:p text:style-name="P35"/>
      <text:p text:style-name="P293">Démarrer le 4ème serveur </text:p>
      <text:p text:style-name="Code">$KAFKA_HOME/bin/kafka-server-start.sh -daemon config/server4.properties</text:p>
      <text:p text:style-name="P230"/>
      <text:p text:style-name="P293"/>
      <text:h text:style-name="Heading_20_3" text:outline-level="3"><text:bookmark-start text:name="__RefHeading___Toc21126_2913458575"/>10.2.3 Effectuer une réaffectation des partitions en 3 étapes<text:bookmark-end text:name="__RefHeading___Toc21126_2913458575"/></text:h>
      <text:p text:style-name="P35"/>
      <text:h text:style-name="Heading_20_2" text:outline-level="2"><text:bookmark-start text:name="__RefHeading___Toc9832_3845367211"/><text:soft-page-break/><text:span text:style-name="T128">10</text:span><text:span text:style-name="T126">.</text:span><text:span text:style-name="T127">3</text:span><text:span text:style-name="T124"> R</text:span><text:span text:style-name="T125">olling restart</text:span><text:bookmark-end text:name="__RefHeading___Toc9832_3845367211"/></text:h>
      <text:h text:style-name="Heading_20_3" text:outline-level="3"><text:bookmark-start text:name="__RefHeading___Toc21128_2913458575"/><text:span text:style-name="T308">10.3.</text:span>1. Créer le topic de test<text:bookmark-end text:name="__RefHeading___Toc21128_2913458575"/></text:h>
      <text:p text:style-name="P305">bash</text:p>
      <text:p text:style-name="P214"><text:span text:style-name="Source_20_Text"><text:span text:style-name="T239">kafka-topics.sh --bootstrap-server localhost:9094 </text:span></text:span><text:span text:style-name="Source_20_Text"><text:span text:style-name="T246">\</text:span></text:span></text:p>
      <text:p text:style-name="P214"><text:span text:style-name="Source_20_Text"><text:span text:style-name="T240"><text:s text:c="2"/></text:span></text:span><text:span text:style-name="Source_20_Text"><text:span text:style-name="T239">--command-config admin-client.properties </text:span></text:span><text:span text:style-name="Source_20_Text"><text:span text:style-name="T246">\</text:span></text:span></text:p>
      <text:p text:style-name="P214"><text:span text:style-name="Source_20_Text"><text:span text:style-name="T240"><text:s text:c="2"/></text:span></text:span><text:span text:style-name="Source_20_Text"><text:span text:style-name="T239">--create --topic rolling-test </text:span></text:span><text:span text:style-name="Source_20_Text"><text:span text:style-name="T246">\</text:span></text:span></text:p>
      <text:p text:style-name="P214"><text:span text:style-name="Source_20_Text"><text:span text:style-name="T240"><text:s text:c="2"/></text:span></text:span><text:span text:style-name="Source_20_Text"><text:span text:style-name="T239">--partitions </text:span></text:span><text:span text:style-name="Source_20_Text"><text:span text:style-name="T248">10</text:span></text:span><text:span text:style-name="Source_20_Text"><text:span text:style-name="T239"> --replication-factor </text:span></text:span><text:span text:style-name="Source_20_Text"><text:span text:style-name="T248">3</text:span></text:span><text:span text:style-name="Source_20_Text"><text:span text:style-name="T239"> </text:span></text:span><text:span text:style-name="Source_20_Text"><text:span text:style-name="T246">\</text:span></text:span></text:p>
      <text:p text:style-name="P213"><text:span text:style-name="Source_20_Text"><text:span text:style-name="T240"><text:s text:c="2"/></text:span></text:span><text:span text:style-name="Source_20_Text"><text:span text:style-name="T239">--config min.insync.replicas=</text:span></text:span><text:span text:style-name="Source_20_Text"><text:span text:style-name="T248">2</text:span></text:span></text:p>
      <text:h text:style-name="Heading_20_3" text:outline-level="3"><text:bookmark-start text:name="__RefHeading___Toc21130_2913458575"/><text:span text:style-name="T308">10.3.</text:span>2. Lancer la charge<text:bookmark-end text:name="__RefHeading___Toc21130_2913458575"/></text:h>
      <text:p text:style-name="Text_20_body"><text:span text:style-name="Strong_20_Emphasis">Terminal A — producer en continu :</text:span></text:p>
      <text:p text:style-name="Code"><text:span text:style-name="Source_20_Text">kafka-producer-perf-test.sh \</text:span></text:p>
      <text:p text:style-name="Code"><text:span text:style-name="Source_20_Text"><text:s text:c="2"/>--topic rolling-test \</text:span></text:p>
      <text:p text:style-name="Code"><text:span text:style-name="Source_20_Text"><text:s text:c="2"/>--num-records 10000000 \</text:span></text:p>
      <text:p text:style-name="Code"><text:span text:style-name="Source_20_Text"><text:s text:c="2"/>--record-size 1000 \</text:span></text:p>
      <text:p text:style-name="Code"><text:span text:style-name="Source_20_Text"><text:s text:c="2"/>--throughput 2000 \</text:span></text:p>
      <text:p text:style-name="Code"><text:span text:style-name="Source_20_Text"><text:s text:c="2"/>--producer-props bootstrap.servers=localhost:9094 acks=all \</text:span></text:p>
      <text:p text:style-name="Code"><text:span text:style-name="Source_20_Text"><text:s text:c="2"/>--producer.config admin-client.properties \</text:span></text:p>
      <text:p text:style-name="Code"><text:span text:style-name="Source_20_Text"><text:s text:c="2"/>--print-metrics</text:span></text:p>
      <text:p text:style-name="Text_20_body"><text:span text:style-name="Source_20_Text">--throughput 2000</text:span> = 2000 msg/s, charge modérée mais visible. <text:span text:style-name="Source_20_Text">--print-metrics</text:span> affiche les métriques détaillées (record-error-rate, p99 latency) à la fin.</text:p>
      <text:p text:style-name="Text_20_body"><text:span text:style-name="Strong_20_Emphasis">Terminal B — consumer en continu :</text:span></text:p>
      <text:p text:style-name="P175"><text:span text:style-name="Source_20_Text">kafka-console-consumer.sh \</text:span></text:p>
      <text:p text:style-name="P175"><text:span text:style-name="Source_20_Text"><text:s text:c="2"/>--bootstrap-server localhost:9094 \</text:span></text:p>
      <text:p text:style-name="P175"><text:span text:style-name="Source_20_Text"><text:s text:c="2"/>--consumer.config admin-client.properties \</text:span></text:p>
      <text:p text:style-name="P175"><text:span text:style-name="Source_20_Text"><text:s text:c="2"/>--topic rolling-test \</text:span></text:p>
      <text:p text:style-name="P175"><text:span text:style-name="Source_20_Text"><text:s text:c="2"/>--group rolling-test-consumers \</text:span></text:p>
      <text:p text:style-name="P175"><text:span text:style-name="Source_20_Text"><text:s text:c="2"/>--property print.timestamp=true \</text:span></text:p>
      <text:p text:style-name="P175"><text:span text:style-name="Source_20_Text"><text:s text:c="2"/>&gt; /dev/null</text:span></text:p>
      <text:p text:style-name="Text_20_body">On envoie vers <text:span text:style-name="Source_20_Text">/dev/null</text:span> parce qu'on veut juste mesurer la consommation, pas voir les messages. Tu peux remplacer par un vrai <text:span text:style-name="Source_20_Text">kafka-consumer-perf-test.sh</text:span> si tu veux des métriques formelles.</text:p>
      <text:h text:style-name="Heading_20_3" text:outline-level="3"><text:bookmark-start text:name="__RefHeading___Toc21132_2913458575"/><text:span text:style-name="T308">10.3.</text:span>3. État initial — à capturer dans un fichier<text:bookmark-end text:name="__RefHeading___Toc21132_2913458575"/></text:h>
      <text:p text:style-name="Code"><text:span text:style-name="Source_20_Text">kafka-topics.sh --bootstrap-server localhost:9094 \</text:span></text:p>
      <text:p text:style-name="Code"><text:span text:style-name="Source_20_Text"><text:s text:c="2"/>--command-config admin-client.properties \</text:span></text:p>
      <text:p text:style-name="Code"><text:span text:style-name="Source_20_Text"><text:s text:c="2"/>--describe --topic rolling-test \</text:span></text:p>
      <text:p text:style-name="Code"><text:span text:style-name="Source_20_Text"><text:s text:c="2"/>| tee etat-initial.txt</text:span></text:p>
      <text:p text:style-name="Text_20_body">Sortie type :</text:p>
      <text:p text:style-name="P214"><text:span text:style-name="Source_20_Text"><text:span text:style-name="T239">Topic: rolling-test <text:s/>Partition: 0 <text:s/>Leader: 1 <text:s/>Replicas: 1,2,3 <text:s/>Isr: 1,2,3</text:span></text:span></text:p>
      <text:p text:style-name="P211"><text:soft-page-break/><text:span text:style-name="Source_20_Text"><text:span text:style-name="T239">Topic: rolling-test <text:s/>Partition: 1 <text:s/>Leader: 2 <text:s/>Replicas: 2,3,4 <text:s/>Isr: 2,3,4</text:span></text:span></text:p>
      <text:p text:style-name="P212"><text:span text:style-name="Source_20_Text"><text:span text:style-name="T239">...</text:span></text:span></text:p>
      <text:h text:style-name="Heading_20_3" text:outline-level="3"><text:bookmark-start text:name="__RefHeading___Toc21134_2913458575"/><text:span text:style-name="T308">10.3.</text:span>4. Observer la migration en temps réel<text:bookmark-end text:name="__RefHeading___Toc21134_2913458575"/></text:h>
      <text:p text:style-name="Text_20_body"><text:span text:style-name="Strong_20_Emphasis">Terminal C — watch des ISR (le terminal le plus utile) :</text:span></text:p>
      <text:p text:style-name="Code"><text:span text:style-name="Source_20_Text">watch -n 1 'kafka-topics.sh --bootstrap-server localhost:9094 \</text:span></text:p>
      <text:p text:style-name="Code"><text:span text:style-name="Source_20_Text"><text:s text:c="2"/>--command-config admin-client.properties \</text:span></text:p>
      <text:p text:style-name="Code"><text:span text:style-name="Source_20_Text"><text:s text:c="2"/>--describe --topic rolling-test \</text:span></text:p>
      <text:p text:style-name="Code"><text:span text:style-name="Source_20_Text"><text:s text:c="2"/>| awk "/Partition:/ {print \$0}"'</text:span></text:p>
      <text:p text:style-name="Text_20_body">Ça rafraîchit toutes les secondes. Tu vois en direct quel broker disparaît des ISR et quels leaders migrent.</text:p>
      <text:p text:style-name="Text_20_body"><text:span text:style-name="Strong_20_Emphasis">Terminal D — under-replicated partitions (alerte rouge) :</text:span></text:p>
      <text:p text:style-name="Code"><text:span text:style-name="Source_20_Text">watch -n 1 'kafka-topics.sh --bootstrap-server localhost:9094 \</text:span></text:p>
      <text:p text:style-name="Code"><text:span text:style-name="Source_20_Text"><text:s text:c="2"/>--command-config admin-client.properties \</text:span></text:p>
      <text:p text:style-name="Code"><text:span text:style-name="Source_20_Text"><text:s text:c="2"/>--describe --under-replicated-partitions'</text:span></text:p>
      <text:p text:style-name="Text_20_body">En régime nominal, cette commande ne renvoie <text:span text:style-name="Strong_20_Emphasis">rien</text:span>. Dès qu'un broker tombe, les partitions qu'il hébergeait apparaissent. C'est le signal le plus clair pour suivre le rolling.</text:p>
      <text:p text:style-name="Text_20_body"><text:span text:style-name="Strong_20_Emphasis">Terminal E — état du quorum KRaft :</text:span></text:p>
      <text:p text:style-name="Code"><text:span text:style-name="Source_20_Text">watch -n 2 'kafka-metadata-quorum.sh --bootstrap-server localhost:9094 \</text:span></text:p>
      <text:p text:style-name="Code"><text:span text:style-name="Source_20_Text"><text:s text:c="2"/>--command-config admin-client.properties \</text:span></text:p>
      <text:p text:style-name="Code"><text:span text:style-name="Source_20_Text"><text:s text:c="2"/>describe --replication'</text:span></text:p>
      <text:p text:style-name="Text_20_body">Affiche le lag de chaque voter par rapport au leader du quorum. Utile surtout si tu redémarres un nœud qui est aussi controller.</text:p>
      <text:h text:style-name="P209" text:outline-level="3"><text:bookmark-start text:name="__RefHeading___Toc21136_2913458575"/><text:span text:style-name="T308">10.3.</text:span>5. Le rolling restart proprement dit<text:bookmark-end text:name="__RefHeading___Toc21136_2913458575"/></text:h>
      <text:p text:style-name="Text_20_body">Pour <text:s/><text:span text:style-name="T309">un des brokers</text:span></text:p>
      <text:p text:style-name="Text_20_body"><text:span text:style-name="Strong_20_Emphasis">a. Arrêt propre :</text:span></text:p>
      <text:p text:style-name="Code"><text:span text:style-name="Source_20_Text"># Trouver le PID</text:span></text:p>
      <text:p text:style-name="Code"><text:span text:style-name="Source_20_Text"><text:span text:style-name="T270">ps</text:span></text:span><text:span text:style-name="Source_20_Text"><text:span text:style-name="T239"> aux | </text:span></text:span><text:span text:style-name="Source_20_Text"><text:span text:style-name="T270">grep</text:span></text:span><text:span text:style-name="Source_20_Text"><text:span text:style-name="T239"> </text:span></text:span><text:span text:style-name="Source_20_Text"><text:span text:style-name="T268">"server1.properties"</text:span></text:span><text:span text:style-name="Source_20_Text"><text:span text:style-name="T239"> | </text:span></text:span><text:span text:style-name="Source_20_Text"><text:span text:style-name="T270">grep</text:span></text:span><text:span text:style-name="Source_20_Text"><text:span text:style-name="T239"> -v </text:span></text:span><text:span text:style-name="Source_20_Text"><text:span text:style-name="T270">grep</text:span></text:span></text:p>
      <text:p text:style-name="Code"><text:span text:style-name="Source_20_Text"># SIGTERM (= shutdown propre, pas SIGKILL)</text:span></text:p>
      <text:p text:style-name="Code"><text:span text:style-name="Source_20_Text"><text:span text:style-name="T270">kill</text:span></text:span><text:span text:style-name="Source_20_Text"><text:span text:style-name="T239"> &lt;PID&gt;</text:span></text:span></text:p>
      <text:p text:style-name="Code"><text:span text:style-name="Source_20_Text"># Ou si tu as lancé via kafka-server-start.sh, idéalement :</text:span></text:p>
      <text:p text:style-name="Code"><text:span text:style-name="Source_20_Text">kafka-server-stop.sh</text:span></text:p>
      <text:p text:style-name="Text_20_body"><text:span text:style-name="Strong_20_Emphasis">b. Vérifier dans le terminal C</text:span> que le broker disparaît des ISR. </text:p>
      <text:p text:style-name="P213"><text:span text:style-name="Source_20_Text"><text:span text:style-name="T239">Topic: rolling-test <text:s/>Partition: 0 <text:s/>Leader: 2 <text:s/>Replicas: 1,2,3 <text:s/>Isr: 2,3</text:span></text:span></text:p>
      <text:p text:style-name="Text_20_body">(le 1 a disparu de l'ISR, le leader a migré sur 2)</text:p>
      <text:p text:style-name="Text_20_body"><text:span text:style-name="Strong_20_Emphasis">c. Attendre stabilisation</text:span> — le terminal D doit se vider rapidement (les leaders ont tous migré, ne reste que la sous-réplication des partitions du broker arrêté).</text:p>
      <text:p text:style-name="Text_20_body"><text:span text:style-name="Strong_20_Emphasis">d. Redémarrer :</text:span></text:p>
      <text:p text:style-name="P213"><text:soft-page-break/><text:span text:style-name="Source_20_Text"><text:span text:style-name="T239">kafka-server-start.sh -daemon </text:span></text:span><text:span text:style-name="Source_20_Text"><text:span text:style-name="T295">$KAFKA_HOME</text:span></text:span><text:span text:style-name="Source_20_Text"><text:span text:style-name="T239">/config/server1.properties</text:span></text:span></text:p>
      <text:p text:style-name="Text_20_body"><text:span text:style-name="Strong_20_Emphasis">e. Observer la réintégration</text:span> — dans le terminal C, le broker revient progressivement dans les ISR. Pendant la phase de catch-up, il est dans <text:span text:style-name="Source_20_Text">Replicas</text:span> mais pas encore dans <text:span text:style-name="Source_20_Text">Isr</text:span>.</text:p>
      <text:p text:style-name="Text_20_body"><text:span text:style-name="Strong_20_Emphasis">f. Attendre que le terminal D soit vide</text:span> (= zéro partition under-replicated) avant de passer au broker suivant. <text:span text:style-name="Strong_20_Emphasis">Crucial</text:span> : si tu touches au broker suivant avant, tu peux passer sous <text:span text:style-name="Source_20_Text">min.insync.replicas</text:span>.</text:p>
      <text:h text:style-name="P209" text:outline-level="3"><text:bookmark-start text:name="__RefHeading___Toc21138_2913458575"/><text:span text:style-name="T308">10.3.</text:span>6. Rééquilibrage des leaders<text:bookmark-end text:name="__RefHeading___Toc21138_2913458575"/></text:h>
      <text:p text:style-name="Text_20_body">Après le rolling complet, les leaders sont souvent déséquilibrés (concentrés sur les derniers brokers redémarrés). Forcer le retour à la distribution préférée :</text:p>
      <text:p text:style-name="Code"><text:span text:style-name="Source_20_Text">kafka-leader-election.sh --bootstrap-server localhost:9094 \</text:span></text:p>
      <text:p text:style-name="Code"><text:span text:style-name="Source_20_Text"><text:s text:c="2"/>--admin.config admin-client.properties \</text:span></text:p>
      <text:p text:style-name="Code"><text:span text:style-name="Source_20_Text"><text:s text:c="2"/>--election-type preferred \</text:span></text:p>
      <text:p text:style-name="Code"><text:span text:style-name="Source_20_Text"><text:s text:c="2"/>--all-topic-partitions</text:span></text:p>
      <text:p text:style-name="Text_20_body">Puis re-comparer avec l'état initial :</text:p>
      <text:p text:style-name="Code"><text:span text:style-name="Source_20_Text">kafka-topics.sh --bootstrap-server localhost:9094 \</text:span></text:p>
      <text:p text:style-name="Code"><text:span text:style-name="Source_20_Text"><text:s text:c="2"/>--command-config admin-client.properties \</text:span></text:p>
      <text:p text:style-name="Code"><text:span text:style-name="Source_20_Text"><text:s text:c="2"/>--describe --topic rolling-test \</text:span></text:p>
      <text:p text:style-name="Code"><text:span text:style-name="Source_20_Text"><text:s text:c="2"/>| tee etat-final.txt</text:span></text:p>
      <text:p text:style-name="Code"><text:span text:style-name="Source_20_Text">diff etat-initial.txt etat-final.txt</text:span></text:p>
      <text:p text:style-name="Text_20_body">Idéalement le diff est vide (ou se limite à des permutations dans l'ordre des ISR, ce qui est normal).</text:p>
      <text:h text:style-name="P209" text:outline-level="3"><text:bookmark-start text:name="__RefHeading___Toc21140_2913458575"/><text:span text:style-name="T308">10.3.</text:span>7. Métriques côté producer<text:bookmark-end text:name="__RefHeading___Toc21140_2913458575"/></text:h>
      <text:p text:style-name="Text_20_body">Le producer-perf-test affiche en sortie :</text:p>
      <text:p text:style-name="P214"><text:span text:style-name="Source_20_Text"><text:span text:style-name="T239">50 records sent, 9.9 records/sec ...</text:span></text:span></text:p>
      <text:p text:style-name="P211"><text:span text:style-name="Source_20_Text"><text:span text:style-name="T239">...</text:span></text:span></text:p>
      <text:p text:style-name="P212"><text:span text:style-name="Source_20_Text"><text:span text:style-name="T239">50000 records sent, ..., 0.04 ms 50th, 2.00 ms 99th, ...</text:span></text:span></text:p>
      <text:p text:style-name="Text_20_body">Ce que tu veux pointer aux stagiaires :</text:p>
      <text:list text:style-name="L30">
        <text:list-item>
          <text:p text:style-name="P337"><text:span text:style-name="Strong_20_Emphasis">Aucune erreur</text:span> dans la sortie (<text:span text:style-name="Source_20_Text">record-error-rate</text:span> à 0). </text:p>
        </text:list-item>
        <text:list-item>
          <text:p text:style-name="P337"><text:span text:style-name="Strong_20_Emphasis">Pic de latence p99</text:span> au moment des shutdowns — c'est normal, le temps que le metadata refresh trouve le nouveau leader. </text:p>
        </text:list-item>
        <text:list-item>
          <text:p text:style-name="P336"><text:span text:style-name="Strong_20_Emphasis">Aucun message perdu</text:span> côté consumer (vérifiable avec <text:span text:style-name="Source_20_Text">kafka-consumer-groups.sh --describe</text:span>). </text:p>
        </text:list-item>
      </text:list>
      <text:p text:style-name="Code"><text:span text:style-name="Source_20_Text">kafka-consumer-groups.sh --bootstrap-server localhost:9094 \</text:span></text:p>
      <text:p text:style-name="Code"><text:span text:style-name="Source_20_Text"><text:s text:c="2"/>--command-config admin-client.properties \</text:span></text:p>
      <text:p text:style-name="Code"><text:span text:style-name="Source_20_Text"><text:s text:c="2"/>--describe --group rolling-test-consumers</text:span></text:p>
      <text:p text:style-name="Text_20_body">Le <text:span text:style-name="Source_20_Text">LAG</text:span> doit revenir à 0 (ou rester faible et stable) après chaque restart. S'il croît durablement, c'est qu'on a un vrai souci.</text:p>
      <text:p text:style-name="P290"/>
      <text:p text:style-name="P290"><text:tab/></text:p>
      <text:h text:style-name="Heading_20_1" text:outline-level="1"><text:bookmark-start text:name="__RefHeading___Toc9838_3845367211"/><text:soft-page-break/><text:span text:style-name="T137">Atelier </text:span><text:span text:style-name="T143">11.</text:span><text:span text:style-name="T137"> </text:span>Monitoring avec Prometheus/Grafana<text:bookmark-end text:name="__RefHeading___Toc9838_3845367211"/></text:h>
      <text:p text:style-name="P73"/>
      <text:p text:style-name="P157"><text:span text:style-name="T75">Dans</text:span><text:span text:style-name="T123"> </text:span><text:span text:style-name="T75">un premier temps, démarré une </text:span><text:span text:style-name="T77">J</text:span><text:span text:style-name="T76">C</text:span><text:span text:style-name="T77">onsole</text:span><text:span text:style-name="T75"> et visualiser les Mbeans des brokers, consommateurs et producteurs</text:span></text:p>
      <text:p text:style-name="Code">$JAVA_HOME/bin/jconsole &amp;</text:p>
      <text:p text:style-name="P69"/>
      <text:p text:style-name="P42"/>
      <text:h text:style-name="Heading_20_2" text:outline-level="2"><text:bookmark-start text:name="__RefHeading___Toc2654_1126617678"/><text:span text:style-name="T277">11</text:span>.1 Exporter les informations JMX au format Prometheus<text:bookmark-end text:name="__RefHeading___Toc2654_1126617678"/></text:h>
      <text:p text:style-name="P52"><text:span text:style-name="T119">Dans un répertoire de travail </text:span><text:span text:style-name="T120">monitoring</text:span></text:p>
      <text:p text:style-name="P78"/>
      <text:p text:style-name="P78"><text:span text:style-name="T116">wget </text:span><text:a xlink:type="simple" xlink:href="https://repo1.maven.org/maven2/io/prometheus/jmx/jmx_prometheus_javaagent/0.6/jmx_prometheus_javaagent-0.6.jar" text:style-name="Internet_20_link" text:visited-style-name="Visited_20_Internet_20_Link"><text:span text:style-name="T116">https://repo1.maven.org/maven2/io/prometheus/jmx/jmx_prometheus_javaagent/0.</text:span><text:span text:style-name="T118">2</text:span></text:a><text:span text:style-name="T118">0</text:span><text:a xlink:type="simple" xlink:href="https://repo1.maven.org/maven2/io/prometheus/jmx/jmx_prometheus_javaagent/0.6/jmx_prometheus_javaagent-0.6.jar" text:style-name="Internet_20_link" text:visited-style-name="Visited_20_Internet_20_Link"><text:span text:style-name="T117">.0</text:span></text:a><text:a xlink:type="simple" xlink:href="https://repo1.maven.org/maven2/io/prometheus/jmx/jmx_prometheus_javaagent/0.20.0/jmx_prometheus_javaagent-0.20.jar" text:style-name="Internet_20_link" text:visited-style-name="Visited_20_Internet_20_Link"><text:span text:style-name="T116">/jmx_prometheus_javaagent-0.</text:span><text:span text:style-name="T118">2</text:span></text:a><text:span text:style-name="T118">0</text:span><text:a xlink:type="simple" xlink:href="https://repo1.maven.org/maven2/io/prometheus/jmx/jmx_prometheus_javaagent/0.6/jmx_prometheus_javaagent-0.6.jar" text:style-name="Internet_20_link" text:visited-style-name="Visited_20_Internet_20_Link"><text:span text:style-name="T117">.0</text:span><text:span text:style-name="T116">.jar</text:span></text:a></text:p>
      <text:p text:style-name="P61">wget </text:p>
      <text:p text:style-name="P61">https://raw.githubusercontent.com/confluentinc/jmx-monitoring-stacks/main/shared-assets/jmx-exporter/kafka_broker.yml</text:p>
      <text:p text:style-name="P78"/>
      <text:p text:style-name="P78">Modifier le script de démarrage du cluster afin de positionner l’agent Prom<text:span text:style-name="T148">e</text:span>theus :</text:p>
      <text:p text:style-name="P61">KAFKA_OPTS="$KAFKA_OPTS -javaagent:$PWD/jmx_prometheus_javaagent-0.2.0.jar=<text:span text:style-name="T62">7071</text:span>:$PWD/kafka_<text:span text:style-name="T194">broker</text:span>.yml" \</text:p>
      <text:p text:style-name="P61"><text:s text:c="2"/></text:p>
      <text:p text:style-name="P79">Attention, Modifier le port pour chaque broker </text:p>
      <text:p text:style-name="P79"/>
      <text:p text:style-name="P80"><text:span text:style-name="T147">Redémarrer le cluster et vérifier </text:span><text:a xlink:type="simple" xlink:href="http://localhost:7071/metrics" text:style-name="Internet_20_link" text:visited-style-name="Visited_20_Internet_20_Link">http://localhost:7071/metrics</text:a><text:span text:style-name="T79"> </text:span><text:span text:style-name="T80">(Peut prendre du temps avant de s’afficher)</text:span></text:p>
      <text:p text:style-name="P116"/>
      <text:h text:style-name="Heading_20_2" text:outline-level="2"><text:bookmark-start text:name="__RefHeading___Toc2656_1126617678"/>9.3 Mise en place Prometheus Grafana<text:bookmark-end text:name="__RefHeading___Toc2656_1126617678"/></text:h>
      <text:p text:style-name="P43">Dans le répertoire grafana <text:span text:style-name="T227">des données du TP</text:span>, lancer la stack via :</text:p>
      <text:p text:style-name="Code">docker compose up -d</text:p>
      <text:p text:style-name="P33"/>
      <text:p text:style-name="P34">Se connecter sur <text:span text:style-name="T10">http ://localhost:9090</text:span></text:p>
      <text:p text:style-name="P34">Vérifier les cibles <text:span text:style-name="T195">de </text:span>prometheus </text:p>
      <text:p text:style-name="P34"/>
      <text:p text:style-name="P32">Accéder à <text:a xlink:type="simple" xlink:href="http://localhost:3000/" text:style-name="Internet_20_link" text:visited-style-name="Visited_20_Internet_20_Link">http://localhost:3000</text:a> avec <text:span text:style-name="T10">admin/admin</text:span></text:p>
      <text:p text:style-name="P32"/>
      <text:p text:style-name="P32"><text:span text:style-name="T226">Vérifier la datasource </text:span>Prometheus </text:p>
      <text:p text:style-name="P53"><text:span text:style-name="T121">Importer le tableau de bord </text:span><text:span text:style-name="T122">fourni (Provient de </text:span><text:a xlink:type="simple" xlink:href="https://github.com/confluentinc/jmx-monitoring-stacks/tree/6.0.1-post/jmxexporter-prometheus-grafana/assets/prometheus/grafana/provisioning/dashboards" text:style-name="Internet_20_link" text:visited-style-name="Visited_20_Internet_20_Link"><text:span text:style-name="T122">https://github.com/confluentinc/jmx-monitoring-</text:span><text:span text:style-name="T122">stacks/tree/6.0.1-post/jmxexporter-prometheus-grafana/assets/prometheus/grafana/provisioning/</text:span><text:soft-page-break/><text:span text:style-name="T122">dashboards</text:span></text:a><text:span text:style-name="T122">) </text:span></text:p>
      <text:p text:style-name="Text_20_body"><text:line-break/></text:p>
      <text:p text:style-name="P32">Les métriques des brokers <text:span text:style-name="T225">doivent</text:span> s’afficher</text:p>
      <text:p text:style-name="P70"/>
      <text:h text:style-name="P191" text:outline-level="1"><text:bookmark-start text:name="__RefHeading___Toc2658_1126617678"/><text:span text:style-name="T230">A. </text:span>Annexes <text:bookmark-end text:name="__RefHeading___Toc2658_1126617678"/></text:h>
      <text:p text:style-name="P71"/>
      <text:h text:style-name="P200" text:outline-level="2"><text:bookmark-start text:name="__RefHeading___Toc9768_3845367211"/><text:span text:style-name="T230">A</text:span><text:span text:style-name="T170">.</text:span>1. <text:span text:style-name="T98">Installation Ensemble Zookeeper </text:span><text:s/><text:bookmark-end text:name="__RefHeading___Toc9768_3845367211"/></text:h>
      <text:p text:style-name="P109"><text:bookmark-start text:name="__RefHeading___Toc9770_3845367211"/>Récupérer <text:span text:style-name="T107">une distribution de Zookeeper</text:span>.<text:bookmark-end text:name="__RefHeading___Toc9770_3845367211"/></text:p>
      <text:p text:style-name="P30"><text:tab/></text:p>
      <text:p text:style-name="P121"><text:span text:style-name="T88">C</text:span><text:span text:style-name="T87">réer un répertoire (</text:span><text:span text:style-name="T91">dans la suite nommé </text:span><text:span text:style-name="T92">ZK_ENSEMBLE</text:span><text:span text:style-name="T87">) pour stocker les fichiers de configuration des instance</text:span></text:p>
      <text:p text:style-name="P117">Y créer 3 sous-répertoire 1,2 et 3 </text:p>
      <text:p text:style-name="P122"><text:span text:style-name="T87">Dans chacun des répertoire créer un sous-répertoire </text:span><text:span text:style-name="T94">data</text:span><text:span text:style-name="T87"> y créer un fichier nommé </text:span><text:span text:style-name="T94">myid</text:span><text:span text:style-name="T87"> contenant l’identifiant de l’instance (1,2 et 3)</text:span></text:p>
      <text:p text:style-name="P121"><text:span text:style-name="T89">Copier dans chacun des répertoires le répertoire </text:span><text:span text:style-name="T95">conf</text:span><text:span text:style-name="T89"> de la distribution</text:span></text:p>
      <text:p text:style-name="P122"><text:span text:style-name="T87">Dans chacun des répertoire éditer le fichier </text:span><text:span text:style-name="T96">zoo.cfg </text:span><text:span text:style-name="T93">, </text:span><text:span text:style-name="T97">en particulier</text:span></text:p>
      <text:list text:style-name="L18">
        <text:list-item>
          <text:p text:style-name="P266"><text:span text:style-name="T88">d</text:span><text:span text:style-name="T87">ataDir</text:span></text:p>
        </text:list-item>
        <text:list-item>
          <text:p text:style-name="P304">Les ports TCP utilisés</text:p>
        </text:list-item>
      </text:list>
      <text:p text:style-name="P118"/>
      <text:p text:style-name="P109"><text:span text:style-name="T88">S</text:span><text:span text:style-name="T89">e mettre au point un </text:span><text:span text:style-name="T90">script</text:span><text:span text:style-name="T89"> sh permettant de démarrer les 3 instances</text:span></text:p>
      <text:p text:style-name="P68"><text:span text:style-name="T108">$ZK_HOME</text:span>/bin/zkServer.sh --<text:span text:style-name="T152">c</text:span>onfig $ZK_ENSEMBLE<text:span text:style-name="T108">CONF/1/conf</text:span> start &amp;&amp; </text:p>
      <text:p text:style-name="P68"><text:span text:style-name="T108">$ZK_HOME</text:span>/bin/zkServer.sh --config $ZK_ENSEMBLE<text:span text:style-name="T108">CONF/2/conf</text:span> start</text:p>
      <text:p text:style-name="P68">&amp;&amp; </text:p>
      <text:p text:style-name="P68"><text:span text:style-name="T108">$ZK_HOME</text:span>/bin/zkServer.sh --config $ZK_ENSEMBLE<text:span text:style-name="T108">CONF/3/conf</text:span> start</text:p>
      <text:p text:style-name="P68"/>
      <text:p text:style-name="P55">Données partagées :</text:p>
      <text:p text:style-name="P109"><text:bookmark-start text:name="__RefHeading___Toc9772_3845367211"/>Connecter à l’instance 1 via :<text:bookmark-end text:name="__RefHeading___Toc9772_3845367211"/></text:p>
      <text:p text:style-name="P110">./zookeeper-1/bin/zkCli.sh -server 127.0.0.1:2181</text:p>
      <text:p text:style-name="P109"><text:bookmark-start text:name="__RefHeading___Toc9774_3845367211"/>Créer une donnée et <text:span text:style-name="T109">enregistrer</text:span> un <text:span text:style-name="T1">watcher</text:span> :<text:bookmark-end text:name="__RefHeading___Toc9774_3845367211"/></text:p>
      <text:p text:style-name="P68">create /<text:span text:style-name="T99">dp</text:span> hello</text:p>
      <text:p text:style-name="P68">get -<text:span text:style-name="T109">w </text:span>/<text:span text:style-name="T99">dp</text:span></text:p>
      <text:p text:style-name="P113"/>
      <text:p text:style-name="P114">Dans un autre terminal, se connecter à l’instance 2 et <text:span text:style-name="T110">mettre</text:span> à jour la donnée partagée</text:p>
      <text:p text:style-name="P112">./zookeeper-2/bin/zkCli.sh -server 127.0.0.1:2182</text:p>
      <text:p text:style-name="P111">set /<text:span text:style-name="T109">dp</text:span> world</text:p>
      <text:p text:style-name="P111"/>
      <text:p text:style-name="P114">Vous devez observer une notification dans le terminal 1</text:p>
      <text:p text:style-name="P114"/>
      <text:p text:style-name="P115">Election et quorum</text:p>
      <text:p text:style-name="P114">Afficher les rôles des serveurs avec la commande :</text:p>
      <text:p text:style-name="P111">echo stat | nc localhost 2181 | grep Mode &amp;&amp; echo stat | nc localhost 2182 | grep Mode &amp;&amp; echo stat | nc localhost 2183 | grep Mode</text:p>
      <text:p text:style-name="P109"><text:line-break/><text:soft-page-break/><text:span text:style-name="T99">Stopper le serveur leader et observer la réélection</text:span></text:p>
      <text:p text:style-name="P123">Stopper encore un serveur et interroger le serveur restant. <text:span text:style-name="T110">L’ensemble</text:span> n’ayant plus de quorum ne doit pas répondre</text:p>
      <text:p text:style-name="P72">Redémarrer un serveur et observer la remise en service de le l’ensemb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nsolas2" svg:font-family="Consolas, Monaco, 'Andale Mono', 'Ubuntu Mono', monospac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Droid Sans Mono" svg:font-family="'Droid Sans Mono', monospace"/>
    <style:font-face style:name="Droid Sans Mono1" svg:font-family="'Droid Sans Mono', monospace, monospac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JetBrains Mono1" svg:font-family="'JetBrains Mono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Mono3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family-generic="system" style:font-pitch="variable"/>
    <style:font-face style:name="OpenSymbol3" svg:font-family="OpenSymbol" style:font-adornments="Regular" style:font-pitch="variable"/>
    <style:font-face style:name="OpenSymbol4" svg:font-family="OpenSymbol, 'Arial Unicode MS'" style:font-family-generic="system" style:font-pitch="variable"/>
    <style:font-face style:name="RedHatText" svg:font-family="RedHatText, helvetica, arial, sans-serif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inconsolata" svg:font-family="inconsolata, sans-serif"/>
    <style:font-face style:name="var font-mono" svg:font-family="'var font-mono'"/>
    <style:font-face style:name="var font-mono1" svg:font-family="'var font-mono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color="#000000" loext:opacity="100%" fo:font-size="10.5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OpenSymbol4" style:font-family-complex="OpenSymbol, 'Arial Unicode M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right="0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4" style:font-family-complex="OpenSymbol, 'Arial Unicode MS'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OpenSymbol4" style:font-family-complex="OpenSymbol, 'Arial Unicode M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4" style:font-family-complex="OpenSymbol, 'Arial Unicode MS'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yle_20_de_20_dessin_20_par_20_défaut">
      <style:paragraph-properties fo:margin-left="0cm" fo:margin-right="0cm"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yle_20_de_20_dessin_20_par_20_défaut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yle_20_de_20_dessin_20_par_20_défaut">
      <style:paragraph-properties fo:margin-left="0cm" fo:margin-right="0.199cm" fo:margin-top="0.101cm" fo:margin-bottom="0.101cm" style:contextual-spacing="false" fo:line-height="95%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>
      <style:text-properties style:font-name="Liberation Mono3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Lien_20_Internet" style:display-name="Lien Internet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Caractères_20_de_20_numérotation" style:display-name="Caractères de numérotation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5f_2" style:display-name="Standard_2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20_2_7e_LT_7e_Notizen" style:display-name="Standard 2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5f_1_5f_3" style:display-name="Standard_1_3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5f_1_5f_2" style:display-name="Standard_1_2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5f_1_5f_1_5f_1" style:display-name="Standard_1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5f_1_5f_1" style:display-name="Standard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5f_1" style:display-name="Standard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Blank_20_Slide_7e_LT_7e_Notizen" style:display-name="Blank Slide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Hintergrund" style:display-name="Standard 1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20_1_7e_LT_7e_Notizen" style:display-name="Standard 1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5f_1_5f_4" style:display-name="Standard_1_4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re1_7e_LT_7e_Gliederung_20_1" style:display-name="Titre1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Titre1_7e_LT_7e_Hintergrund" style:display-name="Titre1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aut_20_d_27_index" style:display-name="Saut d'index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Lien_20_Internet_20_visité" style:display-name="Lien Internet visité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Code" style:family="paragraph" style:parent-style-name="Text_20_body">
      <style:text-properties style:font-name="Courier New" fo:font-family="'Courier New'" style:font-family-generic="modern" style:font-pitch="fixed" officeooo:rsid="01fcfc09" fo:background-color="#ddddd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mmande" style:family="paragraph" style:parent-style-name="Preformatted_20_Text">
      <style:paragraph-properties fo:margin-top="0cm" fo:margin-bottom="0.3cm" style:contextual-spacing="false"/>
      <style:text-properties fo:font-weight="bold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Lohit Hindi2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_20__28_WW_29_" style:display-name="Text body (WW)" style:family="paragraph" style:parent-style-name="Standard_20__28_WW_29_">
      <style:paragraph-properties fo:margin-top="0cm" fo:margin-bottom="0.212cm" style:contextual-spacing="false"/>
    </style:style>
    <style:style style:name="List_20_Paragraph" style:display-name="List Paragraph" style:family="paragraph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3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3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3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3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3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3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3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3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3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3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3"/>
      </text:list-level-style-bullet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3"/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3"/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3"/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3"/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3"/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3"/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3"/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3"/>
      </text:list-level-style-bullet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3"/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3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3"/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3"/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3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3"/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3"/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6-05-13T08:51:58.686217349</dc:date>
    <meta:editing-duration>P37DT21H23M18S</meta:editing-duration>
    <meta:editing-cycles>484</meta:editing-cycles>
    <meta:generator>LibreOffice/24.2.7.2$Linux_X86_64 LibreOffice_project/420$Build-2</meta:generator>
    <meta:print-date>2026-05-12T14:10:39.524707163</meta:print-date>
    <meta:printed-by>Fichiers PDF</meta:printed-by>
    <meta:document-statistic meta:table-count="0" meta:image-count="0" meta:object-count="0" meta:page-count="41" meta:paragraph-count="1018" meta:word-count="6450" meta:character-count="52995" meta:non-whitespace-character-count="46954"/>
  </office:meta>
</office:document-meta>
</file>